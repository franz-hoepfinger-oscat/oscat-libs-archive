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3.847cm"/>
    </style:style>
    <style:style style:name="co7" style:family="table-column">
      <style:table-column-properties fo:break-before="auto" style:column-width="5.74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6.687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5.383cm"/>
    </style:style>
    <style:style style:name="co13" style:family="table-column">
      <style:table-column-properties fo:break-before="auto" style:column-width="6.24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8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9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10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rotation-align="bottom" style:vertical-align="top"/>
    </style:style>
    <style:style style:name="ce12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3" style:family="table-cell" style:parent-style-name="Default" style:data-style-name="N12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23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1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28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20" style:family="table-cell" style:parent-style-name="Default">
      <style:table-cell-properties style:rotation-align="bottom" style:vertical-align="top"/>
    </style:style>
    <style:style style:name="ce21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wrap-option="wrap" style:rotation-align="bottom" style:vertical-align="top"/>
    </style:style>
    <style:style style:name="ce23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7" style:family="table-cell" style:parent-style-name="Default" style:data-style-name="N37">
      <style:table-cell-properties fo:wrap-option="wrap" style:rotation-align="bottom" style:vertical-align="top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30" style:family="table-cell" style:parent-style-name="Default">
      <style:table-cell-properties fo:wrap-option="wrap" style:rotation-align="bottom" style:vertical-align="top"/>
      <style:text-properties style:font-name="Arial" fo:language="en" fo:country="US" fo:font-style="normal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2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13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 style:data-style-name="N125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5" style:family="table-cell" style:parent-style-name="Default" style:data-style-name="N121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40" style:family="table-cell" style:parent-style-name="Default" style:data-style-name="N112">
      <style:table-cell-properties fo:wrap-option="wrap" style:rotation-align="top"/>
      <style:text-properties fo:font-style="normal" fo:font-weight="bold"/>
    </style:style>
    <style:style style:name="ce41" style:family="table-cell" style:parent-style-name="Default" style:data-style-name="N11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2">
      <style:table-cell-properties fo:wrap-option="wrap" style:rotation-align="top"/>
      <style:text-properties fo:font-style="normal" fo:font-weight="normal"/>
    </style:style>
    <style:style style:name="ce43" style:family="table-cell" style:parent-style-name="Default" style:data-style-name="N112">
      <style:table-cell-properties style:rotation-align="top"/>
    </style:style>
    <style:style style:name="ce44" style:family="table-cell" style:parent-style-name="Default" style:data-style-name="N112">
      <style:table-cell-properties fo:wrap-option="wrap" style:rotation-align="top"/>
    </style:style>
    <style:style style:name="ce45" style:family="table-cell" style:parent-style-name="Default" style:data-style-name="N113">
      <style:table-cell-properties fo:wrap-option="wrap" style:rotation-align="top"/>
      <style:text-properties fo:font-style="normal" fo:font-weight="bold"/>
    </style:style>
    <style:style style:name="ce46" style:family="table-cell" style:parent-style-name="Default" style:data-style-name="N113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7" style:family="table-cell" style:parent-style-name="Default" style:data-style-name="N113">
      <style:table-cell-properties fo:wrap-option="wrap" style:rotation-align="top"/>
      <style:text-properties fo:font-style="normal" fo:font-weight="normal"/>
    </style:style>
    <style:style style:name="ce48" style:family="table-cell" style:parent-style-name="Default" style:data-style-name="N113">
      <style:table-cell-properties fo:wrap-option="wrap" style:rotation-align="top"/>
    </style:style>
    <style:style style:name="ce49" style:family="table-cell" style:parent-style-name="Default" style:data-style-name="N114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50" style:family="table-cell" style:parent-style-name="Default" style:data-style-name="N114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1" style:family="table-cell" style:parent-style-name="Default" style:data-style-name="N114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2" style:family="table-cell" style:parent-style-name="Default" style:data-style-name="N114">
      <style:table-cell-properties style:text-align-source="fix" style:repeat-content="false" fo:wrap-option="wrap" style:rotation-align="top"/>
      <style:paragraph-properties fo:text-align="start" fo:margin-left="0cm"/>
    </style:style>
    <style:style style:name="ce53" style:family="table-cell" style:parent-style-name="Default">
      <style:table-cell-properties fo:wrap-option="wrap" style:rotation-align="top"/>
      <style:text-properties fo:font-style="normal" fo:font-weight="bold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5" style:family="table-cell" style:parent-style-name="Default">
      <style:table-cell-properties fo:wrap-option="wrap" style:rotation-align="top"/>
      <style:text-properties fo:font-style="normal" fo:font-weight="normal"/>
    </style:style>
    <style:style style:name="ce56" style:family="table-cell" style:parent-style-name="Default">
      <style:table-cell-properties fo:wrap-option="wrap" style:rotation-align="top"/>
    </style:style>
    <style:style style:name="ce57" style:family="table-cell" style:parent-style-name="Default" style:data-style-name="N125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09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26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 style:data-style-name="N12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1" style:family="table-cell" style:parent-style-name="Default">
      <style:table-cell-properties style:rotation-align="top"/>
    </style:style>
    <style:style style:name="ce62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22"/>
        <table:table-column table:style-name="co4" table:default-cell-style-name="ce11"/>
        <table:table-column table:style-name="co5" table:default-cell-style-name="ce28"/>
        <table:table-column table:style-name="co6" table:default-cell-style-name="ce22"/>
        <table:table-column table:style-name="co7" table:default-cell-style-name="ce44"/>
        <table:table-column table:style-name="co8" table:default-cell-style-name="ce48"/>
        <table:table-column table:style-name="co8" table:default-cell-style-name="ce52"/>
        <table:table-column table:style-name="co8" table:visibility="collapse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3" table:default-cell-style-name="ce56"/>
        <table:table-column table:style-name="co12" table:number-columns-repeated="242" table:default-cell-style-name="ce56"/>
        <table:table-column table:style-name="co12" table:default-cell-style-name="ce61"/>
        <table:table-row table:style-name="ro1">
          <table:table-cell table:style-name="ce1" office:value-type="string" calcext:value-type="string">
            <text:p>Release</text:p>
          </table:table-cell>
          <table:table-cell table:style-name="ce12" office:value-type="string" calcext:value-type="string">
            <text:p>Modul name</text:p>
          </table:table-cell>
          <table:table-cell table:style-name="ce1" office:value-type="string" calcext:value-type="string">
            <text:p>Rev</text:p>
          </table:table-cell>
          <table:table-cell table:style-name="ce12" office:value-type="string" calcext:value-type="string">
            <text:p>Date</text:p>
          </table:table-cell>
          <table:table-cell table:style-name="ce29" office:value-type="string" calcext:value-type="string">
            <text:p>Histo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25"/>
          <table:table-cell table:style-name="ce3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oorected error in decad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dennis koepk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EVER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rebler wolfga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better readable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 Stru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, LDATE, LTOD to LOCAL_DT, LOCAL_DATE, LOCAL_TO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added input parameter D to pecify the decimal separato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11-12-29" calcext:value-type="date">
            <text:p>29.12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4-27" calcext:value-type="date">
            <text:p>27.04.11</text:p>
          </table:table-cell>
          <table:table-cell table:style-name="ce3" office:value-type="string" calcext:value-type="string">
            <text:p>fixed error with local time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PTL and PTH was exchang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night was calculated wro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optimiz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corrected an error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fact is using constants.ma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added array fac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1-03-22" calcext:value-type="date">
            <text:p>22.03.11</text:p>
          </table:table-cell>
          <table:table-cell table:style-name="ce3" office:value-type="string" calcext:value-type="string"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LAS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AD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AX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N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D3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QUA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5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reset was not work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9" calcext:value-type="date">
            <text:p>19.02.11</text:p>
          </table:table-cell>
          <table:table-cell table:style-name="ce3" office:value-type="string" calcext:value-type="string">
            <text:p>new enhanc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F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CLK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added input H to specify twil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fixed a problem, W was not calcula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/>
          <table:table-cell table:style-name="ce4"/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removed building code in external libra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27" calcext:value-type="date">
            <text:p>27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code to allow events over midn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type of last to D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using function sun_midday</text:p>
            <text:p>Changed calculation of sun_declination</text:p>
            <text:p>Changed input utc from DT to Date</text:p>
            <text:p>Added input 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MID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fix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-1 if nothing found</text:p>
            <text:p>Ign=true will ignore cas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S_DELT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  <text:p>Delta := sene / 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fixed a problem with pulse_m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LOW_MET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11-01-22" calcext:value-type="date">
            <text:p>22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NETWORK_BUFFER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URL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SUB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hanged offset from hours to minu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BUFFER_UPPERCA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HK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orrected init value to 16#FFFFFFF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removed nework buffers</text:p>
            <text:p>Added list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ARRAY_SO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faster algorithm using quicksor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0 if RH &lt;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underrun of o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ssign 0 before retur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spoken language</text:p>
            <text:p>Deleted holidays for more flex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input holidays to specify local holidays</text:p>
            <text:p>Changed call of function sun_time dt &gt;&gt; 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using user specified array for holidays</text:p>
            <text:p>Friday, saturday and sunday is also displayed on output nam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VENT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1" office:value-type="string" calcext:value-type="string">
            <text:p>init will not clear ontine and cycles, only rst clears these valu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REFLEC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CHECK</text:p>
          </table:table-cell>
          <table:table-cell table:style-name="ce4"/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Deleted and replaced by CRC_GE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code and featur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IRCLE_S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ACTUATOR_3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0-01-29" calcext:value-type="date">
            <text:p>29.01.10</text:p>
          </table:table-cell>
          <table:table-cell table:style-name="ce31" office:value-type="string" calcext:value-type="string">
            <text:p>new features and new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sun_rise, sun_set and sun_midday are now calculated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10-23" calcext:value-type="date">
            <text:p>23.10.10</text:p>
          </table:table-cell>
          <table:table-cell table:style-name="ce31" office:value-type="string" calcext:value-type="string">
            <text:p>sun_rise, sun_set and sun_midday are now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fixed a bug during calibration</text:p>
            <text:p>Added T_UP and T_D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16" calcext:value-type="date">
            <text:p>16.01.10</text:p>
          </table:table-cell>
          <table:table-cell table:style-name="ce31" office:value-type="string" calcext:value-type="string">
            <text:p>avoid the string cal in comments for codesys import bu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12-16" calcext:value-type="date">
            <text:p>16.12.09</text:p>
          </table:table-cell>
          <table:table-cell table:style-name="ce31" office:value-type="string" calcext:value-type="string">
            <text:p>fixed error over midnigh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R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s pos to be I/O</text:p>
            <text:p>Changed output array size to 32 ele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0</text:p>
          </table:table-cell>
          <table:table-cell table:style-name="Default"/>
          <table:table-cell table:style-name="ce4"/>
          <table:table-cell table:style-name="ce25" office:value-type="date" office:date-value="2009-11-24" calcext:value-type="date">
            <text:p>24.11.09</text:p>
          </table:table-cell>
          <table:table-cell table:style-name="ce3" office:value-type="string" calcext:value-type="string">
            <text:p>Network Components exported into Network Librar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added network short and long size</text:p>
            <text:p>Default string_length = 25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fixed code for negative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 is now calculated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an error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output pos was not pointing to last val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size -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array siz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start and stop to size of arr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SHADE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added state 139</text:p>
            <text:p>set defaults for QU, QD, P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RAY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YTE_TO_GR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TR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1" calcext:value-type="date">
            <text:p>21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T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D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K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C_TO_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major code changes and upda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output C is now calculated in J/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manag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s status to be 12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0 to 13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fixed a problem with wrong midday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parameters of tono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ONO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1" calcext:value-type="date">
            <text:p>21.07.09</text:p>
          </table:table-cell>
          <table:table-cell table:style-name="ce31" office:value-type="string" calcext:value-type="string">
            <text:p>fixed a timing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IMECHEC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9" calcext:value-type="date">
            <text:p>19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changed all outputs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Default" office:value-type="string" calcext:value-type="string">
            <text:p>_RMP_NEX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9" calcext:value-type="date">
            <text:p>29.03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8" calcext:value-type="date">
            <text:p>28.03.09</text:p>
          </table:table-cell>
          <table:table-cell table:style-name="ce31" office:value-type="string" calcext:value-type="string">
            <text:p>replaced multip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YE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sto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po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RIVER_4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real constants updated to new systax using dot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corrected non standard write to input 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IM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2" calcext:value-type="date">
            <text:p>22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8" calcext:value-type="date">
            <text:p>18.03.09</text:p>
          </table:table-cell>
          <table:table-cell table:style-name="ce31" office:value-type="string" calcext:value-type="string">
            <text:p>last was not updated</text:p>
            <text:p>Code improve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8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4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8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4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R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function will now return -273.15 °C for RH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INDE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3" office:value-type="string" calcext:value-type="string">
            <text:p>HEAT_TE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using new module sequence_8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4" office:value-type="string" calcext:value-type="string">
            <text:p>TEMP_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C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ENTHALP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C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RA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5" office:value-type="string" calcext:value-type="string">
            <text:p>SPE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T_TP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PRESSUR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NG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F_TO_P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TRO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C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IBR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NSOR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SI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P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Q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  <text:p>set default amplitude to 1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ORD_TO_RAN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I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V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TREN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AB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OLYNOM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IANGLE_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Z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Y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X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17" office:value-type="string" calcext:value-type="string">
            <text:p>V3_P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U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OR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  <text:p>Calculation is done on every call to allow for moving installa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QRT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MOI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NGEV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RA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T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use correct statement real_to_D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I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S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moved double 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al constants written with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S_I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calculation of work_week, sun_midday, sun_heigth</text:p>
            <text:p>sun_position will onlx be calculated once per 25 seconds when SPE = TRUE</text:p>
            <text:p>dst will only become true when dst_en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work_week, sun_midday, sun_hei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Default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ce31" office:value-type="string" calcext:value-type="string">
            <text:p>input E was ignored</text:p>
            <text:p>Removed double assign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08" calcext:value-type="date">
            <text:p>08.03.09</text:p>
          </table:table-cell>
          <table:table-cell table:style-name="ce31" office:value-type="string" calcext:value-type="string">
            <text:p>added increment by cycle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refraction is added after angle is normalized</text:p>
            <text:p>deleted 10 second lockout</text:p>
            <text:p>added output for astronomical heigth 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using new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8" calcext:value-type="date">
            <text:p>28.02.09</text:p>
          </table:table-cell>
          <table:table-cell table:style-name="ce31" office:value-type="string" calcext:value-type="string">
            <text:p>array was not correctly initializ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1-23" calcext:value-type="date">
            <text:p>23.01.09</text:p>
          </table:table-cell>
          <table:table-cell table:style-name="ce31" office:value-type="string" calcext:value-type="string">
            <text:p>new code with better accuracy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7"/>
          <table:table-cell table:style-name="ce54" table:number-columns-repeated="2"/>
          <table:table-cell table:style-name="ce59"/>
          <table:table-cell table:style-name="ce54" table:number-columns-repeated="242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25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LECT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renamed input en to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a missing zero for IN &lt;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COND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INUTE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OUR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AY_TO_TI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when inc1 is called with X &gt;= N inc will continue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corrected an index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improved algorithm and added T_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added outputs TU, TD and 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calendar data structure</text:p>
            <text:p>Added shading position to be configur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2" office:value-type="string" calcext:value-type="string">
            <text:p>corrected wrong night calculation</text:p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MX to be I/O</text:p>
            <text:p>Make sure calculation works for cycle times &lt; 1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output Y to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outputs T24_MIN and T24_MAX</text:p>
            <text:p>Changed sign of input OF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9-01-26" calcext:value-type="date">
            <text:p>26.01.09</text:p>
          </table:table-cell>
          <table:table-cell table:style-name="ce31" office:value-type="string" calcext:value-type="string">
            <text:p>dimming will reverse at 0</text:p>
            <text:p>Rst will override 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multiply differential part with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now also works with negative 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CALE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3" office:value-type="string" calcext:value-type="string"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8"/>
          <table:table-cell table:style-name="ce54" table:number-columns-repeated="245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4" office:value-type="string" calcext:value-type="string">
            <text:p>delted unused var F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4"/>
          <table:table-cell table:style-name="ce60"/>
          <table:table-cell table:style-name="ce54" table:number-columns-repeated="242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d unused var in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s unused vars tmp1 and tmp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GEO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added auto mode for IN</text:p>
            <text:p>Added pulse mode for D1 and D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16" calcext:value-type="date">
            <text:p>16.01.09</text:p>
          </table:table-cell>
          <table:table-cell table:style-name="ce5" office:value-type="string" calcext:value-type="string">
            <text:p>corrected an error in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LICK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2-28" calcext:value-type="date">
            <text:p>28.12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holi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ANGUAG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langua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2-22" calcext:value-type="date">
            <text:p>22.12.08</text:p>
          </table:table-cell>
          <table:table-cell table:style-name="ce31" office:value-type="string" calcext:value-type="string">
            <text:p>make sure timer_2 is executed in the first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name of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angles below horizon are displayed in negative degre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ixed an error when in would be true for more then 49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ADE input F was i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_LIN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optimized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added default enq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ANU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BAND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UTORU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M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U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moved structured constants to global var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Reset Out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added soft_dimm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LICK_M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0" calcext:value-type="date">
            <text:p>10.11.08</text:p>
          </table:table-cell>
          <table:table-cell table:style-name="ce31" office:value-type="string" calcext:value-type="string">
            <text:p>increased internal resolution to millisecond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I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ACTUATOR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added default = true for ena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set defaults for inputs day and e, 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changed to FT_INT2 to avoid overrun at hig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deleted unused variable chec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INTEGR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and fixed a problem with in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YCLE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IN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CLE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hanged algorithm to the more common version using floor instead of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IN_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YTE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D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GGL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JK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R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INC to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DEC and _INC to DEC1 and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DE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IGN_I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integrator will not be adjusted when ki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E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  <text:p>Improved accuracy for small values by a factor &gt; 100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Added 1 / pi and 1 /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ATRI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X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SOFT</text:p>
          </table:table-cell>
          <table:table-cell table:style-name="ce4" office:value-type="string" calcext:value-type="string">
            <text:p>3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LK_PR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8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4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_4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OUN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 using constant deca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  <text:p>A_TRIG now works for res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NO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changed code to use new version of timer_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, enable input new features (DAYS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W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fixed a problem with character 8 and 9 behind the comm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18" office:value-type="string" calcext:value-type="string">
            <text:p>CONSTANTS_LANGUA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</text:p>
            <text:p>New featur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LA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W_RECONF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5" office:value-type="string" calcext:value-type="string">
            <text:p>using location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CH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B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PUMP</text:p>
          </table:table-cell>
          <table:table-cell table:style-name="ce4"/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URN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d time_zone_offset from Real to INT, now in Minu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OCAL_TIME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deleted from library, can be replaced by UTC_TO_L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5" office:value-type="string" calcext:value-type="string">
            <text:p>changed to structured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31" office:value-type="string" calcext:value-type="string">
            <text:p>performance improvement</text:p>
            <text:p>Deleted unnecessary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ALPH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</text:p>
          </table:table-cell>
          <table:table-cell table:style-name="ce4"/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deleted unnecessary function because -X is fast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renamed module from TP_R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added typecast to avoid warnings</text:p>
            <text:p>changed output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calls for rmp_B because of change in 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D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B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_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A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M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TO_O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VEKTOR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EA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TWORK_BUFF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MPLE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2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s type of input ofs from int to by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d inp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performance improvement</text:p>
            <text:p>changed calls for rmp_w because rmp_w has chag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variable m_ed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U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ialization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fixed a problem where list_len would only work up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5" calcext:value-type="date">
            <text:p>15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orrected an error for in_3 overrange detection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hanges code for efficiency</text:p>
            <text:p>Changes TIME_Zone_Offset from Int to REAL to allow half hour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PU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auto activation can now be disabled when run_every = T#0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DE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IN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0" calcext:value-type="date">
            <text:p>10.10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8" calcext:value-type="date">
            <text:p>0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CF_77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from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  <text:p>changed function weekday to day_of_week</text:p>
            <text:p/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EMP_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YEAR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2" calcext:value-type="date">
            <text:p>02.10.08</text:p>
          </table:table-cell>
          <table:table-cell table:style-name="ce31" office:value-type="string" calcext:value-type="string">
            <text:p>fixed an error, characters 8 and 9 would not be co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added input val to supply value for set operation</text:p>
            <text:p>Added setup parameter INIT_VA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Default" office:value-type="string" calcext:value-type="string"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9" calcext:value-type="date">
            <text:p>29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8" calcext:value-type="date">
            <text:p>28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AT_TE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moved T_INT from config to Input</text:p>
            <text:p>Added config variable H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corrected an error while PO and AO was set during automatic mo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5" calcext:value-type="date">
            <text:p>25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4" calcext:value-type="date">
            <text:p>24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BOUNC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7</text:p>
          </table:table-cell>
          <table:table-cell table:style-name="Default" office:value-type="string" calcext:value-type="string">
            <text:p>GLOBAL CONSTANTS </text:p>
          </table:table-cell>
          <table:table-cell table:style-name="Default"/>
          <table:table-cell table:style-name="ce25" office:value-type="date" office:date-value="2008-09-21" calcext:value-type="date">
            <text:p>21.09.08</text:p>
          </table:table-cell>
          <table:table-cell table:style-name="Default" office:value-type="string" calcext:value-type="string">
            <text:p>added new section Language Setup</text:p>
            <text:p>added new section country setu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OCT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5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11" calcext:value-type="date">
            <text:p>1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1" calcext:value-type="date">
            <text:p>2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7-18" calcext:value-type="date">
            <text:p>18.07.08</text:p>
          </table:table-cell>
          <table:table-cell table:style-name="ce31" office:value-type="string" calcext:value-type="string">
            <text:p>changed nested call of left(trim())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OF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C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F_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PULSE_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JD2000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4" calcext:value-type="date">
            <text:p>14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D to CTRL_PID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 to CTRL_PI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T_TO_BCD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INT_TO_BCD to INT_TO_BCDC to avoid collision with util.lib</text:p>
            <text:p>corrected error in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CD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BCD_TO_INT to BCDC_TO_INT to avoid collision with util.li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duced size of string constants to 253 to avoid problems with target aixia DCU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QUENCE_6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C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W_CONTRO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Default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Default" office:value-type="string" calcext:value-type="string">
            <text:p>LIST_LE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2" calcext:value-type="date">
            <text:p>2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WORD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YTE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PA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DWOR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changed input hex to STRING(20)</text:p>
            <text:p>function now ignores wrong charact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L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replace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concat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BEG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N = 16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EN = TRUE and N = 3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S_TO_BF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FT_TO_M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check for pointer overrun</text:p>
            <text:p>change type of inputs start and stop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T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changes type of input N from byte to 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OUR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INUTE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COND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T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rewritten with clear code</text:p>
            <text:p>added output LIM</text:p>
            <text:p>switched back to 32 Bit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ACTUATOR_COI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20" calcext:value-type="date">
            <text:p>20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added charname lists</text:p>
            <text:p>renamed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Default" office:value-type="string" calcext:value-type="string">
            <text:p>SCAL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PLACE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added new constant PI05 and PI025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PERIOD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URLCH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LO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AR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Setup Parameter NETWORK_BUFFER_SIZ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CF77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input dsi to allow to set daylight savings time when SDT is TRUE</text:p>
            <text:p>added asynchronous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TRING_TO_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AL_TO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etup paramete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_BEG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EEKD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AS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AY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Default" office:value-type="string" calcext:value-type="string">
            <text:p>GAUS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6" calcext:value-type="date">
            <text:p>06.04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SORT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FLOO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MU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D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B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3-30" calcext:value-type="date">
            <text:p>30.03.08</text:p>
          </table:table-cell>
          <table:table-cell table:style-name="ce2" office:value-type="string" calcext:value-type="string">
            <text:p>changed last in rdm2 from pos to i+pos for more randomnes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4" office:value-type="string" calcext:value-type="string">
            <text:p>27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3-29" calcext:value-type="date">
            <text:p>29.03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SSAG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  <text:p>limit the output string to max 20 digi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3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1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Added setup parameter STRING_LENGTH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SORTE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acter 127 is now recognized as 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 will now accept exten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function now returns -1 for input &lt; 0 or &gt; 46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4" calcext:value-type="date">
            <text:p>24.03.08</text:p>
          </table:table-cell>
          <table:table-cell table:style-name="ce36" office:value-type="string" calcext:value-type="string">
            <text:p>use data_type real2 to extend accuracy to 15 digits total</text:p>
            <text:p>do not use ft_int which adds unnecessary overhea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unction would deliver wrong results when d1 and dx are a leap_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ixed some bugs when month was negativ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OD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Changed type of input IN from int to d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_TRU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changed trunc to dint because trunc was generating wrong values on wago 842</text:p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Make sure output of exec will always be in the format x.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CHECK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9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ode improvement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deleted wrong conversion real_to_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P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D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A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output weekday to wday and dst to d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I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UL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resul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INUTE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COND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changed code to avoid rounding problem at last digit of millisecon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RA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changed preset value out_min to -1e37</text:p>
            <text:p>stop integrator at the limits</text:p>
            <text:p>optimized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2" calcext:value-type="date">
            <text:p>12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improved accuracy around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hanged formula to avoid problems when x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result 0 for con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extended range of valid inputs to +inv / -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to dint instead of rea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of fact to dint to allow bigg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extended range of valid inputs to +/- INV</text:p>
            <text:p>changed formula for better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orrected an error in formula</text:p>
            <text:p>extended range of valid inputs to +/- 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make sure last will be between 0 and 1 to avoid invalid resul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corrected an error in pulse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EXTENDED_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CHE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result is now rounded instead of trunc</text:p>
            <text:p>corrected an error with reals &lt; 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ed support for a..f and return 0 for invalid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 a 0 to the string if a '.' is at the end of the string <text:s text:c="3"/>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IP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MAX(pos,1) in loop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findb := 0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R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DI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EX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N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LO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Q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HYPO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EMPERATUR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replaced + with or for better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YTE_OF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2" calcext:value-type="date">
            <text:p>12.02.08</text:p>
          </table:table-cell>
          <table:table-cell table:style-name="ce36" office:value-type="string" calcext:value-type="string">
            <text:p>added config variables rain_up and wind_up</text:p>
            <text:p>position for rain and wind is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Added interim variable to allow for changes smaller them 8 digits of out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Use new version of ft_int and deleted unnecessary limits for integrato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return string would not be terminated proper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03" calcext:value-type="date">
            <text:p>03.02.08</text:p>
          </table:table-cell>
          <table:table-cell table:style-name="ce19" office:value-type="string" calcext:value-type="string">
            <text:p>Modifi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02" calcext:value-type="date">
            <text:p>02.02.08</text:p>
          </table:table-cell>
          <table:table-cell table:style-name="ce36" office:value-type="string" calcext:value-type="string">
            <text:p>changed algorithm to avoind non iec functions and guarantee more randomnes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29" calcext:value-type="date">
            <text:p>29.01.08</text:p>
          </table:table-cell>
          <table:table-cell table:style-name="ce36" office:value-type="string" calcext:value-type="string">
            <text:p>Replaced shr/shl with and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25" calcext:value-type="date">
            <text:p>25.01.08</text:p>
          </table:table-cell>
          <table:table-cell table:style-name="ce36" office:value-type="string" calcext:value-type="string">
            <text:p>Improved algorithm for higher speed</text:p>
            <text:p>allow KR and KF to be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23" calcext:value-type="date">
            <text:p>23.01.08</text:p>
          </table:table-cell>
          <table:table-cell table:style-name="ce36" office:value-type="string" calcext:value-type="string">
            <text:p>added sdt input which is used to initialize rtc and rtc1 during first cycle. 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1" calcext:value-type="date">
            <text:p>21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0" calcext:value-type="date">
            <text:p>20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18" calcext:value-type="date">
            <text:p>18.01.08</text:p>
          </table:table-cell>
          <table:table-cell table:style-name="ce36" office:value-type="string" calcext:value-type="string">
            <text:p>further performance improvements</text:p>
            <text:p>only calculate once every 10 second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/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calculation is now only performed once a 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IMER_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UNT_B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LECT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N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15" calcext:value-type="date">
            <text:p>15.01.08</text:p>
          </table:table-cell>
          <table:table-cell table:style-name="ce36" office:value-type="string" calcext:value-type="string">
            <text:p>Allow for negative incre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EAP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8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Q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KMH_TO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_TO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replaced /2 with * 0.5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Corrected an error with high values of sps tim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formula for step7 was incorrect during leap yea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3" calcext:value-type="date">
            <text:p>03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LK_DI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deleted unused variable p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30" calcext:value-type="date">
            <text:p>30.12.07</text:p>
          </table:table-cell>
          <table:table-cell table:style-name="ce36" office:value-type="string" calcext:value-type="string">
            <text:p>added click_timeout variable and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ATER_C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Increased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_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JK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R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4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2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OR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ESSAG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orrected an error while step response was too slow for fast rist tim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added config variable return_meter</text:p>
            <text:p>added output C for current consump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dded exit statement in for loop instead of i:=5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EEK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orrection fo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void a negative square root if input values are wro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changed code for better performance</text:p>
            <text:p>changed code to comply with ISO860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init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OSCAT_VERSI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added possibility to return date and version depoending on i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8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4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2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1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step now starts at 1 instaed of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20" office:value-type="string" calcext:value-type="string">
            <text:p>_ARRAY_SOR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added function return = tru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INT_TO_BC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CD_TO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Z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Y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RE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P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NOR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D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GAMM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start value for i has changed to 2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ONOF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9" calcext:value-type="date">
            <text:p>09.12.07</text:p>
          </table:table-cell>
          <table:table-cell table:style-name="ce36" office:value-type="string" calcext:value-type="string">
            <text:p>Corrected a problem with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2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COLLE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Added re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n error while esr type would not be 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7" calcext:value-type="date">
            <text:p>0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  <text:p>output is now in Gramms / Qubic met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10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calculation of step respons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ENSO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S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HEAT_INDE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  <text:p>avoid divide by 0 if TN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D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added shade_delay to avoid constant up and down if sun is out parcial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changes F_use of <text:s/>Buß_und_Bettag to 0 because this is no official holi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20" office:value-type="string" calcext:value-type="string">
            <text:p>when N=0 there will be no dot at the end of the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changed code of temp calculation to avoid overflow in modr due to resuclt would not fit DINT for high tim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replaced left over statement time() with t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changed type of function from int to 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7" calcext:value-type="date">
            <text:p>17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orrected a problem with size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zon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ime() into t_plc_ms(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UL_A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deleted preset values for K and O this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NE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ype of function from real to 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5" calcext:value-type="date">
            <text:p>05.11.07</text:p>
          </table:table-cell>
          <table:table-cell table:style-name="ce36" office:value-type="string" calcext:value-type="string">
            <text:p>replaced literal constant with variable because of error in möller ecp4 compil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changed dword to DINT in calcualtion to avoid warnings with some compil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EAD_BA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deleted unused variable RF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added int_to_dword stetements to avoid possible overrun with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hanged coding to avoid possible overrun situatio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onverted hour type integer to dowrd in calculation to avoid overru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INDOW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Rewritten to avoid error when one of the limits is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changed holiday definition from constant to input consta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30" calcext:value-type="date">
            <text:p>30.10.07</text:p>
          </table:table-cell>
          <table:table-cell table:style-name="ce36" office:value-type="string" calcext:value-type="string">
            <text:p>added lockout configuration time for motor direction chang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ATE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prohibit calculation when tx - last = 0 to avoid div 0 and increase accuracy on fast syste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changed code so int will not be called is time difference is 0 to increase accuracy on systems with cycle times below 1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code because the execution every 100ms can cause major problems </text:p>
            <text:p>if the supplied time was not correct at start. use of new dst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local_time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DCF77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deleted time_zone_offset input because dst is generally at 01:00 utc and not mesz</text:p>
            <text:p>uk starts 01:00 utc and also gree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23" calcext:value-type="date">
            <text:p>23.10.07</text:p>
          </table:table-cell>
          <table:table-cell table:style-name="ce36" office:value-type="string" calcext:value-type="string">
            <text:p>added out := in to the init statemen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9" calcext:value-type="date">
            <text:p>19.10.07</text:p>
          </table:table-cell>
          <table:table-cell table:style-name="ce36" office:value-type="string" calcext:value-type="string">
            <text:p>manual mode was not detected because outputs were checked and not inputs UP and DN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7" calcext:value-type="date">
            <text:p>1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GLOBAL CONSTANTS </text:p>
          </table:table-cell>
          <table:table-cell table:style-name="ce20"/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enamed PI in PI1 for better compatibility to other librari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E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Deg will become 0 when it reaches 36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A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ad will become 0 when it reaches 2P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Ignore angle when T_ANGLE &lt; T#10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5" calcext:value-type="date">
            <text:p>15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CRC_GEN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Added init values for start value and final XOR</text:p>
            <text:p>added reflect_in and reflect_out featur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count and lea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 y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m and tem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7" calcext:value-type="date">
            <text:p>0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actions are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named output ps and as to po and ao</text:p>
            <text:p>added click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Integrated blind_actuator into BLIND_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ACTUAT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arranged outpu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2" calcext:value-type="date">
            <text:p>02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MON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New coding for much better performance, no string functions us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, now call function set_dat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 problem , timer would not generate a pulse over midnigh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n error in algorithm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LEAP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error and 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etup Paramete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HAD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21" office:value-type="string" calcext:value-type="string">
            <text:p>BLIND_ACTUAT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INTERLO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chagned code to use array_sor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new algorithm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20" calcext:value-type="date">
            <text:p>20.09.07</text:p>
          </table:table-cell>
          <table:table-cell table:style-name="ce36" office:value-type="string" calcext:value-type="string">
            <text:p>corrected a problem with leap 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X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B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P_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8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4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UL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R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8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4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2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1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SOF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0" office:value-type="string" calcext:value-type="string">
            <text:p>DAY_OF_DA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_STA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6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Deleted unused code section for system time reading and unnecessary startup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YCLE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ROFILE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EX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WITCH_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ULSE_LENG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IMM_I 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ICK 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U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PU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3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OGG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ing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YTE_TO_STRH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to avoid a compiler warning under twinca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s k and old_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SI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  <text:p>and corrected an error in formula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8" office:value-type="string" calcext:value-type="string">
            <text:p>20</text:p>
          </table:table-cell>
          <table:table-cell table:style-name="ce19" office:value-type="string" calcext:value-type="string">
            <text:p>TEMP_NI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IT_COU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Improved performa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orrected an error while index would be out of array if N = 0;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04" calcext:value-type="date">
            <text:p>0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8-02" calcext:value-type="date">
            <text:p>02.08.07</text:p>
          </table:table-cell>
          <table:table-cell table:style-name="ce36" office:value-type="string" calcext:value-type="string">
            <text:p>Corrected an error while ontime would stop counting time after a certain time is reach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LTIME_TO_UT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BIT_COUN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10" calcext:value-type="date">
            <text:p>10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RC_CHEC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RC_G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BYTE_TO_STRB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BYTE_TO_STRH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WORD_TO_STR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WORD_TO_ST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18" calcext:value-type="date">
            <text:p>18.05.07</text:p>
          </table:table-cell>
          <table:table-cell office:value-type="string" calcext:value-type="string">
            <text:p>Corrected an error while Click would stop working when t_reconfig expir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ARRAY_SD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18" calcext:value-type="date">
            <text:p>18.03.07</text:p>
          </table:table-cell>
          <table:table-cell office:value-type="string" calcext:value-type="string">
            <text:p>changed code, dst would not work during first cycle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Changed code when RH = 0, not to execute log(0)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6" office:value-type="date" office:date-value="2007-05-02" calcext:value-type="date">
            <text:p>02.05.07</text:p>
          </table:table-cell>
          <table:table-cell table:style-name="ce28" office:value-type="string" calcext:value-type="string">
            <text:p>Added UG, universal gas constan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ARRAY_V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6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4-14" calcext:value-type="date">
            <text:p>14.04.07</text:p>
          </table:table-cell>
          <table:table-cell office:value-type="string" calcext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12" calcext:value-type="date">
            <text:p>12.04.07</text:p>
          </table:table-cell>
          <table:table-cell office:value-type="string" calcext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EW_C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table:style-name="ce23" office:value-type="string" calcext:value-type="string">
            <text:p>CYCLE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3-10" calcext:value-type="date">
            <text:p>10.03.07</text:p>
          </table:table-cell>
          <table:table-cell office:value-type="string" calcext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M_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6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EW_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4-17" calcext:value-type="date">
            <text:p>17.04.07</text:p>
          </table:table-cell>
          <table:table-cell office:value-type="string" calcext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MUL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CLK_PR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EC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INIT to prevent erroneous startup condition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GEN_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table:style-name="ce24" office:value-type="string" calcext:value-type="string">
            <text:p>CEIL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Output will be set to input during initial startu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 „click“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ULSE_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4" calcext:value-type="date">
            <text:p>04.03.07</text:p>
          </table:table-cell>
          <table:table-cell office:value-type="string" calcext:value-type="string">
            <text:p>Changed a critical erro while loop was indefinit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GEN_R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EAD_ZONE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IGN_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7" office:value-type="date" office:date-value="2007-03-03" calcext:value-type="date">
            <text:p>03.03.07</text:p>
          </table:table-cell>
          <table:table-cell table:style-name="ce39" office:value-type="string" calcext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W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HOLIDAYEAT_INDEX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s rh3 and T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WM_D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_LAM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 ini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ON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IMER_2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_ARRAY_MEDIA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orrected an error in median calcula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EC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GEN_SQ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default value for dc = 0.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WITCH_X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EC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T_PROFIL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WM_P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EAD_ZON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BAR_GRAP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6" calcext:value-type="date">
            <text:p>26.02.07</text:p>
          </table:table-cell>
          <table:table-cell office:value-type="string" calcext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UX_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structure „ramp“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_TO_O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ESR_MON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day_in_year and day_in_year_begi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Heat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7" calcext:value-type="date">
            <text:p>2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WORD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_ARRAY_INI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UN_PO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1" calcext:value-type="date">
            <text:p>01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SCALE_B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CALE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TAI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HYST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GEN_S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IGN_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KMH_TO_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Deleted unused variable time_overflow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3" calcext:value-type="date">
            <text:p>23.01.07</text:p>
          </table:table-cell>
          <table:table-cell office:value-type="string" calcext:value-type="string">
            <text:p>Deleted unused variables „force_on“ and „force_off“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PT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Improved algorithm for higher accuracy and spe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ENSOR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QRT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status output to be ESR compatib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_LIN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TN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t_band for structural adaptation of PI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BYTE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8" calcext:value-type="date">
            <text:p>18.01.07</text:p>
          </table:table-cell>
          <table:table-cell office:value-type="string" calcext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unused variables sun_rineR and sun_set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OM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ULTI_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hanged midr to mid3 funktion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Oil_Temp in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TUATOR_UD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TN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SCALE_B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reset to load the value of in instead of 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CALE_X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LEGIONELLA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ORK_WEEK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4" calcext:value-type="date">
            <text:p>14.01.07</text:p>
          </table:table-cell>
          <table:table-cell office:value-type="string" calcext:value-type="string">
            <text:p>deleted unused variable yda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CALE_X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 wday and dst outputs when there is no dcf recep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I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faktor K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H_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UX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ELAY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added variable temp to add 1 delay <text:s/>for q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ORD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_ARRAY_SOR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Function now returns TRU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4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TEMP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OFFSE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FT_DERIV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MP_SOF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Added default value for K = 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S_TO_KM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TEMP_N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ESR_MON_B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ESR_MON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AV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7" calcext:value-type="date">
            <text:p>07.01.07</text:p>
          </table:table-cell>
          <table:table-cell office:value-type="string" calcext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6" calcext:value-type="date">
            <text:p>06.02.07</text:p>
          </table:table-cell>
          <table:table-cell office:value-type="string" calcext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fixed an error with sign bit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input arrangemen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TEMP_S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ESR_COLLE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FT_TN6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ID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SCALE_B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6" calcext:value-type="date">
            <text:p>06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K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5" calcext:value-type="date">
            <text:p>15.10.06</text:p>
          </table:table-cell>
          <table:table-cell office:value-type="string" calcext:value-type="string">
            <text:p>Added output bus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IND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25" calcext:value-type="date">
            <text:p>25.12.06</text:p>
          </table:table-cell>
          <table:table-cell office:value-type="string" calcext:value-type="string">
            <text:p>Corrected an error with timer overflow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whith pulse width = 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_TP_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YCLE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2" calcext:value-type="date">
            <text:p>12.12.06</text:p>
          </table:table-cell>
          <table:table-cell office:value-type="string" calcext:value-type="string">
            <text:p>Added output cycle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INDB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Added UD outpu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IND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AYS_DELTA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3" calcext:value-type="date">
            <text:p>13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9" calcext:value-type="date">
            <text:p>19.10.06</text:p>
          </table:table-cell>
          <table:table-cell office:value-type="string" calcext:value-type="string">
            <text:p>Added code to avoid overrun of the end_switch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OSCAT_VERSI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IND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REAL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ACTUATOR_PU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INDB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STATUS_TO_ES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4" calcext:value-type="date">
            <text:p>04.10.06</text:p>
          </table:table-cell>
          <table:table-cell office:value-type="string" calcext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S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TRE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ere dst would be delayed by 0.1secon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AP_OF_DA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CHECK_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Corrected an error in buffer managemen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M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AP_YEA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AV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RRAY_SP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CAL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DST would be calculated wrong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UL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SH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T_MIN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_L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_QU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18" calcext:value-type="date">
            <text:p>18.08.06</text:p>
          </table:table-cell>
          <table:table-cell office:value-type="string" calcext:value-type="string">
            <text:p>fixed an error with low value negative and high value 0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_POW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21" calcext:value-type="date">
            <text:p>21.08.06</text:p>
          </table:table-cell>
          <table:table-cell office:value-type="string" calcext:value-type="string">
            <text:p>Coorected an error in formul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P_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ET_D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NC_DE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INUTE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HR_4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AY_OF_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YS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ECOND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F_D2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4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RA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ET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F_D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DI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2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PT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PUL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AY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RES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IFO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TACK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_TO_P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RES_N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1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IT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F_JK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TCH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GEN_SQ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GEN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HR_8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HR_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_TRI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YTE_OF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YTE_TO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HR_8PL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F_D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TACK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ET_DA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WITCH_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OUR_TO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YST_1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OUR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K_8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RES_S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FIFO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1" table:number-rows-repeated="638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unnamed_FilterIn_Database_1" table:target-range-address="Tabelle1.A1477:Tabelle1.IU17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3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.00.0000</text:date>, <text:time style:data-style-name="N2" text:time-value="13:38:37.7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08-02-24T20:13:04</meta:creation-date>
    <dc:date>2021-02-04T13:39:28.177000000</dc:date>
    <meta:editing-cycles>1014</meta:editing-cycles>
    <meta:editing-duration>P52DT1H7M33S</meta:editing-duration>
    <meta:document-statistic meta:table-count="3" meta:cell-count="8678" meta:object-count="0"/>
    <meta:user-defined meta:name="Info 1"/>
    <meta:user-defined meta:name="Info 2"/>
    <meta:user-defined meta:name="Info 3"/>
    <meta:user-defined meta:name="Info 4"/>
  </office:meta>
</office:document-meta>
</file>
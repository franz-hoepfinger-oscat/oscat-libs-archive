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scripts/>
  <office:font-face-decls>
    <style:font-face style:name="Arial2" svg:font-family="Arial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3.939cm"/>
    </style:style>
    <style:style style:name="co3" style:family="table-column">
      <style:table-column-properties fo:break-before="auto" style:column-width="0.859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14.429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9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9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9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0.49cm" fo:break-before="auto" style:use-optimal-row-height="tru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0.49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49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0.49cm" fo:break-before="auto" style:use-optimal-row-height="true"/>
    </style:style>
    <style:style style:name="ro16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0.49cm" fo:break-before="auto" style:use-optimal-row-height="true"/>
    </style:style>
    <style:style style:name="ro18" style:family="table-row">
      <style:table-row-properties style:row-height="0.894cm" fo:break-before="auto" style:use-optimal-row-height="true"/>
    </style:style>
    <style:style style:name="ro19" style:family="table-row">
      <style:table-row-properties style:row-height="0.49cm" fo:break-before="auto" style:use-optimal-row-height="tru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0.49cm" fo:break-before="auto" style:use-optimal-row-height="true"/>
    </style:style>
    <style:style style:name="ro22" style:family="table-row">
      <style:table-row-properties style:row-height="1.737cm" fo:break-before="auto" style:use-optimal-row-height="true"/>
    </style:style>
    <style:style style:name="ro23" style:family="table-row">
      <style:table-row-properties style:row-height="0.49cm" fo:break-before="auto" style:use-optimal-row-height="true"/>
    </style:style>
    <style:style style:name="ro24" style:family="table-row">
      <style:table-row-properties style:row-height="0.894cm" fo:break-before="auto" style:use-optimal-row-height="true"/>
    </style:style>
    <style:style style:name="ro25" style:family="table-row">
      <style:table-row-properties style:row-height="0.49cm" fo:break-before="auto" style:use-optimal-row-height="true"/>
    </style:style>
    <style:style style:name="ro26" style:family="table-row">
      <style:table-row-properties style:row-height="0.894cm" fo:break-before="auto" style:use-optimal-row-height="true"/>
    </style:style>
    <style:style style:name="ro27" style:family="table-row">
      <style:table-row-properties style:row-height="0.49cm" fo:break-before="auto" style:use-optimal-row-height="true"/>
    </style:style>
    <style:style style:name="ro28" style:family="table-row">
      <style:table-row-properties style:row-height="0.894cm" fo:break-before="auto" style:use-optimal-row-height="true"/>
    </style:style>
    <style:style style:name="ro29" style:family="table-row">
      <style:table-row-properties style:row-height="0.49cm" fo:break-before="auto" style:use-optimal-row-height="true"/>
    </style:style>
    <style:style style:name="ro30" style:family="table-row">
      <style:table-row-properties style:row-height="0.894cm" fo:break-before="auto" style:use-optimal-row-height="true"/>
    </style:style>
    <style:style style:name="ro31" style:family="table-row">
      <style:table-row-properties style:row-height="1.316cm" fo:break-before="auto" style:use-optimal-row-height="true"/>
    </style:style>
    <style:style style:name="ro32" style:family="table-row">
      <style:table-row-properties style:row-height="0.49cm" fo:break-before="auto" style:use-optimal-row-height="true"/>
    </style:style>
    <style:style style:name="ro33" style:family="table-row">
      <style:table-row-properties style:row-height="1.316cm" fo:break-before="auto" style:use-optimal-row-height="true"/>
    </style:style>
    <style:style style:name="ro34" style:family="table-row">
      <style:table-row-properties style:row-height="0.894cm" fo:break-before="auto" style:use-optimal-row-height="true"/>
    </style:style>
    <style:style style:name="ro35" style:family="table-row">
      <style:table-row-properties style:row-height="0.49cm" fo:break-before="auto" style:use-optimal-row-height="true"/>
    </style:style>
    <style:style style:name="ro36" style:family="table-row">
      <style:table-row-properties style:row-height="0.894cm" fo:break-before="auto" style:use-optimal-row-height="true"/>
    </style:style>
    <style:style style:name="ro37" style:family="table-row">
      <style:table-row-properties style:row-height="0.49cm" fo:break-before="auto" style:use-optimal-row-height="true"/>
    </style:style>
    <style:style style:name="ro38" style:family="table-row">
      <style:table-row-properties style:row-height="0.894cm" fo:break-before="auto" style:use-optimal-row-height="true"/>
    </style:style>
    <style:style style:name="ro39" style:family="table-row">
      <style:table-row-properties style:row-height="0.49cm" fo:break-before="auto" style:use-optimal-row-height="true"/>
    </style:style>
    <style:style style:name="ro40" style:family="table-row">
      <style:table-row-properties style:row-height="1.316cm" fo:break-before="auto" style:use-optimal-row-height="true"/>
    </style:style>
    <style:style style:name="ro41" style:family="table-row">
      <style:table-row-properties style:row-height="0.49cm" fo:break-before="auto" style:use-optimal-row-height="true"/>
    </style:style>
    <style:style style:name="ro42" style:family="table-row">
      <style:table-row-properties style:row-height="1.737cm" fo:break-before="auto" style:use-optimal-row-height="true"/>
    </style:style>
    <style:style style:name="ro43" style:family="table-row">
      <style:table-row-properties style:row-height="0.49cm" fo:break-before="auto" style:use-optimal-row-height="true"/>
    </style:style>
    <style:style style:name="ro44" style:family="table-row">
      <style:table-row-properties style:row-height="1.316cm" fo:break-before="auto" style:use-optimal-row-height="true"/>
    </style:style>
    <style:style style:name="ro45" style:family="table-row">
      <style:table-row-properties style:row-height="0.49cm" fo:break-before="auto" style:use-optimal-row-height="true"/>
    </style:style>
    <style:style style:name="ro46" style:family="table-row">
      <style:table-row-properties style:row-height="0.894cm" fo:break-before="auto" style:use-optimal-row-height="true"/>
    </style:style>
    <style:style style:name="ro47" style:family="table-row">
      <style:table-row-properties style:row-height="0.49cm" fo:break-before="auto" style:use-optimal-row-height="true"/>
    </style:style>
    <style:style style:name="ro48" style:family="table-row">
      <style:table-row-properties style:row-height="1.316cm" fo:break-before="auto" style:use-optimal-row-height="true"/>
    </style:style>
    <style:style style:name="ro49" style:family="table-row">
      <style:table-row-properties style:row-height="0.49cm" fo:break-before="auto" style:use-optimal-row-height="true"/>
    </style:style>
    <style:style style:name="ro50" style:family="table-row">
      <style:table-row-properties style:row-height="0.894cm" fo:break-before="auto" style:use-optimal-row-height="true"/>
    </style:style>
    <style:style style:name="ro51" style:family="table-row">
      <style:table-row-properties style:row-height="0.49cm" fo:break-before="auto" style:use-optimal-row-height="true"/>
    </style:style>
    <style:style style:name="ro52" style:family="table-row">
      <style:table-row-properties style:row-height="0.894cm" fo:break-before="auto" style:use-optimal-row-height="true"/>
    </style:style>
    <style:style style:name="ro53" style:family="table-row">
      <style:table-row-properties style:row-height="0.49cm" fo:break-before="auto" style:use-optimal-row-height="true"/>
    </style:style>
    <style:style style:name="ro54" style:family="table-row">
      <style:table-row-properties style:row-height="1.316cm" fo:break-before="auto" style:use-optimal-row-height="true"/>
    </style:style>
    <style:style style:name="ro55" style:family="table-row">
      <style:table-row-properties style:row-height="1.737cm" fo:break-before="auto" style:use-optimal-row-height="true"/>
    </style:style>
    <style:style style:name="ro56" style:family="table-row">
      <style:table-row-properties style:row-height="0.894cm" fo:break-before="auto" style:use-optimal-row-height="true"/>
    </style:style>
    <style:style style:name="ro57" style:family="table-row">
      <style:table-row-properties style:row-height="0.49cm" fo:break-before="auto" style:use-optimal-row-height="true"/>
    </style:style>
    <style:style style:name="ro58" style:family="table-row">
      <style:table-row-properties style:row-height="0.894cm" fo:break-before="auto" style:use-optimal-row-height="true"/>
    </style:style>
    <style:style style:name="ro59" style:family="table-row">
      <style:table-row-properties style:row-height="0.49cm" fo:break-before="auto" style:use-optimal-row-height="true"/>
    </style:style>
    <style:style style:name="ro60" style:family="table-row">
      <style:table-row-properties style:row-height="1.316cm" fo:break-before="auto" style:use-optimal-row-height="true"/>
    </style:style>
    <style:style style:name="ro61" style:family="table-row">
      <style:table-row-properties style:row-height="0.49cm" fo:break-before="auto" style:use-optimal-row-height="true"/>
    </style:style>
    <style:style style:name="ro62" style:family="table-row">
      <style:table-row-properties style:row-height="1.316cm" fo:break-before="auto" style:use-optimal-row-height="true"/>
    </style:style>
    <style:style style:name="ro63" style:family="table-row">
      <style:table-row-properties style:row-height="0.49cm" fo:break-before="auto" style:use-optimal-row-height="true"/>
    </style:style>
    <style:style style:name="ro64" style:family="table-row">
      <style:table-row-properties style:row-height="0.894cm" fo:break-before="auto" style:use-optimal-row-height="true"/>
    </style:style>
    <style:style style:name="ro65" style:family="table-row">
      <style:table-row-properties style:row-height="1.737cm" fo:break-before="auto" style:use-optimal-row-height="true"/>
    </style:style>
    <style:style style:name="ro66" style:family="table-row">
      <style:table-row-properties style:row-height="0.49cm" fo:break-before="auto" style:use-optimal-row-height="true"/>
    </style:style>
    <style:style style:name="ro67" style:family="table-row">
      <style:table-row-properties style:row-height="1.737cm" fo:break-before="auto" style:use-optimal-row-height="true"/>
    </style:style>
    <style:style style:name="ro68" style:family="table-row">
      <style:table-row-properties style:row-height="0.49cm" fo:break-before="auto" style:use-optimal-row-height="true"/>
    </style:style>
    <style:style style:name="ro69" style:family="table-row">
      <style:table-row-properties style:row-height="1.316cm" fo:break-before="auto" style:use-optimal-row-height="true"/>
    </style:style>
    <style:style style:name="ro70" style:family="table-row">
      <style:table-row-properties style:row-height="0.49cm" fo:break-before="auto" style:use-optimal-row-height="true"/>
    </style:style>
    <style:style style:name="ro71" style:family="table-row">
      <style:table-row-properties style:row-height="0.894cm" fo:break-before="auto" style:use-optimal-row-height="true"/>
    </style:style>
    <style:style style:name="ro72" style:family="table-row">
      <style:table-row-properties style:row-height="0.49cm" fo:break-before="auto" style:use-optimal-row-height="true"/>
    </style:style>
    <style:style style:name="ro73" style:family="table-row">
      <style:table-row-properties style:row-height="1.737cm" fo:break-before="auto" style:use-optimal-row-height="true"/>
    </style:style>
    <style:style style:name="ro74" style:family="table-row">
      <style:table-row-properties style:row-height="0.49cm" fo:break-before="auto" style:use-optimal-row-height="true"/>
    </style:style>
    <style:style style:name="ro75" style:family="table-row">
      <style:table-row-properties style:row-height="0.894cm" fo:break-before="auto" style:use-optimal-row-height="true"/>
    </style:style>
    <style:style style:name="ro76" style:family="table-row">
      <style:table-row-properties style:row-height="0.49cm" fo:break-before="auto" style:use-optimal-row-height="true"/>
    </style:style>
    <style:style style:name="ro77" style:family="table-row">
      <style:table-row-properties style:row-height="0.894cm" fo:break-before="auto" style:use-optimal-row-height="true"/>
    </style:style>
    <style:style style:name="ro78" style:family="table-row">
      <style:table-row-properties style:row-height="0.49cm" fo:break-before="auto" style:use-optimal-row-height="true"/>
    </style:style>
    <style:style style:name="ro79" style:family="table-row">
      <style:table-row-properties style:row-height="0.894cm" fo:break-before="auto" style:use-optimal-row-height="true"/>
    </style:style>
    <style:style style:name="ro80" style:family="table-row">
      <style:table-row-properties style:row-height="0.49cm" fo:break-before="auto" style:use-optimal-row-height="true"/>
    </style:style>
    <style:style style:name="ro81" style:family="table-row">
      <style:table-row-properties style:row-height="1.737cm" fo:break-before="auto" style:use-optimal-row-height="true"/>
    </style:style>
    <style:style style:name="ro82" style:family="table-row">
      <style:table-row-properties style:row-height="0.49cm" fo:break-before="auto" style:use-optimal-row-height="true"/>
    </style:style>
    <style:style style:name="ro83" style:family="table-row">
      <style:table-row-properties style:row-height="0.894cm" fo:break-before="auto" style:use-optimal-row-height="true"/>
    </style:style>
    <style:style style:name="ro84" style:family="table-row">
      <style:table-row-properties style:row-height="0.49cm" fo:break-before="auto" style:use-optimal-row-height="true"/>
    </style:style>
    <style:style style:name="ro85" style:family="table-row">
      <style:table-row-properties style:row-height="1.316cm" fo:break-before="auto" style:use-optimal-row-height="true"/>
    </style:style>
    <style:style style:name="ro86" style:family="table-row">
      <style:table-row-properties style:row-height="0.49cm" fo:break-before="auto" style:use-optimal-row-height="true"/>
    </style:style>
    <style:style style:name="ro87" style:family="table-row">
      <style:table-row-properties style:row-height="1.316cm" fo:break-before="auto" style:use-optimal-row-height="true"/>
    </style:style>
    <style:style style:name="ro88" style:family="table-row">
      <style:table-row-properties style:row-height="0.49cm" fo:break-before="auto" style:use-optimal-row-height="true"/>
    </style:style>
    <style:style style:name="ro89" style:family="table-row">
      <style:table-row-properties style:row-height="0.894cm" fo:break-before="auto" style:use-optimal-row-height="true"/>
    </style:style>
    <style:style style:name="ro90" style:family="table-row">
      <style:table-row-properties style:row-height="0.49cm" fo:break-before="auto" style:use-optimal-row-height="true"/>
    </style:style>
    <style:style style:name="ro91" style:family="table-row">
      <style:table-row-properties style:row-height="0.894cm" fo:break-before="auto" style:use-optimal-row-height="true"/>
    </style:style>
    <style:style style:name="ro92" style:family="table-row">
      <style:table-row-properties style:row-height="0.49cm" fo:break-before="auto" style:use-optimal-row-height="true"/>
    </style:style>
    <style:style style:name="ro93" style:family="table-row">
      <style:table-row-properties style:row-height="0.894cm" fo:break-before="auto" style:use-optimal-row-height="true"/>
    </style:style>
    <style:style style:name="ro94" style:family="table-row">
      <style:table-row-properties style:row-height="0.49cm" fo:break-before="auto" style:use-optimal-row-height="true"/>
    </style:style>
    <style:style style:name="ro95" style:family="table-row">
      <style:table-row-properties style:row-height="0.894cm" fo:break-before="auto" style:use-optimal-row-height="true"/>
    </style:style>
    <style:style style:name="ro96" style:family="table-row">
      <style:table-row-properties style:row-height="0.49cm" fo:break-before="auto" style:use-optimal-row-height="true"/>
    </style:style>
    <style:style style:name="ro97" style:family="table-row">
      <style:table-row-properties style:row-height="0.49cm" fo:break-before="auto" style:use-optimal-row-height="true"/>
    </style:style>
    <style:style style:name="ro98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fo:font-style="normal" fo:font-weight="bold"/>
    </style:style>
    <style:style style:name="ce2" style:family="table-cell" style:parent-style-name="Default" style:data-style-name="N100">
      <style:table-cell-properties fo:wrap-option="wrap"/>
      <style:text-properties fo:font-style="normal" fo:font-weight="normal"/>
    </style:style>
    <style:style style:name="ce3" style:family="table-cell" style:parent-style-name="Default" style:data-style-name="N0">
      <style:table-cell-properties fo:wrap-option="wrap"/>
      <style:text-properties fo:font-style="normal" fo:font-weight="normal"/>
    </style:style>
    <style:style style:name="ce4" style:family="table-cell" style:parent-style-name="Default" style:data-style-name="N100">
      <style:table-cell-properties style:text-align-source="fix" fo:wrap-option="wrap" style:repeat-content="false"/>
      <style:paragraph-properties fo:text-align="start" fo:margin-left="0cm"/>
      <style:text-properties fo:font-style="normal" fo:font-weight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fo:wrap-option="wrap"/>
    </style:style>
    <style:style style:name="ce7" style:family="table-cell" style:parent-style-name="Default">
      <style:table-cell-properties fo:wrap-option="wrap"/>
      <style:text-properties fo:font-style="normal" fo:font-weight="bold"/>
    </style:style>
    <style:style style:name="ce8" style:family="table-cell" style:parent-style-name="Default">
      <style:table-cell-properties fo:wrap-option="wrap"/>
      <style:text-properties fo:font-style="normal" fo:font-weight="normal"/>
    </style:style>
    <style:style style:name="ce9" style:family="table-cell" style:parent-style-name="Default">
      <style:table-cell-properties fo:wrap-option="wrap"/>
      <style:text-properties fo:color="#000000" style:font-name="Arial1" fo:font-size="10pt" fo:font-style="normal" fo:font-weight="normal" style:font-name-asian="Arial1" style:font-size-asian="10pt" style:font-name-complex="Arial1" style:font-size-complex="10pt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value-type" fo:wrap-option="wrap" style:repeat-content="false"/>
      <style:paragraph-properties fo:margin-left="0cm"/>
    </style:style>
    <style:style style:name="ce12" style:family="table-cell" style:parent-style-name="Default">
      <style:table-cell-properties style:text-align-source="fix" fo:wrap-option="wrap" style:repeat-content="false"/>
      <style:paragraph-properties fo:text-align="start" fo:margin-left="0cm"/>
    </style:style>
    <style:style style:name="ce13" style:family="table-cell" style:parent-style-name="Default" style:data-style-name="N37">
      <style:table-cell-properties style:text-align-source="fix" fo:wrap-option="wrap" style:repeat-content="false"/>
      <style:paragraph-properties fo:text-align="justify"/>
    </style:style>
    <style:style style:name="ce14" style:family="table-cell" style:parent-style-name="Default" style:data-style-name="N37">
      <style:table-cell-properties fo:wrap-option="wrap"/>
    </style:style>
    <style:style style:name="ce15" style:family="table-cell" style:parent-style-name="Default">
      <style:table-cell-properties style:text-align-source="fix" fo:wrap-option="wrap" style:repeat-content="false"/>
      <style:paragraph-properties fo:text-align="justify"/>
    </style:style>
    <style:style style:name="ce16" style:family="table-cell" style:parent-style-name="Default">
      <style:table-cell-properties style:text-align-source="fix" fo:wrap-option="wrap" style:repeat-content="false"/>
      <style:paragraph-properties fo:text-align="justify"/>
      <style:text-properties fo:font-style="normal" fo:font-weight="bold"/>
    </style:style>
    <style:style style:name="ce17" style:family="table-cell" style:parent-style-name="Default">
      <style:table-cell-properties style:text-align-source="fix" fo:wrap-option="wrap" style:repeat-content="false"/>
      <style:paragraph-properties fo:text-align="justify"/>
      <style:text-properties fo:font-style="normal" fo:font-weight="normal"/>
    </style:style>
    <style:style style:name="ce18" style:family="table-cell" style:parent-style-name="Default">
      <style:table-cell-properties style:text-align-source="fix" fo:wrap-option="wrap" style:repeat-content="false"/>
      <style:paragraph-properties fo:text-align="start" fo:margin-left="0cm"/>
      <style:text-properties fo:font-style="normal" fo:font-weight="normal"/>
    </style:style>
    <style:style style:name="ce19" style:family="table-cell" style:parent-style-name="Default">
      <style:table-cell-properties style:text-align-source="fix" fo:wrap-option="wrap" style:repeat-content="false"/>
      <style:paragraph-properties fo:text-align="justify"/>
      <style:text-properties style:use-window-font-color="true" style:text-outline="false" style:font-name="Arial" fo:font-size="10pt" fo:font-style="normal" fo:text-shadow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value-type" fo:wrap-option="no-wrap" style:repeat-content="false"/>
      <style:paragraph-properties fo:margin-left="0cm"/>
    </style:style>
    <style:style style:name="ce21" style:family="table-cell" style:parent-style-name="Default">
      <style:text-properties fo:font-weight="normal"/>
    </style:style>
  </office:automatic-styles>
  <office:body>
    <office:spreadsheet>
      <table:calculation-settings table:case-sensitive="false" table:automatic-find-labels="false"/>
      <table:table table:name="Tabelle1" table:style-name="ta1">
        <table:table-column table:style-name="co1" table:default-cell-style-name="ce6"/>
        <table:table-column table:style-name="co2" table:default-cell-style-name="ce10"/>
        <table:table-column table:style-name="co3" table:default-cell-style-name="ce6"/>
        <table:table-column table:style-name="co4" table:default-cell-style-name="ce15"/>
        <table:table-column table:style-name="co5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8" table:number-columns-repeated="247" table:default-cell-style-name="ce10"/>
        <table:table-column table:style-name="co8" table:default-cell-style-name="Default"/>
        <table:table-row table:style-name="ro1">
          <table:table-cell table:style-name="ce1">
            <text:p>Release</text:p>
          </table:table-cell>
          <table:table-cell table:style-name="ce7">
            <text:p>Modul name</text:p>
          </table:table-cell>
          <table:table-cell table:style-name="ce1">
            <text:p>Rev</text:p>
          </table:table-cell>
          <table:table-cell table:style-name="ce7">
            <text:p>Date</text:p>
          </table:table-cell>
          <table:table-cell table:style-name="ce16">
            <text:p>History</text:p>
          </table:table-cell>
          <table:table-cell table:style-name="ce7" table:number-columns-repeated="250"/>
          <table:table-cell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13"/>
          <table:table-cell table:style-name="ce17"/>
          <table:table-cell table:style-name="ce8" table:number-columns-repeated="250"/>
          <table:table-cell table:style-name="ce21"/>
        </table:table-row>
        <table:table-row table:style-name="ro2">
          <table:table-cell table:style-name="ce2">
            <text:p>27</text:p>
          </table:table-cell>
          <table:table-cell table:style-name="ce8">
            <text:p>FT_INT</text:p>
          </table:table-cell>
          <table:table-cell table:style-name="ce2">
            <text:p>1.7</text:p>
          </table:table-cell>
          <table:table-cell table:style-name="ce13" office:value-type="date" office:date-value="2008-02-08">
            <text:p>08/02/08</text:p>
          </table:table-cell>
          <table:table-cell table:style-name="ce17">
            <text:p>deleted limits +/- 1000 now limit is the range of real</text:p>
            <text:p>added variables out1 and out2 to extend the resolution</text:p>
            <text:p>corrected an error with elapsed time</text:p>
            <text:p>deleted unusfull output ET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>
            <text:p>27</text:p>
          </table:table-cell>
          <table:table-cell table:style-name="ce8">
            <text:p>METER</text:p>
          </table:table-cell>
          <table:table-cell table:style-name="ce2">
            <text:p>1.1</text:p>
          </table:table-cell>
          <table:table-cell table:style-name="ce13" office:value-type="date" office:date-value="2008-02-08">
            <text:p>08/02/08</text:p>
          </table:table-cell>
          <table:table-cell table:style-name="ce17">
            <text:p>Use new version of ft_int and deleted unnecessary limits for integrators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>
            <text:p>27</text:p>
          </table:table-cell>
          <table:table-cell table:style-name="ce8">
            <text:p>SWAP_BYTE2</text:p>
          </table:table-cell>
          <table:table-cell table:style-name="ce2">
            <text:p>1.0</text:p>
          </table:table-cell>
          <table:table-cell table:style-name="ce13" office:value-type="date" office:date-value="2008-02-04">
            <text:p>04/02/08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>
            <text:p>27</text:p>
          </table:table-cell>
          <table:table-cell table:style-name="ce8">
            <text:p>SWAP_BYTE</text:p>
          </table:table-cell>
          <table:table-cell table:style-name="ce2">
            <text:p>1.0</text:p>
          </table:table-cell>
          <table:table-cell table:style-name="ce13" office:value-type="date" office:date-value="2008-02-04">
            <text:p>04/02/08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>
            <text:p>27</text:p>
          </table:table-cell>
          <table:table-cell table:style-name="ce8">
            <text:p>REPLACE_ALL</text:p>
          </table:table-cell>
          <table:table-cell table:style-name="ce2">
            <text:p>1.0</text:p>
          </table:table-cell>
          <table:table-cell table:style-name="ce13" office:value-type="date" office:date-value="2008-02-04">
            <text:p>04/02/08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>
            <text:p>27</text:p>
          </table:table-cell>
          <table:table-cell table:style-name="ce8">
            <text:p>CHR</text:p>
          </table:table-cell>
          <table:table-cell table:style-name="ce2">
            <text:p>1.1</text:p>
          </table:table-cell>
          <table:table-cell table:style-name="ce13" office:value-type="date" office:date-value="2008-02-04">
            <text:p>04/02/08</text:p>
          </table:table-cell>
          <table:table-cell table:style-name="ce17">
            <text:p>return string would not be terminated properly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>
            <text:p>27</text:p>
          </table:table-cell>
          <table:table-cell table:style-name="ce8">
            <text:p>FINDP</text:p>
          </table:table-cell>
          <table:table-cell table:style-name="ce2">
            <text:p>1.0</text:p>
          </table:table-cell>
          <table:table-cell table:style-name="ce13" office:value-type="date" office:date-value="2008-02-04">
            <text:p>04/02/08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>
            <text:p>27</text:p>
          </table:table-cell>
          <table:table-cell table:style-name="ce8">
            <text:p>MIRROR</text:p>
          </table:table-cell>
          <table:table-cell table:style-name="ce2">
            <text:p>1.0</text:p>
          </table:table-cell>
          <table:table-cell table:style-name="ce13" office:value-type="date" office:date-value="2008-02-04">
            <text:p>04/02/08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">
          <table:table-cell table:style-name="ce2">
            <text:p>27</text:p>
          </table:table-cell>
          <table:table-cell table:style-name="ce8">
            <text:p>TRIM1</text:p>
          </table:table-cell>
          <table:table-cell table:style-name="ce2">
            <text:p>1.0</text:p>
          </table:table-cell>
          <table:table-cell table:style-name="ce13" office:value-type="date" office:date-value="2008-02-04">
            <text:p>04/02/08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4">
          <table:table-cell table:style-name="ce2">
            <text:p>27</text:p>
          </table:table-cell>
          <table:table-cell table:style-name="ce8">
            <text:p>LOWERCASE</text:p>
          </table:table-cell>
          <table:table-cell table:style-name="ce2">
            <text:p>1.1</text:p>
          </table:table-cell>
          <table:table-cell table:style-name="ce13" office:value-type="date" office:date-value="2008-02-04">
            <text:p>04/02/08</text:p>
          </table:table-cell>
          <table:table-cell table:style-name="ce17">
            <text:p>improved performance</text:p>
            <text:p>added support for Ä,Ö,Ü</text:p>
          </table:table-cell>
          <table:table-cell table:style-name="ce8" table:number-columns-repeated="250"/>
          <table:table-cell table:style-name="ce21"/>
        </table:table-row>
        <table:table-row table:style-name="ro4">
          <table:table-cell table:style-name="ce2">
            <text:p>27</text:p>
          </table:table-cell>
          <table:table-cell table:style-name="ce8">
            <text:p>UPPERCASE</text:p>
          </table:table-cell>
          <table:table-cell table:style-name="ce2">
            <text:p>1.1</text:p>
          </table:table-cell>
          <table:table-cell table:style-name="ce13" office:value-type="date" office:date-value="2008-02-04">
            <text:p>04/02/08</text:p>
          </table:table-cell>
          <table:table-cell table:style-name="ce17">
            <text:p>improved performance</text:p>
            <text:p>added support for Ä,Ö,Ü</text:p>
          </table:table-cell>
          <table:table-cell table:style-name="ce8" table:number-columns-repeated="250"/>
          <table:table-cell table:style-name="ce21"/>
        </table:table-row>
        <table:table-row table:style-name="ro5">
          <table:table-cell table:style-name="ce2">
            <text:p>27</text:p>
          </table:table-cell>
          <table:table-cell table:style-name="ce8">
            <text:p>EASTER</text:p>
          </table:table-cell>
          <table:table-cell table:style-name="ce2">
            <text:p>1.2</text:p>
          </table:table-cell>
          <table:table-cell table:style-name="ce13" office:value-type="date" office:date-value="2008-02-03">
            <text:p>03/02/08</text:p>
          </table:table-cell>
          <table:table-cell table:style-name="ce8">
            <text:p>Modifi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5">
          <table:table-cell table:style-name="ce2">
            <text:p>27</text:p>
          </table:table-cell>
          <table:table-cell table:style-name="ce8">
            <text:p>RDM</text:p>
          </table:table-cell>
          <table:table-cell table:style-name="ce2">
            <text:p>1.4</text:p>
          </table:table-cell>
          <table:table-cell table:style-name="ce13" office:value-type="date" office:date-value="2008-02-02">
            <text:p>02/02/08</text:p>
          </table:table-cell>
          <table:table-cell table:style-name="ce17">
            <text:p>changed algorithm to avoind non iec functions and guarantee more randomness</text:p>
          </table:table-cell>
          <table:table-cell table:style-name="ce8" table:number-columns-repeated="250"/>
          <table:table-cell table:style-name="ce21"/>
        </table:table-row>
        <table:table-row table:style-name="ro5">
          <table:table-cell table:style-name="ce2">
            <text:p>27</text:p>
          </table:table-cell>
          <table:table-cell table:style-name="ce8">
            <text:p>BLIND_SCENE</text:p>
          </table:table-cell>
          <table:table-cell table:style-name="ce2">
            <text:p>1.1</text:p>
          </table:table-cell>
          <table:table-cell table:style-name="ce13" office:value-type="date" office:date-value="2008-01-29">
            <text:p>29/01/08</text:p>
          </table:table-cell>
          <table:table-cell table:style-name="ce17">
            <text:p>Replaced shr/shl with and for better performance</text:p>
          </table:table-cell>
          <table:table-cell table:style-name="ce8" table:number-columns-repeated="250"/>
          <table:table-cell table:style-name="ce21"/>
        </table:table-row>
        <table:table-row table:style-name="ro6">
          <table:table-cell table:style-name="ce2">
            <text:p>27</text:p>
          </table:table-cell>
          <table:table-cell table:style-name="ce8">
            <text:p>FT_RMP</text:p>
          </table:table-cell>
          <table:table-cell table:style-name="ce2">
            <text:p>1.4</text:p>
          </table:table-cell>
          <table:table-cell table:style-name="ce13" office:value-type="date" office:date-value="2008-01-25">
            <text:p>25/01/08</text:p>
          </table:table-cell>
          <table:table-cell table:style-name="ce17">
            <text:p>Improved algorithm for higher speed</text:p>
            <text:p>allow KR and KF to be 0</text:p>
          </table:table-cell>
          <table:table-cell table:style-name="ce8" table:number-columns-repeated="250"/>
          <table:table-cell table:style-name="ce21"/>
        </table:table-row>
        <table:table-row table:style-name="ro7">
          <table:table-cell table:style-name="ce2">
            <text:p>27</text:p>
          </table:table-cell>
          <table:table-cell table:style-name="ce8">
            <text:p>DCF77</text:p>
          </table:table-cell>
          <table:table-cell table:style-name="ce2">
            <text:p>1.7</text:p>
          </table:table-cell>
          <table:table-cell table:style-name="ce13" office:value-type="date" office:date-value="2008-01-23">
            <text:p>23/01/08</text:p>
          </table:table-cell>
          <table:table-cell table:style-name="ce17">
            <text:p>added sdt input which is used to initialize rtc and rtc1 during first cycle. </text:p>
          </table:table-cell>
          <table:table-cell table:style-name="ce8" table:number-columns-repeated="250"/>
          <table:table-cell table:style-name="ce21"/>
        </table:table-row>
        <table:table-row table:style-name="ro7">
          <table:table-cell table:style-name="ce2">
            <text:p>27</text:p>
          </table:table-cell>
          <table:table-cell table:style-name="ce8">
            <text:p>RTC_2</text:p>
          </table:table-cell>
          <table:table-cell table:style-name="ce2">
            <text:p>1.0</text:p>
          </table:table-cell>
          <table:table-cell table:style-name="ce13" office:value-type="date" office:date-value="2008-01-21">
            <text:p>21/01/08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7">
          <table:table-cell table:style-name="ce2">
            <text:p>27</text:p>
          </table:table-cell>
          <table:table-cell table:style-name="ce8">
            <text:p>RTC_MS</text:p>
          </table:table-cell>
          <table:table-cell table:style-name="ce2">
            <text:p>1.0</text:p>
          </table:table-cell>
          <table:table-cell table:style-name="ce13" office:value-type="date" office:date-value="2008-01-20">
            <text:p>20/01/08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8">
          <table:table-cell table:style-name="ce2">
            <text:p>27</text:p>
          </table:table-cell>
          <table:table-cell table:style-name="ce8">
            <text:p>SUN_POS</text:p>
          </table:table-cell>
          <table:table-cell table:style-name="ce2">
            <text:p>1.2</text:p>
          </table:table-cell>
          <table:table-cell table:style-name="ce13" office:value-type="date" office:date-value="2008-01-18">
            <text:p>18/01/08</text:p>
          </table:table-cell>
          <table:table-cell table:style-name="ce17">
            <text:p>further performance improvements</text:p>
            <text:p>only calculate once every 10 seconds</text:p>
          </table:table-cell>
          <table:table-cell table:style-name="ce8" table:number-columns-repeated="250"/>
          <table:table-cell table:style-name="ce21"/>
        </table:table-row>
        <table:table-row table:style-name="ro9">
          <table:table-cell table:style-name="ce2">
            <text:p>27</text:p>
          </table:table-cell>
          <table:table-cell table:style-name="ce8">
            <text:p>SUN_TIME</text:p>
          </table:table-cell>
          <table:table-cell table:style-name="ce2"/>
          <table:table-cell table:style-name="ce13" office:value-type="date" office:date-value="2008-01-17">
            <text:p>17/01/08</text:p>
          </table:table-cell>
          <table:table-cell table:style-name="ce17">
            <text:p>calculation is now only performed once a day</text:p>
          </table:table-cell>
          <table:table-cell table:style-name="Default"/>
          <table:table-cell table:style-name="ce8" table:number-columns-repeated="249"/>
          <table:table-cell table:style-name="ce21"/>
        </table:table-row>
        <table:table-row table:style-name="ro10">
          <table:table-cell table:style-name="ce2">
            <text:p>27</text:p>
          </table:table-cell>
          <table:table-cell table:style-name="ce8">
            <text:p>TIMER_1</text:p>
          </table:table-cell>
          <table:table-cell table:style-name="ce2">
            <text:p>1.6</text:p>
          </table:table-cell>
          <table:table-cell table:style-name="ce13" office:value-type="date" office:date-value="2008-01-17">
            <text:p>17/01/08</text:p>
          </table:table-cell>
          <table:table-cell table:style-name="ce17">
            <text:p>New code with better performance </text:p>
            <text:p>Output is now only active during the time of day it is supposed to</text:p>
            <text:p>no pulse is generated at power up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COUNT_BR</text:p>
          </table:table-cell>
          <table:table-cell table:style-name="ce2">
            <text:p>1.0</text:p>
          </table:table-cell>
          <table:table-cell table:style-name="ce13" office:value-type="date" office:date-value="2008-01-16">
            <text:p>16/01/08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SELECT_8</text:p>
          </table:table-cell>
          <table:table-cell table:style-name="ce2">
            <text:p>1.0</text:p>
          </table:table-cell>
          <table:table-cell table:style-name="ce13" office:value-type="date" office:date-value="2008-01-16">
            <text:p>16/01/08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INC</text:p>
          </table:table-cell>
          <table:table-cell table:style-name="ce2">
            <text:p>1.1</text:p>
          </table:table-cell>
          <table:table-cell table:style-name="ce13" office:value-type="date" office:date-value="2008-01-15">
            <text:p>15/01/08</text:p>
          </table:table-cell>
          <table:table-cell table:style-name="ce17">
            <text:p>Allow for negative increment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RANGE_TO_WORD</text:p>
          </table:table-cell>
          <table:table-cell table:style-name="ce2">
            <text:p>1.0</text:p>
          </table:table-cell>
          <table:table-cell table:style-name="ce13" office:value-type="date" office:date-value="2008-01-09">
            <text:p>09/01/08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RANGE_TO_BYTE</text:p>
          </table:table-cell>
          <table:table-cell table:style-name="ce2">
            <text:p>1.0</text:p>
          </table:table-cell>
          <table:table-cell table:style-name="ce13" office:value-type="date" office:date-value="2008-01-09">
            <text:p>09/01/08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WORD_TO_RANGE</text:p>
          </table:table-cell>
          <table:table-cell table:style-name="ce2">
            <text:p>1.0</text:p>
          </table:table-cell>
          <table:table-cell table:style-name="ce13" office:value-type="date" office:date-value="2008-01-09">
            <text:p>09/01/08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BYTE_TO_RANGE</text:p>
          </table:table-cell>
          <table:table-cell table:style-name="ce2">
            <text:p>1.0</text:p>
          </table:table-cell>
          <table:table-cell table:style-name="ce13" office:value-type="date" office:date-value="2008-01-09">
            <text:p>09/01/08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DEW_TEMP</text:p>
          </table:table-cell>
          <table:table-cell table:style-name="ce2">
            <text:p>1.4</text:p>
          </table:table-cell>
          <table:table-cell table:style-name="ce13" office:value-type="date" office:date-value="2008-01-08">
            <text:p>08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LEAP_OF_DATE</text:p>
          </table:table-cell>
          <table:table-cell table:style-name="ce2">
            <text:p>1.2</text:p>
          </table:table-cell>
          <table:table-cell table:style-name="ce13" office:value-type="date" office:date-value="2008-01-08">
            <text:p>08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DAY_OF_MONTH</text:p>
          </table:table-cell>
          <table:table-cell table:style-name="ce2">
            <text:p>1.4</text:p>
          </table:table-cell>
          <table:table-cell table:style-name="ce13" office:value-type="date" office:date-value="2008-01-08">
            <text:p>08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COTH</text:p>
          </table:table-cell>
          <table:table-cell table:style-name="ce2">
            <text:p>1.2</text:p>
          </table:table-cell>
          <table:table-cell table:style-name="ce13" office:value-type="date" office:date-value="2008-01-08">
            <text:p>08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ROUND</text:p>
          </table:table-cell>
          <table:table-cell table:style-name="ce2">
            <text:p>1.2</text:p>
          </table:table-cell>
          <table:table-cell table:style-name="ce13" office:value-type="date" office:date-value="2008-01-08">
            <text:p>08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SH_2</text:p>
          </table:table-cell>
          <table:table-cell table:style-name="ce2">
            <text:p>1.4</text:p>
          </table:table-cell>
          <table:table-cell table:style-name="ce13" office:value-type="date" office:date-value="2008-01-06">
            <text:p>06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STAIR</text:p>
          </table:table-cell>
          <table:table-cell table:style-name="ce2">
            <text:p>1.2</text:p>
          </table:table-cell>
          <table:table-cell table:style-name="ce13" office:value-type="date" office:date-value="2008-01-06">
            <text:p>06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SCALE_B8</text:p>
          </table:table-cell>
          <table:table-cell table:style-name="ce2">
            <text:p>1.2</text:p>
          </table:table-cell>
          <table:table-cell table:style-name="ce13" office:value-type="date" office:date-value="2008-01-06">
            <text:p>06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SCALE_B4</text:p>
          </table:table-cell>
          <table:table-cell table:style-name="ce2">
            <text:p>1.2</text:p>
          </table:table-cell>
          <table:table-cell table:style-name="ce13" office:value-type="date" office:date-value="2008-01-06">
            <text:p>06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SCALE_B2</text:p>
          </table:table-cell>
          <table:table-cell table:style-name="ce2">
            <text:p>1.2</text:p>
          </table:table-cell>
          <table:table-cell table:style-name="ce13" office:value-type="date" office:date-value="2008-01-06">
            <text:p>06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GEN_SQR</text:p>
          </table:table-cell>
          <table:table-cell table:style-name="ce2">
            <text:p>1.3</text:p>
          </table:table-cell>
          <table:table-cell table:style-name="ce13" office:value-type="date" office:date-value="2008-01-06">
            <text:p>06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GEN_SIN</text:p>
          </table:table-cell>
          <table:table-cell table:style-name="ce2">
            <text:p>1.3</text:p>
          </table:table-cell>
          <table:table-cell table:style-name="ce13" office:value-type="date" office:date-value="2008-01-06">
            <text:p>06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TEMP_SI</text:p>
          </table:table-cell>
          <table:table-cell table:style-name="ce2">
            <text:p>1.4</text:p>
          </table:table-cell>
          <table:table-cell table:style-name="ce13" office:value-type="date" office:date-value="2008-01-06">
            <text:p>06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TEMP_NI</text:p>
          </table:table-cell>
          <table:table-cell table:style-name="ce2">
            <text:p>1.4</text:p>
          </table:table-cell>
          <table:table-cell table:style-name="ce13" office:value-type="date" office:date-value="2008-01-06">
            <text:p>06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BAR_GRAPH</text:p>
          </table:table-cell>
          <table:table-cell table:style-name="ce2">
            <text:p>1.2</text:p>
          </table:table-cell>
          <table:table-cell table:style-name="ce13" office:value-type="date" office:date-value="2008-01-06">
            <text:p>06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KMH_TO_MS</text:p>
          </table:table-cell>
          <table:table-cell table:style-name="ce2">
            <text:p>1.1</text:p>
          </table:table-cell>
          <table:table-cell table:style-name="ce13" office:value-type="date" office:date-value="2008-01-06">
            <text:p>06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F_TO_C</text:p>
          </table:table-cell>
          <table:table-cell table:style-name="ce2">
            <text:p>1.1</text:p>
          </table:table-cell>
          <table:table-cell table:style-name="ce13" office:value-type="date" office:date-value="2008-01-06">
            <text:p>06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SUN_POS</text:p>
          </table:table-cell>
          <table:table-cell table:style-name="ce2">
            <text:p>1.1</text:p>
          </table:table-cell>
          <table:table-cell table:style-name="ce13" office:value-type="date" office:date-value="2008-01-06">
            <text:p>06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SUN_TIME</text:p>
          </table:table-cell>
          <table:table-cell table:style-name="ce2">
            <text:p>1.3</text:p>
          </table:table-cell>
          <table:table-cell table:style-name="ce13" office:value-type="date" office:date-value="2008-01-06">
            <text:p>06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_ARRAY_SORT</text:p>
          </table:table-cell>
          <table:table-cell table:style-name="ce2">
            <text:p>1.5</text:p>
          </table:table-cell>
          <table:table-cell table:style-name="ce13" office:value-type="date" office:date-value="2008-01-05">
            <text:p>05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SINH</text:p>
          </table:table-cell>
          <table:table-cell table:style-name="ce2">
            <text:p>1.2</text:p>
          </table:table-cell>
          <table:table-cell table:style-name="ce13" office:value-type="date" office:date-value="2008-01-05">
            <text:p>05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COSH</text:p>
          </table:table-cell>
          <table:table-cell table:style-name="ce2">
            <text:p>1.2</text:p>
          </table:table-cell>
          <table:table-cell table:style-name="ce13" office:value-type="date" office:date-value="2008-01-05">
            <text:p>05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ATANH</text:p>
          </table:table-cell>
          <table:table-cell table:style-name="ce2">
            <text:p>1.1</text:p>
          </table:table-cell>
          <table:table-cell table:style-name="ce13" office:value-type="date" office:date-value="2008-01-05">
            <text:p>05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ACOTH</text:p>
          </table:table-cell>
          <table:table-cell table:style-name="ce2">
            <text:p>1.1</text:p>
          </table:table-cell>
          <table:table-cell table:style-name="ce13" office:value-type="date" office:date-value="2008-01-05">
            <text:p>05/01/08</text:p>
          </table:table-cell>
          <table:table-cell table:style-name="ce17">
            <text:p>Improved algorithm for higher speed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HYST_3</text:p>
          </table:table-cell>
          <table:table-cell table:style-name="ce2">
            <text:p>1.2</text:p>
          </table:table-cell>
          <table:table-cell table:style-name="ce13" office:value-type="date" office:date-value="2008-01-05">
            <text:p>05/01/08</text:p>
          </table:table-cell>
          <table:table-cell table:style-name="ce17">
            <text:p>Improved code for higher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HYST_2</text:p>
          </table:table-cell>
          <table:table-cell table:style-name="ce2">
            <text:p>1.1</text:p>
          </table:table-cell>
          <table:table-cell table:style-name="ce13" office:value-type="date" office:date-value="2008-01-05">
            <text:p>05/01/08</text:p>
          </table:table-cell>
          <table:table-cell table:style-name="ce17">
            <text:p>Improved code for higher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FT_PT1</text:p>
          </table:table-cell>
          <table:table-cell table:style-name="ce2">
            <text:p>1.7</text:p>
          </table:table-cell>
          <table:table-cell table:style-name="ce13" office:value-type="date" office:date-value="2008-01-05">
            <text:p>05/01/08</text:p>
          </table:table-cell>
          <table:table-cell table:style-name="ce17">
            <text:p>Improved code for higher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FT_PID</text:p>
          </table:table-cell>
          <table:table-cell table:style-name="ce2">
            <text:p>1.6</text:p>
          </table:table-cell>
          <table:table-cell table:style-name="ce13" office:value-type="date" office:date-value="2008-01-05">
            <text:p>05/01/08</text:p>
          </table:table-cell>
          <table:table-cell table:style-name="ce17">
            <text:p>Improved code for higher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FT_PI</text:p>
          </table:table-cell>
          <table:table-cell table:style-name="ce2">
            <text:p>1.2</text:p>
          </table:table-cell>
          <table:table-cell table:style-name="ce13" office:value-type="date" office:date-value="2008-01-05">
            <text:p>05/01/08</text:p>
          </table:table-cell>
          <table:table-cell table:style-name="ce17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FT_INT</text:p>
          </table:table-cell>
          <table:table-cell table:style-name="ce2">
            <text:p>1.6</text:p>
          </table:table-cell>
          <table:table-cell table:style-name="ce13" office:value-type="date" office:date-value="2008-01-05">
            <text:p>05/01/08</text:p>
          </table:table-cell>
          <table:table-cell table:style-name="ce17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TEMP_PT</text:p>
          </table:table-cell>
          <table:table-cell table:style-name="ce2">
            <text:p>1.5</text:p>
          </table:table-cell>
          <table:table-cell table:style-name="ce13" office:value-type="date" office:date-value="2008-01-05">
            <text:p>05/01/08</text:p>
          </table:table-cell>
          <table:table-cell table:style-name="ce17">
            <text:p>replaced /2 with * 0.5 for better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RDM</text:p>
          </table:table-cell>
          <table:table-cell table:style-name="ce2">
            <text:p>1.3</text:p>
          </table:table-cell>
          <table:table-cell table:style-name="ce13" office:value-type="date" office:date-value="2008-01-05">
            <text:p>05/01/08</text:p>
          </table:table-cell>
          <table:table-cell table:style-name="ce17">
            <text:p>Corrected an error with high values of sps timer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PERIOD</text:p>
          </table:table-cell>
          <table:table-cell table:style-name="ce2">
            <text:p>1.2</text:p>
          </table:table-cell>
          <table:table-cell table:style-name="ce13" office:value-type="date" office:date-value="2008-01-04">
            <text:p>04/01/08</text:p>
          </table:table-cell>
          <table:table-cell table:style-name="ce17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DAY_OF_YEAR</text:p>
          </table:table-cell>
          <table:table-cell table:style-name="ce2">
            <text:p>1.2</text:p>
          </table:table-cell>
          <table:table-cell table:style-name="ce13" office:value-type="date" office:date-value="2008-01-04">
            <text:p>04/01/08</text:p>
          </table:table-cell>
          <table:table-cell table:style-name="ce17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YEAR_BEGIN</text:p>
          </table:table-cell>
          <table:table-cell table:style-name="ce2">
            <text:p>1.1</text:p>
          </table:table-cell>
          <table:table-cell table:style-name="ce13" office:value-type="date" office:date-value="2008-01-04">
            <text:p>04/01/08</text:p>
          </table:table-cell>
          <table:table-cell table:style-name="ce17">
            <text:p>formula for step7 was incorrect during leap years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SET_DATE</text:p>
          </table:table-cell>
          <table:table-cell table:style-name="ce2">
            <text:p>1.4</text:p>
          </table:table-cell>
          <table:table-cell table:style-name="ce13" office:value-type="date" office:date-value="2008-01-03">
            <text:p>03/01/08</text:p>
          </table:table-cell>
          <table:table-cell table:style-name="ce17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IRTRANS_DECODE</text:p>
          </table:table-cell>
          <table:table-cell table:style-name="ce2">
            <text:p>1.0</text:p>
          </table:table-cell>
          <table:table-cell table:style-name="ce13" office:value-type="date" office:date-value="2008-01-02">
            <text:p>02/01/08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IRTRANS_8</text:p>
          </table:table-cell>
          <table:table-cell table:style-name="ce2">
            <text:p>1.0</text:p>
          </table:table-cell>
          <table:table-cell table:style-name="ce13" office:value-type="date" office:date-value="2008-01-02">
            <text:p>02/01/08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IRTRANS_4</text:p>
          </table:table-cell>
          <table:table-cell table:style-name="ce2">
            <text:p>1.0</text:p>
          </table:table-cell>
          <table:table-cell table:style-name="ce13" office:value-type="date" office:date-value="2008-01-02">
            <text:p>02/01/08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IRTRANS_1</text:p>
          </table:table-cell>
          <table:table-cell table:style-name="ce2">
            <text:p>1.0</text:p>
          </table:table-cell>
          <table:table-cell table:style-name="ce13" office:value-type="date" office:date-value="2008-01-02">
            <text:p>02/01/08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DRIVER_4</text:p>
          </table:table-cell>
          <table:table-cell table:style-name="ce2">
            <text:p>1.0</text:p>
          </table:table-cell>
          <table:table-cell table:style-name="ce13" office:value-type="date" office:date-value="2008-01-02">
            <text:p>02/01/08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DRIVER_1</text:p>
          </table:table-cell>
          <table:table-cell table:style-name="ce2">
            <text:p>1.0</text:p>
          </table:table-cell>
          <table:table-cell table:style-name="ce13" office:value-type="date" office:date-value="2008-01-02">
            <text:p>02/01/08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CLK_DIV</text:p>
          </table:table-cell>
          <table:table-cell table:style-name="ce2">
            <text:p>1.1</text:p>
          </table:table-cell>
          <table:table-cell table:style-name="ce13" office:value-type="date" office:date-value="2008-01-02">
            <text:p>02/01/08</text:p>
          </table:table-cell>
          <table:table-cell table:style-name="ce17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BYTE_OF_DWORD</text:p>
          </table:table-cell>
          <table:table-cell table:style-name="ce2">
            <text:p>1.1</text:p>
          </table:table-cell>
          <table:table-cell table:style-name="ce13" office:value-type="date" office:date-value="2008-01-02">
            <text:p>02/01/08</text:p>
          </table:table-cell>
          <table:table-cell table:style-name="ce17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WORD_OF_DWORD</text:p>
          </table:table-cell>
          <table:table-cell table:style-name="ce2">
            <text:p>1.1</text:p>
          </table:table-cell>
          <table:table-cell table:style-name="ce13" office:value-type="date" office:date-value="2008-01-02">
            <text:p>02/01/08</text:p>
          </table:table-cell>
          <table:table-cell table:style-name="ce17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FIB</text:p>
          </table:table-cell>
          <table:table-cell table:style-name="ce2">
            <text:p>1.1</text:p>
          </table:table-cell>
          <table:table-cell table:style-name="ce13" office:value-type="date" office:date-value="2008-01-02">
            <text:p>02/01/08</text:p>
          </table:table-cell>
          <table:table-cell table:style-name="ce17">
            <text:p>deleted unused variable pt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WORD_OF_BYTE</text:p>
          </table:table-cell>
          <table:table-cell table:style-name="ce2">
            <text:p>1.1</text:p>
          </table:table-cell>
          <table:table-cell table:style-name="ce13" office:value-type="date" office:date-value="2008-01-02">
            <text:p>02/01/08</text:p>
          </table:table-cell>
          <table:table-cell table:style-name="ce17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CRC_GEN</text:p>
          </table:table-cell>
          <table:table-cell table:style-name="ce2">
            <text:p>1.3</text:p>
          </table:table-cell>
          <table:table-cell table:style-name="ce13" office:value-type="date" office:date-value="2008-01-02">
            <text:p>02/01/08</text:p>
          </table:table-cell>
          <table:table-cell table:style-name="ce17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7</text:p>
          </table:table-cell>
          <table:table-cell table:style-name="ce8">
            <text:p>DWORD_OF_BYTE</text:p>
          </table:table-cell>
          <table:table-cell table:style-name="ce2">
            <text:p>1.1</text:p>
          </table:table-cell>
          <table:table-cell table:style-name="ce13" office:value-type="date" office:date-value="2008-01-02">
            <text:p>02/01/08</text:p>
          </table:table-cell>
          <table:table-cell table:style-name="ce17"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6</text:p>
          </table:table-cell>
          <table:table-cell table:style-name="ce8">
            <text:p>BLIND_INPUT</text:p>
          </table:table-cell>
          <table:table-cell table:style-name="ce2">
            <text:p>1.2</text:p>
          </table:table-cell>
          <table:table-cell table:style-name="ce13" office:value-type="date" office:date-value="2007-12-30">
            <text:p>30/12/07</text:p>
          </table:table-cell>
          <table:table-cell table:style-name="ce17">
            <text:p>added click_timeout variable and function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6</text:p>
          </table:table-cell>
          <table:table-cell table:style-name="ce8">
            <text:p>FIB</text:p>
          </table:table-cell>
          <table:table-cell table:style-name="ce2">
            <text:p>1.0</text:p>
          </table:table-cell>
          <table:table-cell table:style-name="ce13" office:value-type="date" office:date-value="2007-12-27">
            <text:p>27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6</text:p>
          </table:table-cell>
          <table:table-cell table:style-name="ce8">
            <text:p>WATER_CP</text:p>
          </table:table-cell>
          <table:table-cell table:style-name="ce2">
            <text:p>1.1</text:p>
          </table:table-cell>
          <table:table-cell table:style-name="ce13" office:value-type="date" office:date-value="2007-12-27">
            <text:p>27/12/07</text:p>
          </table:table-cell>
          <table:table-cell table:style-name="ce17">
            <text:p>Increased accuracy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6</text:p>
          </table:table-cell>
          <table:table-cell table:style-name="ce8">
            <text:p>SHR1</text:p>
          </table:table-cell>
          <table:table-cell table:style-name="ce2">
            <text:p>1.1</text:p>
          </table:table-cell>
          <table:table-cell table:style-name="ce13" office:value-type="date" office:date-value="2007-12-27">
            <text:p>27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6</text:p>
          </table:table-cell>
          <table:table-cell table:style-name="ce8">
            <text:p>SHL1</text:p>
          </table:table-cell>
          <table:table-cell table:style-name="ce2">
            <text:p>1.1</text:p>
          </table:table-cell>
          <table:table-cell table:style-name="ce13" office:value-type="date" office:date-value="2007-12-27">
            <text:p>27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6</text:p>
          </table:table-cell>
          <table:table-cell table:style-name="ce8">
            <text:p>LTCH_4</text:p>
          </table:table-cell>
          <table:table-cell table:style-name="ce2">
            <text:p>1.1</text:p>
          </table:table-cell>
          <table:table-cell table:style-name="ce13" office:value-type="date" office:date-value="2007-12-27">
            <text:p>27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6</text:p>
          </table:table-cell>
          <table:table-cell table:style-name="ce8">
            <text:p>LTCH</text:p>
          </table:table-cell>
          <table:table-cell table:style-name="ce2">
            <text:p>1.1</text:p>
          </table:table-cell>
          <table:table-cell table:style-name="ce13" office:value-type="date" office:date-value="2007-12-27">
            <text:p>27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6</text:p>
          </table:table-cell>
          <table:table-cell table:style-name="ce8">
            <text:p>FF_JKE</text:p>
          </table:table-cell>
          <table:table-cell table:style-name="ce2">
            <text:p>1.1</text:p>
          </table:table-cell>
          <table:table-cell table:style-name="ce13" office:value-type="date" office:date-value="2007-12-27">
            <text:p>27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6</text:p>
          </table:table-cell>
          <table:table-cell table:style-name="ce8">
            <text:p>FF_DRE</text:p>
          </table:table-cell>
          <table:table-cell table:style-name="ce2">
            <text:p>1.1</text:p>
          </table:table-cell>
          <table:table-cell table:style-name="ce13" office:value-type="date" office:date-value="2007-12-27">
            <text:p>27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6</text:p>
          </table:table-cell>
          <table:table-cell table:style-name="ce8">
            <text:p>FF_D4E</text:p>
          </table:table-cell>
          <table:table-cell table:style-name="ce2">
            <text:p>1.1</text:p>
          </table:table-cell>
          <table:table-cell table:style-name="ce13" office:value-type="date" office:date-value="2007-12-27">
            <text:p>27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6</text:p>
          </table:table-cell>
          <table:table-cell table:style-name="ce8">
            <text:p>FF_D2E</text:p>
          </table:table-cell>
          <table:table-cell table:style-name="ce2">
            <text:p>1.1</text:p>
          </table:table-cell>
          <table:table-cell table:style-name="ce13" office:value-type="date" office:date-value="2007-12-27">
            <text:p>27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6</text:p>
          </table:table-cell>
          <table:table-cell table:style-name="ce8">
            <text:p>STAIR</text:p>
          </table:table-cell>
          <table:table-cell table:style-name="ce2">
            <text:p>1.1</text:p>
          </table:table-cell>
          <table:table-cell table:style-name="ce13" office:value-type="date" office:date-value="2007-12-27">
            <text:p>27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6</text:p>
          </table:table-cell>
          <table:table-cell table:style-name="ce8">
            <text:p>STAIR2</text:p>
          </table:table-cell>
          <table:table-cell table:style-name="ce2">
            <text:p>1.1</text:p>
          </table:table-cell>
          <table:table-cell table:style-name="ce13" office:value-type="date" office:date-value="2007-12-27">
            <text:p>27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6</text:p>
          </table:table-cell>
          <table:table-cell table:style-name="ce8">
            <text:p>HYST_3</text:p>
          </table:table-cell>
          <table:table-cell table:style-name="ce2">
            <text:p>1.1</text:p>
          </table:table-cell>
          <table:table-cell table:style-name="ce13" office:value-type="date" office:date-value="2007-12-27">
            <text:p>27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6</text:p>
          </table:table-cell>
          <table:table-cell table:style-name="ce8">
            <text:p>ACTUATOR_2P</text:p>
          </table:table-cell>
          <table:table-cell table:style-name="ce2">
            <text:p>1.5</text:p>
          </table:table-cell>
          <table:table-cell table:style-name="ce13" office:value-type="date" office:date-value="2007-12-27">
            <text:p>27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6</text:p>
          </table:table-cell>
          <table:table-cell table:style-name="ce8">
            <text:p>LINEAR_INT</text:p>
          </table:table-cell>
          <table:table-cell table:style-name="ce2">
            <text:p>1.1</text:p>
          </table:table-cell>
          <table:table-cell table:style-name="ce13" office:value-type="date" office:date-value="2007-12-27">
            <text:p>27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6</text:p>
          </table:table-cell>
          <table:table-cell table:style-name="ce8">
            <text:p>STORE_8</text:p>
          </table:table-cell>
          <table:table-cell table:style-name="ce2">
            <text:p>1.0</text:p>
          </table:table-cell>
          <table:table-cell table:style-name="ce13" office:value-type="date" office:date-value="2007-12-26">
            <text:p>26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6</text:p>
          </table:table-cell>
          <table:table-cell table:style-name="ce8">
            <text:p>MESSAGE_8</text:p>
          </table:table-cell>
          <table:table-cell table:style-name="ce2">
            <text:p>1.0</text:p>
          </table:table-cell>
          <table:table-cell table:style-name="ce13" office:value-type="date" office:date-value="2007-12-26">
            <text:p>26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6</text:p>
          </table:table-cell>
          <table:table-cell table:style-name="ce8">
            <text:p>FADE</text:p>
          </table:table-cell>
          <table:table-cell table:style-name="ce2">
            <text:p>1.0</text:p>
          </table:table-cell>
          <table:table-cell table:style-name="ce13" office:value-type="date" office:date-value="2007-12-26">
            <text:p>26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6</text:p>
          </table:table-cell>
          <table:table-cell table:style-name="ce8">
            <text:p>RMP_B</text:p>
          </table:table-cell>
          <table:table-cell table:style-name="ce2">
            <text:p>1.6</text:p>
          </table:table-cell>
          <table:table-cell table:style-name="ce13" office:value-type="date" office:date-value="2007-12-25">
            <text:p>25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1">
          <table:table-cell table:style-name="ce2">
            <text:p>26</text:p>
          </table:table-cell>
          <table:table-cell table:style-name="ce8">
            <text:p>RMP_W</text:p>
          </table:table-cell>
          <table:table-cell table:style-name="ce2">
            <text:p>1.7</text:p>
          </table:table-cell>
          <table:table-cell table:style-name="ce13" office:value-type="date" office:date-value="2007-12-25">
            <text:p>25/12/07</text:p>
          </table:table-cell>
          <table:table-cell table:style-name="ce17">
            <text:p>corrected an error while step response was too slow for fast rist times</text:p>
          </table:table-cell>
          <table:table-cell table:style-name="ce8" table:number-columns-repeated="250"/>
          <table:table-cell table:style-name="ce21"/>
        </table:table-row>
        <table:table-row table:style-name="ro12">
          <table:table-cell table:style-name="ce2">
            <text:p>26</text:p>
          </table:table-cell>
          <table:table-cell table:style-name="ce8">
            <text:p>HEAT_METER</text:p>
          </table:table-cell>
          <table:table-cell table:style-name="ce2">
            <text:p>1.1</text:p>
          </table:table-cell>
          <table:table-cell table:style-name="ce13" office:value-type="date" office:date-value="2007-12-25">
            <text:p>25/12/07</text:p>
          </table:table-cell>
          <table:table-cell table:style-name="ce17">
            <text:p>added config variable return_meter</text:p>
            <text:p>added output C for current consumption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MATRIX</text:p>
          </table:table-cell>
          <table:table-cell table:style-name="ce2">
            <text:p>1.2</text:p>
          </table:table-cell>
          <table:table-cell table:style-name="ce13" office:value-type="date" office:date-value="2007-12-23">
            <text:p>23/12/07</text:p>
          </table:table-cell>
          <table:table-cell table:style-name="ce17">
            <text:p>added exit statement in for loop instead of i:=5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WEEKDAY</text:p>
          </table:table-cell>
          <table:table-cell table:style-name="ce2">
            <text:p>1.2</text:p>
          </table:table-cell>
          <table:table-cell table:style-name="ce13" office:value-type="date" office:date-value="2007-12-23">
            <text:p>23/12/07</text:p>
          </table:table-cell>
          <table:table-cell table:style-name="ce17">
            <text:p>correction for step7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TEMP_PT</text:p>
          </table:table-cell>
          <table:table-cell table:style-name="ce2">
            <text:p>1.4</text:p>
          </table:table-cell>
          <table:table-cell table:style-name="ce13" office:value-type="date" office:date-value="2007-12-23">
            <text:p>23/12/07</text:p>
          </table:table-cell>
          <table:table-cell table:style-name="ce17">
            <text:p>avoid a negative square root if input values are wrong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YEAR</text:p>
          </table:table-cell>
          <table:table-cell table:style-name="ce2">
            <text:p>1.2</text:p>
          </table:table-cell>
          <table:table-cell table:style-name="ce13" office:value-type="date" office:date-value="2007-12-23">
            <text:p>23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WORK_WEEK</text:p>
          </table:table-cell>
          <table:table-cell table:style-name="ce2">
            <text:p>1.2</text:p>
          </table:table-cell>
          <table:table-cell table:style-name="ce13" office:value-type="date" office:date-value="2007-12-19">
            <text:p>19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YEAR_BEGIN</text:p>
          </table:table-cell>
          <table:table-cell table:style-name="ce2">
            <text:p>1.0</text:p>
          </table:table-cell>
          <table:table-cell table:style-name="ce13" office:value-type="date" office:date-value="2007-12-19">
            <text:p>19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TEMP_NI</text:p>
          </table:table-cell>
          <table:table-cell table:style-name="ce2">
            <text:p>1.3</text:p>
          </table:table-cell>
          <table:table-cell table:style-name="ce13" office:value-type="date" office:date-value="2007-12-17">
            <text:p>17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POLYNOM_INT</text:p>
          </table:table-cell>
          <table:table-cell table:style-name="ce2">
            <text:p>1.1</text:p>
          </table:table-cell>
          <table:table-cell table:style-name="ce13" office:value-type="date" office:date-value="2007-12-17">
            <text:p>17/12/07</text:p>
          </table:table-cell>
          <table:table-cell table:style-name="ce17">
            <text:p>init makes no sense for a function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TEMP_SI</text:p>
          </table:table-cell>
          <table:table-cell table:style-name="ce2">
            <text:p>1.3</text:p>
          </table:table-cell>
          <table:table-cell table:style-name="ce13" office:value-type="date" office:date-value="2007-12-17">
            <text:p>17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YEAR</text:p>
          </table:table-cell>
          <table:table-cell table:style-name="ce2">
            <text:p>1.2</text:p>
          </table:table-cell>
          <table:table-cell table:style-name="ce13" office:value-type="date" office:date-value="2007-12-16">
            <text:p>16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SET_DATE</text:p>
          </table:table-cell>
          <table:table-cell table:style-name="ce2">
            <text:p>1.3</text:p>
          </table:table-cell>
          <table:table-cell table:style-name="ce13" office:value-type="date" office:date-value="2007-12-16">
            <text:p>16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OSCAT_VERSION</text:p>
          </table:table-cell>
          <table:table-cell table:style-name="ce2">
            <text:p>1.1</text:p>
          </table:table-cell>
          <table:table-cell table:style-name="ce13" office:value-type="date" office:date-value="2007-12-16">
            <text:p>16/12/07</text:p>
          </table:table-cell>
          <table:table-cell table:style-name="ce17">
            <text:p>added possibility to return date and version depoending on in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CLK_8MS</text:p>
          </table:table-cell>
          <table:table-cell table:style-name="ce2"/>
          <table:table-cell table:style-name="ce13" office:value-type="date" office:date-value="2007-12-16">
            <text:p>16/12/07</text:p>
          </table:table-cell>
          <table:table-cell table:style-name="ce17">
            <text:p>No longer supported is replaced by CLK_N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CLK_4MS</text:p>
          </table:table-cell>
          <table:table-cell table:style-name="ce2"/>
          <table:table-cell table:style-name="ce13" office:value-type="date" office:date-value="2007-12-16">
            <text:p>16/12/07</text:p>
          </table:table-cell>
          <table:table-cell table:style-name="ce17">
            <text:p>No longer supported is replaced by CLK_N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CLK_2MS</text:p>
          </table:table-cell>
          <table:table-cell table:style-name="ce2"/>
          <table:table-cell table:style-name="ce13" office:value-type="date" office:date-value="2007-12-16">
            <text:p>16/12/07</text:p>
          </table:table-cell>
          <table:table-cell table:style-name="ce17">
            <text:p>No longer supported is replaced by CLK_N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CLK_1MS</text:p>
          </table:table-cell>
          <table:table-cell table:style-name="ce2"/>
          <table:table-cell table:style-name="ce13" office:value-type="date" office:date-value="2007-12-16">
            <text:p>16/12/07</text:p>
          </table:table-cell>
          <table:table-cell table:style-name="ce17">
            <text:p>No longer supported is replaced by CLK_N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CLK_N</text:p>
          </table:table-cell>
          <table:table-cell table:style-name="ce2">
            <text:p>1.0</text:p>
          </table:table-cell>
          <table:table-cell table:style-name="ce13" office:value-type="date" office:date-value="2007-12-16">
            <text:p>16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EASTER</text:p>
          </table:table-cell>
          <table:table-cell table:style-name="ce2">
            <text:p>1.1</text:p>
          </table:table-cell>
          <table:table-cell table:style-name="ce13" office:value-type="date" office:date-value="2007-12-15">
            <text:p>15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REAL_TO_STRF</text:p>
          </table:table-cell>
          <table:table-cell table:style-name="ce2">
            <text:p>1.2</text:p>
          </table:table-cell>
          <table:table-cell table:style-name="ce13" office:value-type="date" office:date-value="2007-12-15">
            <text:p>15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DWORD_TO_STRH</text:p>
          </table:table-cell>
          <table:table-cell table:style-name="ce2">
            <text:p>1.2</text:p>
          </table:table-cell>
          <table:table-cell table:style-name="ce13" office:value-type="date" office:date-value="2007-12-15">
            <text:p>15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DWORD_TO_STRB</text:p>
          </table:table-cell>
          <table:table-cell table:style-name="ce2">
            <text:p>1.1</text:p>
          </table:table-cell>
          <table:table-cell table:style-name="ce13" office:value-type="date" office:date-value="2007-12-15">
            <text:p>15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BYTE_TO_STRH</text:p>
          </table:table-cell>
          <table:table-cell table:style-name="ce2">
            <text:p>1.2</text:p>
          </table:table-cell>
          <table:table-cell table:style-name="ce13" office:value-type="date" office:date-value="2007-12-15">
            <text:p>15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BYTE_TO_STRB</text:p>
          </table:table-cell>
          <table:table-cell table:style-name="ce2">
            <text:p>1.1</text:p>
          </table:table-cell>
          <table:table-cell table:style-name="ce13" office:value-type="date" office:date-value="2007-12-15">
            <text:p>15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FINDB</text:p>
          </table:table-cell>
          <table:table-cell table:style-name="ce2">
            <text:p>1.1</text:p>
          </table:table-cell>
          <table:table-cell table:style-name="ce13" office:value-type="date" office:date-value="2007-12-15">
            <text:p>15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TICKER</text:p>
          </table:table-cell>
          <table:table-cell table:style-name="ce2">
            <text:p>1.1</text:p>
          </table:table-cell>
          <table:table-cell table:style-name="ce13" office:value-type="date" office:date-value="2007-12-15">
            <text:p>15/12/07</text:p>
          </table:table-cell>
          <table:table-cell table:style-name="ce17">
            <text:p>step now starts at 1 instaed of 0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Default">
            <text:p>_ARRAY_SORT</text:p>
          </table:table-cell>
          <table:table-cell table:style-name="ce2">
            <text:p>1.4</text:p>
          </table:table-cell>
          <table:table-cell table:style-name="ce13" office:value-type="date" office:date-value="2007-12-15">
            <text:p>15/12/07</text:p>
          </table:table-cell>
          <table:table-cell table:style-name="ce17">
            <text:p>added function return = tru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SIGNAL_4</text:p>
          </table:table-cell>
          <table:table-cell table:style-name="ce2">
            <text:p>1.0</text:p>
          </table:table-cell>
          <table:table-cell table:style-name="ce13" office:value-type="date" office:date-value="2007-12-13">
            <text:p>13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SIGNAL</text:p>
          </table:table-cell>
          <table:table-cell table:style-name="ce2">
            <text:p>1.0</text:p>
          </table:table-cell>
          <table:table-cell table:style-name="ce13" office:value-type="date" office:date-value="2007-12-13">
            <text:p>13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INT_TO_BCD</text:p>
          </table:table-cell>
          <table:table-cell table:style-name="ce2">
            <text:p>1.0</text:p>
          </table:table-cell>
          <table:table-cell table:style-name="ce13" office:value-type="date" office:date-value="2007-12-13">
            <text:p>13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BCD_TO_INT</text:p>
          </table:table-cell>
          <table:table-cell table:style-name="ce2">
            <text:p>1.0</text:p>
          </table:table-cell>
          <table:table-cell table:style-name="ce13" office:value-type="date" office:date-value="2007-12-13">
            <text:p>13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ARRAY_VAR</text:p>
          </table:table-cell>
          <table:table-cell table:style-name="ce2">
            <text:p>1.1</text:p>
          </table:table-cell>
          <table:table-cell table:style-name="ce13" office:value-type="date" office:date-value="2007-12-12">
            <text:p>12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ARRAY_AVG</text:p>
          </table:table-cell>
          <table:table-cell table:style-name="ce2">
            <text:p>1.1</text:p>
          </table:table-cell>
          <table:table-cell table:style-name="ce13" office:value-type="date" office:date-value="2007-12-12">
            <text:p>12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ARRAY_VAR</text:p>
          </table:table-cell>
          <table:table-cell table:style-name="ce2">
            <text:p>1.1</text:p>
          </table:table-cell>
          <table:table-cell table:style-name="ce13" office:value-type="date" office:date-value="2007-12-12">
            <text:p>12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ARRAY_TREND</text:p>
          </table:table-cell>
          <table:table-cell table:style-name="ce2">
            <text:p>1.1</text:p>
          </table:table-cell>
          <table:table-cell table:style-name="ce13" office:value-type="date" office:date-value="2007-12-12">
            <text:p>12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V3_ZANG</text:p>
          </table:table-cell>
          <table:table-cell table:style-name="ce2">
            <text:p>1.0</text:p>
          </table:table-cell>
          <table:table-cell table:style-name="ce13" office:value-type="date" office:date-value="2007-12-11">
            <text:p>11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V3_YANG</text:p>
          </table:table-cell>
          <table:table-cell table:style-name="ce2">
            <text:p>1.0</text:p>
          </table:table-cell>
          <table:table-cell table:style-name="ce13" office:value-type="date" office:date-value="2007-12-11">
            <text:p>11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V3_XANG</text:p>
          </table:table-cell>
          <table:table-cell table:style-name="ce2">
            <text:p>1.0</text:p>
          </table:table-cell>
          <table:table-cell table:style-name="ce13" office:value-type="date" office:date-value="2007-12-11">
            <text:p>11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V3_XPRO</text:p>
          </table:table-cell>
          <table:table-cell table:style-name="ce2">
            <text:p>1.0</text:p>
          </table:table-cell>
          <table:table-cell table:style-name="ce13" office:value-type="date" office:date-value="2007-12-11">
            <text:p>11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V3_SMUL</text:p>
          </table:table-cell>
          <table:table-cell table:style-name="ce2">
            <text:p>1.0</text:p>
          </table:table-cell>
          <table:table-cell table:style-name="ce13" office:value-type="date" office:date-value="2007-12-11">
            <text:p>11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V3_REV</text:p>
          </table:table-cell>
          <table:table-cell table:style-name="ce2">
            <text:p>1.0</text:p>
          </table:table-cell>
          <table:table-cell table:style-name="ce13" office:value-type="date" office:date-value="2007-12-11">
            <text:p>11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V3_PAR</text:p>
          </table:table-cell>
          <table:table-cell table:style-name="ce2">
            <text:p>1.0</text:p>
          </table:table-cell>
          <table:table-cell table:style-name="ce13" office:value-type="date" office:date-value="2007-12-11">
            <text:p>11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V3_NORM</text:p>
          </table:table-cell>
          <table:table-cell table:style-name="ce2">
            <text:p>1.0</text:p>
          </table:table-cell>
          <table:table-cell table:style-name="ce13" office:value-type="date" office:date-value="2007-12-11">
            <text:p>11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V3_DPRO</text:p>
          </table:table-cell>
          <table:table-cell table:style-name="ce2">
            <text:p>1.0</text:p>
          </table:table-cell>
          <table:table-cell table:style-name="ce13" office:value-type="date" office:date-value="2007-12-11">
            <text:p>11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V3_SUB</text:p>
          </table:table-cell>
          <table:table-cell table:style-name="ce2">
            <text:p>1.0</text:p>
          </table:table-cell>
          <table:table-cell table:style-name="ce13" office:value-type="date" office:date-value="2007-12-11">
            <text:p>11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V3_ADD</text:p>
          </table:table-cell>
          <table:table-cell table:style-name="ce2">
            <text:p>1.0</text:p>
          </table:table-cell>
          <table:table-cell table:style-name="ce13" office:value-type="date" office:date-value="2007-12-11">
            <text:p>11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V3_ANG</text:p>
          </table:table-cell>
          <table:table-cell table:style-name="ce2">
            <text:p>1.0</text:p>
          </table:table-cell>
          <table:table-cell table:style-name="ce13" office:value-type="date" office:date-value="2007-12-11">
            <text:p>11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V3_ABS</text:p>
          </table:table-cell>
          <table:table-cell table:style-name="ce2">
            <text:p>1.0</text:p>
          </table:table-cell>
          <table:table-cell table:style-name="ce13" office:value-type="date" office:date-value="2007-12-11">
            <text:p>11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LANGEVIN</text:p>
          </table:table-cell>
          <table:table-cell table:style-name="ce2">
            <text:p>1.0</text:p>
          </table:table-cell>
          <table:table-cell table:style-name="ce13" office:value-type="date" office:date-value="2007-12-10">
            <text:p>10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SIGMOID</text:p>
          </table:table-cell>
          <table:table-cell table:style-name="ce2">
            <text:p>1.0</text:p>
          </table:table-cell>
          <table:table-cell table:style-name="ce13" office:value-type="date" office:date-value="2007-12-10">
            <text:p>10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GAMMA</text:p>
          </table:table-cell>
          <table:table-cell table:style-name="ce2">
            <text:p>1.0</text:p>
          </table:table-cell>
          <table:table-cell table:style-name="ce13" office:value-type="date" office:date-value="2007-12-10">
            <text:p>10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FACT</text:p>
          </table:table-cell>
          <table:table-cell table:style-name="ce2">
            <text:p>1.2</text:p>
          </table:table-cell>
          <table:table-cell table:style-name="ce13" office:value-type="date" office:date-value="2007-12-10">
            <text:p>10/12/07</text:p>
          </table:table-cell>
          <table:table-cell table:style-name="ce17">
            <text:p>start value for i has changed to 2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TONOF</text:p>
          </table:table-cell>
          <table:table-cell table:style-name="ce2">
            <text:p>1.0</text:p>
          </table:table-cell>
          <table:table-cell table:style-name="ce13" office:value-type="date" office:date-value="2007-12-10">
            <text:p>10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6</text:p>
          </table:table-cell>
          <table:table-cell table:style-name="ce8">
            <text:p>PWM_PW</text:p>
          </table:table-cell>
          <table:table-cell table:style-name="ce2">
            <text:p>1.3</text:p>
          </table:table-cell>
          <table:table-cell table:style-name="ce13" office:value-type="date" office:date-value="2007-12-09">
            <text:p>09/12/07</text:p>
          </table:table-cell>
          <table:table-cell table:style-name="ce17">
            <text:p>Corrected a problem with F = 0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2</text:p>
          </table:table-cell>
          <table:table-cell table:style-name="ce8">
            <text:p>DCF77</text:p>
          </table:table-cell>
          <table:table-cell table:style-name="ce2">
            <text:p>1.6</text:p>
          </table:table-cell>
          <table:table-cell table:style-name="ce13" office:value-type="date" office:date-value="2007-12-08">
            <text:p>08/12/07</text:p>
          </table:table-cell>
          <table:table-cell table:style-name="ce17">
            <text:p>corrected a problem with time_zone_offset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1</text:p>
          </table:table-cell>
          <table:table-cell table:style-name="ce8">
            <text:p>LTIME_TO_UTC</text:p>
          </table:table-cell>
          <table:table-cell table:style-name="ce2">
            <text:p>1.3</text:p>
          </table:table-cell>
          <table:table-cell table:style-name="ce13" office:value-type="date" office:date-value="2007-12-08">
            <text:p>08/12/07</text:p>
          </table:table-cell>
          <table:table-cell table:style-name="ce17">
            <text:p>corrected a problem with time_zone_offset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1</text:p>
          </table:table-cell>
          <table:table-cell table:style-name="ce8">
            <text:p>LTIME</text:p>
          </table:table-cell>
          <table:table-cell table:style-name="ce2">
            <text:p>1.6</text:p>
          </table:table-cell>
          <table:table-cell table:style-name="ce13" office:value-type="date" office:date-value="2007-12-08">
            <text:p>08/12/07</text:p>
          </table:table-cell>
          <table:table-cell table:style-name="ce17">
            <text:p>corrected a problem with time_zone_offset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1</text:p>
          </table:table-cell>
          <table:table-cell table:style-name="ce8">
            <text:p>LOCAL_TIME</text:p>
          </table:table-cell>
          <table:table-cell table:style-name="ce2">
            <text:p>1.4</text:p>
          </table:table-cell>
          <table:table-cell table:style-name="ce13" office:value-type="date" office:date-value="2007-12-08">
            <text:p>08/12/07</text:p>
          </table:table-cell>
          <table:table-cell table:style-name="ce17">
            <text:p>corrected a problem with time_zone_offset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</text:p>
          </table:table-cell>
          <table:table-cell table:style-name="ce8">
            <text:p>ESR_COLLECT</text:p>
          </table:table-cell>
          <table:table-cell table:style-name="ce2">
            <text:p>1.1</text:p>
          </table:table-cell>
          <table:table-cell table:style-name="ce13" office:value-type="date" office:date-value="2007-12-08">
            <text:p>08/12/07</text:p>
          </table:table-cell>
          <table:table-cell table:style-name="ce17">
            <text:p>Added reset input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</text:p>
          </table:table-cell>
          <table:table-cell table:style-name="ce8">
            <text:p>ESR_MON_R4</text:p>
          </table:table-cell>
          <table:table-cell table:style-name="ce2">
            <text:p>1.2</text:p>
          </table:table-cell>
          <table:table-cell table:style-name="ce13" office:value-type="date" office:date-value="2007-12-08">
            <text:p>08/12/07</text:p>
          </table:table-cell>
          <table:table-cell table:style-name="ce17">
            <text:p>corrected an error while esr type would not be set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</text:p>
          </table:table-cell>
          <table:table-cell table:style-name="ce8">
            <text:p>CHECK_PARITY</text:p>
          </table:table-cell>
          <table:table-cell table:style-name="ce2">
            <text:p>1.2</text:p>
          </table:table-cell>
          <table:table-cell table:style-name="ce13" office:value-type="date" office:date-value="2007-12-08">
            <text:p>08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</text:p>
          </table:table-cell>
          <table:table-cell table:style-name="ce8">
            <text:p>PARITY</text:p>
          </table:table-cell>
          <table:table-cell table:style-name="ce2">
            <text:p>1.2</text:p>
          </table:table-cell>
          <table:table-cell table:style-name="ce13" office:value-type="date" office:date-value="2007-12-08">
            <text:p>08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</text:p>
          </table:table-cell>
          <table:table-cell table:style-name="ce8">
            <text:p>WCT</text:p>
          </table:table-cell>
          <table:table-cell table:style-name="ce2">
            <text:p>1.1</text:p>
          </table:table-cell>
          <table:table-cell table:style-name="ce13" office:value-type="date" office:date-value="2007-12-07">
            <text:p>07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</text:p>
          </table:table-cell>
          <table:table-cell table:style-name="ce8">
            <text:p>SPHERE_V</text:p>
          </table:table-cell>
          <table:table-cell table:style-name="ce2">
            <text:p>1.1</text:p>
          </table:table-cell>
          <table:table-cell table:style-name="ce13" office:value-type="date" office:date-value="2007-12-04">
            <text:p>04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</text:p>
          </table:table-cell>
          <table:table-cell table:style-name="ce8">
            <text:p>CONE_V</text:p>
          </table:table-cell>
          <table:table-cell table:style-name="ce2">
            <text:p>1.1</text:p>
          </table:table-cell>
          <table:table-cell table:style-name="ce13" office:value-type="date" office:date-value="2007-12-04">
            <text:p>04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</text:p>
          </table:table-cell>
          <table:table-cell table:style-name="ce8">
            <text:p>CIRCLE_A</text:p>
          </table:table-cell>
          <table:table-cell table:style-name="ce2">
            <text:p>1.1</text:p>
          </table:table-cell>
          <table:table-cell table:style-name="ce13" office:value-type="date" office:date-value="2007-12-04">
            <text:p>04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</text:p>
          </table:table-cell>
          <table:table-cell table:style-name="ce8">
            <text:p>EXPN</text:p>
          </table:table-cell>
          <table:table-cell table:style-name="ce2">
            <text:p>1.0</text:p>
          </table:table-cell>
          <table:table-cell table:style-name="ce13" office:value-type="date" office:date-value="2007-12-04">
            <text:p>04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</text:p>
          </table:table-cell>
          <table:table-cell table:style-name="ce8">
            <text:p>TICKER</text:p>
          </table:table-cell>
          <table:table-cell table:style-name="ce2">
            <text:p>1.0</text:p>
          </table:table-cell>
          <table:table-cell table:style-name="ce13" office:value-type="date" office:date-value="2007-12-04">
            <text:p>04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</text:p>
          </table:table-cell>
          <table:table-cell table:style-name="ce8">
            <text:p>AIR_DENSITY</text:p>
          </table:table-cell>
          <table:table-cell table:style-name="ce2">
            <text:p>1.1</text:p>
          </table:table-cell>
          <table:table-cell table:style-name="ce13" office:value-type="date" office:date-value="2007-12-04">
            <text:p>04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</text:p>
          </table:table-cell>
          <table:table-cell table:style-name="ce8">
            <text:p>SQRTN</text:p>
          </table:table-cell>
          <table:table-cell table:style-name="ce2">
            <text:p>1.1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</text:p>
          </table:table-cell>
          <table:table-cell table:style-name="ce8">
            <text:p>ROUND</text:p>
          </table:table-cell>
          <table:table-cell table:style-name="ce2">
            <text:p>1.1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</text:p>
          </table:table-cell>
          <table:table-cell table:style-name="ce8">
            <text:p>ASINH</text:p>
          </table:table-cell>
          <table:table-cell table:style-name="ce2">
            <text:p>1.1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</text:p>
          </table:table-cell>
          <table:table-cell table:style-name="ce8">
            <text:p>ACOSH</text:p>
          </table:table-cell>
          <table:table-cell table:style-name="ce2">
            <text:p>1.1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</text:p>
          </table:table-cell>
          <table:table-cell table:style-name="ce8">
            <text:p>AOUT</text:p>
          </table:table-cell>
          <table:table-cell table:style-name="ce2">
            <text:p>1.3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</text:p>
          </table:table-cell>
          <table:table-cell table:style-name="ce8">
            <text:p>SDD</text:p>
          </table:table-cell>
          <table:table-cell table:style-name="ce2">
            <text:p>1.1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3">
          <table:table-cell table:style-name="ce2">
            <text:p>25</text:p>
          </table:table-cell>
          <table:table-cell table:style-name="ce8">
            <text:p>DEW_TEMP</text:p>
          </table:table-cell>
          <table:table-cell table:style-name="ce2">
            <text:p>1.3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4">
          <table:table-cell table:style-name="ce2">
            <text:p>25</text:p>
          </table:table-cell>
          <table:table-cell table:style-name="ce8">
            <text:p>DEW_CON</text:p>
          </table:table-cell>
          <table:table-cell table:style-name="ce2">
            <text:p>1.2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changed code for better performance</text:p>
            <text:p>output is now in Gramms / Qubic meter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AIR_ENTHALPY</text:p>
          </table:table-cell>
          <table:table-cell table:style-name="ce2">
            <text:p>1.2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chan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EXP10</text:p>
          </table:table-cell>
          <table:table-cell table:style-name="ce2">
            <text:p>1.0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AIN</text:p>
          </table:table-cell>
          <table:table-cell table:style-name="ce2">
            <text:p>1.4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cha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RMP_W</text:p>
          </table:table-cell>
          <table:table-cell table:style-name="ce2">
            <text:p>1.6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corrected an error in calculation of step response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TEMP_PT</text:p>
          </table:table-cell>
          <table:table-cell table:style-name="ce2">
            <text:p>1.3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cha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SENSOR_INT</text:p>
          </table:table-cell>
          <table:table-cell table:style-name="ce2">
            <text:p>1.1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Corrected an error in algorithm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RES_SI</text:p>
          </table:table-cell>
          <table:table-cell table:style-name="ce2">
            <text:p>1.1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cha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RES_PT</text:p>
          </table:table-cell>
          <table:table-cell table:style-name="ce2">
            <text:p>1.2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cha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RES_NI</text:p>
          </table:table-cell>
          <table:table-cell table:style-name="ce2">
            <text:p>1.2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cha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ONTIME</text:p>
          </table:table-cell>
          <table:table-cell table:style-name="ce2">
            <text:p>1.4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chaged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BAR_GRAPH</text:p>
          </table:table-cell>
          <table:table-cell table:style-name="ce2">
            <text:p>1.1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changed code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FT_INT</text:p>
          </table:table-cell>
          <table:table-cell table:style-name="ce2">
            <text:p>1.5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changed code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WATER_DENSITY</text:p>
          </table:table-cell>
          <table:table-cell table:style-name="ce2">
            <text:p>1.1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new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HEAT_INDEX</text:p>
          </table:table-cell>
          <table:table-cell table:style-name="ce2">
            <text:p>1.2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new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DEW_RH</text:p>
          </table:table-cell>
          <table:table-cell table:style-name="ce2">
            <text:p>1.1</text:p>
          </table:table-cell>
          <table:table-cell table:style-name="ce13" office:value-type="date" office:date-value="2007-12-02">
            <text:p>02/12/07</text:p>
          </table:table-cell>
          <table:table-cell table:style-name="ce17">
            <text:p>new code for better performance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DST</text:p>
          </table:table-cell>
          <table:table-cell table:style-name="ce2">
            <text:p>1.2</text:p>
          </table:table-cell>
          <table:table-cell table:style-name="ce13" office:value-type="date" office:date-value="2007-12-01">
            <text:p>01/12/07</text:p>
          </table:table-cell>
          <table:table-cell table:style-name="ce17">
            <text:p>changed code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COTH</text:p>
          </table:table-cell>
          <table:table-cell table:style-name="ce2">
            <text:p>1.1</text:p>
          </table:table-cell>
          <table:table-cell table:style-name="ce13" office:value-type="date" office:date-value="2007-12-01">
            <text:p>01/12/07</text:p>
          </table:table-cell>
          <table:table-cell table:style-name="ce17">
            <text:p>changed code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COSH</text:p>
          </table:table-cell>
          <table:table-cell table:style-name="ce2">
            <text:p>1.1</text:p>
          </table:table-cell>
          <table:table-cell table:style-name="ce13" office:value-type="date" office:date-value="2007-12-01">
            <text:p>01/12/07</text:p>
          </table:table-cell>
          <table:table-cell table:style-name="ce17">
            <text:p>changed code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TANH</text:p>
          </table:table-cell>
          <table:table-cell table:style-name="ce2">
            <text:p>1.1</text:p>
          </table:table-cell>
          <table:table-cell table:style-name="ce13" office:value-type="date" office:date-value="2007-12-01">
            <text:p>01/12/07</text:p>
          </table:table-cell>
          <table:table-cell table:style-name="ce17">
            <text:p>changed code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SINH</text:p>
          </table:table-cell>
          <table:table-cell table:style-name="ce2">
            <text:p>1.1</text:p>
          </table:table-cell>
          <table:table-cell table:style-name="ce13" office:value-type="date" office:date-value="2007-12-01">
            <text:p>01/12/07</text:p>
          </table:table-cell>
          <table:table-cell table:style-name="ce17">
            <text:p>changed code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SIGN_R</text:p>
          </table:table-cell>
          <table:table-cell table:style-name="ce2">
            <text:p>1.2</text:p>
          </table:table-cell>
          <table:table-cell table:style-name="ce13" office:value-type="date" office:date-value="2007-12-01">
            <text:p>01/12/07</text:p>
          </table:table-cell>
          <table:table-cell table:style-name="ce17">
            <text:p>changed code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SIGN_I</text:p>
          </table:table-cell>
          <table:table-cell table:style-name="ce2">
            <text:p>1.2</text:p>
          </table:table-cell>
          <table:table-cell table:style-name="ce13" office:value-type="date" office:date-value="2007-12-01">
            <text:p>01/12/07</text:p>
          </table:table-cell>
          <table:table-cell table:style-name="ce17">
            <text:p>changed code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5">
          <table:table-cell table:style-name="ce2">
            <text:p>25</text:p>
          </table:table-cell>
          <table:table-cell table:style-name="ce8">
            <text:p>EVEN</text:p>
          </table:table-cell>
          <table:table-cell table:style-name="ce2">
            <text:p>1.1</text:p>
          </table:table-cell>
          <table:table-cell table:style-name="ce13" office:value-type="date" office:date-value="2007-12-01">
            <text:p>01/12/07</text:p>
          </table:table-cell>
          <table:table-cell table:style-name="ce17">
            <text:p>changed code to improove performance</text:p>
          </table:table-cell>
          <table:table-cell table:style-name="ce8" table:number-columns-repeated="250"/>
          <table:table-cell table:style-name="ce21"/>
        </table:table-row>
        <table:table-row table:style-name="ro16">
          <table:table-cell table:style-name="ce2">
            <text:p>25</text:p>
          </table:table-cell>
          <table:table-cell table:style-name="ce8">
            <text:p>FT_PT2</text:p>
          </table:table-cell>
          <table:table-cell table:style-name="ce2">
            <text:p>1.3</text:p>
          </table:table-cell>
          <table:table-cell table:style-name="ce13" office:value-type="date" office:date-value="2007-11-30">
            <text:p>30/11/07</text:p>
          </table:table-cell>
          <table:table-cell table:style-name="ce17">
            <text:p>changed out to be K * in during initialization</text:p>
            <text:p>avoid divide by 0 if TN = 0</text:p>
          </table:table-cell>
          <table:table-cell table:style-name="ce8" table:number-columns-repeated="250"/>
          <table:table-cell table:style-name="ce21"/>
        </table:table-row>
        <table:table-row table:style-name="ro17">
          <table:table-cell table:style-name="ce2">
            <text:p>25</text:p>
          </table:table-cell>
          <table:table-cell table:style-name="ce8">
            <text:p>FT_PT1</text:p>
          </table:table-cell>
          <table:table-cell table:style-name="ce2">
            <text:p>1.6</text:p>
          </table:table-cell>
          <table:table-cell table:style-name="ce13" office:value-type="date" office:date-value="2007-11-30">
            <text:p>30/11/07</text:p>
          </table:table-cell>
          <table:table-cell table:style-name="ce17">
            <text:p>changed out to be K * in during initialization</text:p>
          </table:table-cell>
          <table:table-cell table:style-name="ce8" table:number-columns-repeated="250"/>
          <table:table-cell table:style-name="ce21"/>
        </table:table-row>
        <table:table-row table:style-name="ro17">
          <table:table-cell table:style-name="ce2">
            <text:p>25</text:p>
          </table:table-cell>
          <table:table-cell table:style-name="ce8">
            <text:p>PWM_PW</text:p>
          </table:table-cell>
          <table:table-cell table:style-name="ce2">
            <text:p>1.2</text:p>
          </table:table-cell>
          <table:table-cell table:style-name="ce13" office:value-type="date" office:date-value="2007-11-27">
            <text:p>27/11/07</text:p>
          </table:table-cell>
          <table:table-cell table:style-name="ce17">
            <text:p>avoid divide by 0 when F = 0</text:p>
          </table:table-cell>
          <table:table-cell table:style-name="ce8" table:number-columns-repeated="250"/>
          <table:table-cell table:style-name="ce21"/>
        </table:table-row>
        <table:table-row table:style-name="ro17">
          <table:table-cell table:style-name="ce2">
            <text:p>25</text:p>
          </table:table-cell>
          <table:table-cell table:style-name="ce8">
            <text:p>PWM_DC</text:p>
          </table:table-cell>
          <table:table-cell table:style-name="ce2">
            <text:p>1.2</text:p>
          </table:table-cell>
          <table:table-cell table:style-name="ce13" office:value-type="date" office:date-value="2007-11-27">
            <text:p>27/11/07</text:p>
          </table:table-cell>
          <table:table-cell table:style-name="ce17">
            <text:p>avoid divide by 0 when F = 0</text:p>
          </table:table-cell>
          <table:table-cell table:style-name="ce8" table:number-columns-repeated="250"/>
          <table:table-cell table:style-name="ce21"/>
        </table:table-row>
        <table:table-row table:style-name="ro17">
          <table:table-cell table:style-name="ce2">
            <text:p>25</text:p>
          </table:table-cell>
          <table:table-cell table:style-name="ce8">
            <text:p>GEN_SIN</text:p>
          </table:table-cell>
          <table:table-cell table:style-name="ce2">
            <text:p>1.2</text:p>
          </table:table-cell>
          <table:table-cell table:style-name="ce13" office:value-type="date" office:date-value="2007-11-27">
            <text:p>27/11/07</text:p>
          </table:table-cell>
          <table:table-cell table:style-name="ce17">
            <text:p>avoid divide by 0 when pt = 0</text:p>
          </table:table-cell>
          <table:table-cell table:style-name="ce8" table:number-columns-repeated="250"/>
          <table:table-cell table:style-name="ce21"/>
        </table:table-row>
        <table:table-row table:style-name="ro17">
          <table:table-cell table:style-name="ce2">
            <text:p>25</text:p>
          </table:table-cell>
          <table:table-cell table:style-name="ce8">
            <text:p>GEN_RMP</text:p>
          </table:table-cell>
          <table:table-cell table:style-name="ce2">
            <text:p>1.2</text:p>
          </table:table-cell>
          <table:table-cell table:style-name="ce13" office:value-type="date" office:date-value="2007-11-27">
            <text:p>27/11/07</text:p>
          </table:table-cell>
          <table:table-cell table:style-name="ce17">
            <text:p>avoid divide by 0 when pt = 0</text:p>
          </table:table-cell>
          <table:table-cell table:style-name="ce8" table:number-columns-repeated="250"/>
          <table:table-cell table:style-name="ce21"/>
        </table:table-row>
        <table:table-row table:style-name="ro17">
          <table:table-cell table:style-name="ce2">
            <text:p>24</text:p>
          </table:table-cell>
          <table:table-cell table:style-name="ce8">
            <text:p>BLIND_SHADE</text:p>
          </table:table-cell>
          <table:table-cell table:style-name="ce2">
            <text:p>1.2</text:p>
          </table:table-cell>
          <table:table-cell table:style-name="ce13" office:value-type="date" office:date-value="2007-11-24">
            <text:p>24/11/07</text:p>
          </table:table-cell>
          <table:table-cell table:style-name="ce17">
            <text:p>added shade_delay to avoid constant up and down if sun is out parcially</text:p>
          </table:table-cell>
          <table:table-cell table:style-name="ce8" table:number-columns-repeated="250"/>
          <table:table-cell table:style-name="ce21"/>
        </table:table-row>
        <table:table-row table:style-name="ro17">
          <table:table-cell table:style-name="ce2">
            <text:p>24</text:p>
          </table:table-cell>
          <table:table-cell table:style-name="ce8">
            <text:p>HOLIDAY</text:p>
          </table:table-cell>
          <table:table-cell table:style-name="ce2">
            <text:p>1.3</text:p>
          </table:table-cell>
          <table:table-cell table:style-name="ce13" office:value-type="date" office:date-value="2007-11-24">
            <text:p>24/11/07</text:p>
          </table:table-cell>
          <table:table-cell table:style-name="ce17">
            <text:p>changes F_use of <text:s/>Buß_und_Bettag to 0 because this is no official holiday</text:p>
          </table:table-cell>
          <table:table-cell table:style-name="ce8" table:number-columns-repeated="250"/>
          <table:table-cell table:style-name="ce21"/>
        </table:table-row>
        <table:table-row table:style-name="ro17">
          <table:table-cell table:style-name="ce2">
            <text:p>24</text:p>
          </table:table-cell>
          <table:table-cell table:style-name="ce8">
            <text:p>REAL_TO_STRF</text:p>
          </table:table-cell>
          <table:table-cell table:style-name="ce2">
            <text:p>1.1</text:p>
          </table:table-cell>
          <table:table-cell table:style-name="ce13" office:value-type="date" office:date-value="2007-11-20">
            <text:p>20/11/07</text:p>
          </table:table-cell>
          <table:table-cell table:style-name="Default">
            <text:p>when N=0 there will be no dot at the end of the string</text:p>
          </table:table-cell>
          <table:table-cell table:style-name="ce8" table:number-columns-repeated="250"/>
          <table:table-cell table:style-name="ce21"/>
        </table:table-row>
        <table:table-row table:style-name="ro17">
          <table:table-cell table:style-name="ce2">
            <text:p>24</text:p>
          </table:table-cell>
          <table:table-cell table:style-name="ce8">
            <text:p>GEN_RDT</text:p>
          </table:table-cell>
          <table:table-cell table:style-name="ce2">
            <text:p>1.0</text:p>
          </table:table-cell>
          <table:table-cell table:style-name="ce13" office:value-type="date" office:date-value="2007-11-20">
            <text:p>20/11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8">
          <table:table-cell table:style-name="ce2">
            <text:p>24</text:p>
          </table:table-cell>
          <table:table-cell table:style-name="ce8">
            <text:p>RDM</text:p>
          </table:table-cell>
          <table:table-cell table:style-name="ce2">
            <text:p>1.2</text:p>
          </table:table-cell>
          <table:table-cell table:style-name="ce13" office:value-type="date" office:date-value="2007-11-20">
            <text:p>20/11/07</text:p>
          </table:table-cell>
          <table:table-cell table:style-name="ce17">
            <text:p>changed code of temp calculation to avoid overflow in modr due to resuclt would not fit DINT for high timer values</text:p>
          </table:table-cell>
          <table:table-cell table:style-name="ce8" table:number-columns-repeated="250"/>
          <table:table-cell table:style-name="ce21"/>
        </table:table-row>
        <table:table-row table:style-name="ro19">
          <table:table-cell table:style-name="ce2">
            <text:p>24</text:p>
          </table:table-cell>
          <table:table-cell table:style-name="ce8">
            <text:p>ACTUATOR_2P</text:p>
          </table:table-cell>
          <table:table-cell table:style-name="ce2">
            <text:p>1.4</text:p>
          </table:table-cell>
          <table:table-cell table:style-name="ce13" office:value-type="date" office:date-value="2007-11-19">
            <text:p>19/11/07</text:p>
          </table:table-cell>
          <table:table-cell table:style-name="ce8">
            <text:p>replaced left over statement time() with tx</text:p>
          </table:table-cell>
          <table:table-cell table:style-name="Default"/>
          <table:table-cell table:style-name="ce8" table:number-columns-repeated="249"/>
          <table:table-cell table:style-name="ce21"/>
        </table:table-row>
        <table:table-row table:style-name="ro19">
          <table:table-cell table:style-name="ce2">
            <text:p>24</text:p>
          </table:table-cell>
          <table:table-cell table:style-name="ce8">
            <text:p>MIX</text:p>
          </table:table-cell>
          <table:table-cell table:style-name="ce2">
            <text:p>1.0</text:p>
          </table:table-cell>
          <table:table-cell table:style-name="ce13" office:value-type="date" office:date-value="2007-11-19">
            <text:p>19/11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9">
          <table:table-cell table:style-name="ce2">
            <text:p>24</text:p>
          </table:table-cell>
          <table:table-cell table:style-name="ce8">
            <text:p>HEX_TO_DWORD</text:p>
          </table:table-cell>
          <table:table-cell table:style-name="ce2">
            <text:p>1.1</text:p>
          </table:table-cell>
          <table:table-cell table:style-name="ce13" office:value-type="date" office:date-value="2007-11-19">
            <text:p>19/11/07</text:p>
          </table:table-cell>
          <table:table-cell table:style-name="ce8">
            <text:p>changed type of function from int to dword</text:p>
          </table:table-cell>
          <table:table-cell table:style-name="Default"/>
          <table:table-cell table:style-name="ce8" table:number-columns-repeated="249"/>
          <table:table-cell table:style-name="ce21"/>
        </table:table-row>
        <table:table-row table:style-name="ro19">
          <table:table-cell table:style-name="ce2">
            <text:p>24</text:p>
          </table:table-cell>
          <table:table-cell table:style-name="ce8">
            <text:p>HEAT_METER</text:p>
          </table:table-cell>
          <table:table-cell table:style-name="ce2">
            <text:p>1.0</text:p>
          </table:table-cell>
          <table:table-cell table:style-name="ce13" office:value-type="date" office:date-value="2007-11-17">
            <text:p>17/11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19">
          <table:table-cell table:style-name="ce2">
            <text:p>24</text:p>
          </table:table-cell>
          <table:table-cell table:style-name="ce8">
            <text:p>_ARRAY_INIT</text:p>
          </table:table-cell>
          <table:table-cell table:style-name="ce2">
            <text:p>1.2</text:p>
          </table:table-cell>
          <table:table-cell table:style-name="ce13" office:value-type="date" office:date-value="2007-11-14">
            <text:p>14/11/07</text:p>
          </table:table-cell>
          <table:table-cell table:style-name="ce17">
            <text:p>changed size calculation to be more efficient</text:p>
          </table:table-cell>
          <table:table-cell table:style-name="ce8" table:number-columns-repeated="250"/>
          <table:table-cell table:style-name="ce21"/>
        </table:table-row>
        <table:table-row table:style-name="ro19">
          <table:table-cell table:style-name="ce2">
            <text:p>24</text:p>
          </table:table-cell>
          <table:table-cell table:style-name="ce8">
            <text:p>_ARRAY_SORT</text:p>
          </table:table-cell>
          <table:table-cell table:style-name="ce2">
            <text:p>1.3</text:p>
          </table:table-cell>
          <table:table-cell table:style-name="ce13" office:value-type="date" office:date-value="2007-11-14">
            <text:p>14/11/07</text:p>
          </table:table-cell>
          <table:table-cell table:style-name="ce17">
            <text:p>changed size calculation to be more efficient</text:p>
          </table:table-cell>
          <table:table-cell table:style-name="ce8" table:number-columns-repeated="250"/>
          <table:table-cell table:style-name="ce21"/>
        </table:table-row>
        <table:table-row table:style-name="ro19">
          <table:table-cell table:style-name="ce2">
            <text:p>24</text:p>
          </table:table-cell>
          <table:table-cell table:style-name="ce8">
            <text:p>_ARRAY_MEDIAN</text:p>
          </table:table-cell>
          <table:table-cell table:style-name="ce2">
            <text:p>1.4</text:p>
          </table:table-cell>
          <table:table-cell table:style-name="ce13" office:value-type="date" office:date-value="2007-11-14">
            <text:p>14/11/07</text:p>
          </table:table-cell>
          <table:table-cell table:style-name="ce17">
            <text:p>corrected a problem with size calculation</text:p>
          </table:table-cell>
          <table:table-cell table:style-name="ce8" table:number-columns-repeated="250"/>
          <table:table-cell table:style-name="ce21"/>
        </table:table-row>
        <table:table-row table:style-name="ro20">
          <table:table-cell table:style-name="ce2">
            <text:p>24</text:p>
          </table:table-cell>
          <table:table-cell table:style-name="ce8">
            <text:p>T_PLC_MS</text:p>
          </table:table-cell>
          <table:table-cell table:style-name="ce2">
            <text:p>1.1</text:p>
          </table:table-cell>
          <table:table-cell table:style-name="ce13" office:value-type="date" office:date-value="2007-11-12">
            <text:p>12/11/07</text:p>
          </table:table-cell>
          <table:table-cell table:style-name="ce17">
            <text:p>added temporaray variable tx because some compilers could not handle time() as an argument</text:p>
          </table:table-cell>
          <table:table-cell table:style-name="ce8" table:number-columns-repeated="250"/>
          <table:table-cell table:style-name="ce21"/>
        </table:table-row>
        <table:table-row table:style-name="ro20">
          <table:table-cell table:style-name="ce2">
            <text:p>24</text:p>
          </table:table-cell>
          <table:table-cell table:style-name="ce8">
            <text:p>T_PLC_US</text:p>
          </table:table-cell>
          <table:table-cell table:style-name="ce2">
            <text:p>1.1</text:p>
          </table:table-cell>
          <table:table-cell table:style-name="ce13" office:value-type="date" office:date-value="2007-11-12">
            <text:p>12/11/07</text:p>
          </table:table-cell>
          <table:table-cell table:style-name="ce17">
            <text:p>added temporaray variable tx because some compilers could not handle time() as an argument</text:p>
          </table:table-cell>
          <table:table-cell table:style-name="ce8" table:number-columns-repeated="250"/>
          <table:table-cell table:style-name="ce21"/>
        </table:table-row>
        <table:table-row table:style-name="ro20">
          <table:table-cell table:style-name="ce2">
            <text:p>24</text:p>
          </table:table-cell>
          <table:table-cell table:style-name="ce8">
            <text:p>LTIME_TO_UTC</text:p>
          </table:table-cell>
          <table:table-cell table:style-name="ce2">
            <text:p>1.2</text:p>
          </table:table-cell>
          <table:table-cell table:style-name="ce13" office:value-type="date" office:date-value="2007-11-12">
            <text:p>12/11/07</text:p>
          </table:table-cell>
          <table:table-cell table:style-name="ce17">
            <text:p>changed Type of time_zone_offset from time to int</text:p>
            <text:p>to allow for time zones with negative offset</text:p>
          </table:table-cell>
          <table:table-cell table:style-name="ce8" table:number-columns-repeated="250"/>
          <table:table-cell table:style-name="ce21"/>
        </table:table-row>
        <table:table-row table:style-name="ro20">
          <table:table-cell table:style-name="ce2">
            <text:p>24</text:p>
          </table:table-cell>
          <table:table-cell table:style-name="ce8">
            <text:p>LTIME</text:p>
          </table:table-cell>
          <table:table-cell table:style-name="ce2">
            <text:p>1.5</text:p>
          </table:table-cell>
          <table:table-cell table:style-name="ce13" office:value-type="date" office:date-value="2007-11-12">
            <text:p>12/11/07</text:p>
          </table:table-cell>
          <table:table-cell table:style-name="ce17">
            <text:p>changed Type of time_zone_offset from time to int</text:p>
            <text:p>to allow for time zones with negative offset</text:p>
          </table:table-cell>
          <table:table-cell table:style-name="ce8" table:number-columns-repeated="250"/>
          <table:table-cell table:style-name="ce21"/>
        </table:table-row>
        <table:table-row table:style-name="ro21">
          <table:table-cell table:style-name="ce2">
            <text:p>24</text:p>
          </table:table-cell>
          <table:table-cell table:style-name="ce8">
            <text:p>LOCAL_TIME</text:p>
          </table:table-cell>
          <table:table-cell table:style-name="ce2">
            <text:p>1.3</text:p>
          </table:table-cell>
          <table:table-cell table:style-name="ce13" office:value-type="date" office:date-value="2007-11-12">
            <text:p>12/11/07</text:p>
          </table:table-cell>
          <table:table-cell table:style-name="ce17">
            <text:p>changed time_zone_offset from time to integer to allow for negative offset time zones</text:p>
          </table:table-cell>
          <table:table-cell table:style-name="ce8" table:number-columns-repeated="250"/>
          <table:table-cell table:style-name="ce21"/>
        </table:table-row>
        <table:table-row table:style-name="ro21">
          <table:table-cell table:style-name="ce2">
            <text:p>24</text:p>
          </table:table-cell>
          <table:table-cell table:style-name="ce8">
            <text:p>DCF77</text:p>
          </table:table-cell>
          <table:table-cell table:style-name="ce2">
            <text:p>1.5</text:p>
          </table:table-cell>
          <table:table-cell table:style-name="ce13" office:value-type="date" office:date-value="2007-11-12">
            <text:p>12/11/07</text:p>
          </table:table-cell>
          <table:table-cell table:style-name="ce17">
            <text:p>changed time_offset from time to integer to allow for negative offset time zones</text:p>
          </table:table-cell>
          <table:table-cell table:style-name="ce8" table:number-columns-repeated="250"/>
          <table:table-cell table:style-name="ce21"/>
        </table:table-row>
        <table:table-row table:style-name="ro21">
          <table:table-cell table:style-name="ce2">
            <text:p>24</text:p>
          </table:table-cell>
          <table:table-cell table:style-name="ce8">
            <text:p>RDM</text:p>
          </table:table-cell>
          <table:table-cell table:style-name="ce2">
            <text:p>1.1</text:p>
          </table:table-cell>
          <table:table-cell table:style-name="ce13" office:value-type="date" office:date-value="2007-11-11">
            <text:p>11/11/07</text:p>
          </table:table-cell>
          <table:table-cell table:style-name="ce17">
            <text:p>changed time() into t_plc_ms()</text:p>
          </table:table-cell>
          <table:table-cell table:style-name="ce8" table:number-columns-repeated="250"/>
          <table:table-cell table:style-name="ce21"/>
        </table:table-row>
        <table:table-row table:style-name="ro21">
          <table:table-cell table:style-name="ce2">
            <text:p>24</text:p>
          </table:table-cell>
          <table:table-cell table:style-name="ce8">
            <text:p>MUL_ADD</text:p>
          </table:table-cell>
          <table:table-cell table:style-name="ce2">
            <text:p>1.1</text:p>
          </table:table-cell>
          <table:table-cell table:style-name="ce13" office:value-type="date" office:date-value="2007-11-11">
            <text:p>11/11/07</text:p>
          </table:table-cell>
          <table:table-cell table:style-name="ce17">
            <text:p>deleted preset values for K and O this makes no sense for a function</text:p>
          </table:table-cell>
          <table:table-cell table:style-name="ce8" table:number-columns-repeated="250"/>
          <table:table-cell table:style-name="ce21"/>
        </table:table-row>
        <table:table-row table:style-name="ro21">
          <table:table-cell table:style-name="ce2">
            <text:p>24</text:p>
          </table:table-cell>
          <table:table-cell table:style-name="ce8">
            <text:p>NEG</text:p>
          </table:table-cell>
          <table:table-cell table:style-name="ce2">
            <text:p>1.0</text:p>
          </table:table-cell>
          <table:table-cell table:style-name="ce13" office:value-type="date" office:date-value="2007-11-11">
            <text:p>11/11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1">
          <table:table-cell table:style-name="ce2">
            <text:p>24</text:p>
          </table:table-cell>
          <table:table-cell table:style-name="ce8">
            <text:p>SGN</text:p>
          </table:table-cell>
          <table:table-cell table:style-name="ce2">
            <text:p>1.1</text:p>
          </table:table-cell>
          <table:table-cell table:style-name="ce13" office:value-type="date" office:date-value="2007-11-11">
            <text:p>11/11/07</text:p>
          </table:table-cell>
          <table:table-cell table:style-name="ce17">
            <text:p>changed type of function from real to int</text:p>
          </table:table-cell>
          <table:table-cell table:style-name="ce8" table:number-columns-repeated="250"/>
          <table:table-cell table:style-name="ce21"/>
        </table:table-row>
        <table:table-row table:style-name="ro21">
          <table:table-cell table:style-name="ce2">
            <text:p>24</text:p>
          </table:table-cell>
          <table:table-cell table:style-name="ce8">
            <text:p>LTIME_TO_UTC</text:p>
          </table:table-cell>
          <table:table-cell table:style-name="ce2">
            <text:p>1.1</text:p>
          </table:table-cell>
          <table:table-cell table:style-name="ce13" office:value-type="date" office:date-value="2007-11-05">
            <text:p>05/11/07</text:p>
          </table:table-cell>
          <table:table-cell table:style-name="ce17">
            <text:p>replaced literal constant with variable because of error in möller ecp4 compiler</text:p>
          </table:table-cell>
          <table:table-cell table:style-name="ce8" table:number-columns-repeated="250"/>
          <table:table-cell table:style-name="ce21"/>
        </table:table-row>
        <table:table-row table:style-name="ro21">
          <table:table-cell table:style-name="ce2">
            <text:p>24</text:p>
          </table:table-cell>
          <table:table-cell table:style-name="ce8">
            <text:p>CONTROL_SET2</text:p>
          </table:table-cell>
          <table:table-cell table:style-name="ce2">
            <text:p>1.0</text:p>
          </table:table-cell>
          <table:table-cell table:style-name="ce13" office:value-type="date" office:date-value="2007-11-04">
            <text:p>04/11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1">
          <table:table-cell table:style-name="ce2">
            <text:p>24</text:p>
          </table:table-cell>
          <table:table-cell table:style-name="ce8">
            <text:p>CONTROL_SET1</text:p>
          </table:table-cell>
          <table:table-cell table:style-name="ce2">
            <text:p>1.0</text:p>
          </table:table-cell>
          <table:table-cell table:style-name="ce13" office:value-type="date" office:date-value="2007-11-04">
            <text:p>04/11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1">
          <table:table-cell table:style-name="ce2">
            <text:p>24</text:p>
          </table:table-cell>
          <table:table-cell table:style-name="ce8">
            <text:p>TUNE</text:p>
          </table:table-cell>
          <table:table-cell table:style-name="ce2">
            <text:p>1.0</text:p>
          </table:table-cell>
          <table:table-cell table:style-name="ce13" office:value-type="date" office:date-value="2007-11-04">
            <text:p>04/11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1">
          <table:table-cell table:style-name="ce2">
            <text:p>24</text:p>
          </table:table-cell>
          <table:table-cell table:style-name="ce8">
            <text:p>TUNE2</text:p>
          </table:table-cell>
          <table:table-cell table:style-name="ce2">
            <text:p>1.0</text:p>
          </table:table-cell>
          <table:table-cell table:style-name="ce13" office:value-type="date" office:date-value="2007-11-03">
            <text:p>03/11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1">
          <table:table-cell table:style-name="ce2">
            <text:p>24</text:p>
          </table:table-cell>
          <table:table-cell table:style-name="ce8">
            <text:p>PARSET2</text:p>
          </table:table-cell>
          <table:table-cell table:style-name="ce2">
            <text:p>1.0</text:p>
          </table:table-cell>
          <table:table-cell table:style-name="ce13" office:value-type="date" office:date-value="2007-11-03">
            <text:p>03/11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2">
          <table:table-cell table:style-name="ce2">
            <text:p>24</text:p>
          </table:table-cell>
          <table:table-cell table:style-name="ce8">
            <text:p>FT_PI</text:p>
          </table:table-cell>
          <table:table-cell table:style-name="ce2">
            <text:p>1.1</text:p>
          </table:table-cell>
          <table:table-cell table:style-name="ce13" office:value-type="date" office:date-value="2007-11-03">
            <text:p>03/11/07</text:p>
          </table:table-cell>
          <table:table-cell table:style-name="ce17">
            <text:p>added noise input to filter noise</text:p>
            <text:p>output diff added</text:p>
            <text:p>set limit output false when output is within limits</text:p>
            <text:p>overfolw was not set correctly</text:p>
          </table:table-cell>
          <table:table-cell table:style-name="ce8" table:number-columns-repeated="250"/>
          <table:table-cell table:style-name="ce21"/>
        </table:table-row>
        <table:table-row table:style-name="ro22">
          <table:table-cell table:style-name="ce2">
            <text:p>24</text:p>
          </table:table-cell>
          <table:table-cell table:style-name="ce8">
            <text:p>FT_PID</text:p>
          </table:table-cell>
          <table:table-cell table:style-name="ce2">
            <text:p>1.5</text:p>
          </table:table-cell>
          <table:table-cell table:style-name="ce13" office:value-type="date" office:date-value="2007-11-03">
            <text:p>03/11/07</text:p>
          </table:table-cell>
          <table:table-cell table:style-name="ce17">
            <text:p>added noise input to filter noise,</text:p>
            <text:p>output diff added,</text:p>
            <text:p>set limit output false when output is within limits</text:p>
            <text:p>overfolw was not set correctly</text:p>
          </table:table-cell>
          <table:table-cell table:style-name="ce8" table:number-columns-repeated="250"/>
          <table:table-cell table:style-name="ce21"/>
        </table:table-row>
        <table:table-row table:style-name="ro23">
          <table:table-cell table:style-name="ce2">
            <text:p>24</text:p>
          </table:table-cell>
          <table:table-cell table:style-name="ce8">
            <text:p>SET_TOD</text:p>
          </table:table-cell>
          <table:table-cell table:style-name="ce2">
            <text:p>1.3</text:p>
          </table:table-cell>
          <table:table-cell table:style-name="ce13" office:value-type="date" office:date-value="2007-11-02">
            <text:p>02/11/07</text:p>
          </table:table-cell>
          <table:table-cell table:style-name="ce17">
            <text:p>changed dword to DINT in calcualtion to avoid warnings with some compilers</text:p>
          </table:table-cell>
          <table:table-cell table:style-name="ce8" table:number-columns-repeated="250"/>
          <table:table-cell table:style-name="ce21"/>
        </table:table-row>
        <table:table-row table:style-name="ro23">
          <table:table-cell table:style-name="ce2">
            <text:p>24</text:p>
          </table:table-cell>
          <table:table-cell table:style-name="ce8">
            <text:p>PARSET</text:p>
          </table:table-cell>
          <table:table-cell table:style-name="ce2">
            <text:p>1.0</text:p>
          </table:table-cell>
          <table:table-cell table:style-name="ce13" office:value-type="date" office:date-value="2007-11-02">
            <text:p>02/11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3">
          <table:table-cell table:style-name="ce2">
            <text:p>24</text:p>
          </table:table-cell>
          <table:table-cell table:style-name="ce8">
            <text:p>DEAD_BAND</text:p>
          </table:table-cell>
          <table:table-cell table:style-name="ce2">
            <text:p>1.0</text:p>
          </table:table-cell>
          <table:table-cell table:style-name="ce13" office:value-type="date" office:date-value="2007-11-02">
            <text:p>02/11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3">
          <table:table-cell table:style-name="ce2">
            <text:p>24</text:p>
          </table:table-cell>
          <table:table-cell table:style-name="ce8">
            <text:p>AIR_ENTHALPY</text:p>
          </table:table-cell>
          <table:table-cell table:style-name="ce2">
            <text:p>1.1</text:p>
          </table:table-cell>
          <table:table-cell table:style-name="ce13" office:value-type="date" office:date-value="2007-11-02">
            <text:p>02/11/07</text:p>
          </table:table-cell>
          <table:table-cell table:style-name="ce17">
            <text:p>deleted unused variable RF</text:p>
          </table:table-cell>
          <table:table-cell table:style-name="ce8" table:number-columns-repeated="250"/>
          <table:table-cell table:style-name="ce21"/>
        </table:table-row>
        <table:table-row table:style-name="ro23">
          <table:table-cell table:style-name="ce2">
            <text:p>23</text:p>
          </table:table-cell>
          <table:table-cell table:style-name="ce8">
            <text:p>DATE_ADD</text:p>
          </table:table-cell>
          <table:table-cell table:style-name="ce2">
            <text:p>1.2</text:p>
          </table:table-cell>
          <table:table-cell table:style-name="ce13" office:value-type="date" office:date-value="2007-11-01">
            <text:p>01/11/07</text:p>
          </table:table-cell>
          <table:table-cell table:style-name="ce17">
            <text:p>added int_to_dword stetements to avoid possible overrun with möller ecp4</text:p>
          </table:table-cell>
          <table:table-cell table:style-name="ce8" table:number-columns-repeated="250"/>
          <table:table-cell table:style-name="ce21"/>
        </table:table-row>
        <table:table-row table:style-name="ro23">
          <table:table-cell table:style-name="ce2">
            <text:p>23</text:p>
          </table:table-cell>
          <table:table-cell table:style-name="ce8">
            <text:p>SET_TOD</text:p>
          </table:table-cell>
          <table:table-cell table:style-name="ce2">
            <text:p>1.2</text:p>
          </table:table-cell>
          <table:table-cell table:style-name="ce13" office:value-type="date" office:date-value="2007-11-01">
            <text:p>01/11/07</text:p>
          </table:table-cell>
          <table:table-cell table:style-name="ce17">
            <text:p>changed coding to avoid possible overrun situation on möller ecp4</text:p>
          </table:table-cell>
          <table:table-cell table:style-name="ce8" table:number-columns-repeated="250"/>
          <table:table-cell table:style-name="ce21"/>
        </table:table-row>
        <table:table-row table:style-name="ro23">
          <table:table-cell table:style-name="ce2">
            <text:p>23</text:p>
          </table:table-cell>
          <table:table-cell table:style-name="ce8">
            <text:p>SET_DT</text:p>
          </table:table-cell>
          <table:table-cell table:style-name="ce2">
            <text:p>1.4</text:p>
          </table:table-cell>
          <table:table-cell table:style-name="ce13" office:value-type="date" office:date-value="2007-11-01">
            <text:p>01/11/07</text:p>
          </table:table-cell>
          <table:table-cell table:style-name="ce17">
            <text:p>converted hour type integer to dowrd in calculation to avoid overrun on möller ecp4</text:p>
          </table:table-cell>
          <table:table-cell table:style-name="ce8" table:number-columns-repeated="250"/>
          <table:table-cell table:style-name="ce21"/>
        </table:table-row>
        <table:table-row table:style-name="ro23">
          <table:table-cell table:style-name="ce2">
            <text:p>23</text:p>
          </table:table-cell>
          <table:table-cell table:style-name="ce8">
            <text:p>WINDOW2</text:p>
          </table:table-cell>
          <table:table-cell table:style-name="ce2">
            <text:p>1.0</text:p>
          </table:table-cell>
          <table:table-cell table:style-name="ce13" office:value-type="date" office:date-value="2007-10-31">
            <text:p>31/10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3">
          <table:table-cell table:style-name="ce2">
            <text:p>23</text:p>
          </table:table-cell>
          <table:table-cell table:style-name="ce8">
            <text:p>FT_PID</text:p>
          </table:table-cell>
          <table:table-cell table:style-name="ce2">
            <text:p>1.4</text:p>
          </table:table-cell>
          <table:table-cell table:style-name="ce13" office:value-type="date" office:date-value="2007-10-31">
            <text:p>31/10/07</text:p>
          </table:table-cell>
          <table:table-cell table:style-name="ce17">
            <text:p>Rewritten to avoid error when one of the limits is 0</text:p>
          </table:table-cell>
          <table:table-cell table:style-name="ce8" table:number-columns-repeated="250"/>
          <table:table-cell table:style-name="ce21"/>
        </table:table-row>
        <table:table-row table:style-name="ro23">
          <table:table-cell table:style-name="ce2">
            <text:p>23</text:p>
          </table:table-cell>
          <table:table-cell table:style-name="ce8">
            <text:p>FT_PI</text:p>
          </table:table-cell>
          <table:table-cell table:style-name="ce2">
            <text:p>1.0</text:p>
          </table:table-cell>
          <table:table-cell table:style-name="ce13" office:value-type="date" office:date-value="2007-10-31">
            <text:p>31/10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3">
          <table:table-cell table:style-name="ce2">
            <text:p>23</text:p>
          </table:table-cell>
          <table:table-cell table:style-name="ce8">
            <text:p>AIR_ENTHALPY</text:p>
          </table:table-cell>
          <table:table-cell table:style-name="ce2">
            <text:p>1.0</text:p>
          </table:table-cell>
          <table:table-cell table:style-name="ce13" office:value-type="date" office:date-value="2007-10-31">
            <text:p>31/10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3">
          <table:table-cell table:style-name="ce2">
            <text:p>23</text:p>
          </table:table-cell>
          <table:table-cell table:style-name="ce8">
            <text:p>HOLIDAY</text:p>
          </table:table-cell>
          <table:table-cell table:style-name="ce2">
            <text:p>1.2</text:p>
          </table:table-cell>
          <table:table-cell table:style-name="ce13" office:value-type="date" office:date-value="2007-10-31">
            <text:p>31/10/07</text:p>
          </table:table-cell>
          <table:table-cell table:style-name="ce17">
            <text:p>changed holiday definition from constant to input constant</text:p>
          </table:table-cell>
          <table:table-cell table:style-name="ce8" table:number-columns-repeated="250"/>
          <table:table-cell table:style-name="ce21"/>
        </table:table-row>
        <table:table-row table:style-name="ro23">
          <table:table-cell table:style-name="ce2">
            <text:p>23</text:p>
          </table:table-cell>
          <table:table-cell table:style-name="ce8">
            <text:p>BLIND_CONTROL</text:p>
          </table:table-cell>
          <table:table-cell table:style-name="ce2">
            <text:p>1.3</text:p>
          </table:table-cell>
          <table:table-cell table:style-name="ce13" office:value-type="date" office:date-value="2007-10-30">
            <text:p>30/10/07</text:p>
          </table:table-cell>
          <table:table-cell table:style-name="ce17">
            <text:p>added lockout configuration time for motor direction change</text:p>
          </table:table-cell>
          <table:table-cell table:style-name="ce8" table:number-columns-repeated="250"/>
          <table:table-cell table:style-name="ce21"/>
        </table:table-row>
        <table:table-row table:style-name="ro23">
          <table:table-cell table:style-name="ce2">
            <text:p>23</text:p>
          </table:table-cell>
          <table:table-cell table:style-name="ce8">
            <text:p>AIR_DENSITY</text:p>
          </table:table-cell>
          <table:table-cell table:style-name="ce2">
            <text:p>1.0</text:p>
          </table:table-cell>
          <table:table-cell table:style-name="ce13" office:value-type="date" office:date-value="2007-10-29">
            <text:p>29/10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3">
          <table:table-cell table:style-name="ce2">
            <text:p>23</text:p>
          </table:table-cell>
          <table:table-cell table:style-name="ce8">
            <text:p>SDD</text:p>
          </table:table-cell>
          <table:table-cell table:style-name="ce2">
            <text:p>1.0</text:p>
          </table:table-cell>
          <table:table-cell table:style-name="ce13" office:value-type="date" office:date-value="2007-10-29">
            <text:p>29/10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3">
          <table:table-cell table:style-name="ce2">
            <text:p>23</text:p>
          </table:table-cell>
          <table:table-cell table:style-name="ce8">
            <text:p>WATER_ENTHALPY</text:p>
          </table:table-cell>
          <table:table-cell table:style-name="ce2">
            <text:p>1.0</text:p>
          </table:table-cell>
          <table:table-cell table:style-name="ce13" office:value-type="date" office:date-value="2007-10-29">
            <text:p>29/10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3">
          <table:table-cell table:style-name="ce2">
            <text:p>23</text:p>
          </table:table-cell>
          <table:table-cell table:style-name="ce8">
            <text:p>FT_DERIV</text:p>
          </table:table-cell>
          <table:table-cell table:style-name="ce2">
            <text:p>1.3</text:p>
          </table:table-cell>
          <table:table-cell table:style-name="ce13" office:value-type="date" office:date-value="2007-10-29">
            <text:p>29/10/07</text:p>
          </table:table-cell>
          <table:table-cell table:style-name="ce18">
            <text:p>prohibit calculation when tx - last = 0 to avoid div 0 and increase accuracy on fast systems</text:p>
          </table:table-cell>
          <table:table-cell table:style-name="ce8" table:number-columns-repeated="250"/>
          <table:table-cell table:style-name="ce21"/>
        </table:table-row>
        <table:table-row table:style-name="ro24">
          <table:table-cell table:style-name="ce2">
            <text:p>23</text:p>
          </table:table-cell>
          <table:table-cell table:style-name="ce8">
            <text:p>FT_INT</text:p>
          </table:table-cell>
          <table:table-cell table:style-name="ce2">
            <text:p>1.4</text:p>
          </table:table-cell>
          <table:table-cell table:style-name="ce13" office:value-type="date" office:date-value="2007-10-29">
            <text:p>29/10/07</text:p>
          </table:table-cell>
          <table:table-cell table:style-name="ce18">
            <text:p>changed code so int will not be called is time difference is 0 to increase accuracy on systems with cycle times below 1ms</text:p>
          </table:table-cell>
          <table:table-cell table:style-name="ce8" table:number-columns-repeated="250"/>
          <table:table-cell table:style-name="ce21"/>
        </table:table-row>
        <table:table-row table:style-name="ro25">
          <table:table-cell table:style-name="ce2">
            <text:p>23</text:p>
          </table:table-cell>
          <table:table-cell table:style-name="ce8">
            <text:p>BLIND_SCENE</text:p>
          </table:table-cell>
          <table:table-cell table:style-name="ce2">
            <text:p>1.0</text:p>
          </table:table-cell>
          <table:table-cell table:style-name="ce13" office:value-type="date" office:date-value="2007-10-24">
            <text:p>24/10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6">
          <table:table-cell table:style-name="ce2">
            <text:p>23</text:p>
          </table:table-cell>
          <table:table-cell table:style-name="ce8">
            <text:p>LTIME</text:p>
          </table:table-cell>
          <table:table-cell table:style-name="ce2">
            <text:p>1.4</text:p>
          </table:table-cell>
          <table:table-cell table:style-name="ce13" office:value-type="date" office:date-value="2007-10-24">
            <text:p>24/10/07</text:p>
          </table:table-cell>
          <table:table-cell table:style-name="ce17">
            <text:p>changed code because the execution every 100ms can cause major problems </text:p>
            <text:p>if the supplied time was not correct at start. <text:tab/>use of new dst function</text:p>
          </table:table-cell>
          <table:table-cell table:style-name="ce8" table:number-columns-repeated="250"/>
          <table:table-cell table:style-name="ce21"/>
        </table:table-row>
        <table:table-row table:style-name="ro26">
          <table:table-cell table:style-name="ce2">
            <text:p>23</text:p>
          </table:table-cell>
          <table:table-cell table:style-name="ce8">
            <text:p>LOCAL_TIME</text:p>
          </table:table-cell>
          <table:table-cell table:style-name="ce2">
            <text:p>1.2</text:p>
          </table:table-cell>
          <table:table-cell table:style-name="ce13" office:value-type="date" office:date-value="2007-10-24">
            <text:p>24/10/07</text:p>
          </table:table-cell>
          <table:table-cell table:style-name="ce17">
            <text:p>changed dst calculation because function dst was upgraded no error in local_time only a change in DST</text:p>
          </table:table-cell>
          <table:table-cell table:style-name="ce8" table:number-columns-repeated="250"/>
          <table:table-cell table:style-name="ce21"/>
        </table:table-row>
        <table:table-row table:style-name="ro26">
          <table:table-cell table:style-name="ce2">
            <text:p>23</text:p>
          </table:table-cell>
          <table:table-cell table:style-name="ce8">
            <text:p>DCF77</text:p>
          </table:table-cell>
          <table:table-cell table:style-name="ce2">
            <text:p>1.4</text:p>
          </table:table-cell>
          <table:table-cell table:style-name="ce13" office:value-type="date" office:date-value="2007-10-24">
            <text:p>24/10/07</text:p>
          </table:table-cell>
          <table:table-cell table:style-name="ce17">
            <text:p>changed dst calculation because function dst was upgraded no error in DCF77 only a change in DST</text:p>
          </table:table-cell>
          <table:table-cell table:style-name="ce8" table:number-columns-repeated="250"/>
          <table:table-cell table:style-name="ce21"/>
        </table:table-row>
        <table:table-row table:style-name="ro26">
          <table:table-cell table:style-name="ce2">
            <text:p>23</text:p>
          </table:table-cell>
          <table:table-cell table:style-name="ce8">
            <text:p>DST</text:p>
          </table:table-cell>
          <table:table-cell table:style-name="ce2">
            <text:p>1.1</text:p>
          </table:table-cell>
          <table:table-cell table:style-name="ce13" office:value-type="date" office:date-value="2007-10-24">
            <text:p>24/10/07</text:p>
          </table:table-cell>
          <table:table-cell table:style-name="ce17">
            <text:p>deleted time_zone_offset input because dst is generally at 01:00 utc and not mesz</text:p>
            <text:p>uk starts 01:00 utc and also greece</text:p>
          </table:table-cell>
          <table:table-cell table:style-name="ce8" table:number-columns-repeated="250"/>
          <table:table-cell table:style-name="ce21"/>
        </table:table-row>
        <table:table-row table:style-name="ro27">
          <table:table-cell table:style-name="ce2">
            <text:p>23</text:p>
          </table:table-cell>
          <table:table-cell table:style-name="ce8">
            <text:p>FT_PT1</text:p>
          </table:table-cell>
          <table:table-cell table:style-name="ce2">
            <text:p>1.5</text:p>
          </table:table-cell>
          <table:table-cell table:style-name="ce13" office:value-type="date" office:date-value="2007-10-23">
            <text:p>23/10/07</text:p>
          </table:table-cell>
          <table:table-cell table:style-name="ce17">
            <text:p>added out := in to the init statements</text:p>
          </table:table-cell>
          <table:table-cell table:style-name="Default"/>
          <table:table-cell table:style-name="ce8" table:number-columns-repeated="249"/>
          <table:table-cell table:style-name="ce21"/>
        </table:table-row>
        <table:table-row table:style-name="ro27">
          <table:table-cell table:style-name="ce2">
            <text:p>23</text:p>
          </table:table-cell>
          <table:table-cell table:style-name="ce8">
            <text:p>BLIND_SHADE</text:p>
          </table:table-cell>
          <table:table-cell table:style-name="ce2">
            <text:p>1.1</text:p>
          </table:table-cell>
          <table:table-cell table:style-name="ce13" office:value-type="date" office:date-value="2007-10-19">
            <text:p>19/10/07</text:p>
          </table:table-cell>
          <table:table-cell table:style-name="ce17">
            <text:p>manual mode was not detected because outputs were checked and not inputs UP and DN</text:p>
          </table:table-cell>
          <table:table-cell table:style-name="ce8" table:number-columns-repeated="250"/>
          <table:table-cell table:style-name="ce21"/>
        </table:table-row>
        <table:table-row table:style-name="ro27">
          <table:table-cell table:style-name="ce2">
            <text:p>23</text:p>
          </table:table-cell>
          <table:table-cell table:style-name="ce8">
            <text:p>CONE_V</text:p>
          </table:table-cell>
          <table:table-cell table:style-name="ce2">
            <text:p>1.0</text:p>
          </table:table-cell>
          <table:table-cell table:style-name="ce13" office:value-type="date" office:date-value="2007-10-17">
            <text:p>17/10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7">
          <table:table-cell table:style-name="ce2">
            <text:p>22</text:p>
          </table:table-cell>
          <table:table-cell table:style-name="ce8">
            <text:p>GLOBAL CONSTANTS </text:p>
          </table:table-cell>
          <table:table-cell table:style-name="Default"/>
          <table:table-cell table:style-name="ce13" office:value-type="date" office:date-value="2007-10-16">
            <text:p>16/10/07</text:p>
          </table:table-cell>
          <table:table-cell table:style-name="ce17">
            <text:p>Renamed PI in PI1 for better compatibility to other libraries</text:p>
          </table:table-cell>
          <table:table-cell table:style-name="ce8" table:number-columns-repeated="250"/>
          <table:table-cell table:style-name="ce21"/>
        </table:table-row>
        <table:table-row table:style-name="ro27">
          <table:table-cell table:style-name="ce2">
            <text:p>22</text:p>
          </table:table-cell>
          <table:table-cell table:style-name="ce8">
            <text:p>DEG</text:p>
          </table:table-cell>
          <table:table-cell table:style-name="ce2">
            <text:p>1.1</text:p>
          </table:table-cell>
          <table:table-cell table:style-name="ce13" office:value-type="date" office:date-value="2007-10-16">
            <text:p>16/10/07</text:p>
          </table:table-cell>
          <table:table-cell table:style-name="ce17">
            <text:p>Deg will become 0 when it reaches 360</text:p>
          </table:table-cell>
          <table:table-cell table:style-name="ce8" table:number-columns-repeated="250"/>
          <table:table-cell table:style-name="ce21"/>
        </table:table-row>
        <table:table-row table:style-name="ro27">
          <table:table-cell table:style-name="ce2">
            <text:p>22</text:p>
          </table:table-cell>
          <table:table-cell table:style-name="ce8">
            <text:p>RAD</text:p>
          </table:table-cell>
          <table:table-cell table:style-name="ce2">
            <text:p>1.1</text:p>
          </table:table-cell>
          <table:table-cell table:style-name="ce13" office:value-type="date" office:date-value="2007-10-16">
            <text:p>16/10/07</text:p>
          </table:table-cell>
          <table:table-cell table:style-name="ce17">
            <text:p>Rad will become 0 when it reaches 2PI</text:p>
          </table:table-cell>
          <table:table-cell table:style-name="ce8" table:number-columns-repeated="250"/>
          <table:table-cell table:style-name="ce21"/>
        </table:table-row>
        <table:table-row table:style-name="ro27">
          <table:table-cell table:style-name="ce2">
            <text:p>22</text:p>
          </table:table-cell>
          <table:table-cell table:style-name="ce8">
            <text:p>TRIANGLE_A</text:p>
          </table:table-cell>
          <table:table-cell table:style-name="ce2">
            <text:p>1.0</text:p>
          </table:table-cell>
          <table:table-cell table:style-name="ce13" office:value-type="date" office:date-value="2007-10-16">
            <text:p>16/10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7">
          <table:table-cell table:style-name="ce2">
            <text:p>22</text:p>
          </table:table-cell>
          <table:table-cell table:style-name="ce8">
            <text:p>SPHERE_V</text:p>
          </table:table-cell>
          <table:table-cell table:style-name="ce2">
            <text:p>1.0</text:p>
          </table:table-cell>
          <table:table-cell table:style-name="ce13" office:value-type="date" office:date-value="2007-10-16">
            <text:p>16/10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7">
          <table:table-cell table:style-name="ce2">
            <text:p>22</text:p>
          </table:table-cell>
          <table:table-cell table:style-name="ce8">
            <text:p>ELLIPSE_C</text:p>
          </table:table-cell>
          <table:table-cell table:style-name="ce2">
            <text:p>1.0</text:p>
          </table:table-cell>
          <table:table-cell table:style-name="ce13" office:value-type="date" office:date-value="2007-10-16">
            <text:p>16/10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7">
          <table:table-cell table:style-name="ce2">
            <text:p>22</text:p>
          </table:table-cell>
          <table:table-cell table:style-name="ce8">
            <text:p>ELLIPSE_A</text:p>
          </table:table-cell>
          <table:table-cell table:style-name="ce2">
            <text:p>1.0</text:p>
          </table:table-cell>
          <table:table-cell table:style-name="ce13" office:value-type="date" office:date-value="2007-10-16">
            <text:p>16/10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7">
          <table:table-cell table:style-name="ce2">
            <text:p>22</text:p>
          </table:table-cell>
          <table:table-cell table:style-name="ce8">
            <text:p>CIRCLE_C</text:p>
          </table:table-cell>
          <table:table-cell table:style-name="ce2">
            <text:p>1.0</text:p>
          </table:table-cell>
          <table:table-cell table:style-name="ce13" office:value-type="date" office:date-value="2007-10-16">
            <text:p>16/10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7">
          <table:table-cell table:style-name="ce2">
            <text:p>22</text:p>
          </table:table-cell>
          <table:table-cell table:style-name="ce8">
            <text:p>CIRCLE_A</text:p>
          </table:table-cell>
          <table:table-cell table:style-name="ce2">
            <text:p>1.0</text:p>
          </table:table-cell>
          <table:table-cell table:style-name="ce13" office:value-type="date" office:date-value="2007-10-16">
            <text:p>16/10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7">
          <table:table-cell table:style-name="ce2">
            <text:p>22</text:p>
          </table:table-cell>
          <table:table-cell table:style-name="ce8">
            <text:p>SGN</text:p>
          </table:table-cell>
          <table:table-cell table:style-name="ce2">
            <text:p>1.0</text:p>
          </table:table-cell>
          <table:table-cell table:style-name="ce13" office:value-type="date" office:date-value="2007-10-16">
            <text:p>16/10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7">
          <table:table-cell table:style-name="ce2">
            <text:p>22</text:p>
          </table:table-cell>
          <table:table-cell table:style-name="ce8">
            <text:p>BLIND_CONTROL</text:p>
          </table:table-cell>
          <table:table-cell table:style-name="ce2">
            <text:p>1.2</text:p>
          </table:table-cell>
          <table:table-cell table:style-name="ce13" office:value-type="date" office:date-value="2007-10-16">
            <text:p>16/10/07</text:p>
          </table:table-cell>
          <table:table-cell table:style-name="ce17">
            <text:p>Ignore angle when T_ANGLE &lt; T#100ms</text:p>
          </table:table-cell>
          <table:table-cell table:style-name="ce8" table:number-columns-repeated="250"/>
          <table:table-cell table:style-name="ce21"/>
        </table:table-row>
        <table:table-row table:style-name="ro27">
          <table:table-cell table:style-name="ce2">
            <text:p>22</text:p>
          </table:table-cell>
          <table:table-cell table:style-name="ce8">
            <text:p>BLIND_SHADE</text:p>
          </table:table-cell>
          <table:table-cell table:style-name="ce2">
            <text:p>1.0</text:p>
          </table:table-cell>
          <table:table-cell table:style-name="ce13" office:value-type="date" office:date-value="2007-10-15">
            <text:p>15/10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8">
          <table:table-cell table:style-name="ce3">
            <text:p>22</text:p>
          </table:table-cell>
          <table:table-cell table:style-name="ce8">
            <text:p>CRC_GEN</text:p>
          </table:table-cell>
          <table:table-cell table:style-name="ce3">
            <text:p>1.2</text:p>
          </table:table-cell>
          <table:table-cell table:style-name="ce13" office:value-type="date" office:date-value="2007-10-09">
            <text:p>09/10/07</text:p>
          </table:table-cell>
          <table:table-cell table:style-name="ce17">
            <text:p>Added init values for start value and final XOR</text:p>
            <text:p>added reflect_in and reflect_out feature</text:p>
          </table:table-cell>
          <table:table-cell table:style-name="ce8" table:number-columns-repeated="250"/>
          <table:table-cell table:style-name="ce21"/>
        </table:table-row>
        <table:table-row table:style-name="ro29">
          <table:table-cell table:style-name="ce2">
            <text:p>22</text:p>
          </table:table-cell>
          <table:table-cell table:style-name="ce8">
            <text:p>REVERSE</text:p>
          </table:table-cell>
          <table:table-cell table:style-name="ce2">
            <text:p>1.0</text:p>
          </table:table-cell>
          <table:table-cell table:style-name="ce13" office:value-type="date" office:date-value="2007-10-09">
            <text:p>09/10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9">
          <table:table-cell table:style-name="ce2">
            <text:p>22</text:p>
          </table:table-cell>
          <table:table-cell table:style-name="ce8">
            <text:p>SET_DT</text:p>
          </table:table-cell>
          <table:table-cell table:style-name="ce2">
            <text:p>1.3</text:p>
          </table:table-cell>
          <table:table-cell table:style-name="ce13" office:value-type="date" office:date-value="2007-10-08">
            <text:p>08/10/07</text:p>
          </table:table-cell>
          <table:table-cell table:style-name="ce17">
            <text:p>deleted unused variables count and leap</text:p>
          </table:table-cell>
          <table:table-cell table:style-name="ce8" table:number-columns-repeated="250"/>
          <table:table-cell table:style-name="ce21"/>
        </table:table-row>
        <table:table-row table:style-name="ro29">
          <table:table-cell table:style-name="ce2">
            <text:p>22</text:p>
          </table:table-cell>
          <table:table-cell table:style-name="ce8">
            <text:p>DAY_OF_MONTH</text:p>
          </table:table-cell>
          <table:table-cell table:style-name="ce2">
            <text:p>1.3</text:p>
          </table:table-cell>
          <table:table-cell table:style-name="ce13" office:value-type="date" office:date-value="2007-10-08">
            <text:p>08/10/07</text:p>
          </table:table-cell>
          <table:table-cell table:style-name="ce17">
            <text:p>deleted unused variable yr</text:p>
          </table:table-cell>
          <table:table-cell table:style-name="ce8" table:number-columns-repeated="250"/>
          <table:table-cell table:style-name="ce21"/>
        </table:table-row>
        <table:table-row table:style-name="ro29">
          <table:table-cell table:style-name="ce2">
            <text:p>22</text:p>
          </table:table-cell>
          <table:table-cell table:style-name="ce8">
            <text:p>_ARRAY_MEDIAN</text:p>
          </table:table-cell>
          <table:table-cell table:style-name="ce2">
            <text:p>1.3</text:p>
          </table:table-cell>
          <table:table-cell table:style-name="ce13" office:value-type="date" office:date-value="2007-10-08">
            <text:p>08/10/07</text:p>
          </table:table-cell>
          <table:table-cell table:style-name="ce17">
            <text:p>deleted unused variables m and temp</text:p>
          </table:table-cell>
          <table:table-cell table:style-name="ce8" table:number-columns-repeated="250"/>
          <table:table-cell table:style-name="ce21"/>
        </table:table-row>
        <table:table-row table:style-name="ro29">
          <table:table-cell table:style-name="ce2">
            <text:p>22</text:p>
          </table:table-cell>
          <table:table-cell table:style-name="ce8">
            <text:p>POLYNOM_INT</text:p>
          </table:table-cell>
          <table:table-cell table:style-name="ce2">
            <text:p>1.0</text:p>
          </table:table-cell>
          <table:table-cell table:style-name="ce13" office:value-type="date" office:date-value="2007-10-08">
            <text:p>08/10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29">
          <table:table-cell table:style-name="ce2">
            <text:p>22</text:p>
          </table:table-cell>
          <table:table-cell table:style-name="ce8">
            <text:p>LINEAR_INT</text:p>
          </table:table-cell>
          <table:table-cell table:style-name="ce2">
            <text:p>1.0</text:p>
          </table:table-cell>
          <table:table-cell table:style-name="ce13" office:value-type="date" office:date-value="2007-10-07">
            <text:p>07/10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0">
          <table:table-cell table:style-name="ce2">
            <text:p>22</text:p>
          </table:table-cell>
          <table:table-cell table:style-name="ce8">
            <text:p>BLIND_SECURITY</text:p>
          </table:table-cell>
          <table:table-cell table:style-name="ce2">
            <text:p>1.1</text:p>
          </table:table-cell>
          <table:table-cell table:style-name="ce13" office:value-type="date" office:date-value="2007-10-06">
            <text:p>06/10/07</text:p>
          </table:table-cell>
          <table:table-cell table:style-name="ce17">
            <text:p>Added pos and angle inputs and outputs</text:p>
            <text:p>actions are now configurable</text:p>
          </table:table-cell>
          <table:table-cell table:style-name="ce8" table:number-columns-repeated="250"/>
          <table:table-cell table:style-name="ce21"/>
        </table:table-row>
        <table:table-row table:style-name="ro30">
          <table:table-cell table:style-name="ce2">
            <text:p>22</text:p>
          </table:table-cell>
          <table:table-cell table:style-name="ce8">
            <text:p>BLIND_INPUT</text:p>
          </table:table-cell>
          <table:table-cell table:style-name="ce2">
            <text:p>1.1</text:p>
          </table:table-cell>
          <table:table-cell table:style-name="ce13" office:value-type="date" office:date-value="2007-10-06">
            <text:p>06/10/07</text:p>
          </table:table-cell>
          <table:table-cell table:style-name="ce17">
            <text:p>Renamed output ps and as to po and ao</text:p>
            <text:p>added click mode</text:p>
          </table:table-cell>
          <table:table-cell table:style-name="ce8" table:number-columns-repeated="250"/>
          <table:table-cell table:style-name="ce21"/>
        </table:table-row>
        <table:table-row table:style-name="ro31">
          <table:table-cell table:style-name="ce2">
            <text:p>22</text:p>
          </table:table-cell>
          <table:table-cell table:style-name="ce8">
            <text:p>BLIND_NIGHT</text:p>
          </table:table-cell>
          <table:table-cell table:style-name="ce2">
            <text:p>1.1</text:p>
          </table:table-cell>
          <table:table-cell table:style-name="ce13" office:value-type="date" office:date-value="2007-10-06">
            <text:p>06/10/07</text:p>
          </table:table-cell>
          <table:table-cell table:style-name="ce17">
            <text:p>added pos and angle inputs and outputs</text:p>
            <text:p>night position and angle can now be configuredany </text:p>
            <text:p>manual operation at night will cancel night operation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2">
            <text:p>22</text:p>
          </table:table-cell>
          <table:table-cell table:style-name="ce8">
            <text:p>BLIND_CONTROL</text:p>
          </table:table-cell>
          <table:table-cell table:style-name="ce2">
            <text:p>1.1</text:p>
          </table:table-cell>
          <table:table-cell table:style-name="ce13" office:value-type="date" office:date-value="2007-10-06">
            <text:p>06/10/07</text:p>
          </table:table-cell>
          <table:table-cell table:style-name="ce17">
            <text:p>Integrated blind_actuator into BLIND_CONTROL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2">
            <text:p>22</text:p>
          </table:table-cell>
          <table:table-cell table:style-name="ce8">
            <text:p>BLIND_ACTUATOR</text:p>
          </table:table-cell>
          <table:table-cell table:style-name="ce2">
            <text:p>1.1</text:p>
          </table:table-cell>
          <table:table-cell table:style-name="ce13" office:value-type="date" office:date-value="2007-10-06">
            <text:p>06/10/07</text:p>
          </table:table-cell>
          <table:table-cell table:style-name="ce17">
            <text:p>Rearranged outputs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2">
            <text:p>22</text:p>
          </table:table-cell>
          <table:table-cell table:style-name="ce8">
            <text:p>RMP_W</text:p>
          </table:table-cell>
          <table:table-cell table:style-name="ce2">
            <text:p>1.5</text:p>
          </table:table-cell>
          <table:table-cell table:style-name="ce13" office:value-type="date" office:date-value="2007-10-05">
            <text:p>05/10/07</text:p>
          </table:table-cell>
          <table:table-cell table:style-name="ce17">
            <text:p>Corrected a problem with pt = 0ms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2">
            <text:p>22</text:p>
          </table:table-cell>
          <table:table-cell table:style-name="ce8">
            <text:p>RMP_B</text:p>
          </table:table-cell>
          <table:table-cell table:style-name="ce2">
            <text:p>1.5</text:p>
          </table:table-cell>
          <table:table-cell table:style-name="ce13" office:value-type="date" office:date-value="2007-10-05">
            <text:p>05/10/07</text:p>
          </table:table-cell>
          <table:table-cell table:style-name="ce17">
            <text:p>Corrected a problem with pt = 0ms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2">
            <text:p>22</text:p>
          </table:table-cell>
          <table:table-cell table:style-name="ce8">
            <text:p>HEX_TO_DWORD</text:p>
          </table:table-cell>
          <table:table-cell table:style-name="ce2">
            <text:p>1.0</text:p>
          </table:table-cell>
          <table:table-cell table:style-name="ce13" office:value-type="date" office:date-value="2007-10-02">
            <text:p>02/10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2">
            <text:p>21</text:p>
          </table:table-cell>
          <table:table-cell table:style-name="ce8">
            <text:p>DAY_OF_DATE</text:p>
          </table:table-cell>
          <table:table-cell table:style-name="ce2">
            <text:p>1.1</text:p>
          </table:table-cell>
          <table:table-cell table:style-name="ce13" office:value-type="date" office:date-value="2007-10-01">
            <text:p>01/10/07</text:p>
          </table:table-cell>
          <table:table-cell table:style-name="ce17">
            <text:p>Added step7 compatibility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2">
            <text:p>21</text:p>
          </table:table-cell>
          <table:table-cell table:style-name="ce8">
            <text:p>MONTH</text:p>
          </table:table-cell>
          <table:table-cell table:style-name="ce2">
            <text:p>1.1</text:p>
          </table:table-cell>
          <table:table-cell table:style-name="ce13" office:value-type="date" office:date-value="2007-10-01">
            <text:p>01/10/07</text:p>
          </table:table-cell>
          <table:table-cell table:style-name="ce17">
            <text:p>New coding for much better performance, no string functions used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2">
            <text:p>21</text:p>
          </table:table-cell>
          <table:table-cell table:style-name="ce8">
            <text:p>SET_DT</text:p>
          </table:table-cell>
          <table:table-cell table:style-name="ce2">
            <text:p>1.2</text:p>
          </table:table-cell>
          <table:table-cell table:style-name="ce13" office:value-type="date" office:date-value="2007-10-01">
            <text:p>01/10/07</text:p>
          </table:table-cell>
          <table:table-cell table:style-name="ce17">
            <text:p>Added step7 compatibility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2">
            <text:p>21</text:p>
          </table:table-cell>
          <table:table-cell table:style-name="ce8">
            <text:p>SET_DATE</text:p>
          </table:table-cell>
          <table:table-cell table:style-name="ce2">
            <text:p>1.2</text:p>
          </table:table-cell>
          <table:table-cell table:style-name="ce13" office:value-type="date" office:date-value="2007-10-01">
            <text:p>01/10/07</text:p>
          </table:table-cell>
          <table:table-cell table:style-name="ce17">
            <text:p>added step7 compatibility, now call function set_date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4">
            <text:p>21</text:p>
          </table:table-cell>
          <table:table-cell table:style-name="ce8">
            <text:p>TIMER_1 </text:p>
          </table:table-cell>
          <table:table-cell table:style-name="ce2">
            <text:p>1.5</text:p>
          </table:table-cell>
          <table:table-cell table:style-name="ce13" office:value-type="date" office:date-value="2007-10-01">
            <text:p>01/10/07</text:p>
          </table:table-cell>
          <table:table-cell table:style-name="ce17">
            <text:p>Corrected a problem , timer would not generate a pulse over midnight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2">
            <text:p>21</text:p>
          </table:table-cell>
          <table:table-cell table:style-name="ce8">
            <text:p>DAY_OF_MONTH</text:p>
          </table:table-cell>
          <table:table-cell table:style-name="ce2">
            <text:p>1.2</text:p>
          </table:table-cell>
          <table:table-cell table:style-name="ce13" office:value-type="date" office:date-value="2007-10-01">
            <text:p>01/10/07</text:p>
          </table:table-cell>
          <table:table-cell table:style-name="ce17">
            <text:p>Corrected an error in algorithm.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2">
            <text:p>21</text:p>
          </table:table-cell>
          <table:table-cell table:style-name="ce8">
            <text:p>LEAP_YEAR</text:p>
          </table:table-cell>
          <table:table-cell table:style-name="ce2">
            <text:p>1.2</text:p>
          </table:table-cell>
          <table:table-cell table:style-name="ce13" office:value-type="date" office:date-value="2007-10-01">
            <text:p>01/10/07</text:p>
          </table:table-cell>
          <table:table-cell table:style-name="ce17">
            <text:p>Improved code for higher performance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2">
            <text:p>21</text:p>
          </table:table-cell>
          <table:table-cell table:style-name="ce8">
            <text:p>DAY_OF_YEAR</text:p>
          </table:table-cell>
          <table:table-cell table:style-name="ce2">
            <text:p>1.1</text:p>
          </table:table-cell>
          <table:table-cell table:style-name="ce13" office:value-type="date" office:date-value="2007-10-01">
            <text:p>01/10/07</text:p>
          </table:table-cell>
          <table:table-cell table:style-name="ce17">
            <text:p>Added compatibility to step7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2">
            <text:p>21</text:p>
          </table:table-cell>
          <table:table-cell table:style-name="ce8">
            <text:p>YEAR</text:p>
          </table:table-cell>
          <table:table-cell table:style-name="ce2">
            <text:p>1.1</text:p>
          </table:table-cell>
          <table:table-cell table:style-name="ce13" office:value-type="date" office:date-value="2007-10-01">
            <text:p>01/10/07</text:p>
          </table:table-cell>
          <table:table-cell table:style-name="ce17">
            <text:p>Corrected error and added compatibility to Step7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2">
            <text:p>21</text:p>
          </table:table-cell>
          <table:table-cell table:style-name="ce8">
            <text:p>GLOBAL CONSTANTS </text:p>
          </table:table-cell>
          <table:table-cell table:style-name="ce2"/>
          <table:table-cell table:style-name="ce13" office:value-type="date" office:date-value="2007-10-01">
            <text:p>01/10/07</text:p>
          </table:table-cell>
          <table:table-cell table:style-name="ce17">
            <text:p>Added Setup Parameter STEP7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2">
            <text:p>21</text:p>
          </table:table-cell>
          <table:table-cell table:style-name="ce8">
            <text:p>BLIND_NIGHT</text:p>
          </table:table-cell>
          <table:table-cell table:style-name="ce2">
            <text:p>1.0</text:p>
          </table:table-cell>
          <table:table-cell table:style-name="ce13" office:value-type="date" office:date-value="2007-09-30">
            <text:p>30/09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2">
            <text:p>21</text:p>
          </table:table-cell>
          <table:table-cell table:style-name="ce8">
            <text:p>BLIND_SHADER</text:p>
          </table:table-cell>
          <table:table-cell table:style-name="ce2">
            <text:p>1.0</text:p>
          </table:table-cell>
          <table:table-cell table:style-name="ce13" office:value-type="date" office:date-value="2007-09-30">
            <text:p>30/09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2">
            <text:p>21</text:p>
          </table:table-cell>
          <table:table-cell table:style-name="ce8">
            <text:p>BLIND_INPUT</text:p>
          </table:table-cell>
          <table:table-cell table:style-name="ce2">
            <text:p>1.0</text:p>
          </table:table-cell>
          <table:table-cell table:style-name="ce13" office:value-type="date" office:date-value="2007-09-29">
            <text:p>29/09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2">
            <text:p>21</text:p>
          </table:table-cell>
          <table:table-cell table:style-name="ce8">
            <text:p>BLIND_CONTROL</text:p>
          </table:table-cell>
          <table:table-cell table:style-name="ce2">
            <text:p>1.0</text:p>
          </table:table-cell>
          <table:table-cell table:style-name="ce13" office:value-type="date" office:date-value="2007-09-29">
            <text:p>29/09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2">
            <text:p>21</text:p>
          </table:table-cell>
          <table:table-cell table:style-name="ce8">
            <text:p>BLIND_SECURITY</text:p>
          </table:table-cell>
          <table:table-cell table:style-name="ce2">
            <text:p>1.0</text:p>
          </table:table-cell>
          <table:table-cell table:style-name="ce13" office:value-type="date" office:date-value="2007-09-29">
            <text:p>29/09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2">
            <text:p>21</text:p>
          </table:table-cell>
          <table:table-cell table:style-name="ce9">
            <text:p>BLIND_ACTUATOR</text:p>
          </table:table-cell>
          <table:table-cell table:style-name="ce2">
            <text:p>1.0</text:p>
          </table:table-cell>
          <table:table-cell table:style-name="ce13" office:value-type="date" office:date-value="2007-09-29">
            <text:p>29/09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2">
          <table:table-cell table:style-name="ce2">
            <text:p>21</text:p>
          </table:table-cell>
          <table:table-cell table:style-name="ce8">
            <text:p>INTERLOCK</text:p>
          </table:table-cell>
          <table:table-cell table:style-name="ce2">
            <text:p>1.0</text:p>
          </table:table-cell>
          <table:table-cell table:style-name="ce13" office:value-type="date" office:date-value="2007-09-28">
            <text:p>28/09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3">
          <table:table-cell table:style-name="ce2">
            <text:p>21</text:p>
          </table:table-cell>
          <table:table-cell table:style-name="ce8">
            <text:p>RMP_W</text:p>
          </table:table-cell>
          <table:table-cell table:style-name="ce2">
            <text:p>1.4</text:p>
          </table:table-cell>
          <table:table-cell table:style-name="ce13" office:value-type="date" office:date-value="2007-09-28">
            <text:p>28/09/07</text:p>
          </table:table-cell>
          <table:table-cell table:style-name="ce17">
            <text:p>Added output high and low, coorected error while Busy was displayed when en was false</text:p>
            <text:p>inprooved performance and timing accuracy</text:p>
            <text:p>added init statements to avoid wrong startup conditions</text:p>
          </table:table-cell>
          <table:table-cell table:style-name="ce8" table:number-columns-repeated="250"/>
          <table:table-cell table:style-name="ce21"/>
        </table:table-row>
        <table:table-row table:style-name="ro33">
          <table:table-cell table:style-name="ce2">
            <text:p>21</text:p>
          </table:table-cell>
          <table:table-cell table:style-name="ce8">
            <text:p>RMP_B</text:p>
          </table:table-cell>
          <table:table-cell table:style-name="ce2">
            <text:p>1.4</text:p>
          </table:table-cell>
          <table:table-cell table:style-name="ce13" office:value-type="date" office:date-value="2007-09-28">
            <text:p>28/09/07</text:p>
          </table:table-cell>
          <table:table-cell table:style-name="ce17">
            <text:p>Added output high and low, coorected error while Busy was displayed when en was false</text:p>
            <text:p>inprooved performance and timing accuracy</text:p>
            <text:p>added init statements to avoid wrong startup conditions</text:p>
          </table:table-cell>
          <table:table-cell table:style-name="ce8" table:number-columns-repeated="250"/>
          <table:table-cell table:style-name="ce21"/>
        </table:table-row>
        <table:table-row table:style-name="ro34">
          <table:table-cell table:style-name="ce2">
            <text:p>21</text:p>
          </table:table-cell>
          <table:table-cell table:style-name="ce8">
            <text:p>_ARRAY_MEDIAN</text:p>
          </table:table-cell>
          <table:table-cell table:style-name="ce2">
            <text:p>1.2</text:p>
          </table:table-cell>
          <table:table-cell table:style-name="ce13" office:value-type="date" office:date-value="2007-09-22">
            <text:p>22/09/07</text:p>
          </table:table-cell>
          <table:table-cell table:style-name="ce17">
            <text:p>chagned code to use array_sort</text:p>
            <text:p>Improved performance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1</text:p>
          </table:table-cell>
          <table:table-cell table:style-name="ce8">
            <text:p>_ARRAY_SORT</text:p>
          </table:table-cell>
          <table:table-cell table:style-name="ce2">
            <text:p>1.2</text:p>
          </table:table-cell>
          <table:table-cell table:style-name="ce13" office:value-type="date" office:date-value="2007-09-22">
            <text:p>22/09/07</text:p>
          </table:table-cell>
          <table:table-cell table:style-name="ce17">
            <text:p>new algorithm for better performance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1</text:p>
          </table:table-cell>
          <table:table-cell table:style-name="ce8">
            <text:p>PERIOD</text:p>
          </table:table-cell>
          <table:table-cell table:style-name="ce2">
            <text:p>1.1</text:p>
          </table:table-cell>
          <table:table-cell table:style-name="ce13" office:value-type="date" office:date-value="2007-09-20">
            <text:p>20/09/07</text:p>
          </table:table-cell>
          <table:table-cell table:style-name="ce17">
            <text:p>corrected a problem with leap year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SET_DT</text:p>
          </table:table-cell>
          <table:table-cell table:style-name="ce2">
            <text:p>1.1</text:p>
          </table:table-cell>
          <table:table-cell table:style-name="ce13" office:value-type="date" office:date-value="2007-09-19">
            <text:p>19/09/07</text:p>
          </table:table-cell>
          <table:table-cell table:style-name="ce17">
            <text:p>Corrected leap year calculation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SET_DATE</text:p>
          </table:table-cell>
          <table:table-cell table:style-name="ce2">
            <text:p>1.1</text:p>
          </table:table-cell>
          <table:table-cell table:style-name="ce13" office:value-type="date" office:date-value="2007-09-19">
            <text:p>19/09/07</text:p>
          </table:table-cell>
          <table:table-cell table:style-name="ce17">
            <text:p>Corrected leap year calculation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PERIOD</text:p>
          </table:table-cell>
          <table:table-cell table:style-name="ce2">
            <text:p>1.0</text:p>
          </table:table-cell>
          <table:table-cell table:style-name="ce13" office:value-type="date" office:date-value="2007-09-19">
            <text:p>19/09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DCF77</text:p>
          </table:table-cell>
          <table:table-cell table:style-name="ce2">
            <text:p>1.3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ESR_MON_X8</text:p>
          </table:table-cell>
          <table:table-cell table:style-name="ce2">
            <text:p>1.1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ESR_MON_R4</text:p>
          </table:table-cell>
          <table:table-cell table:style-name="ce2">
            <text:p>1.1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ESR_MON_B8</text:p>
          </table:table-cell>
          <table:table-cell table:style-name="ce2">
            <text:p>1.1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FT_RMP</text:p>
          </table:table-cell>
          <table:table-cell table:style-name="ce2">
            <text:p>1.3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TP_R</text:p>
          </table:table-cell>
          <table:table-cell table:style-name="ce2">
            <text:p>1.1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SEQUENCE_8</text:p>
          </table:table-cell>
          <table:table-cell table:style-name="ce2">
            <text:p>1.4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SEQUENCE_4</text:p>
          </table:table-cell>
          <table:table-cell table:style-name="ce2">
            <text:p>1.4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GEN_SQ</text:p>
          </table:table-cell>
          <table:table-cell table:style-name="ce2">
            <text:p>1.1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CLK_PULSE</text:p>
          </table:table-cell>
          <table:table-cell table:style-name="ce2">
            <text:p>1.1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CLK_PRG</text:p>
          </table:table-cell>
          <table:table-cell table:style-name="ce2">
            <text:p>1.2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CLK_8MS</text:p>
          </table:table-cell>
          <table:table-cell table:style-name="ce2">
            <text:p>1.1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CLK_4MS</text:p>
          </table:table-cell>
          <table:table-cell table:style-name="ce2">
            <text:p>1.1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CLK_2MS</text:p>
          </table:table-cell>
          <table:table-cell table:style-name="ce2">
            <text:p>1.1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CLK_1MS</text:p>
          </table:table-cell>
          <table:table-cell table:style-name="ce2">
            <text:p>1.1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SH_2</text:p>
          </table:table-cell>
          <table:table-cell table:style-name="ce2">
            <text:p>1.3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SH_1</text:p>
          </table:table-cell>
          <table:table-cell table:style-name="ce2">
            <text:p>1.2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RMP_W</text:p>
          </table:table-cell>
          <table:table-cell table:style-name="ce2">
            <text:p>1.3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RMP_SOFT</text:p>
          </table:table-cell>
          <table:table-cell table:style-name="ce2">
            <text:p>1.2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RMP_B</text:p>
          </table:table-cell>
          <table:table-cell table:style-name="ce2">
            <text:p>1.3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GEN_SQ</text:p>
          </table:table-cell>
          <table:table-cell table:style-name="ce2">
            <text:p>1.2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GEN_SIN</text:p>
          </table:table-cell>
          <table:table-cell table:style-name="ce2">
            <text:p>1.1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GEN_RMP</text:p>
          </table:table-cell>
          <table:table-cell table:style-name="ce2">
            <text:p>1.1</text:p>
          </table:table-cell>
          <table:table-cell table:style-name="ce13" office:value-type="date" office:date-value="2007-09-17">
            <text:p>17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DAYS_DELTA</text:p>
          </table:table-cell>
          <table:table-cell table:style-name="ce2">
            <text:p>1.1</text:p>
          </table:table-cell>
          <table:table-cell table:style-name="ce13" office:value-type="date" office:date-value="2007-09-16">
            <text:p>16/09/07</text:p>
          </table:table-cell>
          <table:table-cell table:style-name="ce17">
            <text:p>Corrected an error in algorithm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5" office:value-type="float" office:value="20">
            <text:p>20</text:p>
          </table:table-cell>
          <table:table-cell table:style-name="Default">
            <text:p>DAY_OF_DATE</text:p>
          </table:table-cell>
          <table:table-cell table:style-name="ce2">
            <text:p>1.0</text:p>
          </table:table-cell>
          <table:table-cell table:style-name="ce13" office:value-type="date" office:date-value="2007-09-16">
            <text:p>16/09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METER_STAT</text:p>
          </table:table-cell>
          <table:table-cell table:style-name="ce2">
            <text:p>1.0</text:p>
          </table:table-cell>
          <table:table-cell table:style-name="ce13" office:value-type="date" office:date-value="2007-09-16">
            <text:p>16/09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METER</text:p>
          </table:table-cell>
          <table:table-cell table:style-name="ce2">
            <text:p>1.0</text:p>
          </table:table-cell>
          <table:table-cell table:style-name="ce13" office:value-type="date" office:date-value="2007-09-16">
            <text:p>16/09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GEN_RDM</text:p>
          </table:table-cell>
          <table:table-cell table:style-name="ce2">
            <text:p>1.1</text:p>
          </table:table-cell>
          <table:table-cell table:style-name="ce13" office:value-type="date" office:date-value="2007-09-16">
            <text:p>16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ONTIME</text:p>
          </table:table-cell>
          <table:table-cell table:style-name="ce2">
            <text:p>1.3</text:p>
          </table:table-cell>
          <table:table-cell table:style-name="ce13" office:value-type="date" office:date-value="2007-09-16">
            <text:p>16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M_TX</text:p>
          </table:table-cell>
          <table:table-cell table:style-name="ce2">
            <text:p>1.2</text:p>
          </table:table-cell>
          <table:table-cell table:style-name="ce13" office:value-type="date" office:date-value="2007-09-16">
            <text:p>16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M_T</text:p>
          </table:table-cell>
          <table:table-cell table:style-name="ce2">
            <text:p>1.2</text:p>
          </table:table-cell>
          <table:table-cell table:style-name="ce13" office:value-type="date" office:date-value="2007-09-16">
            <text:p>16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M_D</text:p>
          </table:table-cell>
          <table:table-cell table:style-name="ce2">
            <text:p>1.1</text:p>
          </table:table-cell>
          <table:table-cell table:style-name="ce13" office:value-type="date" office:date-value="2007-09-16">
            <text:p>16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FT_TN64</text:p>
          </table:table-cell>
          <table:table-cell table:style-name="ce2">
            <text:p>1.1</text:p>
          </table:table-cell>
          <table:table-cell table:style-name="ce13" office:value-type="date" office:date-value="2007-09-16">
            <text:p>16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FT_TN16</text:p>
          </table:table-cell>
          <table:table-cell table:style-name="ce2">
            <text:p>1.1</text:p>
          </table:table-cell>
          <table:table-cell table:style-name="ce13" office:value-type="date" office:date-value="2007-09-16">
            <text:p>16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FT_PT2</text:p>
          </table:table-cell>
          <table:table-cell table:style-name="ce2">
            <text:p>1.2</text:p>
          </table:table-cell>
          <table:table-cell table:style-name="ce13" office:value-type="date" office:date-value="2007-09-16">
            <text:p>16/09/07</text:p>
          </table:table-cell>
          <table:table-cell table:style-name="ce17">
            <text:p>Deleted unused code section for system time reading and unnecessary startup code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FT_PT1</text:p>
          </table:table-cell>
          <table:table-cell table:style-name="ce2">
            <text:p>1.4</text:p>
          </table:table-cell>
          <table:table-cell table:style-name="ce13" office:value-type="date" office:date-value="2007-09-16">
            <text:p>16/09/07</text:p>
          </table:table-cell>
          <table:table-cell table:style-name="ce17">
            <text:p>Replaced Time() with T_PLC_US for compatibility and better internal resolution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CYCLE_TIME</text:p>
          </table:table-cell>
          <table:table-cell table:style-name="ce2">
            <text:p>1.2</text:p>
          </table:table-cell>
          <table:table-cell table:style-name="ce13" office:value-type="date" office:date-value="2007-09-16">
            <text:p>16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FT_INT</text:p>
          </table:table-cell>
          <table:table-cell table:style-name="ce2">
            <text:p>1.3</text:p>
          </table:table-cell>
          <table:table-cell table:style-name="ce13" office:value-type="date" office:date-value="2007-09-15">
            <text:p>15/09/07</text:p>
          </table:table-cell>
          <table:table-cell table:style-name="ce17">
            <text:p>Replaced Time() with T_PLC_US for compatibility and better internal resolution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FT_DERIV</text:p>
          </table:table-cell>
          <table:table-cell table:style-name="ce2">
            <text:p>1.2</text:p>
          </table:table-cell>
          <table:table-cell table:style-name="ce13" office:value-type="date" office:date-value="2007-09-15">
            <text:p>15/09/07</text:p>
          </table:table-cell>
          <table:table-cell table:style-name="ce17">
            <text:p>Replaced Time() with T_PLC_US for compatibility and better internal resolution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FT_PROFILE </text:p>
          </table:table-cell>
          <table:table-cell table:style-name="ce2">
            <text:p>1.1</text:p>
          </table:table-cell>
          <table:table-cell table:style-name="ce13" office:value-type="date" office:date-value="2007-09-15">
            <text:p>15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TEMP_EXT</text:p>
          </table:table-cell>
          <table:table-cell table:style-name="ce2">
            <text:p>1.1</text:p>
          </table:table-cell>
          <table:table-cell table:style-name="ce13" office:value-type="date" office:date-value="2007-09-15">
            <text:p>15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TIMER_2</text:p>
          </table:table-cell>
          <table:table-cell table:style-name="ce2">
            <text:p>1.2</text:p>
          </table:table-cell>
          <table:table-cell table:style-name="ce13" office:value-type="date" office:date-value="2007-09-15">
            <text:p>15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TIMER_1 </text:p>
          </table:table-cell>
          <table:table-cell table:style-name="ce2">
            <text:p>1.4</text:p>
          </table:table-cell>
          <table:table-cell table:style-name="ce13" office:value-type="date" office:date-value="2007-09-15">
            <text:p>15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SWITCH_I</text:p>
          </table:table-cell>
          <table:table-cell table:style-name="ce2">
            <text:p>1.1</text:p>
          </table:table-cell>
          <table:table-cell table:style-name="ce13" office:value-type="date" office:date-value="2007-09-15">
            <text:p>15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PULSE_LENGTH</text:p>
          </table:table-cell>
          <table:table-cell table:style-name="ce2">
            <text:p>1.1</text:p>
          </table:table-cell>
          <table:table-cell table:style-name="ce13" office:value-type="date" office:date-value="2007-09-15">
            <text:p>15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DIMM_I </text:p>
          </table:table-cell>
          <table:table-cell table:style-name="ce2">
            <text:p>1.3</text:p>
          </table:table-cell>
          <table:table-cell table:style-name="ce13" office:value-type="date" office:date-value="2007-09-15">
            <text:p>15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CLICK </text:p>
          </table:table-cell>
          <table:table-cell table:style-name="ce2">
            <text:p>1.2</text:p>
          </table:table-cell>
          <table:table-cell table:style-name="ce13" office:value-type="date" office:date-value="2007-09-15">
            <text:p>15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ACTUATOR_UD</text:p>
          </table:table-cell>
          <table:table-cell table:style-name="ce2">
            <text:p>1.2</text:p>
          </table:table-cell>
          <table:table-cell table:style-name="ce13" office:value-type="date" office:date-value="2007-09-15">
            <text:p>15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ACTUATOR_PUMP</text:p>
          </table:table-cell>
          <table:table-cell table:style-name="ce2">
            <text:p>1.2</text:p>
          </table:table-cell>
          <table:table-cell table:style-name="ce13" office:value-type="date" office:date-value="2007-09-15">
            <text:p>15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ACTUATOR_3P</text:p>
          </table:table-cell>
          <table:table-cell table:style-name="ce2">
            <text:p>1.3</text:p>
          </table:table-cell>
          <table:table-cell table:style-name="ce13" office:value-type="date" office:date-value="2007-09-15">
            <text:p>15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ACTUATOR_2P</text:p>
          </table:table-cell>
          <table:table-cell table:style-name="ce2">
            <text:p>1.3</text:p>
          </table:table-cell>
          <table:table-cell table:style-name="ce13" office:value-type="date" office:date-value="2007-09-15">
            <text:p>15/09/07</text:p>
          </table:table-cell>
          <table:table-cell table:style-name="ce17">
            <text:p>Replaced Time() with T_PLC_MS for compatibility and performance reasons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SHL1</text:p>
          </table:table-cell>
          <table:table-cell table:style-name="ce2">
            <text:p>1.0</text:p>
          </table:table-cell>
          <table:table-cell table:style-name="ce13" office:value-type="date" office:date-value="2007-09-14">
            <text:p>14/09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SHR1</text:p>
          </table:table-cell>
          <table:table-cell table:style-name="ce2">
            <text:p>1.0</text:p>
          </table:table-cell>
          <table:table-cell table:style-name="ce13" office:value-type="date" office:date-value="2007-09-14">
            <text:p>14/09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TOGGLE</text:p>
          </table:table-cell>
          <table:table-cell table:style-name="ce2">
            <text:p>1.0</text:p>
          </table:table-cell>
          <table:table-cell table:style-name="ce13" office:value-type="date" office:date-value="2007-09-13">
            <text:p>13/09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T_PLC_US</text:p>
          </table:table-cell>
          <table:table-cell table:style-name="ce2">
            <text:p>1.0</text:p>
          </table:table-cell>
          <table:table-cell table:style-name="ce13" office:value-type="date" office:date-value="2007-09-14">
            <text:p>14/09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T_PLC_MS</text:p>
          </table:table-cell>
          <table:table-cell table:style-name="ce2">
            <text:p>1.0</text:p>
          </table:table-cell>
          <table:table-cell table:style-name="ce13" office:value-type="date" office:date-value="2007-09-14">
            <text:p>14/09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AOUT</text:p>
          </table:table-cell>
          <table:table-cell table:style-name="ce2">
            <text:p>1.2</text:p>
          </table:table-cell>
          <table:table-cell table:style-name="ce13" office:value-type="date" office:date-value="2007-09-13">
            <text:p>13/09/07</text:p>
          </table:table-cell>
          <table:table-cell table:style-name="ce17">
            <text:p>changed code to avoid warning under codesys 2.3.8.1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AIN</text:p>
          </table:table-cell>
          <table:table-cell table:style-name="ce2">
            <text:p>1.3</text:p>
          </table:table-cell>
          <table:table-cell table:style-name="ce13" office:value-type="date" office:date-value="2007-09-13">
            <text:p>13/09/07</text:p>
          </table:table-cell>
          <table:table-cell table:style-name="ce17">
            <text:p>changed code to avoid warning under codesys 2.3.8.1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RES_NI</text:p>
          </table:table-cell>
          <table:table-cell table:style-name="ce2">
            <text:p>1.1</text:p>
          </table:table-cell>
          <table:table-cell table:style-name="ce13" office:value-type="date" office:date-value="2007-09-13">
            <text:p>13/09/07</text:p>
          </table:table-cell>
          <table:table-cell table:style-name="ce17">
            <text:p>Changed coding for better performance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DEW_TEMP</text:p>
          </table:table-cell>
          <table:table-cell table:style-name="ce2">
            <text:p>1.2</text:p>
          </table:table-cell>
          <table:table-cell table:style-name="ce13" office:value-type="date" office:date-value="2007-09-13">
            <text:p>13/09/07</text:p>
          </table:table-cell>
          <table:table-cell table:style-name="ce19">
            <text:p>Changed algorithm to improove performance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DEW_CON</text:p>
          </table:table-cell>
          <table:table-cell table:style-name="ce2">
            <text:p>1.1</text:p>
          </table:table-cell>
          <table:table-cell table:style-name="ce13" office:value-type="date" office:date-value="2007-09-13">
            <text:p>13/09/07</text:p>
          </table:table-cell>
          <table:table-cell table:style-name="ce19">
            <text:p>Changed algorithm to improove performance</text:p>
          </table:table-cell>
          <table:table-cell table:style-name="ce8" table:number-columns-repeated="250"/>
          <table:table-cell table:style-name="ce21"/>
        </table:table-row>
        <table:table-row table:style-name="ro35">
          <table:table-cell table:style-name="ce2">
            <text:p>20</text:p>
          </table:table-cell>
          <table:table-cell table:style-name="ce8">
            <text:p>WATER_DENSITY</text:p>
          </table:table-cell>
          <table:table-cell table:style-name="ce2">
            <text:p>1.0</text:p>
          </table:table-cell>
          <table:table-cell table:style-name="ce13" office:value-type="date" office:date-value="2007-09-13">
            <text:p>13/09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6">
          <table:table-cell table:style-name="ce2">
            <text:p>20</text:p>
          </table:table-cell>
          <table:table-cell table:style-name="ce8">
            <text:p>DWORD_TO_STRH</text:p>
          </table:table-cell>
          <table:table-cell table:style-name="ce2">
            <text:p>1.1</text:p>
          </table:table-cell>
          <table:table-cell table:style-name="ce13" office:value-type="date" office:date-value="2007-09-11">
            <text:p>11/09/07</text:p>
          </table:table-cell>
          <table:table-cell table:style-name="ce17">
            <text:p>changed coding for compatibility with twincat, under twincat concat cannot have a function as argument.</text:p>
          </table:table-cell>
          <table:table-cell table:style-name="ce8" table:number-columns-repeated="250"/>
          <table:table-cell table:style-name="ce21"/>
        </table:table-row>
        <table:table-row table:style-name="ro36">
          <table:table-cell table:style-name="ce2">
            <text:p>20</text:p>
          </table:table-cell>
          <table:table-cell table:style-name="ce8">
            <text:p>BYTE_TO_STRH </text:p>
          </table:table-cell>
          <table:table-cell table:style-name="ce2">
            <text:p>1.1</text:p>
          </table:table-cell>
          <table:table-cell table:style-name="ce13" office:value-type="date" office:date-value="2007-09-11">
            <text:p>11/09/07</text:p>
          </table:table-cell>
          <table:table-cell table:style-name="ce17">
            <text:p>changed coding for compatibility with twincat, under twincat concat cannot have a function as argument.</text:p>
          </table:table-cell>
          <table:table-cell table:style-name="ce8" table:number-columns-repeated="250"/>
          <table:table-cell table:style-name="ce21"/>
        </table:table-row>
        <table:table-row table:style-name="ro37">
          <table:table-cell table:style-name="ce2">
            <text:p>20</text:p>
          </table:table-cell>
          <table:table-cell table:style-name="ce8">
            <text:p>SET_TOD</text:p>
          </table:table-cell>
          <table:table-cell table:style-name="ce2">
            <text:p>1.1</text:p>
          </table:table-cell>
          <table:table-cell table:style-name="ce13" office:value-type="date" office:date-value="2007-09-11">
            <text:p>11/09/07</text:p>
          </table:table-cell>
          <table:table-cell table:style-name="ce17">
            <text:p>changed coding to avoid a compiler warning under twincat.</text:p>
          </table:table-cell>
          <table:table-cell table:style-name="ce8" table:number-columns-repeated="250"/>
          <table:table-cell table:style-name="ce21"/>
        </table:table-row>
        <table:table-row table:style-name="ro37">
          <table:table-cell table:style-name="ce2">
            <text:p>20</text:p>
          </table:table-cell>
          <table:table-cell table:style-name="ce8">
            <text:p>MATRIX</text:p>
          </table:table-cell>
          <table:table-cell table:style-name="ce2">
            <text:p>1.1</text:p>
          </table:table-cell>
          <table:table-cell table:style-name="ce13" office:value-type="date" office:date-value="2007-09-11">
            <text:p>11/09/07</text:p>
          </table:table-cell>
          <table:table-cell table:style-name="ce17">
            <text:p>deleted unused variables k and old_code</text:p>
          </table:table-cell>
          <table:table-cell table:style-name="ce8" table:number-columns-repeated="250"/>
          <table:table-cell table:style-name="ce21"/>
        </table:table-row>
        <table:table-row table:style-name="ro37">
          <table:table-cell table:style-name="ce2">
            <text:p>20</text:p>
          </table:table-cell>
          <table:table-cell table:style-name="ce8">
            <text:p>CRC_GEN</text:p>
          </table:table-cell>
          <table:table-cell table:style-name="ce2">
            <text:p>1.1</text:p>
          </table:table-cell>
          <table:table-cell table:style-name="ce13" office:value-type="date" office:date-value="2007-09-11">
            <text:p>11/09/07</text:p>
          </table:table-cell>
          <table:table-cell table:style-name="ce17">
            <text:p>Deleted unused variable i</text:p>
          </table:table-cell>
          <table:table-cell table:style-name="ce8" table:number-columns-repeated="250"/>
          <table:table-cell table:style-name="ce21"/>
        </table:table-row>
        <table:table-row table:style-name="ro37">
          <table:table-cell table:style-name="ce2">
            <text:p>20</text:p>
          </table:table-cell>
          <table:table-cell table:style-name="ce8">
            <text:p>CHECK_PARITY</text:p>
          </table:table-cell>
          <table:table-cell table:style-name="ce2">
            <text:p>1.1</text:p>
          </table:table-cell>
          <table:table-cell table:style-name="ce13" office:value-type="date" office:date-value="2007-09-10">
            <text:p>10/09/07</text:p>
          </table:table-cell>
          <table:table-cell table:style-name="ce17">
            <text:p>Changed algorithm to improove performance</text:p>
          </table:table-cell>
          <table:table-cell table:style-name="ce8" table:number-columns-repeated="250"/>
          <table:table-cell table:style-name="ce21"/>
        </table:table-row>
        <table:table-row table:style-name="ro37">
          <table:table-cell table:style-name="ce2">
            <text:p>20</text:p>
          </table:table-cell>
          <table:table-cell table:style-name="ce8">
            <text:p>PARITY</text:p>
          </table:table-cell>
          <table:table-cell table:style-name="ce2">
            <text:p>1.1</text:p>
          </table:table-cell>
          <table:table-cell table:style-name="ce13" office:value-type="date" office:date-value="2007-09-10">
            <text:p>10/09/07</text:p>
          </table:table-cell>
          <table:table-cell table:style-name="ce17">
            <text:p>Changed algorithm to improove performance</text:p>
          </table:table-cell>
          <table:table-cell table:style-name="ce8" table:number-columns-repeated="250"/>
          <table:table-cell table:style-name="ce21"/>
        </table:table-row>
        <table:table-row table:style-name="ro38">
          <table:table-cell table:style-name="ce2">
            <text:p>20</text:p>
          </table:table-cell>
          <table:table-cell table:style-name="ce8">
            <text:p>TEMP_SII</text:p>
          </table:table-cell>
          <table:table-cell table:style-name="ce2">
            <text:p>1.2</text:p>
          </table:table-cell>
          <table:table-cell table:style-name="ce13" office:value-type="date" office:date-value="2007-09-10">
            <text:p>10/09/07</text:p>
          </table:table-cell>
          <table:table-cell table:style-name="ce17">
            <text:p>Reduced accuracy to 0.01 degreed to shorten execution time</text:p>
            <text:p>and corrected an error in formula</text:p>
          </table:table-cell>
          <table:table-cell table:style-name="ce8" table:number-columns-repeated="250"/>
          <table:table-cell table:style-name="ce21"/>
        </table:table-row>
        <table:table-row table:style-name="ro39">
          <table:table-cell table:style-name="ce2">
            <text:p>20</text:p>
          </table:table-cell>
          <table:table-cell table:style-name="ce8">
            <text:p>TEMP_PT</text:p>
          </table:table-cell>
          <table:table-cell table:style-name="ce2">
            <text:p>1.2</text:p>
          </table:table-cell>
          <table:table-cell table:style-name="ce13" office:value-type="date" office:date-value="2007-09-10">
            <text:p>10/09/07</text:p>
          </table:table-cell>
          <table:table-cell table:style-name="ce17">
            <text:p>Reduced accuracy to 0.01 degreed to shorten execution time</text:p>
          </table:table-cell>
          <table:table-cell table:style-name="ce8" table:number-columns-repeated="250"/>
          <table:table-cell table:style-name="ce21"/>
        </table:table-row>
        <table:table-row table:style-name="ro39">
          <table:table-cell table:style-name="ce3">
            <text:p>20</text:p>
          </table:table-cell>
          <table:table-cell table:style-name="ce8">
            <text:p>TEMP_NI</text:p>
          </table:table-cell>
          <table:table-cell table:style-name="ce3">
            <text:p>1.2</text:p>
          </table:table-cell>
          <table:table-cell table:style-name="ce13" office:value-type="date" office:date-value="2007-09-10">
            <text:p>10/09/07</text:p>
          </table:table-cell>
          <table:table-cell table:style-name="ce17">
            <text:p>Reduced accuracy to 0.01 degreed to shorten execution time</text:p>
          </table:table-cell>
          <table:table-cell table:style-name="ce8" table:number-columns-repeated="250"/>
          <table:table-cell table:style-name="ce21"/>
        </table:table-row>
        <table:table-row table:style-name="ro39">
          <table:table-cell table:style-name="ce2">
            <text:p>20</text:p>
          </table:table-cell>
          <table:table-cell table:style-name="ce8">
            <text:p>BIT_COUNT</text:p>
          </table:table-cell>
          <table:table-cell table:style-name="ce2">
            <text:p>1.1</text:p>
          </table:table-cell>
          <table:table-cell table:style-name="ce13" office:value-type="date" office:date-value="2007-09-10">
            <text:p>10/09/07</text:p>
          </table:table-cell>
          <table:table-cell table:style-name="ce17">
            <text:p>Improved performace</text:p>
          </table:table-cell>
          <table:table-cell table:style-name="ce8" table:number-columns-repeated="250"/>
          <table:table-cell table:style-name="ce21"/>
        </table:table-row>
        <table:table-row table:style-name="ro39">
          <table:table-cell table:style-name="ce2">
            <text:p>20</text:p>
          </table:table-cell>
          <table:table-cell table:style-name="ce8">
            <text:p>SH_2</text:p>
          </table:table-cell>
          <table:table-cell table:style-name="ce2">
            <text:p>1.2</text:p>
          </table:table-cell>
          <table:table-cell table:style-name="ce13" office:value-type="date" office:date-value="2007-09-10">
            <text:p>10/09/07</text:p>
          </table:table-cell>
          <table:table-cell table:style-name="ce17">
            <text:p>Corrected an error while index would be out of array if N = 0;</text:p>
          </table:table-cell>
          <table:table-cell table:style-name="ce8" table:number-columns-repeated="250"/>
          <table:table-cell table:style-name="ce21"/>
        </table:table-row>
        <table:table-row table:style-name="ro39">
          <table:table-cell table:style-name="ce2">
            <text:p>20</text:p>
          </table:table-cell>
          <table:table-cell table:style-name="ce8">
            <text:p>D_TRIG</text:p>
          </table:table-cell>
          <table:table-cell table:style-name="ce2">
            <text:p>1.0</text:p>
          </table:table-cell>
          <table:table-cell table:style-name="ce13" office:value-type="date" office:date-value="2007-09-04">
            <text:p>04/09/07</text:p>
          </table:table-cell>
          <table:table-cell table:style-name="ce17">
            <text:p>New Module</text:p>
          </table:table-cell>
          <table:table-cell table:style-name="ce8" table:number-columns-repeated="250"/>
          <table:table-cell table:style-name="ce21"/>
        </table:table-row>
        <table:table-row table:style-name="ro39">
          <table:table-cell table:style-name="ce2">
            <text:p>18</text:p>
          </table:table-cell>
          <table:table-cell table:style-name="ce8">
            <text:p>ONTIME</text:p>
          </table:table-cell>
          <table:table-cell table:style-name="ce2">
            <text:p>1.2</text:p>
          </table:table-cell>
          <table:table-cell table:style-name="ce13" office:value-type="date" office:date-value="2007-08-02">
            <text:p>02/08/07</text:p>
          </table:table-cell>
          <table:table-cell table:style-name="ce17">
            <text:p>Corrected an error while ontime would stop counting time after a certain time is reached</text:p>
          </table:table-cell>
          <table:table-cell table:style-name="ce8" table:number-columns-repeated="250"/>
          <table:table-cell table:style-name="ce21"/>
        </table:table-row>
        <table:table-row table:style-name="ro39">
          <table:table-cell>
            <text:p>17</text:p>
          </table:table-cell>
          <table:table-cell>
            <text:p>LTIME_TO_UTC</text:p>
          </table:table-cell>
          <table:table-cell>
            <text:p>1.0</text:p>
          </table:table-cell>
          <table:table-cell table:style-name="ce13" office:value-type="date" office:date-value="2007-07-05">
            <text:p>05/07/07</text:p>
          </table:table-cell>
          <table:table-cell>
            <text:p>New Module</text:p>
          </table:table-cell>
          <table:table-cell table:style-name="ce7" table:number-columns-repeated="250"/>
          <table:table-cell/>
        </table:table-row>
        <table:table-row table:style-name="ro39">
          <table:table-cell>
            <text:p>17</text:p>
          </table:table-cell>
          <table:table-cell>
            <text:p>BIT_COUNT</text:p>
          </table:table-cell>
          <table:table-cell>
            <text:p>1.0</text:p>
          </table:table-cell>
          <table:table-cell table:style-name="ce13" office:value-type="date" office:date-value="2007-07-05">
            <text:p>05/07/07</text:p>
          </table:table-cell>
          <table:table-cell>
            <text:p>New Module</text:p>
          </table:table-cell>
          <table:table-cell table:style-name="ce7" table:number-columns-repeated="250"/>
          <table:table-cell/>
        </table:table-row>
        <table:table-row table:style-name="ro39">
          <table:table-cell>
            <text:p>17</text:p>
          </table:table-cell>
          <table:table-cell>
            <text:p>MATRIX</text:p>
          </table:table-cell>
          <table:table-cell>
            <text:p>1.0</text:p>
          </table:table-cell>
          <table:table-cell table:style-name="ce13" office:value-type="date" office:date-value="2007-06-10">
            <text:p>10/06/07</text:p>
          </table:table-cell>
          <table:table-cell>
            <text:p>New Module</text:p>
          </table:table-cell>
          <table:table-cell table:style-name="ce7" table:number-columns-repeated="250"/>
          <table:table-cell/>
        </table:table-row>
        <table:table-row table:style-name="ro39">
          <table:table-cell>
            <text:p>17</text:p>
          </table:table-cell>
          <table:table-cell>
            <text:p>CRC_CHECK</text:p>
          </table:table-cell>
          <table:table-cell>
            <text:p>1.0</text:p>
          </table:table-cell>
          <table:table-cell table:style-name="ce13" office:value-type="date" office:date-value="2007-06-09">
            <text:p>09/06/07</text:p>
          </table:table-cell>
          <table:table-cell>
            <text:p>New Module</text:p>
          </table:table-cell>
          <table:table-cell table:style-name="ce7" table:number-columns-repeated="250"/>
          <table:table-cell/>
        </table:table-row>
        <table:table-row table:style-name="ro39">
          <table:table-cell>
            <text:p>17</text:p>
          </table:table-cell>
          <table:table-cell>
            <text:p>CRC_GEN</text:p>
          </table:table-cell>
          <table:table-cell>
            <text:p>1.0</text:p>
          </table:table-cell>
          <table:table-cell table:style-name="ce13" office:value-type="date" office:date-value="2007-06-09">
            <text:p>09/06/07</text:p>
          </table:table-cell>
          <table:table-cell>
            <text:p>New Module</text:p>
          </table:table-cell>
          <table:table-cell table:style-name="ce7" table:number-columns-repeated="250"/>
          <table:table-cell/>
        </table:table-row>
        <table:table-row table:style-name="ro39">
          <table:table-cell>
            <text:p>17</text:p>
          </table:table-cell>
          <table:table-cell>
            <text:p>BYTE_TO_STRB </text:p>
          </table:table-cell>
          <table:table-cell>
            <text:p>1.0</text:p>
          </table:table-cell>
          <table:table-cell table:style-name="ce13" office:value-type="date" office:date-value="2007-06-09">
            <text:p>09/06/07</text:p>
          </table:table-cell>
          <table:table-cell>
            <text:p>New Module</text:p>
          </table:table-cell>
          <table:table-cell table:style-name="ce7" table:number-columns-repeated="250"/>
          <table:table-cell/>
        </table:table-row>
        <table:table-row table:style-name="ro39">
          <table:table-cell>
            <text:p>17</text:p>
          </table:table-cell>
          <table:table-cell>
            <text:p>BYTE_TO_STRH </text:p>
          </table:table-cell>
          <table:table-cell>
            <text:p>1.0</text:p>
          </table:table-cell>
          <table:table-cell table:style-name="ce13" office:value-type="date" office:date-value="2007-06-09">
            <text:p>09/06/07</text:p>
          </table:table-cell>
          <table:table-cell>
            <text:p>New Module</text:p>
          </table:table-cell>
          <table:table-cell table:style-name="ce7" table:number-columns-repeated="250"/>
          <table:table-cell/>
        </table:table-row>
        <table:table-row table:style-name="ro39">
          <table:table-cell>
            <text:p>17</text:p>
          </table:table-cell>
          <table:table-cell>
            <text:p>DWORD_TO_STRB</text:p>
          </table:table-cell>
          <table:table-cell>
            <text:p>1.0</text:p>
          </table:table-cell>
          <table:table-cell table:style-name="ce13" office:value-type="date" office:date-value="2007-06-09">
            <text:p>09/06/07</text:p>
          </table:table-cell>
          <table:table-cell>
            <text:p>New Module</text:p>
          </table:table-cell>
          <table:table-cell table:style-name="ce7" table:number-columns-repeated="250"/>
          <table:table-cell/>
        </table:table-row>
        <table:table-row table:style-name="ro39">
          <table:table-cell>
            <text:p>17</text:p>
          </table:table-cell>
          <table:table-cell>
            <text:p>DWORD_TO_STRH</text:p>
          </table:table-cell>
          <table:table-cell>
            <text:p>1.0</text:p>
          </table:table-cell>
          <table:table-cell table:style-name="ce13" office:value-type="date" office:date-value="2007-06-09">
            <text:p>09/06/07</text:p>
          </table:table-cell>
          <table:table-cell>
            <text:p>New Module</text:p>
          </table:table-cell>
          <table:table-cell table:style-name="ce7" table:number-columns-repeated="250"/>
          <table:table-cell/>
        </table:table-row>
        <table:table-row table:style-name="ro39">
          <table:table-cell>
            <text:p>17</text:p>
          </table:table-cell>
          <table:table-cell>
            <text:p>CLICK </text:p>
          </table:table-cell>
          <table:table-cell>
            <text:p>1.1</text:p>
          </table:table-cell>
          <table:table-cell table:style-name="ce13" office:value-type="date" office:date-value="2007-05-18">
            <text:p>18/05/07</text:p>
          </table:table-cell>
          <table:table-cell>
            <text:p>Corrected an error while Click would stop working when t_reconfig expired</text:p>
          </table:table-cell>
          <table:table-cell table:number-columns-repeated="251"/>
        </table:table-row>
        <table:table-row table:style-name="ro39">
          <table:table-cell>
            <text:p>16</text:p>
          </table:table-cell>
          <table:table-cell>
            <text:p>PRESSURE</text:p>
          </table:table-cell>
          <table:table-cell>
            <text:p>1.0</text:p>
          </table:table-cell>
          <table:table-cell table:style-name="ce13" office:value-type="date" office:date-value="2007-03-27">
            <text:p>27/03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39">
          <table:table-cell>
            <text:p>16</text:p>
          </table:table-cell>
          <table:table-cell>
            <text:p>ARRAY_SDV</text:p>
          </table:table-cell>
          <table:table-cell>
            <text:p>1.0</text:p>
          </table:table-cell>
          <table:table-cell table:style-name="ce13" office:value-type="date" office:date-value="2007-04-01">
            <text:p>01/04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39">
          <table:table-cell>
            <text:p>16</text:p>
          </table:table-cell>
          <table:table-cell>
            <text:p>LTIME</text:p>
          </table:table-cell>
          <table:table-cell>
            <text:p>1.3</text:p>
          </table:table-cell>
          <table:table-cell table:style-name="ce13" office:value-type="date" office:date-value="2007-03-18">
            <text:p>18/03/07</text:p>
          </table:table-cell>
          <table:table-cell>
            <text:p>changed code, dst would not work during first cycle.</text:p>
          </table:table-cell>
          <table:table-cell table:number-columns-repeated="251"/>
        </table:table-row>
        <table:table-row table:style-name="ro39">
          <table:table-cell>
            <text:p>16</text:p>
          </table:table-cell>
          <table:table-cell>
            <text:p>DEW_TEMP</text:p>
          </table:table-cell>
          <table:table-cell>
            <text:p>1.1</text:p>
          </table:table-cell>
          <table:table-cell table:style-name="ce13" office:value-type="date" office:date-value="2007-04-29">
            <text:p>29/04/07</text:p>
          </table:table-cell>
          <table:table-cell>
            <text:p>Changed code when RH = 0, not to execute log(0)</text:p>
          </table:table-cell>
          <table:table-cell table:number-columns-repeated="251"/>
        </table:table-row>
        <table:table-row table:style-name="ro39">
          <table:table-cell>
            <text:p>16</text:p>
          </table:table-cell>
          <table:table-cell>
            <text:p>GLOBAL CONSTANTS </text:p>
          </table:table-cell>
          <table:table-cell/>
          <table:table-cell table:style-name="ce13" office:value-type="date" office:date-value="2007-05-02">
            <text:p>02/05/07</text:p>
          </table:table-cell>
          <table:table-cell table:style-name="ce15">
            <text:p>Added UG, universal gas constant</text:p>
          </table:table-cell>
          <table:table-cell table:number-columns-repeated="251"/>
        </table:table-row>
        <table:table-row table:style-name="ro39">
          <table:table-cell>
            <text:p>16</text:p>
          </table:table-cell>
          <table:table-cell>
            <text:p>ARRAY_VAR</text:p>
          </table:table-cell>
          <table:table-cell>
            <text:p>1.0</text:p>
          </table:table-cell>
          <table:table-cell table:style-name="ce13" office:value-type="date" office:date-value="2007-04-01">
            <text:p>01/04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40">
          <table:table-cell>
            <text:p>16</text:p>
          </table:table-cell>
          <table:table-cell>
            <text:p>TIMER_1 </text:p>
          </table:table-cell>
          <table:table-cell>
            <text:p>1.3</text:p>
          </table:table-cell>
          <table:table-cell table:style-name="ce13" office:value-type="date" office:date-value="2007-04-14">
            <text:p>14/04/07</text:p>
          </table:table-cell>
          <table:table-cell>
            <text:p>Corrected an error while output would not go active when start year = 1970</text:p>
            <text:p>increased accuracy by checking every 100ms</text:p>
            <text:p>added init section to compensate for timer overflow at startup</text:p>
          </table:table-cell>
          <table:table-cell table:number-columns-repeated="251"/>
        </table:table-row>
        <table:table-row table:style-name="ro41">
          <table:table-cell>
            <text:p>16</text:p>
          </table:table-cell>
          <table:table-cell>
            <text:p>DATE_ADD</text:p>
          </table:table-cell>
          <table:table-cell>
            <text:p>1.1</text:p>
          </table:table-cell>
          <table:table-cell table:style-name="ce13" office:value-type="date" office:date-value="2007-04-12">
            <text:p>12/04/07</text:p>
          </table:table-cell>
          <table:table-cell>
            <text:p>corrected an error while date would be incorrect when year <text:s/>= 0</text:p>
          </table:table-cell>
          <table:table-cell table:number-columns-repeated="251"/>
        </table:table-row>
        <table:table-row table:style-name="ro42">
          <table:table-cell>
            <text:p>16</text:p>
          </table:table-cell>
          <table:table-cell>
            <text:p>M_TX</text:p>
          </table:table-cell>
          <table:table-cell>
            <text:p>1.1</text:p>
          </table:table-cell>
          <table:table-cell table:style-name="ce13" office:value-type="date" office:date-value="2007-05-02">
            <text:p>02/05/07</text:p>
          </table:table-cell>
          <table:table-cell>
            <text:p>Corrected wrong measurements during startup</text:p>
            <text:p>added output ET (elapsed time)</text:p>
            <text:p>added Reset input</text:p>
            <text:p>added tmax input</text:p>
          </table:table-cell>
          <table:table-cell table:number-columns-repeated="251"/>
        </table:table-row>
        <table:table-row table:style-name="ro43">
          <table:table-cell>
            <text:p>16</text:p>
          </table:table-cell>
          <table:table-cell>
            <text:p>LENGTH</text:p>
          </table:table-cell>
          <table:table-cell>
            <text:p>1.0</text:p>
          </table:table-cell>
          <table:table-cell table:style-name="ce13" office:value-type="date" office:date-value="2007-03-27">
            <text:p>27/03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43">
          <table:table-cell>
            <text:p>16</text:p>
          </table:table-cell>
          <table:table-cell>
            <text:p>ASTRO</text:p>
          </table:table-cell>
          <table:table-cell>
            <text:p>1.0</text:p>
          </table:table-cell>
          <table:table-cell table:style-name="ce13" office:value-type="date" office:date-value="2007-03-27">
            <text:p>27/03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43">
          <table:table-cell>
            <text:p>16</text:p>
          </table:table-cell>
          <table:table-cell>
            <text:p>ENERGY</text:p>
          </table:table-cell>
          <table:table-cell>
            <text:p>1.0</text:p>
          </table:table-cell>
          <table:table-cell table:style-name="ce13" office:value-type="date" office:date-value="2007-03-27">
            <text:p>27/03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43">
          <table:table-cell>
            <text:p>16</text:p>
          </table:table-cell>
          <table:table-cell>
            <text:p>DEW_CON</text:p>
          </table:table-cell>
          <table:table-cell>
            <text:p>1.0</text:p>
          </table:table-cell>
          <table:table-cell table:style-name="ce13" office:value-type="date" office:date-value="2007-04-29">
            <text:p>29/04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43">
          <table:table-cell>
            <text:p>16</text:p>
          </table:table-cell>
          <table:table-cell table:style-name="ce11">
            <text:p>CYCLE_TIME</text:p>
          </table:table-cell>
          <table:table-cell>
            <text:p>1.2</text:p>
          </table:table-cell>
          <table:table-cell table:style-name="ce13" office:value-type="date" office:date-value="2007-03-10">
            <text:p>10/03/07</text:p>
          </table:table-cell>
          <table:table-cell>
            <text:p>changed initialization of ct_min to t#10h for compatibility with siemens s7</text:p>
          </table:table-cell>
          <table:table-cell table:number-columns-repeated="251"/>
        </table:table-row>
        <table:table-row table:style-name="ro43">
          <table:table-cell>
            <text:p>16</text:p>
          </table:table-cell>
          <table:table-cell>
            <text:p>SPEED</text:p>
          </table:table-cell>
          <table:table-cell>
            <text:p>1.0</text:p>
          </table:table-cell>
          <table:table-cell table:style-name="ce13" office:value-type="date" office:date-value="2007-03-27">
            <text:p>27/03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43">
          <table:table-cell>
            <text:p>16</text:p>
          </table:table-cell>
          <table:table-cell>
            <text:p>M_D</text:p>
          </table:table-cell>
          <table:table-cell>
            <text:p>1.0</text:p>
          </table:table-cell>
          <table:table-cell table:style-name="ce13" office:value-type="date" office:date-value="2007-05-02">
            <text:p>02/05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44">
          <table:table-cell>
            <text:p>16</text:p>
          </table:table-cell>
          <table:table-cell>
            <text:p>M_T</text:p>
          </table:table-cell>
          <table:table-cell>
            <text:p>1.1</text:p>
          </table:table-cell>
          <table:table-cell table:style-name="ce13" office:value-type="date" office:date-value="2007-05-02">
            <text:p>02/05/07</text:p>
          </table:table-cell>
          <table:table-cell>
            <text:p>Added init variable to avoid unreasonable result if falling edge occurs first</text:p>
            <text:p>added ET (elapsed Time) output</text:p>
            <text:p>added reset input</text:p>
          </table:table-cell>
          <table:table-cell table:number-columns-repeated="251"/>
        </table:table-row>
        <table:table-row table:style-name="ro45">
          <table:table-cell>
            <text:p>16</text:p>
          </table:table-cell>
          <table:table-cell>
            <text:p>DEW_RH</text:p>
          </table:table-cell>
          <table:table-cell>
            <text:p>1.0</text:p>
          </table:table-cell>
          <table:table-cell table:style-name="ce13" office:value-type="date" office:date-value="2007-04-29">
            <text:p>29/04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45">
          <table:table-cell>
            <text:p>16</text:p>
          </table:table-cell>
          <table:table-cell>
            <text:p>SUN_TIME</text:p>
          </table:table-cell>
          <table:table-cell>
            <text:p>1.2</text:p>
          </table:table-cell>
          <table:table-cell table:style-name="ce13" office:value-type="date" office:date-value="2007-04-17">
            <text:p>17/04/07</text:p>
          </table:table-cell>
          <table:table-cell>
            <text:p>corrected error while sun:midday would not be corrected for longitude.</text:p>
          </table:table-cell>
          <table:table-cell table:number-columns-repeated="251"/>
        </table:table-row>
        <table:table-row table:style-name="ro45">
          <table:table-cell>
            <text:p>15</text:p>
          </table:table-cell>
          <table:table-cell>
            <text:p>MUL_ADD</text:p>
          </table:table-cell>
          <table:table-cell>
            <text:p>1.0</text:p>
          </table:table-cell>
          <table:table-cell table:style-name="ce13" office:value-type="date" office:date-value="2007-02-08">
            <text:p>08/02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46">
          <table:table-cell>
            <text:p>15</text:p>
          </table:table-cell>
          <table:table-cell>
            <text:p>CLK_PRG</text:p>
          </table:table-cell>
          <table:table-cell>
            <text:p>1.1</text:p>
          </table:table-cell>
          <table:table-cell table:style-name="ce13" office:value-type="date" office:date-value="2007-02-25">
            <text:p>25/02/07</text:p>
          </table:table-cell>
          <table:table-cell>
            <text:p>rewritten moule in ST for better performance</text:p>
            <text:p>PT can noe be changed during runtime</text:p>
          </table:table-cell>
          <table:table-cell table:number-columns-repeated="251"/>
        </table:table-row>
        <table:table-row table:style-name="ro47">
          <table:table-cell>
            <text:p>15</text:p>
          </table:table-cell>
          <table:table-cell>
            <text:p>DEC_8</text:p>
          </table:table-cell>
          <table:table-cell>
            <text:p>1.1</text:p>
          </table:table-cell>
          <table:table-cell table:style-name="ce13" office:value-type="date" office:date-value="2007-03-03">
            <text:p>03/03/07</text:p>
          </table:table-cell>
          <table:table-cell>
            <text:p>rewritten moule in ST for better performance</text:p>
          </table:table-cell>
          <table:table-cell table:number-columns-repeated="251"/>
        </table:table-row>
        <table:table-row table:style-name="ro47">
          <table:table-cell>
            <text:p>15</text:p>
          </table:table-cell>
          <table:table-cell>
            <text:p>FT_RMP</text:p>
          </table:table-cell>
          <table:table-cell>
            <text:p>1.2</text:p>
          </table:table-cell>
          <table:table-cell table:style-name="ce13" office:value-type="date" office:date-value="2007-02-12">
            <text:p>12/02/07</text:p>
          </table:table-cell>
          <table:table-cell>
            <text:p>Added INIT to prevent erroneous startup conditions</text:p>
          </table:table-cell>
          <table:table-cell table:number-columns-repeated="251"/>
        </table:table-row>
        <table:table-row table:style-name="ro47">
          <table:table-cell>
            <text:p>15</text:p>
          </table:table-cell>
          <table:table-cell>
            <text:p>GEN_RDM</text:p>
          </table:table-cell>
          <table:table-cell>
            <text:p>1.0</text:p>
          </table:table-cell>
          <table:table-cell table:style-name="ce13" office:value-type="date" office:date-value="2007-02-07">
            <text:p>07/02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47">
          <table:table-cell>
            <text:p>15</text:p>
          </table:table-cell>
          <table:table-cell>
            <text:p>FT_PID</text:p>
          </table:table-cell>
          <table:table-cell>
            <text:p>1.3</text:p>
          </table:table-cell>
          <table:table-cell table:style-name="ce13" office:value-type="date" office:date-value="2007-03-03">
            <text:p>03/03/07</text:p>
          </table:table-cell>
          <table:table-cell>
            <text:p>Added default values for inputs KP, TN, TV, LIMIT_H and LIMIT_L</text:p>
          </table:table-cell>
          <table:table-cell table:number-columns-repeated="251"/>
        </table:table-row>
        <table:table-row table:style-name="ro47">
          <table:table-cell>
            <text:p>15</text:p>
          </table:table-cell>
          <table:table-cell table:style-name="ce12">
            <text:p>CEIL</text:p>
          </table:table-cell>
          <table:table-cell>
            <text:p>1.0</text:p>
          </table:table-cell>
          <table:table-cell table:style-name="ce13" office:value-type="date" office:date-value="2007-02-07">
            <text:p>07/02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47">
          <table:table-cell>
            <text:p>15</text:p>
          </table:table-cell>
          <table:table-cell>
            <text:p>FT_PT1</text:p>
          </table:table-cell>
          <table:table-cell>
            <text:p>1.3</text:p>
          </table:table-cell>
          <table:table-cell table:style-name="ce13" office:value-type="date" office:date-value="2007-02-27">
            <text:p>27/02/07</text:p>
          </table:table-cell>
          <table:table-cell>
            <text:p>Output will be set to input during initial startup</text:p>
          </table:table-cell>
          <table:table-cell table:number-columns-repeated="251"/>
        </table:table-row>
        <table:table-row table:style-name="ro47">
          <table:table-cell>
            <text:p>15</text:p>
          </table:table-cell>
          <table:table-cell>
            <text:p>CLICK </text:p>
          </table:table-cell>
          <table:table-cell>
            <text:p>1.0</text:p>
          </table:table-cell>
          <table:table-cell table:style-name="ce13" office:value-type="date" office:date-value="2007-02-15">
            <text:p>15/02/07</text:p>
          </table:table-cell>
          <table:table-cell>
            <text:p>New Module „click“</text:p>
          </table:table-cell>
          <table:table-cell table:number-columns-repeated="251"/>
        </table:table-row>
        <table:table-row table:style-name="ro47">
          <table:table-cell>
            <text:p>15</text:p>
          </table:table-cell>
          <table:table-cell>
            <text:p>PULSE_LENGTH</text:p>
          </table:table-cell>
          <table:table-cell>
            <text:p>1.0</text:p>
          </table:table-cell>
          <table:table-cell table:style-name="ce13" office:value-type="date" office:date-value="2007-02-15">
            <text:p>15/02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47">
          <table:table-cell>
            <text:p>15</text:p>
          </table:table-cell>
          <table:table-cell>
            <text:p>FACT</text:p>
          </table:table-cell>
          <table:table-cell>
            <text:p>1.1</text:p>
          </table:table-cell>
          <table:table-cell table:style-name="ce13" office:value-type="date" office:date-value="2007-03-04">
            <text:p>04/03/07</text:p>
          </table:table-cell>
          <table:table-cell>
            <text:p>Changed a critical erro while loop was indefinite</text:p>
          </table:table-cell>
          <table:table-cell table:number-columns-repeated="251"/>
        </table:table-row>
        <table:table-row table:style-name="ro47">
          <table:table-cell>
            <text:p>15</text:p>
          </table:table-cell>
          <table:table-cell>
            <text:p>GEN_RMP</text:p>
          </table:table-cell>
          <table:table-cell>
            <text:p>1.0</text:p>
          </table:table-cell>
          <table:table-cell table:style-name="ce13" office:value-type="date" office:date-value="2007-03-03">
            <text:p>03/03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47">
          <table:table-cell>
            <text:p>15</text:p>
          </table:table-cell>
          <table:table-cell>
            <text:p>FLOOR</text:p>
          </table:table-cell>
          <table:table-cell>
            <text:p>1.0</text:p>
          </table:table-cell>
          <table:table-cell table:style-name="ce13" office:value-type="date" office:date-value="2007-02-07">
            <text:p>07/02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47">
          <table:table-cell>
            <text:p>15</text:p>
          </table:table-cell>
          <table:table-cell>
            <text:p>DEAD_ZONE_2</text:p>
          </table:table-cell>
          <table:table-cell>
            <text:p>1.0</text:p>
          </table:table-cell>
          <table:table-cell table:style-name="ce13" office:value-type="date" office:date-value="2007-02-12">
            <text:p>12/02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47">
          <table:table-cell>
            <text:p>15</text:p>
          </table:table-cell>
          <table:table-cell>
            <text:p>SIGN_I</text:p>
          </table:table-cell>
          <table:table-cell>
            <text:p>1.1</text:p>
          </table:table-cell>
          <table:table-cell table:style-name="ce13" office:value-type="date" office:date-value="2007-03-03">
            <text:p>03/03/07</text:p>
          </table:table-cell>
          <table:table-cell>
            <text:p>changed method of function for better compatibility to other systems</text:p>
          </table:table-cell>
          <table:table-cell table:number-columns-repeated="251"/>
        </table:table-row>
        <table:table-row table:style-name="ro48">
          <table:table-cell>
            <text:p>15</text:p>
          </table:table-cell>
          <table:table-cell>
            <text:p>GLOBAL CONSTANTS </text:p>
          </table:table-cell>
          <table:table-cell/>
          <table:table-cell table:style-name="ce14" office:value-type="date" office:date-value="2007-03-03">
            <text:p>03/03/07</text:p>
          </table:table-cell>
          <table:table-cell table:style-name="ce20">
            <text:p>Increased accuracy of PI2 </text:p>
            <text:p>renamed T0 to TK for better compatibility with other Libraries</text:p>
            <text:p>renamed C to C0 for better compatibility</text:p>
          </table:table-cell>
          <table:table-cell table:number-columns-repeated="251"/>
        </table:table-row>
        <table:table-row table:style-name="ro49">
          <table:table-cell>
            <text:p>15</text:p>
          </table:table-cell>
          <table:table-cell>
            <text:p>WCT</text:p>
          </table:table-cell>
          <table:table-cell>
            <text:p>1.0</text:p>
          </table:table-cell>
          <table:table-cell table:style-name="ce13" office:value-type="date" office:date-value="2007-02-07">
            <text:p>07/02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49">
          <table:table-cell>
            <text:p>15</text:p>
          </table:table-cell>
          <table:table-cell>
            <text:p>HOLIDAYEAT_INDEX </text:p>
          </table:table-cell>
          <table:table-cell>
            <text:p>1.1</text:p>
          </table:table-cell>
          <table:table-cell table:style-name="ce13" office:value-type="date" office:date-value="2007-02-27">
            <text:p>27/02/07</text:p>
          </table:table-cell>
          <table:table-cell>
            <text:p>deleted unused variables rh3 and T3</text:p>
          </table:table-cell>
          <table:table-cell table:number-columns-repeated="251"/>
        </table:table-row>
        <table:table-row table:style-name="ro49">
          <table:table-cell>
            <text:p>15</text:p>
          </table:table-cell>
          <table:table-cell>
            <text:p>PWM_DC</text:p>
          </table:table-cell>
          <table:table-cell>
            <text:p>1.1</text:p>
          </table:table-cell>
          <table:table-cell table:style-name="ce13" office:value-type="date" office:date-value="2007-02-25">
            <text:p>25/02/07</text:p>
          </table:table-cell>
          <table:table-cell>
            <text:p>rewritten moule in ST for better performance</text:p>
          </table:table-cell>
          <table:table-cell table:number-columns-repeated="251"/>
        </table:table-row>
        <table:table-row table:style-name="ro49">
          <table:table-cell>
            <text:p>15</text:p>
          </table:table-cell>
          <table:table-cell>
            <text:p>F_LAMP </text:p>
          </table:table-cell>
          <table:table-cell>
            <text:p>1.1</text:p>
          </table:table-cell>
          <table:table-cell table:style-name="ce13" office:value-type="date" office:date-value="2007-02-08">
            <text:p>08/02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49">
          <table:table-cell>
            <text:p>15</text:p>
          </table:table-cell>
          <table:table-cell>
            <text:p>HOLIDAY</text:p>
          </table:table-cell>
          <table:table-cell>
            <text:p>1.1</text:p>
          </table:table-cell>
          <table:table-cell table:style-name="ce13" office:value-type="date" office:date-value="2007-02-27">
            <text:p>27/02/07</text:p>
          </table:table-cell>
          <table:table-cell>
            <text:p>deleted unused variable init</text:p>
          </table:table-cell>
          <table:table-cell table:number-columns-repeated="251"/>
        </table:table-row>
        <table:table-row table:style-name="ro50">
          <table:table-cell>
            <text:p>15</text:p>
          </table:table-cell>
          <table:table-cell>
            <text:p>ONTIME</text:p>
          </table:table-cell>
          <table:table-cell>
            <text:p>1.1</text:p>
          </table:table-cell>
          <table:table-cell table:style-name="ce13" office:value-type="date" office:date-value="2007-02-22">
            <text:p>22/02/07</text:p>
          </table:table-cell>
          <table:table-cell>
            <text:p>Changed VAR RETAIN PERSISTENT to VAR RETAIN for better compatibility with controllers without file system like WAGO's LON controllers</text:p>
          </table:table-cell>
          <table:table-cell table:number-columns-repeated="251"/>
        </table:table-row>
        <table:table-row table:style-name="ro50">
          <table:table-cell>
            <text:p>15</text:p>
          </table:table-cell>
          <table:table-cell>
            <text:p>TIMER_2 </text:p>
          </table:table-cell>
          <table:table-cell>
            <text:p>1.1</text:p>
          </table:table-cell>
          <table:table-cell table:style-name="ce13" office:value-type="date" office:date-value="2007-02-22">
            <text:p>22/02/07</text:p>
          </table:table-cell>
          <table:table-cell>
            <text:p>Changed VAR RETAIN PERSISTENT to VAR RETAIN for better compatibility with controllers without file system like WAGO's LON controllers</text:p>
          </table:table-cell>
          <table:table-cell table:number-columns-repeated="251"/>
        </table:table-row>
        <table:table-row table:style-name="ro51">
          <table:table-cell>
            <text:p>15</text:p>
          </table:table-cell>
          <table:table-cell>
            <text:p>_ARRAY_MEDIAN</text:p>
          </table:table-cell>
          <table:table-cell>
            <text:p>1.1</text:p>
          </table:table-cell>
          <table:table-cell table:style-name="ce13" office:value-type="date" office:date-value="2007-03-03">
            <text:p>03/03/07</text:p>
          </table:table-cell>
          <table:table-cell>
            <text:p>Corrected an error in median calculation</text:p>
          </table:table-cell>
          <table:table-cell table:number-columns-repeated="251"/>
        </table:table-row>
        <table:table-row table:style-name="ro51">
          <table:table-cell>
            <text:p>15</text:p>
          </table:table-cell>
          <table:table-cell>
            <text:p>DEC_4</text:p>
          </table:table-cell>
          <table:table-cell>
            <text:p>1.1</text:p>
          </table:table-cell>
          <table:table-cell table:style-name="ce13" office:value-type="date" office:date-value="2007-03-03">
            <text:p>03/03/07</text:p>
          </table:table-cell>
          <table:table-cell>
            <text:p>rewritten moule in ST for better performance</text:p>
          </table:table-cell>
          <table:table-cell table:number-columns-repeated="251"/>
        </table:table-row>
        <table:table-row table:style-name="ro51">
          <table:table-cell>
            <text:p>15</text:p>
          </table:table-cell>
          <table:table-cell>
            <text:p>GEN_SQR</text:p>
          </table:table-cell>
          <table:table-cell>
            <text:p>1.1</text:p>
          </table:table-cell>
          <table:table-cell table:style-name="ce13" office:value-type="date" office:date-value="2007-02-12">
            <text:p>12/02/07</text:p>
          </table:table-cell>
          <table:table-cell>
            <text:p>Added default value for dc = 0.5</text:p>
          </table:table-cell>
          <table:table-cell table:number-columns-repeated="251"/>
        </table:table-row>
        <table:table-row table:style-name="ro51">
          <table:table-cell>
            <text:p>15</text:p>
          </table:table-cell>
          <table:table-cell>
            <text:p>SWITCH_X </text:p>
          </table:table-cell>
          <table:table-cell>
            <text:p>1.0</text:p>
          </table:table-cell>
          <table:table-cell table:style-name="ce13" office:value-type="date" office:date-value="2007-02-15">
            <text:p>15/02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52">
          <table:table-cell>
            <text:p>15</text:p>
          </table:table-cell>
          <table:table-cell>
            <text:p>CALIBRATE</text:p>
          </table:table-cell>
          <table:table-cell>
            <text:p>1.2</text:p>
          </table:table-cell>
          <table:table-cell table:style-name="ce13" office:value-type="date" office:date-value="2007-02-22">
            <text:p>22/02/07</text:p>
          </table:table-cell>
          <table:table-cell>
            <text:p>Chaged VAR RETAIN PERSISTENT to VAR RETAIN for better compatibility with controllers without file system</text:p>
          </table:table-cell>
          <table:table-cell table:number-columns-repeated="251"/>
        </table:table-row>
        <table:table-row table:style-name="ro53">
          <table:table-cell>
            <text:p>15</text:p>
          </table:table-cell>
          <table:table-cell>
            <text:p>DEC_2</text:p>
          </table:table-cell>
          <table:table-cell>
            <text:p>1.1</text:p>
          </table:table-cell>
          <table:table-cell table:style-name="ce13" office:value-type="date" office:date-value="2007-03-03">
            <text:p>03/03/07</text:p>
          </table:table-cell>
          <table:table-cell>
            <text:p>rewritten moule in ST for better performance</text:p>
          </table:table-cell>
          <table:table-cell table:number-columns-repeated="251"/>
        </table:table-row>
        <table:table-row table:style-name="ro53">
          <table:table-cell>
            <text:p>15</text:p>
          </table:table-cell>
          <table:table-cell>
            <text:p>FT_PROFILE </text:p>
          </table:table-cell>
          <table:table-cell>
            <text:p>1.0</text:p>
          </table:table-cell>
          <table:table-cell table:style-name="ce13" office:value-type="date" office:date-value="2007-02-27">
            <text:p>27/02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53">
          <table:table-cell>
            <text:p>15</text:p>
          </table:table-cell>
          <table:table-cell>
            <text:p>INC</text:p>
          </table:table-cell>
          <table:table-cell>
            <text:p>1.0</text:p>
          </table:table-cell>
          <table:table-cell table:style-name="ce13" office:value-type="date" office:date-value="2007-02-07">
            <text:p>07/02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53">
          <table:table-cell>
            <text:p>15</text:p>
          </table:table-cell>
          <table:table-cell>
            <text:p>PWM_PW</text:p>
          </table:table-cell>
          <table:table-cell>
            <text:p>1.1</text:p>
          </table:table-cell>
          <table:table-cell table:style-name="ce13" office:value-type="date" office:date-value="2007-02-25">
            <text:p>25/02/07</text:p>
          </table:table-cell>
          <table:table-cell>
            <text:p>rewritten moule in ST for better performance</text:p>
          </table:table-cell>
          <table:table-cell table:number-columns-repeated="251"/>
        </table:table-row>
        <table:table-row table:style-name="ro53">
          <table:table-cell>
            <text:p>15</text:p>
          </table:table-cell>
          <table:table-cell>
            <text:p>DEAD_ZONE </text:p>
          </table:table-cell>
          <table:table-cell>
            <text:p>1.0</text:p>
          </table:table-cell>
          <table:table-cell table:style-name="ce13" office:value-type="date" office:date-value="2007-02-12">
            <text:p>12/02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53">
          <table:table-cell>
            <text:p>15</text:p>
          </table:table-cell>
          <table:table-cell>
            <text:p>BAR_GRAPH</text:p>
          </table:table-cell>
          <table:table-cell>
            <text:p>1.0</text:p>
          </table:table-cell>
          <table:table-cell table:style-name="ce13" office:value-type="date" office:date-value="2007-02-22">
            <text:p>22/02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53">
          <table:table-cell>
            <text:p>15</text:p>
          </table:table-cell>
          <table:table-cell>
            <text:p>BOILER</text:p>
          </table:table-cell>
          <table:table-cell>
            <text:p>1.0</text:p>
          </table:table-cell>
          <table:table-cell table:style-name="ce13" office:value-type="date" office:date-value="2007-02-27">
            <text:p>27/02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53">
          <table:table-cell>
            <text:p>15</text:p>
          </table:table-cell>
          <table:table-cell>
            <text:p>DCF_77</text:p>
          </table:table-cell>
          <table:table-cell>
            <text:p>1.2</text:p>
          </table:table-cell>
          <table:table-cell table:style-name="ce13" office:value-type="date" office:date-value="2007-02-26">
            <text:p>26/02/07</text:p>
          </table:table-cell>
          <table:table-cell>
            <text:p>Chaqnged statements to avoid a compiler error if wago 16 bit lon controller is used</text:p>
          </table:table-cell>
          <table:table-cell table:number-columns-repeated="251"/>
        </table:table-row>
        <table:table-row table:style-name="ro53">
          <table:table-cell>
            <text:p>14</text:p>
          </table:table-cell>
          <table:table-cell>
            <text:p>MUX_R2</text:p>
          </table:table-cell>
          <table:table-cell>
            <text:p>1.0</text:p>
          </table:table-cell>
          <table:table-cell table:style-name="ce13" office:value-type="date" office:date-value="2007-01-19">
            <text:p>19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53">
          <table:table-cell>
            <text:p>14</text:p>
          </table:table-cell>
          <table:table-cell>
            <text:p>DIMM_I </text:p>
          </table:table-cell>
          <table:table-cell>
            <text:p>1.1</text:p>
          </table:table-cell>
          <table:table-cell table:style-name="ce13" office:value-type="date" office:date-value="2007-01-22">
            <text:p>22/01/07</text:p>
          </table:table-cell>
          <table:table-cell>
            <text:p>Deleted unused structure „ramp“</text:p>
          </table:table-cell>
          <table:table-cell table:number-columns-repeated="251"/>
        </table:table-row>
        <table:table-row table:style-name="ro53">
          <table:table-cell>
            <text:p>14</text:p>
          </table:table-cell>
          <table:table-cell>
            <text:p>F_TO_OM</text:p>
          </table:table-cell>
          <table:table-cell>
            <text:p>1.0</text:p>
          </table:table-cell>
          <table:table-cell table:style-name="ce13" office:value-type="date" office:date-value="2007-01-22">
            <text:p>22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53">
          <table:table-cell>
            <text:p>14</text:p>
          </table:table-cell>
          <table:table-cell>
            <text:p>ESR_MON_X8</text:p>
          </table:table-cell>
          <table:table-cell>
            <text:p>1.0</text:p>
          </table:table-cell>
          <table:table-cell table:style-name="ce13" office:value-type="date" office:date-value="2007-01-26">
            <text:p>26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53">
          <table:table-cell>
            <text:p>14</text:p>
          </table:table-cell>
          <table:table-cell>
            <text:p>ASINH</text:p>
          </table:table-cell>
          <table:table-cell>
            <text:p>1.0</text:p>
          </table:table-cell>
          <table:table-cell table:style-name="ce13" office:value-type="date" office:date-value="2007-01-12">
            <text:p>12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53">
          <table:table-cell>
            <text:p>14</text:p>
          </table:table-cell>
          <table:table-cell>
            <text:p>DAY_OF_MONTH</text:p>
          </table:table-cell>
          <table:table-cell>
            <text:p>1.1</text:p>
          </table:table-cell>
          <table:table-cell table:style-name="ce13" office:value-type="date" office:date-value="2007-01-22">
            <text:p>22/01/07</text:p>
          </table:table-cell>
          <table:table-cell>
            <text:p>deleted unused variable day_in_year and day_in_year_begin</text:p>
          </table:table-cell>
          <table:table-cell table:number-columns-repeated="251"/>
        </table:table-row>
        <table:table-row table:style-name="ro53">
          <table:table-cell>
            <text:p>14</text:p>
          </table:table-cell>
          <table:table-cell>
            <text:p>Heat_Temp</text:p>
          </table:table-cell>
          <table:table-cell>
            <text:p>1.0</text:p>
          </table:table-cell>
          <table:table-cell table:style-name="ce13" office:value-type="date" office:date-value="2007-01-27">
            <text:p>27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54">
          <table:table-cell>
            <text:p>14</text:p>
          </table:table-cell>
          <table:table-cell>
            <text:p>DIMM_I </text:p>
          </table:table-cell>
          <table:table-cell>
            <text:p>1.2</text:p>
          </table:table-cell>
          <table:table-cell table:style-name="ce13" office:value-type="date" office:date-value="2007-02-02">
            <text:p>02/02/07</text:p>
          </table:table-cell>
          <table:table-cell>
            <text:p>Changed method to read time() only at the beginning of the module for better consistency when a higher priority task interrupts „dimm_i“</text:p>
            <text:p>added code in case structure for state 1 to allow for short one cycle long input pulses</text:p>
          </table:table-cell>
          <table:table-cell table:number-columns-repeated="251"/>
        </table:table-row>
        <table:table-row table:style-name="ro55">
          <table:table-cell>
            <text:p>14</text:p>
          </table:table-cell>
          <table:table-cell>
            <text:p>SEQUENCE_4</text:p>
          </table:table-cell>
          <table:table-cell>
            <text:p>1.3</text:p>
          </table:table-cell>
          <table:table-cell table:style-name="ce13" office:value-type="date" office:date-value="2007-01-17">
            <text:p>17/01/07</text:p>
          </table:table-cell>
          <table:table-cell>
            <text:p>Changed output fault to ESR compatible output STATUS</text:p>
            <text:p>added stop on error functionality</text:p>
            <text:p>default for inputs IN is now TRUE</text:p>
            <text:p>renamed variable state to step</text:p>
          </table:table-cell>
          <table:table-cell table:number-columns-repeated="251"/>
        </table:table-row>
        <table:table-row table:style-name="ro56">
          <table:table-cell>
            <text:p>14</text:p>
          </table:table-cell>
          <table:table-cell>
            <text:p>SH_2</text:p>
          </table:table-cell>
          <table:table-cell>
            <text:p>1.1</text:p>
          </table:table-cell>
          <table:table-cell table:style-name="ce13" office:value-type="date" office:date-value="2007-01-20">
            <text:p>20/01/07</text:p>
          </table:table-cell>
          <table:table-cell>
            <text:p>Added input N to specify the amount of samples for calculations</text:p>
            <text:p>added output trig</text:p>
          </table:table-cell>
          <table:table-cell table:number-columns-repeated="251"/>
        </table:table-row>
        <table:table-row table:style-name="ro57">
          <table:table-cell>
            <text:p>14</text:p>
          </table:table-cell>
          <table:table-cell>
            <text:p>DWORD_TO_STRF</text:p>
          </table:table-cell>
          <table:table-cell>
            <text:p>1.0</text:p>
          </table:table-cell>
          <table:table-cell table:style-name="ce13" office:value-type="date" office:date-value="2007-01-16">
            <text:p>16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58">
          <table:table-cell>
            <text:p>14</text:p>
          </table:table-cell>
          <table:table-cell>
            <text:p>_ARRAY_INIT</text:p>
          </table:table-cell>
          <table:table-cell>
            <text:p>1.1</text:p>
          </table:table-cell>
          <table:table-cell table:style-name="ce13" office:value-type="date" office:date-value="2007-01-06">
            <text:p>06/01/07</text:p>
          </table:table-cell>
          <table:table-cell>
            <text:p>Changed type of function to BOOL</text:p>
            <text:p>function now returns TRUE</text:p>
          </table:table-cell>
          <table:table-cell table:number-columns-repeated="251"/>
        </table:table-row>
        <table:table-row table:style-name="ro59">
          <table:table-cell>
            <text:p>14</text:p>
          </table:table-cell>
          <table:table-cell>
            <text:p>SUN_POS</text:p>
          </table:table-cell>
          <table:table-cell>
            <text:p>1.0</text:p>
          </table:table-cell>
          <table:table-cell table:style-name="ce13" office:value-type="date" office:date-value="2007-02-01">
            <text:p>01/02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60">
          <table:table-cell>
            <text:p>14</text:p>
          </table:table-cell>
          <table:table-cell>
            <text:p>SCALE_B4</text:p>
          </table:table-cell>
          <table:table-cell>
            <text:p>1.1</text:p>
          </table:table-cell>
          <table:table-cell table:style-name="ce13" office:value-type="date" office:date-value="2007-01-19">
            <text:p>19/01/07</text:p>
          </table:table-cell>
          <table:table-cell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61">
          <table:table-cell>
            <text:p>14</text:p>
          </table:table-cell>
          <table:table-cell>
            <text:p>SCALE_X8</text:p>
          </table:table-cell>
          <table:table-cell>
            <text:p>1.0</text:p>
          </table:table-cell>
          <table:table-cell table:style-name="ce13" office:value-type="date" office:date-value="2007-01-19">
            <text:p>19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61">
          <table:table-cell>
            <text:p>14</text:p>
          </table:table-cell>
          <table:table-cell>
            <text:p>STAIR2</text:p>
          </table:table-cell>
          <table:table-cell>
            <text:p>1.0</text:p>
          </table:table-cell>
          <table:table-cell table:style-name="ce13" office:value-type="date" office:date-value="2007-01-28">
            <text:p>28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61">
          <table:table-cell>
            <text:p>14</text:p>
          </table:table-cell>
          <table:table-cell>
            <text:p>HYST_3</text:p>
          </table:table-cell>
          <table:table-cell>
            <text:p>1.0</text:p>
          </table:table-cell>
          <table:table-cell table:style-name="ce13" office:value-type="date" office:date-value="2007-01-22">
            <text:p>22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61">
          <table:table-cell>
            <text:p>14</text:p>
          </table:table-cell>
          <table:table-cell>
            <text:p>GEN_SIN</text:p>
          </table:table-cell>
          <table:table-cell>
            <text:p>1.0</text:p>
          </table:table-cell>
          <table:table-cell table:style-name="ce13" office:value-type="date" office:date-value="2007-01-22">
            <text:p>22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61">
          <table:table-cell>
            <text:p>14</text:p>
          </table:table-cell>
          <table:table-cell>
            <text:p>SIGN_R</text:p>
          </table:table-cell>
          <table:table-cell>
            <text:p>1.1</text:p>
          </table:table-cell>
          <table:table-cell table:style-name="ce13" office:value-type="date" office:date-value="2007-01-19">
            <text:p>19/01/07</text:p>
          </table:table-cell>
          <table:table-cell>
            <text:p>changed method of function for better compatibility to other systems</text:p>
          </table:table-cell>
          <table:table-cell table:number-columns-repeated="251"/>
        </table:table-row>
        <table:table-row table:style-name="ro61">
          <table:table-cell>
            <text:p>14</text:p>
          </table:table-cell>
          <table:table-cell>
            <text:p>RMP_W</text:p>
          </table:table-cell>
          <table:table-cell>
            <text:p>1.2</text:p>
          </table:table-cell>
          <table:table-cell table:style-name="ce13" office:value-type="date" office:date-value="2007-01-22">
            <text:p>22/01/07</text:p>
          </table:table-cell>
          <table:table-cell>
            <text:p>Deleted unused variable step</text:p>
          </table:table-cell>
          <table:table-cell table:number-columns-repeated="251"/>
        </table:table-row>
        <table:table-row table:style-name="ro61">
          <table:table-cell>
            <text:p>14</text:p>
          </table:table-cell>
          <table:table-cell>
            <text:p>KMH_TO_MS</text:p>
          </table:table-cell>
          <table:table-cell>
            <text:p>1.0</text:p>
          </table:table-cell>
          <table:table-cell table:style-name="ce13" office:value-type="date" office:date-value="2007-02-04">
            <text:p>04/02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61">
          <table:table-cell>
            <text:p>14</text:p>
          </table:table-cell>
          <table:table-cell>
            <text:p>ACTUATOR_2P </text:p>
          </table:table-cell>
          <table:table-cell>
            <text:p>1.2</text:p>
          </table:table-cell>
          <table:table-cell table:style-name="ce13" office:value-type="date" office:date-value="2007-01-17">
            <text:p>17/01/07</text:p>
          </table:table-cell>
          <table:table-cell>
            <text:p>Deleted unused variable time_overflow</text:p>
          </table:table-cell>
          <table:table-cell table:number-columns-repeated="251"/>
        </table:table-row>
        <table:table-row table:style-name="ro61">
          <table:table-cell>
            <text:p>14</text:p>
          </table:table-cell>
          <table:table-cell>
            <text:p>ACTUATOR_3P </text:p>
          </table:table-cell>
          <table:table-cell>
            <text:p>1.2</text:p>
          </table:table-cell>
          <table:table-cell table:style-name="ce13" office:value-type="date" office:date-value="2007-01-23">
            <text:p>23/01/07</text:p>
          </table:table-cell>
          <table:table-cell>
            <text:p>Deleted unused variables „force_on“ and „force_off“</text:p>
          </table:table-cell>
          <table:table-cell/>
          <table:table-cell table:style-name="ce14"/>
          <table:table-cell table:number-columns-repeated="249"/>
        </table:table-row>
        <table:table-row table:style-name="ro61">
          <table:table-cell>
            <text:p>14</text:p>
          </table:table-cell>
          <table:table-cell>
            <text:p>FT_PT2</text:p>
          </table:table-cell>
          <table:table-cell>
            <text:p>1.1</text:p>
          </table:table-cell>
          <table:table-cell table:style-name="ce13" office:value-type="date" office:date-value="2007-01-15">
            <text:p>15/01/07</text:p>
          </table:table-cell>
          <table:table-cell>
            <text:p>Improved algorithm for higher accuracy and speed</text:p>
          </table:table-cell>
          <table:table-cell table:number-columns-repeated="251"/>
        </table:table-row>
        <table:table-row table:style-name="ro61">
          <table:table-cell>
            <text:p>14</text:p>
          </table:table-cell>
          <table:table-cell>
            <text:p>SENSOR_INT</text:p>
          </table:table-cell>
          <table:table-cell>
            <text:p>1.1</text:p>
          </table:table-cell>
          <table:table-cell table:style-name="ce13" office:value-type="date" office:date-value="2007-01-20">
            <text:p>20/01/07</text:p>
          </table:table-cell>
          <table:table-cell>
            <text:p>Deleted input R0 which was not used</text:p>
          </table:table-cell>
          <table:table-cell table:number-columns-repeated="251"/>
        </table:table-row>
        <table:table-row table:style-name="ro61">
          <table:table-cell>
            <text:p>14</text:p>
          </table:table-cell>
          <table:table-cell>
            <text:p>SQRTN</text:p>
          </table:table-cell>
          <table:table-cell>
            <text:p>1.0</text:p>
          </table:table-cell>
          <table:table-cell table:style-name="ce13" office:value-type="date" office:date-value="2007-01-12">
            <text:p>12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61">
          <table:table-cell>
            <text:p>14</text:p>
          </table:table-cell>
          <table:table-cell>
            <text:p>BURNER </text:p>
          </table:table-cell>
          <table:table-cell>
            <text:p>1.3</text:p>
          </table:table-cell>
          <table:table-cell table:style-name="ce13" office:value-type="date" office:date-value="2006-12-31">
            <text:p>31/12/06</text:p>
          </table:table-cell>
          <table:table-cell>
            <text:p>Added status output to be ESR compatible</text:p>
          </table:table-cell>
          <table:table-cell table:number-columns-repeated="251"/>
        </table:table-row>
        <table:table-row table:style-name="ro61">
          <table:table-cell>
            <text:p>14</text:p>
          </table:table-cell>
          <table:table-cell>
            <text:p>F_LIN2</text:p>
          </table:table-cell>
          <table:table-cell>
            <text:p>1.0</text:p>
          </table:table-cell>
          <table:table-cell table:style-name="ce13" office:value-type="date" office:date-value="2007-01-01">
            <text:p>01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61">
          <table:table-cell>
            <text:p>14</text:p>
          </table:table-cell>
          <table:table-cell>
            <text:p>FT_TN16</text:p>
          </table:table-cell>
          <table:table-cell>
            <text:p>1.0</text:p>
          </table:table-cell>
          <table:table-cell table:style-name="ce13" office:value-type="date" office:date-value="2007-01-01">
            <text:p>01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61">
          <table:table-cell>
            <text:p>14</text:p>
          </table:table-cell>
          <table:table-cell>
            <text:p>FT_PID</text:p>
          </table:table-cell>
          <table:table-cell>
            <text:p>1.2</text:p>
          </table:table-cell>
          <table:table-cell table:style-name="ce13" office:value-type="date" office:date-value="2007-01-03">
            <text:p>03/01/07</text:p>
          </table:table-cell>
          <table:table-cell>
            <text:p>Added int_band for structural adaptation of PID</text:p>
          </table:table-cell>
          <table:table-cell table:number-columns-repeated="251"/>
        </table:table-row>
        <table:table-row table:style-name="ro61">
          <table:table-cell>
            <text:p>14</text:p>
          </table:table-cell>
          <table:table-cell>
            <text:p>BYTE_OF_DWORD</text:p>
          </table:table-cell>
          <table:table-cell>
            <text:p>1.0</text:p>
          </table:table-cell>
          <table:table-cell table:style-name="ce13" office:value-type="date" office:date-value="2007-01-17">
            <text:p>17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62">
          <table:table-cell>
            <text:p>14</text:p>
          </table:table-cell>
          <table:table-cell>
            <text:p>AOUT</text:p>
          </table:table-cell>
          <table:table-cell>
            <text:p>1.1</text:p>
          </table:table-cell>
          <table:table-cell table:style-name="ce13" office:value-type="date" office:date-value="2007-01-18">
            <text:p>18/01/07</text:p>
          </table:table-cell>
          <table:table-cell>
            <text:p>Renamed module to AOUT</text:p>
            <text:p>changed output to hold 32 bits max</text:p>
            <text:p>corrected an error with sign bit</text:p>
          </table:table-cell>
          <table:table-cell table:number-columns-repeated="251"/>
        </table:table-row>
        <table:table-row table:style-name="ro63">
          <table:table-cell>
            <text:p>14</text:p>
          </table:table-cell>
          <table:table-cell>
            <text:p>SUN_TIME</text:p>
          </table:table-cell>
          <table:table-cell>
            <text:p>1.1</text:p>
          </table:table-cell>
          <table:table-cell table:style-name="ce13" office:value-type="date" office:date-value="2007-01-20">
            <text:p>20/01/07</text:p>
          </table:table-cell>
          <table:table-cell>
            <text:p>deleted unused variables sun_rineR and sun_setR</text:p>
          </table:table-cell>
          <table:table-cell table:number-columns-repeated="251"/>
        </table:table-row>
        <table:table-row table:style-name="ro63">
          <table:table-cell>
            <text:p>14</text:p>
          </table:table-cell>
          <table:table-cell>
            <text:p>SH</text:p>
          </table:table-cell>
          <table:table-cell>
            <text:p>1.1</text:p>
          </table:table-cell>
          <table:table-cell table:style-name="ce13" office:value-type="date" office:date-value="2007-01-16">
            <text:p>16/01/07</text:p>
          </table:table-cell>
          <table:table-cell>
            <text:p>Added output trig</text:p>
          </table:table-cell>
          <table:table-cell table:number-columns-repeated="251"/>
        </table:table-row>
        <table:table-row table:style-name="ro63">
          <table:table-cell>
            <text:p>14</text:p>
          </table:table-cell>
          <table:table-cell>
            <text:p>MAX_3</text:p>
          </table:table-cell>
          <table:table-cell>
            <text:p>1.0</text:p>
          </table:table-cell>
          <table:table-cell table:style-name="ce13" office:value-type="date" office:date-value="2007-01-01">
            <text:p>01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63">
          <table:table-cell>
            <text:p>14</text:p>
          </table:table-cell>
          <table:table-cell>
            <text:p>OM_TO_F</text:p>
          </table:table-cell>
          <table:table-cell>
            <text:p>1.0</text:p>
          </table:table-cell>
          <table:table-cell table:style-name="ce13" office:value-type="date" office:date-value="2007-01-22">
            <text:p>22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63">
          <table:table-cell>
            <text:p>14</text:p>
          </table:table-cell>
          <table:table-cell>
            <text:p>MIN_3</text:p>
          </table:table-cell>
          <table:table-cell>
            <text:p>1.0</text:p>
          </table:table-cell>
          <table:table-cell table:style-name="ce13" office:value-type="date" office:date-value="2007-01-01">
            <text:p>01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64">
          <table:table-cell>
            <text:p>14</text:p>
          </table:table-cell>
          <table:table-cell>
            <text:p>FT_PT1</text:p>
          </table:table-cell>
          <table:table-cell>
            <text:p>1.2</text:p>
          </table:table-cell>
          <table:table-cell table:style-name="ce13" office:value-type="date" office:date-value="2007-01-03">
            <text:p>03/01/07</text:p>
          </table:table-cell>
          <table:table-cell>
            <text:p>Corrected an error with falling edge errors</text:p>
            <text:p>added faktor K</text:p>
          </table:table-cell>
          <table:table-cell table:number-columns-repeated="251"/>
        </table:table-row>
        <table:table-row table:style-name="ro65">
          <table:table-cell>
            <text:p>14</text:p>
          </table:table-cell>
          <table:table-cell>
            <text:p>SEQUENCE_8</text:p>
          </table:table-cell>
          <table:table-cell>
            <text:p>1.3</text:p>
          </table:table-cell>
          <table:table-cell table:style-name="ce13" office:value-type="date" office:date-value="2007-01-17">
            <text:p>17/01/07</text:p>
          </table:table-cell>
          <table:table-cell>
            <text:p>Changed output fault to ESR compatible output STATUS</text:p>
            <text:p>added stop on error functionality</text:p>
            <text:p>default for inputs IN is now TRUE</text:p>
            <text:p>renamed variable state to step</text:p>
          </table:table-cell>
          <table:table-cell table:number-columns-repeated="251"/>
        </table:table-row>
        <table:table-row table:style-name="ro66">
          <table:table-cell>
            <text:p>14</text:p>
          </table:table-cell>
          <table:table-cell>
            <text:p>MULTI_IN</text:p>
          </table:table-cell>
          <table:table-cell>
            <text:p>1.1</text:p>
          </table:table-cell>
          <table:table-cell table:style-name="ce13" office:value-type="date" office:date-value="2007-01-01">
            <text:p>01/01/07</text:p>
          </table:table-cell>
          <table:table-cell>
            <text:p>Changed midr to mid3 funktion for better performance</text:p>
          </table:table-cell>
          <table:table-cell table:number-columns-repeated="251"/>
        </table:table-row>
        <table:table-row table:style-name="ro66">
          <table:table-cell>
            <text:p>14</text:p>
          </table:table-cell>
          <table:table-cell>
            <text:p>STAIR</text:p>
          </table:table-cell>
          <table:table-cell>
            <text:p>1.0</text:p>
          </table:table-cell>
          <table:table-cell table:style-name="ce13" office:value-type="date" office:date-value="2007-01-28">
            <text:p>28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66">
          <table:table-cell>
            <text:p>14</text:p>
          </table:table-cell>
          <table:table-cell>
            <text:p>ACOSH</text:p>
          </table:table-cell>
          <table:table-cell>
            <text:p>1.0</text:p>
          </table:table-cell>
          <table:table-cell table:style-name="ce13" office:value-type="date" office:date-value="2007-01-12">
            <text:p>12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66">
          <table:table-cell>
            <text:p>14</text:p>
          </table:table-cell>
          <table:table-cell>
            <text:p>BURNER </text:p>
          </table:table-cell>
          <table:table-cell>
            <text:p>1.2</text:p>
          </table:table-cell>
          <table:table-cell table:style-name="ce13" office:value-type="date" office:date-value="2006-12-31">
            <text:p>31/12/06</text:p>
          </table:table-cell>
          <table:table-cell>
            <text:p>Added Oil_Temp input</text:p>
          </table:table-cell>
          <table:table-cell table:number-columns-repeated="251"/>
        </table:table-row>
        <table:table-row table:style-name="ro67">
          <table:table-cell>
            <text:p>14</text:p>
          </table:table-cell>
          <table:table-cell>
            <text:p>ACTUATOR_UD </text:p>
          </table:table-cell>
          <table:table-cell>
            <text:p>1.1</text:p>
          </table:table-cell>
          <table:table-cell table:style-name="ce13" office:value-type="date" office:date-value="2007-01-22">
            <text:p>22/01/07</text:p>
          </table:table-cell>
          <table:table-cell>
            <text:p>Added status output</text:p>
            <text:p>changed inputs „ton“ and „toff“ to config variables</text:p>
            <text:p>added config var „out_return to enable „yup_in“ and y_dn_in“</text:p>
            <text:p>changed manual mode to override automatic mode</text:p>
          </table:table-cell>
          <table:table-cell table:number-columns-repeated="251"/>
        </table:table-row>
        <table:table-row table:style-name="ro68">
          <table:table-cell>
            <text:p>14</text:p>
          </table:table-cell>
          <table:table-cell>
            <text:p>FT_TN8</text:p>
          </table:table-cell>
          <table:table-cell>
            <text:p>1.0</text:p>
          </table:table-cell>
          <table:table-cell table:style-name="ce13" office:value-type="date" office:date-value="2007-01-01">
            <text:p>01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69">
          <table:table-cell>
            <text:p>14</text:p>
          </table:table-cell>
          <table:table-cell>
            <text:p>SCALE_B8</text:p>
          </table:table-cell>
          <table:table-cell>
            <text:p>1.1</text:p>
          </table:table-cell>
          <table:table-cell table:style-name="ce13" office:value-type="date" office:date-value="2007-01-19">
            <text:p>19/01/07</text:p>
          </table:table-cell>
          <table:table-cell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70">
          <table:table-cell>
            <text:p>14</text:p>
          </table:table-cell>
          <table:table-cell>
            <text:p>DELAY</text:p>
          </table:table-cell>
          <table:table-cell>
            <text:p>1.2</text:p>
          </table:table-cell>
          <table:table-cell table:style-name="ce13" office:value-type="date" office:date-value="2007-01-19">
            <text:p>19/01/07</text:p>
          </table:table-cell>
          <table:table-cell>
            <text:p>changed reset to load the value of in instead of 0</text:p>
          </table:table-cell>
          <table:table-cell table:number-columns-repeated="251"/>
        </table:table-row>
        <table:table-row table:style-name="ro70">
          <table:table-cell>
            <text:p>14</text:p>
          </table:table-cell>
          <table:table-cell>
            <text:p>CHR</text:p>
          </table:table-cell>
          <table:table-cell>
            <text:p>1.0</text:p>
          </table:table-cell>
          <table:table-cell table:style-name="ce13" office:value-type="date" office:date-value="2007-01-16">
            <text:p>16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70">
          <table:table-cell>
            <text:p>14</text:p>
          </table:table-cell>
          <table:table-cell>
            <text:p>SCALE_X4</text:p>
          </table:table-cell>
          <table:table-cell>
            <text:p>1.0</text:p>
          </table:table-cell>
          <table:table-cell table:style-name="ce13" office:value-type="date" office:date-value="2007-01-19">
            <text:p>19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70">
          <table:table-cell>
            <text:p>14</text:p>
          </table:table-cell>
          <table:table-cell>
            <text:p>RDM</text:p>
          </table:table-cell>
          <table:table-cell>
            <text:p>1.0</text:p>
          </table:table-cell>
          <table:table-cell table:style-name="ce13" office:value-type="date" office:date-value="2007-01-16">
            <text:p>16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71">
          <table:table-cell>
            <text:p>14</text:p>
          </table:table-cell>
          <table:table-cell>
            <text:p>LEGIONELLA </text:p>
          </table:table-cell>
          <table:table-cell>
            <text:p>1.1</text:p>
          </table:table-cell>
          <table:table-cell table:style-name="ce13" office:value-type="date" office:date-value="2007-01-17">
            <text:p>17/01/07</text:p>
          </table:table-cell>
          <table:table-cell>
            <text:p>Rewritten moule in ST for better performance</text:p>
            <text:p>changed error out to ESR compatible Status output</text:p>
          </table:table-cell>
          <table:table-cell table:number-columns-repeated="251"/>
        </table:table-row>
        <table:table-row table:style-name="ro72">
          <table:table-cell>
            <text:p>14</text:p>
          </table:table-cell>
          <table:table-cell>
            <text:p>ACOTH</text:p>
          </table:table-cell>
          <table:table-cell>
            <text:p>1.0</text:p>
          </table:table-cell>
          <table:table-cell table:style-name="ce13" office:value-type="date" office:date-value="2007-01-12">
            <text:p>12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72">
          <table:table-cell>
            <text:p>14</text:p>
          </table:table-cell>
          <table:table-cell>
            <text:p>WORK_WEEK</text:p>
          </table:table-cell>
          <table:table-cell>
            <text:p>1.1</text:p>
          </table:table-cell>
          <table:table-cell table:style-name="ce13" office:value-type="date" office:date-value="2007-01-14">
            <text:p>14/01/07</text:p>
          </table:table-cell>
          <table:table-cell>
            <text:p>deleted unused variable yday</text:p>
          </table:table-cell>
          <table:table-cell table:number-columns-repeated="251"/>
        </table:table-row>
        <table:table-row table:style-name="ro72">
          <table:table-cell>
            <text:p>14</text:p>
          </table:table-cell>
          <table:table-cell>
            <text:p>SCALE_X2</text:p>
          </table:table-cell>
          <table:table-cell>
            <text:p>1.0</text:p>
          </table:table-cell>
          <table:table-cell table:style-name="ce13" office:value-type="date" office:date-value="2007-01-19">
            <text:p>19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72">
          <table:table-cell>
            <text:p>14</text:p>
          </table:table-cell>
          <table:table-cell>
            <text:p>DCF_77</text:p>
          </table:table-cell>
          <table:table-cell>
            <text:p>1.1</text:p>
          </table:table-cell>
          <table:table-cell table:style-name="ce13" office:value-type="date" office:date-value="2007-02-02">
            <text:p>02/02/07</text:p>
          </table:table-cell>
          <table:table-cell>
            <text:p>change wday and dst outputs when there is no dcf reception</text:p>
          </table:table-cell>
          <table:table-cell table:number-columns-repeated="251"/>
        </table:table-row>
        <table:table-row table:style-name="ro72">
          <table:table-cell>
            <text:p>14</text:p>
          </table:table-cell>
          <table:table-cell>
            <text:p>FT_IMP</text:p>
          </table:table-cell>
          <table:table-cell>
            <text:p>1.1</text:p>
          </table:table-cell>
          <table:table-cell table:style-name="ce13" office:value-type="date" office:date-value="2007-01-03">
            <text:p>03/01/07</text:p>
          </table:table-cell>
          <table:table-cell>
            <text:p>Added faktor K</text:p>
          </table:table-cell>
          <table:table-cell table:style-name="ce14"/>
          <table:table-cell table:number-columns-repeated="250"/>
        </table:table-row>
        <table:table-row table:style-name="ro72">
          <table:table-cell>
            <text:p>14</text:p>
          </table:table-cell>
          <table:table-cell>
            <text:p>SH_1</text:p>
          </table:table-cell>
          <table:table-cell>
            <text:p>1.1</text:p>
          </table:table-cell>
          <table:table-cell table:style-name="ce13" office:value-type="date" office:date-value="2007-01-06">
            <text:p>06/01/07</text:p>
          </table:table-cell>
          <table:table-cell>
            <text:p>Added output trig</text:p>
          </table:table-cell>
          <table:table-cell table:number-columns-repeated="251"/>
        </table:table-row>
        <table:table-row table:style-name="ro72">
          <table:table-cell>
            <text:p>14</text:p>
          </table:table-cell>
          <table:table-cell>
            <text:p>MUX_R4</text:p>
          </table:table-cell>
          <table:table-cell>
            <text:p>1.0</text:p>
          </table:table-cell>
          <table:table-cell table:style-name="ce13" office:value-type="date" office:date-value="2007-01-19">
            <text:p>19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72">
          <table:table-cell>
            <text:p>14</text:p>
          </table:table-cell>
          <table:table-cell>
            <text:p>DELAY_4</text:p>
          </table:table-cell>
          <table:table-cell>
            <text:p>1.1</text:p>
          </table:table-cell>
          <table:table-cell table:style-name="ce13" office:value-type="date" office:date-value="2007-01-19">
            <text:p>19/01/07</text:p>
          </table:table-cell>
          <table:table-cell>
            <text:p>added variable temp to add 1 delay <text:s/>for q1</text:p>
          </table:table-cell>
          <table:table-cell table:number-columns-repeated="251"/>
        </table:table-row>
        <table:table-row table:style-name="ro72">
          <table:table-cell>
            <text:p>14</text:p>
          </table:table-cell>
          <table:table-cell>
            <text:p>WORD_OF_DWORD</text:p>
          </table:table-cell>
          <table:table-cell>
            <text:p>1.0</text:p>
          </table:table-cell>
          <table:table-cell table:style-name="ce13" office:value-type="date" office:date-value="2007-01-17">
            <text:p>17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72">
          <table:table-cell>
            <text:p>14</text:p>
          </table:table-cell>
          <table:table-cell>
            <text:p>_ARRAY_SORT</text:p>
          </table:table-cell>
          <table:table-cell>
            <text:p>1.1</text:p>
          </table:table-cell>
          <table:table-cell table:style-name="ce13" office:value-type="date" office:date-value="2007-01-06">
            <text:p>06/01/07</text:p>
          </table:table-cell>
          <table:table-cell>
            <text:p>Function now returns TRUE</text:p>
          </table:table-cell>
          <table:table-cell table:number-columns-repeated="251"/>
        </table:table-row>
        <table:table-row table:style-name="ro73">
          <table:table-cell>
            <text:p>14</text:p>
          </table:table-cell>
          <table:table-cell>
            <text:p>BURNER </text:p>
          </table:table-cell>
          <table:table-cell>
            <text:p>1.4</text:p>
          </table:table-cell>
          <table:table-cell table:style-name="ce13" office:value-type="date" office:date-value="2007-01-22">
            <text:p>22/01/07</text:p>
          </table:table-cell>
          <table:table-cell>
            <text:p>Changed output „fail“ to „status“</text:p>
            <text:p>added output „cycles“</text:p>
            <text:p>corrected an error while pre_heat would be active when an error was present</text:p>
            <text:p>added „coil2“ output and „stage2“ input for dual stage burners</text:p>
          </table:table-cell>
          <table:table-cell table:number-columns-repeated="251"/>
        </table:table-row>
        <table:table-row table:style-name="ro74">
          <table:table-cell>
            <text:p>14</text:p>
          </table:table-cell>
          <table:table-cell>
            <text:p>TEMP_PT</text:p>
          </table:table-cell>
          <table:table-cell>
            <text:p>1.1</text:p>
          </table:table-cell>
          <table:table-cell table:style-name="ce13" office:value-type="date" office:date-value="2007-01-24">
            <text:p>24/01/07</text:p>
          </table:table-cell>
          <table:table-cell>
            <text:p>deleted input R0 which was not used</text:p>
          </table:table-cell>
          <table:table-cell table:number-columns-repeated="251"/>
        </table:table-row>
        <table:table-row table:style-name="ro74">
          <table:table-cell>
            <text:p>14</text:p>
          </table:table-cell>
          <table:table-cell>
            <text:p>OFFSET_2</text:p>
          </table:table-cell>
          <table:table-cell>
            <text:p>1.0</text:p>
          </table:table-cell>
          <table:table-cell table:style-name="ce13" office:value-type="date" office:date-value="2007-01-12">
            <text:p>12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75">
          <table:table-cell>
            <text:p>14</text:p>
          </table:table-cell>
          <table:table-cell>
            <text:p>FT_PT1</text:p>
          </table:table-cell>
          <table:table-cell>
            <text:p>1.1</text:p>
          </table:table-cell>
          <table:table-cell table:style-name="ce13" office:value-type="date" office:date-value="2007-01-01">
            <text:p>01/01/07</text:p>
          </table:table-cell>
          <table:table-cell>
            <text:p>Corrected error during startup</text:p>
            <text:p>corrected error with very small time values &lt; 10ms</text:p>
          </table:table-cell>
          <table:table-cell table:number-columns-repeated="251"/>
        </table:table-row>
        <table:table-row table:style-name="ro76">
          <table:table-cell>
            <text:p>14</text:p>
          </table:table-cell>
          <table:table-cell>
            <text:p>COSH</text:p>
          </table:table-cell>
          <table:table-cell>
            <text:p>1.0</text:p>
          </table:table-cell>
          <table:table-cell table:style-name="ce13" office:value-type="date" office:date-value="2007-01-12">
            <text:p>12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76">
          <table:table-cell>
            <text:p>14</text:p>
          </table:table-cell>
          <table:table-cell>
            <text:p>TANH</text:p>
          </table:table-cell>
          <table:table-cell>
            <text:p>1.0</text:p>
          </table:table-cell>
          <table:table-cell table:style-name="ce13" office:value-type="date" office:date-value="2007-01-12">
            <text:p>12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77">
          <table:table-cell>
            <text:p>14</text:p>
          </table:table-cell>
          <table:table-cell>
            <text:p>FT_DERIV</text:p>
          </table:table-cell>
          <table:table-cell>
            <text:p>1.1</text:p>
          </table:table-cell>
          <table:table-cell table:style-name="ce13" office:value-type="date" office:date-value="2007-01-03">
            <text:p>03/01/07</text:p>
          </table:table-cell>
          <table:table-cell>
            <text:p>Added init code for startup</text:p>
            <text:p>set default for K to 1</text:p>
          </table:table-cell>
          <table:table-cell table:number-columns-repeated="251"/>
        </table:table-row>
        <table:table-row table:style-name="ro78">
          <table:table-cell>
            <text:p>14</text:p>
          </table:table-cell>
          <table:table-cell>
            <text:p>RMP_SOFT</text:p>
          </table:table-cell>
          <table:table-cell>
            <text:p>1.0</text:p>
          </table:table-cell>
          <table:table-cell table:style-name="ce13" office:value-type="date" office:date-value="2007-01-22">
            <text:p>22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78">
          <table:table-cell>
            <text:p>14</text:p>
          </table:table-cell>
          <table:table-cell>
            <text:p>ATANH</text:p>
          </table:table-cell>
          <table:table-cell>
            <text:p>1.0</text:p>
          </table:table-cell>
          <table:table-cell table:style-name="ce13" office:value-type="date" office:date-value="2007-01-12">
            <text:p>12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78">
          <table:table-cell>
            <text:p>14</text:p>
          </table:table-cell>
          <table:table-cell>
            <text:p>FT_INT</text:p>
          </table:table-cell>
          <table:table-cell>
            <text:p>1.2</text:p>
          </table:table-cell>
          <table:table-cell table:style-name="ce13" office:value-type="date" office:date-value="2007-01-15">
            <text:p>15/01/07</text:p>
          </table:table-cell>
          <table:table-cell>
            <text:p>Added default value for K = 1</text:p>
          </table:table-cell>
          <table:table-cell table:style-name="ce14"/>
          <table:table-cell table:number-columns-repeated="250"/>
        </table:table-row>
        <table:table-row table:style-name="ro78">
          <table:table-cell>
            <text:p>14</text:p>
          </table:table-cell>
          <table:table-cell>
            <text:p>COTH</text:p>
          </table:table-cell>
          <table:table-cell>
            <text:p>1.0</text:p>
          </table:table-cell>
          <table:table-cell table:style-name="ce13" office:value-type="date" office:date-value="2007-01-12">
            <text:p>12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78">
          <table:table-cell>
            <text:p>14</text:p>
          </table:table-cell>
          <table:table-cell>
            <text:p>DWORD_OF_BYTE</text:p>
          </table:table-cell>
          <table:table-cell>
            <text:p>1.0</text:p>
          </table:table-cell>
          <table:table-cell table:style-name="ce13" office:value-type="date" office:date-value="2007-01-24">
            <text:p>24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78">
          <table:table-cell>
            <text:p>14</text:p>
          </table:table-cell>
          <table:table-cell>
            <text:p>MS_TO_KMH</text:p>
          </table:table-cell>
          <table:table-cell>
            <text:p>1.0</text:p>
          </table:table-cell>
          <table:table-cell table:style-name="ce13" office:value-type="date" office:date-value="2007-02-04">
            <text:p>04/02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79">
          <table:table-cell>
            <text:p>14</text:p>
          </table:table-cell>
          <table:table-cell>
            <text:p>RMP_B</text:p>
          </table:table-cell>
          <table:table-cell>
            <text:p>1.2</text:p>
          </table:table-cell>
          <table:table-cell table:style-name="ce13" office:value-type="date" office:date-value="2007-01-17">
            <text:p>17/01/07</text:p>
          </table:table-cell>
          <table:table-cell>
            <text:p>Renamed input UD to UP for better usability</text:p>
            <text:p>deleted unused variable step</text:p>
          </table:table-cell>
          <table:table-cell table:number-columns-repeated="251"/>
        </table:table-row>
        <table:table-row table:style-name="ro80">
          <table:table-cell>
            <text:p>14</text:p>
          </table:table-cell>
          <table:table-cell>
            <text:p>TEMP_NI</text:p>
          </table:table-cell>
          <table:table-cell>
            <text:p>1.1</text:p>
          </table:table-cell>
          <table:table-cell table:style-name="ce13" office:value-type="date" office:date-value="2007-01-24">
            <text:p>24/01/07</text:p>
          </table:table-cell>
          <table:table-cell>
            <text:p>deleted input R0 which was not used</text:p>
          </table:table-cell>
          <table:table-cell table:number-columns-repeated="251"/>
        </table:table-row>
        <table:table-row table:style-name="ro80">
          <table:table-cell>
            <text:p>14</text:p>
          </table:table-cell>
          <table:table-cell>
            <text:p>ESR_MON_B8</text:p>
          </table:table-cell>
          <table:table-cell>
            <text:p>1.0</text:p>
          </table:table-cell>
          <table:table-cell table:style-name="ce13" office:value-type="date" office:date-value="2007-01-26">
            <text:p>26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80">
          <table:table-cell>
            <text:p>14</text:p>
          </table:table-cell>
          <table:table-cell>
            <text:p>ESR_MON_R4</text:p>
          </table:table-cell>
          <table:table-cell>
            <text:p>1.0</text:p>
          </table:table-cell>
          <table:table-cell table:style-name="ce13" office:value-type="date" office:date-value="2007-01-26">
            <text:p>26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81">
          <table:table-cell>
            <text:p>14</text:p>
          </table:table-cell>
          <table:table-cell>
            <text:p>FT_AVG</text:p>
          </table:table-cell>
          <table:table-cell>
            <text:p>1.1</text:p>
          </table:table-cell>
          <table:table-cell table:style-name="ce13" office:value-type="date" office:date-value="2007-01-07">
            <text:p>07/01/07</text:p>
          </table:table-cell>
          <table:table-cell>
            <text:p>Changed reset logic to load buffer with IN instead of 0</text:p>
            <text:p>added EN input for better flow control</text:p>
            <text:p>added init to avoid erroneous startup conditions</text:p>
            <text:p>deleted unused variable CNT</text:p>
          </table:table-cell>
          <table:table-cell table:number-columns-repeated="251"/>
        </table:table-row>
        <table:table-row table:style-name="ro82">
          <table:table-cell>
            <text:p>14</text:p>
          </table:table-cell>
          <table:table-cell>
            <text:p>OFFSET</text:p>
          </table:table-cell>
          <table:table-cell>
            <text:p>1.0</text:p>
          </table:table-cell>
          <table:table-cell table:style-name="ce13" office:value-type="date" office:date-value="2007-01-12">
            <text:p>12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83">
          <table:table-cell>
            <text:p>14</text:p>
          </table:table-cell>
          <table:table-cell>
            <text:p>EXEC</text:p>
          </table:table-cell>
          <table:table-cell>
            <text:p>1.1</text:p>
          </table:table-cell>
          <table:table-cell table:style-name="ce13" office:value-type="date" office:date-value="2007-02-06">
            <text:p>06/02/07</text:p>
          </table:table-cell>
          <table:table-cell>
            <text:p>Corrected error with COS function</text:p>
            <text:p>divide by 0 wilol return an error now</text:p>
          </table:table-cell>
          <table:table-cell table:number-columns-repeated="251"/>
        </table:table-row>
        <table:table-row table:style-name="ro84">
          <table:table-cell>
            <text:p>14</text:p>
          </table:table-cell>
          <table:table-cell>
            <text:p>AIN</text:p>
          </table:table-cell>
          <table:table-cell>
            <text:p>1.2</text:p>
          </table:table-cell>
          <table:table-cell table:style-name="ce13" office:value-type="date" office:date-value="2007-01-19">
            <text:p>19/01/07</text:p>
          </table:table-cell>
          <table:table-cell>
            <text:p>fixed an error with sign bit.</text:p>
          </table:table-cell>
          <table:table-cell table:number-columns-repeated="251"/>
        </table:table-row>
        <table:table-row table:style-name="ro85">
          <table:table-cell>
            <text:p>14</text:p>
          </table:table-cell>
          <table:table-cell>
            <text:p>LTIME</text:p>
          </table:table-cell>
          <table:table-cell>
            <text:p>1.2</text:p>
          </table:table-cell>
          <table:table-cell table:style-name="ce13" office:value-type="date" office:date-value="2007-01-17">
            <text:p>17/01/07</text:p>
          </table:table-cell>
          <table:table-cell>
            <text:p>Added input UTC instead of internal SYSRTCGETTIME for better compatibility with different Hardware</text:p>
            <text:p>corrected an error while DST_ENABLE would not be checked before DST is enabled</text:p>
          </table:table-cell>
          <table:table-cell table:number-columns-repeated="251"/>
        </table:table-row>
        <table:table-row table:style-name="ro85">
          <table:table-cell>
            <text:p>14</text:p>
          </table:table-cell>
          <table:table-cell>
            <text:p>BURNER </text:p>
          </table:table-cell>
          <table:table-cell>
            <text:p>1.1</text:p>
          </table:table-cell>
          <table:table-cell table:style-name="ce13" office:value-type="date" office:date-value="2006-12-31">
            <text:p>31/12/06</text:p>
          </table:table-cell>
          <table:table-cell>
            <text:p>Added Pre heating time and output</text:p>
            <text:p>flame monitor before ignition will generate error output now</text:p>
            <text:p>added output for Kwh</text:p>
          </table:table-cell>
          <table:table-cell table:number-columns-repeated="251"/>
        </table:table-row>
        <table:table-row table:style-name="ro86">
          <table:table-cell>
            <text:p>14</text:p>
          </table:table-cell>
          <table:table-cell>
            <text:p>WINDOW</text:p>
          </table:table-cell>
          <table:table-cell>
            <text:p>1.1</text:p>
          </table:table-cell>
          <table:table-cell table:style-name="ce13" office:value-type="date" office:date-value="2007-01-22">
            <text:p>22/01/07</text:p>
          </table:table-cell>
          <table:table-cell>
            <text:p>Changed input arrangement</text:p>
          </table:table-cell>
          <table:table-cell table:number-columns-repeated="251"/>
        </table:table-row>
        <table:table-row table:style-name="ro86">
          <table:table-cell>
            <text:p>14</text:p>
          </table:table-cell>
          <table:table-cell>
            <text:p>TEMP_SI</text:p>
          </table:table-cell>
          <table:table-cell>
            <text:p>1.1</text:p>
          </table:table-cell>
          <table:table-cell table:style-name="ce13" office:value-type="date" office:date-value="2007-01-24">
            <text:p>24/01/07</text:p>
          </table:table-cell>
          <table:table-cell>
            <text:p>deleted input R0 which was not used</text:p>
          </table:table-cell>
          <table:table-cell table:number-columns-repeated="251"/>
        </table:table-row>
        <table:table-row table:style-name="ro86">
          <table:table-cell>
            <text:p>14</text:p>
          </table:table-cell>
          <table:table-cell>
            <text:p>WORD_OF_BYTE</text:p>
          </table:table-cell>
          <table:table-cell>
            <text:p>1.0</text:p>
          </table:table-cell>
          <table:table-cell table:style-name="ce13" office:value-type="date" office:date-value="2007-01-24">
            <text:p>24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86">
          <table:table-cell>
            <text:p>14</text:p>
          </table:table-cell>
          <table:table-cell>
            <text:p>ESR_COLLECT</text:p>
          </table:table-cell>
          <table:table-cell>
            <text:p>1.0</text:p>
          </table:table-cell>
          <table:table-cell table:style-name="ce13" office:value-type="date" office:date-value="2007-01-26">
            <text:p>26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86">
          <table:table-cell>
            <text:p>14</text:p>
          </table:table-cell>
          <table:table-cell>
            <text:p>SINH</text:p>
          </table:table-cell>
          <table:table-cell>
            <text:p>1.0</text:p>
          </table:table-cell>
          <table:table-cell table:style-name="ce13" office:value-type="date" office:date-value="2007-01-12">
            <text:p>12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86">
          <table:table-cell>
            <text:p>14</text:p>
          </table:table-cell>
          <table:table-cell>
            <text:p>FT_TN64</text:p>
          </table:table-cell>
          <table:table-cell>
            <text:p>1.0</text:p>
          </table:table-cell>
          <table:table-cell table:style-name="ce13" office:value-type="date" office:date-value="2007-01-01">
            <text:p>01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86">
          <table:table-cell>
            <text:p>14</text:p>
          </table:table-cell>
          <table:table-cell>
            <text:p>MID_3</text:p>
          </table:table-cell>
          <table:table-cell>
            <text:p>1.0</text:p>
          </table:table-cell>
          <table:table-cell table:style-name="ce13" office:value-type="date" office:date-value="2007-01-01">
            <text:p>01/01/07</text:p>
          </table:table-cell>
          <table:table-cell>
            <text:p>New Module</text:p>
          </table:table-cell>
          <table:table-cell table:number-columns-repeated="251"/>
        </table:table-row>
        <table:table-row table:style-name="ro87">
          <table:table-cell>
            <text:p>14</text:p>
          </table:table-cell>
          <table:table-cell>
            <text:p>SCALE_B2</text:p>
          </table:table-cell>
          <table:table-cell>
            <text:p>1.1</text:p>
          </table:table-cell>
          <table:table-cell table:style-name="ce13" office:value-type="date" office:date-value="2007-01-19">
            <text:p>19/01/07</text:p>
          </table:table-cell>
          <table:table-cell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88">
          <table:table-cell>
            <text:p>13</text:p>
          </table:table-cell>
          <table:table-cell>
            <text:p>ACTUATOR_2P </text:p>
          </table:table-cell>
          <table:table-cell>
            <text:p>1.1</text:p>
          </table:table-cell>
          <table:table-cell table:style-name="ce13" office:value-type="date" office:date-value="2006-10-07">
            <text:p>07/10/06</text:p>
          </table:table-cell>
          <table:table-cell>
            <text:p>changed error, pos could not reach 1 or 0 under certain conditions due to error in code</text:p>
          </table:table-cell>
          <table:table-cell table:number-columns-repeated="251"/>
        </table:table-row>
        <table:table-row table:style-name="ro88">
          <table:table-cell>
            <text:p>13</text:p>
          </table:table-cell>
          <table:table-cell>
            <text:p>DATE_ADD</text:p>
          </table:table-cell>
          <table:table-cell>
            <text:p>1.0</text:p>
          </table:table-cell>
          <table:table-cell table:style-name="ce13" office:value-type="date" office:date-value="2006-12-27">
            <text:p>27/12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88">
          <table:table-cell>
            <text:p>13</text:p>
          </table:table-cell>
          <table:table-cell>
            <text:p>TEMP_EXT</text:p>
          </table:table-cell>
          <table:table-cell>
            <text:p>1.0</text:p>
          </table:table-cell>
          <table:table-cell table:style-name="ce13" office:value-type="date" office:date-value="2006-12-06">
            <text:p>06/12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88">
          <table:table-cell>
            <text:p>13</text:p>
          </table:table-cell>
          <table:table-cell>
            <text:p>K_TO_C</text:p>
          </table:table-cell>
          <table:table-cell>
            <text:p>1.0</text:p>
          </table:table-cell>
          <table:table-cell table:style-name="ce13" office:value-type="date" office:date-value="2006-12-04">
            <text:p>04/12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88">
          <table:table-cell>
            <text:p>13</text:p>
          </table:table-cell>
          <table:table-cell>
            <text:p>RMP_B</text:p>
          </table:table-cell>
          <table:table-cell>
            <text:p>1.1</text:p>
          </table:table-cell>
          <table:table-cell table:style-name="ce13" office:value-type="date" office:date-value="2006-10-15">
            <text:p>15/10/06</text:p>
          </table:table-cell>
          <table:table-cell>
            <text:p>Added output busy</text:p>
          </table:table-cell>
          <table:table-cell table:number-columns-repeated="251"/>
        </table:table-row>
        <table:table-row table:style-name="ro88">
          <table:table-cell>
            <text:p>13</text:p>
          </table:table-cell>
          <table:table-cell>
            <text:p>FIND_NONUM</text:p>
          </table:table-cell>
          <table:table-cell>
            <text:p>1.0</text:p>
          </table:table-cell>
          <table:table-cell table:style-name="ce13" office:value-type="date" office:date-value="2006-10-06">
            <text:p>06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88">
          <table:table-cell>
            <text:p>13</text:p>
          </table:table-cell>
          <table:table-cell>
            <text:p>FT_PID</text:p>
          </table:table-cell>
          <table:table-cell>
            <text:p>1.1</text:p>
          </table:table-cell>
          <table:table-cell table:style-name="ce13" office:value-type="date" office:date-value="2006-12-01">
            <text:p>01/12/06</text:p>
          </table:table-cell>
          <table:table-cell>
            <text:p>Changed algorithm to „Trapezregel“ for higher accuracy</text:p>
          </table:table-cell>
          <table:table-cell table:number-columns-repeated="251"/>
        </table:table-row>
        <table:table-row table:style-name="ro88">
          <table:table-cell>
            <text:p>13</text:p>
          </table:table-cell>
          <table:table-cell>
            <text:p>TIMER_1 </text:p>
          </table:table-cell>
          <table:table-cell>
            <text:p>1.2</text:p>
          </table:table-cell>
          <table:table-cell table:style-name="ce13" office:value-type="date" office:date-value="2006-12-25">
            <text:p>25/12/06</text:p>
          </table:table-cell>
          <table:table-cell>
            <text:p>Corrected an error with timer overflow</text:p>
          </table:table-cell>
          <table:table-cell table:number-columns-repeated="251"/>
        </table:table-row>
        <table:table-row table:style-name="ro88">
          <table:table-cell>
            <text:p>13</text:p>
          </table:table-cell>
          <table:table-cell>
            <text:p>TIMER_1 </text:p>
          </table:table-cell>
          <table:table-cell>
            <text:p>1.1</text:p>
          </table:table-cell>
          <table:table-cell table:style-name="ce13" office:value-type="date" office:date-value="2006-12-01">
            <text:p>01/12/06</text:p>
          </table:table-cell>
          <table:table-cell>
            <text:p>Corrected an error whith pulse width = 0</text:p>
          </table:table-cell>
          <table:table-cell table:number-columns-repeated="251"/>
        </table:table-row>
        <table:table-row table:style-name="ro88">
          <table:table-cell>
            <text:p>13</text:p>
          </table:table-cell>
          <table:table-cell>
            <text:p>C_TP_K</text:p>
          </table:table-cell>
          <table:table-cell>
            <text:p>1.0</text:p>
          </table:table-cell>
          <table:table-cell table:style-name="ce13" office:value-type="date" office:date-value="2006-12-04">
            <text:p>04/12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88">
          <table:table-cell>
            <text:p>13</text:p>
          </table:table-cell>
          <table:table-cell>
            <text:p>CYCLE_TIME</text:p>
          </table:table-cell>
          <table:table-cell>
            <text:p>1.1</text:p>
          </table:table-cell>
          <table:table-cell table:style-name="ce13" office:value-type="date" office:date-value="2006-12-12">
            <text:p>12/12/06</text:p>
          </table:table-cell>
          <table:table-cell>
            <text:p>Added output cycles</text:p>
          </table:table-cell>
          <table:table-cell table:number-columns-repeated="251"/>
        </table:table-row>
        <table:table-row table:style-name="ro88">
          <table:table-cell>
            <text:p>13</text:p>
          </table:table-cell>
          <table:table-cell>
            <text:p>TRIM</text:p>
          </table:table-cell>
          <table:table-cell>
            <text:p>1.0</text:p>
          </table:table-cell>
          <table:table-cell table:style-name="ce13" office:value-type="date" office:date-value="2006-10-06">
            <text:p>06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88">
          <table:table-cell>
            <text:p>13</text:p>
          </table:table-cell>
          <table:table-cell>
            <text:p>FINDB_NUM</text:p>
          </table:table-cell>
          <table:table-cell>
            <text:p>1.0</text:p>
          </table:table-cell>
          <table:table-cell table:style-name="ce13" office:value-type="date" office:date-value="2006-10-06">
            <text:p>06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88">
          <table:table-cell>
            <text:p>13</text:p>
          </table:table-cell>
          <table:table-cell>
            <text:p>MUX_4</text:p>
          </table:table-cell>
          <table:table-cell>
            <text:p>1.1</text:p>
          </table:table-cell>
          <table:table-cell table:style-name="ce13" office:value-type="date" office:date-value="2006-10-05">
            <text:p>05/10/06</text:p>
          </table:table-cell>
          <table:table-cell>
            <text:p>rewritten moule in ST for better performance</text:p>
          </table:table-cell>
          <table:table-cell table:number-columns-repeated="251"/>
        </table:table-row>
        <table:table-row table:style-name="ro88">
          <table:table-cell>
            <text:p>13</text:p>
          </table:table-cell>
          <table:table-cell>
            <text:p>FT_RMP</text:p>
          </table:table-cell>
          <table:table-cell>
            <text:p>1.1</text:p>
          </table:table-cell>
          <table:table-cell table:style-name="ce13" office:value-type="date" office:date-value="2006-10-08">
            <text:p>08/10/06</text:p>
          </table:table-cell>
          <table:table-cell>
            <text:p>Added UD output</text:p>
          </table:table-cell>
          <table:table-cell table:number-columns-repeated="251"/>
        </table:table-row>
        <table:table-row table:style-name="ro88">
          <table:table-cell>
            <text:p>13</text:p>
          </table:table-cell>
          <table:table-cell>
            <text:p>FIND_NUM</text:p>
          </table:table-cell>
          <table:table-cell>
            <text:p>1.0</text:p>
          </table:table-cell>
          <table:table-cell table:style-name="ce13" office:value-type="date" office:date-value="2006-10-06">
            <text:p>06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88">
          <table:table-cell>
            <text:p>13</text:p>
          </table:table-cell>
          <table:table-cell>
            <text:p>ACTUATOR_2P </text:p>
          </table:table-cell>
          <table:table-cell>
            <text:p>1.1</text:p>
          </table:table-cell>
          <table:table-cell table:style-name="ce13" office:value-type="date" office:date-value="2006-10-07">
            <text:p>07/10/06</text:p>
          </table:table-cell>
          <table:table-cell>
            <text:p>changed „on“ and „off“ to „force“ and „force_in“ for better usability.</text:p>
          </table:table-cell>
          <table:table-cell table:number-columns-repeated="251"/>
        </table:table-row>
        <table:table-row table:style-name="ro89">
          <table:table-cell>
            <text:p>13</text:p>
          </table:table-cell>
          <table:table-cell>
            <text:p>SEQUENCE_4</text:p>
          </table:table-cell>
          <table:table-cell>
            <text:p>1.2</text:p>
          </table:table-cell>
          <table:table-cell table:style-name="ce13" office:value-type="date" office:date-value="2006-12-01">
            <text:p>01/12/06</text:p>
          </table:table-cell>
          <table:table-cell>
            <text:p>corrected an error in sequence logic</text:p>
            <text:p>added init at startup to prevent erroneous startup conditions</text:p>
          </table:table-cell>
          <table:table-cell table:number-columns-repeated="251"/>
        </table:table-row>
        <table:table-row table:style-name="ro90">
          <table:table-cell>
            <text:p>13</text:p>
          </table:table-cell>
          <table:table-cell>
            <text:p>MUX_2</text:p>
          </table:table-cell>
          <table:table-cell>
            <text:p>1.1</text:p>
          </table:table-cell>
          <table:table-cell table:style-name="ce13" office:value-type="date" office:date-value="2006-10-05">
            <text:p>05/10/06</text:p>
          </table:table-cell>
          <table:table-cell>
            <text:p>rewritten moule in ST for better performance</text:p>
          </table:table-cell>
          <table:table-cell table:number-columns-repeated="251"/>
        </table:table-row>
        <table:table-row table:style-name="ro90">
          <table:table-cell>
            <text:p>13</text:p>
          </table:table-cell>
          <table:table-cell>
            <text:p>UPPERCASE</text:p>
          </table:table-cell>
          <table:table-cell>
            <text:p>1.0</text:p>
          </table:table-cell>
          <table:table-cell table:style-name="ce13" office:value-type="date" office:date-value="2006-10-06">
            <text:p>06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0">
          <table:table-cell>
            <text:p>13</text:p>
          </table:table-cell>
          <table:table-cell>
            <text:p>DAYS_DELTA</text:p>
          </table:table-cell>
          <table:table-cell>
            <text:p>1.0</text:p>
          </table:table-cell>
          <table:table-cell table:style-name="ce13" office:value-type="date" office:date-value="2006-12-27">
            <text:p>27/12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0">
          <table:table-cell>
            <text:p>13</text:p>
          </table:table-cell>
          <table:table-cell>
            <text:p>FT_INT</text:p>
          </table:table-cell>
          <table:table-cell>
            <text:p>1.1</text:p>
          </table:table-cell>
          <table:table-cell table:style-name="ce13" office:value-type="date" office:date-value="2006-12-13">
            <text:p>13/12/06</text:p>
          </table:table-cell>
          <table:table-cell>
            <text:p>Changed algorithm to „Trapezregel“ for higher accuracy</text:p>
          </table:table-cell>
          <table:table-cell table:number-columns-repeated="251"/>
        </table:table-row>
        <table:table-row table:style-name="ro90">
          <table:table-cell>
            <text:p>13</text:p>
          </table:table-cell>
          <table:table-cell>
            <text:p>ACTUATOR_3P </text:p>
          </table:table-cell>
          <table:table-cell>
            <text:p>1.1</text:p>
          </table:table-cell>
          <table:table-cell table:style-name="ce13" office:value-type="date" office:date-value="2006-10-19">
            <text:p>19/10/06</text:p>
          </table:table-cell>
          <table:table-cell>
            <text:p>Added code to avoid overrun of the end_switch</text:p>
          </table:table-cell>
          <table:table-cell table:number-columns-repeated="251"/>
        </table:table-row>
        <table:table-row table:style-name="ro90">
          <table:table-cell>
            <text:p>13</text:p>
          </table:table-cell>
          <table:table-cell>
            <text:p>OSCAT_VERSION</text:p>
          </table:table-cell>
          <table:table-cell>
            <text:p>1.0</text:p>
          </table:table-cell>
          <table:table-cell table:style-name="ce13" office:value-type="date" office:date-value="2006-10-06">
            <text:p>06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0">
          <table:table-cell>
            <text:p>13</text:p>
          </table:table-cell>
          <table:table-cell>
            <text:p>LOWERCASE</text:p>
          </table:table-cell>
          <table:table-cell>
            <text:p>1.0</text:p>
          </table:table-cell>
          <table:table-cell table:style-name="ce13" office:value-type="date" office:date-value="2006-10-06">
            <text:p>06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0">
          <table:table-cell>
            <text:p>13</text:p>
          </table:table-cell>
          <table:table-cell>
            <text:p>FINDB</text:p>
          </table:table-cell>
          <table:table-cell>
            <text:p>1.0</text:p>
          </table:table-cell>
          <table:table-cell table:style-name="ce13" office:value-type="date" office:date-value="2006-10-06">
            <text:p>06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0">
          <table:table-cell>
            <text:p>13</text:p>
          </table:table-cell>
          <table:table-cell>
            <text:p>REAL_TO_STRF</text:p>
          </table:table-cell>
          <table:table-cell>
            <text:p>1.0</text:p>
          </table:table-cell>
          <table:table-cell table:style-name="ce13" office:value-type="date" office:date-value="2006-10-06">
            <text:p>06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0">
          <table:table-cell>
            <text:p>13</text:p>
          </table:table-cell>
          <table:table-cell>
            <text:p>ACTUATOR_PUMP</text:p>
          </table:table-cell>
          <table:table-cell>
            <text:p>1.1</text:p>
          </table:table-cell>
          <table:table-cell table:style-name="ce13" office:value-type="date" office:date-value="2006-12-27">
            <text:p>27/12/06</text:p>
          </table:table-cell>
          <table:table-cell>
            <text:p>Fixed an error while the pump would run for t_min at startup</text:p>
          </table:table-cell>
          <table:table-cell table:number-columns-repeated="251"/>
        </table:table-row>
        <table:table-row table:style-name="ro90">
          <table:table-cell>
            <text:p>13</text:p>
          </table:table-cell>
          <table:table-cell>
            <text:p>EASTER</text:p>
          </table:table-cell>
          <table:table-cell>
            <text:p>1.0</text:p>
          </table:table-cell>
          <table:table-cell table:style-name="ce13" office:value-type="date" office:date-value="2006-12-27">
            <text:p>27/12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0">
          <table:table-cell>
            <text:p>13</text:p>
          </table:table-cell>
          <table:table-cell>
            <text:p>DIFFER</text:p>
          </table:table-cell>
          <table:table-cell>
            <text:p>1.0</text:p>
          </table:table-cell>
          <table:table-cell table:style-name="ce13" office:value-type="date" office:date-value="2006-10-08">
            <text:p>08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0">
          <table:table-cell>
            <text:p>13</text:p>
          </table:table-cell>
          <table:table-cell>
            <text:p>FINDB_NONUM</text:p>
          </table:table-cell>
          <table:table-cell>
            <text:p>1.0</text:p>
          </table:table-cell>
          <table:table-cell table:style-name="ce13" office:value-type="date" office:date-value="2006-10-06">
            <text:p>06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1">
          <table:table-cell>
            <text:p>13</text:p>
          </table:table-cell>
          <table:table-cell>
            <text:p>SEQUENCE_8</text:p>
          </table:table-cell>
          <table:table-cell>
            <text:p>1.2</text:p>
          </table:table-cell>
          <table:table-cell table:style-name="ce13" office:value-type="date" office:date-value="2006-12-01">
            <text:p>01/12/06</text:p>
          </table:table-cell>
          <table:table-cell>
            <text:p>corrected an error in sequence logic</text:p>
            <text:p>added init at startup to prevent erroneous startup conditions</text:p>
          </table:table-cell>
          <table:table-cell table:number-columns-repeated="251"/>
        </table:table-row>
        <table:table-row table:style-name="ro92">
          <table:table-cell>
            <text:p>13</text:p>
          </table:table-cell>
          <table:table-cell>
            <text:p>STATUS_TO_ESR</text:p>
          </table:table-cell>
          <table:table-cell>
            <text:p>1.0</text:p>
          </table:table-cell>
          <table:table-cell table:style-name="ce13" office:value-type="date" office:date-value="2006-10-06">
            <text:p>06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2">
          <table:table-cell>
            <text:p>12</text:p>
          </table:table-cell>
          <table:table-cell>
            <text:p>SECOND</text:p>
          </table:table-cell>
          <table:table-cell>
            <text:p>1.1</text:p>
          </table:table-cell>
          <table:table-cell table:style-name="ce13" office:value-type="date" office:date-value="2006-10-02">
            <text:p>02/10/06</text:p>
          </table:table-cell>
          <table:table-cell>
            <text:p>Changed name of input to ITOD</text:p>
          </table:table-cell>
          <table:table-cell table:number-columns-repeated="251"/>
        </table:table-row>
        <table:table-row table:style-name="ro92">
          <table:table-cell>
            <text:p>12</text:p>
          </table:table-cell>
          <table:table-cell>
            <text:p>RMP_W</text:p>
          </table:table-cell>
          <table:table-cell>
            <text:p>1.1</text:p>
          </table:table-cell>
          <table:table-cell table:style-name="ce13" office:value-type="date" office:date-value="2006-10-04">
            <text:p>04/10/06</text:p>
          </table:table-cell>
          <table:table-cell>
            <text:p>added the busy output which signals that the ramp is running.</text:p>
          </table:table-cell>
          <table:table-cell table:number-columns-repeated="251"/>
        </table:table-row>
        <table:table-row table:style-name="ro92">
          <table:table-cell>
            <text:p>12</text:p>
          </table:table-cell>
          <table:table-cell>
            <text:p>ARRAY_SUM</text:p>
          </table:table-cell>
          <table:table-cell>
            <text:p>1.0</text:p>
          </table:table-cell>
          <table:table-cell table:style-name="ce13" office:value-type="date" office:date-value="2006-10-02">
            <text:p>02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2">
          <table:table-cell>
            <text:p>12</text:p>
          </table:table-cell>
          <table:table-cell>
            <text:p>ARRAY_TREND</text:p>
          </table:table-cell>
          <table:table-cell>
            <text:p>1.0</text:p>
          </table:table-cell>
          <table:table-cell table:style-name="ce13" office:value-type="date" office:date-value="2006-10-02">
            <text:p>02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2">
          <table:table-cell>
            <text:p>12</text:p>
          </table:table-cell>
          <table:table-cell>
            <text:p>LTIME</text:p>
          </table:table-cell>
          <table:table-cell>
            <text:p>1.1</text:p>
          </table:table-cell>
          <table:table-cell table:style-name="ce13" office:value-type="date" office:date-value="2006-10-02">
            <text:p>02/10/06</text:p>
          </table:table-cell>
          <table:table-cell>
            <text:p>corrected an error where dst would be delayed by 0.1second</text:p>
          </table:table-cell>
          <table:table-cell table:number-columns-repeated="251"/>
        </table:table-row>
        <table:table-row table:style-name="ro92">
          <table:table-cell>
            <text:p>12</text:p>
          </table:table-cell>
          <table:table-cell>
            <text:p>LEAP_OF_DATE</text:p>
          </table:table-cell>
          <table:table-cell>
            <text:p>1.1</text:p>
          </table:table-cell>
          <table:table-cell table:style-name="ce13" office:value-type="date" office:date-value="2006-10-02">
            <text:p>02/10/06</text:p>
          </table:table-cell>
          <table:table-cell>
            <text:p>Corrected an error while year 1970 would not work</text:p>
          </table:table-cell>
          <table:table-cell table:number-columns-repeated="251"/>
        </table:table-row>
        <table:table-row table:style-name="ro92">
          <table:table-cell>
            <text:p>12</text:p>
          </table:table-cell>
          <table:table-cell>
            <text:p>CHECK_PARITY</text:p>
          </table:table-cell>
          <table:table-cell>
            <text:p>1.0</text:p>
          </table:table-cell>
          <table:table-cell table:style-name="ce13" office:value-type="date" office:date-value="2006-10-01">
            <text:p>01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2">
          <table:table-cell>
            <text:p>12</text:p>
          </table:table-cell>
          <table:table-cell>
            <text:p>DELAY</text:p>
          </table:table-cell>
          <table:table-cell>
            <text:p>1.1</text:p>
          </table:table-cell>
          <table:table-cell table:style-name="ce13" office:value-type="date" office:date-value="2006-10-01">
            <text:p>01/10/06</text:p>
          </table:table-cell>
          <table:table-cell>
            <text:p>Corrected an error in buffer management</text:p>
          </table:table-cell>
          <table:table-cell table:number-columns-repeated="251"/>
        </table:table-row>
        <table:table-row table:style-name="ro92">
          <table:table-cell>
            <text:p>12</text:p>
          </table:table-cell>
          <table:table-cell>
            <text:p>ARRAY_MIN</text:p>
          </table:table-cell>
          <table:table-cell>
            <text:p>1.0</text:p>
          </table:table-cell>
          <table:table-cell table:style-name="ce13" office:value-type="date" office:date-value="2006-10-02">
            <text:p>02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2">
          <table:table-cell>
            <text:p>12</text:p>
          </table:table-cell>
          <table:table-cell>
            <text:p>ARRAY_MAX</text:p>
          </table:table-cell>
          <table:table-cell>
            <text:p>1.0</text:p>
          </table:table-cell>
          <table:table-cell table:style-name="ce13" office:value-type="date" office:date-value="2006-10-02">
            <text:p>02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3">
          <table:table-cell>
            <text:p>12</text:p>
          </table:table-cell>
          <table:table-cell>
            <text:p>SEQUENCE_4</text:p>
          </table:table-cell>
          <table:table-cell>
            <text:p>1.1</text:p>
          </table:table-cell>
          <table:table-cell table:style-name="ce13" office:value-type="date" office:date-value="2006-10-01">
            <text:p>01/10/06</text:p>
          </table:table-cell>
          <table:table-cell>
            <text:p>Added output any</text:p>
            <text:p>corrected delay to occur aftzer event and not before</text:p>
          </table:table-cell>
          <table:table-cell table:number-columns-repeated="251"/>
        </table:table-row>
        <table:table-row table:style-name="ro94">
          <table:table-cell>
            <text:p>12</text:p>
          </table:table-cell>
          <table:table-cell>
            <text:p>LEAP_YEAR</text:p>
          </table:table-cell>
          <table:table-cell>
            <text:p>1.1</text:p>
          </table:table-cell>
          <table:table-cell table:style-name="ce13" office:value-type="date" office:date-value="2006-10-02">
            <text:p>02/10/06</text:p>
          </table:table-cell>
          <table:table-cell>
            <text:p>Corrected an error while year 1970 would not work</text:p>
          </table:table-cell>
          <table:table-cell table:number-columns-repeated="251"/>
        </table:table-row>
        <table:table-row table:style-name="ro94">
          <table:table-cell>
            <text:p>12</text:p>
          </table:table-cell>
          <table:table-cell>
            <text:p>ARRAY_AVG</text:p>
          </table:table-cell>
          <table:table-cell>
            <text:p>1.0</text:p>
          </table:table-cell>
          <table:table-cell table:style-name="ce13" office:value-type="date" office:date-value="2006-10-02">
            <text:p>02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4">
          <table:table-cell>
            <text:p>12</text:p>
          </table:table-cell>
          <table:table-cell>
            <text:p>ARRAY_SPR</text:p>
          </table:table-cell>
          <table:table-cell>
            <text:p>1.0</text:p>
          </table:table-cell>
          <table:table-cell table:style-name="ce13" office:value-type="date" office:date-value="2006-10-02">
            <text:p>02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4">
          <table:table-cell>
            <text:p>12</text:p>
          </table:table-cell>
          <table:table-cell>
            <text:p>LOCAL_TIME</text:p>
          </table:table-cell>
          <table:table-cell>
            <text:p>1.1</text:p>
          </table:table-cell>
          <table:table-cell table:style-name="ce13" office:value-type="date" office:date-value="2006-10-02">
            <text:p>02/10/06</text:p>
          </table:table-cell>
          <table:table-cell>
            <text:p>Corrected an error while DST would be calculated wrong</text:p>
          </table:table-cell>
          <table:table-cell table:number-columns-repeated="251"/>
        </table:table-row>
        <table:table-row table:style-name="ro94">
          <table:table-cell>
            <text:p>12</text:p>
          </table:table-cell>
          <table:table-cell>
            <text:p>HOUR</text:p>
          </table:table-cell>
          <table:table-cell>
            <text:p>1.1</text:p>
          </table:table-cell>
          <table:table-cell table:style-name="ce13" office:value-type="date" office:date-value="2006-10-02">
            <text:p>02/10/06</text:p>
          </table:table-cell>
          <table:table-cell>
            <text:p>Changed name of input to ITOD</text:p>
          </table:table-cell>
          <table:table-cell table:number-columns-repeated="251"/>
        </table:table-row>
        <table:table-row table:style-name="ro94">
          <table:table-cell>
            <text:p>12</text:p>
          </table:table-cell>
          <table:table-cell>
            <text:p>MULTIME</text:p>
          </table:table-cell>
          <table:table-cell>
            <text:p>1.0</text:p>
          </table:table-cell>
          <table:table-cell table:style-name="ce13" office:value-type="date" office:date-value="2006-10-02">
            <text:p>02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4">
          <table:table-cell>
            <text:p>12</text:p>
          </table:table-cell>
          <table:table-cell>
            <text:p>EVEN</text:p>
          </table:table-cell>
          <table:table-cell>
            <text:p>1.0</text:p>
          </table:table-cell>
          <table:table-cell table:style-name="ce13" office:value-type="date" office:date-value="2006-10-01">
            <text:p>01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4">
          <table:table-cell>
            <text:p>12</text:p>
          </table:table-cell>
          <table:table-cell>
            <text:p>DEW_TEMP</text:p>
          </table:table-cell>
          <table:table-cell>
            <text:p>1.0</text:p>
          </table:table-cell>
          <table:table-cell table:style-name="ce13" office:value-type="date" office:date-value="2006-10-02">
            <text:p>02/10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4">
          <table:table-cell>
            <text:p>12</text:p>
          </table:table-cell>
          <table:table-cell>
            <text:p>MINUTE</text:p>
          </table:table-cell>
          <table:table-cell>
            <text:p>1.1</text:p>
          </table:table-cell>
          <table:table-cell table:style-name="ce13" office:value-type="date" office:date-value="2006-10-02">
            <text:p>02/10/06</text:p>
          </table:table-cell>
          <table:table-cell>
            <text:p>Changed name of input to ITOD</text:p>
          </table:table-cell>
          <table:table-cell table:number-columns-repeated="251"/>
        </table:table-row>
        <table:table-row table:style-name="ro95">
          <table:table-cell>
            <text:p>12</text:p>
          </table:table-cell>
          <table:table-cell>
            <text:p>SEQUENCE_8</text:p>
          </table:table-cell>
          <table:table-cell>
            <text:p>1.1</text:p>
          </table:table-cell>
          <table:table-cell table:style-name="ce13" office:value-type="date" office:date-value="2006-10-01">
            <text:p>01/10/06</text:p>
          </table:table-cell>
          <table:table-cell>
            <text:p>Added output any</text:p>
            <text:p>corrected delay to occur aftzer event and not before</text:p>
          </table:table-cell>
          <table:table-cell table:number-columns-repeated="251"/>
        </table:table-row>
        <table:table-row table:style-name="ro96">
          <table:table-cell>
            <text:p>11</text:p>
          </table:table-cell>
          <table:table-cell>
            <text:p>SH_2</text:p>
          </table:table-cell>
          <table:table-cell>
            <text:p>1.0</text:p>
          </table:table-cell>
          <table:table-cell table:style-name="ce13" office:value-type="date" office:date-value="2006-09-01">
            <text:p>01/09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1</text:p>
          </table:table-cell>
          <table:table-cell>
            <text:p>SH_T</text:p>
          </table:table-cell>
          <table:table-cell>
            <text:p>1.0</text:p>
          </table:table-cell>
          <table:table-cell table:style-name="ce13" office:value-type="date" office:date-value="2006-09-01">
            <text:p>01/09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1</text:p>
          </table:table-cell>
          <table:table-cell>
            <text:p>FT_MIN_MAX</text:p>
          </table:table-cell>
          <table:table-cell>
            <text:p>1.0</text:p>
          </table:table-cell>
          <table:table-cell table:style-name="ce13" office:value-type="date" office:date-value="2006-09-01">
            <text:p>01/09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1</text:p>
          </table:table-cell>
          <table:table-cell>
            <text:p>PARITY</text:p>
          </table:table-cell>
          <table:table-cell>
            <text:p>1.0</text:p>
          </table:table-cell>
          <table:table-cell table:style-name="ce13" office:value-type="date" office:date-value="2006-09-01">
            <text:p>01/09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1</text:p>
          </table:table-cell>
          <table:table-cell>
            <text:p>F_LIN</text:p>
          </table:table-cell>
          <table:table-cell>
            <text:p>1.0</text:p>
          </table:table-cell>
          <table:table-cell table:style-name="ce13" office:value-type="date" office:date-value="2006-09-01">
            <text:p>01/09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1</text:p>
          </table:table-cell>
          <table:table-cell>
            <text:p>F_QUAD</text:p>
          </table:table-cell>
          <table:table-cell>
            <text:p>1.0</text:p>
          </table:table-cell>
          <table:table-cell table:style-name="ce13" office:value-type="date" office:date-value="2006-09-01">
            <text:p>01/09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1</text:p>
          </table:table-cell>
          <table:table-cell>
            <text:p>AIN</text:p>
          </table:table-cell>
          <table:table-cell>
            <text:p>1.1</text:p>
          </table:table-cell>
          <table:table-cell table:style-name="ce13" office:value-type="date" office:date-value="2006-08-18">
            <text:p>18/08/06</text:p>
          </table:table-cell>
          <table:table-cell>
            <text:p>fixed an error with low value negative and high value 0.</text:p>
          </table:table-cell>
          <table:table-cell table:number-columns-repeated="251"/>
        </table:table-row>
        <table:table-row table:style-name="ro96">
          <table:table-cell>
            <text:p>11</text:p>
          </table:table-cell>
          <table:table-cell>
            <text:p>ROUND</text:p>
          </table:table-cell>
          <table:table-cell>
            <text:p>1.0</text:p>
          </table:table-cell>
          <table:table-cell table:style-name="ce13" office:value-type="date" office:date-value="2006-09-01">
            <text:p>01/09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1</text:p>
          </table:table-cell>
          <table:table-cell>
            <text:p>F_POWER</text:p>
          </table:table-cell>
          <table:table-cell>
            <text:p>1.0</text:p>
          </table:table-cell>
          <table:table-cell table:style-name="ce13" office:value-type="date" office:date-value="2006-09-01">
            <text:p>01/09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1</text:p>
          </table:table-cell>
          <table:table-cell>
            <text:p>WEEKDAY</text:p>
          </table:table-cell>
          <table:table-cell>
            <text:p>1.1</text:p>
          </table:table-cell>
          <table:table-cell table:style-name="ce13" office:value-type="date" office:date-value="2006-08-21">
            <text:p>21/08/06</text:p>
          </table:table-cell>
          <table:table-cell>
            <text:p>Coorected an error in formula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TP_R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SET_DT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M_TX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RAD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INC_DEC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MINUTE_TO_TIME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SHR_4UDE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DAY_OF_YEAR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HYST_2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MUX_4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SECOND_TO_TIME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FF_D2E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CLK_4MS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DST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FRACT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SET_TOD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FF_D4E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CLK_DIV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CLK_2MS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PT_TO_F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CLK_PULSE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M_T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DAY_OF_MONTH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DAY_TO_TIME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RES_PT</text:p>
          </table:table-cell>
          <table:table-cell>
            <text:p>1.1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FIFO_16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STACK_32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F_TO_PT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RES_NI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CLK_1MS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MUX_2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BIT_OF_DWORD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FF_JKE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LTCH_4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GEN_SQ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GEN_BIT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SHR_8UDE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HOUR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SHR_4E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B_TRIG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BYTE_OF_BIT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BYTE_TO_BIT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SHR_8PLE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C_TO_F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FF_DRE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STACK_16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SET_DATE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DEG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SWITCH_I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HOUR_TO_TOD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YEAR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HYST_1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MONTH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HOUR_TO_TIME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LTCH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CLK_8MS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RES_SI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F_TO_C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>
          <table:table-cell>
            <text:p>10</text:p>
          </table:table-cell>
          <table:table-cell>
            <text:p>FIFO_32</text:p>
          </table:table-cell>
          <table:table-cell>
            <text:p>1.0</text:p>
          </table:table-cell>
          <table:table-cell table:style-name="ce13" office:value-type="date" office:date-value="2006-08-04">
            <text:p>04/08/06</text:p>
          </table:table-cell>
          <table:table-cell>
            <text:p>New Module</text:p>
          </table:table-cell>
          <table:table-cell table:number-columns-repeated="251"/>
        </table:table-row>
        <table:table-row table:style-name="ro96" table:number-rows-repeated="64865">
          <table:table-cell table:number-columns-repeated="256"/>
        </table:table-row>
        <table:table-row table:style-name="ro96">
          <table:table-cell table:number-columns-repeated="256"/>
        </table:table-row>
      </table:table>
      <table:table table:name="Tabelle2" table:style-name="ta1">
        <table:table-column table:style-name="co9" table:default-cell-style-name="Default"/>
        <table:table-row table:style-name="ro97" table:number-rows-repeated="65535">
          <table:table-cell/>
        </table:table-row>
        <table:table-row table:style-name="ro97">
          <table:table-cell/>
        </table:table-row>
      </table:table>
      <table:table table:name="Tabelle3" table:style-name="ta1">
        <table:table-column table:style-name="co10" table:default-cell-style-name="Default"/>
        <table:table-row table:style-name="ro98" table:number-rows-repeated="65535">
          <table:table-cell/>
        </table:table-row>
        <table:table-row table:style-name="ro98">
          <table:table-cell/>
        </table:table-row>
      </table:table>
      <table:database-ranges>
        <table:database-range table:name="unnamed_FilterIn_Database_1" table:target-range-address="Tabelle1.A400:Tabelle1.IU67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>
    <style:font-face style:name="Arial2" svg:font-family="Arial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margin-left="2cm" fo:margin-right="1cm" style:shadow="none" fo:background-color="transparent" style:writing-mode="lr-tb" style:scale-to-X="1" style:scale-to-Y="100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OSCAT</text:p>
        <text:p>Revision History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08.02.08</text:date>, <text:time>13:43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meta>
    <meta:generator>OpenOffice.org/2.3$Win32 OpenOffice.org_project/680m9$Build-9238</meta:generator>
    <!--645(Build:8693)-->
    <meta:initial-creator>Hans Mühlbauer</meta:initial-creator>
    <meta:creation-date>2007-05-08T08:17:26</meta:creation-date>
    <dc:creator>Hans Muehlbauer</dc:creator>
    <dc:date>2008-02-08T13:43:37</dc:date>
    <dc:language>de-DE</dc:language>
    <meta:editing-cycles>139</meta:editing-cycles>
    <meta:editing-duration>P2DT11H14M25S</meta:editing-duration>
    <meta:user-defined meta:name="Info 1"/>
    <meta:user-defined meta:name="Info 2"/>
    <meta:user-defined meta:name="Info 3"/>
    <meta:user-defined meta:name="Info 4"/>
    <meta:document-statistic meta:table-count="3" meta:cell-count="3336"/>
  </office:meta>
</office:document-meta>
</file>
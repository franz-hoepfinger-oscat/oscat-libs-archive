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4.429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3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4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5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6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wrap-option="wrap" style:rotation-align="bottom" style:vertical-align="top"/>
    </style:style>
    <style:style style:name="ce8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9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0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11" style:family="table-cell" style:parent-style-name="Default">
      <style:table-cell-properties style:rotation-align="bottom" style:vertical-align="top"/>
    </style:style>
    <style:style style:name="ce12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wrap-option="wrap" style:rotation-align="bottom" style:vertical-align="top"/>
    </style:style>
    <style:style style:name="ce14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15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16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17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18" style:family="table-cell" style:parent-style-name="Default" style:data-style-name="N37">
      <style:table-cell-properties fo:wrap-option="wrap" style:rotation-align="bottom" style:vertical-align="top"/>
    </style:style>
    <style:style style:name="ce1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0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21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2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25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27" style:family="table-cell" style:parent-style-name="Default">
      <style:table-cell-properties fo:wrap-option="wrap" style:rotation-align="top"/>
      <style:text-properties fo:font-style="normal" fo:font-weight="bold"/>
    </style:style>
    <style:style style:name="ce28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29" style:family="table-cell" style:parent-style-name="Default">
      <style:table-cell-properties fo:wrap-option="wrap" style:rotation-align="top"/>
      <style:text-properties fo:font-style="normal" fo:font-weight="normal"/>
    </style:style>
    <style:style style:name="ce30" style:family="table-cell" style:parent-style-name="Default">
      <style:table-cell-properties style:rotation-align="top"/>
    </style:style>
    <style:style style:name="ce31" style:family="table-cell" style:parent-style-name="Default">
      <style:table-cell-properties fo:wrap-option="wrap" style:rotation-align="top"/>
    </style:style>
    <style:style style:name="ce32" style:family="table-cell" style:parent-style-name="Default" style:data-style-name="N37">
      <style:table-cell-properties fo:wrap-option="wrap" style:rotation-align="top"/>
    </style:style>
    <style:style style:name="ce33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7"/>
        <table:table-column table:style-name="co4" table:default-cell-style-name="ce19"/>
        <table:table-column table:style-name="co5" table:default-cell-style-name="ce13"/>
        <table:table-column table:style-name="co6" table:number-columns-repeated="2" table:default-cell-style-name="ce31"/>
        <table:table-column table:style-name="co7" table:default-cell-style-name="ce31"/>
        <table:table-column table:style-name="co8" table:number-columns-repeated="247" table:default-cell-style-name="ce31"/>
        <table:table-column table:style-name="co8" table:default-cell-style-name="ce30"/>
        <table:table-row table:style-name="ro1">
          <table:table-cell table:style-name="ce1" office:value-type="string">
            <text:p>Release</text:p>
          </table:table-cell>
          <table:table-cell table:style-name="ce8" office:value-type="string">
            <text:p>Modul name</text:p>
          </table:table-cell>
          <table:table-cell table:style-name="ce1" office:value-type="string">
            <text:p>Rev</text:p>
          </table:table-cell>
          <table:table-cell table:style-name="ce8" office:value-type="string">
            <text:p>Date</text:p>
          </table:table-cell>
          <table:table-cell table:style-name="ce20" office:value-type="string">
            <text:p>History</text:p>
          </table:table-cell>
          <table:table-cell table:style-name="ce27" table:number-columns-repeated="250"/>
          <table:table-cell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9"/>
          <table:table-cell table:style-name="ce21"/>
          <table:table-cell table:style-name="ce28" table:number-columns-repeated="250"/>
          <table:table-cell table:style-name="ce33"/>
        </table:table-row>
        <table:table-row table:style-name="ro1">
          <table:table-cell table:style-name="ce2" office:value-type="string">
            <text:p>273</text:p>
          </table:table-cell>
          <table:table-cell table:style-name="ce10" office:value-type="string">
            <text:p>_ARRAY_SHUFFLE</text:p>
          </table:table-cell>
          <table:table-cell table:style-name="ce2" office:value-type="string">
            <text:p>1.2</text:p>
          </table:table-cell>
          <table:table-cell table:style-name="ce16" office:value-type="date" office:date-value="2008-03-30">
            <text:p>30.03.08</text:p>
          </table:table-cell>
          <table:table-cell table:style-name="ce22" office:value-type="string">
            <text:p>changed last in rdm2 from pos to i+pos for more randomness</text:p>
          </table:table-cell>
          <table:table-cell table:style-name="ce28" table:number-columns-repeated="250"/>
          <table:table-cell table:style-name="ce33"/>
        </table:table-row>
        <table:table-row table:style-name="ro1">
          <table:table-cell table:style-name="ce2" office:value-type="string">
            <text:p>273</text:p>
          </table:table-cell>
          <table:table-cell table:style-name="ce9" office:value-type="string">
            <text:p>TO_UML</text:p>
          </table:table-cell>
          <table:table-cell table:style-name="ce2" office:value-type="string">
            <text:p>1.0</text:p>
          </table:table-cell>
          <table:table-cell table:style-name="ce16" office:value-type="date" office:date-value="2008-03-29">
            <text:p>29.03.08</text:p>
          </table:table-cell>
          <table:table-cell table:style-name="ce21" office:value-type="string">
            <text:p>New Module</text:p>
          </table:table-cell>
          <table:table-cell table:style-name="ce28" table:number-columns-repeated="250"/>
          <table:table-cell table:style-name="ce33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UPPERCASE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RIM1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RIM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ICKE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73</text:p>
          </table:table-cell>
          <table:table-cell table:style-name="ce10" office:value-type="string">
            <text:p>REPLACE_UML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EPLACE_ALL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EAL_TO_STRF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20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MIRRO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MESSAG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LOWERCASE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UPP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N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NCC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LOW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HEX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CTRL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CC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ALPHA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ALN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HEX_TO_DWORD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P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B_NUM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B_NONUM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B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_NUM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_NONUM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_CTRL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_CHA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EXEC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WORD_TO_STRH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8)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DWORD_TO_STRF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20)</text:p>
            <text:p>limit the output string to max 20 digit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WORD_TO_STRB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32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OUNT_CH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OD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H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1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APITALIZ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STRING_LENGTH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YTE_TO_STRH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2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YTE_TO_STRB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9">
            <text:p>29.03.08</text:p>
          </table:table-cell>
          <table:table-cell table:style-name="ce23" office:value-type="string">
            <text:p>changed STRING to STRING(8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GLOBAL CONSTANTS </text:p>
          </table:table-cell>
          <table:table-cell table:style-name="ce3"/>
          <table:table-cell table:style-name="ce17" office:value-type="date" office:date-value="2008-03-28">
            <text:p>28.03.08</text:p>
          </table:table-cell>
          <table:table-cell table:style-name="ce23" office:value-type="string">
            <text:p>Added setup parameter STRING_LENGTH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SORTE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8">
            <text:p>28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RIM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8">
            <text:p>28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X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8">
            <text:p>28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L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8">
            <text:p>28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_CTRL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6">
            <text:p>26.03.08</text:p>
          </table:table-cell>
          <table:table-cell table:style-name="ce23" office:value-type="string">
            <text:p>character 127 is now recognized as control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ND_CH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6">
            <text:p>26.03.08</text:p>
          </table:table-cell>
          <table:table-cell table:style-name="ce23" office:value-type="string">
            <text:p>char will now accept extended ascii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IB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6">
            <text:p>26.03.08</text:p>
          </table:table-cell>
          <table:table-cell table:style-name="ce23" office:value-type="string">
            <text:p>function now returns -1 for input &lt; 0 or &gt; 46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METE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4">
            <text:p>24.03.08</text:p>
          </table:table-cell>
          <table:table-cell table:style-name="ce23" office:value-type="string">
            <text:p>use data_type real2 to extend accuracy to 15 digits total</text:p>
            <text:p>do not use ft_int which adds unnecessary overhea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PERIOD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2">
            <text:p>22.03.08</text:p>
          </table:table-cell>
          <table:table-cell table:style-name="ce23" office:value-type="string">
            <text:p>function would deliver wrong results when d1 and dx are a leap_yea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AYS_DELTA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2">
            <text:p>22.03.08</text:p>
          </table:table-cell>
          <table:table-cell table:style-name="ce23" office:value-type="string">
            <text:p>changed output from int to dint because the total date range is 49710 day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AY_OF_DAT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2">
            <text:p>22.03.08</text:p>
          </table:table-cell>
          <table:table-cell table:style-name="ce23" office:value-type="string">
            <text:p>changed output from int to dint because the total date range is 49710 day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ATE_ADD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2">
            <text:p>22.03.08</text:p>
          </table:table-cell>
          <table:table-cell table:style-name="ce23" office:value-type="string">
            <text:p>fixed some bugs when month was negativ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2_AB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RAC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Replaced TRUNC witht D_TRUNC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MOD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Replaced TRUNC witht D_TRUNC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LOOR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EIL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Replaced TRUNC witht real_to_int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EVE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Changed type of input IN from int to d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LOO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Replaced TRUNC witht real_to_int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EIL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_TRUNC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1">
            <text:p>21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2_ADD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2_MU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2_AD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RIM1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avoid to call replace with pos = 0 because some systems will produce an erro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RI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avoid to call replace with pos = 0 because some systems will produce an error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REAL_TO_STRF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changed trunc to dint because trunc was generating wrong values on wago 842</text:p>
            <text:p>corrected an error with negative number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EXEC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20">
            <text:p>20.03.08</text:p>
          </table:table-cell>
          <table:table-cell table:style-name="ce23" office:value-type="string">
            <text:p>Make sure output of exec will always be in the format x.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NCC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9">
            <text:p>19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IS_CC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9">
            <text:p>19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CRC_CHECK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  <text:p>improved code for better performance<text:tab/>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CRC_GEN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PARSE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HEAT_METER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_STRING_TO_BUFF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UFFER_SEARC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UFFER_TO_STRING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_BUFFER_INSER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GEN_SIN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GEN_RD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T_PT1</text:p>
          </table:table-cell>
          <table:table-cell table:style-name="ce3" office:value-type="string">
            <text:p>1.8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9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DS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  <text:p>code improvement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ESR_MON_R4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deleted wrong conversion real_to_dwor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VA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TREN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S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SP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SDV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MI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ONTIME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MAX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RRAY_AVG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_ARRAY_SORT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_ARRAY_SHUFFL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_ARRAY_MEDIAN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_ARRAY_INI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SET_DATE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SET_DT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SUN_POS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C_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TUN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TUNE2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WORK_WEEK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CF77</text:p>
          </table:table-cell>
          <table:table-cell table:style-name="ce3" office:value-type="string">
            <text:p>1.8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output weekday to wday and dst to ds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IT_LOAD_DW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input bit to val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IT_LOAD_W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input bit to val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IT_LOAD_B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input bit to val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IN1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IN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73</text:p>
          </table:table-cell>
          <table:table-cell table:style-name="ce10" office:value-type="string">
            <text:p>_BUFFER_CLE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3</text:p>
          </table:table-cell>
          <table:table-cell table:style-name="ce10" office:value-type="string">
            <text:p>_BUFFER_INI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s under codesys 3.0</text:p>
            <text:p>changed type of input size to u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YTE_TO_BIT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renamed from byte_to_bit to byte_to_bits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BYTE_TO_BI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renamed from byte_to_bit to byte_to_bits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SET_TOD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DM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ROUND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added type conversion to avoid warning under codesys 3.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SIN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sequence of calculations to impr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ACOS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changed sequence of calculations to impr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3</text:p>
          </table:table-cell>
          <table:table-cell table:style-name="ce10" office:value-type="string">
            <text:p>DIFF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6">
            <text:p>16.03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RDMDW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MULTIM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rounded the result after the last digi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HOUR_TO_TO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rounded the input after the last digi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HOUR_TO_TIM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rounded the input after the last digi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MINUTE_TO_TIM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rounded the input after the last digi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ECOND_TO_TIM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rounded the input after the last digi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ET_TOD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3-14">
            <text:p>14.03.08</text:p>
          </table:table-cell>
          <table:table-cell table:style-name="ce23" office:value-type="string">
            <text:p>changed code to avoid rounding problem at last digit of millisecon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TC_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3">
            <text:p>13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TC_M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3">
            <text:p>13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TC_U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3">
            <text:p>13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RAMP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3">
            <text:p>13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72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8</text:p>
          </table:table-cell>
          <table:table-cell table:style-name="ce17" office:value-type="date" office:date-value="2008-03-13">
            <text:p>13.03.08</text:p>
          </table:table-cell>
          <table:table-cell table:style-name="ce23" office:value-type="string">
            <text:p>changed preset value out_min to -1e37</text:p>
            <text:p>stop integrator at the limits</text:p>
            <text:p>optimized cod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CMP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2">
            <text:p>12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INH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improved accuracy around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INC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LANGEVI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changed formula to avoid problems when x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QRTN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added result 0 for conpatibility reasons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72</text:p>
          </table:table-cell>
          <table:table-cell table:style-name="ce10" office:value-type="string">
            <text:p>FRAC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RN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ROUND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corrected an error with negative number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SIGMOI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3-11">
            <text:p>11.03.08</text:p>
          </table:table-cell>
          <table:table-cell table:style-name="ce23" office:value-type="string">
            <text:p>extended range of valid inputs to +inv / -inv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B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0">
            <text:p>10.03.08</text:p>
          </table:table-cell>
          <table:table-cell table:style-name="ce23" office:value-type="string">
            <text:p>changed output to dint instead of real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AC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0">
            <text:p>10.03.08</text:p>
          </table:table-cell>
          <table:table-cell table:style-name="ce23" office:value-type="string">
            <text:p>changed output of fact to dint to allow bigger values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2</text:p>
          </table:table-cell>
          <table:table-cell table:style-name="ce10" office:value-type="string">
            <text:p>COTH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10">
            <text:p>10.03.08</text:p>
          </table:table-cell>
          <table:table-cell table:style-name="ce23" office:value-type="string">
            <text:p>extended range of valid inputs to +/- INV</text:p>
            <text:p>changed formula for better accuracy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2</text:p>
          </table:table-cell>
          <table:table-cell table:style-name="ce10" office:value-type="string">
            <text:p>TAN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10">
            <text:p>10.03.08</text:p>
          </table:table-cell>
          <table:table-cell table:style-name="ce23" office:value-type="string">
            <text:p>corrected an error in formula</text:p>
            <text:p>extended range of valid inputs to +/- INV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RDM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3-10">
            <text:p>10.03.08</text:p>
          </table:table-cell>
          <table:table-cell table:style-name="ce23" office:value-type="string">
            <text:p>make sure last will be between 0 and 1 to avoid invalid result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_BUFFER_INSER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9">
            <text:p>09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COD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9">
            <text:p>09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HEAT_METE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corrected an error in pulse mod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C_UPP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C_LOW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C_HEX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C_CTR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C_NUM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C_ALPHA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LOWERCAS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added support for exteded Ascii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UPPERCAS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added support for exteded Ascii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TO_LOW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TO_UPP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6">
            <text:p>06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GLOBAL CONSTANTS </text:p>
          </table:table-cell>
          <table:table-cell table:style-name="ce3"/>
          <table:table-cell table:style-name="ce17" office:value-type="date" office:date-value="2008-03-06">
            <text:p>06.03.08</text:p>
          </table:table-cell>
          <table:table-cell table:style-name="ce23" office:value-type="string">
            <text:p>Added EXTENDED_ASCII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BUFFER_TO_STRIN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5">
            <text:p>05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BUFFER_SEARC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5">
            <text:p>05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_STRING_TO_BUFF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5">
            <text:p>05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_BUFFER_INI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5">
            <text:p>05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_BUFFER_CLEA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5">
            <text:p>05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CAPITALIZ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4">
            <text:p>04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P4_CHECK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4">
            <text:p>04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2</text:p>
          </table:table-cell>
          <table:table-cell table:style-name="ce10" office:value-type="string">
            <text:p>REAL_TO_STRF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3-04">
            <text:p>04.03.08</text:p>
          </table:table-cell>
          <table:table-cell table:style-name="ce23" office:value-type="string">
            <text:p>result is now rounded instead of trunc</text:p>
            <text:p>corrected an error with reals &lt; 1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_ARRAY_SHUFFL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3-04">
            <text:p>04.03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HEX_TO_DWOR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04">
            <text:p>04.03.08</text:p>
          </table:table-cell>
          <table:table-cell table:style-name="ce23" office:value-type="string">
            <text:p>added support for a..f and return 0 for invalid string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EXEC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3-04">
            <text:p>04.03.08</text:p>
          </table:table-cell>
          <table:table-cell table:style-name="ce23" office:value-type="string">
            <text:p>add a 0 to the string if a '.' is at the end of the string <text:s text:c="3"/>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REPLACE_UM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UPP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NUM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LOW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IP4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HEX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CTR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ALPHA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S_ALNUM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IP4_DECOD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COUNT_CHA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B_N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B_NON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_CHA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_CTR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P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ADDED MAX(pos,1) in loop initializa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BIT_LOAD_B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BIT_LOAD_DW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BIT_LOAD_W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RDM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B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added findb := 0 for compatibility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_N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added input pos to start search at posi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2</text:p>
          </table:table-cell>
          <table:table-cell table:style-name="ce10" office:value-type="string">
            <text:p>FIND_NONU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9">
            <text:p>29.02.08</text:p>
          </table:table-cell>
          <table:table-cell table:style-name="ce23" office:value-type="string">
            <text:p>added input pos to start search at posi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AOUT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2-23">
            <text:p>23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AOUT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3">
            <text:p>23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AIN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3">
            <text:p>23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POLYNOM_IN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22">
            <text:p>22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TRIANGLE_A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2">
            <text:p>22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SPHERE_V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22">
            <text:p>22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ONE_V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22">
            <text:p>22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IRCLE_C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2">
            <text:p>22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IRCLE_A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22">
            <text:p>22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B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CO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COS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D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R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SI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SIN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TA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ATAN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CO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CO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COS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DIV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EXP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INV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LO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MU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PO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POW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SE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SI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SIN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SQR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SUB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TA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TANH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HYPO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TEMPERATUR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21">
            <text:p>21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RTC_2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0">
            <text:p>20.02.08</text:p>
          </table:table-cell>
          <table:table-cell table:style-name="ce23" office:value-type="string">
            <text:p>Added millisecond set inpu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RTC_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20">
            <text:p>20.02.08</text:p>
          </table:table-cell>
          <table:table-cell table:style-name="ce23" office:value-type="string">
            <text:p>Added millisecond set inpu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WORD_OF_BYT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19">
            <text:p>19.02.08</text:p>
          </table:table-cell>
          <table:table-cell table:style-name="ce23" office:value-type="string">
            <text:p>replaced + with or for better compatibilit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D_TRIG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9">
            <text:p>1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STACK_32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9">
            <text:p>1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STACK_16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9">
            <text:p>1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FIFO_32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9">
            <text:p>1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FIFO_16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9">
            <text:p>19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PARITY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2-18">
            <text:p>18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CHECK_PARITY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2-18">
            <text:p>18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BYTE_OF_BI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8">
            <text:p>18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1</text:p>
          </table:table-cell>
          <table:table-cell table:style-name="ce10" office:value-type="string">
            <text:p>REVERS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18">
            <text:p>18.02.08</text:p>
          </table:table-cell>
          <table:table-cell table:style-name="ce23" office:value-type="string">
            <text:p>Improved code for higher speed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1</text:p>
          </table:table-cell>
          <table:table-cell table:style-name="ce10" office:value-type="string">
            <text:p>BLIND_SECURITY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12">
            <text:p>12.02.08</text:p>
          </table:table-cell>
          <table:table-cell table:style-name="ce23" office:value-type="string">
            <text:p>added config variables rain_up and wind_up</text:p>
            <text:p>position for rain and wind is now configurab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7</text:p>
          </table:table-cell>
          <table:table-cell table:style-name="ce17" office:value-type="date" office:date-value="2008-02-08">
            <text:p>08.02.08</text:p>
          </table:table-cell>
          <table:table-cell table:style-name="ce23" office:value-type="string">
            <text:p>Added interim variable to allow for changes smaller them 8 digits of outpu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MET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08">
            <text:p>08.02.08</text:p>
          </table:table-cell>
          <table:table-cell table:style-name="ce23" office:value-type="string">
            <text:p>Use new version of ft_int and deleted unnecessary limits for integrator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WAP_BYTE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WAP_BYT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EPLACE_AL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CH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return string would not be terminated properl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INDP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MIRRO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TRIM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</text:p>
          </table:table-cell>
          <table:table-cell table:style-name="ce10" office:value-type="string">
            <text:p>LOWERCAS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improved performance</text:p>
            <text:p>added support for Ä,Ö,Ü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</text:p>
          </table:table-cell>
          <table:table-cell table:style-name="ce10" office:value-type="string">
            <text:p>UPPERCAS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2-04">
            <text:p>04.02.08</text:p>
          </table:table-cell>
          <table:table-cell table:style-name="ce23" office:value-type="string">
            <text:p>improved performance</text:p>
            <text:p>added support for Ä,Ö,Ü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EASTE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2-03">
            <text:p>03.02.08</text:p>
          </table:table-cell>
          <table:table-cell table:style-name="ce10" office:value-type="string">
            <text:p>Modifi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DM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2-02">
            <text:p>02.02.08</text:p>
          </table:table-cell>
          <table:table-cell table:style-name="ce23" office:value-type="string">
            <text:p>changed algorithm to avoind non iec functions and guarantee more randomnes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BLIND_SCEN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29">
            <text:p>29.01.08</text:p>
          </table:table-cell>
          <table:table-cell table:style-name="ce23" office:value-type="string">
            <text:p>Replaced shr/shl with and for better performanc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</text:p>
          </table:table-cell>
          <table:table-cell table:style-name="ce10" office:value-type="string">
            <text:p>FT_RMP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25">
            <text:p>25.01.08</text:p>
          </table:table-cell>
          <table:table-cell table:style-name="ce23" office:value-type="string">
            <text:p>Improved algorithm for higher speed</text:p>
            <text:p>allow KR and KF to be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CF77</text:p>
          </table:table-cell>
          <table:table-cell table:style-name="ce3" office:value-type="string">
            <text:p>1.7</text:p>
          </table:table-cell>
          <table:table-cell table:style-name="ce17" office:value-type="date" office:date-value="2008-01-23">
            <text:p>23.01.08</text:p>
          </table:table-cell>
          <table:table-cell table:style-name="ce23" office:value-type="string">
            <text:p>added sdt input which is used to initialize rtc and rtc1 during first cycle. 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TC_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21">
            <text:p>21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TC_M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20">
            <text:p>20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7</text:p>
          </table:table-cell>
          <table:table-cell table:style-name="ce10" office:value-type="string">
            <text:p>SUN_POS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18">
            <text:p>18.01.08</text:p>
          </table:table-cell>
          <table:table-cell table:style-name="ce23" office:value-type="string">
            <text:p>further performance improvements</text:p>
            <text:p>only calculate once every 10 second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UN_TIME</text:p>
          </table:table-cell>
          <table:table-cell table:style-name="ce3"/>
          <table:table-cell table:style-name="ce17" office:value-type="date" office:date-value="2008-01-17">
            <text:p>17.01.08</text:p>
          </table:table-cell>
          <table:table-cell table:style-name="ce23" office:value-type="string">
            <text:p>calculation is now only performed once a day</text:p>
          </table:table-cell>
          <table:table-cell table:style-name="ce30"/>
          <table:table-cell table:style-name="ce29" table:number-columns-repeated="249"/>
          <table:table-cell table:style-name="ce34"/>
        </table:table-row>
        <table:table-row table:style-name="ro3">
          <table:table-cell table:style-name="ce3" office:value-type="string">
            <text:p>27</text:p>
          </table:table-cell>
          <table:table-cell table:style-name="ce10" office:value-type="string">
            <text:p>TIMER_1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8-01-17">
            <text:p>17.01.08</text:p>
          </table:table-cell>
          <table:table-cell table:style-name="ce23" office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COUNT_B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16">
            <text:p>16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ELECT_8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16">
            <text:p>16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INC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15">
            <text:p>15.01.08</text:p>
          </table:table-cell>
          <table:table-cell table:style-name="ce23" office:value-type="string">
            <text:p>Allow for negative increme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ANGE_TO_WOR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9">
            <text:p>09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ANGE_TO_BYT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9">
            <text:p>09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WORD_TO_RANG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9">
            <text:p>09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BYTE_TO_RANG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9">
            <text:p>09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EW_TEMP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08">
            <text:p>08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LEAP_OF_DAT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8">
            <text:p>08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AY_OF_MONTH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08">
            <text:p>08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COT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8">
            <text:p>08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OUN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8">
            <text:p>08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H_2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TAI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CALE_B8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CALE_B4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CALE_B2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GEN_SQR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GEN_SIN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TEMP_SI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TEMP_NI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BAR_GRAP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KMH_TO_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_TO_C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UN_PO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UN_TIME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1-06">
            <text:p>06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_ARRAY_SORT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IN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COS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ATAN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ACOT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algorithm for higher spe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HYST_3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code for high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HYST_2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code for high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T_PT1</text:p>
          </table:table-cell>
          <table:table-cell table:style-name="ce3" office:value-type="string">
            <text:p>1.7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code for high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T_PID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code for high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T_PI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TEMP_PT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replaced /2 with * 0.5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RDM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1-05">
            <text:p>05.01.08</text:p>
          </table:table-cell>
          <table:table-cell table:style-name="ce23" office:value-type="string">
            <text:p>Corrected an error with high values of sps time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PERIO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4">
            <text:p>04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AY_OF_YEA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8-01-04">
            <text:p>04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YEAR_BEGI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4">
            <text:p>04.01.08</text:p>
          </table:table-cell>
          <table:table-cell table:style-name="ce23" office:value-type="string">
            <text:p>formula for step7 was incorrect during leap year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SET_DATE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8-01-03">
            <text:p>03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IRTRANS_DECOD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IRTRANS_8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IRTRANS_4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IRTRANS_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RIVER_4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RIVER_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CLK_DIV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BYTE_OF_DWOR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WORD_OF_DWOR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FIB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deleted unused variable p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WORD_OF_BYT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CRC_GEN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7</text:p>
          </table:table-cell>
          <table:table-cell table:style-name="ce10" office:value-type="string">
            <text:p>DWORD_OF_BYT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8-01-02">
            <text:p>02.01.08</text:p>
          </table:table-cell>
          <table:table-cell table:style-name="ce23" office:value-type="string"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BLIND_INPU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30">
            <text:p>30.12.07</text:p>
          </table:table-cell>
          <table:table-cell table:style-name="ce23" office:value-type="string">
            <text:p>added click_timeout variable and func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IB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WATER_CP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Increased accurac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HR1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HL1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LTCH_4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LTC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F_JK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F_DR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F_D4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F_D2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TAI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TAIR2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HYST_3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ACTUATOR_2P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LINEAR_IN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7">
            <text:p>2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TORE_8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26">
            <text:p>26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MESSAGE_8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26">
            <text:p>26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AD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26">
            <text:p>26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RMP_B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7-12-25">
            <text:p>2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RMP_W</text:p>
          </table:table-cell>
          <table:table-cell table:style-name="ce3" office:value-type="string">
            <text:p>1.7</text:p>
          </table:table-cell>
          <table:table-cell table:style-name="ce17" office:value-type="date" office:date-value="2007-12-25">
            <text:p>25.12.07</text:p>
          </table:table-cell>
          <table:table-cell table:style-name="ce23" office:value-type="string">
            <text:p>corrected an error while step response was too slow for fast rist times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6</text:p>
          </table:table-cell>
          <table:table-cell table:style-name="ce10" office:value-type="string">
            <text:p>HEAT_MET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25">
            <text:p>25.12.07</text:p>
          </table:table-cell>
          <table:table-cell table:style-name="ce23" office:value-type="string">
            <text:p>added config variable return_meter</text:p>
            <text:p>added output C for current consump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MATRIX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23">
            <text:p>23.12.07</text:p>
          </table:table-cell>
          <table:table-cell table:style-name="ce23" office:value-type="string">
            <text:p>added exit statement in for loop instead of i:=5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WEEKDAY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23">
            <text:p>23.12.07</text:p>
          </table:table-cell>
          <table:table-cell table:style-name="ce23" office:value-type="string">
            <text:p>correction for step7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TEMP_PT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2-23">
            <text:p>23.12.07</text:p>
          </table:table-cell>
          <table:table-cell table:style-name="ce23" office:value-type="string">
            <text:p>avoid a negative square root if input values are wrong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YEA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23">
            <text:p>23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6</text:p>
          </table:table-cell>
          <table:table-cell table:style-name="ce10" office:value-type="string">
            <text:p>WORK_WEEK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19">
            <text:p>19.12.07</text:p>
          </table:table-cell>
          <table:table-cell table:style-name="ce23" office:value-type="string">
            <text:p>changed code for better performance</text:p>
            <text:p>changed code to comply with ISO8601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YEAR_BEGI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9">
            <text:p>19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TEMP_NI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17">
            <text:p>1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POLYNOM_IN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7">
            <text:p>17.12.07</text:p>
          </table:table-cell>
          <table:table-cell table:style-name="ce23" office:value-type="string">
            <text:p>init makes no sense for a func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TEMP_SI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17">
            <text:p>1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YEA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16">
            <text:p>16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ET_DATE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16">
            <text:p>16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OSCAT_VERSIO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6">
            <text:p>16.12.07</text:p>
          </table:table-cell>
          <table:table-cell table:style-name="ce23" office:value-type="string">
            <text:p>added possibility to return date and version depoending on i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CLK_8MS</text:p>
          </table:table-cell>
          <table:table-cell table:style-name="ce3"/>
          <table:table-cell table:style-name="ce17" office:value-type="date" office:date-value="2007-12-16">
            <text:p>16.12.07</text:p>
          </table:table-cell>
          <table:table-cell table:style-name="ce23" office:value-type="string">
            <text:p>No longer supported is replaced by CLK_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CLK_4MS</text:p>
          </table:table-cell>
          <table:table-cell table:style-name="ce3"/>
          <table:table-cell table:style-name="ce17" office:value-type="date" office:date-value="2007-12-16">
            <text:p>16.12.07</text:p>
          </table:table-cell>
          <table:table-cell table:style-name="ce23" office:value-type="string">
            <text:p>No longer supported is replaced by CLK_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CLK_2MS</text:p>
          </table:table-cell>
          <table:table-cell table:style-name="ce3"/>
          <table:table-cell table:style-name="ce17" office:value-type="date" office:date-value="2007-12-16">
            <text:p>16.12.07</text:p>
          </table:table-cell>
          <table:table-cell table:style-name="ce23" office:value-type="string">
            <text:p>No longer supported is replaced by CLK_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CLK_1MS</text:p>
          </table:table-cell>
          <table:table-cell table:style-name="ce3"/>
          <table:table-cell table:style-name="ce17" office:value-type="date" office:date-value="2007-12-16">
            <text:p>16.12.07</text:p>
          </table:table-cell>
          <table:table-cell table:style-name="ce23" office:value-type="string">
            <text:p>No longer supported is replaced by CLK_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CLK_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6">
            <text:p>16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EAST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REAL_TO_STRF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DWORD_TO_STR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DWORD_TO_STRB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BYTE_TO_STR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BYTE_TO_STRB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INDB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TICKE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step now starts at 1 instaed of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1" office:value-type="string">
            <text:p>_ARRAY_SORT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2-15">
            <text:p>15.12.07</text:p>
          </table:table-cell>
          <table:table-cell table:style-name="ce23" office:value-type="string">
            <text:p>added function return = tru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IGNAL_4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3">
            <text:p>13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IGNA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3">
            <text:p>13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INT_TO_BC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3">
            <text:p>13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BCD_TO_IN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3">
            <text:p>13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ARRAY_V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2">
            <text:p>1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ARRAY_AVG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2">
            <text:p>1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ARRAY_V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2">
            <text:p>1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ARRAY_TREN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12">
            <text:p>1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ZAN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YAN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XAN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XPRO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SMU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REV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PA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NORM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DPRO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SUB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AD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AN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V3_AB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1">
            <text:p>11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LANGEVI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0">
            <text:p>10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SIGMOI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0">
            <text:p>10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GAMMA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0">
            <text:p>10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FAC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10">
            <text:p>10.12.07</text:p>
          </table:table-cell>
          <table:table-cell table:style-name="ce23" office:value-type="string">
            <text:p>start value for i has changed to 2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TONOF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10">
            <text:p>10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6</text:p>
          </table:table-cell>
          <table:table-cell table:style-name="ce10" office:value-type="string">
            <text:p>PWM_PW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09">
            <text:p>09.12.07</text:p>
          </table:table-cell>
          <table:table-cell table:style-name="ce23" office:value-type="string">
            <text:p>Corrected a problem with F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2</text:p>
          </table:table-cell>
          <table:table-cell table:style-name="ce10" office:value-type="string">
            <text:p>DCF77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orrected a problem with time_zone_offse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1</text:p>
          </table:table-cell>
          <table:table-cell table:style-name="ce10" office:value-type="string">
            <text:p>LTIME_TO_UTC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orrected a problem with time_zone_offse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1</text:p>
          </table:table-cell>
          <table:table-cell table:style-name="ce10" office:value-type="string">
            <text:p>LTIME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orrected a problem with time_zone_offse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1</text:p>
          </table:table-cell>
          <table:table-cell table:style-name="ce10" office:value-type="string">
            <text:p>LOCAL_TIME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orrected a problem with time_zone_offse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ESR_COLLEC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Added reset inpu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ESR_MON_R4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orrected an error while esr type would not be se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CHECK_PARITY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PARITY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8">
            <text:p>08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WC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7">
            <text:p>07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PHERE_V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4">
            <text:p>04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CONE_V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4">
            <text:p>04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CIRCLE_A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4">
            <text:p>04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EXP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04">
            <text:p>04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TICK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04">
            <text:p>04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AIR_DENSITY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4">
            <text:p>04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QRT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ROUN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ASIN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ACOS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AOU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D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DEW_TEMP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5</text:p>
          </table:table-cell>
          <table:table-cell table:style-name="ce10" office:value-type="string">
            <text:p>DEW_CON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  <text:p>output is now in Gramms / Qubic mete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AIR_ENTHALPY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EXP10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AIN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RMP_W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orrected an error in calculation of step respons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TEMP_P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ENSOR_IN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orrected an error in algorithm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RES_SI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RES_P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RES_NI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ONTIME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ged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BAR_GRAP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WATER_DENSITY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new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HEAT_INDEX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new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DEW_R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2">
            <text:p>02.12.07</text:p>
          </table:table-cell>
          <table:table-cell table:style-name="ce23" office:value-type="string">
            <text:p>new code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DS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COT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COS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TAN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IN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IGN_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SIGN_I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EVE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2-01">
            <text:p>01.12.07</text:p>
          </table:table-cell>
          <table:table-cell table:style-name="ce23" office:value-type="string">
            <text:p>changed code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5</text:p>
          </table:table-cell>
          <table:table-cell table:style-name="ce10" office:value-type="string">
            <text:p>FT_PT2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1-30">
            <text:p>30.11.07</text:p>
          </table:table-cell>
          <table:table-cell table:style-name="ce23" office:value-type="string">
            <text:p>changed out to be K * in during initialization</text:p>
            <text:p>avoid divide by 0 if TN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FT_PT1</text:p>
          </table:table-cell>
          <table:table-cell table:style-name="ce3" office:value-type="string">
            <text:p>1.6</text:p>
          </table:table-cell>
          <table:table-cell table:style-name="ce17" office:value-type="date" office:date-value="2007-11-30">
            <text:p>30.11.07</text:p>
          </table:table-cell>
          <table:table-cell table:style-name="ce23" office:value-type="string">
            <text:p>changed out to be K * in during initializa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PWM_PW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27">
            <text:p>27.11.07</text:p>
          </table:table-cell>
          <table:table-cell table:style-name="ce23" office:value-type="string">
            <text:p>avoid divide by 0 when F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PWM_DC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27">
            <text:p>27.11.07</text:p>
          </table:table-cell>
          <table:table-cell table:style-name="ce23" office:value-type="string">
            <text:p>avoid divide by 0 when F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GEN_SIN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27">
            <text:p>27.11.07</text:p>
          </table:table-cell>
          <table:table-cell table:style-name="ce23" office:value-type="string">
            <text:p>avoid divide by 0 when pt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5</text:p>
          </table:table-cell>
          <table:table-cell table:style-name="ce10" office:value-type="string">
            <text:p>GEN_RMP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27">
            <text:p>27.11.07</text:p>
          </table:table-cell>
          <table:table-cell table:style-name="ce23" office:value-type="string">
            <text:p>avoid divide by 0 when pt =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BLIND_SHAD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24">
            <text:p>24.11.07</text:p>
          </table:table-cell>
          <table:table-cell table:style-name="ce23" office:value-type="string">
            <text:p>added shade_delay to avoid constant up and down if sun is out parciall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HOLIDAY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1-24">
            <text:p>24.11.07</text:p>
          </table:table-cell>
          <table:table-cell table:style-name="ce23" office:value-type="string">
            <text:p>changes F_use of <text:s/>Buß_und_Bettag to 0 because this is no official holida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REAL_TO_STRF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20">
            <text:p>20.11.07</text:p>
          </table:table-cell>
          <table:table-cell table:style-name="ce11" office:value-type="string">
            <text:p>when N=0 there will be no dot at the end of the string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GEN_RD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20">
            <text:p>20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4</text:p>
          </table:table-cell>
          <table:table-cell table:style-name="ce10" office:value-type="string">
            <text:p>RDM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20">
            <text:p>20.11.07</text:p>
          </table:table-cell>
          <table:table-cell table:style-name="ce23" office:value-type="string">
            <text:p>changed code of temp calculation to avoid overflow in modr due to resuclt would not fit DINT for high timer value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ACTUATOR_2P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1-19">
            <text:p>19.11.07</text:p>
          </table:table-cell>
          <table:table-cell table:style-name="ce10" office:value-type="string">
            <text:p>replaced left over statement time() with tx</text:p>
          </table:table-cell>
          <table:table-cell table:style-name="ce30"/>
          <table:table-cell table:style-name="ce29" table:number-columns-repeated="249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MIX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19">
            <text:p>19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HEX_TO_DWOR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19">
            <text:p>19.11.07</text:p>
          </table:table-cell>
          <table:table-cell table:style-name="ce10" office:value-type="string">
            <text:p>changed type of function from int to dword</text:p>
          </table:table-cell>
          <table:table-cell table:style-name="ce30"/>
          <table:table-cell table:style-name="ce29" table:number-columns-repeated="249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HEAT_MET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17">
            <text:p>17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_ARRAY_INI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14">
            <text:p>14.11.07</text:p>
          </table:table-cell>
          <table:table-cell table:style-name="ce23" office:value-type="string">
            <text:p>changed size calculation to be more efficie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_ARRAY_SOR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1-14">
            <text:p>14.11.07</text:p>
          </table:table-cell>
          <table:table-cell table:style-name="ce23" office:value-type="string">
            <text:p>changed size calculation to be more efficie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_ARRAY_MEDIAN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1-14">
            <text:p>14.11.07</text:p>
          </table:table-cell>
          <table:table-cell table:style-name="ce23" office:value-type="string">
            <text:p>corrected a problem with size calculation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4</text:p>
          </table:table-cell>
          <table:table-cell table:style-name="ce10" office:value-type="string">
            <text:p>T_PLC_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12">
            <text:p>12.11.07</text:p>
          </table:table-cell>
          <table:table-cell table:style-name="ce23" office:value-type="string">
            <text:p>added temporaray variable tx because some compilers could not handle time() as an argument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4</text:p>
          </table:table-cell>
          <table:table-cell table:style-name="ce10" office:value-type="string">
            <text:p>T_PLC_U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12">
            <text:p>12.11.07</text:p>
          </table:table-cell>
          <table:table-cell table:style-name="ce23" office:value-type="string">
            <text:p>added temporaray variable tx because some compilers could not handle time() as an argument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4</text:p>
          </table:table-cell>
          <table:table-cell table:style-name="ce10" office:value-type="string">
            <text:p>LTIME_TO_UTC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12">
            <text:p>12.11.07</text:p>
          </table:table-cell>
          <table:table-cell table:style-name="ce23" office:value-type="string">
            <text:p>changed Type of time_zone_offset from time to int</text:p>
            <text:p>to allow for time zones with negative offset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4</text:p>
          </table:table-cell>
          <table:table-cell table:style-name="ce10" office:value-type="string">
            <text:p>LTIME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1-12">
            <text:p>12.11.07</text:p>
          </table:table-cell>
          <table:table-cell table:style-name="ce23" office:value-type="string">
            <text:p>changed Type of time_zone_offset from time to int</text:p>
            <text:p>to allow for time zones with negative offse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LOCAL_TIME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1-12">
            <text:p>12.11.07</text:p>
          </table:table-cell>
          <table:table-cell table:style-name="ce23" office:value-type="string">
            <text:p>changed time_zone_offset from time to integer to allow for negative offset time zone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DCF77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1-12">
            <text:p>12.11.07</text:p>
          </table:table-cell>
          <table:table-cell table:style-name="ce23" office:value-type="string">
            <text:p>changed time_offset from time to integer to allow for negative offset time zone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RD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11">
            <text:p>11.11.07</text:p>
          </table:table-cell>
          <table:table-cell table:style-name="ce23" office:value-type="string">
            <text:p>changed time() into t_plc_ms()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MUL_AD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11">
            <text:p>11.11.07</text:p>
          </table:table-cell>
          <table:table-cell table:style-name="ce23" office:value-type="string">
            <text:p>deleted preset values for K and O this makes no sense for a func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NE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11">
            <text:p>11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SG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11">
            <text:p>11.11.07</text:p>
          </table:table-cell>
          <table:table-cell table:style-name="ce23" office:value-type="string">
            <text:p>changed type of function from real to i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LTIME_TO_UTC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05">
            <text:p>05.11.07</text:p>
          </table:table-cell>
          <table:table-cell table:style-name="ce23" office:value-type="string">
            <text:p>replaced literal constant with variable because of error in möller ecp4 compile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CONTROL_SET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4">
            <text:p>04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CONTROL_SET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4">
            <text:p>04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TUN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4">
            <text:p>04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TUNE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3">
            <text:p>03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PARSET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3">
            <text:p>03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5">
          <table:table-cell table:style-name="ce3" office:value-type="string">
            <text:p>24</text:p>
          </table:table-cell>
          <table:table-cell table:style-name="ce10" office:value-type="string">
            <text:p>FT_PI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03">
            <text:p>03.11.07</text:p>
          </table:table-cell>
          <table:table-cell table:style-name="ce23" office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29" table:number-columns-repeated="250"/>
          <table:table-cell table:style-name="ce34"/>
        </table:table-row>
        <table:table-row table:style-name="ro5">
          <table:table-cell table:style-name="ce3" office:value-type="string">
            <text:p>24</text:p>
          </table:table-cell>
          <table:table-cell table:style-name="ce10" office:value-type="string">
            <text:p>FT_PID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1-03">
            <text:p>03.11.07</text:p>
          </table:table-cell>
          <table:table-cell table:style-name="ce23" office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SET_TOD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1-02">
            <text:p>02.11.07</text:p>
          </table:table-cell>
          <table:table-cell table:style-name="ce23" office:value-type="string">
            <text:p>changed dword to DINT in calcualtion to avoid warnings with some compiler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PARSE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2">
            <text:p>02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DEAD_BAN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1-02">
            <text:p>02.11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4</text:p>
          </table:table-cell>
          <table:table-cell table:style-name="ce10" office:value-type="string">
            <text:p>AIR_ENTHALPY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1-02">
            <text:p>02.11.07</text:p>
          </table:table-cell>
          <table:table-cell table:style-name="ce23" office:value-type="string">
            <text:p>deleted unused variable RF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DATE_AD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01">
            <text:p>01.11.07</text:p>
          </table:table-cell>
          <table:table-cell table:style-name="ce23" office:value-type="string">
            <text:p>added int_to_dword stetements to avoid possible overrun with möller ecp4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SET_TO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1-01">
            <text:p>01.11.07</text:p>
          </table:table-cell>
          <table:table-cell table:style-name="ce23" office:value-type="string">
            <text:p>changed coding to avoid possible overrun situation on möller ecp4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SET_DT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1-01">
            <text:p>01.11.07</text:p>
          </table:table-cell>
          <table:table-cell table:style-name="ce23" office:value-type="string">
            <text:p>converted hour type integer to dowrd in calculation to avoid overrun on möller ecp4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WINDOW2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31">
            <text:p>31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FT_PID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0-31">
            <text:p>31.10.07</text:p>
          </table:table-cell>
          <table:table-cell table:style-name="ce23" office:value-type="string">
            <text:p>Rewritten to avoid error when one of the limits is 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FT_PI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31">
            <text:p>31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AIR_ENTHALPY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31">
            <text:p>31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HOLIDAY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31">
            <text:p>31.10.07</text:p>
          </table:table-cell>
          <table:table-cell table:style-name="ce23" office:value-type="string">
            <text:p>changed holiday definition from constant to input constan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BLIND_CONTROL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0-30">
            <text:p>30.10.07</text:p>
          </table:table-cell>
          <table:table-cell table:style-name="ce23" office:value-type="string">
            <text:p>added lockout configuration time for motor direction chang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AIR_DENSITY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29">
            <text:p>29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SD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29">
            <text:p>29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WATER_ENTHALPY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29">
            <text:p>29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FT_DERIV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0-29">
            <text:p>29.10.07</text:p>
          </table:table-cell>
          <table:table-cell table:style-name="ce24" office:value-type="string">
            <text:p>prohibit calculation when tx - last = 0 to avoid div 0 and increase accuracy on fast systems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0-29">
            <text:p>29.10.07</text:p>
          </table:table-cell>
          <table:table-cell table:style-name="ce24" office:value-type="string">
            <text:p>changed code so int will not be called is time difference is 0 to increase accuracy on systems with cycle times below 1m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BLIND_SCEN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24">
            <text:p>24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LTIME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0-24">
            <text:p>24.10.07</text:p>
          </table:table-cell>
          <table:table-cell table:style-name="ce23" office:value-type="string">
            <text:p>changed code because the execution every 100ms can cause major problems </text:p>
            <text:p>if the supplied time was not correct at start. <text:tab/>use of new dst function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LOCAL_TIM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24">
            <text:p>24.10.07</text:p>
          </table:table-cell>
          <table:table-cell table:style-name="ce23" office:value-type="string">
            <text:p>changed dst calculation because function dst was upgraded no error in local_time only a change in DST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DCF77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10-24">
            <text:p>24.10.07</text:p>
          </table:table-cell>
          <table:table-cell table:style-name="ce23" office:value-type="string">
            <text:p>changed dst calculation because function dst was upgraded no error in DCF77 only a change in DST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DS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24">
            <text:p>24.10.07</text:p>
          </table:table-cell>
          <table:table-cell table:style-name="ce23" office:value-type="string">
            <text:p>deleted time_zone_offset input because dst is generally at 01:00 utc and not mesz</text:p>
            <text:p>uk starts 01:00 utc and also gree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FT_PT1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0-23">
            <text:p>23.10.07</text:p>
          </table:table-cell>
          <table:table-cell table:style-name="ce23" office:value-type="string">
            <text:p>added out := in to the init statements</text:p>
          </table:table-cell>
          <table:table-cell table:style-name="ce30"/>
          <table:table-cell table:style-name="ce29" table:number-columns-repeated="249"/>
          <table:table-cell table:style-name="ce34"/>
        </table:table-row>
        <table:table-row table:style-name="ro4">
          <table:table-cell table:style-name="ce3" office:value-type="string">
            <text:p>23</text:p>
          </table:table-cell>
          <table:table-cell table:style-name="ce10" office:value-type="string">
            <text:p>BLIND_SHAD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19">
            <text:p>19.10.07</text:p>
          </table:table-cell>
          <table:table-cell table:style-name="ce23" office:value-type="string">
            <text:p>manual mode was not detected because outputs were checked and not inputs UP and D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3</text:p>
          </table:table-cell>
          <table:table-cell table:style-name="ce10" office:value-type="string">
            <text:p>CONE_V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7">
            <text:p>17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GLOBAL CONSTANTS </text:p>
          </table:table-cell>
          <table:table-cell table:style-name="ce11"/>
          <table:table-cell table:style-name="ce17" office:value-type="date" office:date-value="2007-10-16">
            <text:p>16.10.07</text:p>
          </table:table-cell>
          <table:table-cell table:style-name="ce23" office:value-type="string">
            <text:p>Renamed PI in PI1 for better compatibility to other librarie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DEG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Deg will become 0 when it reaches 360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RA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Rad will become 0 when it reaches 2PI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TRIANGLE_A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SPHERE_V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ELLIPSE_C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ELLIPSE_A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CIRCLE_C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CIRCLE_A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SGN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BLIND_CONTROL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16">
            <text:p>16.10.07</text:p>
          </table:table-cell>
          <table:table-cell table:style-name="ce23" office:value-type="string">
            <text:p>Ignore angle when T_ANGLE &lt; T#100m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BLIND_SHAD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15">
            <text:p>15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4" office:value-type="string">
            <text:p>22</text:p>
          </table:table-cell>
          <table:table-cell table:style-name="ce10" office:value-type="string">
            <text:p>CRC_GEN</text:p>
          </table:table-cell>
          <table:table-cell table:style-name="ce4" office:value-type="string">
            <text:p>1.2</text:p>
          </table:table-cell>
          <table:table-cell table:style-name="ce17" office:value-type="date" office:date-value="2007-10-09">
            <text:p>09.10.07</text:p>
          </table:table-cell>
          <table:table-cell table:style-name="ce23" office:value-type="string">
            <text:p>Added init values for start value and final XOR</text:p>
            <text:p>added reflect_in and reflect_out featur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REVERS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09">
            <text:p>09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SET_D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0-08">
            <text:p>08.10.07</text:p>
          </table:table-cell>
          <table:table-cell table:style-name="ce23" office:value-type="string">
            <text:p>deleted unused variables count and leap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DAY_OF_MONTH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0-08">
            <text:p>08.10.07</text:p>
          </table:table-cell>
          <table:table-cell table:style-name="ce23" office:value-type="string">
            <text:p>deleted unused variable y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_ARRAY_MEDIAN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10-08">
            <text:p>08.10.07</text:p>
          </table:table-cell>
          <table:table-cell table:style-name="ce23" office:value-type="string">
            <text:p>deleted unused variables m and temp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POLYNOM_IN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08">
            <text:p>08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LINEAR_IN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07">
            <text:p>07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2</text:p>
          </table:table-cell>
          <table:table-cell table:style-name="ce10" office:value-type="string">
            <text:p>BLIND_SECURITY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6">
            <text:p>06.10.07</text:p>
          </table:table-cell>
          <table:table-cell table:style-name="ce23" office:value-type="string">
            <text:p>Added pos and angle inputs and outputs</text:p>
            <text:p>actions are now configurab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2</text:p>
          </table:table-cell>
          <table:table-cell table:style-name="ce10" office:value-type="string">
            <text:p>BLIND_INPU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6">
            <text:p>06.10.07</text:p>
          </table:table-cell>
          <table:table-cell table:style-name="ce23" office:value-type="string">
            <text:p>Renamed output ps and as to po and ao</text:p>
            <text:p>added click mode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2</text:p>
          </table:table-cell>
          <table:table-cell table:style-name="ce10" office:value-type="string">
            <text:p>BLIND_NIGH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6">
            <text:p>06.10.07</text:p>
          </table:table-cell>
          <table:table-cell table:style-name="ce23" office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BLIND_CONTROL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6">
            <text:p>06.10.07</text:p>
          </table:table-cell>
          <table:table-cell table:style-name="ce23" office:value-type="string">
            <text:p>Integrated blind_actuator into BLIND_CONTROL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BLIND_ACTUATO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6">
            <text:p>06.10.07</text:p>
          </table:table-cell>
          <table:table-cell table:style-name="ce23" office:value-type="string">
            <text:p>Rearranged output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RMP_W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0-05">
            <text:p>05.10.07</text:p>
          </table:table-cell>
          <table:table-cell table:style-name="ce23" office:value-type="string">
            <text:p>Corrected a problem with pt = 0m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RMP_B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0-05">
            <text:p>05.10.07</text:p>
          </table:table-cell>
          <table:table-cell table:style-name="ce23" office:value-type="string">
            <text:p>Corrected a problem with pt = 0m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2</text:p>
          </table:table-cell>
          <table:table-cell table:style-name="ce10" office:value-type="string">
            <text:p>HEX_TO_DWOR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10-02">
            <text:p>02.10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DAY_OF_DAT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Added step7 compatibilit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MONT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New coding for much better performance, no string functions us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SET_D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Added step7 compatibility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SET_DAT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added step7 compatibility, now call function set_dat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5" office:value-type="string">
            <text:p>21</text:p>
          </table:table-cell>
          <table:table-cell table:style-name="ce10" office:value-type="string">
            <text:p>TIMER_1 </text:p>
          </table:table-cell>
          <table:table-cell table:style-name="ce3" office:value-type="string">
            <text:p>1.5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Corrected a problem , timer would not generate a pulse over midnight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DAY_OF_MONTH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Corrected an error in algorithm.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LEAP_YEAR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Improved code for high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DAY_OF_YE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Added compatibility to step7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YEA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10-01">
            <text:p>01.10.07</text:p>
          </table:table-cell>
          <table:table-cell table:style-name="ce23" office:value-type="string">
            <text:p>Corrected error and added compatibility to Step7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GLOBAL CONSTANTS </text:p>
          </table:table-cell>
          <table:table-cell table:style-name="ce3"/>
          <table:table-cell table:style-name="ce17" office:value-type="date" office:date-value="2007-10-01">
            <text:p>01.10.07</text:p>
          </table:table-cell>
          <table:table-cell table:style-name="ce23" office:value-type="string">
            <text:p>Added Setup Parameter STEP7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BLIND_NIGH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30">
            <text:p>30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BLIND_SHAD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30">
            <text:p>30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BLIND_INPU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29">
            <text:p>29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BLIND_CONTROL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29">
            <text:p>29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BLIND_SECURITY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29">
            <text:p>29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2" office:value-type="string">
            <text:p>BLIND_ACTUATO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29">
            <text:p>29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INTERLOCK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28">
            <text:p>28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1</text:p>
          </table:table-cell>
          <table:table-cell table:style-name="ce10" office:value-type="string">
            <text:p>RMP_W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09-28">
            <text:p>28.09.07</text:p>
          </table:table-cell>
          <table:table-cell table:style-name="ce23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29" table:number-columns-repeated="250"/>
          <table:table-cell table:style-name="ce34"/>
        </table:table-row>
        <table:table-row table:style-name="ro3">
          <table:table-cell table:style-name="ce3" office:value-type="string">
            <text:p>21</text:p>
          </table:table-cell>
          <table:table-cell table:style-name="ce10" office:value-type="string">
            <text:p>RMP_B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09-28">
            <text:p>28.09.07</text:p>
          </table:table-cell>
          <table:table-cell table:style-name="ce23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1</text:p>
          </table:table-cell>
          <table:table-cell table:style-name="ce10" office:value-type="string">
            <text:p>_ARRAY_MEDIAN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22">
            <text:p>22.09.07</text:p>
          </table:table-cell>
          <table:table-cell table:style-name="ce23" office:value-type="string">
            <text:p>chagned code to use array_sort</text:p>
            <text:p>Improved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_ARRAY_SOR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22">
            <text:p>22.09.07</text:p>
          </table:table-cell>
          <table:table-cell table:style-name="ce23" office:value-type="string">
            <text:p>new algorithm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1</text:p>
          </table:table-cell>
          <table:table-cell table:style-name="ce10" office:value-type="string">
            <text:p>PERIO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20">
            <text:p>20.09.07</text:p>
          </table:table-cell>
          <table:table-cell table:style-name="ce23" office:value-type="string">
            <text:p>corrected a problem with leap year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ET_D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9">
            <text:p>19.09.07</text:p>
          </table:table-cell>
          <table:table-cell table:style-name="ce23" office:value-type="string">
            <text:p>Corrected leap year calcula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ET_DAT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9">
            <text:p>19.09.07</text:p>
          </table:table-cell>
          <table:table-cell table:style-name="ce23" office:value-type="string">
            <text:p>Corrected leap year calcula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PERIOD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9">
            <text:p>19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DCF77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ESR_MON_X8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ESR_MON_R4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ESR_MON_B8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RMP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P_R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EQUENCE_8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EQUENCE_4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GEN_SQ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K_PULSE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K_PRG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K_8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K_4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K_2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K_1MS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H_2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H_1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RMP_W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RMP_SOF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RMP_B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GEN_SQ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GEN_SI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GEN_RMP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7">
            <text:p>17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DAYS_DELTA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Corrected an error in algorithm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1" office:value-type="string">
            <text:p>DAY_OF_DAT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METER_STAT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METER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GEN_RDM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ONTIME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M_TX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M_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M_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TN64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TN16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PT2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Deleted unused code section for system time reading and unnecessary startup cod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PT1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US for compatibility and better internal resolu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YCLE_TIM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6">
            <text:p>16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INT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US for compatibility and better internal resolu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DERIV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US for compatibility and better internal resolution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FT_PROFILE 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EMP_EX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IMER_2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IMER_1 </text:p>
          </table:table-cell>
          <table:table-cell table:style-name="ce3" office:value-type="string">
            <text:p>1.4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WITCH_I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PULSE_LENGT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DIMM_I 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LICK 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ACTUATOR_UD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ACTUATOR_PUMP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ACTUATOR_3P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ACTUATOR_2P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5">
            <text:p>15.09.07</text:p>
          </table:table-cell>
          <table:table-cell table:style-name="ce23" office:value-type="string">
            <text:p>Replaced Time() with T_PLC_MS for compatibility and performance reasons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HL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4">
            <text:p>14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HR1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4">
            <text:p>14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OGGLE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3">
            <text:p>13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_PLC_U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4">
            <text:p>14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_PLC_MS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4">
            <text:p>14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AOU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3">
            <text:p>13.09.07</text:p>
          </table:table-cell>
          <table:table-cell table:style-name="ce23" office:value-type="string">
            <text:p>changed code to avoid warning under codesys 2.3.8.1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AIN</text:p>
          </table:table-cell>
          <table:table-cell table:style-name="ce3" office:value-type="string">
            <text:p>1.3</text:p>
          </table:table-cell>
          <table:table-cell table:style-name="ce17" office:value-type="date" office:date-value="2007-09-13">
            <text:p>13.09.07</text:p>
          </table:table-cell>
          <table:table-cell table:style-name="ce23" office:value-type="string">
            <text:p>changed code to avoid warning under codesys 2.3.8.1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RES_NI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3">
            <text:p>13.09.07</text:p>
          </table:table-cell>
          <table:table-cell table:style-name="ce23" office:value-type="string">
            <text:p>Changed coding for better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DEW_TEMP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3">
            <text:p>13.09.07</text:p>
          </table:table-cell>
          <table:table-cell table:style-name="ce25" office:value-type="string">
            <text:p>Changed algorithm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DEW_CO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3">
            <text:p>13.09.07</text:p>
          </table:table-cell>
          <table:table-cell table:style-name="ce25" office:value-type="string">
            <text:p>Changed algorithm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WATER_DENSITY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13">
            <text:p>13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0</text:p>
          </table:table-cell>
          <table:table-cell table:style-name="ce10" office:value-type="string">
            <text:p>DWORD_TO_STRH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1">
            <text:p>11.09.07</text:p>
          </table:table-cell>
          <table:table-cell table:style-name="ce23" office:value-type="string">
            <text:p>changed coding for compatibility with twincat, under twincat concat cannot have a function as argument.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0</text:p>
          </table:table-cell>
          <table:table-cell table:style-name="ce10" office:value-type="string">
            <text:p>BYTE_TO_STRH 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1">
            <text:p>11.09.07</text:p>
          </table:table-cell>
          <table:table-cell table:style-name="ce23" office:value-type="string">
            <text:p>changed coding for compatibility with twincat, under twincat concat cannot have a function as argument.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ET_TOD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1">
            <text:p>11.09.07</text:p>
          </table:table-cell>
          <table:table-cell table:style-name="ce23" office:value-type="string">
            <text:p>changed coding to avoid a compiler warning under twincat.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MATRIX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1">
            <text:p>11.09.07</text:p>
          </table:table-cell>
          <table:table-cell table:style-name="ce23" office:value-type="string">
            <text:p>deleted unused variables k and old_cod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RC_GEN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1">
            <text:p>11.09.07</text:p>
          </table:table-cell>
          <table:table-cell table:style-name="ce23" office:value-type="string">
            <text:p>Deleted unused variable i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CHECK_PARITY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Changed algorithm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PARITY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Changed algorithm to improove performance</text:p>
          </table:table-cell>
          <table:table-cell table:style-name="ce29" table:number-columns-repeated="250"/>
          <table:table-cell table:style-name="ce34"/>
        </table:table-row>
        <table:table-row table:style-name="ro4">
          <table:table-cell table:style-name="ce3" office:value-type="string">
            <text:p>20</text:p>
          </table:table-cell>
          <table:table-cell table:style-name="ce10" office:value-type="string">
            <text:p>TEMP_SII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Reduced accuracy to 0.01 degreed to shorten execution time</text:p>
            <text:p>and corrected an error in formula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TEMP_PT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Reduced accuracy to 0.01 degreed to shorten execution tim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4" office:value-type="string">
            <text:p>20</text:p>
          </table:table-cell>
          <table:table-cell table:style-name="ce10" office:value-type="string">
            <text:p>TEMP_NI</text:p>
          </table:table-cell>
          <table:table-cell table:style-name="ce4" office:value-type="string">
            <text:p>1.2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Reduced accuracy to 0.01 degreed to shorten execution tim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BIT_COUNT</text:p>
          </table:table-cell>
          <table:table-cell table:style-name="ce3" office:value-type="string">
            <text:p>1.1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Improved performac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SH_2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9-10">
            <text:p>10.09.07</text:p>
          </table:table-cell>
          <table:table-cell table:style-name="ce23" office:value-type="string">
            <text:p>Corrected an error while index would be out of array if N = 0;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20</text:p>
          </table:table-cell>
          <table:table-cell table:style-name="ce10" office:value-type="string">
            <text:p>D_TRIG</text:p>
          </table:table-cell>
          <table:table-cell table:style-name="ce3" office:value-type="string">
            <text:p>1.0</text:p>
          </table:table-cell>
          <table:table-cell table:style-name="ce17" office:value-type="date" office:date-value="2007-09-04">
            <text:p>04.09.07</text:p>
          </table:table-cell>
          <table:table-cell table:style-name="ce23" office:value-type="string">
            <text:p>New Module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table:style-name="ce3" office:value-type="string">
            <text:p>18</text:p>
          </table:table-cell>
          <table:table-cell table:style-name="ce10" office:value-type="string">
            <text:p>ONTIME</text:p>
          </table:table-cell>
          <table:table-cell table:style-name="ce3" office:value-type="string">
            <text:p>1.2</text:p>
          </table:table-cell>
          <table:table-cell table:style-name="ce17" office:value-type="date" office:date-value="2007-08-02">
            <text:p>02.08.07</text:p>
          </table:table-cell>
          <table:table-cell table:style-name="ce23" office:value-type="string">
            <text:p>Corrected an error while ontime would stop counting time after a certain time is reached</text:p>
          </table:table-cell>
          <table:table-cell table:style-name="ce29" table:number-columns-repeated="250"/>
          <table:table-cell table:style-name="ce34"/>
        </table:table-row>
        <table:table-row table:style-name="ro1">
          <table:table-cell office:value-type="string">
            <text:p>17</text:p>
          </table:table-cell>
          <table:table-cell office:value-type="string">
            <text:p>LTIME_TO_UTC</text:p>
          </table:table-cell>
          <table:table-cell office:value-type="string">
            <text:p>1.0</text:p>
          </table:table-cell>
          <table:table-cell table:style-name="ce17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IT_COUNT</text:p>
          </table:table-cell>
          <table:table-cell office:value-type="string">
            <text:p>1.0</text:p>
          </table:table-cell>
          <table:table-cell table:style-name="ce17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MATRIX</text:p>
          </table:table-cell>
          <table:table-cell office:value-type="string">
            <text:p>1.0</text:p>
          </table:table-cell>
          <table:table-cell table:style-name="ce17" office:value-type="date" office:date-value="2007-06-10">
            <text:p>10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RC_CHECK</text:p>
          </table:table-cell>
          <table:table-cell office:value-type="string">
            <text:p>1.0</text:p>
          </table:table-cell>
          <table:table-cell table:style-name="ce17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RC_GEN</text:p>
          </table:table-cell>
          <table:table-cell office:value-type="string">
            <text:p>1.0</text:p>
          </table:table-cell>
          <table:table-cell table:style-name="ce17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YTE_TO_STRB </text:p>
          </table:table-cell>
          <table:table-cell office:value-type="string">
            <text:p>1.0</text:p>
          </table:table-cell>
          <table:table-cell table:style-name="ce17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YTE_TO_STRH </text:p>
          </table:table-cell>
          <table:table-cell office:value-type="string">
            <text:p>1.0</text:p>
          </table:table-cell>
          <table:table-cell table:style-name="ce17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DWORD_TO_STRB</text:p>
          </table:table-cell>
          <table:table-cell office:value-type="string">
            <text:p>1.0</text:p>
          </table:table-cell>
          <table:table-cell table:style-name="ce17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DWORD_TO_STRH</text:p>
          </table:table-cell>
          <table:table-cell office:value-type="string">
            <text:p>1.0</text:p>
          </table:table-cell>
          <table:table-cell table:style-name="ce17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27" table:number-columns-repeated="250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LICK </text:p>
          </table:table-cell>
          <table:table-cell office:value-type="string">
            <text:p>1.1</text:p>
          </table:table-cell>
          <table:table-cell table:style-name="ce17" office:value-type="date" office:date-value="2007-05-18">
            <text:p>18.05.07</text:p>
          </table:table-cell>
          <table:table-cell office:value-type="string">
            <text:p>Corrected an error while Click would stop working when t_reconfig expired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PRESSURE</text:p>
          </table:table-cell>
          <table:table-cell office:value-type="string">
            <text:p>1.0</text:p>
          </table:table-cell>
          <table:table-cell table:style-name="ce17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RRAY_SDV</text:p>
          </table:table-cell>
          <table:table-cell office:value-type="string">
            <text:p>1.0</text:p>
          </table:table-cell>
          <table:table-cell table:style-name="ce17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LTIME</text:p>
          </table:table-cell>
          <table:table-cell office:value-type="string">
            <text:p>1.3</text:p>
          </table:table-cell>
          <table:table-cell table:style-name="ce17" office:value-type="date" office:date-value="2007-03-18">
            <text:p>18.03.07</text:p>
          </table:table-cell>
          <table:table-cell office:value-type="string">
            <text:p>changed code, dst would not work during first cycle.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TEMP</text:p>
          </table:table-cell>
          <table:table-cell office:value-type="string">
            <text:p>1.1</text:p>
          </table:table-cell>
          <table:table-cell table:style-name="ce17" office:value-type="date" office:date-value="2007-04-29">
            <text:p>29.04.07</text:p>
          </table:table-cell>
          <table:table-cell office:value-type="string">
            <text:p>Changed code when RH = 0, not to execute log(0)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GLOBAL CONSTANTS </text:p>
          </table:table-cell>
          <table:table-cell/>
          <table:table-cell table:style-name="ce17" office:value-type="date" office:date-value="2007-05-02">
            <text:p>02.05.07</text:p>
          </table:table-cell>
          <table:table-cell table:style-name="ce19" office:value-type="string">
            <text:p>Added UG, universal gas constan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RRAY_VAR</text:p>
          </table:table-cell>
          <table:table-cell office:value-type="string">
            <text:p>1.0</text:p>
          </table:table-cell>
          <table:table-cell table:style-name="ce17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TIMER_1 </text:p>
          </table:table-cell>
          <table:table-cell office:value-type="string">
            <text:p>1.3</text:p>
          </table:table-cell>
          <table:table-cell table:style-name="ce17" office:value-type="date" office:date-value="2007-04-14">
            <text:p>14.04.07</text:p>
          </table:table-cell>
          <table:table-cell office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ATE_ADD</text:p>
          </table:table-cell>
          <table:table-cell office:value-type="string">
            <text:p>1.1</text:p>
          </table:table-cell>
          <table:table-cell table:style-name="ce17" office:value-type="date" office:date-value="2007-04-12">
            <text:p>12.04.07</text:p>
          </table:table-cell>
          <table:table-cell office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5">
          <table:table-cell office:value-type="string">
            <text:p>16</text:p>
          </table:table-cell>
          <table:table-cell office:value-type="string">
            <text:p>M_TX</text:p>
          </table:table-cell>
          <table:table-cell office:value-type="string">
            <text:p>1.1</text:p>
          </table:table-cell>
          <table:table-cell table:style-name="ce17" office:value-type="date" office:date-value="2007-05-02">
            <text:p>02.05.07</text:p>
          </table:table-cell>
          <table:table-cell office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LENGTH</text:p>
          </table:table-cell>
          <table:table-cell office:value-type="string">
            <text:p>1.0</text:p>
          </table:table-cell>
          <table:table-cell table:style-name="ce17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STRO</text:p>
          </table:table-cell>
          <table:table-cell office:value-type="string">
            <text:p>1.0</text:p>
          </table:table-cell>
          <table:table-cell table:style-name="ce17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ENERGY</text:p>
          </table:table-cell>
          <table:table-cell office:value-type="string">
            <text:p>1.0</text:p>
          </table:table-cell>
          <table:table-cell table:style-name="ce17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CON</text:p>
          </table:table-cell>
          <table:table-cell office:value-type="string">
            <text:p>1.0</text:p>
          </table:table-cell>
          <table:table-cell table:style-name="ce17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table:style-name="ce14" office:value-type="string">
            <text:p>CYCLE_TIME</text:p>
          </table:table-cell>
          <table:table-cell office:value-type="string">
            <text:p>1.2</text:p>
          </table:table-cell>
          <table:table-cell table:style-name="ce17" office:value-type="date" office:date-value="2007-03-10">
            <text:p>10.03.07</text:p>
          </table:table-cell>
          <table:table-cell office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SPEED</text:p>
          </table:table-cell>
          <table:table-cell office:value-type="string">
            <text:p>1.0</text:p>
          </table:table-cell>
          <table:table-cell table:style-name="ce17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M_D</text:p>
          </table:table-cell>
          <table:table-cell office:value-type="string">
            <text:p>1.0</text:p>
          </table:table-cell>
          <table:table-cell table:style-name="ce17" office:value-type="date" office:date-value="2007-05-02">
            <text:p>02.05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M_T</text:p>
          </table:table-cell>
          <table:table-cell office:value-type="string">
            <text:p>1.1</text:p>
          </table:table-cell>
          <table:table-cell table:style-name="ce17" office:value-type="date" office:date-value="2007-05-02">
            <text:p>02.05.07</text:p>
          </table:table-cell>
          <table:table-cell office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RH</text:p>
          </table:table-cell>
          <table:table-cell office:value-type="string">
            <text:p>1.0</text:p>
          </table:table-cell>
          <table:table-cell table:style-name="ce17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SUN_TIME</text:p>
          </table:table-cell>
          <table:table-cell office:value-type="string">
            <text:p>1.2</text:p>
          </table:table-cell>
          <table:table-cell table:style-name="ce17" office:value-type="date" office:date-value="2007-04-17">
            <text:p>17.04.07</text:p>
          </table:table-cell>
          <table:table-cell office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MUL_ADD</text:p>
          </table:table-cell>
          <table:table-cell office:value-type="string">
            <text:p>1.0</text:p>
          </table:table-cell>
          <table:table-cell table:style-name="ce17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CLK_PRG</text:p>
          </table:table-cell>
          <table:table-cell office:value-type="string">
            <text:p>1.1</text:p>
          </table:table-cell>
          <table:table-cell table:style-name="ce17" office:value-type="date" office:date-value="2007-02-25">
            <text:p>25.02.07</text:p>
          </table:table-cell>
          <table:table-cell office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8</text:p>
          </table:table-cell>
          <table:table-cell office:value-type="string">
            <text:p>1.1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RMP</text:p>
          </table:table-cell>
          <table:table-cell office:value-type="string">
            <text:p>1.2</text:p>
          </table:table-cell>
          <table:table-cell table:style-name="ce17" office:value-type="date" office:date-value="2007-02-12">
            <text:p>12.02.07</text:p>
          </table:table-cell>
          <table:table-cell office:value-type="string">
            <text:p>Added INIT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RDM</text:p>
          </table:table-cell>
          <table:table-cell office:value-type="string">
            <text:p>1.0</text:p>
          </table:table-cell>
          <table:table-cell table:style-name="ce17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ID</text:p>
          </table:table-cell>
          <table:table-cell office:value-type="string">
            <text:p>1.3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table:style-name="ce15" office:value-type="string">
            <text:p>CEIL</text:p>
          </table:table-cell>
          <table:table-cell office:value-type="string">
            <text:p>1.0</text:p>
          </table:table-cell>
          <table:table-cell table:style-name="ce17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T1</text:p>
          </table:table-cell>
          <table:table-cell office:value-type="string">
            <text:p>1.3</text:p>
          </table:table-cell>
          <table:table-cell table:style-name="ce17" office:value-type="date" office:date-value="2007-02-27">
            <text:p>27.02.07</text:p>
          </table:table-cell>
          <table:table-cell office:value-type="string">
            <text:p>Output will be set to input during initial startup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CLICK </text:p>
          </table:table-cell>
          <table:table-cell office:value-type="string">
            <text:p>1.0</text:p>
          </table:table-cell>
          <table:table-cell table:style-name="ce17" office:value-type="date" office:date-value="2007-02-15">
            <text:p>15.02.07</text:p>
          </table:table-cell>
          <table:table-cell office:value-type="string">
            <text:p>New Module „click“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ULSE_LENGTH</text:p>
          </table:table-cell>
          <table:table-cell office:value-type="string">
            <text:p>1.0</text:p>
          </table:table-cell>
          <table:table-cell table:style-name="ce17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ACT</text:p>
          </table:table-cell>
          <table:table-cell office:value-type="string">
            <text:p>1.1</text:p>
          </table:table-cell>
          <table:table-cell table:style-name="ce17" office:value-type="date" office:date-value="2007-03-04">
            <text:p>04.03.07</text:p>
          </table:table-cell>
          <table:table-cell office:value-type="string">
            <text:p>Changed a critical erro while loop was indefinit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RMP</text:p>
          </table:table-cell>
          <table:table-cell office:value-type="string">
            <text:p>1.0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LOOR</text:p>
          </table:table-cell>
          <table:table-cell office:value-type="string">
            <text:p>1.0</text:p>
          </table:table-cell>
          <table:table-cell table:style-name="ce17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AD_ZONE_2</text:p>
          </table:table-cell>
          <table:table-cell office:value-type="string">
            <text:p>1.0</text:p>
          </table:table-cell>
          <table:table-cell table:style-name="ce17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SIGN_I</text:p>
          </table:table-cell>
          <table:table-cell office:value-type="string">
            <text:p>1.1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LOBAL CONSTANTS </text:p>
          </table:table-cell>
          <table:table-cell/>
          <table:table-cell table:style-name="ce18" office:value-type="date" office:date-value="2007-03-03">
            <text:p>03.03.07</text:p>
          </table:table-cell>
          <table:table-cell table:style-name="ce26" office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WCT</text:p>
          </table:table-cell>
          <table:table-cell office:value-type="string">
            <text:p>1.0</text:p>
          </table:table-cell>
          <table:table-cell table:style-name="ce17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HOLIDAYEAT_INDEX </text:p>
          </table:table-cell>
          <table:table-cell office:value-type="string">
            <text:p>1.1</text:p>
          </table:table-cell>
          <table:table-cell table:style-name="ce17" office:value-type="date" office:date-value="2007-02-27">
            <text:p>27.02.07</text:p>
          </table:table-cell>
          <table:table-cell office:value-type="string">
            <text:p>deleted unused variables rh3 and T3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WM_DC</text:p>
          </table:table-cell>
          <table:table-cell office:value-type="string">
            <text:p>1.1</text:p>
          </table:table-cell>
          <table:table-cell table:style-name="ce17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_LAMP </text:p>
          </table:table-cell>
          <table:table-cell office:value-type="string">
            <text:p>1.1</text:p>
          </table:table-cell>
          <table:table-cell table:style-name="ce17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HOLIDAY</text:p>
          </table:table-cell>
          <table:table-cell office:value-type="string">
            <text:p>1.1</text:p>
          </table:table-cell>
          <table:table-cell table:style-name="ce17" office:value-type="date" office:date-value="2007-02-27">
            <text:p>27.02.07</text:p>
          </table:table-cell>
          <table:table-cell office:value-type="string">
            <text:p>deleted unused variable init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ONTIME</text:p>
          </table:table-cell>
          <table:table-cell office:value-type="string">
            <text:p>1.1</text:p>
          </table:table-cell>
          <table:table-cell table:style-name="ce17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TIMER_2 </text:p>
          </table:table-cell>
          <table:table-cell office:value-type="string">
            <text:p>1.1</text:p>
          </table:table-cell>
          <table:table-cell table:style-name="ce17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_ARRAY_MEDIAN</text:p>
          </table:table-cell>
          <table:table-cell office:value-type="string">
            <text:p>1.1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Corrected an error in median calculation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4</text:p>
          </table:table-cell>
          <table:table-cell office:value-type="string">
            <text:p>1.1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SQR</text:p>
          </table:table-cell>
          <table:table-cell office:value-type="string">
            <text:p>1.1</text:p>
          </table:table-cell>
          <table:table-cell table:style-name="ce17" office:value-type="date" office:date-value="2007-02-12">
            <text:p>12.02.07</text:p>
          </table:table-cell>
          <table:table-cell office:value-type="string">
            <text:p>Added default value for dc = 0.5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SWITCH_X </text:p>
          </table:table-cell>
          <table:table-cell office:value-type="string">
            <text:p>1.0</text:p>
          </table:table-cell>
          <table:table-cell table:style-name="ce17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CALIBRATE</text:p>
          </table:table-cell>
          <table:table-cell office:value-type="string">
            <text:p>1.2</text:p>
          </table:table-cell>
          <table:table-cell table:style-name="ce17" office:value-type="date" office:date-value="2007-02-22">
            <text:p>22.02.07</text:p>
          </table:table-cell>
          <table:table-cell office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2</text:p>
          </table:table-cell>
          <table:table-cell office:value-type="string">
            <text:p>1.1</text:p>
          </table:table-cell>
          <table:table-cell table:style-name="ce17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ROFILE </text:p>
          </table:table-cell>
          <table:table-cell office:value-type="string">
            <text:p>1.0</text:p>
          </table:table-cell>
          <table:table-cell table:style-name="ce17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INC</text:p>
          </table:table-cell>
          <table:table-cell office:value-type="string">
            <text:p>1.0</text:p>
          </table:table-cell>
          <table:table-cell table:style-name="ce17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WM_PW</text:p>
          </table:table-cell>
          <table:table-cell office:value-type="string">
            <text:p>1.1</text:p>
          </table:table-cell>
          <table:table-cell table:style-name="ce17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AD_ZONE </text:p>
          </table:table-cell>
          <table:table-cell office:value-type="string">
            <text:p>1.0</text:p>
          </table:table-cell>
          <table:table-cell table:style-name="ce17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BAR_GRAPH</text:p>
          </table:table-cell>
          <table:table-cell office:value-type="string">
            <text:p>1.0</text:p>
          </table:table-cell>
          <table:table-cell table:style-name="ce17" office:value-type="date" office:date-value="2007-02-22">
            <text:p>2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BOILER</text:p>
          </table:table-cell>
          <table:table-cell office:value-type="string">
            <text:p>1.0</text:p>
          </table:table-cell>
          <table:table-cell table:style-name="ce17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CF_77</text:p>
          </table:table-cell>
          <table:table-cell office:value-type="string">
            <text:p>1.2</text:p>
          </table:table-cell>
          <table:table-cell table:style-name="ce17" office:value-type="date" office:date-value="2007-02-26">
            <text:p>26.02.07</text:p>
          </table:table-cell>
          <table:table-cell office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X_R2</text:p>
          </table:table-cell>
          <table:table-cell office:value-type="string">
            <text:p>1.0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1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Deleted unused structure „ramp“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_TO_OM</text:p>
          </table:table-cell>
          <table:table-cell office:value-type="string">
            <text:p>1.0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X8</text:p>
          </table:table-cell>
          <table:table-cell office:value-type="string">
            <text:p>1.0</text:p>
          </table:table-cell>
          <table:table-cell table:style-name="ce17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SIN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AY_OF_MONTH</text:p>
          </table:table-cell>
          <table:table-cell office:value-type="string">
            <text:p>1.1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deleted unused variable day_in_year and day_in_year_begi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Heat_Temp</text:p>
          </table:table-cell>
          <table:table-cell office:value-type="string">
            <text:p>1.0</text:p>
          </table:table-cell>
          <table:table-cell table:style-name="ce17" office:value-type="date" office:date-value="2007-01-27">
            <text:p>2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2</text:p>
          </table:table-cell>
          <table:table-cell table:style-name="ce17" office:value-type="date" office:date-value="2007-02-02">
            <text:p>02.02.07</text:p>
          </table:table-cell>
          <table:table-cell office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EQUENCE_4</text:p>
          </table:table-cell>
          <table:table-cell office:value-type="string">
            <text:p>1.3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H_2</text:p>
          </table:table-cell>
          <table:table-cell office:value-type="string">
            <text:p>1.1</text:p>
          </table:table-cell>
          <table:table-cell table:style-name="ce17" office:value-type="date" office:date-value="2007-01-20">
            <text:p>20.01.07</text:p>
          </table:table-cell>
          <table:table-cell office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WORD_TO_STRF</text:p>
          </table:table-cell>
          <table:table-cell office:value-type="string">
            <text:p>1.0</text:p>
          </table:table-cell>
          <table:table-cell table:style-name="ce17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_ARRAY_INIT</text:p>
          </table:table-cell>
          <table:table-cell office:value-type="string">
            <text:p>1.1</text:p>
          </table:table-cell>
          <table:table-cell table:style-name="ce17" office:value-type="date" office:date-value="2007-01-06">
            <text:p>06.01.07</text:p>
          </table:table-cell>
          <table:table-cell office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UN_POS</text:p>
          </table:table-cell>
          <table:table-cell office:value-type="string">
            <text:p>1.0</text:p>
          </table:table-cell>
          <table:table-cell table:style-name="ce17" office:value-type="date" office:date-value="2007-02-01">
            <text:p>01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B4</text:p>
          </table:table-cell>
          <table:table-cell office:value-type="string">
            <text:p>1.1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8</text:p>
          </table:table-cell>
          <table:table-cell office:value-type="string">
            <text:p>1.0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TAIR2</text:p>
          </table:table-cell>
          <table:table-cell office:value-type="string">
            <text:p>1.0</text:p>
          </table:table-cell>
          <table:table-cell table:style-name="ce17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HYST_3</text:p>
          </table:table-cell>
          <table:table-cell office:value-type="string">
            <text:p>1.0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GEN_SIN</text:p>
          </table:table-cell>
          <table:table-cell office:value-type="string">
            <text:p>1.0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IGN_R</text:p>
          </table:table-cell>
          <table:table-cell office:value-type="string">
            <text:p>1.1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MP_W</text:p>
          </table:table-cell>
          <table:table-cell office:value-type="string">
            <text:p>1.2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KMH_TO_MS</text:p>
          </table:table-cell>
          <table:table-cell office:value-type="string">
            <text:p>1.0</text:p>
          </table:table-cell>
          <table:table-cell table:style-name="ce17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TUATOR_2P </text:p>
          </table:table-cell>
          <table:table-cell office:value-type="string">
            <text:p>1.2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Deleted unused variable time_overflow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TUATOR_3P </text:p>
          </table:table-cell>
          <table:table-cell office:value-type="string">
            <text:p>1.2</text:p>
          </table:table-cell>
          <table:table-cell table:style-name="ce17" office:value-type="date" office:date-value="2007-01-23">
            <text:p>23.01.07</text:p>
          </table:table-cell>
          <table:table-cell office:value-type="string">
            <text:p>Deleted unused variables „force_on“ and „force_off“</text:p>
          </table:table-cell>
          <table:table-cell/>
          <table:table-cell table:style-name="ce32"/>
          <table:table-cell table:number-columns-repeated="249"/>
        </table:table-row>
        <table:table-row table:style-name="ro1">
          <table:table-cell office:value-type="string">
            <text:p>14</text:p>
          </table:table-cell>
          <table:table-cell office:value-type="string">
            <text:p>FT_PT2</text:p>
          </table:table-cell>
          <table:table-cell office:value-type="string">
            <text:p>1.1</text:p>
          </table:table-cell>
          <table:table-cell table:style-name="ce17" office:value-type="date" office:date-value="2007-01-15">
            <text:p>15.01.07</text:p>
          </table:table-cell>
          <table:table-cell office:value-type="string">
            <text:p>Improved algorithm for higher accuracy and spe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ENSOR_INT</text:p>
          </table:table-cell>
          <table:table-cell office:value-type="string">
            <text:p>1.1</text:p>
          </table:table-cell>
          <table:table-cell table:style-name="ce17" office:value-type="date" office:date-value="2007-01-20">
            <text:p>20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QRTN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3</text:p>
          </table:table-cell>
          <table:table-cell table:style-name="ce17" office:value-type="date" office:date-value="2006-12-31">
            <text:p>31.12.06</text:p>
          </table:table-cell>
          <table:table-cell office:value-type="string">
            <text:p>Added status output to be ESR compatib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_LIN2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16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PID</text:p>
          </table:table-cell>
          <table:table-cell office:value-type="string">
            <text:p>1.2</text:p>
          </table:table-cell>
          <table:table-cell table:style-name="ce17" office:value-type="date" office:date-value="2007-01-03">
            <text:p>03.01.07</text:p>
          </table:table-cell>
          <table:table-cell office:value-type="string">
            <text:p>Added int_band for structural adaptation of PI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YTE_OF_DWORD</text:p>
          </table:table-cell>
          <table:table-cell office:value-type="string">
            <text:p>1.0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OUT</text:p>
          </table:table-cell>
          <table:table-cell office:value-type="string">
            <text:p>1.1</text:p>
          </table:table-cell>
          <table:table-cell table:style-name="ce17" office:value-type="date" office:date-value="2007-01-18">
            <text:p>18.01.07</text:p>
          </table:table-cell>
          <table:table-cell office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UN_TIME</text:p>
          </table:table-cell>
          <table:table-cell office:value-type="string">
            <text:p>1.1</text:p>
          </table:table-cell>
          <table:table-cell table:style-name="ce17" office:value-type="date" office:date-value="2007-01-20">
            <text:p>20.01.07</text:p>
          </table:table-cell>
          <table:table-cell office:value-type="string">
            <text:p>deleted unused variables sun_rineR and sun_setR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H</text:p>
          </table:table-cell>
          <table:table-cell office:value-type="string">
            <text:p>1.1</text:p>
          </table:table-cell>
          <table:table-cell table:style-name="ce17" office:value-type="date" office:date-value="2007-01-16">
            <text:p>1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AX_3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M_TO_F</text:p>
          </table:table-cell>
          <table:table-cell office:value-type="string">
            <text:p>1.0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IN_3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2</text:p>
          </table:table-cell>
          <table:table-cell table:style-name="ce17" office:value-type="date" office:date-value="2007-01-03">
            <text:p>03.01.07</text:p>
          </table:table-cell>
          <table:table-cell office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EQUENCE_8</text:p>
          </table:table-cell>
          <table:table-cell office:value-type="string">
            <text:p>1.3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LTI_IN</text:p>
          </table:table-cell>
          <table:table-cell office:value-type="string">
            <text:p>1.1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Changed midr to mid3 funktion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TAIR</text:p>
          </table:table-cell>
          <table:table-cell office:value-type="string">
            <text:p>1.0</text:p>
          </table:table-cell>
          <table:table-cell table:style-name="ce17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OS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2</text:p>
          </table:table-cell>
          <table:table-cell table:style-name="ce17" office:value-type="date" office:date-value="2006-12-31">
            <text:p>31.12.06</text:p>
          </table:table-cell>
          <table:table-cell office:value-type="string">
            <text:p>Added Oil_Temp input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ACTUATOR_UD </text:p>
          </table:table-cell>
          <table:table-cell office:value-type="string">
            <text:p>1.1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8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B8</text:p>
          </table:table-cell>
          <table:table-cell office:value-type="string">
            <text:p>1.1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ELAY</text:p>
          </table:table-cell>
          <table:table-cell office:value-type="string">
            <text:p>1.2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changed reset to load the value of in instead of 0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HR</text:p>
          </table:table-cell>
          <table:table-cell office:value-type="string">
            <text:p>1.0</text:p>
          </table:table-cell>
          <table:table-cell table:style-name="ce17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4</text:p>
          </table:table-cell>
          <table:table-cell office:value-type="string">
            <text:p>1.0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DM</text:p>
          </table:table-cell>
          <table:table-cell office:value-type="string">
            <text:p>1.0</text:p>
          </table:table-cell>
          <table:table-cell table:style-name="ce17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LEGIONELLA </text:p>
          </table:table-cell>
          <table:table-cell office:value-type="string">
            <text:p>1.1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OT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K_WEEK</text:p>
          </table:table-cell>
          <table:table-cell office:value-type="string">
            <text:p>1.1</text:p>
          </table:table-cell>
          <table:table-cell table:style-name="ce17" office:value-type="date" office:date-value="2007-01-14">
            <text:p>14.01.07</text:p>
          </table:table-cell>
          <table:table-cell office:value-type="string">
            <text:p>deleted unused variable yday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2</text:p>
          </table:table-cell>
          <table:table-cell office:value-type="string">
            <text:p>1.0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CF_77</text:p>
          </table:table-cell>
          <table:table-cell office:value-type="string">
            <text:p>1.1</text:p>
          </table:table-cell>
          <table:table-cell table:style-name="ce17" office:value-type="date" office:date-value="2007-02-02">
            <text:p>02.02.07</text:p>
          </table:table-cell>
          <table:table-cell office:value-type="string">
            <text:p>change wday and dst outputs when there is no dcf recep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IMP</text:p>
          </table:table-cell>
          <table:table-cell office:value-type="string">
            <text:p>1.1</text:p>
          </table:table-cell>
          <table:table-cell table:style-name="ce17" office:value-type="date" office:date-value="2007-01-03">
            <text:p>03.01.07</text:p>
          </table:table-cell>
          <table:table-cell office:value-type="string">
            <text:p>Added faktor K</text:p>
          </table:table-cell>
          <table:table-cell table:style-name="ce32"/>
          <table:table-cell table:number-columns-repeated="250"/>
        </table:table-row>
        <table:table-row table:style-name="ro1">
          <table:table-cell office:value-type="string">
            <text:p>14</text:p>
          </table:table-cell>
          <table:table-cell office:value-type="string">
            <text:p>SH_1</text:p>
          </table:table-cell>
          <table:table-cell office:value-type="string">
            <text:p>1.1</text:p>
          </table:table-cell>
          <table:table-cell table:style-name="ce17" office:value-type="date" office:date-value="2007-01-06">
            <text:p>0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X_R4</text:p>
          </table:table-cell>
          <table:table-cell office:value-type="string">
            <text:p>1.0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ELAY_4</text:p>
          </table:table-cell>
          <table:table-cell office:value-type="string">
            <text:p>1.1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added variable temp to add 1 delay <text:s/>for q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D_OF_DWORD</text:p>
          </table:table-cell>
          <table:table-cell office:value-type="string">
            <text:p>1.0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_ARRAY_SORT</text:p>
          </table:table-cell>
          <table:table-cell office:value-type="string">
            <text:p>1.1</text:p>
          </table:table-cell>
          <table:table-cell table:style-name="ce17" office:value-type="date" office:date-value="2007-01-06">
            <text:p>06.01.07</text:p>
          </table:table-cell>
          <table:table-cell office:value-type="string">
            <text:p>Function now returns TRU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4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PT</text:p>
          </table:table-cell>
          <table:table-cell office:value-type="string">
            <text:p>1.1</text:p>
          </table:table-cell>
          <table:table-cell table:style-name="ce17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FFSET_2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1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OS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AN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DERIV</text:p>
          </table:table-cell>
          <table:table-cell office:value-type="string">
            <text:p>1.1</text:p>
          </table:table-cell>
          <table:table-cell table:style-name="ce17" office:value-type="date" office:date-value="2007-01-03">
            <text:p>03.01.07</text:p>
          </table:table-cell>
          <table:table-cell office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MP_SOFT</text:p>
          </table:table-cell>
          <table:table-cell office:value-type="string">
            <text:p>1.0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TAN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INT</text:p>
          </table:table-cell>
          <table:table-cell office:value-type="string">
            <text:p>1.2</text:p>
          </table:table-cell>
          <table:table-cell table:style-name="ce17" office:value-type="date" office:date-value="2007-01-15">
            <text:p>15.01.07</text:p>
          </table:table-cell>
          <table:table-cell office:value-type="string">
            <text:p>Added default value for K = 1</text:p>
          </table:table-cell>
          <table:table-cell table:style-name="ce32"/>
          <table:table-cell table:number-columns-repeated="250"/>
        </table:table-row>
        <table:table-row table:style-name="ro1">
          <table:table-cell office:value-type="string">
            <text:p>14</text:p>
          </table:table-cell>
          <table:table-cell office:value-type="string">
            <text:p>COT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WORD_OF_BYTE</text:p>
          </table:table-cell>
          <table:table-cell office:value-type="string">
            <text:p>1.0</text:p>
          </table:table-cell>
          <table:table-cell table:style-name="ce17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S_TO_KMH</text:p>
          </table:table-cell>
          <table:table-cell office:value-type="string">
            <text:p>1.0</text:p>
          </table:table-cell>
          <table:table-cell table:style-name="ce17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RMP_B</text:p>
          </table:table-cell>
          <table:table-cell office:value-type="string">
            <text:p>1.2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NI</text:p>
          </table:table-cell>
          <table:table-cell office:value-type="string">
            <text:p>1.1</text:p>
          </table:table-cell>
          <table:table-cell table:style-name="ce17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B8</text:p>
          </table:table-cell>
          <table:table-cell office:value-type="string">
            <text:p>1.0</text:p>
          </table:table-cell>
          <table:table-cell table:style-name="ce17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R4</text:p>
          </table:table-cell>
          <table:table-cell office:value-type="string">
            <text:p>1.0</text:p>
          </table:table-cell>
          <table:table-cell table:style-name="ce17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FT_AVG</text:p>
          </table:table-cell>
          <table:table-cell office:value-type="string">
            <text:p>1.1</text:p>
          </table:table-cell>
          <table:table-cell table:style-name="ce17" office:value-type="date" office:date-value="2007-01-07">
            <text:p>07.01.07</text:p>
          </table:table-cell>
          <table:table-cell office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FFSET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EXEC</text:p>
          </table:table-cell>
          <table:table-cell office:value-type="string">
            <text:p>1.1</text:p>
          </table:table-cell>
          <table:table-cell table:style-name="ce17" office:value-type="date" office:date-value="2007-02-06">
            <text:p>06.02.07</text:p>
          </table:table-cell>
          <table:table-cell office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IN</text:p>
          </table:table-cell>
          <table:table-cell office:value-type="string">
            <text:p>1.2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fixed an error with sign bit.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LTIME</text:p>
          </table:table-cell>
          <table:table-cell office:value-type="string">
            <text:p>1.2</text:p>
          </table:table-cell>
          <table:table-cell table:style-name="ce17" office:value-type="date" office:date-value="2007-01-17">
            <text:p>17.01.07</text:p>
          </table:table-cell>
          <table:table-cell office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1</text:p>
          </table:table-cell>
          <table:table-cell table:style-name="ce17" office:value-type="date" office:date-value="2006-12-31">
            <text:p>31.12.06</text:p>
          </table:table-cell>
          <table:table-cell office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INDOW</text:p>
          </table:table-cell>
          <table:table-cell office:value-type="string">
            <text:p>1.1</text:p>
          </table:table-cell>
          <table:table-cell table:style-name="ce17" office:value-type="date" office:date-value="2007-01-22">
            <text:p>22.01.07</text:p>
          </table:table-cell>
          <table:table-cell office:value-type="string">
            <text:p>Changed input arrangemen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SI</text:p>
          </table:table-cell>
          <table:table-cell office:value-type="string">
            <text:p>1.1</text:p>
          </table:table-cell>
          <table:table-cell table:style-name="ce17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D_OF_BYTE</text:p>
          </table:table-cell>
          <table:table-cell office:value-type="string">
            <text:p>1.0</text:p>
          </table:table-cell>
          <table:table-cell table:style-name="ce17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COLLECT</text:p>
          </table:table-cell>
          <table:table-cell office:value-type="string">
            <text:p>1.0</text:p>
          </table:table-cell>
          <table:table-cell table:style-name="ce17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INH</text:p>
          </table:table-cell>
          <table:table-cell office:value-type="string">
            <text:p>1.0</text:p>
          </table:table-cell>
          <table:table-cell table:style-name="ce17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64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ID_3</text:p>
          </table:table-cell>
          <table:table-cell office:value-type="string">
            <text:p>1.0</text:p>
          </table:table-cell>
          <table:table-cell table:style-name="ce17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B2</text:p>
          </table:table-cell>
          <table:table-cell office:value-type="string">
            <text:p>1.1</text:p>
          </table:table-cell>
          <table:table-cell table:style-name="ce17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17" office:value-type="date" office:date-value="2006-10-07">
            <text:p>07.10.06</text:p>
          </table:table-cell>
          <table:table-cell office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ATE_ADD</text:p>
          </table:table-cell>
          <table:table-cell office:value-type="string">
            <text:p>1.0</text:p>
          </table:table-cell>
          <table:table-cell table:style-name="ce17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EMP_EXT</text:p>
          </table:table-cell>
          <table:table-cell office:value-type="string">
            <text:p>1.0</text:p>
          </table:table-cell>
          <table:table-cell table:style-name="ce17" office:value-type="date" office:date-value="2006-12-06">
            <text:p>06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K_TO_C</text:p>
          </table:table-cell>
          <table:table-cell office:value-type="string">
            <text:p>1.0</text:p>
          </table:table-cell>
          <table:table-cell table:style-name="ce17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RMP_B</text:p>
          </table:table-cell>
          <table:table-cell office:value-type="string">
            <text:p>1.1</text:p>
          </table:table-cell>
          <table:table-cell table:style-name="ce17" office:value-type="date" office:date-value="2006-10-15">
            <text:p>15.10.06</text:p>
          </table:table-cell>
          <table:table-cell office:value-type="string">
            <text:p>Added output bus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_NONUM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PID</text:p>
          </table:table-cell>
          <table:table-cell office:value-type="string">
            <text:p>1.1</text:p>
          </table:table-cell>
          <table:table-cell table:style-name="ce17" office:value-type="date" office:date-value="2006-12-01">
            <text:p>01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2</text:p>
          </table:table-cell>
          <table:table-cell table:style-name="ce17" office:value-type="date" office:date-value="2006-12-25">
            <text:p>25.12.06</text:p>
          </table:table-cell>
          <table:table-cell office:value-type="string">
            <text:p>Corrected an error with timer overflow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1</text:p>
          </table:table-cell>
          <table:table-cell table:style-name="ce17" office:value-type="date" office:date-value="2006-12-01">
            <text:p>01.12.06</text:p>
          </table:table-cell>
          <table:table-cell office:value-type="string">
            <text:p>Corrected an error whith pulse width = 0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C_TP_K</text:p>
          </table:table-cell>
          <table:table-cell office:value-type="string">
            <text:p>1.0</text:p>
          </table:table-cell>
          <table:table-cell table:style-name="ce17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CYCLE_TIME</text:p>
          </table:table-cell>
          <table:table-cell office:value-type="string">
            <text:p>1.1</text:p>
          </table:table-cell>
          <table:table-cell table:style-name="ce17" office:value-type="date" office:date-value="2006-12-12">
            <text:p>12.12.06</text:p>
          </table:table-cell>
          <table:table-cell office:value-type="string">
            <text:p>Added output cycle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RIM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_NUM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MUX_4</text:p>
          </table:table-cell>
          <table:table-cell office:value-type="string">
            <text:p>1.1</text:p>
          </table:table-cell>
          <table:table-cell table:style-name="ce17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RMP</text:p>
          </table:table-cell>
          <table:table-cell office:value-type="string">
            <text:p>1.1</text:p>
          </table:table-cell>
          <table:table-cell table:style-name="ce17" office:value-type="date" office:date-value="2006-10-08">
            <text:p>08.10.06</text:p>
          </table:table-cell>
          <table:table-cell office:value-type="string">
            <text:p>Added UD output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_NUM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17" office:value-type="date" office:date-value="2006-10-07">
            <text:p>07.10.06</text:p>
          </table:table-cell>
          <table:table-cell office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4">
          <table:table-cell office:value-type="string">
            <text:p>13</text:p>
          </table:table-cell>
          <table:table-cell office:value-type="string">
            <text:p>SEQUENCE_4</text:p>
          </table:table-cell>
          <table:table-cell office:value-type="string">
            <text:p>1.2</text:p>
          </table:table-cell>
          <table:table-cell table:style-name="ce17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MUX_2</text:p>
          </table:table-cell>
          <table:table-cell office:value-type="string">
            <text:p>1.1</text:p>
          </table:table-cell>
          <table:table-cell table:style-name="ce17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UPPERCASE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AYS_DELTA</text:p>
          </table:table-cell>
          <table:table-cell office:value-type="string">
            <text:p>1.0</text:p>
          </table:table-cell>
          <table:table-cell table:style-name="ce17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INT</text:p>
          </table:table-cell>
          <table:table-cell office:value-type="string">
            <text:p>1.1</text:p>
          </table:table-cell>
          <table:table-cell table:style-name="ce17" office:value-type="date" office:date-value="2006-12-13">
            <text:p>13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3P </text:p>
          </table:table-cell>
          <table:table-cell office:value-type="string">
            <text:p>1.1</text:p>
          </table:table-cell>
          <table:table-cell table:style-name="ce17" office:value-type="date" office:date-value="2006-10-19">
            <text:p>19.10.06</text:p>
          </table:table-cell>
          <table:table-cell office:value-type="string">
            <text:p>Added code to avoid overrun of the end_switch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OSCAT_VERSION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LOWERCASE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REAL_TO_STRF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PUMP</text:p>
          </table:table-cell>
          <table:table-cell office:value-type="string">
            <text:p>1.1</text:p>
          </table:table-cell>
          <table:table-cell table:style-name="ce17" office:value-type="date" office:date-value="2006-12-27">
            <text:p>27.12.06</text:p>
          </table:table-cell>
          <table:table-cell office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EASTER</text:p>
          </table:table-cell>
          <table:table-cell office:value-type="string">
            <text:p>1.0</text:p>
          </table:table-cell>
          <table:table-cell table:style-name="ce17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IFFER</text:p>
          </table:table-cell>
          <table:table-cell office:value-type="string">
            <text:p>1.0</text:p>
          </table:table-cell>
          <table:table-cell table:style-name="ce17" office:value-type="date" office:date-value="2006-10-08">
            <text:p>08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_NONUM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3</text:p>
          </table:table-cell>
          <table:table-cell office:value-type="string">
            <text:p>SEQUENCE_8</text:p>
          </table:table-cell>
          <table:table-cell office:value-type="string">
            <text:p>1.2</text:p>
          </table:table-cell>
          <table:table-cell table:style-name="ce17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STATUS_TO_ESR</text:p>
          </table:table-cell>
          <table:table-cell office:value-type="string">
            <text:p>1.0</text:p>
          </table:table-cell>
          <table:table-cell table:style-name="ce17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SECOND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RMP_W</text:p>
          </table:table-cell>
          <table:table-cell office:value-type="string">
            <text:p>1.1</text:p>
          </table:table-cell>
          <table:table-cell table:style-name="ce17" office:value-type="date" office:date-value="2006-10-04">
            <text:p>04.10.06</text:p>
          </table:table-cell>
          <table:table-cell office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SUM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TREND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TIME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orrected an error where dst would be delayed by 0.1secon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EAP_OF_DATE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CHECK_PARITY</text:p>
          </table:table-cell>
          <table:table-cell office:value-type="string">
            <text:p>1.0</text:p>
          </table:table-cell>
          <table:table-cell table:style-name="ce17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DELAY</text:p>
          </table:table-cell>
          <table:table-cell office:value-type="string">
            <text:p>1.1</text:p>
          </table:table-cell>
          <table:table-cell table:style-name="ce17" office:value-type="date" office:date-value="2006-10-01">
            <text:p>01.10.06</text:p>
          </table:table-cell>
          <table:table-cell office:value-type="string">
            <text:p>Corrected an error in buffer management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MIN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MAX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2</text:p>
          </table:table-cell>
          <table:table-cell office:value-type="string">
            <text:p>SEQUENCE_4</text:p>
          </table:table-cell>
          <table:table-cell office:value-type="string">
            <text:p>1.1</text:p>
          </table:table-cell>
          <table:table-cell table:style-name="ce17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EAP_YEAR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AVG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SPR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OCAL_TIME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orrected an error while DST would be calculated wrong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HOUR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MULTIME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EVEN</text:p>
          </table:table-cell>
          <table:table-cell office:value-type="string">
            <text:p>1.0</text:p>
          </table:table-cell>
          <table:table-cell table:style-name="ce17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DEW_TEMP</text:p>
          </table:table-cell>
          <table:table-cell office:value-type="string">
            <text:p>1.0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MINUTE</text:p>
          </table:table-cell>
          <table:table-cell office:value-type="string">
            <text:p>1.1</text:p>
          </table:table-cell>
          <table:table-cell table:style-name="ce17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4">
          <table:table-cell office:value-type="string">
            <text:p>12</text:p>
          </table:table-cell>
          <table:table-cell office:value-type="string">
            <text:p>SEQUENCE_8</text:p>
          </table:table-cell>
          <table:table-cell office:value-type="string">
            <text:p>1.1</text:p>
          </table:table-cell>
          <table:table-cell table:style-name="ce17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SH_2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SH_T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T_MIN_MAX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PARITY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LIN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QUAD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AIN</text:p>
          </table:table-cell>
          <table:table-cell office:value-type="string">
            <text:p>1.1</text:p>
          </table:table-cell>
          <table:table-cell table:style-name="ce17" office:value-type="date" office:date-value="2006-08-18">
            <text:p>18.08.06</text:p>
          </table:table-cell>
          <table:table-cell office:value-type="string">
            <text:p>fixed an error with low value negative and high value 0.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ROUND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POWER</text:p>
          </table:table-cell>
          <table:table-cell office:value-type="string">
            <text:p>1.0</text:p>
          </table:table-cell>
          <table:table-cell table:style-name="ce17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WEEKDAY</text:p>
          </table:table-cell>
          <table:table-cell office:value-type="string">
            <text:p>1.1</text:p>
          </table:table-cell>
          <table:table-cell table:style-name="ce17" office:value-type="date" office:date-value="2006-08-21">
            <text:p>21.08.06</text:p>
          </table:table-cell>
          <table:table-cell office:value-type="string">
            <text:p>Coorected an error in formula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TP_R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D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_TX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AD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INC_DEC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INUTE_TO_TIM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4UD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OF_YEAR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YST_2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UX_4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COND_TO_TIM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2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4MS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S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RAC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TOD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4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DIV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2MS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PT_TO_F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PULS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_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OF_MONTH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TO_TIM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PT</text:p>
          </table:table-cell>
          <table:table-cell office:value-type="string">
            <text:p>1.1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IFO_16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TACK_32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_TO_P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NI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1MS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UX_2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IT_OF_DWORD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JK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LTCH_4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GEN_SQ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GEN_BI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8UD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4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_TRIG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YTE_OF_BI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YTE_TO_BIT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8PL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_TO_F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R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TACK_16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DAT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EG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WITCH_I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_TO_TOD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YEAR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YST_1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ONTH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_TO_TIME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LTCH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8MS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SI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_TO_C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IFO_32</text:p>
          </table:table-cell>
          <table:table-cell office:value-type="string">
            <text:p>1.0</text:p>
          </table:table-cell>
          <table:table-cell table:style-name="ce17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2" table:number-rows-repeated="646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name="unnamed_FilterIn_Database_1" table:target-range-address="Tabelle1.A645:Tabelle1.IU9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0">30.03.2008</text:date>, <text:time>17:01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2-24T20:13:04</meta:creation-date>
    <dc:creator>Hans Muehlbauer</dc:creator>
    <dc:date>2008-03-30T17:01:55</dc:date>
    <meta:editing-cycles>59</meta:editing-cycles>
    <meta:editing-duration>P1DT8H14M12S</meta:editing-duration>
    <meta:user-defined meta:name="Info 1"/>
    <meta:user-defined meta:name="Info 2"/>
    <meta:user-defined meta:name="Info 3"/>
    <meta:user-defined meta:name="Info 4"/>
    <meta:document-statistic meta:table-count="3" meta:cell-count="4559"/>
  </office:meta>
</office:document-meta>
</file>
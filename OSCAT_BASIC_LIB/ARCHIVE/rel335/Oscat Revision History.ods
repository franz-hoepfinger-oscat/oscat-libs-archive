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3.847cm"/>
    </style:style>
    <style:style style:name="co6" style:family="table-column">
      <style:table-column-properties fo:break-before="auto" style:column-width="5.74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6.687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5.383cm"/>
    </style:style>
    <style:style style:name="co11" style:family="table-column">
      <style:table-column-properties fo:break-before="auto" style:column-width="6.24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rotation-align="bottom" style:vertical-align="top"/>
      <style:text-properties fo:font-style="normal" fo:font-weight="bold"/>
    </style:style>
    <style:style style:name="ce2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3" style:family="table-cell" style:parent-style-name="Default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/>
    </style:style>
    <style:style style:name="ce8" style:family="table-cell" style:parent-style-name="Default" style:data-style-name="N0">
      <style:table-cell-properties fo:wrap-option="wrap" style:rotation-align="bottom" style:vertical-align="top"/>
      <style:text-properties fo:font-style="normal" fo:font-weight="normal"/>
    </style:style>
    <style:style style:name="ce9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10" style:family="table-cell" style:parent-style-name="Default">
      <style:table-cell-properties style:text-align-source="fix" style:repeat-content="false" style:rotation-align="bottom" style:vertical-align="top"/>
      <style:paragraph-properties fo:text-align="start" fo:margin-left="0cm"/>
    </style:style>
    <style:style style:name="ce11" style:family="table-cell" style:parent-style-name="Default" style:data-style-name="N100">
      <style:table-cell-properties fo:wrap-option="wrap" style:rotation-align="bottom" style:vertical-align="top"/>
    </style:style>
    <style:style style:name="ce12" style:family="table-cell" style:parent-style-name="Default">
      <style:table-cell-properties fo:wrap-option="wrap" style:rotation-align="bottom" style:vertical-align="top"/>
      <style:text-properties fo:font-style="normal" fo:font-weight="bold"/>
    </style:style>
    <style:style style:name="ce13" style:family="table-cell" style:parent-style-name="Default" style:data-style-name="N127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4" style:family="table-cell" style:parent-style-name="Default" style:data-style-name="N13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5" style:family="table-cell" style:parent-style-name="Default" style:data-style-name="N124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6" style:family="table-cell" style:parent-style-name="Default" style:data-style-name="N135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7" style:family="table-cell" style:parent-style-name="Default" style:data-style-name="N134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8" style:family="table-cell" style:parent-style-name="Default">
      <style:table-cell-properties fo:wrap-option="wrap" style:rotation-align="bottom" style:vertical-align="top"/>
      <style:text-properties fo:font-size="9pt" fo:font-style="normal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wrap-option="wrap" style:rotation-align="bottom" style:vertical-align="top"/>
      <style:text-properties fo:font-style="normal" fo:font-weight="normal"/>
    </style:style>
    <style:style style:name="ce20" style:family="table-cell" style:parent-style-name="Default">
      <style:table-cell-properties style:rotation-align="bottom" style:vertical-align="top"/>
    </style:style>
    <style:style style:name="ce21" style:family="table-cell" style:parent-style-name="Default">
      <style:table-cell-properties fo:wrap-option="wrap" style:rotation-align="bottom" style:vertical-align="top"/>
      <style:text-properties fo:color="#000000" style:font-name="Arial1" fo:font-size="10pt" fo:font-style="normal" fo:font-weight="normal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wrap-option="wrap" style:rotation-align="bottom" style:vertical-align="top"/>
    </style:style>
    <style:style style:name="ce23" style:family="table-cell" style:parent-style-name="Default">
      <style:table-cell-properties style:text-align-source="value-type" style:repeat-content="false" fo:wrap-option="wrap" style:rotation-align="bottom" style:vertical-align="top"/>
      <style:paragraph-properties fo:margin-left="0cm"/>
    </style:style>
    <style:style style:name="ce24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</style:style>
    <style:style style:name="ce25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7" style:family="table-cell" style:parent-style-name="Default" style:data-style-name="N37">
      <style:table-cell-properties fo:wrap-option="wrap" style:rotation-align="bottom" style:vertical-align="top"/>
    </style:style>
    <style:style style:name="ce2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9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bold"/>
    </style:style>
    <style:style style:name="ce30" style:family="table-cell" style:parent-style-name="Default">
      <style:table-cell-properties fo:wrap-option="wrap" style:rotation-align="bottom" style:vertical-align="top"/>
      <style:text-properties style:font-name="Arial" fo:language="en" fo:country="US" fo:font-style="normal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31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2" style:family="table-cell" style:parent-style-name="Default" style:data-style-name="N129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3" style:family="table-cell" style:parent-style-name="Default" style:data-style-name="N120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4" style:family="table-cell" style:parent-style-name="Default" style:data-style-name="N132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5" style:family="table-cell" style:parent-style-name="Default" style:data-style-name="N128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/>
    </style:style>
    <style:style style:name="ce37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3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style:use-window-font-color="true" style:text-outline="false" style:font-name="Arial" fo:font-size="10pt" fo:font-style="normal" fo:text-shadow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value-type" style:repeat-content="false" fo:wrap-option="no-wrap" style:rotation-align="bottom" style:vertical-align="top"/>
      <style:paragraph-properties fo:margin-left="0cm"/>
    </style:style>
    <style:style style:name="ce40" style:family="table-cell" style:parent-style-name="Default" style:data-style-name="N119">
      <style:table-cell-properties fo:wrap-option="wrap" style:rotation-align="top"/>
      <style:text-properties fo:font-style="normal" fo:font-weight="bold"/>
    </style:style>
    <style:style style:name="ce41" style:family="table-cell" style:parent-style-name="Default" style:data-style-name="N119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2" style:family="table-cell" style:parent-style-name="Default" style:data-style-name="N119">
      <style:table-cell-properties fo:wrap-option="wrap" style:rotation-align="top"/>
      <style:text-properties fo:font-style="normal" fo:font-weight="normal"/>
    </style:style>
    <style:style style:name="ce43" style:family="table-cell" style:parent-style-name="Default" style:data-style-name="N119">
      <style:table-cell-properties style:rotation-align="top"/>
    </style:style>
    <style:style style:name="ce44" style:family="table-cell" style:parent-style-name="Default" style:data-style-name="N119">
      <style:table-cell-properties fo:wrap-option="wrap" style:rotation-align="top"/>
    </style:style>
    <style:style style:name="ce45" style:family="table-cell" style:parent-style-name="Default" style:data-style-name="N120">
      <style:table-cell-properties fo:wrap-option="wrap" style:rotation-align="top"/>
      <style:text-properties fo:font-style="normal" fo:font-weight="bold"/>
    </style:style>
    <style:style style:name="ce46" style:family="table-cell" style:parent-style-name="Default" style:data-style-name="N120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7" style:family="table-cell" style:parent-style-name="Default" style:data-style-name="N120">
      <style:table-cell-properties fo:wrap-option="wrap" style:rotation-align="top"/>
      <style:text-properties fo:font-style="normal" fo:font-weight="normal"/>
    </style:style>
    <style:style style:name="ce48" style:family="table-cell" style:parent-style-name="Default" style:data-style-name="N120">
      <style:table-cell-properties fo:wrap-option="wrap" style:rotation-align="top"/>
    </style:style>
    <style:style style:name="ce49" style:family="table-cell" style:parent-style-name="Default" style:data-style-name="N121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bold"/>
    </style:style>
    <style:style style:name="ce50" style:family="table-cell" style:parent-style-name="Default" style:data-style-name="N121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/>
    </style:style>
    <style:style style:name="ce52" style:family="table-cell" style:parent-style-name="Default" style:data-style-name="N121">
      <style:table-cell-properties style:text-align-source="fix" style:repeat-content="false" fo:wrap-option="wrap" style:rotation-align="top"/>
      <style:paragraph-properties fo:text-align="start" fo:margin-left="0cm"/>
    </style:style>
    <style:style style:name="ce53" style:family="table-cell" style:parent-style-name="Default">
      <style:table-cell-properties fo:wrap-option="wrap" style:rotation-align="top"/>
      <style:text-properties fo:font-style="normal" fo:font-weight="bold"/>
    </style:style>
    <style:style style:name="ce54" style:family="table-cell" style:parent-style-name="Default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5" style:family="table-cell" style:parent-style-name="Default">
      <style:table-cell-properties fo:wrap-option="wrap" style:rotation-align="top"/>
      <style:text-properties fo:font-style="normal" fo:font-weight="normal"/>
    </style:style>
    <style:style style:name="ce56" style:family="table-cell" style:parent-style-name="Default">
      <style:table-cell-properties fo:wrap-option="wrap" style:rotation-align="top"/>
    </style:style>
    <style:style style:name="ce57" style:family="table-cell" style:parent-style-name="Default" style:data-style-name="N132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8" style:family="table-cell" style:parent-style-name="Default" style:data-style-name="N116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9" style:family="table-cell" style:parent-style-name="Default" style:data-style-name="N133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0" style:family="table-cell" style:parent-style-name="Default" style:data-style-name="N129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1" style:family="table-cell" style:parent-style-name="Default">
      <style:table-cell-properties style:rotation-align="top"/>
    </style:style>
    <style:style style:name="ce62" style:family="table-cell" style:parent-style-name="Default">
      <style:table-cell-properties style:rotation-align="top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rotation-align="top"/>
      <style:text-properties fo:font-weight="normal"/>
    </style:style>
  </office:automatic-styles>
  <office:body>
    <office:spreadsheet>
      <table:calculation-settings table:case-sensitive="false" table:automatic-find-labels="false"/>
      <table:table table:name="Tabell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4" table:default-cell-style-name="ce28"/>
        <table:table-column table:style-name="co5" table:default-cell-style-name="ce22"/>
        <table:table-column table:style-name="co6" table:default-cell-style-name="ce44"/>
        <table:table-column table:style-name="co7" table:default-cell-style-name="ce48"/>
        <table:table-column table:style-name="co7" table:default-cell-style-name="ce52"/>
        <table:table-column table:style-name="co7" table:visibility="collapse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number-columns-repeated="242" table:default-cell-style-name="ce56"/>
        <table:table-column table:style-name="co12" table:default-cell-style-name="ce61"/>
        <table:table-row table:style-name="ro1">
          <table:table-cell table:style-name="ce1" office:value-type="string" calcext:value-type="string">
            <text:p>Release</text:p>
          </table:table-cell>
          <table:table-cell table:style-name="ce12" office:value-type="string" calcext:value-type="string">
            <text:p>Modul name</text:p>
          </table:table-cell>
          <table:table-cell table:style-name="ce1" office:value-type="string" calcext:value-type="string">
            <text:p>Rev</text:p>
          </table:table-cell>
          <table:table-cell table:style-name="ce12" office:value-type="string" calcext:value-type="string">
            <text:p>Date</text:p>
          </table:table-cell>
          <table:table-cell table:style-name="ce29" office:value-type="string" calcext:value-type="string">
            <text:p>Histor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table:style-name="ce2"/>
          <table:table-cell table:style-name="ce3"/>
          <table:table-cell table:style-name="ce4"/>
          <table:table-cell table:style-name="ce25"/>
          <table:table-cell table:style-name="ce3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3" office:value-type="string" calcext:value-type="string">
            <text:p>MONTH_TO_STRIN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24-07-16" calcext:value-type="date">
            <text:p>16.07.24</text:p>
          </table:table-cell>
          <table:table-cell table:style-name="ce3" office:value-type="string" calcext:value-type="string">
            <text:p>added boundary check to respect array limi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ONSTANTS_SETU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orrected error in decad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RC_GEN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new improved code by dennis koepk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REVERS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new improved code by rebler wolfga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4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new better readable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hanged LDT to LOCAL_DT for compatibility with IEC61131-3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hanged LDT to LOCAL_DT for compatibility with IEC61131-3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alendar Struc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hanged LDT, LDATE, LTOD to LOCAL_DT, LOCAL_DATE, LOCAL_TO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REAL_TO_STRF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12-01-02" calcext:value-type="date">
            <text:p>02.01.12</text:p>
          </table:table-cell>
          <table:table-cell table:style-name="ce3" office:value-type="string" calcext:value-type="string">
            <text:p>added input parameter D to pecify the decimal separator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_STRING_TO_BUFFE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2-01-02" calcext:value-type="date">
            <text:p>02.01.12</text:p>
          </table:table-cell>
          <table:table-cell table:style-name="ce3" office:value-type="string" calcext:value-type="string">
            <text:p>functions now returnes the next position after the input 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2-01-02" calcext:value-type="date">
            <text:p>02.01.12</text:p>
          </table:table-cell>
          <table:table-cell table:style-name="ce3" office:value-type="string" calcext:value-type="string">
            <text:p>functions now returnes the next position after the input 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3</text:p>
          </table:table-cell>
          <table:table-cell table:style-name="ce25" office:value-type="date" office:date-value="2011-12-29" calcext:value-type="date">
            <text:p>29.12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4-27" calcext:value-type="date">
            <text:p>27.04.11</text:p>
          </table:table-cell>
          <table:table-cell table:style-name="ce3" office:value-type="string" calcext:value-type="string">
            <text:p>fixed error with local time calcula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SORT_L</text:p>
          </table:table-cell>
          <table:table-cell table:style-name="ce4"/>
          <table:table-cell table:style-name="ce25"/>
          <table:table-cell table:style-name="ce3" office:value-type="string" calcext:value-type="string">
            <text:p>deleted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IN</text:p>
          </table:table-cell>
          <table:table-cell table:style-name="ce4"/>
          <table:table-cell table:style-name="ce25"/>
          <table:table-cell table:style-name="ce3" office:value-type="string" calcext:value-type="string">
            <text:p>deleted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AX</text:p>
          </table:table-cell>
          <table:table-cell table:style-name="ce4"/>
          <table:table-cell table:style-name="ce25"/>
          <table:table-cell table:style-name="ce3" office:value-type="string" calcext:value-type="string">
            <text:p>deleted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4-08" calcext:value-type="date">
            <text:p>08.04.11</text:p>
          </table:table-cell>
          <table:table-cell table:style-name="ce3" office:value-type="string" calcext:value-type="string">
            <text:p>PTL and PTH was exchang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night was calculated wro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REAL_TO_FRA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optimiz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3-26" calcext:value-type="date">
            <text:p>26.03.11</text:p>
          </table:table-cell>
          <table:table-cell table:style-name="ce3" office:value-type="string" calcext:value-type="string">
            <text:p>corrected an error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AC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3-26" calcext:value-type="date">
            <text:p>26.03.11</text:p>
          </table:table-cell>
          <table:table-cell table:style-name="ce3" office:value-type="string" calcext:value-type="string">
            <text:p>fact is using constants.ma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CONSTANTS_MAT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26" calcext:value-type="date">
            <text:p>26.03.11</text:p>
          </table:table-cell>
          <table:table-cell table:style-name="ce3" office:value-type="string" calcext:value-type="string">
            <text:p>added array fac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11-03-22" calcext:value-type="date">
            <text:p>22.03.11</text:p>
          </table:table-cell>
          <table:table-cell table:style-name="ce3" office:value-type="string" calcext:value-type="string">
            <text:p>corrected err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LAS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AX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I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NEX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LE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GE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CLEA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ADD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MAX3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MIN3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MID3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_POL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_QUA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5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reset was not work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_RMP_B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2-19" calcext:value-type="date">
            <text:p>19.02.11</text:p>
          </table:table-cell>
          <table:table-cell table:style-name="ce3" office:value-type="string" calcext:value-type="string">
            <text:p>new enhanc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FRMP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7" calcext:value-type="date">
            <text:p>17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CLK_PULS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2-16" calcext:value-type="date">
            <text:p>16.02.11</text:p>
          </table:table-cell>
          <table:table-cell table:style-name="ce3" office:value-type="string" calcext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GEN_SQ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1-02-16" calcext:value-type="date">
            <text:p>16.02.11</text:p>
          </table:table-cell>
          <table:table-cell table:style-name="ce3" office:value-type="string" calcext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2-16" calcext:value-type="date">
            <text:p>16.02.11</text:p>
          </table:table-cell>
          <table:table-cell table:style-name="ce3" office:value-type="string" calcext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2-02" calcext:value-type="date">
            <text:p>02.02.11</text:p>
          </table:table-cell>
          <table:table-cell table:style-name="ce3" office:value-type="string" calcext:value-type="string">
            <text:p>added input H to specify twiligh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11-02-02" calcext:value-type="date">
            <text:p>02.02.11</text:p>
          </table:table-cell>
          <table:table-cell table:style-name="ce3" office:value-type="string" calcext:value-type="string">
            <text:p>fixed a problem, W was not calculat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"/>
          <table:table-cell table:style-name="ce4"/>
          <table:table-cell table:style-name="ce25" office:value-type="date" office:date-value="2011-02-02" calcext:value-type="date">
            <text:p>02.02.11</text:p>
          </table:table-cell>
          <table:table-cell table:style-name="ce3" office:value-type="string" calcext:value-type="string">
            <text:p>removed building code in external librar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EAP_OF_DAT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28" calcext:value-type="date">
            <text:p>28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AY_OF_YEA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28" calcext:value-type="date">
            <text:p>28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11-01-27" calcext:value-type="date">
            <text:p>27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26" calcext:value-type="date">
            <text:p>26.01.11</text:p>
          </table:table-cell>
          <table:table-cell table:style-name="ce3" office:value-type="string" calcext:value-type="string">
            <text:p>changed code to allow events over midnigh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TIMER_EVEN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26" calcext:value-type="date">
            <text:p>26.01.11</text:p>
          </table:table-cell>
          <table:table-cell table:style-name="ce3" office:value-type="string" calcext:value-type="string">
            <text:p>changed type of last to D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UN_TIME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using function sun_midday</text:p>
            <text:p>Changed calculation of sun_declination</text:p>
            <text:p>Changed input utc from DT to Date</text:p>
            <text:p>Added input 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UN_MIDD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FILTER_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fixed err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4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BUFFER_SEARCH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Return -1 if nothing found</text:p>
            <text:p>Ign=true will ignore cas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AYS_DELTA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S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1-24" calcext:value-type="date">
            <text:p>24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EAP_DA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24" calcext:value-type="date">
            <text:p>24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YEAR_E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24" calcext:value-type="date">
            <text:p>24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BLIND_ACTUATO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0-03-08" calcext:value-type="date">
            <text:p>08.03.10</text:p>
          </table:table-cell>
          <table:table-cell table:style-name="ce3" office:value-type="string" calcext:value-type="string">
            <text:p>position before control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4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BLIND_CONTROL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0-03-08" calcext:value-type="date">
            <text:p>08.03.10</text:p>
          </table:table-cell>
          <table:table-cell table:style-name="ce3" office:value-type="string" calcext:value-type="string">
            <text:p>position before control</text:p>
            <text:p>Delta := sene / 2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10</text:p>
          </table:table-cell>
          <table:table-cell table:style-name="ce25" office:value-type="date" office:date-value="2011-01-23" calcext:value-type="date">
            <text:p>23.01.11</text:p>
          </table:table-cell>
          <table:table-cell table:style-name="ce3" office:value-type="string" calcext:value-type="string">
            <text:p>fixed a problem with pulse_m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FLOW_METE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3" calcext:value-type="date">
            <text:p>23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11-01-22" calcext:value-type="date">
            <text:p>22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NETWORK_BUFFER</text:p>
          </table:table-cell>
          <table:table-cell table:style-name="ce4"/>
          <table:table-cell table:style-name="ce25" office:value-type="date" office:date-value="2011-01-21" calcext:value-type="date">
            <text:p>21.01.11</text:p>
          </table:table-cell>
          <table:table-cell table:style-name="ce3" office:value-type="string" calcext:value-type="string">
            <text:p>deleted unused data structur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URL</text:p>
          </table:table-cell>
          <table:table-cell table:style-name="ce4"/>
          <table:table-cell table:style-name="ce25" office:value-type="date" office:date-value="2011-01-21" calcext:value-type="date">
            <text:p>21.01.11</text:p>
          </table:table-cell>
          <table:table-cell table:style-name="ce3" office:value-type="string" calcext:value-type="string">
            <text:p>deleted unused data structur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COUNT_SUB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changed offset from hours to minut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_BUFFER_UPPERCA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CHK_RE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COUNT_D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corrected init value to 16#FFFFFFFF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4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Global_Constants</text:p>
          </table:table-cell>
          <table:table-cell table:style-name="ce4"/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removed nework buffers</text:p>
            <text:p>Added list_leng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REAL_TO_FRA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GC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_ARRAY_SOR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new faster algorithm using quicksor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Return 0 if RH &lt;=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RETRIEVE_MI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RETRIEVE_MAX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RETRIEV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NEX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LE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GE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CLEA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FT_PT1</text:p>
          </table:table-cell>
          <table:table-cell table:style-name="ce4" office:value-type="string" calcext:value-type="string">
            <text:p>1.11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underrun of ou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CALE_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CALE_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CALE_B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DEAD_BAN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Assign 0 before retur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4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CONSTANTS_LOCATIO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added spoken language</text:p>
            <text:p>Deleted holidays for more flexibilit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4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added input holidays to specify local holidays</text:p>
            <text:p>Changed call of function sun_time dt &gt;&gt; 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4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using user specified array for holidays</text:p>
            <text:p>Friday, saturday and sunday is also displayed on output nam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VENT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4</text:p>
          </table:table-cell>
          <table:table-cell table:style-name="ce25" office:value-type="date" office:date-value="2011-01-17" calcext:value-type="date">
            <text:p>17.01.11</text:p>
          </table:table-cell>
          <table:table-cell table:style-name="ce31" office:value-type="string" calcext:value-type="string">
            <text:p>init will not clear ontine and cycles, only rst clears these valu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REFLEC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6" calcext:value-type="date">
            <text:p>16.01.11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RC_CHECK</text:p>
          </table:table-cell>
          <table:table-cell table:style-name="ce4"/>
          <table:table-cell table:style-name="ce25" office:value-type="date" office:date-value="2011-01-16" calcext:value-type="date">
            <text:p>16.01.11</text:p>
          </table:table-cell>
          <table:table-cell table:style-name="ce31" office:value-type="string" calcext:value-type="string">
            <text:p>Deleted and replaced by CRC_GE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RC_GE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1-16" calcext:value-type="date">
            <text:p>16.01.11</text:p>
          </table:table-cell>
          <table:table-cell table:style-name="ce31" office:value-type="string" calcext:value-type="string">
            <text:p>New code and featur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Tank_VOL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0-03-10" calcext:value-type="date">
            <text:p>10.03.10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Tank_VOL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0-03-10" calcext:value-type="date">
            <text:p>10.03.10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IRCLE_SE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0-03-10" calcext:value-type="date">
            <text:p>10.03.10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ACTUATOR_3P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0-01-29" calcext:value-type="date">
            <text:p>29.01.10</text:p>
          </table:table-cell>
          <table:table-cell table:style-name="ce31" office:value-type="string" calcext:value-type="string">
            <text:p>new features and new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0-01-23" calcext:value-type="date">
            <text:p>23.01.10</text:p>
          </table:table-cell>
          <table:table-cell table:style-name="ce31" office:value-type="string" calcext:value-type="string">
            <text:p>sun_rise, sun_set and sun_midday are now calculated in local 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0-10-23" calcext:value-type="date">
            <text:p>23.10.10</text:p>
          </table:table-cell>
          <table:table-cell table:style-name="ce31" office:value-type="string" calcext:value-type="string">
            <text:p>sun_rise, sun_set and sun_midday are now in local 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BLIND_CONTROL_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0-01-23" calcext:value-type="date">
            <text:p>23.01.10</text:p>
          </table:table-cell>
          <table:table-cell table:style-name="ce31" office:value-type="string" calcext:value-type="string">
            <text:p>fixed a bug during calibration</text:p>
            <text:p>Added T_UP and T_D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NERG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0-01-16" calcext:value-type="date">
            <text:p>16.01.10</text:p>
          </table:table-cell>
          <table:table-cell table:style-name="ce31" office:value-type="string" calcext:value-type="string">
            <text:p>avoid the string cal in comments for codesys import bu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9-12-16" calcext:value-type="date">
            <text:p>16.12.09</text:p>
          </table:table-cell>
          <table:table-cell table:style-name="ce31" office:value-type="string" calcext:value-type="string">
            <text:p>fixed error over midnigh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MON_X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MON_R4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MON_B8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COLLEC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s pos to be I/O</text:p>
            <text:p>Changed output array size to 32 ele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0</text:p>
          </table:table-cell>
          <table:table-cell table:style-name="Default"/>
          <table:table-cell table:style-name="ce4"/>
          <table:table-cell table:style-name="ce25" office:value-type="date" office:date-value="2009-11-24" calcext:value-type="date">
            <text:p>24.11.09</text:p>
          </table:table-cell>
          <table:table-cell table:style-name="ce3" office:value-type="string" calcext:value-type="string">
            <text:p>Network Components exported into Network Librar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Global_Constants</text:p>
          </table:table-cell>
          <table:table-cell table:style-name="ce4"/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added network short and long size</text:p>
            <text:p>Default string_length = 25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fixed code for negative K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corrected erro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C is now calculated correctl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corrected an error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ESR_COLLEC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output pos was not pointing to last val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_STRING_TO_BUFF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limit end to size - 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UFFER_CO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UFFER_SEARC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limit end to array siz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limit start and stop to size of arra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LIND_SHADE_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added state 139</text:p>
            <text:p>set defaults for QU, QD, P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GRAY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11-09" calcext:value-type="date">
            <text:p>09.1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YTE_TO_GR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11-09" calcext:value-type="date">
            <text:p>09.1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TREN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8-21" calcext:value-type="date">
            <text:p>21.08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SDT_NH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8-20" calcext:value-type="date">
            <text:p>20.08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SDD_NH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8-20" calcext:value-type="date">
            <text:p>20.08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K_TO_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8-19" calcext:value-type="date">
            <text:p>19.08.09</text:p>
          </table:table-cell>
          <table:table-cell table:style-name="ce31" office:value-type="string" calcext:value-type="string">
            <text:p>fixed error in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C_TO_K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8-19" calcext:value-type="date">
            <text:p>19.08.09</text:p>
          </table:table-cell>
          <table:table-cell table:style-name="ce31" office:value-type="string" calcext:value-type="string">
            <text:p>fixed error in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CONTROL_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major code changes and updat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output C is now calculated in J/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CONTROL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changed status manag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ACTUATO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changes status to be 12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SE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changed status 0 to 13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IN_TO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26" calcext:value-type="date">
            <text:p>26.07.09</text:p>
          </table:table-cell>
          <table:table-cell table:style-name="ce31" office:value-type="string" calcext:value-type="string">
            <text:p>optimiz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IN_TO_BYT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26" calcext:value-type="date">
            <text:p>26.07.09</text:p>
          </table:table-cell>
          <table:table-cell table:style-name="ce31" office:value-type="string" calcext:value-type="string">
            <text:p>optimiz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SUN_TIME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7-26" calcext:value-type="date">
            <text:p>26.07.09</text:p>
          </table:table-cell>
          <table:table-cell table:style-name="ce31" office:value-type="string" calcext:value-type="string">
            <text:p>fixed a problem with wrong midday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STACK_32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5" calcext:value-type="date">
            <text:p>25.07.09</text:p>
          </table:table-cell>
          <table:table-cell table:style-name="ce31" office:value-type="string" calcext:value-type="string">
            <text:p>changed inputs to allow simultsaneous read and wri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STACK_16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5" calcext:value-type="date">
            <text:p>25.07.09</text:p>
          </table:table-cell>
          <table:table-cell table:style-name="ce31" office:value-type="string" calcext:value-type="string">
            <text:p>changed inputs to allow simultsaneous read and wri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4" calcext:value-type="date">
            <text:p>24.07.09</text:p>
          </table:table-cell>
          <table:table-cell table:style-name="ce31" office:value-type="string" calcext:value-type="string">
            <text:p>changed inputs to allow read and write in one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4" calcext:value-type="date">
            <text:p>24.07.09</text:p>
          </table:table-cell>
          <table:table-cell table:style-name="ce31" office:value-type="string" calcext:value-type="string">
            <text:p>changed inputs to allow read and write in one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TANK_LEVE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7-24" calcext:value-type="date">
            <text:p>24.07.09</text:p>
          </table:table-cell>
          <table:table-cell table:style-name="ce31" office:value-type="string" calcext:value-type="string">
            <text:p>changed parameters of tono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TONOF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21" calcext:value-type="date">
            <text:p>21.07.09</text:p>
          </table:table-cell>
          <table:table-cell table:style-name="ce31" office:value-type="string" calcext:value-type="string">
            <text:p>fixed a timing proble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TIMECHECK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7-19" calcext:value-type="date">
            <text:p>19.07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METER_STA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changed all outputs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DWORD_OF_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WORD_OF_BYT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DWORD_OF_BY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GEN_SQ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accurac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MULTI_IN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Default" office:value-type="string" calcext:value-type="string">
            <text:p>_RMP_NEX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29" calcext:value-type="date">
            <text:p>29.03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C_8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28" calcext:value-type="date">
            <text:p>28.03.09</text:p>
          </table:table-cell>
          <table:table-cell table:style-name="ce31" office:value-type="string" calcext:value-type="string">
            <text:p>replaced multip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YS_IN_YEA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7" calcext:value-type="date">
            <text:p>27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YS_IN_MONTH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7" calcext:value-type="date">
            <text:p>27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ONTH_OF_DA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27" calcext:value-type="date">
            <text:p>27.03.09</text:p>
          </table:table-cell>
          <table:table-cell table:style-name="ce31" office:value-type="string" calcext:value-type="string">
            <text:p>new 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avoid writing to input sto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avoid writing to input po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RIVER_4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real constants updated to new systax using dot</text:p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LAY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corrected non standard write to input 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IMM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2" calcext:value-type="date">
            <text:p>22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ETE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8" calcext:value-type="date">
            <text:p>18.03.09</text:p>
          </table:table-cell>
          <table:table-cell table:style-name="ce31" office:value-type="string" calcext:value-type="string">
            <text:p>last was not updated</text:p>
            <text:p>Code improvements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CHEDUL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BI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LICK_DE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TORE_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TCH_4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HR_8U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HR_4U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F_D4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F_D2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REND_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PW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ANUAL_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NTERLOCK_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NSTANTS_PHY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QUENCE_8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named output any to qx for compatibility re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QUENCE_4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named output any to qx for compatibility re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IR_DENSITY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OIL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W_R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W_TEMP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  <text:p>function will now return -273.15 °C for RH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HEAT_INDE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13" office:value-type="string" calcext:value-type="string">
            <text:p>HEAT_TEMP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EGIONELLA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  <text:p>using new module sequence_8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_AVG2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14" office:value-type="string" calcext:value-type="string">
            <text:p>TEMP_EX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ATER_CP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ATER_DENSIT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ATER_ENTHALP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C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LIND_SHAD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UNE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UN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RA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NTROL_SET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NTROL_SET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AD_BAND_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AD_ZON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AD_ZONE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DERIV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INT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D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T1</text:p>
          </table:table-cell>
          <table:table-cell table:style-name="ce4" office:value-type="string" calcext:value-type="string">
            <text:p>1.10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T2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15" office:value-type="string" calcext:value-type="string">
            <text:p>SPEE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T_TP_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16" office:value-type="string" calcext:value-type="string">
            <text:p>PRESSUR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ENGT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16" office:value-type="string" calcext:value-type="string">
            <text:p>F_TO_P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_TO_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NERG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_TO_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STRO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C_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ETER_STA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_TX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ALIBRA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LARM_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PT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NT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NSOR_IN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S_SI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S_P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S_NT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ULTI_IN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WM_PW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WM_DC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SQ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  <text:p>set default amplitude to 1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SIN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RMP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ORD_TO_RANG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TAIR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TAI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H_2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L2_OF_3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IX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ILTER_WAV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IN1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V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TREND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HA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GA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AV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TAN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faster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TA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faster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2_SE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2_AB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P4_TO_STRI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OLYNOM_IN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RIANGLE_A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LLIPSE_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Z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Y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X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17" office:value-type="string" calcext:value-type="string">
            <text:p>V3_PA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NU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NORM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UN_TIME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  <text:p>Calculation is done on every call to allow for moving installati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AN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AN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QRTN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IGN_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IN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IGMOI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N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DM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ODR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ANGEVI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AMBERT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N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DF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AUSSC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AUS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AMMA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RAC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RF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_TRUN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TH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S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EIL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use correct statement real_to_D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TAN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TAN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SIN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GD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COT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COS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SI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NI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_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  <text:p>Removed double 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INT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XP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  <text:p>Real constants written with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Y_OF_MONTH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RC_GEN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S_IP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P4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faster algorith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calculation of work_week, sun_midday, sun_heigth</text:p>
            <text:p>sun_position will onlx be calculated once per 25 seconds when SPE = TRUE</text:p>
            <text:p>dst will only become true when dst_en = tr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work_week, sun_midday, sun_hei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LIND_CONTROL_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09" calcext:value-type="date">
            <text:p>09.03.09</text:p>
          </table:table-cell>
          <table:table-cell table:style-name="Default" office:value-type="string" calcext:value-type="string">
            <text:p>new Module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09" calcext:value-type="date">
            <text:p>09.03.09</text:p>
          </table:table-cell>
          <table:table-cell table:style-name="ce31" office:value-type="string" calcext:value-type="string">
            <text:p>input E was ignored</text:p>
            <text:p>Removed double assignments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T_SIMU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08" calcext:value-type="date">
            <text:p>08.03.09</text:p>
          </table:table-cell>
          <table:table-cell table:style-name="ce31" office:value-type="string" calcext:value-type="string">
            <text:p>added increment by cycle m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3-07" calcext:value-type="date">
            <text:p>07.03.09</text:p>
          </table:table-cell>
          <table:table-cell table:style-name="ce31" office:value-type="string" calcext:value-type="string">
            <text:p>refraction is added after angle is normalized</text:p>
            <text:p>deleted 10 second lockout</text:p>
            <text:p>added output for astronomical heigth 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FRACTIO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07" calcext:value-type="date">
            <text:p>07.03.09</text:p>
          </table:table-cell>
          <table:table-cell table:style-name="ce31" office:value-type="string" calcext:value-type="string">
            <text:p>using new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8" calcext:value-type="date">
            <text:p>28.02.09</text:p>
          </table:table-cell>
          <table:table-cell table:style-name="ce31" office:value-type="string" calcext:value-type="string">
            <text:p>array was not correctly initializ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UTC_TO_LTIME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1-23" calcext:value-type="date">
            <text:p>23.01.09</text:p>
          </table:table-cell>
          <table:table-cell table:style-name="ce31" office:value-type="string" calcext:value-type="string">
            <text:p>new code with better accuracy</text:p>
          </table:table-cell>
          <table:table-cell table:style-name="ce41"/>
          <table:table-cell table:style-name="ce46"/>
          <table:table-cell table:style-name="ce50"/>
          <table:table-cell table:style-name="ce54"/>
          <table:table-cell table:style-name="ce57"/>
          <table:table-cell table:style-name="ce54" table:number-columns-repeated="2"/>
          <table:table-cell table:style-name="ce59"/>
          <table:table-cell table:style-name="ce54" table:number-columns-repeated="242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25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ELECT_8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renamed input en to 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_T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_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REAL_TO_STRF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added a missing zero for IN &lt; 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ECOND_TO_TI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INUTE_TO_TI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HOUR_TO_TI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DAY_TO_TIM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limit N to max array inde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limit N to max array inde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INC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when inc1 is called with X &gt;= N inc will continue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DELAY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corrected an index proble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0" calcext:value-type="date">
            <text:p>20.02.09</text:p>
          </table:table-cell>
          <table:table-cell table:style-name="ce31" office:value-type="string" calcext:value-type="string">
            <text:p>improved algorithm and added T_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REND_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20" calcext:value-type="date">
            <text:p>20.02.09</text:p>
          </table:table-cell>
          <table:table-cell table:style-name="ce31" office:value-type="string" calcext:value-type="string">
            <text:p>added outputs TU, TD and 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BLIND_SHAD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added calendar data structure</text:p>
            <text:p>Added shading position to be configur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2" office:value-type="string" calcext:value-type="string">
            <text:p>corrected wrong night calculation</text:p>
            <text:p>Added sun position dat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added sun position dat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ET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changed MX to be I/O</text:p>
            <text:p>Make sure calculation works for cycle times &lt; 1m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changed output Y to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LAMBERT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_AVG2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added outputs T24_MIN and T24_MAX</text:p>
            <text:p>Changed sign of input OF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3</text:p>
          </table:table-cell>
          <table:table-cell table:style-name="ce25" office:value-type="date" office:date-value="2009-01-26" calcext:value-type="date">
            <text:p>26.01.09</text:p>
          </table:table-cell>
          <table:table-cell table:style-name="ce31" office:value-type="string" calcext:value-type="string">
            <text:p>dimming will reverse at 0</text:p>
            <text:p>Rst will override 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1-25" calcext:value-type="date">
            <text:p>25.01.09</text:p>
          </table:table-cell>
          <table:table-cell table:style-name="ce31" office:value-type="string" calcext:value-type="string">
            <text:p>multiply differential part with K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1-25" calcext:value-type="date">
            <text:p>25.01.09</text:p>
          </table:table-cell>
          <table:table-cell table:style-name="ce31" office:value-type="string" calcext:value-type="string">
            <text:p>now also works with negative 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CALE_X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3" office:value-type="string" calcext:value-type="string"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/>
          <table:table-cell table:style-name="ce58"/>
          <table:table-cell table:style-name="ce54" table:number-columns-repeated="245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AD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4" office:value-type="string" calcext:value-type="string">
            <text:p>delted unused var F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4"/>
          <table:table-cell table:style-name="ce60"/>
          <table:table-cell table:style-name="ce54" table:number-columns-repeated="242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ACTUATOR_2P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1" office:value-type="string" calcext:value-type="string">
            <text:p>deleted unused var in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1" office:value-type="string" calcext:value-type="string">
            <text:p>deletes unused vars tmp1 and tmp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GEO_TO_DE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1-22" calcext:value-type="date">
            <text:p>22.0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1-22" calcext:value-type="date">
            <text:p>22.01.09</text:p>
          </table:table-cell>
          <table:table-cell table:style-name="ce31" office:value-type="string" calcext:value-type="string">
            <text:p>added auto mode for IN</text:p>
            <text:p>Added pulse mode for D1 and D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O_UPP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1-16" calcext:value-type="date">
            <text:p>16.01.09</text:p>
          </table:table-cell>
          <table:table-cell table:style-name="ce5" office:value-type="string" calcext:value-type="string">
            <text:p>corrected an error in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EMP_NT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2-30" calcext:value-type="date">
            <text:p>30.12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RES_NT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2-30" calcext:value-type="date">
            <text:p>30.12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LICK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2-28" calcext:value-type="date">
            <text:p>28.12.08</text:p>
          </table:table-cell>
          <table:table-cell table:style-name="ce31" office:value-type="string" calcext:value-type="string">
            <text:p>new code using library modu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ONSTANTS_LOCATIO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23" calcext:value-type="date">
            <text:p>23.12.08</text:p>
          </table:table-cell>
          <table:table-cell table:style-name="ce31" office:value-type="string" calcext:value-type="string">
            <text:p>added french holid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ONSTANTS_LANGUAG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2-23" calcext:value-type="date">
            <text:p>23.12.08</text:p>
          </table:table-cell>
          <table:table-cell table:style-name="ce31" office:value-type="string" calcext:value-type="string">
            <text:p>added french langua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IMER_2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2-22" calcext:value-type="date">
            <text:p>22.12.08</text:p>
          </table:table-cell>
          <table:table-cell table:style-name="ce31" office:value-type="string" calcext:value-type="string">
            <text:p>make sure timer_2 is executed in the first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URL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O_UM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HTML_DECO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IL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HR_TO_STRIN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name of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angles below horizon are displayed in negative degre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fixed an error when in would be true for more then 49 d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M_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P_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A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FADE input F was invert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_LIN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optimized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4" calcext:value-type="date">
            <text:p>24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24" calcext:value-type="date">
            <text:p>24.11.08</text:p>
          </table:table-cell>
          <table:table-cell table:style-name="ce31" office:value-type="string" calcext:value-type="string">
            <text:p>added type conversions for compatibility reasons</text:p>
            <text:p>avoid divide by 0 f N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24" calcext:value-type="date">
            <text:p>24.11.08</text:p>
          </table:table-cell>
          <table:table-cell table:style-name="ce31" office:value-type="string" calcext:value-type="string">
            <text:p>added type conversions for compatibility reasons</text:p>
            <text:p>avoid divide by 0 f N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ACTUATOR_2P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1-23" calcext:value-type="date">
            <text:p>23.11.08</text:p>
          </table:table-cell>
          <table:table-cell table:style-name="ce31" office:value-type="string" calcext:value-type="string">
            <text:p>new code using library modu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23" calcext:value-type="date">
            <text:p>23.11.08</text:p>
          </table:table-cell>
          <table:table-cell table:style-name="ce31" office:value-type="string" calcext:value-type="string">
            <text:p>added default enq = TR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MANU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1" calcext:value-type="date">
            <text:p>21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BAND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1" calcext:value-type="date">
            <text:p>21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REND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1" calcext:value-type="date">
            <text:p>21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AUTORU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0" calcext:value-type="date">
            <text:p>20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_RMP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20" calcext:value-type="date">
            <text:p>20.11.08</text:p>
          </table:table-cell>
          <table:table-cell table:style-name="ce31" office:value-type="string" calcext:value-type="string">
            <text:p>set default for E to be TRUE</text:p>
            <text:p>added Init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_RMP_B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20" calcext:value-type="date">
            <text:p>20.11.08</text:p>
          </table:table-cell>
          <table:table-cell table:style-name="ce31" office:value-type="string" calcext:value-type="string">
            <text:p>set default for E to be TRUE</text:p>
            <text:p>added Init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SDT_TO_TO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chaged typecasts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chaged typecasts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DT_SIMU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_PLC_M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initialized constants with 0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_PLC_U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initialized constants with 0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moved structured constants to global var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added Reset Out featur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BUFFER_COMP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14" calcext:value-type="date">
            <text:p>14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14" calcext:value-type="date">
            <text:p>14.11.08</text:p>
          </table:table-cell>
          <table:table-cell table:style-name="ce31" office:value-type="string" calcext:value-type="string">
            <text:p>added soft_dimm featur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CLICK_M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13" calcext:value-type="date">
            <text:p>1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3" calcext:value-type="date">
            <text:p>13.11.08</text:p>
          </table:table-cell>
          <table:table-cell table:style-name="ce31" office:value-type="string" calcext:value-type="string">
            <text:p>corrected formula for negative gradi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3" calcext:value-type="date">
            <text:p>13.11.08</text:p>
          </table:table-cell>
          <table:table-cell table:style-name="ce31" office:value-type="string" calcext:value-type="string">
            <text:p>corrected formula for negative gradi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10" calcext:value-type="date">
            <text:p>10.11.08</text:p>
          </table:table-cell>
          <table:table-cell table:style-name="ce31" office:value-type="string" calcext:value-type="string">
            <text:p>increased internal resolution to millisecond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ILTER_I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8" calcext:value-type="date">
            <text:p>08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ACTUATOR_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8" calcext:value-type="date">
            <text:p>08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TIMER_EX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added default = true for ena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DERIV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set defaults for inputs day and e, 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changed to FT_INT2 to avoid overrun at hig valu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PI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5" calcext:value-type="date">
            <text:p>05.11.08</text:p>
          </table:table-cell>
          <table:table-cell table:style-name="ce31" office:value-type="string" calcext:value-type="string">
            <text:p>rewritten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INT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5" calcext:value-type="date">
            <text:p>05.11.08</text:p>
          </table:table-cell>
          <table:table-cell table:style-name="ce31" office:value-type="string" calcext:value-type="string">
            <text:p>rewritten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CTRL_OU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5" calcext:value-type="date">
            <text:p>05.11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INT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optimized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D_TRUN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deleted unused variable chec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INTEGRA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PT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optimized code and fixed a problem with ini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ILTER_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fixed overflow problen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ILTER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fixed overflow problen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CYCLE_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B8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B4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B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T_AVG2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EMP_PT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BUFFER_INI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corrected an error while routine would write outside of arr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BUFFER_CLEA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corrected an error while routine would write outside of arr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_TRUN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OD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changed algorithm to the more common version using floor instead of TRUNC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PIN_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YTE_OF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WORD_OF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GGL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ORE_8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TCH_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TC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JK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DR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D4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D2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ESSAGE_4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changed _INC to 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LTER_WA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changed _DEC and _INC to DEC1 and 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added typecast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added typecast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CK_3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CK_16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SR_COLLEC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LAY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NC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5" office:value-type="string" calcext:value-type="string">
            <text:p>New Module, replacing _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C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5" office:value-type="string" calcext:value-type="string">
            <text:p>New Module, replacing _DE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IGN_I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AUS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integrator will not be adjusted when ki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AC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UCHYC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UCH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NEG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N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ET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AMMA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  <text:p>Improved accuracy for small values by a factor &gt; 100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MATH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Added 1 / pi and 1 / 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ATRI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C_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B8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B4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B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IR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I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X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SOFT</text:p>
          </table:table-cell>
          <table:table-cell table:style-name="ce4" office:value-type="string" calcext:value-type="string">
            <text:p>3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code using _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EN_RMP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UPP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LOW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LK_PR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R8_U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R4_U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R_4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OUND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 using constant decad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_TRI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  <text:p>A_TRIG now works for res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MONT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EVENT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WEEK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WEEKDA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WORK_WEEK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AY_OF_MONTH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new code using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new code using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SETUP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NOM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4" calcext:value-type="date">
            <text:p>24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CO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4" calcext:value-type="date">
            <text:p>24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NTERLOCK_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AN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EGIONELLA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changed code to use new version of timer_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code, enable input new features (DAYS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W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code using _RMP_W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B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code using _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RMP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LOAT_TO_REA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fixed a problem with character 8 and 9 behind the comm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IST_RETRIEVE_M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SR_MON_B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IR_TO_DE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using language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18" office:value-type="string" calcext:value-type="string">
            <text:p>CONSTANTS_LANGUAG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G_TO_DI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using language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IST_RETRIEVE_MA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changed structure and code for better performance</text:p>
            <text:p>New featur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RMP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_LAMP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changed structure and code for better performance and external variab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XP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W_RECONFI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TRL_PWM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CTUATOR_2P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5" office:value-type="string" calcext:value-type="string">
            <text:p>using location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ND_CH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NDB_NONUM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ND_NONUM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CTUATOR_PUMP</text:p>
          </table:table-cell>
          <table:table-cell table:style-name="ce4"/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changed code to use ontime rev 2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URNER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changed code to use ontime rev 2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changed structure and code for better performance and external variab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changed time_zone_offset from Real to INT, now in Minut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OCAL_TIME</text:p>
          </table:table-cell>
          <table:table-cell table:style-name="ce4"/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deleted from library, can be replaced by UTC_TO_L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UTC_TO_LTIME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changes type of input TIME_ZONE_OFFSET from real to int, now is in +/-minutes</text:p>
            <text:p>Deleted outputs DSE and WEEKDAY</text:p>
            <text:p>Changed from FB to Func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LOCATIO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10-20" calcext:value-type="date">
            <text:p>20.10.08</text:p>
          </table:table-cell>
          <table:table-cell table:style-name="ce5" office:value-type="string" calcext:value-type="string">
            <text:p>changed to structured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31" office:value-type="string" calcext:value-type="string">
            <text:p>performance improvement</text:p>
            <text:p>Deleted unnecessary trunc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UPP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LOW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SC_UPP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SC_LOW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SC_ALPH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MONT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ONTH_TO_STRI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WEEKDAY_TO_STRI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T_TO_STR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NEG</text:p>
          </table:table-cell>
          <table:table-cell table:style-name="ce4"/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deleted unnecessary function because -X is faste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PWM_PW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changed type TP_R to TP_X because of name chan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PWM_DC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changed type TP_R to TP_X because of name change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P_X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renamed module from TP_R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added typecast to avoid warnings</text:p>
            <text:p>changed output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5" office:value-type="string" calcext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5" office:value-type="string" calcext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5" office:value-type="string" calcext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LIND_ACTUATO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calls for rmp_B because of change in 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LOAD_DW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LOAD_W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LOAD_B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_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W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TOGGLE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TOGGLE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TOGGLE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W_TEMP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IR_DENSIT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DM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DM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DM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A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OM_TO_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EN_SIN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D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AMM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_TO_OM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LLIPSE_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LLIPSE_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VEKTOR_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UR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EVEN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EAL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NETWORK_BUFFE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HOLIDAY_DAT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SR_DAT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PHY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MPLE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TAN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_TO_DA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_TO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_TO_TO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T2_TO_S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T_TO_S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added typecast to avoid warnings</text:p>
            <text:p>Changes type of input ofs from int to by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B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added typecast to avoid warnings</text:p>
            <text:p>changed inp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A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performance improvement</text:p>
            <text:p>changed calls for rmp_w because rmp_w has chag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ANUAL_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variable m_ed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IRTRANS_8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IRTRANS_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ACTUATOR_UD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initialization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TACK_16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TACK_3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OIL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R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R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LIST_LE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fixed a problem where list_len would only work up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RMP_W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RMP_B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GEN_BI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5" calcext:value-type="date">
            <text:p>15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LTI_I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corrected an error for in_3 overrange detection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UTC_TO_LTIME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Renamed module from LTIME to UTC_TO_LTIME</text:p>
            <text:p>Changed input Time_zone_offset from int to real to allow half hour offset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changes code for efficiency</text:p>
            <text:p>Changes TIME_Zone_Offset from Int to REAL to allow half hour off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WA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ACTUATOR_PUMP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auto activation can now be disabled when run_every = T#0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_DEC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_INC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0" calcext:value-type="date">
            <text:p>10.10.08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9" calcext:value-type="date">
            <text:p>09.10.08</text:p>
          </table:table-cell>
          <table:table-cell table:style-name="ce31" office:value-type="string" calcext:value-type="string">
            <text:p>changed function year to year_of_date</text:p>
            <text:p>changed function weekday to day_of_week</text:p>
            <text:p>changed structure of program to be more efficient</text:p>
            <text:p>Added set and reset of channel at specific times</text:p>
            <text:p>Changed input DIS to ENQ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9" calcext:value-type="date">
            <text:p>09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9" calcext:value-type="date">
            <text:p>09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ESSAGE_4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8" calcext:value-type="date">
            <text:p>0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EX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CF_77</text:p>
          </table:table-cell>
          <table:table-cell table:style-name="ce4" office:value-type="string" calcext:value-type="string">
            <text:p>1.10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AY_OF_WEEK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from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WORK_WEEK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ged function month to month_of_date</text:p>
            <text:p>changed function weekday to day_of_week</text:p>
            <text:p/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EMP_EX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ONTH_E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ETER_STA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month to month_of_date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LEAP_DA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weekday to day_of_week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T_TO_STR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S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AY_OF_YE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ONTH_OF_DAT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YEAR_OF_DAT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LOAT_TO_REA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2" calcext:value-type="date">
            <text:p>02.10.08</text:p>
          </table:table-cell>
          <table:table-cell table:style-name="ce31" office:value-type="string" calcext:value-type="string">
            <text:p>fixed an error, characters 8 and 9 would not be convert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ce31" office:value-type="string" calcext:value-type="string">
            <text:p>added input val to supply value for set operation</text:p>
            <text:p>Added setup parameter INIT_VA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C_TO_DWOR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Default" office:value-type="string" calcext:value-type="string"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C_TO_IN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ce31" office:value-type="string" calcext:value-type="string">
            <text:p>changed length of input dtring from 20 to 10</text:p>
            <text:p>corrected an error where decoding of characters 8 and 9 would fail</text:p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C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ce31" office:value-type="string" calcext:value-type="string">
            <text:p>changed length of input dtring from 20 to 10</text:p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CHEDULER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9" calcext:value-type="date">
            <text:p>29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CHEDULE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8" calcext:value-type="date">
            <text:p>28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HEAT_TE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6" calcext:value-type="date">
            <text:p>26.09.08</text:p>
          </table:table-cell>
          <table:table-cell table:style-name="ce31" office:value-type="string" calcext:value-type="string">
            <text:p>moved T_INT from config to Input</text:p>
            <text:p>Added config variable H</text:p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GEN_PW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6" calcext:value-type="date">
            <text:p>26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9-26" calcext:value-type="date">
            <text:p>26.09.08</text:p>
          </table:table-cell>
          <table:table-cell table:style-name="ce31" office:value-type="string" calcext:value-type="string">
            <text:p>corrected an error while PO and AO was set during automatic mod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MONTH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5" calcext:value-type="date">
            <text:p>25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4" calcext:value-type="date">
            <text:p>24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ANUAL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2" calcext:value-type="date">
            <text:p>22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BOUNC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2" calcext:value-type="date">
            <text:p>22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WEEKDAY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1" calcext:value-type="date">
            <text:p>21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ONTH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1" calcext:value-type="date">
            <text:p>21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7</text:p>
          </table:table-cell>
          <table:table-cell table:style-name="Default" office:value-type="string" calcext:value-type="string">
            <text:p>GLOBAL CONSTANTS </text:p>
          </table:table-cell>
          <table:table-cell table:style-name="Default"/>
          <table:table-cell table:style-name="ce25" office:value-type="date" office:date-value="2008-09-21" calcext:value-type="date">
            <text:p>21.09.08</text:p>
          </table:table-cell>
          <table:table-cell table:style-name="Default" office:value-type="string" calcext:value-type="string">
            <text:p>added new section Language Setup</text:p>
            <text:p>added new section country setu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OCT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1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HEX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5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DWOR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4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1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IN_TO_DWOR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4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IN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1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T_SIMU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11" calcext:value-type="date">
            <text:p>11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TM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1" calcext:value-type="date">
            <text:p>2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TMA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FSTRING_TO_WEEKDA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7-18" calcext:value-type="date">
            <text:p>18.07.08</text:p>
          </table:table-cell>
          <table:table-cell table:style-name="ce31" office:value-type="string" calcext:value-type="string">
            <text:p>changed nested call of left(trim())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TOF_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7" calcext:value-type="date">
            <text:p>17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CLICK_DE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7" calcext:value-type="date">
            <text:p>17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CLICK_CN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A_TRI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rewritten code to allow for more functionality</text:p>
            <text:p>added single click mode with single_switch</text:p>
            <text:p>added Debounce for inputs S1 and S2</text:p>
            <text:p>added double_click functiona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FF_R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New Module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PULSE_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5" calcext:value-type="date">
            <text:p>15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JD2000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5" calcext:value-type="date">
            <text:p>15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REFRACTIO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4" calcext:value-type="date">
            <text:p>14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TAIR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EIL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PID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renamed Module FT_PID to CTRL_PID</text:p>
            <text:p>rewritten code to use modular approac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PI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renamed Module FT_PI to CTRL_PI</text:p>
            <text:p>rewritten code to use modular approac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INT_TO_BCD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changed name INT_TO_BCD to INT_TO_BCDC to avoid collision with util.lib</text:p>
            <text:p>corrected error in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CDC_TO_IN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changed name BCD_TO_INT to BCDC_TO_INT to avoid collision with util.li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reduced size of string constants to 253 to avoid problems with target aixia DCU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EQUENCE_6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9" calcext:value-type="date">
            <text:p>29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INC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9" calcext:value-type="date">
            <text:p>29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9" calcext:value-type="date">
            <text:p>29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LOW_CONTRO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P_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P_1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CLEA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RETRIEV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Default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NEX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5" calcext:value-type="date">
            <text:p>25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Default" office:value-type="string" calcext:value-type="string">
            <text:p>LIST_LE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5" calcext:value-type="date">
            <text:p>25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LOAT_TO_RE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2" calcext:value-type="date">
            <text:p>2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WORD_TO_STRB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YTE_TO_STRB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IRTRANS_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PAR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C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C_TO_IN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C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WEEK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WEEKD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IMER_EVENT_DE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IN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IN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OCTAL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OCTAL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EX_TO_DWORD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changed input hex to STRING(20)</text:p>
            <text:p>function now ignores wrong character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EX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L_CHAR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LEA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7" calcext:value-type="date">
            <text:p>17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ANUAL_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7" calcext:value-type="date">
            <text:p>17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ANUAL_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7" calcext:value-type="date">
            <text:p>17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TML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6" calcext:value-type="date">
            <text:p>16.06.08</text:p>
          </table:table-cell>
          <table:table-cell table:style-name="ce31" office:value-type="string" calcext:value-type="string">
            <text:p>changed nested call of replace for better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6" calcext:value-type="date">
            <text:p>16.06.08</text:p>
          </table:table-cell>
          <table:table-cell table:style-name="ce31" office:value-type="string" calcext:value-type="string">
            <text:p>changed nested call of concat for better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EAP_D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ONTH_BEG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ONTH_EN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YEAR_EN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T1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accurac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IGN_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AD_ZON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AD_BA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AD_BAND_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H_2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set default for input N = 16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set default for input EN = TRUE and N = 3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3" calcext:value-type="date">
            <text:p>1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3" calcext:value-type="date">
            <text:p>1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S_TO_BF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FT_TO_M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check for pointer overrun</text:p>
            <text:p>change type of inputs start and stop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OUNT_D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IR_TO_DE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1" calcext:value-type="date">
            <text:p>1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G_TO_DI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1" calcext:value-type="date">
            <text:p>1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IT_OF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changes type of input N from byte to 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OUR_OF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INUTE_OF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ECOND_OF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DT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PWM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D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OU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R2_SE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INT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IN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rewritten with clear code</text:p>
            <text:p>added output LIM</text:p>
            <text:p>switched back to 32 Bit resolu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YST_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YST_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YS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ANK_LEVE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1" calcext:value-type="date">
            <text:p>0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ACTUATOR_COI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1" calcext:value-type="date">
            <text:p>0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F_POL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20" calcext:value-type="date">
            <text:p>20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EL2_OF_3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9" calcext:value-type="date">
            <text:p>19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ALARM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9" calcext:value-type="date">
            <text:p>19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RDM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changed constant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EL2_OF_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RDM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changed constant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CALE_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CALE_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CALE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added charname lists</text:p>
            <text:p>renamed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6" office:value-type="float" office:value="274" calcext:value-type="float">
            <text:p>274</text:p>
          </table:table-cell>
          <table:table-cell table:style-name="Default" office:value-type="string" calcext:value-type="string">
            <text:p>SCAL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REPLACE_CHAR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4" calcext:value-type="date">
            <text:p>14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4" calcext:value-type="date">
            <text:p>14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HAR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4" calcext:value-type="date">
            <text:p>14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BUFFER_SEARC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STRING_TO_BUFF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HTML_DE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03" calcext:value-type="date">
            <text:p>03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HTML_EN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03" calcext:value-type="date">
            <text:p>03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GD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D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added new constant PI05 and PI025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PERIOD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URL_DE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URL_EN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IS_URLCH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WORD_OF_BY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23" calcext:value-type="date">
            <text:p>23.04.08</text:p>
          </table:table-cell>
          <table:table-cell table:style-name="ce31" office:value-type="string" calcext:value-type="string">
            <text:p>reverse order of inputs to be more logical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WORD_OF_BYT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4-23" calcext:value-type="date">
            <text:p>23.04.08</text:p>
          </table:table-cell>
          <table:table-cell table:style-name="ce31" office:value-type="string" calcext:value-type="string">
            <text:p>reverse order of inputs to be more logical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IP4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2" calcext:value-type="date">
            <text:p>22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7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IN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4-22" calcext:value-type="date">
            <text:p>22.04.08</text:p>
          </table:table-cell>
          <table:table-cell table:style-name="ce31" office:value-type="string" calcext:value-type="string">
            <text:p>corrected error in formula when code_min was set</text:p>
            <text:p>corrected error when sign bit was used</text:p>
            <text:p>optimized code for better performance</text:p>
            <text:p>new functionality overflow_cod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LO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20" calcext:value-type="date">
            <text:p>20.04.08</text:p>
          </table:table-cell>
          <table:table-cell table:style-name="ce31" office:value-type="string" calcext:value-type="string">
            <text:p>use ATAN2 instead of ATAN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AR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20" calcext:value-type="date">
            <text:p>20.04.08</text:p>
          </table:table-cell>
          <table:table-cell table:style-name="ce31" office:value-type="string" calcext:value-type="string">
            <text:p>use ATAN2 instead of ATAN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TAN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0" calcext:value-type="date">
            <text:p>20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4-19" calcext:value-type="date">
            <text:p>19.04.08</text:p>
          </table:table-cell>
          <table:table-cell table:style-name="ce31" office:value-type="string" calcext:value-type="string">
            <text:p>added Setup Parameter NETWORK_BUFFER_SIZ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4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CF77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8-04-19" calcext:value-type="date">
            <text:p>19.04.08</text:p>
          </table:table-cell>
          <table:table-cell table:style-name="ce31" office:value-type="string" calcext:value-type="string">
            <text:p>added input dsi to allow to set daylight savings time when SDT is TRUE</text:p>
            <text:p>added asynchronous SET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URL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STRING_TO_UR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REAL_TO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W_TO_RE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AUSSC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ERF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etup parameter STEP7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YEAR_BEGI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YE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WEEKDAY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EAST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AY_OF_DA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Default" office:value-type="string" calcext:value-type="string">
            <text:p>GAUS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6" calcext:value-type="date">
            <text:p>06.04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MOD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IS_SORTE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FLOOR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EIL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RRAY_HA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RRAY_GA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ARRAY_MU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ARRAY_AD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ARRAY_AB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3</text:p>
          </table:table-cell>
          <table:table-cell table:style-name="ce19" office:value-type="string" calcext:value-type="string">
            <text:p>_ARRAY_SHUFFL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3-30" calcext:value-type="date">
            <text:p>30.03.08</text:p>
          </table:table-cell>
          <table:table-cell table:style-name="ce2" office:value-type="string" calcext:value-type="string">
            <text:p>changed last in rdm2 from pos to i+pos for more randomnes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3</text:p>
          </table:table-cell>
          <table:table-cell table:style-name="ce3" office:value-type="string" calcext:value-type="string">
            <text:p>TO_UM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3-29" calcext:value-type="date">
            <text:p>29.03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UPPERCAS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1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ICK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PLACE_UM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  <text:p>new code to avoid pointer out of range</text:p>
            <text:p>use new function to_um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PLACE_AL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20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IRRO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ESSAG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LOWERCAS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UPP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NC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LOW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HEX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CTR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C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ALPH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AL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B_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B_NO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B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NO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TRL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H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XEC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WORD_TO_STR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WORD_TO_STRF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20)</text:p>
            <text:p>limit the output string to max 20 digi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WORD_TO_STR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32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OUNT_CH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OD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H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1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APITALIZ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STR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2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STR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GLOBAL CONSTANTS </text:p>
          </table:table-cell>
          <table:table-cell table:style-name="ce7"/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Added setup parameter STRING_LENGTH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SORTE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L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TR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6" calcext:value-type="date">
            <text:p>26.03.08</text:p>
          </table:table-cell>
          <table:table-cell table:style-name="ce36" office:value-type="string" calcext:value-type="string">
            <text:p>character 127 is now recognized as contro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H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6" calcext:value-type="date">
            <text:p>26.03.08</text:p>
          </table:table-cell>
          <table:table-cell table:style-name="ce36" office:value-type="string" calcext:value-type="string">
            <text:p>char will now accept exten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6" calcext:value-type="date">
            <text:p>26.03.08</text:p>
          </table:table-cell>
          <table:table-cell table:style-name="ce36" office:value-type="string" calcext:value-type="string">
            <text:p>function now returns -1 for input &lt; 0 or &gt; 46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ET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4" calcext:value-type="date">
            <text:p>24.03.08</text:p>
          </table:table-cell>
          <table:table-cell table:style-name="ce36" office:value-type="string" calcext:value-type="string">
            <text:p>use data_type real2 to extend accuracy to 15 digits total</text:p>
            <text:p>do not use ft_int which adds unnecessary overhea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function would deliver wrong results when d1 and dx are a leap_yea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AYS_DELTA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changed output from int to dint because the total date range is 49710 day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AY_OF_DA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changed output from int to dint because the total date range is 49710 day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ATE_AD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fixed some bugs when month was negativ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AB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RAC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D_TRUNC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OD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D_TRUNC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LOOR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EI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real_to_int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VE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Changed type of input IN from int to d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LOO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real_to_int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EIL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_TRUN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ADD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MU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A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avoid to call replace with pos = 0 because some systems will produce an erro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avoid to call replace with pos = 0 because some systems will produce an erro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changed trunc to dint because trunc was generating wrong values on wago 842</text:p>
            <text:p>corrected an error with negative numb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XEC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Make sure output of exec will always be in the format x.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NC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9" calcext:value-type="date">
            <text:p>1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C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9" calcext:value-type="date">
            <text:p>1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RC_CHECK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  <text:p>improv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RC_GE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PARSE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STRING_TO_BUFF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UFFER_SEARC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UFFER_TO_STRIN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BUFFER_INSER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GEN_RD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8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9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S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code improvement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SR_MON_R4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deleted wrong conversion real_to_dwor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V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TREN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S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SP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SD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M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MAX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AVG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SHUFFL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INI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UN_POS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C_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UN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UNE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WORK_WEEK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8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output weekday to wday and dst to d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IT_LOAD_DW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IT_LOAD_W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IT_LOAD_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IN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IN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BUFFER_CLE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changed type of input size to uint</text:p>
            <text:p>deleted unused variable 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BUFFER_INI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BIT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renamed from byte_to_bit to byte_to_bit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BI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renamed from byte_to_bit to byte_to_bit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SIN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sequence of calculations to impr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COS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sequence of calculations to impr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IFF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DMD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MUL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resul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OUR_TO_TO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OUR_TO_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MINUTE_TO_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ECOND_TO_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changed code to avoid rounding problem at last digit of millisecon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C_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C_M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C_U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RAM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8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changed preset value out_min to -1e37</text:p>
            <text:p>stop integrator at the limits</text:p>
            <text:p>optimized 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M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2" calcext:value-type="date">
            <text:p>12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IN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improved accuracy around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IN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LANGEV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changed formula to avoid problems when x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QRT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added result 0 for con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RAC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added dint_to_real for compatibility reasons</text:p>
            <text:p>now returns 0 for number &gt; 2e9</text:p>
            <text:p>changed input to x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N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corrected an error with negative numb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IGMOI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extended range of valid inputs to +inv / -inv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changed output to dint instead of rea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AC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changed output of fact to dint to allow bigger valu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OT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extended range of valid inputs to +/- INV</text:p>
            <text:p>changed formula for better accurac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AN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corrected an error in formula</text:p>
            <text:p>extended range of valid inputs to +/- INV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make sure last will be between 0 and 1 to avoid invalid resul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BUFFER_INSER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9" calcext:value-type="date">
            <text:p>0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O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9" calcext:value-type="date">
            <text:p>0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corrected an error in pulse m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UPP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LOW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HE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CTR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NU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ALPH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LOWERCAS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added support for exte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UPPERCAS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added support for exte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O_LOW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O_UPP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GLOBAL CONSTANTS </text:p>
          </table:table-cell>
          <table:table-cell table:style-name="ce7"/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Added EXTENDED_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UFFER_TO_STRI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UFFER_SEARC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STRING_TO_BUFF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BUFFER_INI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BUFFER_CLE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APITALIZ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P4_CHECK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result is now rounded instead of trunc</text:p>
            <text:p>corrected an error with reals &lt; 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ARRAY_SHUFFL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added support for a..f and return 0 for invalid stri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EXEC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add a 0 to the string if a '.' is at the end of the string <text:s text:c="3"/>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EPLACE_UM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UPP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NU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LOW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IP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HE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CTR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ALPH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ALNU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P4_DECO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OUNT_CH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B_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B_NO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CH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CTR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P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MAX(pos,1) in loop initializ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IT_LOAD_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IT_LOAD_D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IT_LOAD_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DM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findb := 0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input pos to start search at posi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NO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input pos to start search at posi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AOU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2-23" calcext:value-type="date">
            <text:p>23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AOUT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3" calcext:value-type="date">
            <text:p>23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AIN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3" calcext:value-type="date">
            <text:p>23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POLYNOM_IN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TRIANGLE_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SPHERE_V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ONE_V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IRCLE_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IRCLE_A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B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CO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COS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R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S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SI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TA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TA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CO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CO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COS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DI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EX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IN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LO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MU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PO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PO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E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I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QR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U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TA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TA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HYPO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TEMPERATUR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RTC_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0" calcext:value-type="date">
            <text:p>20.02.08</text:p>
          </table:table-cell>
          <table:table-cell table:style-name="ce36" office:value-type="string" calcext:value-type="string">
            <text:p>Added millisecond 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RTC_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0" calcext:value-type="date">
            <text:p>20.02.08</text:p>
          </table:table-cell>
          <table:table-cell table:style-name="ce36" office:value-type="string" calcext:value-type="string">
            <text:p>Added millisecond 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WORD_OF_BY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replaced + with or for better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D_TRI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STACK_3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STACK_16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FIFO_3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FIFO_16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PARITY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HECK_PARITY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BYTE_OF_BI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REVER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BLIND_SECURIT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12" calcext:value-type="date">
            <text:p>12.02.08</text:p>
          </table:table-cell>
          <table:table-cell table:style-name="ce36" office:value-type="string" calcext:value-type="string">
            <text:p>added config variables rain_up and wind_up</text:p>
            <text:p>position for rain and wind is now configurab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8-02-08" calcext:value-type="date">
            <text:p>08.02.08</text:p>
          </table:table-cell>
          <table:table-cell table:style-name="ce36" office:value-type="string" calcext:value-type="string">
            <text:p>Added interim variable to allow for changes smaller them 8 digits of out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MET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8" calcext:value-type="date">
            <text:p>08.02.08</text:p>
          </table:table-cell>
          <table:table-cell table:style-name="ce36" office:value-type="string" calcext:value-type="string">
            <text:p>Use new version of ft_int and deleted unnecessary limits for integrato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WAP_BYTE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WAP_BYT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EPLACE_AL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H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return string would not be terminated proper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IND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MIRRO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RIM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LOWERCA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improved performance</text:p>
            <text:p>added support for Ä,Ö,Ü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UPPERCA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improved performance</text:p>
            <text:p>added support for Ä,Ö,Ü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EAST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03" calcext:value-type="date">
            <text:p>03.02.08</text:p>
          </table:table-cell>
          <table:table-cell table:style-name="ce19" office:value-type="string" calcext:value-type="string">
            <text:p>Modifi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2-02" calcext:value-type="date">
            <text:p>02.02.08</text:p>
          </table:table-cell>
          <table:table-cell table:style-name="ce36" office:value-type="string" calcext:value-type="string">
            <text:p>changed algorithm to avoind non iec functions and guarantee more randomnes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LIND_SCEN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29" calcext:value-type="date">
            <text:p>29.01.08</text:p>
          </table:table-cell>
          <table:table-cell table:style-name="ce36" office:value-type="string" calcext:value-type="string">
            <text:p>Replaced shr/shl with and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RMP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25" calcext:value-type="date">
            <text:p>25.01.08</text:p>
          </table:table-cell>
          <table:table-cell table:style-name="ce36" office:value-type="string" calcext:value-type="string">
            <text:p>Improved algorithm for higher speed</text:p>
            <text:p>allow KR and KF to be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8-01-23" calcext:value-type="date">
            <text:p>23.01.08</text:p>
          </table:table-cell>
          <table:table-cell table:style-name="ce36" office:value-type="string" calcext:value-type="string">
            <text:p>added sdt input which is used to initialize rtc and rtc1 during first cycle. 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TC_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21" calcext:value-type="date">
            <text:p>21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TC_M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20" calcext:value-type="date">
            <text:p>20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POS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18" calcext:value-type="date">
            <text:p>18.01.08</text:p>
          </table:table-cell>
          <table:table-cell table:style-name="ce36" office:value-type="string" calcext:value-type="string">
            <text:p>further performance improvements</text:p>
            <text:p>only calculate once every 10 second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TIME</text:p>
          </table:table-cell>
          <table:table-cell table:style-name="ce7"/>
          <table:table-cell table:style-name="ce26" office:value-type="date" office:date-value="2008-01-17" calcext:value-type="date">
            <text:p>17.01.08</text:p>
          </table:table-cell>
          <table:table-cell table:style-name="ce36" office:value-type="string" calcext:value-type="string">
            <text:p>calculation is now only performed once a da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IMER_1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1-17" calcext:value-type="date">
            <text:p>17.01.08</text:p>
          </table:table-cell>
          <table:table-cell table:style-name="ce36" office:value-type="string" calcext:value-type="string">
            <text:p>New code with better performance </text:p>
            <text:p>Output is now only active during the time of day it is supposed to</text:p>
            <text:p>no pulse is generated at power up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OUNT_B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16" calcext:value-type="date">
            <text:p>16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ELECT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16" calcext:value-type="date">
            <text:p>16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N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15" calcext:value-type="date">
            <text:p>15.01.08</text:p>
          </table:table-cell>
          <table:table-cell table:style-name="ce36" office:value-type="string" calcext:value-type="string">
            <text:p>Allow for negative incre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ANGE_TO_WOR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ANGE_TO_BYT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WORD_TO_RANG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YTE_TO_RANG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EW_TEMP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LEAP_OF_DA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AY_OF_MONTH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OT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H_2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TAI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CALE_B8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CALE_B4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CALE_B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GEN_SQR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EMP_SI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EMP_NI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AR_GRAP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KMH_TO_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_TO_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PO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TIM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IN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OS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ATA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ACO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HYST_3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HYST_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PID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P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replaced /2 with * 0.5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Corrected an error with high values of sps tim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4" calcext:value-type="date">
            <text:p>04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AY_OF_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4" calcext:value-type="date">
            <text:p>04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YEAR_BEG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4" calcext:value-type="date">
            <text:p>04.01.08</text:p>
          </table:table-cell>
          <table:table-cell table:style-name="ce36" office:value-type="string" calcext:value-type="string">
            <text:p>formula for step7 was incorrect during leap yea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3" calcext:value-type="date">
            <text:p>03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DECO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RIVER_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RIVER_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LK_DI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YTE_OF_DWOR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WORD_OF_DWOR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deleted unused variable p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WORD_OF_BY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RC_GE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WORD_OF_BY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LIND_INPU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30" calcext:value-type="date">
            <text:p>30.12.07</text:p>
          </table:table-cell>
          <table:table-cell table:style-name="ce36" office:value-type="string" calcext:value-type="string">
            <text:p>added click_timeout variable and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WATER_CP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Increased accurac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HR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HL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TCH_4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TC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JK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DR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D4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D2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TAI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TAIR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HYST_3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CTUATOR_2P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INEAR_I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TORE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6" calcext:value-type="date">
            <text:p>2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MESSAGE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6" calcext:value-type="date">
            <text:p>2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A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6" calcext:value-type="date">
            <text:p>2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25" calcext:value-type="date">
            <text:p>2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7-12-25" calcext:value-type="date">
            <text:p>25.12.07</text:p>
          </table:table-cell>
          <table:table-cell table:style-name="ce36" office:value-type="string" calcext:value-type="string">
            <text:p>corrected an error while step response was too slow for fast rist tim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5" calcext:value-type="date">
            <text:p>25.12.07</text:p>
          </table:table-cell>
          <table:table-cell table:style-name="ce36" office:value-type="string" calcext:value-type="string">
            <text:p>added config variable return_meter</text:p>
            <text:p>added output C for current consump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MATRIX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added exit statement in for loop instead of i:=5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WEEKDA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correction for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avoid a negative square root if input values are wro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WORK_WEEK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9" calcext:value-type="date">
            <text:p>19.12.07</text:p>
          </table:table-cell>
          <table:table-cell table:style-name="ce36" office:value-type="string" calcext:value-type="string">
            <text:p>changed code for better performance</text:p>
            <text:p>changed code to comply with ISO860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YEAR_BEG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9" calcext:value-type="date">
            <text:p>19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EMP_NI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17" calcext:value-type="date">
            <text:p>1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POLYNOM_I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7" calcext:value-type="date">
            <text:p>17.12.07</text:p>
          </table:table-cell>
          <table:table-cell table:style-name="ce36" office:value-type="string" calcext:value-type="string">
            <text:p>init makes no sense for a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EMP_SI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17" calcext:value-type="date">
            <text:p>1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OSCAT_VERSIO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added possibility to return date and version depoending on i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8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4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2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1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EAST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DWORD_TO_STR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DWORD_TO_STR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YTE_TO_STR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YTE_TO_STR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IND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ICK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step now starts at 1 instaed of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20" office:value-type="string" calcext:value-type="string">
            <text:p>_ARRAY_SOR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added function return = tru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IGNAL_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IGNA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INT_TO_BC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CD_TO_IN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V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AV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V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TREN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Z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Y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X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XPRO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SMU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RE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P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NOR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DPRO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SU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A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AB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ANGEV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IGMOI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GAMM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AC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start value for i has changed to 2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ONOF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PWM_PW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9" calcext:value-type="date">
            <text:p>09.12.07</text:p>
          </table:table-cell>
          <table:table-cell table:style-name="ce36" office:value-type="string" calcext:value-type="string">
            <text:p>Corrected a problem with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2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1</text:p>
          </table:table-cell>
          <table:table-cell table:style-name="ce19" office:value-type="string" calcext:value-type="string">
            <text:p>LTIME_TO_UTC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1</text:p>
          </table:table-cell>
          <table:table-cell table:style-name="ce19" office:value-type="string" calcext:value-type="string">
            <text:p>LTIME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1</text:p>
          </table:table-cell>
          <table:table-cell table:style-name="ce19" office:value-type="string" calcext:value-type="string">
            <text:p>LOCAL_TIM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SR_COLLEC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Added re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SR_MON_R4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n error while esr type would not be 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HECK_PARIT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PARIT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WC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7" calcext:value-type="date">
            <text:p>0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PHERE_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ONE_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IRCLE_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XP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TICK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IR_DENS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QRT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SI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COS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OU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D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EW_TEM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EW_CO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  <text:p>output is now in Gramms / Qubic met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IR_ENTHALP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XP10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I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orrected an error in calculation of step respons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ENSOR_I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orrected an error in algorithm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ES_S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ES_P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ES_N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BAR_GRAP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WATER_DENS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HEAT_INDEX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EW_R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S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O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OS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TA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I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IGN_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IGN_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VE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FT_PT2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30" calcext:value-type="date">
            <text:p>30.11.07</text:p>
          </table:table-cell>
          <table:table-cell table:style-name="ce36" office:value-type="string" calcext:value-type="string">
            <text:p>changed out to be K * in during initialization</text:p>
            <text:p>avoid divide by 0 if TN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1-30" calcext:value-type="date">
            <text:p>30.11.07</text:p>
          </table:table-cell>
          <table:table-cell table:style-name="ce36" office:value-type="string" calcext:value-type="string">
            <text:p>changed out to be K * in during initializ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PWM_PW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PWM_DC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pt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GEN_RM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pt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BLIND_SHAD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4" calcext:value-type="date">
            <text:p>24.11.07</text:p>
          </table:table-cell>
          <table:table-cell table:style-name="ce36" office:value-type="string" calcext:value-type="string">
            <text:p>added shade_delay to avoid constant up and down if sun is out parcial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HOLIDAY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24" calcext:value-type="date">
            <text:p>24.11.07</text:p>
          </table:table-cell>
          <table:table-cell table:style-name="ce36" office:value-type="string" calcext:value-type="string">
            <text:p>changes F_use of <text:s/>Buß_und_Bettag to 0 because this is no official holida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20" calcext:value-type="date">
            <text:p>20.11.07</text:p>
          </table:table-cell>
          <table:table-cell table:style-name="ce20" office:value-type="string" calcext:value-type="string">
            <text:p>when N=0 there will be no dot at the end of the stri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GEN_RD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20" calcext:value-type="date">
            <text:p>20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0" calcext:value-type="date">
            <text:p>20.11.07</text:p>
          </table:table-cell>
          <table:table-cell table:style-name="ce36" office:value-type="string" calcext:value-type="string">
            <text:p>changed code of temp calculation to avoid overflow in modr due to resuclt would not fit DINT for high timer valu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ACTUATOR_2P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1-19" calcext:value-type="date">
            <text:p>19.11.07</text:p>
          </table:table-cell>
          <table:table-cell table:style-name="ce19" office:value-type="string" calcext:value-type="string">
            <text:p>replaced left over statement time() with tx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MI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19" calcext:value-type="date">
            <text:p>19.11.07</text:p>
          </table:table-cell>
          <table:table-cell table:style-name="ce36" office:value-type="string" calcext:value-type="string">
            <text:p>New Module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9" calcext:value-type="date">
            <text:p>19.11.07</text:p>
          </table:table-cell>
          <table:table-cell table:style-name="ce19" office:value-type="string" calcext:value-type="string">
            <text:p>changed type of function from int to dwor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17" calcext:value-type="date">
            <text:p>17.11.07</text:p>
          </table:table-cell>
          <table:table-cell table:style-name="ce36" office:value-type="string" calcext:value-type="string">
            <text:p>New Module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_ARRAY_INI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14" calcext:value-type="date">
            <text:p>14.11.07</text:p>
          </table:table-cell>
          <table:table-cell table:style-name="ce36" office:value-type="string" calcext:value-type="string">
            <text:p>changed size calculation to be more effici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14" calcext:value-type="date">
            <text:p>14.11.07</text:p>
          </table:table-cell>
          <table:table-cell table:style-name="ce36" office:value-type="string" calcext:value-type="string">
            <text:p>changed size calculation to be more effici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1-14" calcext:value-type="date">
            <text:p>14.11.07</text:p>
          </table:table-cell>
          <table:table-cell table:style-name="ce36" office:value-type="string" calcext:value-type="string">
            <text:p>corrected a problem with size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_PLC_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added temporaray variable tx because some compilers could not handle time() as an argu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_PLC_U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added temporaray variable tx because some compilers could not handle time() as an argu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TIME_TO_UTC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ype of time_zone_offset from time to int</text:p>
            <text:p>to allow for time zones with negative 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TIME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ype of time_zone_offset from time to int</text:p>
            <text:p>to allow for time zones with negative 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OCAL_TIM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ime_zone_offset from time to integer to allow for negative offset time zon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ime_offset from time to integer to allow for negative offset time zon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changed time() into t_plc_ms(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MUL_AD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deleted preset values for K and O this makes no sense for a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NE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SG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changed type of function from real to 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TIME_TO_UT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05" calcext:value-type="date">
            <text:p>05.11.07</text:p>
          </table:table-cell>
          <table:table-cell table:style-name="ce36" office:value-type="string" calcext:value-type="string">
            <text:p>replaced literal constant with variable because of error in möller ecp4 compil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CONTROL_SET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4" calcext:value-type="date">
            <text:p>04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CONTROL_SET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4" calcext:value-type="date">
            <text:p>04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UN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4" calcext:value-type="date">
            <text:p>04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UNE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PARSET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7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FT_P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added noise input to filter noise</text:p>
            <text:p>output diff added</text:p>
            <text:p>set limit output false when output is within limits</text:p>
            <text:p>overfolw was not set correct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7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FT_PID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added noise input to filter noise,</text:p>
            <text:p>output diff added,</text:p>
            <text:p>set limit output false when output is within limits</text:p>
            <text:p>overfolw was not set correct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changed dword to DINT in calcualtion to avoid warnings with some compil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PARSE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DEAD_BAN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AIR_ENTHALP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deleted unused variable RF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DATE_AD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01" calcext:value-type="date">
            <text:p>01.11.07</text:p>
          </table:table-cell>
          <table:table-cell table:style-name="ce36" office:value-type="string" calcext:value-type="string">
            <text:p>added int_to_dword stetements to avoid possible overrun with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01" calcext:value-type="date">
            <text:p>01.11.07</text:p>
          </table:table-cell>
          <table:table-cell table:style-name="ce36" office:value-type="string" calcext:value-type="string">
            <text:p>changed coding to avoid possible overrun situation on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1-01" calcext:value-type="date">
            <text:p>01.11.07</text:p>
          </table:table-cell>
          <table:table-cell table:style-name="ce36" office:value-type="string" calcext:value-type="string">
            <text:p>converted hour type integer to dowrd in calculation to avoid overrun on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WINDOW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PID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Rewritten to avoid error when one of the limits is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PI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AIR_ENTHALP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HOLIDA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changed holiday definition from constant to input consta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30" calcext:value-type="date">
            <text:p>30.10.07</text:p>
          </table:table-cell>
          <table:table-cell table:style-name="ce36" office:value-type="string" calcext:value-type="string">
            <text:p>added lockout configuration time for motor direction chang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AIR_DENSIT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S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WATER_ENTHALP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DERIV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7" office:value-type="string" calcext:value-type="string">
            <text:p>prohibit calculation when tx - last = 0 to avoid div 0 and increase accuracy on fast syste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7" office:value-type="string" calcext:value-type="string">
            <text:p>changed code so int will not be called is time difference is 0 to increase accuracy on systems with cycle times below 1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BLIND_SCEN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LTIM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changed code because the execution every 100ms can cause major problems </text:p>
            <text:p>if the supplied time was not correct at start. use of new dst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LOCAL_TIM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changed dst calculation because function dst was upgraded no error in local_time only a change in DS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changed dst calculation because function dst was upgraded no error in DCF77 only a change in DS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DS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deleted time_zone_offset input because dst is generally at 01:00 utc and not mesz</text:p>
            <text:p>uk starts 01:00 utc and also gree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23" calcext:value-type="date">
            <text:p>23.10.07</text:p>
          </table:table-cell>
          <table:table-cell table:style-name="ce36" office:value-type="string" calcext:value-type="string">
            <text:p>added out := in to the init statemen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BLIND_SHAD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19" calcext:value-type="date">
            <text:p>19.10.07</text:p>
          </table:table-cell>
          <table:table-cell table:style-name="ce36" office:value-type="string" calcext:value-type="string">
            <text:p>manual mode was not detected because outputs were checked and not inputs UP and DN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CONE_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7" calcext:value-type="date">
            <text:p>17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GLOBAL CONSTANTS </text:p>
          </table:table-cell>
          <table:table-cell table:style-name="ce20"/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Renamed PI in PI1 for better compatibility to other librari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DE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Deg will become 0 when it reaches 36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A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Rad will become 0 when it reaches 2P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TRIANGLE_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SPHERE_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ELLIPSE_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ELLIPSE_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CIRCLE_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CIRCLE_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SG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Ignore angle when T_ANGLE &lt; T#10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SHA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5" calcext:value-type="date">
            <text:p>15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8" office:value-type="string" calcext:value-type="string">
            <text:p>22</text:p>
          </table:table-cell>
          <table:table-cell table:style-name="ce19" office:value-type="string" calcext:value-type="string">
            <text:p>CRC_GEN</text:p>
          </table:table-cell>
          <table:table-cell table:style-name="ce8" office:value-type="string" calcext:value-type="string">
            <text:p>1.2</text:p>
          </table:table-cell>
          <table:table-cell table:style-name="ce26" office:value-type="date" office:date-value="2007-10-09" calcext:value-type="date">
            <text:p>09.10.07</text:p>
          </table:table-cell>
          <table:table-cell table:style-name="ce36" office:value-type="string" calcext:value-type="string">
            <text:p>Added init values for start value and final XOR</text:p>
            <text:p>added reflect_in and reflect_out featur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EVERS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9" calcext:value-type="date">
            <text:p>0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deleted unused variables count and leap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DAY_OF_MONT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deleted unused variable y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deleted unused variables m and temp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POLYNOM_IN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LINEAR_IN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7" calcext:value-type="date">
            <text:p>07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SECUR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Added pos and angle inputs and outputs</text:p>
            <text:p>actions are now configurab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INPU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Renamed output ps and as to po and ao</text:p>
            <text:p>added click m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NIGH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added pos and angle inputs and outputs</text:p>
            <text:p>night position and angle can now be configuredany </text:p>
            <text:p>manual operation at night will cancel night oper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Integrated blind_actuator into BLIND_CONTRO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ACTUATO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Rearranged outpu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05" calcext:value-type="date">
            <text:p>05.10.07</text:p>
          </table:table-cell>
          <table:table-cell table:style-name="ce36" office:value-type="string" calcext:value-type="string">
            <text:p>Corrected a problem with pt = 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05" calcext:value-type="date">
            <text:p>05.10.07</text:p>
          </table:table-cell>
          <table:table-cell table:style-name="ce36" office:value-type="string" calcext:value-type="string">
            <text:p>Corrected a problem with pt = 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2" calcext:value-type="date">
            <text:p>02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DAY_OF_DA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tep7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MON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New coding for much better performance, no string functions us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tep7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tep7 compatibility, now call function set_dat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9" office:value-type="string" calcext:value-type="string">
            <text:p>21</text:p>
          </table:table-cell>
          <table:table-cell table:style-name="ce19" office:value-type="string" calcext:value-type="string">
            <text:p>TIMER_1 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Corrected a problem , timer would not generate a pulse over midnigh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DAY_OF_MONT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Corrected an error in algorithm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LEAP_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DAY_OF_YE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compatibility to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YE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Corrected error and added compatibility to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GLOBAL CONSTANTS </text:p>
          </table:table-cell>
          <table:table-cell table:style-name="ce7"/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etup Parameter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NIGH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30" calcext:value-type="date">
            <text:p>30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SHAD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30" calcext:value-type="date">
            <text:p>30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INPU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SECURIT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21" office:value-type="string" calcext:value-type="string">
            <text:p>BLIND_ACTUATO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INTERLOCK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8" calcext:value-type="date">
            <text:p>28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7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28" calcext:value-type="date">
            <text:p>28.09.07</text:p>
          </table:table-cell>
          <table:table-cell table:style-name="ce36" office:value-type="string" calcext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7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28" calcext:value-type="date">
            <text:p>28.09.07</text:p>
          </table:table-cell>
          <table:table-cell table:style-name="ce36" office:value-type="string" calcext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22" calcext:value-type="date">
            <text:p>22.09.07</text:p>
          </table:table-cell>
          <table:table-cell table:style-name="ce36" office:value-type="string" calcext:value-type="string">
            <text:p>chagned code to use array_sort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22" calcext:value-type="date">
            <text:p>22.09.07</text:p>
          </table:table-cell>
          <table:table-cell table:style-name="ce36" office:value-type="string" calcext:value-type="string">
            <text:p>new algorithm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20" calcext:value-type="date">
            <text:p>20.09.07</text:p>
          </table:table-cell>
          <table:table-cell table:style-name="ce36" office:value-type="string" calcext:value-type="string">
            <text:p>corrected a problem with leap yea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9" calcext:value-type="date">
            <text:p>19.09.07</text:p>
          </table:table-cell>
          <table:table-cell table:style-name="ce36" office:value-type="string" calcext:value-type="string">
            <text:p>Corrected leap year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9" calcext:value-type="date">
            <text:p>19.09.07</text:p>
          </table:table-cell>
          <table:table-cell table:style-name="ce36" office:value-type="string" calcext:value-type="string">
            <text:p>Corrected leap year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9" calcext:value-type="date">
            <text:p>1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ESR_MON_X8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ESR_MON_R4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ESR_MON_B8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RM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P_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QUENCE_8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QUENCE_4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SQ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PUL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PRG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8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4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2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1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_2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_1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MP_SOF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SQ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RMP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AYS_DELT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Corrected an error in algorithm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20" office:value-type="string" calcext:value-type="string">
            <text:p>DAY_OF_DAT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ETER_STA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ET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RD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_TX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_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_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TN64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TN16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PT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Deleted unused code section for system time reading and unnecessary startup 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YCLE_TIM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DERIV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PROFILE 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EMP_EX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IMER_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IMER_1 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WITCH_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PULSE_LENG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IMM_I 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ICK 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U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PUM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3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2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L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R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OGGL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_PLC_U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_PLC_M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OU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changed code to avoid warning under codesys 2.3.8.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I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changed code to avoid warning under codesys 2.3.8.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ES_N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Changed coding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EW_TEM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8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EW_CO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8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WATER_DENSIT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WORD_TO_STR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changed coding for compatibility with twincat, under twincat concat cannot have a function as argumen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BYTE_TO_STRH 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changed coding for compatibility with twincat, under twincat concat cannot have a function as argumen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changed coding to avoid a compiler warning under twinca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ATRIX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deleted unused variables k and old_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RC_GE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Deleted unused variable 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HECK_PAR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PAR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EMP_SI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Reduced accuracy to 0.01 degreed to shorten execution time</text:p>
            <text:p>and corrected an error in formula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Reduced accuracy to 0.01 degreed to shorten execution tim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8" office:value-type="string" calcext:value-type="string">
            <text:p>20</text:p>
          </table:table-cell>
          <table:table-cell table:style-name="ce19" office:value-type="string" calcext:value-type="string">
            <text:p>TEMP_NI</text:p>
          </table:table-cell>
          <table:table-cell table:style-name="ce8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Reduced accuracy to 0.01 degreed to shorten execution tim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BIT_COU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Improved performa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_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Corrected an error while index would be out of array if N = 0;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_TRI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04" calcext:value-type="date">
            <text:p>0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7" office:value-type="string" calcext:value-type="string">
            <text:p>18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8-02" calcext:value-type="date">
            <text:p>02.08.07</text:p>
          </table:table-cell>
          <table:table-cell table:style-name="ce36" office:value-type="string" calcext:value-type="string">
            <text:p>Corrected an error while ontime would stop counting time after a certain time is reach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LTIME_TO_UT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7-05" calcext:value-type="date">
            <text:p>05.07.07</text:p>
          </table:table-cell>
          <table:table-cell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BIT_COUN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7-05" calcext:value-type="date">
            <text:p>05.07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10" calcext:value-type="date">
            <text:p>10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CRC_CHECK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CRC_GE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BYTE_TO_STRB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BYTE_TO_STRH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DWORD_TO_STRB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DWORD_TO_STR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CLICK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5-18" calcext:value-type="date">
            <text:p>18.05.07</text:p>
          </table:table-cell>
          <table:table-cell office:value-type="string" calcext:value-type="string">
            <text:p>Corrected an error while Click would stop working when t_reconfig expir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ARRAY_SDV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01" calcext:value-type="date">
            <text:p>01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LTIME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3-18" calcext:value-type="date">
            <text:p>18.03.07</text:p>
          </table:table-cell>
          <table:table-cell office:value-type="string" calcext:value-type="string">
            <text:p>changed code, dst would not work during first cycl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DEW_TE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4-29" calcext:value-type="date">
            <text:p>29.04.07</text:p>
          </table:table-cell>
          <table:table-cell office:value-type="string" calcext:value-type="string">
            <text:p>Changed code when RH = 0, not to execute log(0)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GLOBAL CONSTANTS </text:p>
          </table:table-cell>
          <table:table-cell/>
          <table:table-cell table:style-name="ce26" office:value-type="date" office:date-value="2007-05-02" calcext:value-type="date">
            <text:p>02.05.07</text:p>
          </table:table-cell>
          <table:table-cell table:style-name="ce28" office:value-type="string" calcext:value-type="string">
            <text:p>Added UG, universal gas cons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ARRAY_VA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01" calcext:value-type="date">
            <text:p>01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6</text:p>
          </table:table-cell>
          <table:table-cell office:value-type="string" calcext:value-type="string">
            <text:p>TIMER_1 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4-14" calcext:value-type="date">
            <text:p>14.04.07</text:p>
          </table:table-cell>
          <table:table-cell office:value-type="string" calcext:value-type="string">
            <text:p>Corrected an error while output would not go active when start year = 1970</text:p>
            <text:p>increased accuracy by checking every 100ms</text:p>
            <text:p>added init section to compensate for timer overflow at startu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DATE_ADD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4-12" calcext:value-type="date">
            <text:p>12.04.07</text:p>
          </table:table-cell>
          <table:table-cell office:value-type="string" calcext:value-type="string">
            <text:p>corrected an error while date would be incorrect when year <text:s/>= 0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6</text:p>
          </table:table-cell>
          <table:table-cell office:value-type="string" calcext:value-type="string">
            <text:p>M_TX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5-02" calcext:value-type="date">
            <text:p>02.05.07</text:p>
          </table:table-cell>
          <table:table-cell office:value-type="string" calcext:value-type="string">
            <text:p>Corrected wrong measurements during startup</text:p>
            <text:p>added output ET (elapsed time)</text:p>
            <text:p>added Reset input</text:p>
            <text:p>added tmax inpu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ASTRO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DEW_CO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29" calcext:value-type="date">
            <text:p>29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table:style-name="ce23" office:value-type="string" calcext:value-type="string">
            <text:p>CYCLE_TIM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3-10" calcext:value-type="date">
            <text:p>10.03.07</text:p>
          </table:table-cell>
          <table:table-cell office:value-type="string" calcext:value-type="string">
            <text:p>changed initialization of ct_min to t#10h for compatibility with siemens s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M_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5-02" calcext:value-type="date">
            <text:p>02.05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6</text:p>
          </table:table-cell>
          <table:table-cell office:value-type="string" calcext:value-type="string">
            <text:p>M_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5-02" calcext:value-type="date">
            <text:p>02.05.07</text:p>
          </table:table-cell>
          <table:table-cell office:value-type="string" calcext:value-type="string">
            <text:p>Added init variable to avoid unreasonable result if falling edge occurs first</text:p>
            <text:p>added ET (elapsed Time) output</text:p>
            <text:p>added reset inpu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DEW_R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29" calcext:value-type="date">
            <text:p>29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SUN_TIM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4-17" calcext:value-type="date">
            <text:p>17.04.07</text:p>
          </table:table-cell>
          <table:table-cell office:value-type="string" calcext:value-type="string">
            <text:p>corrected error while sun:midday would not be corrected for longitud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MUL_AD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8" calcext:value-type="date">
            <text:p>08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CLK_PRG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5" calcext:value-type="date">
            <text:p>25.02.07</text:p>
          </table:table-cell>
          <table:table-cell office:value-type="string" calcext:value-type="string">
            <text:p>rewritten moule in ST for better performance</text:p>
            <text:p>PT can noe be changed during runtim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EC_8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T_RMP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Added INIT to prevent erroneous startup condition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GEN_RD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T_PID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Added default values for inputs KP, TN, TV, LIMIT_H and LIMIT_L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table:style-name="ce24" office:value-type="string" calcext:value-type="string">
            <text:p>CEIL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T_PT1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Output will be set to input during initial startu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CLICK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5" calcext:value-type="date">
            <text:p>15.02.07</text:p>
          </table:table-cell>
          <table:table-cell office:value-type="string" calcext:value-type="string">
            <text:p>New Module „click“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PULSE_LENG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5" calcext:value-type="date">
            <text:p>15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4" calcext:value-type="date">
            <text:p>04.03.07</text:p>
          </table:table-cell>
          <table:table-cell office:value-type="string" calcext:value-type="string">
            <text:p>Changed a critical erro while loop was indefinit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GEN_RMP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EAD_ZONE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SIGN_I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5</text:p>
          </table:table-cell>
          <table:table-cell office:value-type="string" calcext:value-type="string">
            <text:p>GLOBAL CONSTANTS </text:p>
          </table:table-cell>
          <table:table-cell/>
          <table:table-cell table:style-name="ce27" office:value-type="date" office:date-value="2007-03-03" calcext:value-type="date">
            <text:p>03.03.07</text:p>
          </table:table-cell>
          <table:table-cell table:style-name="ce39" office:value-type="string" calcext:value-type="string">
            <text:p>Increased accuracy of PI2 </text:p>
            <text:p>renamed T0 to TK for better compatibility with other Libraries</text:p>
            <text:p>renamed C to C0 for better compatibilit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WC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HOLIDAYEAT_INDEX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deleted unused variables rh3 and T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PWM_DC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5" calcext:value-type="date">
            <text:p>25.02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_LAM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08" calcext:value-type="date">
            <text:p>08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deleted unused variable in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ON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IMER_2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_ARRAY_MEDIAN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Corrected an error in median calculatio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EC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GEN_SQ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Added default value for dc = 0.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SWITCH_X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5" calcext:value-type="date">
            <text:p>15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CALIBRAT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Chaged VAR RETAIN PERSISTENT to VAR RETAIN for better compatibility with controllers without file system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EC_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T_PROFILE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PWM_PW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5" calcext:value-type="date">
            <text:p>25.02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EAD_ZONE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BAR_GRAP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CF_77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26" calcext:value-type="date">
            <text:p>26.02.07</text:p>
          </table:table-cell>
          <table:table-cell office:value-type="string" calcext:value-type="string">
            <text:p>Chaqnged statements to avoid a compiler error if wago 16 bit lon controller is us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UX_R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IMM_I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Deleted unused structure „ramp“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_TO_O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ESR_MON_X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SI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AY_OF_MONTH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deleted unused variable day_in_year and day_in_year_begi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Heat_Temp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7" calcext:value-type="date">
            <text:p>27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4</text:p>
          </table:table-cell>
          <table:table-cell office:value-type="string" calcext:value-type="string">
            <text:p>DIMM_I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02" calcext:value-type="date">
            <text:p>02.02.07</text:p>
          </table:table-cell>
          <table:table-cell office:value-type="string" calcext:value-type="string">
            <text:p>Changed method to read time() only at the beginning of the module for better consistency when a higher priority task interrupts „dimm_i“</text:p>
            <text:p>added code in case structure for state 1 to allow for short one cycle long input pulses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SEQUENCE_4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SH_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0" calcext:value-type="date">
            <text:p>20.01.07</text:p>
          </table:table-cell>
          <table:table-cell office:value-type="string" calcext:value-type="string">
            <text:p>Added input N to specify the amount of samples for calculations</text:p>
            <text:p>added output trig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WORD_TO_STR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_ARRAY_INI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6" calcext:value-type="date">
            <text:p>06.01.07</text:p>
          </table:table-cell>
          <table:table-cell office:value-type="string" calcext:value-type="string">
            <text:p>Changed type of function to BOOL</text:p>
            <text:p>function now returns TRU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UN_PO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1" calcext:value-type="date">
            <text:p>01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4</text:p>
          </table:table-cell>
          <table:table-cell office:value-type="string" calcext:value-type="string">
            <text:p>SCALE_B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CALE_X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TAIR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8" calcext:value-type="date">
            <text:p>28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HYST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GEN_SI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IGN_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RMP_W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Deleted unused variable ste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KMH_TO_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4" calcext:value-type="date">
            <text:p>04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CTUATOR_2P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Deleted unused variable time_overflow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CTUATOR_3P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23" calcext:value-type="date">
            <text:p>23.01.07</text:p>
          </table:table-cell>
          <table:table-cell office:value-type="string" calcext:value-type="string">
            <text:p>Deleted unused variables „force_on“ and „force_off“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PT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5" calcext:value-type="date">
            <text:p>15.01.07</text:p>
          </table:table-cell>
          <table:table-cell office:value-type="string" calcext:value-type="string">
            <text:p>Improved algorithm for higher accuracy and spe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ENSOR_IN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0" calcext:value-type="date">
            <text:p>20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QRT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6-12-31" calcext:value-type="date">
            <text:p>31.12.06</text:p>
          </table:table-cell>
          <table:table-cell office:value-type="string" calcext:value-type="string">
            <text:p>Added status output to be ESR compatib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_LIN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TN16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PID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Added int_band for structural adaptation of PI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BYTE_OF_DWOR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4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8" calcext:value-type="date">
            <text:p>18.01.07</text:p>
          </table:table-cell>
          <table:table-cell office:value-type="string" calcext:value-type="string">
            <text:p>Renamed module to AOUT</text:p>
            <text:p>changed output to hold 32 bits max</text:p>
            <text:p>corrected an error with sign bi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UN_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0" calcext:value-type="date">
            <text:p>20.01.07</text:p>
          </table:table-cell>
          <table:table-cell office:value-type="string" calcext:value-type="string">
            <text:p>deleted unused variables sun_rineR and sun_setR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Added output trig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AX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OM_TO_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IN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FT_PT1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Corrected an error with falling edge errors</text:p>
            <text:p>added faktor K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SEQUENCE_8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ULTI_IN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Changed midr to mid3 funktion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8" calcext:value-type="date">
            <text:p>28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COS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31" calcext:value-type="date">
            <text:p>31.12.06</text:p>
          </table:table-cell>
          <table:table-cell office:value-type="string" calcext:value-type="string">
            <text:p>Added Oil_Temp input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ACTUATOR_UD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Added status output</text:p>
            <text:p>changed inputs „ton“ and „toff“ to config variables</text:p>
            <text:p>added config var „out_return to enable „yup_in“ and y_dn_in“</text:p>
            <text:p>changed manual mode to override automatic mod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TN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4</text:p>
          </table:table-cell>
          <table:table-cell office:value-type="string" calcext:value-type="string">
            <text:p>SCALE_B8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reset to load the value of in instead of 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CALE_X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RD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LEGIONELLA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Rewritten moule in ST for better performance</text:p>
            <text:p>changed error out to ESR compatible Status outpu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CO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WORK_WEEK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4" calcext:value-type="date">
            <text:p>14.01.07</text:p>
          </table:table-cell>
          <table:table-cell office:value-type="string" calcext:value-type="string">
            <text:p>deleted unused variable yd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CALE_X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CF_77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02" calcext:value-type="date">
            <text:p>02.02.07</text:p>
          </table:table-cell>
          <table:table-cell office:value-type="string" calcext:value-type="string">
            <text:p>change wday and dst outputs when there is no dcf receptio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I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Added faktor K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H_1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6" calcext:value-type="date">
            <text:p>06.01.07</text:p>
          </table:table-cell>
          <table:table-cell office:value-type="string" calcext:value-type="string">
            <text:p>Added output trig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UX_R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ELAY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added variable temp to add 1 delay <text:s/>for q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WORD_OF_DWOR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_ARRAY_SOR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6" calcext:value-type="date">
            <text:p>06.01.07</text:p>
          </table:table-cell>
          <table:table-cell office:value-type="string" calcext:value-type="string">
            <text:p>Function now returns TRUE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4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Changed output „fail“ to „status“</text:p>
            <text:p>added output „cycles“</text:p>
            <text:p>corrected an error while pre_heat would be active when an error was present</text:p>
            <text:p>added „coil2“ output and „stage2“ input for dual stage burner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MP_P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OFFSET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FT_PT1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Corrected error during startup</text:p>
            <text:p>corrected error with very small time values &lt; 10m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FT_DERIV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Added init code for startup</text:p>
            <text:p>set default for K to 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RMP_SOF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TA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INT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5" calcext:value-type="date">
            <text:p>15.01.07</text:p>
          </table:table-cell>
          <table:table-cell office:value-type="string" calcext:value-type="string">
            <text:p>Added default value for K = 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WORD_OF_BYT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S_TO_KM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4" calcext:value-type="date">
            <text:p>04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RMP_B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Renamed input UD to UP for better usability</text:p>
            <text:p>deleted unused variable ste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MP_NI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ESR_MON_B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ESR_MON_R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FT_AVG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7" calcext:value-type="date">
            <text:p>07.01.07</text:p>
          </table:table-cell>
          <table:table-cell office:value-type="string" calcext:value-type="string">
            <text:p>Changed reset logic to load buffer with IN instead of 0</text:p>
            <text:p>added EN input for better flow control</text:p>
            <text:p>added init to avoid erroneous startup conditions</text:p>
            <text:p>deleted unused variable C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06" calcext:value-type="date">
            <text:p>06.02.07</text:p>
          </table:table-cell>
          <table:table-cell office:value-type="string" calcext:value-type="string">
            <text:p>Corrected error with COS function</text:p>
            <text:p>divide by 0 wilol return an error now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fixed an error with sign bit.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4</text:p>
          </table:table-cell>
          <table:table-cell office:value-type="string" calcext:value-type="string">
            <text:p>LTIM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Added input UTC instead of internal SYSRTCGETTIME for better compatibility with different Hardware</text:p>
            <text:p>corrected an error while DST_ENABLE would not be checked before DST is enabled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31" calcext:value-type="date">
            <text:p>31.12.06</text:p>
          </table:table-cell>
          <table:table-cell office:value-type="string" calcext:value-type="string">
            <text:p>Added Pre heating time and output</text:p>
            <text:p>flame monitor before ignition will generate error output now</text:p>
            <text:p>added output for Kwh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Changed input arrangeme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MP_SI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WORD_OF_BYT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ESR_COLLEC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TN6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ID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4</text:p>
          </table:table-cell>
          <table:table-cell office:value-type="string" calcext:value-type="string">
            <text:p>SCALE_B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ACTUATOR_2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7" calcext:value-type="date">
            <text:p>07.10.06</text:p>
          </table:table-cell>
          <table:table-cell office:value-type="string" calcext:value-type="string">
            <text:p>changed error, pos could not reach 1 or 0 under certain conditions due to error in cod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DATE_AD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TEMP_EX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06" calcext:value-type="date">
            <text:p>06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K_TO_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04" calcext:value-type="date">
            <text:p>04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RMP_B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15" calcext:value-type="date">
            <text:p>15.10.06</text:p>
          </table:table-cell>
          <table:table-cell office:value-type="string" calcext:value-type="string">
            <text:p>Added output bus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IND_NO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T_PID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hanged algorithm to „Trapezregel“ for higher accurac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TIMER_1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25" calcext:value-type="date">
            <text:p>25.12.06</text:p>
          </table:table-cell>
          <table:table-cell office:value-type="string" calcext:value-type="string">
            <text:p>Corrected an error with timer overflow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TIMER_1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orrected an error whith pulse width = 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C_TP_K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04" calcext:value-type="date">
            <text:p>04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CYCLE_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12" calcext:value-type="date">
            <text:p>12.12.06</text:p>
          </table:table-cell>
          <table:table-cell office:value-type="string" calcext:value-type="string">
            <text:p>Added output cycle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INDB_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MUX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5" calcext:value-type="date">
            <text:p>05.10.06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T_R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8" calcext:value-type="date">
            <text:p>08.10.06</text:p>
          </table:table-cell>
          <table:table-cell office:value-type="string" calcext:value-type="string">
            <text:p>Added UD outpu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IND_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ACTUATOR_2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7" calcext:value-type="date">
            <text:p>07.10.06</text:p>
          </table:table-cell>
          <table:table-cell office:value-type="string" calcext:value-type="string">
            <text:p>changed „on“ and „off“ to „force“ and „force_in“ for better usability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3</text:p>
          </table:table-cell>
          <table:table-cell office:value-type="string" calcext:value-type="string">
            <text:p>SEQUENCE_4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MUX_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5" calcext:value-type="date">
            <text:p>05.10.06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DAYS_DELTA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T_IN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13" calcext:value-type="date">
            <text:p>13.12.06</text:p>
          </table:table-cell>
          <table:table-cell office:value-type="string" calcext:value-type="string">
            <text:p>Changed algorithm to „Trapezregel“ for higher accurac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ACTUATOR_3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19" calcext:value-type="date">
            <text:p>19.10.06</text:p>
          </table:table-cell>
          <table:table-cell office:value-type="string" calcext:value-type="string">
            <text:p>Added code to avoid overrun of the end_switch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OSCAT_VERSIO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INDB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REAL_TO_STR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ACTUATOR_PU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Fixed an error while the pump would run for t_min at startu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DIFF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8" calcext:value-type="date">
            <text:p>08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INDB_NO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3</text:p>
          </table:table-cell>
          <table:table-cell office:value-type="string" calcext:value-type="string">
            <text:p>SEQUENCE_8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STATUS_TO_ES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hanged name of input to ITO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RMP_W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4" calcext:value-type="date">
            <text:p>04.10.06</text:p>
          </table:table-cell>
          <table:table-cell office:value-type="string" calcext:value-type="string">
            <text:p>added the busy output which signals that the ramp is running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S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TREN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L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ere dst would be delayed by 0.1secon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LEAP_OF_DAT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ile year 1970 would not work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CHECK_PARITY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Corrected an error in buffer manageme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MI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MA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SEQUENCE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LEAP_YEA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ile year 1970 would not work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AVG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SP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LOCAL_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ile DST would be calculated wrong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hanged name of input to ITO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MUL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DEW_TEMP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hanged name of input to ITO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SEQUENCE_8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SH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SH_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FT_MIN_MA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F_LI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F_QUA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08-18" calcext:value-type="date">
            <text:p>18.08.06</text:p>
          </table:table-cell>
          <table:table-cell office:value-type="string" calcext:value-type="string">
            <text:p>fixed an error with low value negative and high value 0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F_POW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08-21" calcext:value-type="date">
            <text:p>21.08.06</text:p>
          </table:table-cell>
          <table:table-cell office:value-type="string" calcext:value-type="string">
            <text:p>Coorected an error in formul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TP_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ET_D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_T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INC_DE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INUTE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HR_4UD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AY_OF_YEA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YST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UX_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ECOND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F_D2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4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RAC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ET_TO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F_D4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DIV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2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PT_TO_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PULS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_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AY_OF_MON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AY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RES_P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IFO_16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TACK_3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_TO_P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RES_NI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1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UX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IT_OF_DWOR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F_JK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LTCH_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GEN_SQ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GEN_BI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HR_8UD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HR_4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_TRIG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YTE_OF_BI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YTE_TO_BI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HR_8PL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_TO_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F_DR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TACK_16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ET_DAT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WITCH_I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OUR_TO_TO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YST_1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OUR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LTC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8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RES_SI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_TO_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IFO_3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 table:number-rows-repeated="638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>
        <table:table-column table:style-name="co1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  <table:database-ranges>
        <table:database-range table:name="unnamed_FilterIn_Database_1" table:target-range-address="Tabelle1.A1478:Tabelle1.IU175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3">
      <number:number number:decimal-places="19" number:min-decimal-places="19" number:min-integer-digits="1"/>
    </number:number-style>
    <number:number-style style:name="N134">
      <number:number number:decimal-places="20" number:min-decimal-places="20" number:min-integer-digits="1"/>
    </number:number-style>
    <number:number-style style:name="N13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36">
      <number:scientific-number number:decimal-places="12" number:min-decimal-places="12" number:min-integer-digits="1" number:min-exponent-digits="3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2cm" fo:margin-right="1cm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OSCAT</text:p>
        <text:p>Revision History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.00.0000</text:date>, <text:time style:data-style-name="N2" text:time-value="13:49:16.16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08-02-24T20:13:04</meta:creation-date>
    <dc:date>2024-07-16T14:14:10.028000000</dc:date>
    <meta:editing-cycles>1020</meta:editing-cycles>
    <meta:editing-duration>P52DT14H20M31S</meta:editing-duration>
    <meta:document-statistic meta:table-count="3" meta:cell-count="8683" meta:object-count="0"/>
    <meta:user-defined meta:name="Info 1"/>
    <meta:user-defined meta:name="Info 2"/>
    <meta:user-defined meta:name="Info 3"/>
    <meta:user-defined meta:name="Info 4"/>
  </office:meta>
</office:document-meta>
</file>
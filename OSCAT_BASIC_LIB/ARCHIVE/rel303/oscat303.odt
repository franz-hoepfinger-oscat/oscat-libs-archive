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0600000127326F07A3.png"/>
  <manifest:file-entry manifest:media-type="image/png" manifest:full-path="Pictures/10000000000000BD00000069D528B387.png"/>
  <manifest:file-entry manifest:media-type="image/png" manifest:full-path="Pictures/100000000000021D00000131EB477768.png"/>
  <manifest:file-entry manifest:media-type="image/png" manifest:full-path="Pictures/100000000000009F0000004BCC45FD77.png"/>
  <manifest:file-entry manifest:media-type="image/png" manifest:full-path="Pictures/100000000000013400000055BE44F522.png"/>
  <manifest:file-entry manifest:media-type="image/png" manifest:full-path="Pictures/10000000000001BC000000779250AF5E.png"/>
  <manifest:file-entry manifest:media-type="image/png" manifest:full-path="Pictures/100000000000015600000077727F39FC.png"/>
  <manifest:file-entry manifest:media-type="image/png" manifest:full-path="Pictures/10000000000000F0000000552ABEB17E.png"/>
  <manifest:file-entry manifest:media-type="image/png" manifest:full-path="Pictures/10000000000000F0000000DDC0EF1FAA.png"/>
  <manifest:file-entry manifest:media-type="image/png" manifest:full-path="Pictures/1000000000000156000000EA4D59944B.png"/>
  <manifest:file-entry manifest:media-type="image/png" manifest:full-path="Pictures/10000000000002B9000000968052015A.png"/>
  <manifest:file-entry manifest:media-type="image/png" manifest:full-path="Pictures/10000000000000AC000000A63F7C5BE8.png"/>
  <manifest:file-entry manifest:media-type="image/png" manifest:full-path="Pictures/10000000000001AD0000004B7ADB2812.png"/>
  <manifest:file-entry manifest:media-type="image/png" manifest:full-path="Pictures/10000000000000CE00000099FFFB0EE6.png"/>
  <manifest:file-entry manifest:media-type="image/png" manifest:full-path="Pictures/1000000000000200000000993ED656C1.png"/>
  <manifest:file-entry manifest:media-type="image/png" manifest:full-path="Pictures/10000000000001F70000006505569080.png"/>
  <manifest:file-entry manifest:media-type="image/png" manifest:full-path="Pictures/100000000000008100000073AF750BE2.png"/>
  <manifest:file-entry manifest:media-type="image/png" manifest:full-path="Pictures/10000000000002DE00000272E5B6659F.png"/>
  <manifest:file-entry manifest:media-type="image/png" manifest:full-path="Pictures/10000000000001340000005522E8BA5C.png"/>
  <manifest:file-entry manifest:media-type="image/png" manifest:full-path="Pictures/10000000000002CA000000B98D0C8905.png"/>
  <manifest:file-entry manifest:media-type="image/png" manifest:full-path="Pictures/10000000000000AC00000055C71FE237.png"/>
  <manifest:file-entry manifest:media-type="image/png" manifest:full-path="Pictures/1000000000000134000000997A29038C.png"/>
  <manifest:file-entry manifest:media-type="image/png" manifest:full-path="Pictures/100000000000029C000000C079B11C89.png"/>
  <manifest:file-entry manifest:media-type="image/png" manifest:full-path="Pictures/10000000000000F0000003B453F54230.png"/>
  <manifest:file-entry manifest:media-type="image/png" manifest:full-path="Pictures/10000000000001530000004B5DB5972F.png"/>
  <manifest:file-entry manifest:media-type="image/png" manifest:full-path="Pictures/10000000000000CE000000771CAD8813.png"/>
  <manifest:file-entry manifest:media-type="image/png" manifest:full-path="Pictures/10000000000000CE000000EABA770F72.png"/>
  <manifest:file-entry manifest:media-type="image/png" manifest:full-path="Pictures/10000000000000AC0000008475A5B37A.png"/>
  <manifest:file-entry manifest:media-type="image/png" manifest:full-path="Pictures/10000000000000CE00000150854833EC.png"/>
  <manifest:file-entry manifest:media-type="image/png" manifest:full-path="Pictures/100000000000029C000000572C4AF2E2.png"/>
  <manifest:file-entry manifest:media-type="image/png" manifest:full-path="Pictures/10000000000001EE000000F4E9192F7C.png"/>
  <manifest:file-entry manifest:media-type="image/png" manifest:full-path="Pictures/10000000000000AC00000055C10B2B8F.png"/>
  <manifest:file-entry manifest:media-type="image/png" manifest:full-path="Pictures/10000000000000AC00000077A47A6952.png"/>
  <manifest:file-entry manifest:media-type="image/png" manifest:full-path="Pictures/10000000000001710000004B11B234AE.png"/>
  <manifest:file-entry manifest:media-type="image/png" manifest:full-path="Pictures/10000000000001120000021C4A31700C.png"/>
  <manifest:file-entry manifest:media-type="image/png" manifest:full-path="Pictures/1000000000000196000000BD42A5D9B7.png"/>
  <manifest:file-entry manifest:media-type="image/png" manifest:full-path="Pictures/10000000000002BD0000011D15AE5DF7.png"/>
  <manifest:file-entry manifest:media-type="image/png" manifest:full-path="Pictures/10000000000000AC000000A605E8BC26.png"/>
  <manifest:file-entry manifest:media-type="image/png" manifest:full-path="Pictures/100000000000016B00000080FCC4CFA6.png"/>
  <manifest:file-entry manifest:media-type="image/png" manifest:full-path="Pictures/1000000000000156000000772337FB00.png"/>
  <manifest:file-entry manifest:media-type="image/png" manifest:full-path="Pictures/1000000000000110000000693FA39E01.png"/>
  <manifest:file-entry manifest:media-type="image/png" manifest:full-path="Pictures/1000000000000204000000FC13E17D34.png"/>
  <manifest:file-entry manifest:media-type="image/png" manifest:full-path="Pictures/10000000000000CE000001505EE5F723.png"/>
  <manifest:file-entry manifest:media-type="image/png" manifest:full-path="Pictures/100000000000019A0000005543E02C22.png"/>
  <manifest:file-entry manifest:media-type="image/png" manifest:full-path="Pictures/100000000000034D000000C8F3B4B0FE.png"/>
  <manifest:file-entry manifest:media-type="image/png" manifest:full-path="Pictures/100000000000032B00000100EADD0B42.png"/>
  <manifest:file-entry manifest:media-type="image/png" manifest:full-path="Pictures/10000000000000AC000000C8F712EA38.png"/>
  <manifest:file-entry manifest:media-type="image/png" manifest:full-path="Pictures/10000000000001350000004BCAE19C1F.png"/>
  <manifest:file-entry manifest:media-type="image/png" manifest:full-path="Pictures/1000000000000156000000551DF95B3E.png"/>
  <manifest:file-entry manifest:media-type="image/png" manifest:full-path="Pictures/10000000000001AD000000695D16FAC0.png"/>
  <manifest:file-entry manifest:media-type="image/png" manifest:full-path="Pictures/1000000000000171000000B9C21E391B.png"/>
  <manifest:file-entry manifest:media-type="image/png" manifest:full-path="Pictures/10000000000000BD000000CB506CA3AC.png"/>
  <manifest:file-entry manifest:media-type="image/png" manifest:full-path="Pictures/10000000000000BD0000004BF5BC599C.png"/>
  <manifest:file-entry manifest:media-type="image/png" manifest:full-path="Pictures/10000000000000F90000004B9B19E092.png"/>
  <manifest:file-entry manifest:media-type="image/png" manifest:full-path="Pictures/100000000000009F0000004B75C35190.png"/>
  <manifest:file-entry manifest:media-type="image/png" manifest:full-path="Pictures/100000000000016A000000871EB27646.png"/>
  <manifest:file-entry manifest:media-type="image/png" manifest:full-path="Pictures/10000000000000AC00000077865F2CB4.png"/>
  <manifest:file-entry manifest:media-type="image/png" manifest:full-path="Pictures/10000000000001710000004B390C553B.png"/>
  <manifest:file-entry manifest:media-type="image/png" manifest:full-path="Pictures/10000000000001710000004BF5CC0D7B.png"/>
  <manifest:file-entry manifest:media-type="image/png" manifest:full-path="Pictures/10000000000000CE0000009977E41C54.png"/>
  <manifest:file-entry manifest:media-type="image/png" manifest:full-path="Pictures/10000000000000AC000000A67F0AD6E1.png"/>
  <manifest:file-entry manifest:media-type="image/png" manifest:full-path="Pictures/10000000000000B40000003D0C47F220.png"/>
  <manifest:file-entry manifest:media-type="image/png" manifest:full-path="Pictures/10000000000000F000000077AEA6C437.png"/>
  <manifest:file-entry manifest:media-type="image/png" manifest:full-path="Pictures/10000000000000F20000004B2EC51BEC.png"/>
  <manifest:file-entry manifest:media-type="image/png" manifest:full-path="Pictures/10000000000004A1000001FA51BF57DA.png"/>
  <manifest:file-entry manifest:media-type="image/png" manifest:full-path="Pictures/1000000000000200000000DD5C40BB35.png"/>
  <manifest:file-entry manifest:media-type="image/png" manifest:full-path="Pictures/100000000000009F000000915B016601.png"/>
  <manifest:file-entry manifest:media-type="image/png" manifest:full-path="Pictures/100000000000015600000055549FE359.png"/>
  <manifest:file-entry manifest:media-type="image/png" manifest:full-path="Pictures/100000000000015600000055B18242AD.png"/>
  <manifest:file-entry manifest:media-type="image/png" manifest:full-path="Pictures/10000000000000F000000099D6100F29.png"/>
  <manifest:file-entry manifest:media-type="image/png" manifest:full-path="Pictures/1000000000000134000001940DB60963.png"/>
  <manifest:file-entry manifest:media-type="image/png" manifest:full-path="Pictures/100000000000013500000069C6796EE1.png"/>
  <manifest:file-entry manifest:media-type="image/png" manifest:full-path="Pictures/10000000000003B300000078EE2DF6DA.png"/>
  <manifest:file-entry manifest:media-type="image/png" manifest:full-path="Pictures/10000000000002DF000001C6186C3F17.png"/>
  <manifest:file-entry manifest:media-type="image/png" manifest:full-path="Pictures/10000000000001AD00000087CB38209E.png"/>
  <manifest:file-entry manifest:media-type="image/png" manifest:full-path="Pictures/10000000000000CE000000C86287EEDC.png"/>
  <manifest:file-entry manifest:media-type="image/png" manifest:full-path="Pictures/10000000000000F0000000994894E8DB.png"/>
  <manifest:file-entry manifest:media-type="image/png" manifest:full-path="Pictures/100000000000015600000077819AAEF4.png"/>
  <manifest:file-entry manifest:media-type="image/png" manifest:full-path="Pictures/100000000000019500000076CB9F8217.png"/>
  <manifest:file-entry manifest:media-type="image/png" manifest:full-path="Pictures/10000000000002B9000000A767162A86.png"/>
  <manifest:file-entry manifest:media-type="image/png" manifest:full-path="Pictures/1000000000000112000000BB28E67594.png"/>
  <manifest:file-entry manifest:media-type="image/png" manifest:full-path="Pictures/1000000000000134000000DD6FD45040.png"/>
  <manifest:file-entry manifest:media-type="image/png" manifest:full-path="Pictures/10000000000000AC00000062B81667F0.png"/>
  <manifest:file-entry manifest:media-type="image/png" manifest:full-path="Pictures/10000000000002AC000000E98805CF64.png"/>
  <manifest:file-entry manifest:media-type="image/png" manifest:full-path="Pictures/10000000000000DB000000CD7953B47C.png"/>
  <manifest:file-entry manifest:media-type="image/png" manifest:full-path="Pictures/10000000000002CF000000D0595AACA4.png"/>
  <manifest:file-entry manifest:media-type="image/png" manifest:full-path="Pictures/1000000000000117000000697AC157C0.png"/>
  <manifest:file-entry manifest:media-type="image/png" manifest:full-path="Pictures/1000000000000112000000A6060A45F1.png"/>
  <manifest:file-entry manifest:media-type="image/png" manifest:full-path="Pictures/100000000000030E000000C9488E3441.png"/>
  <manifest:file-entry manifest:media-type="image/png" manifest:full-path="Pictures/10000000000000AC000000EBF5072A8E.png"/>
  <manifest:file-entry manifest:media-type="image/png" manifest:full-path="Pictures/1000000000000117000001458DE1C1C1.png"/>
  <manifest:file-entry manifest:media-type="image/png" manifest:full-path="Pictures/10000000000000BD0000004B584A85A4.png"/>
  <manifest:file-entry manifest:media-type="image/png" manifest:full-path="Pictures/10000000000000AC0000005589998C96.png"/>
  <manifest:file-entry manifest:media-type="image/png" manifest:full-path="Pictures/10000000000000CE0000007711D3F601.png"/>
  <manifest:file-entry manifest:media-type="image/png" manifest:full-path="Pictures/10000000000000BD000000558E93D841.png"/>
  <manifest:file-entry manifest:media-type="image/png" manifest:full-path="Pictures/10000000000001DE00000055E28A6B99.png"/>
  <manifest:file-entry manifest:media-type="image/png" manifest:full-path="Pictures/100000000000009F0000004BC72D259E.png"/>
  <manifest:file-entry manifest:media-type="image/png" manifest:full-path="Pictures/10000000000000F00000021C564077D4.png"/>
  <manifest:file-entry manifest:media-type="image/png" manifest:full-path="Pictures/10000000000000F0000000A6295BB749.png"/>
  <manifest:file-entry manifest:media-type="image/png" manifest:full-path="Pictures/10000000000000BD000000A5E0633009.png"/>
  <manifest:file-entry manifest:media-type="image/png" manifest:full-path="Pictures/10000000000000F90000004B78E7F143.png"/>
  <manifest:file-entry manifest:media-type="image/png" manifest:full-path="Pictures/1000000000000112000000EA826E342F.png"/>
  <manifest:file-entry manifest:media-type="image/png" manifest:full-path="Pictures/1000000000000171000000A5B103AF30.png"/>
  <manifest:file-entry manifest:media-type="image/png" manifest:full-path="Pictures/10000000000001060000004B5A55B9DE.png"/>
  <manifest:file-entry manifest:media-type="image/png" manifest:full-path="Pictures/1000000000000135000000CD83D23C8D.png"/>
  <manifest:file-entry manifest:media-type="image/png" manifest:full-path="Pictures/10000000000001120000012EB846BD62.png"/>
  <manifest:file-entry manifest:media-type="image/png" manifest:full-path="Pictures/100000000000009F000000AFE9351DA9.png"/>
  <manifest:file-entry manifest:media-type="image/png" manifest:full-path="Pictures/10000000000000CE00000077C147416B.png"/>
  <manifest:file-entry manifest:media-type="image/png" manifest:full-path="Pictures/10000000000001B80000019CCA42DE37.png"/>
  <manifest:file-entry manifest:media-type="image/png" manifest:full-path="Pictures/100000000000011700000163A7B78A37.png"/>
  <manifest:file-entry manifest:media-type="image/png" manifest:full-path="Pictures/10000000000001350000004B88F853C2.png"/>
  <manifest:file-entry manifest:media-type="image/png" manifest:full-path="Pictures/1000000000000156000000551D100965.png"/>
  <manifest:file-entry manifest:media-type="image/png" manifest:full-path="Pictures/10000000000000BD0000004BF8922481.png"/>
  <manifest:file-entry manifest:media-type="image/png" manifest:full-path="Pictures/100000000000034D000000C912382ADB.png"/>
  <manifest:file-entry manifest:media-type="image/png" manifest:full-path="Pictures/10000000000000CA0000004B9B792AE6.png"/>
  <manifest:file-entry manifest:media-type="image/png" manifest:full-path="Pictures/100000000000011700000069DBD267B1.png"/>
  <manifest:file-entry manifest:media-type="image/png" manifest:full-path="Pictures/10000000000000CE0000010C48456A00.png"/>
  <manifest:file-entry manifest:media-type="image/png" manifest:full-path="Pictures/10000000000002E7000001FB0EDD17E6.png"/>
  <manifest:file-entry manifest:media-type="image/png" manifest:full-path="Pictures/10000000000000AC0000005553867366.png"/>
  <manifest:file-entry manifest:media-type="image/png" manifest:full-path="Pictures/1000000000000178000000779AD6E6C3.png"/>
  <manifest:file-entry manifest:media-type="image/png" manifest:full-path="Pictures/100000000000011200000187B42CD32D.png"/>
  <manifest:file-entry manifest:media-type="image/png" manifest:full-path="Pictures/10000000000000BD0000004B47D289CA.png"/>
  <manifest:file-entry manifest:media-type="image/png" manifest:full-path="Pictures/10000000000001560000005532B45A0F.png"/>
  <manifest:file-entry manifest:media-type="image/png" manifest:full-path="Pictures/100000000000018F0000004B408A4D3E.png"/>
  <manifest:file-entry manifest:media-type="image/png" manifest:full-path="Pictures/10000000000001E9000000696DFF8DA7.png"/>
  <manifest:file-entry manifest:media-type="image/png" manifest:full-path="Pictures/1000000000000335000000E95443E6C9.png"/>
  <manifest:file-entry manifest:media-type="image/png" manifest:full-path="Pictures/10000000000001A0000000B5346B6230.png"/>
  <manifest:file-entry manifest:media-type="image/png" manifest:full-path="Pictures/1000000000000398000001862BC50B59.png"/>
  <manifest:file-entry manifest:media-type="image/png" manifest:full-path="Pictures/10000000000000BD00000091CC3878A4.png"/>
  <manifest:file-entry manifest:media-type="image/png" manifest:full-path="Pictures/100000000000015300000087506ED3FA.png"/>
  <manifest:file-entry manifest:media-type="image/png" manifest:full-path="Pictures/10000000000001120000007763C04288.png"/>
  <manifest:file-entry manifest:media-type="image/png" manifest:full-path="Pictures/10000000000004BB00000126EA3F2B28.png"/>
  <manifest:file-entry manifest:media-type="image/png" manifest:full-path="Pictures/10000000000000BD00000069D8AEC336.png"/>
  <manifest:file-entry manifest:media-type="image/png" manifest:full-path="Pictures/100000000000017800000055BE7D0FD3.png"/>
  <manifest:file-entry manifest:media-type="image/png" manifest:full-path="Pictures/10000000000000CE0000010C09A20770.png"/>
  <manifest:file-entry manifest:media-type="image/png" manifest:full-path="Pictures/10000000000000CE000000998E173767.png"/>
  <manifest:file-entry manifest:media-type="image/png" manifest:full-path="Pictures/100000000000015600000099811A2099.png"/>
  <manifest:file-entry manifest:media-type="image/png" manifest:full-path="Pictures/10000000000000AC00000062C1945279.png"/>
  <manifest:file-entry manifest:media-type="image/png" manifest:full-path="Pictures/100000000000019A00000077004F76A6.png"/>
  <manifest:file-entry manifest:media-type="image/png" manifest:full-path="Pictures/1000000000000281000000A70DD31D25.png"/>
  <manifest:file-entry manifest:media-type="image/png" manifest:full-path="Pictures/1000000000000156000000996B8E93AB.png"/>
  <manifest:file-entry manifest:media-type="image/png" manifest:full-path="Pictures/100000000000013500000069E528D1A3.png"/>
  <manifest:file-entry manifest:media-type="image/png" manifest:full-path="Pictures/100000000000015300000069B5E08A38.png"/>
  <manifest:file-entry manifest:media-type="image/png" manifest:full-path="Pictures/10000000000000F0000000EA15109C1B.png"/>
  <manifest:file-entry manifest:media-type="image/png" manifest:full-path="Pictures/100000000000009F0000008F381C00AF.png"/>
  <manifest:file-entry manifest:media-type="image/png" manifest:full-path="Pictures/10000000000000AC000000C89112D8DC.png"/>
  <manifest:file-entry manifest:media-type="image/png" manifest:full-path="Pictures/10000000000000AC00000055B7D3663F.png"/>
  <manifest:file-entry manifest:media-type="image/png" manifest:full-path="Pictures/1000000000000117000000CD51E39A6F.png"/>
  <manifest:file-entry manifest:media-type="image/png" manifest:full-path="Pictures/10000000000000CE000000FF31BB6902.png"/>
  <manifest:file-entry manifest:media-type="image/png" manifest:full-path="Pictures/10000000000000AC0000008464C2606D.png"/>
  <manifest:file-entry manifest:media-type="image/png" manifest:full-path="Pictures/10000000000000DB0000004B28084D9C.png"/>
  <manifest:file-entry manifest:media-type="image/png" manifest:full-path="Pictures/1000000000000112000000FFEB6E2121.png"/>
  <manifest:file-entry manifest:media-type="image/png" manifest:full-path="Pictures/10000000000000BD0000010999EB8796.png"/>
  <manifest:file-entry manifest:media-type="image/png" manifest:full-path="Pictures/10000000000000CE0000007702B56EFC.png"/>
  <manifest:file-entry manifest:media-type="image/png" manifest:full-path="Pictures/10000000000000F0000000FF67464D95.png"/>
  <manifest:file-entry manifest:media-type="image/png" manifest:full-path="Pictures/100000000000009B000000625F2C3B19.png"/>
  <manifest:file-entry manifest:media-type="image/png" manifest:full-path="Pictures/10000000000000F900000163830E4365.png"/>
  <manifest:file-entry manifest:media-type="image/png" manifest:full-path="Pictures/10000000000000AC0000021C6B9CE65D.png"/>
  <manifest:file-entry manifest:media-type="image/png" manifest:full-path="Pictures/1000000000000207000000870B815ACF.png"/>
  <manifest:file-entry manifest:media-type="image/png" manifest:full-path="Pictures/10000000000000AC00000062EF71D149.png"/>
  <manifest:file-entry manifest:media-type="image/png" manifest:full-path="Pictures/10000000000001710000004BDAF08181.png"/>
  <manifest:file-entry manifest:media-type="image/png" manifest:full-path="Pictures/10000000000000CE000000C81F4C5D51.png"/>
  <manifest:file-entry manifest:media-type="image/png" manifest:full-path="Pictures/10000000000000CE00000055C50D2A74.png"/>
  <manifest:file-entry manifest:media-type="image/png" manifest:full-path="Pictures/100000000000009F00000091B4E53245.png"/>
  <manifest:file-entry manifest:media-type="image/png" manifest:full-path="Pictures/1000000000000200000000BB09A641AF.png"/>
  <manifest:file-entry manifest:media-type="image/png" manifest:full-path="Pictures/100000000000013400000077A905C2D3.png"/>
  <manifest:file-entry manifest:media-type="image/png" manifest:full-path="Pictures/100000000000011700000069DA40C2AB.png"/>
  <manifest:file-entry manifest:media-type="image/png" manifest:full-path="Pictures/10000000000002B30000019AA02676B9.png"/>
  <manifest:file-entry manifest:media-type="image/png" manifest:full-path="Pictures/1000000000000134000000EA867DD4FA.png"/>
  <manifest:file-entry manifest:media-type="image/png" manifest:full-path="Pictures/10000000000001300000009A4CCE2EC8.png"/>
  <manifest:file-entry manifest:media-type="image/png" manifest:full-path="Pictures/1000000000000156000000777000D7DB.png"/>
  <manifest:file-entry manifest:media-type="image/png" manifest:full-path="Pictures/100000000000020000000055CC4855F7.png"/>
  <manifest:file-entry manifest:media-type="image/png" manifest:full-path="Pictures/10000000000001340000007766F9E5F4.png"/>
  <manifest:file-entry manifest:media-type="image/png" manifest:full-path="Pictures/100000000000008A000000848734B085.png"/>
  <manifest:file-entry manifest:media-type="image/png" manifest:full-path="Pictures/10000000000000CE000000C8B953B81E.png"/>
  <manifest:file-entry manifest:media-type="image/png" manifest:full-path="Pictures/10000000000001530000006949764F03.png"/>
  <manifest:file-entry manifest:media-type="image/png" manifest:full-path="Pictures/100000000000009F000000912A0A0308.png"/>
  <manifest:file-entry manifest:media-type="image/png" manifest:full-path="Pictures/10000000000000CE000000C86D7C4A9A.png"/>
  <manifest:file-entry manifest:media-type="image/png" manifest:full-path="Pictures/10000000000000CE00000055726D026D.png"/>
  <manifest:file-entry manifest:media-type="image/png" manifest:full-path="Pictures/10000000000001530000004B6A3C120F.png"/>
  <manifest:file-entry manifest:media-type="image/png" manifest:full-path="Pictures/100000000000009F00000073B58431B1.png"/>
  <manifest:file-entry manifest:media-type="image/png" manifest:full-path="Pictures/10000000000000CE0000005522485091.png"/>
  <manifest:file-entry manifest:media-type="image/png" manifest:full-path="Pictures/100000000000034100000044EE45FC11.png"/>
  <manifest:file-entry manifest:media-type="image/png" manifest:full-path="Pictures/100000000000016A00000127117DF9A7.png"/>
  <manifest:file-entry manifest:media-type="image/png" manifest:full-path="Pictures/1000000000000266000000BBC92180F7.png"/>
  <manifest:file-entry manifest:media-type="image/png" manifest:full-path="Pictures/100000000000019A000000C81DD19F14.png"/>
  <manifest:file-entry manifest:media-type="image/png" manifest:full-path="Pictures/10000000000000AC000000A6B54B041E.png"/>
  <manifest:file-entry manifest:media-type="image/png" manifest:full-path="Pictures/1000000000000244000000BBC792B1F7.png"/>
  <manifest:file-entry manifest:media-type="image/png" manifest:full-path="Pictures/10000000000001780000005505F3C4A1.png"/>
  <manifest:file-entry manifest:media-type="image/png" manifest:full-path="Pictures/10000000000001710000004B52AA7156.png"/>
  <manifest:file-entry manifest:media-type="image/png" manifest:full-path="Pictures/10000000000000B0000000EA09666FDE.png"/>
  <manifest:file-entry manifest:media-type="image/png" manifest:full-path="Pictures/10000000000000CE00000084640D4D8C.png"/>
  <manifest:file-entry manifest:media-type="image/png" manifest:full-path="Pictures/10000000000000CE00000055D2A10C58.png"/>
  <manifest:file-entry manifest:media-type="image/png" manifest:full-path="Pictures/1000000000000134000000554EF08597.png"/>
  <manifest:file-entry manifest:media-type="image/png" manifest:full-path="Pictures/1000000000000112000000A613829649.png"/>
  <manifest:file-entry manifest:media-type="image/png" manifest:full-path="Pictures/10000000000004C30000015126E2283D.png"/>
  <manifest:file-entry manifest:media-type="image/png" manifest:full-path="Pictures/100000000000009F000000534F7A6EA5.png"/>
  <manifest:file-entry manifest:media-type="image/png" manifest:full-path="Pictures/10000000000001E30000012A846008E1.png"/>
  <manifest:file-entry manifest:media-type="image/png" manifest:full-path="Pictures/1000000000000172000000E5A1C18477.png"/>
  <manifest:file-entry manifest:media-type="image/png" manifest:full-path="Pictures/10000000000001C000000141F9C24170.png"/>
  <manifest:file-entry manifest:media-type="image/png" manifest:full-path="Pictures/10000000000000CE0000007794680276.png"/>
  <manifest:file-entry manifest:media-type="image/png" manifest:full-path="Pictures/10000000000000F000000055D6C68C48.png"/>
  <manifest:file-entry manifest:media-type="image/png" manifest:full-path="Pictures/1000000000000153000000694D849B84.png"/>
  <manifest:file-entry manifest:media-type="image/png" manifest:full-path="Pictures/10000000000001120000007780B092A3.png"/>
  <manifest:file-entry manifest:media-type="image/png" manifest:full-path="Pictures/10000000000001710000008A2D818B69.png"/>
  <manifest:file-entry manifest:media-type="image/png" manifest:full-path="Pictures/10000000000000BD000000699EAEDCD1.png"/>
  <manifest:file-entry manifest:media-type="image/png" manifest:full-path="Pictures/10000000000000BD0000006970DE4401.png"/>
  <manifest:file-entry manifest:media-type="image/png" manifest:full-path="Pictures/10000000000001240000019FD33D3814.png"/>
  <manifest:file-entry manifest:media-type="image/png" manifest:full-path="Pictures/10000000000001BC00000055B49FA3AE.png"/>
  <manifest:file-entry manifest:media-type="image/png" manifest:full-path="Pictures/10000000000000DB00000069689B5570.png"/>
  <manifest:file-entry manifest:media-type="image/png" manifest:full-path="Pictures/10000000000000F900000069C812BC35.png"/>
  <manifest:file-entry manifest:media-type="image/png" manifest:full-path="Pictures/10000000000004A100000151223436B5.png"/>
  <manifest:file-entry manifest:media-type="image/png" manifest:full-path="Pictures/1000000000000398000001C64C19A4EE.png"/>
  <manifest:file-entry manifest:media-type="image/png" manifest:full-path="Pictures/10000000000000DB0000009109996717.png"/>
  <manifest:file-entry manifest:media-type="image/png" manifest:full-path="Pictures/10000000000000BD000000EBBA635685.png"/>
  <manifest:file-entry manifest:media-type="image/png" manifest:full-path="Pictures/1000000000000112000000995D826A97.png"/>
  <manifest:file-entry manifest:media-type="image/png" manifest:full-path="Pictures/100000000000017100000089169A8287.png"/>
  <manifest:file-entry manifest:media-type="image/png" manifest:full-path="Pictures/100000000000015A000001D82A3C622B.png"/>
  <manifest:file-entry manifest:media-type="image/png" manifest:full-path="Pictures/10000000000000DB000000AFA368BBF5.png"/>
  <manifest:file-entry manifest:media-type="image/png" manifest:full-path="Pictures/10000000000002C700000119A48C9101.png"/>
  <manifest:file-entry manifest:media-type="image/png" manifest:full-path="Pictures/100000000000009F0000004B23166FBF.png"/>
  <manifest:file-entry manifest:media-type="image/png" manifest:full-path="Pictures/100000000000047F0000015104187800.png"/>
  <manifest:file-entry manifest:media-type="image/png" manifest:full-path="Pictures/1000000000000110000000693CA33BB7.png"/>
  <manifest:file-entry manifest:media-type="image/png" manifest:full-path="Pictures/10000000000000F00000005540376921.png"/>
  <manifest:file-entry manifest:media-type="image/png" manifest:full-path="Pictures/1000000000000112000000DD8322226C.png"/>
  <manifest:file-entry manifest:media-type="image/png" manifest:full-path="Pictures/10000000000000F900000091A70FA754.png"/>
  <manifest:file-entry manifest:media-type="image/png" manifest:full-path="Pictures/10000000000000CE0000010C1A9B4687.png"/>
  <manifest:file-entry manifest:media-type="image/png" manifest:full-path="Pictures/1000000000000134000000BB80D8F132.png"/>
  <manifest:file-entry manifest:media-type="image/png" manifest:full-path="Pictures/10000000000001340000010CEF610A1B.png"/>
  <manifest:file-entry manifest:media-type="image/png" manifest:full-path="Pictures/10000000000001340000007765BD2321.png"/>
  <manifest:file-entry manifest:media-type="image/png" manifest:full-path="Pictures/10000000000000DB0000004BB5A0614D.png"/>
  <manifest:file-entry manifest:media-type="image/png" manifest:full-path="Pictures/10000000000000CE000000A6C9D4B444.png"/>
  <manifest:file-entry manifest:media-type="image/png" manifest:full-path="Pictures/100000000000023200000196069C2F5F.png"/>
  <manifest:file-entry manifest:media-type="image/png" manifest:full-path="Pictures/100000000000011E000000C1EB7B3A5F.png"/>
  <manifest:file-entry manifest:media-type="image/png" manifest:full-path="Pictures/1000000000000135000000AF1F420FD4.png"/>
  <manifest:file-entry manifest:media-type="image/png" manifest:full-path="Pictures/100000000000032000000320B996E000.png"/>
  <manifest:file-entry manifest:media-type="image/png" manifest:full-path="Pictures/100000000000022500000069CB2DB2F9.png"/>
  <manifest:file-entry manifest:media-type="image/png" manifest:full-path="Pictures/100000000000013400000055619B408E.png"/>
  <manifest:file-entry manifest:media-type="image/png" manifest:full-path="Pictures/1000000000000171000000A5E6453695.png"/>
  <manifest:file-entry manifest:media-type="image/png" manifest:full-path="Pictures/1000000000000112000000A61160D7F2.png"/>
  <manifest:file-entry manifest:media-type="image/png" manifest:full-path="Pictures/10000000000000E8000000695ECE4886.png"/>
  <manifest:file-entry manifest:media-type="image/png" manifest:full-path="Pictures/100000000000029C0000012975744091.png"/>
  <manifest:file-entry manifest:media-type="image/png" manifest:full-path="Pictures/10000000000000F000000077B5E2B094.png"/>
  <manifest:file-entry manifest:media-type="image/png" manifest:full-path="Pictures/10000000000001E90000008718D125BB.png"/>
  <manifest:file-entry manifest:media-type="image/png" manifest:full-path="Pictures/10000000000000AC000000995328F442.png"/>
  <manifest:file-entry manifest:media-type="image/png" manifest:full-path="Pictures/10000000000000F900000069F2733006.png"/>
  <manifest:file-entry manifest:media-type="image/png" manifest:full-path="Pictures/10000000000000F0000000A6DA716962.png"/>
  <manifest:file-entry manifest:media-type="image/png" manifest:full-path="Pictures/10000000000001850000016812774F4D.png"/>
  <manifest:file-entry manifest:media-type="image/png" manifest:full-path="Pictures/10000000000002440000009974136929.png"/>
  <manifest:file-entry manifest:media-type="image/png" manifest:full-path="Pictures/10000000000000AC000000A6504A3E07.png"/>
  <manifest:file-entry manifest:media-type="image/png" manifest:full-path="Pictures/100000000000019A0000009981A9A7D2.png"/>
  <manifest:file-entry manifest:media-type="image/png" manifest:full-path="Pictures/100000000000011200000077CC793EAF.png"/>
  <manifest:file-entry manifest:media-type="image/png" manifest:full-path="Pictures/100000000000013400000172E4A36C0D.png"/>
  <manifest:file-entry manifest:media-type="image/png" manifest:full-path="Pictures/10000000000000E80000004B48080954.png"/>
  <manifest:file-entry manifest:media-type="image/png" manifest:full-path="Pictures/1000000000000109000000B1502364E8.png"/>
  <manifest:file-entry manifest:media-type="image/png" manifest:full-path="Pictures/10000000000001F9000000C9E803F6DF.png"/>
  <manifest:file-entry manifest:media-type="image/png" manifest:full-path="Pictures/10000000000001350000004B4F9BBB0A.png"/>
  <manifest:file-entry manifest:media-type="image/png" manifest:full-path="Pictures/1000000000000171000000C3E85896D3.png"/>
  <manifest:file-entry manifest:media-type="image/png" manifest:full-path="Pictures/1000000000000265000000C90089EFE7.png"/>
  <manifest:file-entry manifest:media-type="image/png" manifest:full-path="Pictures/10000000000000CE000000C881C7D07A.png"/>
  <manifest:file-entry manifest:media-type="image/png" manifest:full-path="Pictures/10000000000000CE000000998D7045F1.png"/>
  <manifest:file-entry manifest:media-type="image/png" manifest:full-path="Pictures/10000000000000F0000000BB061BCE6D.png"/>
  <manifest:file-entry manifest:media-type="image/png" manifest:full-path="Pictures/100000000000015800000085C262DFD3.png"/>
  <manifest:file-entry manifest:media-type="image/png" manifest:full-path="Pictures/10000000000001BC00000077D8B300D6.png"/>
  <manifest:file-entry manifest:media-type="image/png" manifest:full-path="Pictures/100000000000015600000077B6FEB5E3.png"/>
  <manifest:file-entry manifest:media-type="image/png" manifest:full-path="Pictures/100000000000013400000077749EF1C2.png"/>
  <manifest:file-entry manifest:media-type="image/png" manifest:full-path="Pictures/1000000000000306000001BFC1D5987B.png"/>
  <manifest:file-entry manifest:media-type="image/png" manifest:full-path="Pictures/10000000000000F90000006944ADD1BC.png"/>
  <manifest:file-entry manifest:media-type="image/png" manifest:full-path="Pictures/10000000000000F9000000ADFCF0C3F2.png"/>
  <manifest:file-entry manifest:media-type="image/png" manifest:full-path="Pictures/10000000000001D400000102A7446F75.png"/>
  <manifest:file-entry manifest:media-type="image/png" manifest:full-path="Pictures/10000000000003530000015D4A2BC405.png"/>
  <manifest:file-entry manifest:media-type="image/png" manifest:full-path="Pictures/10000000000001350000004B1713BCA6.png"/>
  <manifest:file-entry manifest:media-type="image/png" manifest:full-path="Pictures/10000000000000CE000000991839EDB4.png"/>
  <manifest:file-entry manifest:media-type="image/png" manifest:full-path="Pictures/100000000000009F000000AF582EBC93.png"/>
  <manifest:file-entry manifest:media-type="image/png" manifest:full-path="Pictures/10000000000001D700000136CDB24F69.png"/>
  <manifest:file-entry manifest:media-type="image/png" manifest:full-path="Pictures/1000000000000112000000554FF0BA69.png"/>
  <manifest:file-entry manifest:media-type="image/png" manifest:full-path="Pictures/10000000000002CD00000147ADF5621C.png"/>
  <manifest:file-entry manifest:media-type="image/png" manifest:full-path="Pictures/1000000000000341000000A857DFB588.png"/>
  <manifest:file-entry manifest:media-type="image/png" manifest:full-path="Pictures/100000000000019A000000DDF47B9A49.png"/>
  <manifest:file-entry manifest:media-type="image/png" manifest:full-path="Pictures/100000000000024200000075D8A4868B.png"/>
  <manifest:file-entry manifest:media-type="image/png" manifest:full-path="Pictures/1000000000000134000000776116D3C7.png"/>
  <manifest:file-entry manifest:media-type="image/png" manifest:full-path="Pictures/10000000000001E90000004B25B79A21.png"/>
  <manifest:file-entry manifest:media-type="image/png" manifest:full-path="Pictures/100000000000013400000077D47641F7.png"/>
  <manifest:file-entry manifest:media-type="image/png" manifest:full-path="Pictures/10000000000004A100000133E7F496FB.png"/>
  <manifest:file-entry manifest:media-type="image/png" manifest:full-path="Pictures/10000000000002DE0000011C4614FC8E.png"/>
  <manifest:file-entry manifest:media-type="image/png" manifest:full-path="Pictures/10000000000001710000008CE09BE27C.png"/>
  <manifest:file-entry manifest:media-type="image/png" manifest:full-path="Pictures/1000000000000117000000AF85604DC6.png"/>
  <manifest:file-entry manifest:media-type="image/png" manifest:full-path="Pictures/10000000000000F0000000FF71B4F401.png"/>
  <manifest:file-entry manifest:media-type="image/png" manifest:full-path="Pictures/10000000000000BD0000008FFFDF8E1C.png"/>
  <manifest:file-entry manifest:media-type="image/png" manifest:full-path="Pictures/10000000000000BD0000006984436BBF.png"/>
  <manifest:file-entry manifest:media-type="image/png" manifest:full-path="Pictures/10000000000000AC00000084B77EE006.png"/>
  <manifest:file-entry manifest:media-type="image/png" manifest:full-path="Pictures/1000000000000135000000699422C29F.png"/>
  <manifest:file-entry manifest:media-type="image/png" manifest:full-path="Pictures/10000000000000BD0000019FF2C2AAC6.png"/>
  <manifest:file-entry manifest:media-type="image/png" manifest:full-path="Pictures/1000000000000245000001923E2FE58F.png"/>
  <manifest:file-entry manifest:media-type="image/png" manifest:full-path="Pictures/1000000000000178000000554C7C3E08.png"/>
  <manifest:file-entry manifest:media-type="image/png" manifest:full-path="Pictures/10000000000000F9000000CB3F47FF3A.png"/>
  <manifest:file-entry manifest:media-type="image/png" manifest:full-path="Pictures/10000000000002E9000001AA7B2BA282.png"/>
  <manifest:file-entry manifest:media-type="image/png" manifest:full-path="Pictures/10000000000000CE000000C88B5155A1.png"/>
  <manifest:file-entry manifest:media-type="image/png" manifest:full-path="Pictures/10000000000000F00000012EC9B3DE67.png"/>
  <manifest:file-entry manifest:media-type="image/png" manifest:full-path="Pictures/1000000000000134000000DD5915C787.png"/>
  <manifest:file-entry manifest:media-type="image/png" manifest:full-path="Pictures/100000000000018F0000004BE5590CCA.png"/>
  <manifest:file-entry manifest:media-type="image/png" manifest:full-path="Pictures/10000000000000F90000004B49AC343D.png"/>
  <manifest:file-entry manifest:media-type="image/png" manifest:full-path="Pictures/100000000000011700000069A5FBA963.png"/>
  <manifest:file-entry manifest:media-type="image/png" manifest:full-path="Pictures/10000000000000CE00000099EEC65A2D.png"/>
  <manifest:file-entry manifest:media-type="image/png" manifest:full-path="Pictures/10000000000001240000004B8EF3C8A3.png"/>
  <manifest:file-entry manifest:media-type="image/png" manifest:full-path="Pictures/10000000000000BD0000009103A4D141.png"/>
  <manifest:file-entry manifest:media-type="image/png" manifest:full-path="Pictures/10000000000000F900000087C5B0F314.png"/>
  <manifest:file-entry manifest:media-type="image/png" manifest:full-path="Pictures/100000000000030F00000228FBA36C26.png"/>
  <manifest:file-entry manifest:media-type="image/png" manifest:full-path="Pictures/10000000000000AC000000C8CFCB5245.png"/>
  <manifest:file-entry manifest:media-type="image/png" manifest:full-path="Pictures/10000000000000FB000000F737E3925C.png"/>
  <manifest:file-entry manifest:media-type="image/png" manifest:full-path="Pictures/100000000000039400000156EDE2F335.png"/>
  <manifest:file-entry manifest:media-type="image/png" manifest:full-path="Pictures/10000000000001FF000000C128F3C1CA.png"/>
  <manifest:file-entry manifest:media-type="image/png" manifest:full-path="Pictures/1000000000000117000001094A5B6D2C.png"/>
  <manifest:file-entry manifest:media-type="image/png" manifest:full-path="Pictures/1000000000000373000001428B0010EA.png"/>
  <manifest:file-entry manifest:media-type="" manifest:full-path="Pictures/200000070000526700001E098CD105CE.svm"/>
  <manifest:file-entry manifest:media-type="image/png" manifest:full-path="Pictures/10000000000000AC00000084B399053C.png"/>
  <manifest:file-entry manifest:media-type="image/png" manifest:full-path="Pictures/10000000000000AC000000C82226B47B.png"/>
  <manifest:file-entry manifest:media-type="image/png" manifest:full-path="Pictures/10000000000000F00000005504D66E8C.png"/>
  <manifest:file-entry manifest:media-type="image/png" manifest:full-path="Pictures/100000000000034D000000C82A8402A6.png"/>
  <manifest:file-entry manifest:media-type="image/png" manifest:full-path="Pictures/10000000000001560000009932C99115.png"/>
  <manifest:file-entry manifest:media-type="image/png" manifest:full-path="Pictures/10000000000000DB0000004B60DCB7CC.png"/>
  <manifest:file-entry manifest:media-type="image/png" manifest:full-path="Pictures/10000000000000DB000000ADD9AF3A60.png"/>
  <manifest:file-entry manifest:media-type="image/png" manifest:full-path="Pictures/10000000000000F000000150590A32A5.png"/>
  <manifest:file-entry manifest:media-type="image/png" manifest:full-path="Pictures/10000000000001AD0000004B1C9725D1.png"/>
  <manifest:file-entry manifest:media-type="image/png" manifest:full-path="Pictures/10000000000002B800000093AB32EBA1.png"/>
  <manifest:file-entry manifest:media-type="image/png" manifest:full-path="Pictures/1000000000000309000001730AD7860F.png"/>
  <manifest:file-entry manifest:media-type="image/png" manifest:full-path="Pictures/10000000000000F0000000847719227B.png"/>
  <manifest:file-entry manifest:media-type="image/png" manifest:full-path="Pictures/10000000000000F0000001948F49393B.png"/>
  <manifest:file-entry manifest:media-type="image/png" manifest:full-path="Pictures/100000000000047F0000012FDCBC6BE4.png"/>
  <manifest:file-entry manifest:media-type="image/png" manifest:full-path="Pictures/100000000000018F00000069D4213320.png"/>
  <manifest:file-entry manifest:media-type="image/png" manifest:full-path="Pictures/10000000000004E500000169A274FFC0.png"/>
  <manifest:file-entry manifest:media-type="image/png" manifest:full-path="Pictures/10000000000001100000004B1CC1A5BB.png"/>
  <manifest:file-entry manifest:media-type="image/png" manifest:full-path="Pictures/100000000000015300000181F6FC643D.png"/>
  <manifest:file-entry manifest:media-type="image/png" manifest:full-path="Pictures/100000000000018F00000069A6810DE8.png"/>
  <manifest:file-entry manifest:media-type="image/png" manifest:full-path="Pictures/1000000000000134000000556D05044D.png"/>
  <manifest:file-entry manifest:media-type="image/png" manifest:full-path="Pictures/100000000000031B0000011E629C30B1.png"/>
  <manifest:file-entry manifest:media-type="image/png" manifest:full-path="Pictures/100000000000015600000055651EBE0A.png"/>
  <manifest:file-entry manifest:media-type="image/png" manifest:full-path="Pictures/10000000000001170000004B653EF57E.png"/>
  <manifest:file-entry manifest:media-type="image/png" manifest:full-path="Pictures/10000000000000F00000009985533CAB.png"/>
  <manifest:file-entry manifest:media-type="image/png" manifest:full-path="Pictures/10000000000000AC00000084E4420A3B.png"/>
  <manifest:file-entry manifest:media-type="image/png" manifest:full-path="Pictures/100000000000009F000000912310C34A.png"/>
  <manifest:file-entry manifest:media-type="image/png" manifest:full-path="Pictures/10000000000000E8000000CD5DF53F39.png"/>
  <manifest:file-entry manifest:media-type="image/png" manifest:full-path="Pictures/10000000000001060000004BE367B82E.png"/>
  <manifest:file-entry manifest:media-type="image/png" manifest:full-path="Pictures/100000000000013400000055023FDEDA.png"/>
  <manifest:file-entry manifest:media-type="image/png" manifest:full-path="Pictures/10000000000003BD0000022901FF5F75.png"/>
  <manifest:file-entry manifest:media-type="image/png" manifest:full-path="Pictures/10000000000001120000010C778BB549.png"/>
  <manifest:file-entry manifest:media-type="image/png" manifest:full-path="Pictures/10000000000001120000010C9BAB4D79.png"/>
  <manifest:file-entry manifest:media-type="image/png" manifest:full-path="Pictures/10000000000003C600000171A1B13335.png"/>
  <manifest:file-entry manifest:media-type="image/png" manifest:full-path="Pictures/10000000000000CE00000055FB83BF65.png"/>
  <manifest:file-entry manifest:media-type="image/png" manifest:full-path="Pictures/10000000000000BD000000AFB03493E8.png"/>
  <manifest:file-entry manifest:media-type="image/png" manifest:full-path="Pictures/10000000000000F00000007740E60F88.png"/>
  <manifest:file-entry manifest:media-type="image/png" manifest:full-path="Pictures/10000000000000CE000000C850335A03.png"/>
  <manifest:file-entry manifest:media-type="image/png" manifest:full-path="Pictures/10000000000001840000016747CDA32D.png"/>
  <manifest:file-entry manifest:media-type="image/png" manifest:full-path="Pictures/10000000000000BD000000CD5AAF35CA.png"/>
  <manifest:file-entry manifest:media-type="image/png" manifest:full-path="Pictures/100000000000013400000055C016F1FE.png"/>
  <manifest:file-entry manifest:media-type="image/png" manifest:full-path="Pictures/100000000000012E000000695BCD19FA.png"/>
  <manifest:file-entry manifest:media-type="image/png" manifest:full-path="Pictures/10000000000001170000004B1522CB51.png"/>
  <manifest:file-entry manifest:media-type="image/png" manifest:full-path="Pictures/10000000000000DB00000127FA2AC2F8.png"/>
  <manifest:file-entry manifest:media-type="image/png" manifest:full-path="Pictures/10000000000003C8000000F3E6D7164C.png"/>
  <manifest:file-entry manifest:media-type="image/png" manifest:full-path="Pictures/10000000000000CE000000C80AE798CD.png"/>
  <manifest:file-entry manifest:media-type="image/png" manifest:full-path="Pictures/10000000000000CE0000005513ED54BB.png"/>
  <manifest:file-entry manifest:media-type="image/png" manifest:full-path="Pictures/10000000000000DB0000016364E893AF.png"/>
  <manifest:file-entry manifest:media-type="image/png" manifest:full-path="Pictures/10000000000003AD000001806D515420.png"/>
  <manifest:file-entry manifest:media-type="image/png" manifest:full-path="Pictures/10000000000002DC0000011B44272AE6.png"/>
  <manifest:file-entry manifest:media-type="image/png" manifest:full-path="Pictures/1000000000000117000000E1144D7E07.png"/>
  <manifest:file-entry manifest:media-type="image/png" manifest:full-path="Pictures/100000000000011200000077FE7BD5D4.png"/>
  <manifest:file-entry manifest:media-type="image/png" manifest:full-path="Pictures/100000000000013400000077D3895A4B.png"/>
  <manifest:file-entry manifest:media-type="image/png" manifest:full-path="Pictures/10000000000000DB000000EBB23EB16E.png"/>
  <manifest:file-entry manifest:media-type="image/png" manifest:full-path="Pictures/100000000000013400000099EA740595.png"/>
  <manifest:file-entry manifest:media-type="image/png" manifest:full-path="Pictures/10000000000000CE000000C86AD0ED53.png"/>
  <manifest:file-entry manifest:media-type="image/png" manifest:full-path="Pictures/10000000000000BD000000CDEA97752F.png"/>
  <manifest:file-entry manifest:media-type="image/png" manifest:full-path="Pictures/10000000000001170000004BFE1C7216.png"/>
  <manifest:file-entry manifest:media-type="image/png" manifest:full-path="Pictures/100000000000019A000000779CD846BB.png"/>
  <manifest:file-entry manifest:media-type="image/png" manifest:full-path="Pictures/10000000000000F000000055B641A864.png"/>
  <manifest:file-entry manifest:media-type="image/png" manifest:full-path="Pictures/10000000000000F00000012E0C86952B.png"/>
  <manifest:file-entry manifest:media-type="image/png" manifest:full-path="Pictures/10000000000001170000006934D17BAA.png"/>
  <manifest:file-entry manifest:media-type="image/png" manifest:full-path="Pictures/10000000000003F50000012564860453.png"/>
  <manifest:file-entry manifest:media-type="image/png" manifest:full-path="Pictures/1000000000000134000000993E48239F.png"/>
  <manifest:file-entry manifest:media-type="image/png" manifest:full-path="Pictures/1000000000000321000001799953EB50.png"/>
  <manifest:file-entry manifest:media-type="image/png" manifest:full-path="Pictures/10000000000000CA000000AF4E414A24.png"/>
  <manifest:file-entry manifest:media-type="image/png" manifest:full-path="Pictures/10000000000000BD0000004B10EE126F.png"/>
  <manifest:file-entry manifest:media-type="image/png" manifest:full-path="Pictures/10000000000001710000008C66929A22.png"/>
  <manifest:file-entry manifest:media-type="image/png" manifest:full-path="Pictures/10000000000000E800000087585A583F.png"/>
  <manifest:file-entry manifest:media-type="image/png" manifest:full-path="Pictures/10000000000000AC000000C87059FC2E.png"/>
  <manifest:file-entry manifest:media-type="image/png" manifest:full-path="Pictures/10000000000000F00000005515398EAF.png"/>
  <manifest:file-entry manifest:media-type="image/png" manifest:full-path="Pictures/10000000000000F00000008491601B3B.png"/>
  <manifest:file-entry manifest:media-type="image/png" manifest:full-path="Pictures/10000000000000AC000000A645DC3564.png"/>
  <manifest:file-entry manifest:media-type="image/png" manifest:full-path="Pictures/10000000000000CE00000099E8BFF303.png"/>
  <manifest:file-entry manifest:media-type="image/png" manifest:full-path="Pictures/100000000000020000000077F00DC735.png"/>
  <manifest:file-entry manifest:media-type="image/png" manifest:full-path="Pictures/10000000000000F000000150D5281BFE.png"/>
  <manifest:file-entry manifest:media-type="image/png" manifest:full-path="Pictures/10000000000000BD0000006905B42262.png"/>
  <manifest:file-entry manifest:media-type="image/png" manifest:full-path="Pictures/10000000000002050000017BDBB8942C.png"/>
  <manifest:file-entry manifest:media-type="image/png" manifest:full-path="Pictures/100000000000011200000055E8D98E47.png"/>
  <manifest:file-entry manifest:media-type="image/png" manifest:full-path="Pictures/1000000000000156000000552E0061EF.png"/>
  <manifest:file-entry manifest:media-type="image/png" manifest:full-path="Pictures/10000000000000F0000000C8FA3A299F.png"/>
  <manifest:file-entry manifest:media-type="image/png" manifest:full-path="Pictures/10000000000003A70000017AF0F3EB7A.png"/>
  <manifest:file-entry manifest:media-type="image/png" manifest:full-path="Pictures/1000000000000112000000999EE15A3D.png"/>
  <manifest:file-entry manifest:media-type="image/png" manifest:full-path="Pictures/100000000000011700000087921D49FC.png"/>
  <manifest:file-entry manifest:media-type="image/png" manifest:full-path="Pictures/10000000000000DB0000004BBACCFD16.png"/>
  <manifest:file-entry manifest:media-type="image/png" manifest:full-path="Pictures/100000000000018F000000EF2DA25492.png"/>
  <manifest:file-entry manifest:media-type="image/png" manifest:full-path="Pictures/10000000000000CE00000150113EA753.png"/>
  <manifest:file-entry manifest:media-type="image/png" manifest:full-path="Pictures/10000000000001DE000000775F70386B.png"/>
  <manifest:file-entry manifest:media-type="image/png" manifest:full-path="Pictures/1000000000000112000000554F2ADE3A.png"/>
  <manifest:file-entry manifest:media-type="image/png" manifest:full-path="Pictures/10000000000000DB00000069DE11038A.png"/>
  <manifest:file-entry manifest:media-type="image/png" manifest:full-path="Pictures/10000000000000BD00000181C1E0984C.png"/>
  <manifest:file-entry manifest:media-type="image/png" manifest:full-path="Pictures/100000000000025C00000146F4C42A29.png"/>
  <manifest:file-entry manifest:media-type="image/png" manifest:full-path="Pictures/100000000000011200000077785DFB56.png"/>
  <manifest:file-entry manifest:media-type="image/png" manifest:full-path="Pictures/1000000000000117000000AF7BFE1637.png"/>
  <manifest:file-entry manifest:media-type="image/png" manifest:full-path="Pictures/10000000000000FB000000F63FAFD69A.png"/>
  <manifest:file-entry manifest:media-type="image/png" manifest:full-path="Pictures/10000000000000DB00000091146119EC.png"/>
  <manifest:file-entry manifest:media-type="image/png" manifest:full-path="Pictures/10000000000000BD000000692BFA81EF.png"/>
  <manifest:file-entry manifest:media-type="image/png" manifest:full-path="Pictures/1000000000000450000001F0CC5508DE.png"/>
  <manifest:file-entry manifest:media-type="image/png" manifest:full-path="Pictures/10000000000000AC000000559A97C158.png"/>
  <manifest:file-entry manifest:media-type="image/png" manifest:full-path="Pictures/10000000000002000000007758CE69F6.png"/>
  <manifest:file-entry manifest:media-type="image/png" manifest:full-path="Pictures/10000000000000AC000000A67B683ACB.png"/>
  <manifest:file-entry manifest:media-type="image/png" manifest:full-path="Pictures/100000000000009F000000736416F08A.png"/>
  <manifest:file-entry manifest:media-type="image/png" manifest:full-path="Pictures/100000000000019A00000055C3088950.png"/>
  <manifest:file-entry manifest:media-type="image/png" manifest:full-path="Pictures/1000000000000117000000CD2B374128.png"/>
  <manifest:file-entry manifest:media-type="image/png" manifest:full-path="Pictures/10000000000000AC000000849852D7E5.png"/>
  <manifest:file-entry manifest:media-type="image/png" manifest:full-path="Pictures/10000000000000DB000000E9724BBD7F.png"/>
  <manifest:file-entry manifest:media-type="image/png" manifest:full-path="Pictures/100000000000019A0000005573580FE8.png"/>
  <manifest:file-entry manifest:media-type="image/png" manifest:full-path="Pictures/10000000000001BA0000015CA1438E68.png"/>
  <manifest:file-entry manifest:media-type="image/png" manifest:full-path="Pictures/10000000000004CF0000013CA2605BF5.png"/>
  <manifest:file-entry manifest:media-type="image/png" manifest:full-path="Pictures/100000000000019A00000055C59DB1D3.png"/>
  <manifest:file-entry manifest:media-type="image/png" manifest:full-path="Pictures/100000000000009F000000A512E9F5C6.png"/>
  <manifest:file-entry manifest:media-type="image/png" manifest:full-path="Pictures/1000000000000135000000CD4D0D15D3.png"/>
  <manifest:file-entry manifest:media-type="image/png" manifest:full-path="Pictures/1000000000000112000001500A7AB421.png"/>
  <manifest:file-entry manifest:media-type="image/png" manifest:full-path="Pictures/1000000000000156000000777A87234D.png"/>
  <manifest:file-entry manifest:media-type="image/png" manifest:full-path="Pictures/100000000000018F0000004B88033294.png"/>
  <manifest:file-entry manifest:media-type="image/png" manifest:full-path="Pictures/10000000000000AC000000A6A2F551A2.png"/>
  <manifest:file-entry manifest:media-type="image/png" manifest:full-path="Pictures/100000000000017800000055F595ABF9.png"/>
  <manifest:file-entry manifest:media-type="image/png" manifest:full-path="Pictures/10000000000000AC000000849226E70F.png"/>
  <manifest:file-entry manifest:media-type="image/png" manifest:full-path="Pictures/10000000000000CA0000004BE20CA863.png"/>
  <manifest:file-entry manifest:media-type="image/png" manifest:full-path="Pictures/10000000000001060000004B76DD456D.png"/>
  <manifest:file-entry manifest:media-type="image/png" manifest:full-path="Pictures/10000000000000F900000055CA579326.png"/>
  <manifest:file-entry manifest:media-type="image/png" manifest:full-path="Pictures/10000000000001560000014324105CD4.png"/>
  <manifest:file-entry manifest:media-type="image/png" manifest:full-path="Pictures/10000000000000D200000055326C5BC3.png"/>
  <manifest:file-entry manifest:media-type="image/png" manifest:full-path="Pictures/10000000000000DB000000CD1A271F70.png"/>
  <manifest:file-entry manifest:media-type="image/png" manifest:full-path="Pictures/10000000000001AD0000004BB638D73E.png"/>
  <manifest:file-entry manifest:media-type="image/png" manifest:full-path="Pictures/100000000000030A000000C546DE1D94.png"/>
  <manifest:file-entry manifest:media-type="image/png" manifest:full-path="Pictures/100000000000014F0000009CEDFA6C02.png"/>
  <manifest:file-entry manifest:media-type="image/png" manifest:full-path="Pictures/1000000000000135000000698E514B3C.png"/>
  <manifest:file-entry manifest:media-type="image/png" manifest:full-path="Pictures/10000000000000DB000000AF271AE2FF.png"/>
  <manifest:file-entry manifest:media-type="image/png" manifest:full-path="Pictures/10000000000001420000004B525202F7.png"/>
  <manifest:file-entry manifest:media-type="image/png" manifest:full-path="Pictures/100000000000009F000000EB8A14BA85.png"/>
  <manifest:file-entry manifest:media-type="image/png" manifest:full-path="Pictures/10000000000001DE000000557404B5A9.png"/>
  <manifest:file-entry manifest:media-type="image/png" manifest:full-path="Pictures/1000000000000112000000A693B15969.png"/>
  <manifest:file-entry manifest:media-type="image/png" manifest:full-path="Pictures/10000000000000AC000000A680FBA7F6.png"/>
  <manifest:file-entry manifest:media-type="image/png" manifest:full-path="Pictures/10000000000001AD00000087E5252AB9.png"/>
  <manifest:file-entry manifest:media-type="image/png" manifest:full-path="Pictures/10000000000001560000005500DC9585.png"/>
  <manifest:file-entry manifest:media-type="image/png" manifest:full-path="Pictures/10000000000000DB0000004B6B9236A4.png"/>
  <manifest:file-entry manifest:media-type="image/png" manifest:full-path="Pictures/10000000000003B30000007886A5752B.png"/>
  <manifest:file-entry manifest:media-type="image/png" manifest:full-path="Pictures/10000000000003F70000021C685D3F7C.png"/>
  <manifest:file-entry manifest:media-type="image/png" manifest:full-path="Pictures/10000000000000AC00000055919540D9.png"/>
  <manifest:file-entry manifest:media-type="image/png" manifest:full-path="Pictures/10000000000000DB000000AF1AEF6230.png"/>
  <manifest:file-entry manifest:media-type="image/png" manifest:full-path="Pictures/10000000000001710000004B1101EB13.png"/>
  <manifest:file-entry manifest:media-type="image/png" manifest:full-path="Pictures/10000000000004C300000150EB54EE5C.png"/>
  <manifest:file-entry manifest:media-type="image/png" manifest:full-path="Pictures/10000000000001BC0000005559EEB8A5.png"/>
  <manifest:file-entry manifest:media-type="image/png" manifest:full-path="Pictures/100000000000020700000069BC2A6268.png"/>
  <manifest:file-entry manifest:media-type="image/png" manifest:full-path="Pictures/10000000000002450000018F25A869AE.png"/>
  <manifest:file-entry manifest:media-type="image/png" manifest:full-path="Pictures/100000000000043B000001BAF6D56643.png"/>
  <manifest:file-entry manifest:media-type="image/png" manifest:full-path="Pictures/10000000000000CE0000010C823042AB.png"/>
  <manifest:file-entry manifest:media-type="image/png" manifest:full-path="Pictures/10000000000000F0000000558F75C738.png"/>
  <manifest:file-entry manifest:media-type="image/png" manifest:full-path="Pictures/10000000000001D10000006F6E8142FB.png"/>
  <manifest:file-entry manifest:media-type="image/png" manifest:full-path="Pictures/10000000000001DE0000007777BC1C51.png"/>
  <manifest:file-entry manifest:media-type="image/png" manifest:full-path="Pictures/10000000000000AC000000C8E04E1013.png"/>
  <manifest:file-entry manifest:media-type="image/png" manifest:full-path="Pictures/1000000000000112000000C820785077.png"/>
  <manifest:file-entry manifest:media-type="image/png" manifest:full-path="Pictures/10000000000000E80000004B303591AB.png"/>
  <manifest:file-entry manifest:media-type="image/png" manifest:full-path="Pictures/10000000000000CE00000150FC776D7A.png"/>
  <manifest:file-entry manifest:media-type="image/png" manifest:full-path="Pictures/10000000000001AD0000004B306E753A.png"/>
  <manifest:file-entry manifest:media-type="image/png" manifest:full-path="Pictures/10000000000000CE000000EA5E427DA7.png"/>
  <manifest:file-entry manifest:media-type="image/png" manifest:full-path="Pictures/10000000000000AC000000842C10F87F.png"/>
  <manifest:file-entry manifest:media-type="image/png" manifest:full-path="Pictures/100000000000019A000000C89A3B50C2.png"/>
  <manifest:file-entry manifest:media-type="image/png" manifest:full-path="Pictures/10000000000001710000008A82D0411A.png"/>
  <manifest:file-entry manifest:media-type="image/png" manifest:full-path="Pictures/100000000000008100000073A449C45B.png"/>
  <manifest:file-entry manifest:media-type="image/png" manifest:full-path="Pictures/10000000000000CE0000005555310D79.png"/>
  <manifest:file-entry manifest:media-type="image/png" manifest:full-path="Pictures/10000000000003390000010992A9D9B7.png"/>
  <manifest:file-entry manifest:media-type="image/png" manifest:full-path="Pictures/10000000000000CE000000A6D5B6F9FD.png"/>
  <manifest:file-entry manifest:media-type="image/png" manifest:full-path="Pictures/10000000000001AD00000087E1A21209.png"/>
  <manifest:file-entry manifest:media-type="image/png" manifest:full-path="Pictures/10000000000000A400000031A7A8C953.png"/>
  <manifest:file-entry manifest:media-type="image/png" manifest:full-path="Pictures/10000000000002D6000000F92D745B9A.png"/>
  <manifest:file-entry manifest:media-type="image/png" manifest:full-path="Pictures/100000000000008A000000999067DF01.png"/>
  <manifest:file-entry manifest:media-type="image/png" manifest:full-path="Pictures/100000000000009F000000CDDD347162.png"/>
  <manifest:file-entry manifest:media-type="image/png" manifest:full-path="Pictures/10000000000000BD00000109EB30A564.png"/>
  <manifest:file-entry manifest:media-type="image/png" manifest:full-path="Pictures/100000000000026000000067DDD434ED.png"/>
  <manifest:file-entry manifest:media-type="image/png" manifest:full-path="Pictures/10000000000003040000018989C596AA.png"/>
  <manifest:file-entry manifest:media-type="image/png" manifest:full-path="Pictures/10000000000000DB0000004BA1D74E86.png"/>
  <manifest:file-entry manifest:media-type="image/png" manifest:full-path="Pictures/10000000000001120000008426B07E96.png"/>
  <manifest:file-entry manifest:media-type="image/png" manifest:full-path="Pictures/100000000000019A00000077C58E8F4A.png"/>
  <manifest:file-entry manifest:media-type="image/png" manifest:full-path="Pictures/100000000000032B0000015047C7D90E.png"/>
  <manifest:file-entry manifest:media-type="image/png" manifest:full-path="Pictures/100000000000015600000055767DE41F.png"/>
  <manifest:file-entry manifest:media-type="image/png" manifest:full-path="Pictures/10000000000001AD00000069CBDAB9E1.png"/>
  <manifest:file-entry manifest:media-type="image/png" manifest:full-path="Pictures/10000000000000BD00000069D070E5BD.png"/>
  <manifest:file-entry manifest:media-type="image/png" manifest:full-path="Pictures/10000000000000CE000000EA89835D48.png"/>
  <manifest:file-entry manifest:media-type="image/png" manifest:full-path="Pictures/100000000000011200000077FAB485F5.png"/>
  <manifest:file-entry manifest:media-type="image/png" manifest:full-path="Pictures/10000000000000BD00000127EE2F0BBF.png"/>
  <manifest:file-entry manifest:media-type="image/png" manifest:full-path="Pictures/100000000000021A000000CBE056F602.png"/>
  <manifest:file-entry manifest:media-type="image/png" manifest:full-path="Pictures/100000000000011700000087B810844A.png"/>
  <manifest:file-entry manifest:media-type="image/png" manifest:full-path="Pictures/10000000000000D4000000697912B531.png"/>
  <manifest:file-entry manifest:media-type="image/png" manifest:full-path="Pictures/1000000000000156000000555D155473.png"/>
  <manifest:file-entry manifest:media-type="image/png" manifest:full-path="Pictures/100000000000048F00000156E2A5C0D1.png"/>
  <manifest:file-entry manifest:media-type="image/png" manifest:full-path="Pictures/10000000000001080000008035F37D22.png"/>
  <manifest:file-entry manifest:media-type="image/png" manifest:full-path="Pictures/10000000000000F20000004B426DB2C5.png"/>
  <manifest:file-entry manifest:media-type="image/png" manifest:full-path="Pictures/100000000000019A000000553EEC73AE.png"/>
  <manifest:file-entry manifest:media-type="image/png" manifest:full-path="Pictures/100000000000036F0000017221319F31.png"/>
  <manifest:file-entry manifest:media-type="image/png" manifest:full-path="Pictures/10000000000000BD0000004B957390A6.png"/>
  <manifest:file-entry manifest:media-type="image/png" manifest:full-path="Pictures/1000000000000112000000990BA29508.png"/>
  <manifest:file-entry manifest:media-type="image/png" manifest:full-path="Pictures/10000000000001AE0000007FE6D1F7D1.png"/>
  <manifest:file-entry manifest:media-type="image/png" manifest:full-path="Pictures/10000000000000F0000000997833D160.png"/>
  <manifest:file-entry manifest:media-type="image/png" manifest:full-path="Pictures/1000000000000404000000FD6B8FB6C2.png"/>
  <manifest:file-entry manifest:media-type="image/png" manifest:full-path="Pictures/10000000000002AC000000E9CBCDDC16.png"/>
  <manifest:file-entry manifest:media-type="image/png" manifest:full-path="Pictures/100000000000006F000000A29C7EAB16.png"/>
  <manifest:file-entry manifest:media-type="image/png" manifest:full-path="Pictures/10000000000002CC0000013829E74D4A.png"/>
  <manifest:file-entry manifest:media-type="image/png" manifest:full-path="Pictures/10000000000000AC0000005599DCB18F.png"/>
  <manifest:file-entry manifest:media-type="image/png" manifest:full-path="Pictures/10000000000000AC00000055C21CD1DF.png"/>
  <manifest:file-entry manifest:media-type="image/png" manifest:full-path="Pictures/10000000000000AC00000150E7828D1A.png"/>
  <manifest:file-entry manifest:media-type="image/png" manifest:full-path="Pictures/10000000000000CE000000556003E833.png"/>
  <manifest:file-entry manifest:media-type="image/png" manifest:full-path="Pictures/10000000000000BD000000AF061016C5.png"/>
  <manifest:file-entry manifest:media-type="image/png" manifest:full-path="Pictures/10000000000001EE0000010A72ED4C35.png"/>
  <manifest:file-entry manifest:media-type="image/png" manifest:full-path="Pictures/1000000000000112000001875AEEC002.png"/>
  <manifest:file-entry manifest:media-type="image/png" manifest:full-path="Pictures/10000000000001350000004BC20211A6.png"/>
  <manifest:file-entry manifest:media-type="image/png" manifest:full-path="Pictures/1000000000000112000000996C6C258E.png"/>
  <manifest:file-entry manifest:media-type="image/png" manifest:full-path="Pictures/10000000000000AC0000010C6F87760E.png"/>
  <manifest:file-entry manifest:media-type="image/png" manifest:full-path="Pictures/10000000000000CE000000A6C56D4649.png"/>
  <manifest:file-entry manifest:media-type="image/png" manifest:full-path="Pictures/100000000000011700000087591522CC.png"/>
  <manifest:file-entry manifest:media-type="image/png" manifest:full-path="Pictures/10000000000003B6000001F41AC5FDB2.png"/>
  <manifest:file-entry manifest:media-type="image/png" manifest:full-path="Pictures/10000000000000F90000008763C94FCE.png"/>
  <manifest:file-entry manifest:media-type="image/png" manifest:full-path="Pictures/1000000000000117000000697ED0B366.png"/>
  <manifest:file-entry manifest:media-type="image/png" manifest:full-path="Pictures/10000000000001D9000000BC793664E2.png"/>
  <manifest:file-entry manifest:media-type="image/png" manifest:full-path="Pictures/10000000000000BD000000EB796DA5A3.png"/>
  <manifest:file-entry manifest:media-type="image/png" manifest:full-path="Pictures/10000000000000CE00000084A207AB63.png"/>
  <manifest:file-entry manifest:media-type="image/png" manifest:full-path="Pictures/10000000000001780000007774385AB9.png"/>
  <manifest:file-entry manifest:media-type="image/png" manifest:full-path="Pictures/100000000000013500000069432143A6.png"/>
  <manifest:file-entry manifest:media-type="image/png" manifest:full-path="Pictures/100000000000011200000099D81DA8B6.png"/>
  <manifest:file-entry manifest:media-type="image/png" manifest:full-path="Pictures/10000000000001170000004B30B6B040.png"/>
  <manifest:file-entry manifest:media-type="image/png" manifest:full-path="Pictures/100000000000017800000055590B5D00.png"/>
  <manifest:file-entry manifest:media-type="image/png" manifest:full-path="Pictures/10000000000001A10000011E7F03639C.png"/>
  <manifest:file-entry manifest:media-type="image/png" manifest:full-path="Pictures/100000000000015300000069BB7FFC73.png"/>
  <manifest:file-entry manifest:media-type="image/png" manifest:full-path="Pictures/100000000000029C000000CA6F72BE09.png"/>
  <manifest:file-entry manifest:media-type="image/png" manifest:full-path="Pictures/1000000000000112000000BBB7D20AFB.png"/>
  <manifest:file-entry manifest:media-type="image/png" manifest:full-path="Pictures/10000000000002DD0000012B0E252388.png"/>
  <manifest:file-entry manifest:media-type="image/png" manifest:full-path="Pictures/100000000000029B000001815997981A.png"/>
  <manifest:file-entry manifest:media-type="image/png" manifest:full-path="Pictures/100000000000011200000055D9988034.png"/>
  <manifest:file-entry manifest:media-type="image/png" manifest:full-path="Pictures/10000000000000AC000000A644C28F3E.png"/>
  <manifest:file-entry manifest:media-type="image/png" manifest:full-path="Pictures/10000000000001340000005559DDD380.png"/>
  <manifest:file-entry manifest:media-type="image/png" manifest:full-path="Pictures/10000000000000BD0000004B644EC334.png"/>
  <manifest:file-entry manifest:media-type="image/png" manifest:full-path="Pictures/10000000000002C80000012BC57AB450.png"/>
  <manifest:file-entry manifest:media-type="image/png" manifest:full-path="Pictures/10000000000000E80000004BFB7A3760.png"/>
  <manifest:file-entry manifest:media-type="image/png" manifest:full-path="Pictures/100000000000011200000077B9CF2C5C.png"/>
  <manifest:file-entry manifest:media-type="image/png" manifest:full-path="Pictures/10000000000001710000004B1DF17AC6.png"/>
  <manifest:file-entry manifest:media-type="image/png" manifest:full-path="Pictures/10000000000000CE000000A6398FB9DC.png"/>
  <manifest:file-entry manifest:media-type="image/png" manifest:full-path="Pictures/10000000000002970000004D3731414C.png"/>
  <manifest:file-entry manifest:media-type="image/png" manifest:full-path="Pictures/10000000000000BD000000AF2EEE478C.png"/>
  <manifest:file-entry manifest:media-type="image/png" manifest:full-path="Pictures/10000000000001710000004BF7E90938.png"/>
  <manifest:file-entry manifest:media-type="image/png" manifest:full-path="Pictures/10000000000000CE000000771B8C3274.png"/>
  <manifest:file-entry manifest:media-type="image/png" manifest:full-path="Pictures/10000000000002E7000000EBCD6375D8.png"/>
  <manifest:file-entry manifest:media-type="image/png" manifest:full-path="Pictures/10000000000000F90000004B69237409.png"/>
  <manifest:file-entry manifest:media-type="image/png" manifest:full-path="Pictures/100000000000015300000069C7EC64D3.png"/>
  <manifest:file-entry manifest:media-type="image/png" manifest:full-path="Pictures/1000000000000452000001EDF45A922B.png"/>
  <manifest:file-entry manifest:media-type="image/png" manifest:full-path="Pictures/10000000000000CE0000005564D14BE4.png"/>
  <manifest:file-entry manifest:media-type="image/png" manifest:full-path="Pictures/1000000000000112000000C8CEA838DB.png"/>
  <manifest:file-entry manifest:media-type="image/png" manifest:full-path="Pictures/10000000000000BD000000919C43992A.png"/>
  <manifest:file-entry manifest:media-type="image/png" manifest:full-path="Pictures/10000000000000CE000000847B8082B2.png"/>
  <manifest:file-entry manifest:media-type="image/png" manifest:full-path="Pictures/10000000000000F0000000C8E80E7EE5.png"/>
  <manifest:file-entry manifest:media-type="image/png" manifest:full-path="Pictures/10000000000000BD0000004B72567121.png"/>
  <manifest:file-entry manifest:media-type="image/png" manifest:full-path="Pictures/10000000000000F2000000697D657483.png"/>
  <manifest:file-entry manifest:media-type="image/png" manifest:full-path="Pictures/100000000000018F000000A528C3C881.png"/>
  <manifest:file-entry manifest:media-type="image/png" manifest:full-path="Pictures/100000000000013400000077F2AF2F3D.png"/>
  <manifest:file-entry manifest:media-type="image/png" manifest:full-path="Pictures/1000000000000286000000916F2D39A2.png"/>
  <manifest:file-entry manifest:media-type="image/png" manifest:full-path="Pictures/10000000000001340000010C9C4064D5.png"/>
  <manifest:file-entry manifest:media-type="image/png" manifest:full-path="Pictures/10000000000000CE00000055F16F3122.png"/>
  <manifest:file-entry manifest:media-type="image/png" manifest:full-path="Pictures/10000000000000F00000010C320ECBAA.png"/>
  <manifest:file-entry manifest:media-type="image/png" manifest:full-path="Pictures/1000000000000134000000555DC448BD.png"/>
  <manifest:file-entry manifest:media-type="image/png" manifest:full-path="Pictures/10000000000001080000004B882B2D61.png"/>
  <manifest:file-entry manifest:media-type="image/png" manifest:full-path="Pictures/10000000000000E80000004BB12BC871.png"/>
  <manifest:file-entry manifest:media-type="image/png" manifest:full-path="Pictures/100000000000015600000077E6566A09.png"/>
  <manifest:file-entry manifest:media-type="image/png" manifest:full-path="Pictures/10000000000000F9000000CD3B1B35D9.png"/>
  <manifest:file-entry manifest:media-type="image/png" manifest:full-path="Pictures/10000000000000F9000000CD83EBEDA9.png"/>
  <manifest:file-entry manifest:media-type="image/png" manifest:full-path="Pictures/10000000000000BD00000091B378DA83.png"/>
  <manifest:file-entry manifest:media-type="image/png" manifest:full-path="Pictures/100000000000019A000000558B1C00B8.png"/>
  <manifest:file-entry manifest:media-type="image/png" manifest:full-path="Pictures/10000000000000DB00000127FAC3C91D.png"/>
  <manifest:file-entry manifest:media-type="image/png" manifest:full-path="Pictures/1000000000000153000000A54817C519.png"/>
  <manifest:file-entry manifest:media-type="image/png" manifest:full-path="Pictures/100000000000018F0000004B21F6D762.png"/>
  <manifest:file-entry manifest:media-type="image/png" manifest:full-path="Pictures/10000000000001170000004B57C492F9.png"/>
  <manifest:file-entry manifest:media-type="image/png" manifest:full-path="Pictures/100000000000016A000000874176E321.png"/>
  <manifest:file-entry manifest:media-type="image/png" manifest:full-path="Pictures/10000000000000AC000000AF2235F3AD.png"/>
  <manifest:file-entry manifest:media-type="image/png" manifest:full-path="Pictures/10000000000000AC000000EAA0684FB4.png"/>
  <manifest:file-entry manifest:media-type="image/png" manifest:full-path="Pictures/10000000000000BD0000006989192CEB.png"/>
  <manifest:file-entry manifest:media-type="image/png" manifest:full-path="Pictures/100000000000043B0000010D214F5071.png"/>
  <manifest:file-entry manifest:media-type="image/png" manifest:full-path="Pictures/10000000000001710000004B076F9D1D.png"/>
  <manifest:file-entry manifest:media-type="image/png" manifest:full-path="Pictures/1000000000000112000000FF68E8671D.png"/>
  <manifest:file-entry manifest:media-type="image/png" manifest:full-path="Pictures/1000000000000112000000FFD19834AD.png"/>
  <manifest:file-entry manifest:media-type="image/png" manifest:full-path="Pictures/10000000000000AC000000C869322E02.png"/>
  <manifest:file-entry manifest:media-type="image/png" manifest:full-path="Pictures/1000000000000178000000550124726F.png"/>
  <manifest:file-entry manifest:media-type="image/png" manifest:full-path="Pictures/10000000000000DB000000AFF2800E17.png"/>
  <manifest:file-entry manifest:media-type="image/png" manifest:full-path="Pictures/10000000000000DB000000AFA6D4B6F8.png"/>
  <manifest:file-entry manifest:media-type="image/png" manifest:full-path="Pictures/10000000000000CE00000055DD9CC6D2.png"/>
  <manifest:file-entry manifest:media-type="image/png" manifest:full-path="Pictures/10000000000000AC000000A6B840952F.png"/>
  <manifest:file-entry manifest:media-type="image/png" manifest:full-path="Pictures/10000000000001530000004BB276BEA9.png"/>
  <manifest:file-entry manifest:media-type="image/png" manifest:full-path="Pictures/10000000000001AD00000087C18C3A39.png"/>
  <manifest:file-entry manifest:media-type="image/png" manifest:full-path="Pictures/10000000000002D000000138926B238E.png"/>
  <manifest:file-entry manifest:media-type="image/png" manifest:full-path="Pictures/10000000000000F0000000DDF8D79628.png"/>
  <manifest:file-entry manifest:media-type="image/png" manifest:full-path="Pictures/100000000000013400000055AE5B01E9.png"/>
  <manifest:file-entry manifest:media-type="image/png" manifest:full-path="Pictures/1000000000000456000001F5E08E162B.png"/>
  <manifest:file-entry manifest:media-type="image/png" manifest:full-path="Pictures/100000000000030C00000192B06D045D.png"/>
  <manifest:file-entry manifest:media-type="image/png" manifest:full-path="Pictures/100000000000013500000069D218990B.png"/>
  <manifest:file-entry manifest:media-type="image/png" manifest:full-path="Pictures/100000000000034D0000012F68684C42.png"/>
  <manifest:file-entry manifest:media-type="image/png" manifest:full-path="Pictures/10000000000000F0000000558127FD0E.png"/>
  <manifest:file-entry manifest:media-type="image/png" manifest:full-path="Pictures/10000000000002A9000000F3E79E9B74.png"/>
  <manifest:file-entry manifest:media-type="image/png" manifest:full-path="Pictures/10000000000003E5000001C3B8829BB6.png"/>
  <manifest:file-entry manifest:media-type="image/png" manifest:full-path="Pictures/10000000000001530000004BA0B36DD1.png"/>
  <manifest:file-entry manifest:media-type="image/png" manifest:full-path="Pictures/100000000000043B0000010DC14622CE.png"/>
  <manifest:file-entry manifest:media-type="image/png" manifest:full-path="Pictures/1000000000000419000001DD17B7B257.png"/>
  <manifest:file-entry manifest:media-type="image/png" manifest:full-path="Pictures/100000000000018F0000004B96DCA2C6.png"/>
  <manifest:file-entry manifest:media-type="image/png" manifest:full-path="Pictures/100000000000039B00000085EAD6E83B.png"/>
  <manifest:file-entry manifest:media-type="image/png" manifest:full-path="Pictures/10000000000001E900000087F30A52BB.png"/>
  <manifest:file-entry manifest:media-type="image/png" manifest:full-path="Pictures/10000000000001390000003C7CA263B4.png"/>
  <manifest:file-entry manifest:media-type="image/png" manifest:full-path="Pictures/10000000000001170000004B6A2FA867.png"/>
  <manifest:file-entry manifest:media-type="image/png" manifest:full-path="Pictures/100000000000010C0000010A2FE17E7C.png"/>
  <manifest:file-entry manifest:media-type="image/png" manifest:full-path="Pictures/10000000000000AC00000055C0F872C7.png"/>
  <manifest:file-entry manifest:media-type="image/png" manifest:full-path="Pictures/1000000000000117000000CD9AB8CE87.png"/>
  <manifest:file-entry manifest:media-type="image/png" manifest:full-path="Pictures/10000000000000F9000000CDD2E30EEF.png"/>
  <manifest:file-entry manifest:media-type="image/png" manifest:full-path="Pictures/10000000000000AC000000A6121EB97D.png"/>
  <manifest:file-entry manifest:media-type="image/png" manifest:full-path="Pictures/10000000000001530000004B0E0700DB.png"/>
  <manifest:file-entry manifest:media-type="image/png" manifest:full-path="Pictures/10000000000001170000004B59ABAFAF.png"/>
  <manifest:file-entry manifest:media-type="image/png" manifest:full-path="Pictures/10000000000000BD000000694E970513.png"/>
  <manifest:file-entry manifest:media-type="image/png" manifest:full-path="Pictures/10000000000001E9000000695080E342.png"/>
  <manifest:file-entry manifest:media-type="image/png" manifest:full-path="Pictures/100000000000049B00000147BEEECF7B.png"/>
  <manifest:file-entry manifest:media-type="image/png" manifest:full-path="Pictures/1000000000000112000000EA5595A5E4.png"/>
  <manifest:file-entry manifest:media-type="image/png" manifest:full-path="Pictures/1000000000000171000000A5A0FBD925.png"/>
  <manifest:file-entry manifest:media-type="image/png" manifest:full-path="Pictures/10000000000000AC00000055FA2996C0.png"/>
  <manifest:file-entry manifest:media-type="image/png" manifest:full-path="Pictures/10000000000001530000004BE9E443D2.png"/>
  <manifest:file-entry manifest:media-type="image/png" manifest:full-path="Pictures/10000000000000AC0000008416BD044A.png"/>
  <manifest:file-entry manifest:media-type="image/png" manifest:full-path="Pictures/10000000000000AC00000084EFADF0FA.png"/>
  <manifest:file-entry manifest:media-type="image/png" manifest:full-path="Pictures/10000000000000F00000007777DC1125.png"/>
  <manifest:file-entry manifest:media-type="image/png" manifest:full-path="Pictures/10000000000002D4000002231CFA4ECF.png"/>
  <manifest:file-entry manifest:media-type="image/png" manifest:full-path="Pictures/10000000000000CE000000C8AE2D2EA1.png"/>
  <manifest:file-entry manifest:media-type="image/png" manifest:full-path="Pictures/10000000000000AC00000071DA8A4843.png"/>
  <manifest:file-entry manifest:media-type="image/png" manifest:full-path="Pictures/100000000000008A000000C809A9B775.png"/>
  <manifest:file-entry manifest:media-type="image/png" manifest:full-path="Pictures/100000000000020000000055A61AE4B1.png"/>
  <manifest:file-entry manifest:media-type="image/png" manifest:full-path="Pictures/100000000000011200000055E2002E5E.png"/>
  <manifest:file-entry manifest:media-type="image/png" manifest:full-path="Pictures/100000000000017800000077E24E5BB8.png"/>
  <manifest:file-entry manifest:media-type="image/png" manifest:full-path="Pictures/10000000000002C10000006625781225.png"/>
  <manifest:file-entry manifest:media-type="image/png" manifest:full-path="Pictures/1000000000000081000000731A89C368.png"/>
  <manifest:file-entry manifest:media-type="image/png" manifest:full-path="Pictures/10000000000001710000004BB6AEEF76.png"/>
  <manifest:file-entry manifest:media-type="image/png" manifest:full-path="Pictures/10000000000000F90000004B7B3C8EB0.png"/>
  <manifest:file-entry manifest:media-type="image/png" manifest:full-path="Pictures/10000000000000AC00000055753EEDAC.png"/>
  <manifest:file-entry manifest:media-type="image/png" manifest:full-path="Pictures/10000000000000F0000000FF27105534.png"/>
  <manifest:file-entry manifest:media-type="image/png" manifest:full-path="Pictures/10000000000001780000005586B3E068.png"/>
  <manifest:file-entry manifest:media-type="image/png" manifest:full-path="Pictures/100000000000011700000069037AE6EF.png"/>
  <manifest:file-entry manifest:media-type="image/png" manifest:full-path="Pictures/10000000000000F90000010956F1FAA3.png"/>
  <manifest:file-entry manifest:media-type="image/png" manifest:full-path="Pictures/10000000000000F900000087F3E7FF4A.png"/>
  <manifest:file-entry manifest:media-type="image/png" manifest:full-path="Pictures/10000000000000F900000069B13991B5.png"/>
  <manifest:file-entry manifest:media-type="image/png" manifest:full-path="Pictures/100000000000015600000055F63448A8.png"/>
  <manifest:file-entry manifest:media-type="image/png" manifest:full-path="Pictures/10000000000001350000006932DBCE2F.png"/>
  <manifest:file-entry manifest:media-type="image/png" manifest:full-path="Pictures/100000000000018F0000004BBB5AA8F7.png"/>
  <manifest:file-entry manifest:media-type="image/png" manifest:full-path="Pictures/100000000000015300000087B6D18086.png"/>
  <manifest:file-entry manifest:media-type="image/png" manifest:full-path="Pictures/1000000000000156000000554BC81FE9.png"/>
  <manifest:file-entry manifest:media-type="image/png" manifest:full-path="Pictures/10000000000001170000004BD297ADBD.png"/>
  <manifest:file-entry manifest:media-type="image/png" manifest:full-path="Pictures/10000000000001100000004B82CDD7C2.png"/>
  <manifest:file-entry manifest:media-type="image/png" manifest:full-path="Pictures/100000000000011700000069E5B6B284.png"/>
  <manifest:file-entry manifest:media-type="image/png" manifest:full-path="Pictures/1000000000000323000000E9507C516F.png"/>
  <manifest:file-entry manifest:media-type="image/png" manifest:full-path="Pictures/10000000000000CE00000055459FC0E5.png"/>
  <manifest:file-entry manifest:media-type="image/png" manifest:full-path="Pictures/10000000000001150000004B547EEC88.png"/>
  <manifest:file-entry manifest:media-type="image/png" manifest:full-path="Pictures/10000000000001530000004B6F217B9B.png"/>
  <manifest:file-entry manifest:media-type="image/png" manifest:full-path="Pictures/100000000000012E0000004BCA441158.png"/>
  <manifest:file-entry manifest:media-type="image/png" manifest:full-path="Pictures/10000000000000AC0000010C06D23609.png"/>
  <manifest:file-entry manifest:media-type="image/png" manifest:full-path="Pictures/10000000000001DE00000099D3EB4E1C.png"/>
  <manifest:file-entry manifest:media-type="image/png" manifest:full-path="Pictures/100000000000015600000055E57D3FCD.png"/>
  <manifest:file-entry manifest:media-type="image/png" manifest:full-path="Pictures/100000000000011700000091C54F8002.png"/>
  <manifest:file-entry manifest:media-type="image/png" manifest:full-path="Pictures/1000000000000171000000692A78CAA3.png"/>
  <manifest:file-entry manifest:media-type="image/png" manifest:full-path="Pictures/10000000000000AC000000C8400BC969.png"/>
  <manifest:file-entry manifest:media-type="image/png" manifest:full-path="Pictures/10000000000000BD00000073409BB70D.png"/>
  <manifest:file-entry manifest:media-type="image/png" manifest:full-path="Pictures/10000000000001E90000004BCD8DC171.png"/>
  <manifest:file-entry manifest:media-type="image/png" manifest:full-path="Pictures/10000000000000AC000000A61FC4E3D2.png"/>
  <manifest:file-entry manifest:media-type="image/png" manifest:full-path="Pictures/10000000000000F0000000A6812CBE1D.png"/>
  <manifest:file-entry manifest:media-type="image/png" manifest:full-path="Pictures/10000000000000AC0000004BD8BA5DD3.png"/>
  <manifest:file-entry manifest:media-type="image/png" manifest:full-path="Pictures/10000000000000AC000001501AC14DDF.png"/>
  <manifest:file-entry manifest:media-type="image/png" manifest:full-path="Pictures/10000000000001BC000000714BBFF89E.png"/>
  <manifest:file-entry manifest:media-type="image/png" manifest:full-path="Pictures/10000000000000AC000000772AFE0408.png"/>
  <manifest:file-entry manifest:media-type="image/png" manifest:full-path="Pictures/100000000000009F0000004B962FDC81.png"/>
  <manifest:file-entry manifest:media-type="image/png" manifest:full-path="Pictures/10000000000000AC000000EA5438B0E7.png"/>
  <manifest:file-entry manifest:media-type="image/png" manifest:full-path="Pictures/1000000000000200000000BBD245CAE7.png"/>
  <manifest:file-entry manifest:media-type="image/png" manifest:full-path="Pictures/10000000000000AC000000C8FB82DB55.png"/>
  <manifest:file-entry manifest:media-type="image/png" manifest:full-path="Pictures/10000000000000DB000000AFA2E8CE14.png"/>
  <manifest:file-entry manifest:media-type="image/png" manifest:full-path="Pictures/10000000000000CA0000002D9FA47923.png"/>
  <manifest:file-entry manifest:media-type="image/png" manifest:full-path="Pictures/10000000000003D100000142215AF8DA.png"/>
  <manifest:file-entry manifest:media-type="image/png" manifest:full-path="Pictures/10000000000001AD0000006921359A14.png"/>
  <manifest:file-entry manifest:media-type="image/png" manifest:full-path="Pictures/10000000000000BD0000004B14C72CAE.png"/>
  <manifest:file-entry manifest:media-type="image/png" manifest:full-path="Pictures/10000000000002D80000014850FDB20C.png"/>
  <manifest:file-entry manifest:media-type="image/png" manifest:full-path="Pictures/1000000000000178000000DDB59A5580.png"/>
  <manifest:file-entry manifest:media-type="image/png" manifest:full-path="Pictures/1000000000000153000000879BEBA3BC.png"/>
  <manifest:file-entry manifest:media-type="image/png" manifest:full-path="Pictures/100000000000007F00000060C077AB05.png"/>
  <manifest:file-entry manifest:media-type="image/png" manifest:full-path="Pictures/1000000000000225000000691580ACDC.png"/>
  <manifest:file-entry manifest:media-type="image/png" manifest:full-path="Pictures/10000000000001170000014511C380CE.png"/>
  <manifest:file-entry manifest:media-type="image/png" manifest:full-path="Pictures/10000000000000F9000000AFD41AB5F8.png"/>
  <manifest:file-entry manifest:media-type="image/png" manifest:full-path="Pictures/10000000000000CE00000077B33127DD.png"/>
  <manifest:file-entry manifest:media-type="image/png" manifest:full-path="Pictures/1000000000000309000000CFA00A0588.png"/>
  <manifest:file-entry manifest:media-type="image/png" manifest:full-path="Pictures/100000000000013400000077B4EDA888.png"/>
  <manifest:file-entry manifest:media-type="image/png" manifest:full-path="Pictures/10000000000001BC00000055534082D0.png"/>
  <manifest:file-entry manifest:media-type="image/png" manifest:full-path="Pictures/10000000000003A800000165B33E5B46.png"/>
  <manifest:file-entry manifest:media-type="image/png" manifest:full-path="Pictures/10000000000001120000009949531E17.png"/>
  <manifest:file-entry manifest:media-type="image/png" manifest:full-path="Pictures/1000000000000117000001636CF94EFC.png"/>
  <manifest:file-entry manifest:media-type="image/png" manifest:full-path="Pictures/1000000000000104000000299BAC7A84.png"/>
  <manifest:file-entry manifest:media-type="image/png" manifest:full-path="Pictures/100000000000019A00000099E1D92EC9.png"/>
  <manifest:file-entry manifest:media-type="image/png" manifest:full-path="Pictures/10000000000000F90000006921776C3F.png"/>
  <manifest:file-entry manifest:media-type="image/png" manifest:full-path="Pictures/1000000000000529000001972BD28FA2.png"/>
  <manifest:file-entry manifest:media-type="image/png" manifest:full-path="Pictures/10000000000001BC000000552A28D0FB.png"/>
  <manifest:file-entry manifest:media-type="image/png" manifest:full-path="Pictures/10000000000000F00000010C63930DF9.png"/>
  <manifest:file-entry manifest:media-type="image/png" manifest:full-path="Pictures/100000000000011200000055790D84B5.png"/>
  <manifest:file-entry manifest:media-type="image/png" manifest:full-path="Pictures/10000000000000BD0000006991F2F73D.png"/>
  <manifest:file-entry manifest:media-type="image/png" manifest:full-path="Pictures/10000000000000BD0000006950A29B1D.png"/>
  <manifest:file-entry manifest:media-type="image/png" manifest:full-path="Pictures/10000000000000BD00000181789B3A92.png"/>
  <manifest:file-entry manifest:media-type="image/png" manifest:full-path="Pictures/10000000000000BD00000071BB0F82A3.png"/>
  <manifest:file-entry manifest:media-type="image/png" manifest:full-path="Pictures/10000000000001AD00000087D131B291.png"/>
  <manifest:file-entry manifest:media-type="image/png" manifest:full-path="Pictures/10000000000001340000005569674502.png"/>
  <manifest:file-entry manifest:media-type="image/png" manifest:full-path="Pictures/10000000000000A70000001E24F60B74.png"/>
  <manifest:file-entry manifest:media-type="image/png" manifest:full-path="Pictures/10000000000000CA0000004B60446FF9.png"/>
  <manifest:file-entry manifest:media-type="image/png" manifest:full-path="Pictures/10000000000001170000004B7D8268FE.png"/>
  <manifest:file-entry manifest:media-type="image/png" manifest:full-path="Pictures/10000000000000BD0000004BE4FE7252.png"/>
  <manifest:file-entry manifest:media-type="image/png" manifest:full-path="Pictures/1000000000000330000000852F41F780.png"/>
  <manifest:file-entry manifest:media-type="image/png" manifest:full-path="Pictures/10000000000001AD000001277E21852A.png"/>
  <manifest:file-entry manifest:media-type="image/png" manifest:full-path="Pictures/10000000000000CE00000055444AFE56.png"/>
  <manifest:file-entry manifest:media-type="image/png" manifest:full-path="Pictures/1000000000000153000000873B9DB8C5.png"/>
  <manifest:file-entry manifest:media-type="image/png" manifest:full-path="Pictures/10000000000000F9000000690604D8EF.png"/>
  <manifest:file-entry manifest:media-type="image/png" manifest:full-path="Pictures/100000000000042C0000012F5B54DF61.png"/>
  <manifest:file-entry manifest:media-type="image/png" manifest:full-path="Pictures/1000000000000244000000B5787DDD96.png"/>
  <manifest:file-entry manifest:media-type="image/png" manifest:full-path="Pictures/10000000000001710000004B9FBA4FD0.png"/>
  <manifest:file-entry manifest:media-type="image/png" manifest:full-path="Pictures/10000000000000F000000055F069EDE2.png"/>
  <manifest:file-entry manifest:media-type="image/png" manifest:full-path="Pictures/10000000000000DB000000CD95ED1A4E.png"/>
  <manifest:file-entry manifest:media-type="image/png" manifest:full-path="Pictures/10000000000001DC000001405B38A5F2.png"/>
  <manifest:file-entry manifest:media-type="image/png" manifest:full-path="Pictures/10000000000000B0000000C8F7201C05.png"/>
  <manifest:file-entry manifest:media-type="image/png" manifest:full-path="Pictures/10000000000000D40000004B4CA67AA2.png"/>
  <manifest:file-entry manifest:media-type="image/png" manifest:full-path="Pictures/1000000000000112000000551E6829FB.png"/>
  <manifest:file-entry manifest:media-type="image/png" manifest:full-path="Pictures/10000000000000F0000001212C694CD3.png"/>
  <manifest:file-entry manifest:media-type="image/png" manifest:full-path="Pictures/1000000000000171000000874EEE3D15.png"/>
  <manifest:file-entry manifest:media-type="image/png" manifest:full-path="Pictures/1000000000000112000000552E78F20B.png"/>
  <manifest:file-entry manifest:media-type="image/png" manifest:full-path="Pictures/10000000000001A60000008780FB3AE2.pn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content.xml"/>
  <manifest:file-entry manifest:media-type="" manifest:full-path="Object 10/Configurations2/statusbar/"/>
  <manifest:file-entry manifest:media-type="" manifest:full-path="Object 10/Configurations2/floater/"/>
  <manifest:file-entry manifest:media-type="" manifest:full-path="Object 10/Configurations2/popupmenu/"/>
  <manifest:file-entry manifest:media-type="" manifest:full-path="Object 10/Configurations2/progressbar/"/>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11/Configurations2/statusbar/"/>
  <manifest:file-entry manifest:media-type="" manifest:full-path="Object 11/Configurations2/accelerator/current.xml"/>
  <manifest:file-entry manifest:media-type="" manifest:full-path="Object 11/Configurations2/accelerator/"/>
  <manifest:file-entry manifest:media-type="" manifest:full-path="Object 11/Configurations2/floater/"/>
  <manifest:file-entry manifest:media-type="" manifest:full-path="Object 11/Configurations2/popupmenu/"/>
  <manifest:file-entry manifest:media-type="" manifest:full-path="Object 11/Configurations2/progressbar/"/>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12/Configurations2/statusbar/"/>
  <manifest:file-entry manifest:media-type="" manifest:full-path="Object 12/Configurations2/floater/"/>
  <manifest:file-entry manifest:media-type="" manifest:full-path="Object 12/Configurations2/popupmenu/"/>
  <manifest:file-entry manifest:media-type="" manifest:full-path="Object 12/Configurations2/progressbar/"/>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 manifest:full-path="Object 13/Configurations2/statusbar/"/>
  <manifest:file-entry manifest:media-type="" manifest:full-path="Object 13/Configurations2/floater/"/>
  <manifest:file-entry manifest:media-type="" manifest:full-path="Object 13/Configurations2/popupmenu/"/>
  <manifest:file-entry manifest:media-type="" manifest:full-path="Object 13/Configurations2/progressbar/"/>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 manifest:full-path="Object 14/Configurations2/statusbar/"/>
  <manifest:file-entry manifest:media-type="" manifest:full-path="Object 14/Configurations2/floater/"/>
  <manifest:file-entry manifest:media-type="" manifest:full-path="Object 14/Configurations2/popupmenu/"/>
  <manifest:file-entry manifest:media-type="" manifest:full-path="Object 14/Configurations2/progressbar/"/>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 manifest:full-path="Object 15/Configurations2/statusbar/"/>
  <manifest:file-entry manifest:media-type="" manifest:full-path="Object 15/Configurations2/accelerator/current.xml"/>
  <manifest:file-entry manifest:media-type="" manifest:full-path="Object 15/Configurations2/accelerator/"/>
  <manifest:file-entry manifest:media-type="" manifest:full-path="Object 15/Configurations2/floater/"/>
  <manifest:file-entry manifest:media-type="" manifest:full-path="Object 15/Configurations2/popupmenu/"/>
  <manifest:file-entry manifest:media-type="" manifest:full-path="Object 15/Configurations2/progressbar/"/>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 manifest:full-path="Object 16/Configurations2/statusbar/"/>
  <manifest:file-entry manifest:media-type="" manifest:full-path="Object 16/Configurations2/floater/"/>
  <manifest:file-entry manifest:media-type="" manifest:full-path="Object 16/Configurations2/popupmenu/"/>
  <manifest:file-entry manifest:media-type="" manifest:full-path="Object 16/Configurations2/progressbar/"/>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 manifest:full-path="Object 17/Configurations2/statusbar/"/>
  <manifest:file-entry manifest:media-type="" manifest:full-path="Object 17/Configurations2/accelerator/current.xml"/>
  <manifest:file-entry manifest:media-type="" manifest:full-path="Object 17/Configurations2/accelerator/"/>
  <manifest:file-entry manifest:media-type="" manifest:full-path="Object 17/Configurations2/floater/"/>
  <manifest:file-entry manifest:media-type="" manifest:full-path="Object 17/Configurations2/popupmenu/"/>
  <manifest:file-entry manifest:media-type="" manifest:full-path="Object 17/Configurations2/progressbar/"/>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 manifest:full-path="Object 18/Configurations2/statusbar/"/>
  <manifest:file-entry manifest:media-type="" manifest:full-path="Object 18/Configurations2/accelerator/current.xml"/>
  <manifest:file-entry manifest:media-type="" manifest:full-path="Object 18/Configurations2/accelerator/"/>
  <manifest:file-entry manifest:media-type="" manifest:full-path="Object 18/Configurations2/floater/"/>
  <manifest:file-entry manifest:media-type="" manifest:full-path="Object 18/Configurations2/popupmenu/"/>
  <manifest:file-entry manifest:media-type="" manifest:full-path="Object 18/Configurations2/progressbar/"/>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 manifest:full-path="Object 19/Configurations2/statusbar/"/>
  <manifest:file-entry manifest:media-type="" manifest:full-path="Object 19/Configurations2/floater/"/>
  <manifest:file-entry manifest:media-type="" manifest:full-path="Object 19/Configurations2/popupmenu/"/>
  <manifest:file-entry manifest:media-type="" manifest:full-path="Object 19/Configurations2/progressbar/"/>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 manifest:full-path="Object 20/Configurations2/statusbar/"/>
  <manifest:file-entry manifest:media-type="" manifest:full-path="Object 20/Configurations2/floater/"/>
  <manifest:file-entry manifest:media-type="" manifest:full-path="Object 20/Configurations2/popupmenu/"/>
  <manifest:file-entry manifest:media-type="" manifest:full-path="Object 20/Configurations2/progressbar/"/>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application/vnd.sun.xml.ui.configuration" manifest:full-path="Object 20/Configurations2/"/>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 manifest:full-path="Object 21/Configurations2/statusbar/"/>
  <manifest:file-entry manifest:media-type="" manifest:full-path="Object 21/Configurations2/floater/"/>
  <manifest:file-entry manifest:media-type="" manifest:full-path="Object 21/Configurations2/popupmenu/"/>
  <manifest:file-entry manifest:media-type="" manifest:full-path="Object 21/Configurations2/progressbar/"/>
  <manifest:file-entry manifest:media-type="" manifest:full-path="Object 21/Configurations2/menubar/"/>
  <manifest:file-entry manifest:media-type="" manifest:full-path="Object 21/Configurations2/toolbar/"/>
  <manifest:file-entry manifest:media-type="" manifest:full-path="Object 21/Configurations2/images/Bitmaps/"/>
  <manifest:file-entry manifest:media-type="" manifest:full-path="Object 21/Configurations2/images/"/>
  <manifest:file-entry manifest:media-type="application/vnd.sun.xml.ui.configuration" manifest:full-path="Object 21/Configurations2/"/>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full-path="Object 1/"/>
  <manifest:file-entry manifest:media-type="" manifest:full-path="Object 2/Configurations2/statusba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statusba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statusba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6/Configurations2/statusbar/"/>
  <manifest:file-entry manifest:media-type="" manifest:full-path="Object 6/Configurations2/accelerator/current.xml"/>
  <manifest:file-entry manifest:media-type="" manifest:full-path="Object 6/Configurations2/accelerato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7/Configurations2/statusbar/"/>
  <manifest:file-entry manifest:media-type="" manifest:full-path="Object 7/Configurations2/accelerator/current.xml"/>
  <manifest:file-entry manifest:media-type="" manifest:full-path="Object 7/Configurations2/accelerator/"/>
  <manifest:file-entry manifest:media-type="" manifest:full-path="Object 7/Configurations2/floater/"/>
  <manifest:file-entry manifest:media-type="" manifest:full-path="Object 7/Configurations2/popupmenu/"/>
  <manifest:file-entry manifest:media-type="" manifest:full-path="Object 7/Configurations2/progressbar/"/>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8/Configurations2/statusbar/"/>
  <manifest:file-entry manifest:media-type="" manifest:full-path="Object 8/Configurations2/accelerator/current.xml"/>
  <manifest:file-entry manifest:media-type="" manifest:full-path="Object 8/Configurations2/accelerator/"/>
  <manifest:file-entry manifest:media-type="" manifest:full-path="Object 8/Configurations2/floater/"/>
  <manifest:file-entry manifest:media-type="" manifest:full-path="Object 8/Configurations2/popupmenu/"/>
  <manifest:file-entry manifest:media-type="" manifest:full-path="Object 8/Configurations2/progressbar/"/>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9/Configurations2/statusbar/"/>
  <manifest:file-entry manifest:media-type="" manifest:full-path="Object 9/Configurations2/floater/"/>
  <manifest:file-entry manifest:media-type="" manifest:full-path="Object 9/Configurations2/popupmenu/"/>
  <manifest:file-entry manifest:media-type="" manifest:full-path="Object 9/Configurations2/progressbar/"/>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scripts/>
  <office:font-face-decls>
    <style:font-face style:name="StarSymbol" svg:font-family="StarSymbol" style:font-charset="x-symbol"/>
    <style:font-face style:name="OpenSymbol1" svg:font-family="OpenSymbol" style:font-pitch="variable" style:font-charset="x-symbol"/>
    <style:font-face style:name="OpenSymbol" svg:font-family="OpenSymbol" style:font-adornments="Regular" style:font-pitch="variable" style:font-charset="x-symbol"/>
    <style:font-face style:name="Wingdings" svg:font-family="Wingdings" style:font-pitch="variable" style:font-charset="x-symbol"/>
    <style:font-face style:name="Wingdings1" svg:font-family="Wingdings" style:font-adornments="Roman" style:font-pitch="variable" style:font-charset="x-symbol"/>
    <style:font-face style:name="StarSymbol1" svg:font-family="StarSymbol"/>
    <style:font-face style:name="Helv" svg:font-family="Helv" style:font-family-generic="swiss"/>
    <style:font-face style:name="Courier New" svg:font-family="'Courier New'" style:font-family-generic="modern" style:font-pitch="fixed"/>
    <style:font-face style:name="Courier" svg:font-family="Courier" style:font-adornments="Regular" style:font-family-generic="roman" style:font-pitch="fixed"/>
    <style:font-face style:name="Arial Unicode MS1" svg:font-family="'Arial Unicode MS'" style:font-pitch="variable"/>
    <style:font-face style:name="HG Mincho Light J" svg:font-family="'HG Mincho Light J'" style:font-pitch="variable"/>
    <style:font-face style:name="Arial3" svg:font-family="Arial" style:font-family-generic="roman" style:font-pitch="variable"/>
    <style:font-face style:name="Bookman Old Style" svg:font-family="'Bookman Old Style'" style:font-adornments="Normale" style:font-family-generic="roman" style:font-pitch="variable"/>
    <style:font-face style:name="Thorndale" svg:font-family="Thorndale" style:font-family-generic="roman" style:font-pitch="variable"/>
    <style:font-face style:name="Times" svg:font-family="Times" style:font-adornments="Regular" style:font-family-generic="roman" style:font-pitch="variable"/>
    <style:font-face style:name="Arial2" svg:font-family="Arial" style:font-family-generic="swiss" style:font-pitch="variable"/>
    <style:font-face style:name="Arial1" svg:font-family="Arial" style:font-adornments="Normale" style:font-family-generic="swiss" style:font-pitch="variable"/>
    <style:font-face style:name="Arial" svg:font-family="Arial" style:font-adornments="Standard" style:font-family-generic="swiss" style:font-pitch="variable"/>
    <style:font-face style:name="Bitstream Vera Sans2" svg:font-family="'Bitstream Vera Sans'" style:font-family-generic="swiss" style:font-pitch="variable"/>
    <style:font-face style:name="Bitstream Vera Sans" svg:font-family="'Bitstream Vera Sans'" style:font-adornments="Fett" style:font-family-generic="swiss" style:font-pitch="variable"/>
    <style:font-face style:name="Bitstream Vera Sans1" svg:font-family="'Bitstream Vera Sans'" style:font-adornments="Roman" style:font-family-generic="swiss" style:font-pitch="variable"/>
    <style:font-face style:name="Arial Unicode MS" svg:font-family="'Arial Unicode MS'" style:font-family-generic="system" style:font-pitch="variable"/>
    <style:font-face style:name="HG Mincho Light J1" svg:font-family="'HG Mincho Light J'"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elle27" style:family="table">
      <style:table-properties style:width="15.919cm" fo:margin-left="1.087cm" fo:margin-right="-0.007cm" table:align="margins"/>
    </style:style>
    <style:style style:name="Tabelle27.A" style:family="table-column">
      <style:table-column-properties style:column-width="1.125cm" style:rel-column-width="4632*"/>
    </style:style>
    <style:style style:name="Tabelle27.B" style:family="table-column">
      <style:table-column-properties style:column-width="1.94cm" style:rel-column-width="7987*"/>
    </style:style>
    <style:style style:name="Tabelle27.C" style:family="table-column">
      <style:table-column-properties style:column-width="1.411cm" style:rel-column-width="5809*"/>
    </style:style>
    <style:style style:name="Tabelle27.D" style:family="table-column">
      <style:table-column-properties style:column-width="1.323cm" style:rel-column-width="5446*"/>
    </style:style>
    <style:style style:name="Tabelle27.E" style:family="table-column">
      <style:table-column-properties style:column-width="4.872cm" style:rel-column-width="20056*"/>
    </style:style>
    <style:style style:name="Tabelle27.F" style:family="table-column">
      <style:table-column-properties style:column-width="5.248cm" style:rel-column-width="21605*"/>
    </style:style>
    <style:style style:name="Tabelle27.A1" style:family="table-cell">
      <style:table-cell-properties fo:padding="0.097cm" fo:border-left="0.002cm solid #000000" fo:border-right="none" fo:border-top="0.002cm solid #000000" fo:border-bottom="0.002cm solid #000000"/>
    </style:style>
    <style:style style:name="Tabelle27.F1" style:family="table-cell">
      <style:table-cell-properties fo:padding="0.097cm" fo:border="0.002cm solid #000000"/>
    </style:style>
    <style:style style:name="Tabelle27.A2" style:family="table-cell">
      <style:table-cell-properties fo:padding="0.097cm" fo:border-left="0.002cm solid #000000" fo:border-right="none" fo:border-top="none" fo:border-bottom="0.002cm solid #000000"/>
    </style:style>
    <style:style style:name="Tabelle27.F2" style:family="table-cell">
      <style:table-cell-properties fo:padding="0.097cm" fo:border-left="0.002cm solid #000000" fo:border-right="0.002cm solid #000000" fo:border-top="none" fo:border-bottom="0.002cm solid #000000"/>
    </style:style>
    <style:style style:name="Tabelle41" style:family="table">
      <style:table-properties style:width="15.986cm" fo:margin-left="1.021cm" fo:margin-right="-0.009cm" table:align="margins"/>
    </style:style>
    <style:style style:name="Tabelle41.A" style:family="table-column">
      <style:table-column-properties style:column-width="1.764cm" style:rel-column-width="7231*"/>
    </style:style>
    <style:style style:name="Tabelle41.B" style:family="table-column">
      <style:table-column-properties style:column-width="14.222cm" style:rel-column-width="58304*"/>
    </style:style>
    <style:style style:name="Tabelle41.A1" style:family="table-cell">
      <style:table-cell-properties fo:padding="0.097cm" fo:border-left="0.002cm solid #000000" fo:border-right="none" fo:border-top="0.002cm solid #000000" fo:border-bottom="0.002cm solid #000000"/>
    </style:style>
    <style:style style:name="Tabelle41.B1" style:family="table-cell">
      <style:table-cell-properties fo:padding="0.097cm" fo:border="0.002cm solid #000000"/>
    </style:style>
    <style:style style:name="Tabelle41.A2" style:family="table-cell">
      <style:table-cell-properties fo:padding="0.097cm" fo:border-left="0.002cm solid #000000" fo:border-right="none" fo:border-top="none" fo:border-bottom="0.002cm solid #000000"/>
    </style:style>
    <style:style style:name="Tabelle41.B2" style:family="table-cell">
      <style:table-cell-properties fo:padding="0.097cm" fo:border-left="0.002cm solid #000000" fo:border-right="0.002cm solid #000000" fo:border-top="none" fo:border-bottom="0.002cm solid #000000"/>
    </style:style>
    <style:style style:name="Tabelle45" style:family="table">
      <style:table-properties style:width="15.986cm" fo:margin-left="1.021cm" fo:margin-right="-0.009cm" table:align="margins"/>
    </style:style>
    <style:style style:name="Tabelle45.A" style:family="table-column">
      <style:table-column-properties style:column-width="1.258cm" style:rel-column-width="5155*"/>
    </style:style>
    <style:style style:name="Tabelle45.B" style:family="table-column">
      <style:table-column-properties style:column-width="14.728cm" style:rel-column-width="60380*"/>
    </style:style>
    <style:style style:name="Tabelle45.A1" style:family="table-cell">
      <style:table-cell-properties fo:padding="0.097cm" fo:border-left="0.002cm solid #000000" fo:border-right="none" fo:border-top="0.002cm solid #000000" fo:border-bottom="0.002cm solid #000000"/>
    </style:style>
    <style:style style:name="Tabelle45.B1" style:family="table-cell">
      <style:table-cell-properties fo:padding="0.097cm" fo:border="0.002cm solid #000000"/>
    </style:style>
    <style:style style:name="Tabelle45.A2" style:family="table-cell">
      <style:table-cell-properties fo:padding="0.097cm" fo:border-left="0.002cm solid #000000" fo:border-right="none" fo:border-top="none" fo:border-bottom="0.002cm solid #000000"/>
    </style:style>
    <style:style style:name="Tabelle45.B2" style:family="table-cell">
      <style:table-cell-properties fo:padding="0.097cm" fo:border-left="0.002cm solid #000000" fo:border-right="0.002cm solid #000000" fo:border-top="none" fo:border-bottom="0.002cm solid #000000"/>
    </style:style>
    <style:style style:name="Tabelle32" style:family="table">
      <style:table-properties style:width="15.963cm" fo:margin-left="1.042cm" fo:margin-right="-0.007cm" table:align="margins" style:may-break-between-rows="false"/>
    </style:style>
    <style:style style:name="Tabelle32.A" style:family="table-column">
      <style:table-column-properties style:column-width="4.63cm" style:rel-column-width="19008*"/>
    </style:style>
    <style:style style:name="Tabelle32.B" style:family="table-column">
      <style:table-column-properties style:column-width="5.667cm" style:rel-column-width="23266*"/>
    </style:style>
    <style:style style:name="Tabelle32.C" style:family="table-column">
      <style:table-column-properties style:column-width="5.666cm" style:rel-column-width="23261*"/>
    </style:style>
    <style:style style:name="Tabelle32.1" style:family="table-row">
      <style:table-row-properties style:row-height="0.7cm"/>
    </style:style>
    <style:style style:name="Tabelle32.A1" style:family="table-cell">
      <style:table-cell-properties fo:padding="0.097cm" fo:border-left="0.002cm solid #000000" fo:border-right="none" fo:border-top="0.002cm solid #000000" fo:border-bottom="0.002cm solid #000000"/>
    </style:style>
    <style:style style:name="Tabelle32.C1" style:family="table-cell">
      <style:table-cell-properties fo:padding="0.097cm" fo:border="0.002cm solid #000000"/>
    </style:style>
    <style:style style:name="Tabelle32.A2" style:family="table-cell">
      <style:table-cell-properties fo:padding="0.097cm" fo:border-left="0.002cm solid #000000" fo:border-right="none" fo:border-top="none" fo:border-bottom="0.002cm solid #000000"/>
    </style:style>
    <style:style style:name="Tabelle32.C2" style:family="table-cell">
      <style:table-cell-properties fo:padding="0.097cm" fo:border-left="0.002cm solid #000000" fo:border-right="0.002cm solid #000000" fo:border-top="none" fo:border-bottom="0.002cm solid #000000"/>
    </style:style>
    <style:style style:name="Tabelle33" style:family="table">
      <style:table-properties style:width="15.963cm" fo:margin-left="1.042cm" fo:margin-right="-0.007cm" table:align="margins" style:may-break-between-rows="false"/>
    </style:style>
    <style:style style:name="Tabelle33.A" style:family="table-column">
      <style:table-column-properties style:column-width="4.784cm" style:rel-column-width="19638*"/>
    </style:style>
    <style:style style:name="Tabelle33.B" style:family="table-column">
      <style:table-column-properties style:column-width="5.51cm" style:rel-column-width="22622*"/>
    </style:style>
    <style:style style:name="Tabelle33.C" style:family="table-column">
      <style:table-column-properties style:column-width="5.669cm" style:rel-column-width="23275*"/>
    </style:style>
    <style:style style:name="Tabelle33.1" style:family="table-row">
      <style:table-row-properties style:row-height="0.7cm"/>
    </style:style>
    <style:style style:name="Tabelle33.A1" style:family="table-cell">
      <style:table-cell-properties fo:padding="0.097cm" fo:border-left="0.002cm solid #000000" fo:border-right="none" fo:border-top="0.002cm solid #000000" fo:border-bottom="0.002cm solid #000000"/>
    </style:style>
    <style:style style:name="Tabelle33.C1" style:family="table-cell">
      <style:table-cell-properties fo:padding="0.097cm" fo:border="0.002cm solid #000000"/>
    </style:style>
    <style:style style:name="Tabelle33.A2" style:family="table-cell">
      <style:table-cell-properties fo:padding="0.097cm" fo:border-left="0.002cm solid #000000" fo:border-right="none" fo:border-top="none" fo:border-bottom="0.002cm solid #000000"/>
    </style:style>
    <style:style style:name="Tabelle33.C2" style:family="table-cell">
      <style:table-cell-properties fo:padding="0.097cm" fo:border-left="0.002cm solid #000000" fo:border-right="0.002cm solid #000000" fo:border-top="none" fo:border-bottom="0.002cm solid #000000"/>
    </style:style>
    <style:style style:name="Tabelle34" style:family="table" style:master-page-name="">
      <style:table-properties style:width="15.963cm" fo:margin-left="1.042cm" fo:margin-right="-0.007cm" style:page-number="0" fo:break-before="auto" fo:break-after="auto" table:align="margins" style:may-break-between-rows="false"/>
    </style:style>
    <style:style style:name="Tabelle34.A" style:family="table-column">
      <style:table-column-properties style:column-width="5.271cm" style:rel-column-width="21637*"/>
    </style:style>
    <style:style style:name="Tabelle34.B" style:family="table-column">
      <style:table-column-properties style:column-width="5.135cm" style:rel-column-width="21079*"/>
    </style:style>
    <style:style style:name="Tabelle34.C" style:family="table-column">
      <style:table-column-properties style:column-width="5.558cm" style:rel-column-width="22819*"/>
    </style:style>
    <style:style style:name="Tabelle34.1" style:family="table-row">
      <style:table-row-properties style:row-height="0.7cm" style:keep-together="false" fo:keep-together="always"/>
    </style:style>
    <style:style style:name="Tabelle34.A1" style:family="table-cell">
      <style:table-cell-properties fo:padding="0.097cm" fo:border-left="0.002cm solid #000000" fo:border-right="none" fo:border-top="0.002cm solid #000000" fo:border-bottom="0.002cm solid #000000" style:writing-mode="lr-tb"/>
    </style:style>
    <style:style style:name="Tabelle34.B1" style:family="table-cell">
      <style:table-cell-properties fo:padding="0.097cm" fo:border-left="0.002cm solid #000000" fo:border-right="none" fo:border-top="0.002cm solid #000000" fo:border-bottom="0.002cm solid #000000"/>
    </style:style>
    <style:style style:name="Tabelle34.C1" style:family="table-cell">
      <style:table-cell-properties fo:padding="0.097cm" fo:border="0.002cm solid #000000"/>
    </style:style>
    <style:style style:name="Tabelle34.A2" style:family="table-cell">
      <style:table-cell-properties fo:background-color="transparent" fo:padding="0.097cm" fo:border-left="0.002cm solid #000000" fo:border-right="none" fo:border-top="none" fo:border-bottom="0.002cm solid #000000" style:writing-mode="lr-tb">
        <style:background-image/>
      </style:table-cell-properties>
    </style:style>
    <style:style style:name="Tabelle34.B2" style:family="table-cell">
      <style:table-cell-properties fo:padding="0.097cm" fo:border-left="0.002cm solid #000000" fo:border-right="none" fo:border-top="none" fo:border-bottom="0.002cm solid #000000"/>
    </style:style>
    <style:style style:name="Tabelle34.C2" style:family="table-cell">
      <style:table-cell-properties fo:padding="0.097cm" fo:border-left="0.002cm solid #000000" fo:border-right="0.002cm solid #000000" fo:border-top="none" fo:border-bottom="0.002cm solid #000000"/>
    </style:style>
    <style:style style:name="Tabelle34.A3" style:family="table-cell">
      <style:table-cell-properties fo:padding="0.097cm" fo:border-left="0.002cm solid #000000" fo:border-right="none" fo:border-top="none" fo:border-bottom="0.002cm solid #000000" style:writing-mode="lr-tb"/>
    </style:style>
    <style:style style:name="Tabelle30" style:family="table">
      <style:table-properties style:width="15.963cm" fo:margin-left="1.042cm" fo:margin-right="-0.007cm" table:align="margins" style:may-break-between-rows="false"/>
    </style:style>
    <style:style style:name="Tabelle30.A" style:family="table-column">
      <style:table-column-properties style:column-width="4.63cm" style:rel-column-width="19008*"/>
    </style:style>
    <style:style style:name="Tabelle30.B" style:family="table-column">
      <style:table-column-properties style:column-width="5.667cm" style:rel-column-width="23266*"/>
    </style:style>
    <style:style style:name="Tabelle30.C" style:family="table-column">
      <style:table-column-properties style:column-width="5.666cm" style:rel-column-width="23261*"/>
    </style:style>
    <style:style style:name="Tabelle30.1" style:family="table-row">
      <style:table-row-properties style:row-height="0.7cm"/>
    </style:style>
    <style:style style:name="Tabelle30.A1" style:family="table-cell">
      <style:table-cell-properties fo:padding="0.097cm" fo:border-left="0.002cm solid #000000" fo:border-right="none" fo:border-top="0.002cm solid #000000" fo:border-bottom="0.002cm solid #000000"/>
    </style:style>
    <style:style style:name="Tabelle30.C1" style:family="table-cell">
      <style:table-cell-properties fo:padding="0.097cm" fo:border="0.002cm solid #000000"/>
    </style:style>
    <style:style style:name="Tabelle30.A2" style:family="table-cell">
      <style:table-cell-properties fo:padding="0.097cm" fo:border-left="0.002cm solid #000000" fo:border-right="none" fo:border-top="none" fo:border-bottom="0.002cm solid #000000"/>
    </style:style>
    <style:style style:name="Tabelle30.C2" style:family="table-cell">
      <style:table-cell-properties fo:padding="0.097cm" fo:border-left="0.002cm solid #000000" fo:border-right="0.002cm solid #000000" fo:border-top="none" fo:border-bottom="0.002cm solid #000000"/>
    </style:style>
    <style:style style:name="Tabelle31" style:family="table">
      <style:table-properties style:width="15.963cm" fo:margin-left="1.042cm" fo:margin-right="-0.007cm" table:align="margins" style:may-break-between-rows="true"/>
    </style:style>
    <style:style style:name="Tabelle31.A" style:family="table-column">
      <style:table-column-properties style:column-width="4.63cm" style:rel-column-width="19008*"/>
    </style:style>
    <style:style style:name="Tabelle31.B" style:family="table-column">
      <style:table-column-properties style:column-width="5.667cm" style:rel-column-width="23266*"/>
    </style:style>
    <style:style style:name="Tabelle31.C" style:family="table-column">
      <style:table-column-properties style:column-width="5.666cm" style:rel-column-width="23261*"/>
    </style:style>
    <style:style style:name="Tabelle31.1" style:family="table-row">
      <style:table-row-properties style:row-height="0.7cm"/>
    </style:style>
    <style:style style:name="Tabelle31.A1" style:family="table-cell">
      <style:table-cell-properties fo:padding="0.097cm" fo:border-left="0.002cm solid #000000" fo:border-right="none" fo:border-top="0.002cm solid #000000" fo:border-bottom="0.002cm solid #000000"/>
    </style:style>
    <style:style style:name="Tabelle31.C1" style:family="table-cell">
      <style:table-cell-properties fo:padding="0.097cm" fo:border="0.002cm solid #000000"/>
    </style:style>
    <style:style style:name="Tabelle31.A2" style:family="table-cell">
      <style:table-cell-properties fo:padding="0.097cm" fo:border-left="0.002cm solid #000000" fo:border-right="none" fo:border-top="none" fo:border-bottom="0.002cm solid #000000"/>
    </style:style>
    <style:style style:name="Tabelle31.C2" style:family="table-cell">
      <style:table-cell-properties fo:padding="0.097cm" fo:border-left="0.002cm solid #000000" fo:border-right="0.002cm solid #000000" fo:border-top="none" fo:border-bottom="0.002cm solid #000000"/>
    </style:style>
    <style:style style:name="Tabelle11" style:family="table" style:master-page-name="">
      <style:table-properties style:width="15.986cm" fo:margin-left="1.042cm" fo:margin-right="-0.03cm" style:page-number="0" table:align="margins"/>
    </style:style>
    <style:style style:name="Tabelle11.A" style:family="table-column">
      <style:table-column-properties style:column-width="2.157cm" style:rel-column-width="8843*"/>
    </style:style>
    <style:style style:name="Tabelle11.B" style:family="table-column">
      <style:table-column-properties style:column-width="4.013cm" style:rel-column-width="16450*"/>
    </style:style>
    <style:style style:name="Tabelle11.C" style:family="table-column">
      <style:table-column-properties style:column-width="1.392cm" style:rel-column-width="5705*"/>
    </style:style>
    <style:style style:name="Tabelle11.D" style:family="table-column">
      <style:table-column-properties style:column-width="1.455cm" style:rel-column-width="5965*"/>
    </style:style>
    <style:style style:name="Tabelle11.E" style:family="table-column">
      <style:table-column-properties style:column-width="1.212cm" style:rel-column-width="4967*"/>
    </style:style>
    <style:style style:name="Tabelle11.F" style:family="table-column">
      <style:table-column-properties style:column-width="1.191cm" style:rel-column-width="4880*"/>
    </style:style>
    <style:style style:name="Tabelle11.G" style:family="table-column">
      <style:table-column-properties style:column-width="0.882cm" style:rel-column-width="3615*"/>
    </style:style>
    <style:style style:name="Tabelle11.H" style:family="table-column">
      <style:table-column-properties style:column-width="2.141cm" style:rel-column-width="8778*"/>
    </style:style>
    <style:style style:name="Tabelle11.I" style:family="table-column">
      <style:table-column-properties style:column-width="1.545cm" style:rel-column-width="6332*"/>
    </style:style>
    <style:style style:name="Tabelle11.1" style:family="table-row">
      <style:table-row-properties style:keep-together="false" fo:keep-together="always"/>
    </style:style>
    <style:style style:name="Tabelle11.A1" style:family="table-cell">
      <style:table-cell-properties fo:padding="0.097cm" fo:border-left="0.002cm solid #000000" fo:border-right="none" fo:border-top="0.002cm solid #000000" fo:border-bottom="0.002cm solid #000000"/>
    </style:style>
    <style:style style:name="Tabelle11.I1" style:family="table-cell">
      <style:table-cell-properties fo:padding="0.097cm" fo:border="0.002cm solid #000000"/>
    </style:style>
    <style:style style:name="Tabelle11.A2" style:family="table-cell">
      <style:table-cell-properties fo:padding="0.097cm" fo:border-left="0.002cm solid #000000" fo:border-right="none" fo:border-top="none" fo:border-bottom="0.002cm solid #000000"/>
    </style:style>
    <style:style style:name="Tabelle11.I2" style:family="table-cell">
      <style:table-cell-properties fo:padding="0.097cm" fo:border-left="0.002cm solid #000000" fo:border-right="0.002cm solid #000000" fo:border-top="none" fo:border-bottom="0.002cm solid #000000"/>
    </style:style>
    <style:style style:name="Tabelle11.5" style:family="table-row">
      <style:table-row-properties style:min-row-height="1.108cm" style:keep-together="false" fo:keep-together="always"/>
    </style:style>
    <style:style style:name="Tabelle11.15" style:family="table-row">
      <style:table-row-properties style:min-row-height="1.792cm" style:keep-together="false" fo:keep-together="always"/>
    </style:style>
    <style:style style:name="Tabelle11.A18" style:family="table-cell">
      <style:table-cell-properties fo:background-color="transparent" fo:padding="0.097cm" fo:border-left="0.002cm solid #000000" fo:border-right="none" fo:border-top="none" fo:border-bottom="0.002cm solid #000000">
        <style:background-image/>
      </style:table-cell-properties>
    </style:style>
    <style:style style:name="Tabelle11.I18"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2" style:family="table">
      <style:table-properties style:width="15.984cm" table:align="right"/>
    </style:style>
    <style:style style:name="Tabelle12.A" style:family="table-column">
      <style:table-column-properties style:column-width="0.981cm"/>
    </style:style>
    <style:style style:name="Tabelle12.B" style:family="table-column">
      <style:table-column-properties style:column-width="15.004cm"/>
    </style:style>
    <style:style style:name="Tabelle12.A1" style:family="table-cell">
      <style:table-cell-properties fo:padding="0.097cm" fo:border-left="0.002cm solid #000000" fo:border-right="none" fo:border-top="0.002cm solid #000000" fo:border-bottom="0.002cm solid #000000"/>
    </style:style>
    <style:style style:name="Tabelle12.B1" style:family="table-cell">
      <style:table-cell-properties fo:padding="0.097cm" fo:border="0.002cm solid #000000"/>
    </style:style>
    <style:style style:name="Tabelle12.A2" style:family="table-cell">
      <style:table-cell-properties fo:padding="0.097cm" fo:border-left="0.002cm solid #000000" fo:border-right="none" fo:border-top="none" fo:border-bottom="0.002cm solid #000000"/>
    </style:style>
    <style:style style:name="Tabelle12.B2" style:family="table-cell">
      <style:table-cell-properties fo:padding="0.097cm" fo:border-left="0.002cm solid #000000" fo:border-right="0.002cm solid #000000" fo:border-top="none" fo:border-bottom="0.002cm solid #000000"/>
    </style:style>
    <style:style style:name="Tabelle29" style:family="table">
      <style:table-properties style:width="15.942cm" fo:margin-left="1.065cm" fo:margin-right="-0.009cm" table:align="margins"/>
    </style:style>
    <style:style style:name="Tabelle29.A" style:family="table-column">
      <style:table-column-properties style:column-width="1.97cm" style:rel-column-width="8100*"/>
    </style:style>
    <style:style style:name="Tabelle29.B" style:family="table-column">
      <style:table-column-properties style:column-width="2.297cm" style:rel-column-width="9443*"/>
    </style:style>
    <style:style style:name="Tabelle29.C" style:family="table-column">
      <style:table-column-properties style:column-width="1.54cm" style:rel-column-width="6330*"/>
    </style:style>
    <style:style style:name="Tabelle29.D" style:family="table-column">
      <style:table-column-properties style:column-width="1.596cm" style:rel-column-width="6563*"/>
    </style:style>
    <style:style style:name="Tabelle29.E" style:family="table-column">
      <style:table-column-properties style:column-width="1.282cm" style:rel-column-width="5274*"/>
    </style:style>
    <style:style style:name="Tabelle29.F" style:family="table-column">
      <style:table-column-properties style:column-width="1.579cm" style:rel-column-width="6493*"/>
    </style:style>
    <style:style style:name="Tabelle29.G" style:family="table-column">
      <style:table-column-properties style:column-width="1.58cm" style:rel-column-width="6494*"/>
    </style:style>
    <style:style style:name="Tabelle29.H" style:family="table-column">
      <style:table-column-properties style:column-width="4.096cm" style:rel-column-width="16838*"/>
    </style:style>
    <style:style style:name="Tabelle29.A1" style:family="table-cell">
      <style:table-cell-properties fo:padding="0.097cm" fo:border-left="0.002cm solid #000000" fo:border-right="none" fo:border-top="0.002cm solid #000000" fo:border-bottom="0.002cm solid #000000"/>
    </style:style>
    <style:style style:name="Tabelle29.H1" style:family="table-cell">
      <style:table-cell-properties fo:padding="0.097cm" fo:border="0.002cm solid #000000"/>
    </style:style>
    <style:style style:name="Tabelle29.A2" style:family="table-cell">
      <style:table-cell-properties fo:padding="0.097cm" fo:border-left="0.002cm solid #000000" fo:border-right="none" fo:border-top="none" fo:border-bottom="0.002cm solid #000000"/>
    </style:style>
    <style:style style:name="Tabelle29.H2" style:family="table-cell">
      <style:table-cell-properties fo:padding="0.097cm" fo:border-left="0.002cm solid #000000" fo:border-right="0.002cm solid #000000" fo:border-top="none" fo:border-bottom="0.002cm solid #000000"/>
    </style:style>
    <style:style style:name="Tabelle37" style:family="table">
      <style:table-properties style:width="15.942cm" fo:margin-left="1.065cm" fo:margin-right="-0.009cm" table:align="margins"/>
    </style:style>
    <style:style style:name="Tabelle37.A" style:family="table-column">
      <style:table-column-properties style:column-width="1.97cm" style:rel-column-width="8100*"/>
    </style:style>
    <style:style style:name="Tabelle37.B" style:family="table-column">
      <style:table-column-properties style:column-width="2.297cm" style:rel-column-width="9443*"/>
    </style:style>
    <style:style style:name="Tabelle37.C" style:family="table-column">
      <style:table-column-properties style:column-width="1.54cm" style:rel-column-width="6330*"/>
    </style:style>
    <style:style style:name="Tabelle37.D" style:family="table-column">
      <style:table-column-properties style:column-width="1.596cm" style:rel-column-width="6563*"/>
    </style:style>
    <style:style style:name="Tabelle37.E" style:family="table-column">
      <style:table-column-properties style:column-width="1.282cm" style:rel-column-width="5274*"/>
    </style:style>
    <style:style style:name="Tabelle37.F" style:family="table-column">
      <style:table-column-properties style:column-width="1.579cm" style:rel-column-width="6493*"/>
    </style:style>
    <style:style style:name="Tabelle37.G" style:family="table-column">
      <style:table-column-properties style:column-width="1.58cm" style:rel-column-width="6494*"/>
    </style:style>
    <style:style style:name="Tabelle37.H" style:family="table-column">
      <style:table-column-properties style:column-width="4.096cm" style:rel-column-width="16838*"/>
    </style:style>
    <style:style style:name="Tabelle37.A1" style:family="table-cell">
      <style:table-cell-properties fo:padding="0.097cm" fo:border-left="0.002cm solid #000000" fo:border-right="none" fo:border-top="0.002cm solid #000000" fo:border-bottom="0.002cm solid #000000"/>
    </style:style>
    <style:style style:name="Tabelle37.H1" style:family="table-cell">
      <style:table-cell-properties fo:padding="0.097cm" fo:border="0.002cm solid #000000"/>
    </style:style>
    <style:style style:name="Tabelle37.A2" style:family="table-cell">
      <style:table-cell-properties fo:padding="0.097cm" fo:border-left="0.002cm solid #000000" fo:border-right="none" fo:border-top="none" fo:border-bottom="0.002cm solid #000000"/>
    </style:style>
    <style:style style:name="Tabelle37.H2" style:family="table-cell">
      <style:table-cell-properties fo:padding="0.097cm" fo:border-left="0.002cm solid #000000" fo:border-right="0.002cm solid #000000" fo:border-top="none" fo:border-bottom="0.002cm solid #000000"/>
    </style:style>
    <style:style style:name="Tabelle28" style:family="table" style:master-page-name="">
      <style:table-properties style:width="15.942cm" fo:margin-left="1.065cm" fo:margin-right="-0.009cm" style:page-number="0" fo:break-before="auto" fo:break-after="auto" table:align="margins" fo:background-color="transparent" fo:keep-with-next="auto" style:may-break-between-rows="true" style:writing-mode="page">
        <style:background-image/>
      </style:table-properties>
    </style:style>
    <style:style style:name="Tabelle28.A" style:family="table-column">
      <style:table-column-properties style:column-width="1.411cm" style:rel-column-width="5800*"/>
    </style:style>
    <style:style style:name="Tabelle28.B" style:family="table-column">
      <style:table-column-properties style:column-width="1.72cm" style:rel-column-width="7069*"/>
    </style:style>
    <style:style style:name="Tabelle28.C" style:family="table-column">
      <style:table-column-properties style:column-width="1.787cm" style:rel-column-width="7345*"/>
    </style:style>
    <style:style style:name="Tabelle28.D" style:family="table-column">
      <style:table-column-properties style:column-width="1.774cm" style:rel-column-width="7294*"/>
    </style:style>
    <style:style style:name="Tabelle28.E" style:family="table-column">
      <style:table-column-properties style:column-width="1.84cm" style:rel-column-width="7562*"/>
    </style:style>
    <style:style style:name="Tabelle28.F" style:family="table-column">
      <style:table-column-properties style:column-width="1.478cm" style:rel-column-width="6076*"/>
    </style:style>
    <style:style style:name="Tabelle28.G" style:family="table-column">
      <style:table-column-properties style:column-width="1.214cm" style:rel-column-width="4988*"/>
    </style:style>
    <style:style style:name="Tabelle28.H" style:family="table-column">
      <style:table-column-properties style:column-width="2.866cm" style:rel-column-width="11782*"/>
    </style:style>
    <style:style style:name="Tabelle28.I" style:family="table-column">
      <style:table-column-properties style:column-width="1.854cm" style:rel-column-width="7619*"/>
    </style:style>
    <style:style style:name="Tabelle28.1" style:family="table-row">
      <style:table-row-properties style:row-height="0.6cm"/>
    </style:style>
    <style:style style:name="Tabelle28.A1" style:family="table-cell">
      <style:table-cell-properties fo:padding="0.097cm" fo:border-left="0.002cm solid #000000" fo:border-right="none" fo:border-top="0.002cm solid #000000" fo:border-bottom="0.002cm solid #000000"/>
    </style:style>
    <style:style style:name="Tabelle28.I1" style:family="table-cell">
      <style:table-cell-properties fo:padding="0.097cm" fo:border="0.002cm solid #000000"/>
    </style:style>
    <style:style style:name="Tabelle28.A2" style:family="table-cell">
      <style:table-cell-properties fo:padding="0.097cm" fo:border-left="0.002cm solid #000000" fo:border-right="none" fo:border-top="none" fo:border-bottom="0.002cm solid #000000"/>
    </style:style>
    <style:style style:name="Tabelle28.I2" style:family="table-cell">
      <style:table-cell-properties fo:padding="0.097cm" fo:border-left="0.002cm solid #000000" fo:border-right="0.002cm solid #000000" fo:border-top="none" fo:border-bottom="0.002cm solid #000000"/>
    </style:style>
    <style:style style:name="Tabelle28.5" style:family="table-row">
      <style:table-row-properties style:row-height="0.6cm" fo:background-color="transparent" style:keep-together="true" fo:keep-together="auto">
        <style:background-image/>
      </style:table-row-properties>
    </style:style>
    <style:style style:name="Tabelle28.E5" style:family="table-cell">
      <style:table-cell-properties fo:background-color="transparent" fo:padding="0.097cm" fo:border-left="0.002cm solid #000000" fo:border-right="none" fo:border-top="none" fo:border-bottom="0.002cm solid #000000" style:writing-mode="page">
        <style:background-image/>
      </style:table-cell-properties>
    </style:style>
    <style:style style:name="Tabelle1" style:family="table">
      <style:table-properties style:width="9.23cm" fo:margin-left="1.032cm" fo:margin-right="6.736cm" table:align="margins" style:may-break-between-rows="true"/>
    </style:style>
    <style:style style:name="Tabelle1.A" style:family="table-column">
      <style:table-column-properties style:column-width="1.291cm" style:rel-column-width="9168*"/>
    </style:style>
    <style:style style:name="Tabelle1.B" style:family="table-column">
      <style:table-column-properties style:column-width="7.939cm" style:rel-column-width="56367*"/>
    </style:style>
    <style:style style:name="Tabelle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B1" style:family="table-cell">
      <style:table-cell-properties fo:background-color="transparent" fo:padding="0.097cm" fo:border="0.002cm solid #000000">
        <style:background-image/>
      </style:table-cell-properties>
    </style:style>
    <style:style style:name="Tabelle1.A2" style:family="table-cell">
      <style:table-cell-properties fo:background-color="transparent" fo:padding="0.097cm" fo:border-left="0.002cm solid #000000" fo:border-right="none" fo:border-top="none" fo:border-bottom="0.002cm solid #000000">
        <style:background-image/>
      </style:table-cell-properties>
    </style:style>
    <style:style style:name="Tabelle1.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8" style:family="table">
      <style:table-properties style:width="16.014cm" fo:margin-left="1cm" fo:margin-right="-0.016cm" table:align="margins" style:may-break-between-rows="false"/>
    </style:style>
    <style:style style:name="Tabelle8.A" style:family="table-column">
      <style:table-column-properties style:column-width="2.836cm" style:rel-column-width="11608*"/>
    </style:style>
    <style:style style:name="Tabelle8.B" style:family="table-column">
      <style:table-column-properties style:column-width="13.178cm" style:rel-column-width="53927*"/>
    </style:style>
    <style:style style:name="Tabelle8.A1" style:family="table-cell">
      <style:table-cell-properties fo:padding="0.097cm" fo:border-left="0.002cm solid #000000" fo:border-right="none" fo:border-top="0.002cm solid #000000" fo:border-bottom="0.002cm solid #000000"/>
    </style:style>
    <style:style style:name="Tabelle8.B1" style:family="table-cell">
      <style:table-cell-properties fo:padding="0.097cm" fo:border="0.002cm solid #000000"/>
    </style:style>
    <style:style style:name="Tabelle8.A2" style:family="table-cell">
      <style:table-cell-properties fo:padding="0.097cm" fo:border-left="0.002cm solid #000000" fo:border-right="none" fo:border-top="none" fo:border-bottom="0.002cm solid #000000"/>
    </style:style>
    <style:style style:name="Tabelle8.B2" style:family="table-cell">
      <style:table-cell-properties fo:padding="0.097cm" fo:border-left="0.002cm solid #000000" fo:border-right="0.002cm solid #000000" fo:border-top="none" fo:border-bottom="0.002cm solid #000000"/>
    </style:style>
    <style:style style:name="Tabelle36" style:family="table">
      <style:table-properties style:width="15.919cm" fo:margin-left="1.087cm" fo:margin-right="-0.007cm" table:align="margins"/>
    </style:style>
    <style:style style:name="Tabelle36.A" style:family="table-column">
      <style:table-column-properties style:column-width="2.007cm" style:rel-column-width="8263*"/>
    </style:style>
    <style:style style:name="Tabelle36.B" style:family="table-column">
      <style:table-column-properties style:column-width="1.984cm" style:rel-column-width="8169*"/>
    </style:style>
    <style:style style:name="Tabelle36.C" style:family="table-column">
      <style:table-column-properties style:column-width="2.028cm" style:rel-column-width="8350*"/>
    </style:style>
    <style:style style:name="Tabelle36.E" style:family="table-column">
      <style:table-column-properties style:column-width="2.05cm" style:rel-column-width="8437*"/>
    </style:style>
    <style:style style:name="Tabelle36.F" style:family="table-column">
      <style:table-column-properties style:column-width="1.94cm" style:rel-column-width="7987*"/>
    </style:style>
    <style:style style:name="Tabelle36.H" style:family="table-column">
      <style:table-column-properties style:column-width="1.898cm" style:rel-column-width="7810*"/>
    </style:style>
    <style:style style:name="Tabelle36.A1" style:family="table-cell">
      <style:table-cell-properties fo:padding="0.097cm" fo:border-left="0.002cm solid #000000" fo:border-right="none" fo:border-top="0.002cm solid #000000" fo:border-bottom="0.002cm solid #000000"/>
    </style:style>
    <style:style style:name="Tabelle36.H1" style:family="table-cell">
      <style:table-cell-properties fo:padding="0.097cm" fo:border="0.002cm solid #000000"/>
    </style:style>
    <style:style style:name="Tabelle36.A2" style:family="table-cell">
      <style:table-cell-properties fo:padding="0.097cm" fo:border-left="0.002cm solid #000000" fo:border-right="none" fo:border-top="none" fo:border-bottom="0.002cm solid #000000"/>
    </style:style>
    <style:style style:name="Tabelle36.H2" style:family="table-cell">
      <style:table-cell-properties fo:padding="0.097cm" fo:border-left="0.002cm solid #000000" fo:border-right="0.002cm solid #000000" fo:border-top="none" fo:border-bottom="0.002cm solid #000000"/>
    </style:style>
    <style:style style:name="Tabelle35" style:family="table">
      <style:table-properties style:width="15.919cm" fo:margin-left="1.065cm" fo:margin-right="0.014cm" table:align="margins"/>
    </style:style>
    <style:style style:name="Tabelle35.A" style:family="table-column">
      <style:table-column-properties style:column-width="1.037cm" style:rel-column-width="4269*"/>
    </style:style>
    <style:style style:name="Tabelle35.B" style:family="table-column">
      <style:table-column-properties style:column-width="2.822cm" style:rel-column-width="11618*"/>
    </style:style>
    <style:style style:name="Tabelle35.C" style:family="table-column">
      <style:table-column-properties style:column-width="2.138cm" style:rel-column-width="8800*"/>
    </style:style>
    <style:style style:name="Tabelle35.D" style:family="table-column">
      <style:table-column-properties style:column-width="4.013cm" style:rel-column-width="16519*"/>
    </style:style>
    <style:style style:name="Tabelle35.E" style:family="table-column">
      <style:table-column-properties style:column-width="5.909cm" style:rel-column-width="24329*"/>
    </style:style>
    <style:style style:name="Tabelle35.A1" style:family="table-cell">
      <style:table-cell-properties fo:padding="0.097cm" fo:border-left="0.002cm solid #000000" fo:border-right="none" fo:border-top="0.002cm solid #000000" fo:border-bottom="0.002cm solid #000000"/>
    </style:style>
    <style:style style:name="Tabelle35.E1" style:family="table-cell">
      <style:table-cell-properties fo:padding="0.097cm" fo:border="0.002cm solid #000000"/>
    </style:style>
    <style:style style:name="Tabelle35.A2" style:family="table-cell">
      <style:table-cell-properties fo:padding="0.097cm" fo:border-left="0.002cm solid #000000" fo:border-right="none" fo:border-top="none" fo:border-bottom="0.002cm solid #000000"/>
    </style:style>
    <style:style style:name="Tabelle35.E2" style:family="table-cell">
      <style:table-cell-properties fo:padding="0.097cm" fo:border-left="0.002cm solid #000000" fo:border-right="0.002cm solid #000000" fo:border-top="none" fo:border-bottom="0.002cm solid #000000"/>
    </style:style>
    <style:style style:name="Tabelle25" style:family="table">
      <style:table-properties style:width="15.986cm" fo:margin-left="1.021cm" fo:margin-right="-0.009cm" table:align="margins"/>
    </style:style>
    <style:style style:name="Tabelle25.A" style:family="table-column">
      <style:table-column-properties style:column-width="2.305cm" style:rel-column-width="9450*"/>
    </style:style>
    <style:style style:name="Tabelle25.B" style:family="table-column">
      <style:table-column-properties style:column-width="1.069cm" style:rel-column-width="4382*"/>
    </style:style>
    <style:style style:name="Tabelle25.C" style:family="table-column">
      <style:table-column-properties style:column-width="0.947cm" style:rel-column-width="3883*"/>
    </style:style>
    <style:style style:name="Tabelle25.D" style:family="table-column">
      <style:table-column-properties style:column-width="3.925cm" style:rel-column-width="16089*"/>
    </style:style>
    <style:style style:name="Tabelle25.E" style:family="table-column">
      <style:table-column-properties style:column-width="3.903cm" style:rel-column-width="16002*"/>
    </style:style>
    <style:style style:name="Tabelle25.F" style:family="table-column">
      <style:table-column-properties style:column-width="3.836cm" style:rel-column-width="15729*"/>
    </style:style>
    <style:style style:name="Tabelle25.A1" style:family="table-cell">
      <style:table-cell-properties fo:padding="0.097cm" fo:border-left="0.002cm solid #000000" fo:border-right="none" fo:border-top="0.002cm solid #000000" fo:border-bottom="0.002cm solid #000000"/>
    </style:style>
    <style:style style:name="Tabelle25.F1" style:family="table-cell">
      <style:table-cell-properties fo:padding="0.097cm" fo:border="0.002cm solid #000000"/>
    </style:style>
    <style:style style:name="Tabelle25.A2" style:family="table-cell">
      <style:table-cell-properties fo:padding="0.097cm" fo:border-left="0.002cm solid #000000" fo:border-right="none" fo:border-top="none" fo:border-bottom="0.002cm solid #000000"/>
    </style:style>
    <style:style style:name="Tabelle25.F2" style:family="table-cell">
      <style:table-cell-properties fo:padding="0.097cm" fo:border-left="0.002cm solid #000000" fo:border-right="0.002cm solid #000000" fo:border-top="none" fo:border-bottom="0.002cm solid #000000"/>
    </style:style>
    <style:style style:name="Tabelle26" style:family="table">
      <style:table-properties style:width="15.986cm" fo:margin-left="1.021cm" fo:margin-right="-0.009cm" table:align="margins"/>
    </style:style>
    <style:style style:name="Tabelle26.A" style:family="table-column">
      <style:table-column-properties style:column-width="2.305cm" style:rel-column-width="9450*"/>
    </style:style>
    <style:style style:name="Tabelle26.B" style:family="table-column">
      <style:table-column-properties style:column-width="1.069cm" style:rel-column-width="4382*"/>
    </style:style>
    <style:style style:name="Tabelle26.C" style:family="table-column">
      <style:table-column-properties style:column-width="0.947cm" style:rel-column-width="3883*"/>
    </style:style>
    <style:style style:name="Tabelle26.D" style:family="table-column">
      <style:table-column-properties style:column-width="3.925cm" style:rel-column-width="16089*"/>
    </style:style>
    <style:style style:name="Tabelle26.E" style:family="table-column">
      <style:table-column-properties style:column-width="3.903cm" style:rel-column-width="16002*"/>
    </style:style>
    <style:style style:name="Tabelle26.F" style:family="table-column">
      <style:table-column-properties style:column-width="3.836cm" style:rel-column-width="15729*"/>
    </style:style>
    <style:style style:name="Tabelle26.A1" style:family="table-cell">
      <style:table-cell-properties fo:padding="0.097cm" fo:border-left="0.002cm solid #000000" fo:border-right="none" fo:border-top="0.002cm solid #000000" fo:border-bottom="0.002cm solid #000000"/>
    </style:style>
    <style:style style:name="Tabelle26.F1" style:family="table-cell">
      <style:table-cell-properties fo:padding="0.097cm" fo:border="0.002cm solid #000000"/>
    </style:style>
    <style:style style:name="Tabelle26.A2" style:family="table-cell">
      <style:table-cell-properties fo:padding="0.097cm" fo:border-left="0.002cm solid #000000" fo:border-right="none" fo:border-top="none" fo:border-bottom="0.002cm solid #000000"/>
    </style:style>
    <style:style style:name="Tabelle26.F2" style:family="table-cell">
      <style:table-cell-properties fo:padding="0.097cm" fo:border-left="0.002cm solid #000000" fo:border-right="0.002cm solid #000000" fo:border-top="none" fo:border-bottom="0.002cm solid #000000"/>
    </style:style>
    <style:style style:name="Tabelle23" style:family="table">
      <style:table-properties style:width="15.986cm" fo:margin-left="1.021cm" fo:margin-right="-0.009cm" table:align="margins"/>
    </style:style>
    <style:style style:name="Tabelle23.A" style:family="table-column">
      <style:table-column-properties style:column-width="2.305cm" style:rel-column-width="9450*"/>
    </style:style>
    <style:style style:name="Tabelle23.B" style:family="table-column">
      <style:table-column-properties style:column-width="1.069cm" style:rel-column-width="4382*"/>
    </style:style>
    <style:style style:name="Tabelle23.C" style:family="table-column">
      <style:table-column-properties style:column-width="0.947cm" style:rel-column-width="3883*"/>
    </style:style>
    <style:style style:name="Tabelle23.D" style:family="table-column">
      <style:table-column-properties style:column-width="3.925cm" style:rel-column-width="16089*"/>
    </style:style>
    <style:style style:name="Tabelle23.E" style:family="table-column">
      <style:table-column-properties style:column-width="3.903cm" style:rel-column-width="16002*"/>
    </style:style>
    <style:style style:name="Tabelle23.F" style:family="table-column">
      <style:table-column-properties style:column-width="3.836cm" style:rel-column-width="15729*"/>
    </style:style>
    <style:style style:name="Tabelle23.A1" style:family="table-cell">
      <style:table-cell-properties fo:padding="0.097cm" fo:border-left="0.002cm solid #000000" fo:border-right="none" fo:border-top="0.002cm solid #000000" fo:border-bottom="0.002cm solid #000000"/>
    </style:style>
    <style:style style:name="Tabelle23.F1" style:family="table-cell">
      <style:table-cell-properties fo:padding="0.097cm" fo:border="0.002cm solid #000000"/>
    </style:style>
    <style:style style:name="Tabelle23.A2" style:family="table-cell">
      <style:table-cell-properties fo:padding="0.097cm" fo:border-left="0.002cm solid #000000" fo:border-right="none" fo:border-top="none" fo:border-bottom="0.002cm solid #000000"/>
    </style:style>
    <style:style style:name="Tabelle23.F2" style:family="table-cell">
      <style:table-cell-properties fo:padding="0.097cm" fo:border-left="0.002cm solid #000000" fo:border-right="0.002cm solid #000000" fo:border-top="none" fo:border-bottom="0.002cm solid #000000"/>
    </style:style>
    <style:style style:name="Tabelle24" style:family="table">
      <style:table-properties style:width="15.963cm" fo:margin-left="1.021cm" fo:margin-right="0.014cm" table:align="margins"/>
    </style:style>
    <style:style style:name="Tabelle24.A" style:family="table-column">
      <style:table-column-properties style:column-width="2.305cm" style:rel-column-width="9464*"/>
    </style:style>
    <style:style style:name="Tabelle24.B" style:family="table-column">
      <style:table-column-properties style:column-width="1.069cm" style:rel-column-width="4388*"/>
    </style:style>
    <style:style style:name="Tabelle24.C" style:family="table-column">
      <style:table-column-properties style:column-width="0.947cm" style:rel-column-width="3888*"/>
    </style:style>
    <style:style style:name="Tabelle24.D" style:family="table-column">
      <style:table-column-properties style:column-width="3.925cm" style:rel-column-width="16112*"/>
    </style:style>
    <style:style style:name="Tabelle24.E" style:family="table-column">
      <style:table-column-properties style:column-width="3.903cm" style:rel-column-width="16025*"/>
    </style:style>
    <style:style style:name="Tabelle24.F" style:family="table-column">
      <style:table-column-properties style:column-width="3.814cm" style:rel-column-width="15658*"/>
    </style:style>
    <style:style style:name="Tabelle24.A1" style:family="table-cell">
      <style:table-cell-properties fo:padding="0.097cm" fo:border-left="0.002cm solid #000000" fo:border-right="none" fo:border-top="0.002cm solid #000000" fo:border-bottom="0.002cm solid #000000"/>
    </style:style>
    <style:style style:name="Tabelle24.F1" style:family="table-cell">
      <style:table-cell-properties fo:padding="0.097cm" fo:border="0.002cm solid #000000"/>
    </style:style>
    <style:style style:name="Tabelle24.A2" style:family="table-cell">
      <style:table-cell-properties fo:padding="0.097cm" fo:border-left="0.002cm solid #000000" fo:border-right="none" fo:border-top="none" fo:border-bottom="0.002cm solid #000000"/>
    </style:style>
    <style:style style:name="Tabelle24.F2" style:family="table-cell">
      <style:table-cell-properties fo:padding="0.097cm" fo:border-left="0.002cm solid #000000" fo:border-right="0.002cm solid #000000" fo:border-top="none" fo:border-bottom="0.002cm solid #000000"/>
    </style:style>
    <style:style style:name="Tabelle48" style:family="table">
      <style:table-properties style:width="15.963cm" fo:margin-left="1.042cm" fo:margin-right="-0.007cm" table:align="margins"/>
    </style:style>
    <style:style style:name="Tabelle48.A" style:family="table-column">
      <style:table-column-properties style:column-width="1.787cm" style:rel-column-width="7335*"/>
    </style:style>
    <style:style style:name="Tabelle48.B" style:family="table-column">
      <style:table-column-properties style:column-width="2.843cm" style:rel-column-width="11673*"/>
    </style:style>
    <style:style style:name="Tabelle48.C" style:family="table-column">
      <style:table-column-properties style:column-width="2.822cm" style:rel-column-width="11586*"/>
    </style:style>
    <style:style style:name="Tabelle48.D" style:family="table-column">
      <style:table-column-properties style:column-width="8.511cm" style:rel-column-width="34941*"/>
    </style:style>
    <style:style style:name="Tabelle48.A1" style:family="table-cell">
      <style:table-cell-properties fo:padding="0.097cm" fo:border-left="0.002cm solid #000000" fo:border-right="none" fo:border-top="0.002cm solid #000000" fo:border-bottom="0.002cm solid #000000"/>
    </style:style>
    <style:style style:name="Tabelle48.D1" style:family="table-cell">
      <style:table-cell-properties fo:padding="0.097cm" fo:border="0.002cm solid #000000"/>
    </style:style>
    <style:style style:name="Tabelle48.A2" style:family="table-cell" style:data-style-name="N0">
      <style:table-cell-properties fo:padding="0.097cm" fo:border-left="0.002cm solid #000000" fo:border-right="none" fo:border-top="none" fo:border-bottom="0.002cm solid #000000"/>
    </style:style>
    <style:style style:name="Tabelle48.D2" style:family="table-cell">
      <style:table-cell-properties fo:padding="0.097cm" fo:border-left="0.002cm solid #000000" fo:border-right="0.002cm solid #000000" fo:border-top="none" fo:border-bottom="0.002cm solid #000000"/>
    </style:style>
    <style:style style:name="Tabelle48.A6" style:family="table-cell">
      <style:table-cell-properties fo:padding="0.097cm" fo:border-left="0.002cm solid #000000" fo:border-right="none" fo:border-top="none" fo:border-bottom="0.002cm solid #000000"/>
    </style:style>
    <style:style style:name="Tabelle3" style:family="table">
      <style:table-properties style:width="11.086cm" fo:margin-left="1.028cm" fo:margin-right="4.884cm" fo:break-before="auto" fo:break-after="auto" table:align="margins" style:may-break-between-rows="true"/>
    </style:style>
    <style:style style:name="Tabelle3.A" style:family="table-column">
      <style:table-column-properties style:column-width="1.861cm" style:rel-column-width="11002*"/>
    </style:style>
    <style:style style:name="Tabelle3.B" style:family="table-column">
      <style:table-column-properties style:column-width="0.968cm" style:rel-column-width="5720*"/>
    </style:style>
    <style:style style:name="Tabelle3.C" style:family="table-column">
      <style:table-column-properties style:column-width="0.995cm" style:rel-column-width="5877*"/>
    </style:style>
    <style:style style:name="Tabelle3.D" style:family="table-column">
      <style:table-column-properties style:column-width="0.951cm" style:rel-column-width="5616*"/>
    </style:style>
    <style:style style:name="Tabelle3.E" style:family="table-column">
      <style:table-column-properties style:column-width="1.032cm" style:rel-column-width="6096*"/>
    </style:style>
    <style:style style:name="Tabelle3.F" style:family="table-column">
      <style:table-column-properties style:column-width="1.21cm" style:rel-column-width="7150*"/>
    </style:style>
    <style:style style:name="Tabelle3.G" style:family="table-column">
      <style:table-column-properties style:column-width="1.319cm" style:rel-column-width="7797*"/>
    </style:style>
    <style:style style:name="Tabelle3.H" style:family="table-column">
      <style:table-column-properties style:column-width="1.252cm" style:rel-column-width="7401*"/>
    </style:style>
    <style:style style:name="Tabelle3.I" style:family="table-column">
      <style:table-column-properties style:column-width="1.501cm" style:rel-column-width="8876*"/>
    </style:style>
    <style:style style:name="Tabelle3.A1" style:family="table-cell">
      <style:table-cell-properties fo:padding="0.097cm" fo:border-left="0.002cm solid #000000" fo:border-right="none" fo:border-top="0.002cm solid #000000" fo:border-bottom="0.002cm solid #000000"/>
    </style:style>
    <style:style style:name="Tabelle3.I1" style:family="table-cell">
      <style:table-cell-properties fo:padding="0.097cm" fo:border="0.002cm solid #000000"/>
    </style:style>
    <style:style style:name="Tabelle3.A2" style:family="table-cell">
      <style:table-cell-properties fo:padding="0.097cm" fo:border-left="0.002cm solid #000000" fo:border-right="none" fo:border-top="none" fo:border-bottom="0.002cm solid #000000"/>
    </style:style>
    <style:style style:name="Tabelle3.I2" style:family="table-cell">
      <style:table-cell-properties fo:padding="0.097cm" fo:border-left="0.002cm solid #000000" fo:border-right="0.002cm solid #000000" fo:border-top="none" fo:border-bottom="0.002cm solid #000000"/>
    </style:style>
    <style:style style:name="Tabelle51" style:family="table">
      <style:table-properties style:width="15.919cm" fo:margin-left="1.042cm" fo:margin-right="0.037cm" table:align="margins" style:may-break-between-rows="false"/>
    </style:style>
    <style:style style:name="Tabelle51.A" style:family="table-column">
      <style:table-column-properties style:column-width="1.722cm" style:rel-column-width="7087*"/>
    </style:style>
    <style:style style:name="Tabelle51.B" style:family="table-column">
      <style:table-column-properties style:column-width="1.683cm" style:rel-column-width="6927*"/>
    </style:style>
    <style:style style:name="Tabelle51.D" style:family="table-column">
      <style:table-column-properties style:column-width="1.72cm" style:rel-column-width="7079*"/>
    </style:style>
    <style:style style:name="Tabelle51.F" style:family="table-column">
      <style:table-column-properties style:column-width="1.704cm" style:rel-column-width="7014*"/>
    </style:style>
    <style:style style:name="Tabelle51.G" style:family="table-column">
      <style:table-column-properties style:column-width="5.648cm" style:rel-column-width="23254*"/>
    </style:style>
    <style:style style:name="Tabelle51.A1" style:family="table-cell">
      <style:table-cell-properties fo:padding="0.097cm" fo:border-left="0.002cm solid #000000" fo:border-right="none" fo:border-top="0.002cm solid #000000" fo:border-bottom="0.002cm solid #000000"/>
    </style:style>
    <style:style style:name="Tabelle51.G1" style:family="table-cell">
      <style:table-cell-properties fo:padding="0.097cm" fo:border="0.002cm solid #000000"/>
    </style:style>
    <style:style style:name="Tabelle51.A2" style:family="table-cell">
      <style:table-cell-properties fo:padding="0.097cm" fo:border-left="0.002cm solid #000000" fo:border-right="none" fo:border-top="none" fo:border-bottom="0.002cm solid #000000"/>
    </style:style>
    <style:style style:name="Tabelle51.B2" style:family="table-cell" style:data-style-name="N0">
      <style:table-cell-properties fo:padding="0.097cm" fo:border-left="0.002cm solid #000000" fo:border-right="none" fo:border-top="none" fo:border-bottom="0.002cm solid #000000"/>
    </style:style>
    <style:style style:name="Tabelle51.G2" style:family="table-cell">
      <style:table-cell-properties fo:padding="0.097cm" fo:border-left="0.002cm solid #000000" fo:border-right="0.002cm solid #000000" fo:border-top="none" fo:border-bottom="0.002cm solid #000000"/>
    </style:style>
    <style:style style:name="Tabelle10" style:family="table">
      <style:table-properties style:width="16.014cm" fo:margin-left="0.988cm" fo:margin-right="-0.004cm" table:align="margins" style:may-break-between-rows="true"/>
    </style:style>
    <style:style style:name="Tabelle10.A" style:family="table-column">
      <style:table-column-properties style:column-width="2.11cm" style:rel-column-width="8630*"/>
    </style:style>
    <style:style style:name="Tabelle10.B" style:family="table-column">
      <style:table-column-properties style:column-width="13.905cm" style:rel-column-width="56905*"/>
    </style:style>
    <style:style style:name="Tabelle10.A1" style:family="table-cell">
      <style:table-cell-properties fo:padding="0.097cm" fo:border-left="0.002cm solid #000000" fo:border-right="none" fo:border-top="0.002cm solid #000000" fo:border-bottom="0.002cm solid #000000"/>
    </style:style>
    <style:style style:name="Tabelle10.B1" style:family="table-cell">
      <style:table-cell-properties fo:padding="0.097cm" fo:border="0.002cm solid #000000"/>
    </style:style>
    <style:style style:name="Tabelle10.A2" style:family="table-cell">
      <style:table-cell-properties fo:padding="0.097cm" fo:border-left="0.002cm solid #000000" fo:border-right="none" fo:border-top="none" fo:border-bottom="0.002cm solid #000000"/>
    </style:style>
    <style:style style:name="Tabelle10.B2" style:family="table-cell">
      <style:table-cell-properties fo:padding="0.097cm" fo:border-left="0.002cm solid #000000" fo:border-right="0.002cm solid #000000" fo:border-top="none" fo:border-bottom="0.002cm solid #000000"/>
    </style:style>
    <style:style style:name="Tabelle4" style:family="table">
      <style:table-properties style:width="15.967cm" table:align="right" style:may-break-between-rows="false"/>
    </style:style>
    <style:style style:name="Tabelle4.A" style:family="table-column">
      <style:table-column-properties style:column-width="0.845cm"/>
    </style:style>
    <style:style style:name="Tabelle4.B" style:family="table-column">
      <style:table-column-properties style:column-width="0.93cm"/>
    </style:style>
    <style:style style:name="Tabelle4.C" style:family="table-column">
      <style:table-column-properties style:column-width="0.928cm"/>
    </style:style>
    <style:style style:name="Tabelle4.D" style:family="table-column">
      <style:table-column-properties style:column-width="1.092cm"/>
    </style:style>
    <style:style style:name="Tabelle4.E" style:family="table-column">
      <style:table-column-properties style:column-width="0.868cm"/>
    </style:style>
    <style:style style:name="Tabelle4.F" style:family="table-column">
      <style:table-column-properties style:column-width="0.99cm"/>
    </style:style>
    <style:style style:name="Tabelle4.G" style:family="table-column">
      <style:table-column-properties style:column-width="0.889cm"/>
    </style:style>
    <style:style style:name="Tabelle4.H" style:family="table-column">
      <style:table-column-properties style:column-width="0.908cm"/>
    </style:style>
    <style:style style:name="Tabelle4.I" style:family="table-column">
      <style:table-column-properties style:column-width="0.97cm"/>
    </style:style>
    <style:style style:name="Tabelle4.J" style:family="table-column">
      <style:table-column-properties style:column-width="1.05cm"/>
    </style:style>
    <style:style style:name="Tabelle4.K" style:family="table-column">
      <style:table-column-properties style:column-width="0.808cm"/>
    </style:style>
    <style:style style:name="Tabelle4.L" style:family="table-column">
      <style:table-column-properties style:column-width="5.69cm"/>
    </style:style>
    <style:style style:name="Tabelle4.1" style:family="table-row">
      <style:table-row-properties style:row-height="1.199cm"/>
    </style:style>
    <style:style style:name="Tabelle4.A1" style:family="table-cell">
      <style:table-cell-properties fo:padding="0.097cm" fo:border-left="0.002cm solid #000000" fo:border-right="none" fo:border-top="0.002cm solid #000000" fo:border-bottom="0.002cm solid #000000"/>
    </style:style>
    <style:style style:name="Tabelle4.L1" style:family="table-cell">
      <style:table-cell-properties fo:padding="0.097cm" fo:border="0.002cm solid #000000"/>
    </style:style>
    <style:style style:name="Tabelle4.2" style:family="table-row">
      <style:table-row-properties style:row-height="0.499cm"/>
    </style:style>
    <style:style style:name="Tabelle4.A2" style:family="table-cell">
      <style:table-cell-properties fo:padding="0.097cm" fo:border-left="0.002cm solid #000000" fo:border-right="none" fo:border-top="none" fo:border-bottom="0.002cm solid #000000"/>
    </style:style>
    <style:style style:name="Tabelle4.L2" style:family="table-cell">
      <style:table-cell-properties fo:padding="0.097cm" fo:border-left="0.002cm solid #000000" fo:border-right="0.002cm solid #000000" fo:border-top="none" fo:border-bottom="0.002cm solid #000000"/>
    </style:style>
    <style:style style:name="Tabelle5" style:family="table">
      <style:table-properties style:width="15.981cm" table:align="right" style:may-break-between-rows="false"/>
    </style:style>
    <style:style style:name="Tabelle5.A" style:family="table-column">
      <style:table-column-properties style:column-width="5.502cm"/>
    </style:style>
    <style:style style:name="Tabelle5.B" style:family="table-column">
      <style:table-column-properties style:column-width="10.479cm"/>
    </style:style>
    <style:style style:name="Tabelle5.A1" style:family="table-cell">
      <style:table-cell-properties fo:padding="0.097cm" fo:border-left="0.002cm solid #000000" fo:border-right="none" fo:border-top="0.002cm solid #000000" fo:border-bottom="0.002cm solid #000000"/>
    </style:style>
    <style:style style:name="Tabelle5.B1" style:family="table-cell">
      <style:table-cell-properties fo:padding="0.097cm" fo:border="0.002cm solid #000000"/>
    </style:style>
    <style:style style:name="Tabelle5.A2" style:family="table-cell">
      <style:table-cell-properties fo:padding="0.097cm" fo:border-left="0.002cm solid #000000" fo:border-right="none" fo:border-top="none" fo:border-bottom="0.002cm solid #000000"/>
    </style:style>
    <style:style style:name="Tabelle5.B2" style:family="table-cell">
      <style:table-cell-properties fo:padding="0.097cm" fo:border-left="0.002cm solid #000000" fo:border-right="0.002cm solid #000000" fo:border-top="none" fo:border-bottom="0.002cm solid #000000"/>
    </style:style>
    <style:style style:name="Tabelle9" style:family="table">
      <style:table-properties style:width="16.007cm" fo:margin-left="0.997cm" fo:margin-right="-0.005cm" table:align="margins" style:may-break-between-rows="false"/>
    </style:style>
    <style:style style:name="Tabelle9.A" style:family="table-column">
      <style:table-column-properties style:column-width="1.718cm" style:rel-column-width="7034*"/>
    </style:style>
    <style:style style:name="Tabelle9.B" style:family="table-column">
      <style:table-column-properties style:column-width="14.289cm" style:rel-column-width="58501*"/>
    </style:style>
    <style:style style:name="Tabelle9.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9.B1" style:family="table-cell">
      <style:table-cell-properties fo:padding="0.097cm" fo:border="0.002cm solid #000000"/>
    </style:style>
    <style:style style:name="Tabelle9.A2" style:family="table-cell">
      <style:table-cell-properties fo:padding="0.097cm" fo:border-left="0.002cm solid #000000" fo:border-right="none" fo:border-top="none" fo:border-bottom="0.002cm solid #000000"/>
    </style:style>
    <style:style style:name="Tabelle9.B2" style:family="table-cell">
      <style:table-cell-properties fo:padding="0.097cm" fo:border-left="0.002cm solid #000000" fo:border-right="0.002cm solid #000000" fo:border-top="none" fo:border-bottom="0.002cm solid #000000"/>
    </style:style>
    <style:style style:name="Tabelle49" style:family="table">
      <style:table-properties style:width="15.963cm" fo:margin-left="1.042cm" fo:margin-right="-0.007cm" table:align="margins"/>
    </style:style>
    <style:style style:name="Tabelle49.A" style:family="table-column">
      <style:table-column-properties style:column-width="1.346cm" style:rel-column-width="5525*"/>
    </style:style>
    <style:style style:name="Tabelle49.B" style:family="table-column">
      <style:table-column-properties style:column-width="1.102cm" style:rel-column-width="4525*"/>
    </style:style>
    <style:style style:name="Tabelle49.C" style:family="table-column">
      <style:table-column-properties style:column-width="1.08cm" style:rel-column-width="4431*"/>
    </style:style>
    <style:style style:name="Tabelle49.D" style:family="table-column">
      <style:table-column-properties style:column-width="1.279cm" style:rel-column-width="5250*"/>
    </style:style>
    <style:style style:name="Tabelle49.E" style:family="table-column">
      <style:table-column-properties style:column-width="1.787cm" style:rel-column-width="7335*"/>
    </style:style>
    <style:style style:name="Tabelle49.F" style:family="table-column">
      <style:table-column-properties style:column-width="1.543cm" style:rel-column-width="6336*"/>
    </style:style>
    <style:style style:name="Tabelle49.G" style:family="table-column">
      <style:table-column-properties style:column-width="7.826cm" style:rel-column-width="32133*"/>
    </style:style>
    <style:style style:name="Tabelle49.A1" style:family="table-cell">
      <style:table-cell-properties fo:padding="0.097cm" fo:border-left="0.002cm solid #000000" fo:border-right="none" fo:border-top="0.002cm solid #000000" fo:border-bottom="0.002cm solid #000000"/>
    </style:style>
    <style:style style:name="Tabelle49.G1" style:family="table-cell">
      <style:table-cell-properties fo:padding="0.097cm" fo:border="0.002cm solid #000000"/>
    </style:style>
    <style:style style:name="Tabelle49.A2" style:family="table-cell">
      <style:table-cell-properties fo:padding="0.097cm" fo:border-left="0.002cm solid #000000" fo:border-right="none" fo:border-top="none" fo:border-bottom="0.002cm solid #000000"/>
    </style:style>
    <style:style style:name="Tabelle49.B2" style:family="table-cell" style:data-style-name="N0">
      <style:table-cell-properties fo:padding="0.097cm" fo:border-left="0.002cm solid #000000" fo:border-right="none" fo:border-top="none" fo:border-bottom="0.002cm solid #000000"/>
    </style:style>
    <style:style style:name="Tabelle49.G2" style:family="table-cell">
      <style:table-cell-properties fo:padding="0.097cm" fo:border-left="0.002cm solid #000000" fo:border-right="0.002cm solid #000000" fo:border-top="none" fo:border-bottom="0.002cm solid #000000"/>
    </style:style>
    <style:style style:name="Tabelle7" style:family="table">
      <style:table-properties style:width="15.991cm" fo:margin-left="1.023cm" fo:margin-right="-0.016cm" table:align="margins" style:may-break-between-rows="true"/>
    </style:style>
    <style:style style:name="Tabelle7.A" style:family="table-column">
      <style:table-column-properties style:column-width="3.168cm" style:rel-column-width="12984*"/>
    </style:style>
    <style:style style:name="Tabelle7.B" style:family="table-column">
      <style:table-column-properties style:column-width="12.823cm" style:rel-column-width="52551*"/>
    </style:style>
    <style:style style:name="Tabelle7.1" style:family="table-row">
      <style:table-row-properties style:row-height="0.801cm"/>
    </style:style>
    <style:style style:name="Tabelle7.A1" style:family="table-cell">
      <style:table-cell-properties fo:padding="0.097cm" fo:border-left="0.002cm solid #000000" fo:border-right="none" fo:border-top="0.002cm solid #000000" fo:border-bottom="0.002cm solid #000000"/>
    </style:style>
    <style:style style:name="Tabelle7.B1" style:family="table-cell">
      <style:table-cell-properties fo:padding="0.097cm" fo:border="0.002cm solid #000000"/>
    </style:style>
    <style:style style:name="Tabelle7.A2" style:family="table-cell">
      <style:table-cell-properties fo:padding="0.097cm" fo:border-left="0.002cm solid #000000" fo:border-right="none" fo:border-top="none" fo:border-bottom="0.002cm solid #000000"/>
    </style:style>
    <style:style style:name="Tabelle7.B2" style:family="table-cell">
      <style:table-cell-properties fo:padding="0.097cm" fo:border-left="0.002cm solid #000000" fo:border-right="0.002cm solid #000000" fo:border-top="none" fo:border-bottom="0.002cm solid #000000"/>
    </style:style>
    <style:style style:name="Tabelle6" style:family="table">
      <style:table-properties style:width="15.981cm" table:align="right" style:may-break-between-rows="true"/>
    </style:style>
    <style:style style:name="Tabelle6.A" style:family="table-column">
      <style:table-column-properties style:column-width="3.336cm"/>
    </style:style>
    <style:style style:name="Tabelle6.B" style:family="table-column">
      <style:table-column-properties style:column-width="12.645cm"/>
    </style:style>
    <style:style style:name="Tabelle6.1" style:family="table-row">
      <style:table-row-properties style:row-height="0.651cm"/>
    </style:style>
    <style:style style:name="Tabelle6.A1" style:family="table-cell">
      <style:table-cell-properties fo:padding="0.097cm" fo:border-left="0.002cm solid #000000" fo:border-right="none" fo:border-top="0.002cm solid #000000" fo:border-bottom="0.002cm solid #000000"/>
    </style:style>
    <style:style style:name="Tabelle6.B1" style:family="table-cell">
      <style:table-cell-properties fo:padding="0.097cm" fo:border="0.002cm solid #000000"/>
    </style:style>
    <style:style style:name="Tabelle6.A2" style:family="table-cell">
      <style:table-cell-properties fo:padding="0.097cm" fo:border-left="0.002cm solid #000000" fo:border-right="none" fo:border-top="none" fo:border-bottom="0.002cm solid #000000"/>
    </style:style>
    <style:style style:name="Tabelle6.B2" style:family="table-cell">
      <style:table-cell-properties fo:padding="0.097cm" fo:border-left="0.002cm solid #000000" fo:border-right="0.002cm solid #000000" fo:border-top="none" fo:border-bottom="0.002cm solid #000000"/>
    </style:style>
    <style:style style:name="Tabelle40" style:family="table">
      <style:table-properties style:width="15.963cm" fo:margin-left="1.042cm" fo:margin-right="-0.007cm" table:align="margins"/>
    </style:style>
    <style:style style:name="Tabelle40.A" style:family="table-column">
      <style:table-column-properties style:column-width="2.117cm" style:rel-column-width="8689*"/>
    </style:style>
    <style:style style:name="Tabelle40.B" style:family="table-column">
      <style:table-column-properties style:column-width="6.879cm" style:rel-column-width="28241*"/>
    </style:style>
    <style:style style:name="Tabelle40.C" style:family="table-column">
      <style:table-column-properties style:column-width="6.967cm" style:rel-column-width="28605*"/>
    </style:style>
    <style:style style:name="Tabelle40.A1" style:family="table-cell">
      <style:table-cell-properties fo:padding="0.097cm" fo:border-left="0.002cm solid #000000" fo:border-right="none" fo:border-top="0.002cm solid #000000" fo:border-bottom="0.002cm solid #000000"/>
    </style:style>
    <style:style style:name="Tabelle40.C1" style:family="table-cell">
      <style:table-cell-properties fo:padding="0.097cm" fo:border="0.002cm solid #000000"/>
    </style:style>
    <style:style style:name="Tabelle40.A2" style:family="table-cell">
      <style:table-cell-properties fo:padding="0.097cm" fo:border-left="0.002cm solid #000000" fo:border-right="none" fo:border-top="none" fo:border-bottom="0.002cm solid #000000"/>
    </style:style>
    <style:style style:name="Tabelle40.C2" style:family="table-cell">
      <style:table-cell-properties fo:padding="0.097cm" fo:border-left="0.002cm solid #000000" fo:border-right="0.002cm solid #000000" fo:border-top="none" fo:border-bottom="0.002cm solid #000000"/>
    </style:style>
    <style:style style:name="Tabelle42" style:family="table">
      <style:table-properties style:width="15.965cm" fo:margin-left="1.042cm" fo:margin-right="-0.009cm" table:align="margins"/>
    </style:style>
    <style:style style:name="Tabelle42.A" style:family="table-column">
      <style:table-column-properties style:column-width="1.122cm" style:rel-column-width="4602*"/>
    </style:style>
    <style:style style:name="Tabelle42.B" style:family="table-column">
      <style:table-column-properties style:column-width="1.12cm" style:rel-column-width="4595*"/>
    </style:style>
    <style:style style:name="Tabelle42.C" style:family="table-column">
      <style:table-column-properties style:column-width="1.101cm" style:rel-column-width="4519*"/>
    </style:style>
    <style:style style:name="Tabelle42.D" style:family="table-column">
      <style:table-column-properties style:column-width="1.101cm" style:rel-column-width="4518*"/>
    </style:style>
    <style:style style:name="Tabelle42.E" style:family="table-column">
      <style:table-column-properties style:column-width="1.651cm" style:rel-column-width="6777*"/>
    </style:style>
    <style:style style:name="Tabelle42.F" style:family="table-column">
      <style:table-column-properties style:column-width="6.408cm" style:rel-column-width="26305*"/>
    </style:style>
    <style:style style:name="Tabelle42.G" style:family="table-column">
      <style:table-column-properties style:column-width="1.732cm" style:rel-column-width="7110*"/>
    </style:style>
    <style:style style:name="Tabelle42.H" style:family="table-column">
      <style:table-column-properties style:column-width="1.732cm" style:rel-column-width="7109*"/>
    </style:style>
    <style:style style:name="Tabelle42.A1" style:family="table-cell">
      <style:table-cell-properties fo:padding="0.097cm" fo:border-left="0.002cm solid #000000" fo:border-right="none" fo:border-top="0.002cm solid #000000" fo:border-bottom="0.002cm solid #000000"/>
    </style:style>
    <style:style style:name="Tabelle42.H1" style:family="table-cell">
      <style:table-cell-properties fo:padding="0.097cm" fo:border="0.002cm solid #000000"/>
    </style:style>
    <style:style style:name="Tabelle42.A2" style:family="table-cell">
      <style:table-cell-properties fo:padding="0.097cm" fo:border-left="0.002cm solid #000000" fo:border-right="none" fo:border-top="none" fo:border-bottom="0.002cm solid #000000"/>
    </style:style>
    <style:style style:name="Tabelle42.H2" style:family="table-cell" style:data-style-name="N0">
      <style:table-cell-properties fo:padding="0.097cm" fo:border-left="0.002cm solid #000000" fo:border-right="0.002cm solid #000000" fo:border-top="none" fo:border-bottom="0.002cm solid #000000"/>
    </style:style>
    <style:style style:name="Tabelle39" style:family="table">
      <style:table-properties style:width="15.963cm" fo:margin-left="1.042cm" fo:margin-right="-0.007cm" table:align="margins"/>
    </style:style>
    <style:style style:name="Tabelle39.A" style:family="table-column">
      <style:table-column-properties style:column-width="4.63cm" style:rel-column-width="19008*"/>
    </style:style>
    <style:style style:name="Tabelle39.B" style:family="table-column">
      <style:table-column-properties style:column-width="5.667cm" style:rel-column-width="23266*"/>
    </style:style>
    <style:style style:name="Tabelle39.C" style:family="table-column">
      <style:table-column-properties style:column-width="5.666cm" style:rel-column-width="23261*"/>
    </style:style>
    <style:style style:name="Tabelle39.A1" style:family="table-cell">
      <style:table-cell-properties fo:padding="0.097cm" fo:border-left="0.002cm solid #000000" fo:border-right="none" fo:border-top="0.002cm solid #000000" fo:border-bottom="0.002cm solid #000000"/>
    </style:style>
    <style:style style:name="Tabelle39.C1" style:family="table-cell">
      <style:table-cell-properties fo:padding="0.097cm" fo:border="0.002cm solid #000000"/>
    </style:style>
    <style:style style:name="Tabelle39.A2" style:family="table-cell">
      <style:table-cell-properties fo:padding="0.097cm" fo:border-left="0.002cm solid #000000" fo:border-right="none" fo:border-top="none" fo:border-bottom="0.002cm solid #000000"/>
    </style:style>
    <style:style style:name="Tabelle39.C2" style:family="table-cell">
      <style:table-cell-properties fo:padding="0.097cm" fo:border-left="0.002cm solid #000000" fo:border-right="0.002cm solid #000000" fo:border-top="none" fo:border-bottom="0.002cm solid #000000"/>
    </style:style>
    <style:style style:name="Tabelle38" style:family="table">
      <style:table-properties style:width="15.963cm" fo:margin-left="1.042cm" fo:margin-right="-0.007cm" table:align="margins"/>
    </style:style>
    <style:style style:name="Tabelle38.A" style:family="table-column">
      <style:table-column-properties style:column-width="1.012cm" style:rel-column-width="4156*"/>
    </style:style>
    <style:style style:name="Tabelle38.B" style:family="table-column">
      <style:table-column-properties style:column-width="6.615cm" style:rel-column-width="27155*"/>
    </style:style>
    <style:style style:name="Tabelle38.C" style:family="table-column">
      <style:table-column-properties style:column-width="2.822cm" style:rel-column-width="11586*"/>
    </style:style>
    <style:style style:name="Tabelle38.D" style:family="table-column">
      <style:table-column-properties style:column-width="2.847cm" style:rel-column-width="11687*"/>
    </style:style>
    <style:style style:name="Tabelle38.E" style:family="table-column">
      <style:table-column-properties style:column-width="2.667cm" style:rel-column-width="10951*"/>
    </style:style>
    <style:style style:name="Tabelle38.A1" style:family="table-cell">
      <style:table-cell-properties fo:padding="0.097cm" fo:border-left="0.002cm solid #000000" fo:border-right="none" fo:border-top="0.002cm solid #000000" fo:border-bottom="0.002cm solid #000000"/>
    </style:style>
    <style:style style:name="Tabelle38.E1" style:family="table-cell">
      <style:table-cell-properties fo:padding="0.097cm" fo:border="0.002cm solid #000000"/>
    </style:style>
    <style:style style:name="Tabelle38.A2" style:family="table-cell">
      <style:table-cell-properties fo:padding="0.097cm" fo:border-left="0.002cm solid #000000" fo:border-right="none" fo:border-top="none" fo:border-bottom="0.002cm solid #000000"/>
    </style:style>
    <style:style style:name="Tabelle38.E2" style:family="table-cell">
      <style:table-cell-properties fo:padding="0.097cm" fo:border-left="0.002cm solid #000000" fo:border-right="0.002cm solid #000000" fo:border-top="none" fo:border-bottom="0.002cm solid #000000"/>
    </style:style>
    <style:style style:name="Tabelle38.C14" style:family="table-cell" style:data-style-name="N0">
      <style:table-cell-properties fo:padding="0.097cm" fo:border-left="0.002cm solid #000000" fo:border-right="none" fo:border-top="none" fo:border-bottom="0.002cm solid #000000"/>
    </style:style>
    <style:style style:name="Tabelle14" style:family="table">
      <style:table-properties style:width="15.963cm" fo:margin-left="1.042cm" fo:margin-right="-0.007cm" table:align="margins"/>
    </style:style>
    <style:style style:name="Tabelle14.A" style:family="table-column">
      <style:table-column-properties style:column-width="7.452cm" style:rel-column-width="30595*"/>
    </style:style>
    <style:style style:name="Tabelle14.B" style:family="table-column">
      <style:table-column-properties style:column-width="8.511cm" style:rel-column-width="34940*"/>
    </style:style>
    <style:style style:name="Tabelle14.A1" style:family="table-cell">
      <style:table-cell-properties fo:padding="0.097cm" fo:border-left="0.002cm solid #000000" fo:border-right="none" fo:border-top="0.002cm solid #000000" fo:border-bottom="0.002cm solid #000000"/>
    </style:style>
    <style:style style:name="Tabelle14.B1" style:family="table-cell">
      <style:table-cell-properties fo:padding="0.097cm" fo:border="0.002cm solid #000000"/>
    </style:style>
    <style:style style:name="Tabelle14.A2" style:family="table-cell">
      <style:table-cell-properties fo:padding="0.097cm" fo:border-left="0.002cm solid #000000" fo:border-right="none" fo:border-top="none" fo:border-bottom="0.002cm solid #000000"/>
    </style:style>
    <style:style style:name="Tabelle14.B2" style:family="table-cell">
      <style:table-cell-properties fo:padding="0.097cm" fo:border-left="0.002cm solid #000000" fo:border-right="0.002cm solid #000000" fo:border-top="none" fo:border-bottom="0.002cm solid #000000"/>
    </style:style>
    <style:style style:name="Tabelle46" style:family="table">
      <style:table-properties style:width="15.963cm" fo:margin-left="1.042cm" fo:margin-right="-0.007cm" table:align="margins"/>
    </style:style>
    <style:style style:name="Tabelle46.A" style:family="table-column">
      <style:table-column-properties style:column-width="1.279cm" style:rel-column-width="5250*"/>
    </style:style>
    <style:style style:name="Tabelle46.B" style:family="table-column">
      <style:table-column-properties style:column-width="1.214cm" style:rel-column-width="4982*"/>
    </style:style>
    <style:style style:name="Tabelle46.C" style:family="table-column">
      <style:table-column-properties style:column-width="1.256cm" style:rel-column-width="5155*"/>
    </style:style>
    <style:style style:name="Tabelle46.D" style:family="table-column">
      <style:table-column-properties style:column-width="1.235cm" style:rel-column-width="5069*"/>
    </style:style>
    <style:style style:name="Tabelle46.F" style:family="table-column">
      <style:table-column-properties style:column-width="1.258cm" style:rel-column-width="5163*"/>
    </style:style>
    <style:style style:name="Tabelle46.G" style:family="table-column">
      <style:table-column-properties style:column-width="8.444cm" style:rel-column-width="34666*"/>
    </style:style>
    <style:style style:name="Tabelle46.A1" style:family="table-cell">
      <style:table-cell-properties fo:padding="0.097cm" fo:border-left="0.002cm solid #000000" fo:border-right="none" fo:border-top="0.002cm solid #000000" fo:border-bottom="0.002cm solid #000000"/>
    </style:style>
    <style:style style:name="Tabelle46.G1" style:family="table-cell">
      <style:table-cell-properties fo:padding="0.097cm" fo:border="0.002cm solid #000000"/>
    </style:style>
    <style:style style:name="Tabelle46.A2" style:family="table-cell">
      <style:table-cell-properties fo:padding="0.097cm" fo:border-left="0.002cm solid #000000" fo:border-right="none" fo:border-top="none" fo:border-bottom="0.002cm solid #000000"/>
    </style:style>
    <style:style style:name="Tabelle46.G2" style:family="table-cell">
      <style:table-cell-properties fo:padding="0.097cm" fo:border-left="0.002cm solid #000000" fo:border-right="0.002cm solid #000000" fo:border-top="none" fo:border-bottom="0.002cm solid #000000"/>
    </style:style>
    <style:style style:name="Tabelle16" style:family="table">
      <style:table-properties style:width="15.963cm" fo:margin-left="1.042cm" fo:margin-right="-0.007cm" table:align="margins" style:may-break-between-rows="false"/>
    </style:style>
    <style:style style:name="Tabelle16.A" style:family="table-column">
      <style:table-column-properties style:column-width="7.452cm" style:rel-column-width="30595*"/>
    </style:style>
    <style:style style:name="Tabelle16.B" style:family="table-column">
      <style:table-column-properties style:column-width="8.511cm" style:rel-column-width="34940*"/>
    </style:style>
    <style:style style:name="Tabelle16.A1" style:family="table-cell">
      <style:table-cell-properties style:vertical-align="middle" fo:padding="0.097cm" fo:border-left="0.002cm solid #000000" fo:border-right="none" fo:border-top="0.002cm solid #000000" fo:border-bottom="0.002cm solid #000000"/>
    </style:style>
    <style:style style:name="Tabelle16.B1" style:family="table-cell">
      <style:table-cell-properties style:vertical-align="middle" fo:padding="0.097cm" fo:border="0.002cm solid #000000"/>
    </style:style>
    <style:style style:name="Tabelle16.A2" style:family="table-cell" style:data-style-name="N0">
      <style:table-cell-properties style:vertical-align="middle" fo:padding="0.097cm" fo:border-left="0.002cm solid #000000" fo:border-right="none" fo:border-top="none" fo:border-bottom="0.002cm solid #000000"/>
    </style:style>
    <style:style style:name="Tabelle16.B2" style:family="table-cell">
      <style:table-cell-properties style:vertical-align="middle" fo:padding="0.097cm" fo:border-left="0.002cm solid #000000" fo:border-right="0.002cm solid #000000" fo:border-top="none" fo:border-bottom="0.002cm solid #000000"/>
    </style:style>
    <style:style style:name="Tabelle16.A3" style:family="table-cell">
      <style:table-cell-properties style:vertical-align="middle" fo:padding="0.097cm" fo:border-left="0.002cm solid #000000" fo:border-right="none" fo:border-top="none" fo:border-bottom="0.002cm solid #000000"/>
    </style:style>
    <style:style style:name="Tabelle47" style:family="table">
      <style:table-properties style:width="15.963cm" fo:margin-left="1.042cm" fo:margin-right="-0.007cm" table:align="margins"/>
    </style:style>
    <style:style style:name="Tabelle47.A" style:family="table-column">
      <style:table-column-properties style:column-width="0.97cm" style:rel-column-width="3982*"/>
    </style:style>
    <style:style style:name="Tabelle47.B" style:family="table-column">
      <style:table-column-properties style:column-width="1.014cm" style:rel-column-width="4163*"/>
    </style:style>
    <style:style style:name="Tabelle47.C" style:family="table-column">
      <style:table-column-properties style:column-width="0.993cm" style:rel-column-width="4076*"/>
    </style:style>
    <style:style style:name="Tabelle47.F" style:family="table-column">
      <style:table-column-properties style:column-width="0.991cm" style:rel-column-width="4069*"/>
    </style:style>
    <style:style style:name="Tabelle47.K" style:family="table-column">
      <style:table-column-properties style:column-width="5.976cm" style:rel-column-width="24535*"/>
    </style:style>
    <style:style style:name="Tabelle47.A1" style:family="table-cell">
      <style:table-cell-properties fo:padding="0.097cm" fo:border-left="0.002cm solid #000000" fo:border-right="none" fo:border-top="0.002cm solid #000000" fo:border-bottom="0.002cm solid #000000"/>
    </style:style>
    <style:style style:name="Tabelle47.K1" style:family="table-cell">
      <style:table-cell-properties fo:padding="0.097cm" fo:border="0.002cm solid #000000"/>
    </style:style>
    <style:style style:name="Tabelle47.A2" style:family="table-cell">
      <style:table-cell-properties fo:padding="0.097cm" fo:border-left="0.002cm solid #000000" fo:border-right="none" fo:border-top="none" fo:border-bottom="0.002cm solid #000000"/>
    </style:style>
    <style:style style:name="Tabelle47.K2" style:family="table-cell">
      <style:table-cell-properties fo:padding="0.097cm" fo:border-left="0.002cm solid #000000" fo:border-right="0.002cm solid #000000" fo:border-top="none" fo:border-bottom="0.002cm solid #000000"/>
    </style:style>
    <style:style style:name="Tabelle17" style:family="table">
      <style:table-properties style:width="15.963cm" fo:margin-left="1.042cm" fo:margin-right="-0.007cm" table:align="margins"/>
    </style:style>
    <style:style style:name="Tabelle17.A" style:family="table-column">
      <style:table-column-properties style:column-width="7.452cm" style:rel-column-width="30595*"/>
    </style:style>
    <style:style style:name="Tabelle17.B" style:family="table-column">
      <style:table-column-properties style:column-width="8.511cm" style:rel-column-width="34940*"/>
    </style:style>
    <style:style style:name="Tabelle17.A1" style:family="table-cell">
      <style:table-cell-properties fo:padding="0.097cm" fo:border-left="0.002cm solid #000000" fo:border-right="none" fo:border-top="0.002cm solid #000000" fo:border-bottom="0.002cm solid #000000"/>
    </style:style>
    <style:style style:name="Tabelle17.B1" style:family="table-cell">
      <style:table-cell-properties fo:padding="0.097cm" fo:border="0.002cm solid #000000"/>
    </style:style>
    <style:style style:name="Tabelle17.A2" style:family="table-cell">
      <style:table-cell-properties fo:padding="0.097cm" fo:border-left="0.002cm solid #000000" fo:border-right="none" fo:border-top="none" fo:border-bottom="0.002cm solid #000000"/>
    </style:style>
    <style:style style:name="Tabelle17.B2" style:family="table-cell">
      <style:table-cell-properties fo:padding="0.097cm" fo:border-left="0.002cm solid #000000" fo:border-right="0.002cm solid #000000" fo:border-top="none" fo:border-bottom="0.002cm solid #000000"/>
    </style:style>
    <style:style style:name="Tabelle18" style:family="table">
      <style:table-properties style:width="15.963cm" fo:margin-left="1.042cm" fo:margin-right="-0.007cm" table:align="margins"/>
    </style:style>
    <style:style style:name="Tabelle18.A" style:family="table-column">
      <style:table-column-properties style:column-width="7.452cm" style:rel-column-width="30595*"/>
    </style:style>
    <style:style style:name="Tabelle18.B" style:family="table-column">
      <style:table-column-properties style:column-width="8.511cm" style:rel-column-width="34940*"/>
    </style:style>
    <style:style style:name="Tabelle18.A1" style:family="table-cell">
      <style:table-cell-properties fo:padding="0.097cm" fo:border-left="0.002cm solid #000000" fo:border-right="none" fo:border-top="0.002cm solid #000000" fo:border-bottom="0.002cm solid #000000"/>
    </style:style>
    <style:style style:name="Tabelle18.B1" style:family="table-cell">
      <style:table-cell-properties fo:padding="0.097cm" fo:border="0.002cm solid #000000"/>
    </style:style>
    <style:style style:name="Tabelle18.A2" style:family="table-cell">
      <style:table-cell-properties fo:padding="0.097cm" fo:border-left="0.002cm solid #000000" fo:border-right="none" fo:border-top="none" fo:border-bottom="0.002cm solid #000000"/>
    </style:style>
    <style:style style:name="Tabelle18.B2" style:family="table-cell">
      <style:table-cell-properties fo:padding="0.097cm" fo:border-left="0.002cm solid #000000" fo:border-right="0.002cm solid #000000" fo:border-top="none" fo:border-bottom="0.002cm solid #000000"/>
    </style:style>
    <style:style style:name="Tabelle20" style:family="table">
      <style:table-properties style:width="15.942cm" fo:margin-left="1.065cm" fo:margin-right="-0.009cm" table:align="margins"/>
    </style:style>
    <style:style style:name="Tabelle20.A" style:family="table-column">
      <style:table-column-properties style:column-width="0.949cm" style:rel-column-width="3901*"/>
    </style:style>
    <style:style style:name="Tabelle20.B" style:family="table-column">
      <style:table-column-properties style:column-width="0.903cm" style:rel-column-width="3712*"/>
    </style:style>
    <style:style style:name="Tabelle20.C" style:family="table-column">
      <style:table-column-properties style:column-width="2.028cm" style:rel-column-width="8338*"/>
    </style:style>
    <style:style style:name="Tabelle20.D" style:family="table-column">
      <style:table-column-properties style:column-width="1.984cm" style:rel-column-width="8157*"/>
    </style:style>
    <style:style style:name="Tabelle20.E" style:family="table-column">
      <style:table-column-properties style:column-width="1.632cm" style:rel-column-width="6707*"/>
    </style:style>
    <style:style style:name="Tabelle20.G" style:family="table-column">
      <style:table-column-properties style:column-width="0.859cm" style:rel-column-width="3531*"/>
    </style:style>
    <style:style style:name="Tabelle20.H" style:family="table-column">
      <style:table-column-properties style:column-width="0.861cm" style:rel-column-width="3538*"/>
    </style:style>
    <style:style style:name="Tabelle20.I" style:family="table-column">
      <style:table-column-properties style:column-width="0.882cm" style:rel-column-width="3625*"/>
    </style:style>
    <style:style style:name="Tabelle20.J" style:family="table-column">
      <style:table-column-properties style:column-width="4.895cm" style:rel-column-width="20125*"/>
    </style:style>
    <style:style style:name="Tabelle20.A1" style:family="table-cell">
      <style:table-cell-properties fo:padding="0.097cm" fo:border-left="0.002cm solid #000000" fo:border-right="none" fo:border-top="0.002cm solid #000000" fo:border-bottom="0.002cm solid #000000"/>
    </style:style>
    <style:style style:name="Tabelle20.J1" style:family="table-cell">
      <style:table-cell-properties fo:padding="0.097cm" fo:border="0.002cm solid #000000"/>
    </style:style>
    <style:style style:name="Tabelle20.A2" style:family="table-cell">
      <style:table-cell-properties fo:padding="0.097cm" fo:border-left="0.002cm solid #000000" fo:border-right="none" fo:border-top="none" fo:border-bottom="0.002cm solid #000000"/>
    </style:style>
    <style:style style:name="Tabelle20.J2" style:family="table-cell">
      <style:table-cell-properties fo:padding="0.097cm" fo:border-left="0.002cm solid #000000" fo:border-right="0.002cm solid #000000" fo:border-top="none" fo:border-bottom="0.002cm solid #000000"/>
    </style:style>
    <style:style style:name="Tabelle19" style:family="table">
      <style:table-properties style:width="15.963cm" fo:margin-left="1.042cm" fo:margin-right="-0.007cm" table:align="margins"/>
    </style:style>
    <style:style style:name="Tabelle19.A" style:family="table-column">
      <style:table-column-properties style:column-width="7.452cm" style:rel-column-width="30595*"/>
    </style:style>
    <style:style style:name="Tabelle19.B" style:family="table-column">
      <style:table-column-properties style:column-width="8.511cm" style:rel-column-width="34940*"/>
    </style:style>
    <style:style style:name="Tabelle19.A1" style:family="table-cell">
      <style:table-cell-properties fo:padding="0.097cm" fo:border-left="0.002cm solid #000000" fo:border-right="none" fo:border-top="0.002cm solid #000000" fo:border-bottom="0.002cm solid #000000"/>
    </style:style>
    <style:style style:name="Tabelle19.B1" style:family="table-cell">
      <style:table-cell-properties fo:padding="0.097cm" fo:border="0.002cm solid #000000"/>
    </style:style>
    <style:style style:name="Tabelle19.A2" style:family="table-cell">
      <style:table-cell-properties fo:padding="0.097cm" fo:border-left="0.002cm solid #000000" fo:border-right="none" fo:border-top="none" fo:border-bottom="0.002cm solid #000000"/>
    </style:style>
    <style:style style:name="Tabelle19.B2" style:family="table-cell">
      <style:table-cell-properties fo:padding="0.097cm" fo:border-left="0.002cm solid #000000" fo:border-right="0.002cm solid #000000" fo:border-top="none" fo:border-bottom="0.002cm solid #000000"/>
    </style:style>
    <style:style style:name="Tabelle15" style:family="table">
      <style:table-properties style:width="15.963cm" fo:margin-left="1.042cm" fo:margin-right="-0.007cm" table:align="margins"/>
    </style:style>
    <style:style style:name="Tabelle15.A" style:family="table-column">
      <style:table-column-properties style:column-width="7.452cm" style:rel-column-width="30595*"/>
    </style:style>
    <style:style style:name="Tabelle15.B" style:family="table-column">
      <style:table-column-properties style:column-width="8.511cm" style:rel-column-width="34940*"/>
    </style:style>
    <style:style style:name="Tabelle15.A1" style:family="table-cell">
      <style:table-cell-properties fo:padding="0.097cm" fo:border-left="0.002cm solid #000000" fo:border-right="none" fo:border-top="0.002cm solid #000000" fo:border-bottom="0.002cm solid #000000"/>
    </style:style>
    <style:style style:name="Tabelle15.B1" style:family="table-cell">
      <style:table-cell-properties fo:padding="0.097cm" fo:border="0.002cm solid #000000"/>
    </style:style>
    <style:style style:name="Tabelle15.A2" style:family="table-cell">
      <style:table-cell-properties fo:padding="0.097cm" fo:border-left="0.002cm solid #000000" fo:border-right="none" fo:border-top="none" fo:border-bottom="0.002cm solid #000000"/>
    </style:style>
    <style:style style:name="Tabelle15.B2" style:family="table-cell">
      <style:table-cell-properties fo:padding="0.097cm" fo:border-left="0.002cm solid #000000" fo:border-right="0.002cm solid #000000" fo:border-top="none" fo:border-bottom="0.002cm solid #000000"/>
    </style:style>
    <style:style style:name="Tabelle13" style:family="table">
      <style:table-properties style:width="9.768cm" fo:margin-left="1.065cm" fo:margin-right="6.165cm" table:align="margins"/>
    </style:style>
    <style:style style:name="Tabelle13.A" style:family="table-column">
      <style:table-column-properties style:column-width="1.817cm" style:rel-column-width="12188*"/>
    </style:style>
    <style:style style:name="Tabelle13.C" style:family="table-column">
      <style:table-column-properties style:column-width="3.004cm" style:rel-column-width="20152*"/>
    </style:style>
    <style:style style:name="Tabelle13.D" style:family="table-column">
      <style:table-column-properties style:column-width="3.131cm" style:rel-column-width="21007*"/>
    </style:style>
    <style:style style:name="Tabelle13.A1" style:family="table-cell">
      <style:table-cell-properties fo:padding="0.097cm" fo:border-left="0.002cm solid #000000" fo:border-right="none" fo:border-top="0.002cm solid #000000" fo:border-bottom="0.002cm solid #000000"/>
    </style:style>
    <style:style style:name="Tabelle13.D1" style:family="table-cell">
      <style:table-cell-properties fo:padding="0.097cm" fo:border="0.002cm solid #000000"/>
    </style:style>
    <style:style style:name="Tabelle13.A2" style:family="table-cell">
      <style:table-cell-properties fo:padding="0.097cm" fo:border-left="0.002cm solid #000000" fo:border-right="none" fo:border-top="none" fo:border-bottom="0.002cm solid #000000"/>
    </style:style>
    <style:style style:name="Tabelle13.D2" style:family="table-cell">
      <style:table-cell-properties fo:padding="0.097cm" fo:border-left="0.002cm solid #000000" fo:border-right="0.002cm solid #000000" fo:border-top="none" fo:border-bottom="0.002cm solid #000000"/>
    </style:style>
    <style:style style:name="Tabelle50" style:family="table">
      <style:table-properties style:width="15.963cm" fo:margin-left="1.042cm" fo:margin-right="-0.007cm" table:align="margins"/>
    </style:style>
    <style:style style:name="Tabelle50.A" style:family="table-column">
      <style:table-column-properties style:column-width="2.448cm" style:rel-column-width="10051*"/>
    </style:style>
    <style:style style:name="Tabelle50.B" style:family="table-column">
      <style:table-column-properties style:column-width="13.515cm" style:rel-column-width="55484*"/>
    </style:style>
    <style:style style:name="Tabelle50.A1" style:family="table-cell">
      <style:table-cell-properties fo:padding="0.097cm" fo:border-left="0.002cm solid #000000" fo:border-right="none" fo:border-top="0.002cm solid #000000" fo:border-bottom="0.002cm solid #000000"/>
    </style:style>
    <style:style style:name="Tabelle50.B1" style:family="table-cell">
      <style:table-cell-properties fo:padding="0.097cm" fo:border="0.002cm solid #000000"/>
    </style:style>
    <style:style style:name="Tabelle50.A2" style:family="table-cell" style:data-style-name="N0">
      <style:table-cell-properties fo:padding="0.097cm" fo:border-left="0.002cm solid #000000" fo:border-right="none" fo:border-top="none" fo:border-bottom="0.002cm solid #000000"/>
    </style:style>
    <style:style style:name="Tabelle50.B2" style:family="table-cell">
      <style:table-cell-properties fo:padding="0.097cm" fo:border-left="0.002cm solid #000000" fo:border-right="0.002cm solid #000000" fo:border-top="none" fo:border-bottom="0.002cm solid #000000"/>
    </style:style>
    <style:style style:name="Tabelle52" style:family="table">
      <style:table-properties style:width="12.502cm" fo:margin-left="1.042cm" fo:margin-right="3.454cm" table:align="margins"/>
    </style:style>
    <style:style style:name="Tabelle52.A" style:family="table-column">
      <style:table-column-properties style:column-width="0.97cm" style:rel-column-width="5085*"/>
    </style:style>
    <style:style style:name="Tabelle52.B" style:family="table-column">
      <style:table-column-properties style:column-width="1.014cm" style:rel-column-width="5316*"/>
    </style:style>
    <style:style style:name="Tabelle52.C" style:family="table-column">
      <style:table-column-properties style:column-width="0.993cm" style:rel-column-width="5205*"/>
    </style:style>
    <style:style style:name="Tabelle52.D" style:family="table-column">
      <style:table-column-properties style:column-width="0.991cm" style:rel-column-width="5196*"/>
    </style:style>
    <style:style style:name="Tabelle52.E" style:family="table-column">
      <style:table-column-properties style:column-width="8.534cm" style:rel-column-width="44733*"/>
    </style:style>
    <style:style style:name="Tabelle52.A1" style:family="table-cell">
      <style:table-cell-properties fo:padding="0.097cm" fo:border-left="0.002cm solid #000000" fo:border-right="none" fo:border-top="0.002cm solid #000000" fo:border-bottom="0.002cm solid #000000"/>
    </style:style>
    <style:style style:name="Tabelle52.E1" style:family="table-cell">
      <style:table-cell-properties fo:padding="0.097cm" fo:border="0.002cm solid #000000"/>
    </style:style>
    <style:style style:name="Tabelle52.A2" style:family="table-cell" style:data-style-name="N0">
      <style:table-cell-properties fo:padding="0.097cm" fo:border-left="0.002cm solid #000000" fo:border-right="none" fo:border-top="none" fo:border-bottom="0.002cm solid #000000"/>
    </style:style>
    <style:style style:name="Tabelle52.E2" style:family="table-cell">
      <style:table-cell-properties fo:padding="0.097cm" fo:border-left="0.002cm solid #000000" fo:border-right="0.002cm solid #000000" fo:border-top="none" fo:border-bottom="0.002cm solid #000000"/>
    </style:style>
    <style:style style:name="Tabelle52.A4" style:family="table-cell">
      <style:table-cell-properties fo:padding="0.097cm" fo:border-left="0.002cm solid #000000" fo:border-right="none" fo:border-top="none" fo:border-bottom="0.002cm solid #000000"/>
    </style:style>
    <style:style style:name="Tabelle43" style:family="table">
      <style:table-properties style:width="16.007cm" fo:margin-left="0.998cm" fo:margin-right="-0.007cm" table:align="margins"/>
    </style:style>
    <style:style style:name="Tabelle43.A" style:family="table-column">
      <style:table-column-properties style:column-width="1.235cm" style:rel-column-width="5055*"/>
    </style:style>
    <style:style style:name="Tabelle43.B" style:family="table-column">
      <style:table-column-properties style:column-width="1.279cm" style:rel-column-width="5235*"/>
    </style:style>
    <style:style style:name="Tabelle43.E" style:family="table-column">
      <style:table-column-properties style:column-width="1.258cm" style:rel-column-width="5148*"/>
    </style:style>
    <style:style style:name="Tabelle43.F" style:family="table-column">
      <style:table-column-properties style:column-width="1.256cm" style:rel-column-width="5141*"/>
    </style:style>
    <style:style style:name="Tabelle43.G" style:family="table-column">
      <style:table-column-properties style:column-width="1.808cm" style:rel-column-width="7402*"/>
    </style:style>
    <style:style style:name="Tabelle43.H" style:family="table-column">
      <style:table-column-properties style:column-width="6.703cm" style:rel-column-width="27444*"/>
    </style:style>
    <style:style style:name="Tabelle43.1" style:family="table-row">
      <style:table-row-properties style:min-row-height="0.993cm"/>
    </style:style>
    <style:style style:name="Tabelle43.A1" style:family="table-cell">
      <style:table-cell-properties fo:padding="0.097cm" fo:border-left="0.002cm solid #000000" fo:border-right="none" fo:border-top="0.002cm solid #000000" fo:border-bottom="0.002cm solid #000000"/>
    </style:style>
    <style:style style:name="Tabelle43.H1" style:family="table-cell">
      <style:table-cell-properties fo:padding="0.097cm" fo:border="0.002cm solid #000000"/>
    </style:style>
    <style:style style:name="Tabelle43.A2" style:family="table-cell">
      <style:table-cell-properties fo:padding="0.097cm" fo:border-left="0.002cm solid #000000" fo:border-right="none" fo:border-top="none" fo:border-bottom="0.002cm solid #000000"/>
    </style:style>
    <style:style style:name="Tabelle43.G2" style:family="table-cell" style:data-style-name="N0">
      <style:table-cell-properties fo:padding="0.097cm" fo:border-left="0.002cm solid #000000" fo:border-right="none" fo:border-top="none" fo:border-bottom="0.002cm solid #000000"/>
    </style:style>
    <style:style style:name="Tabelle43.H2" style:family="table-cell">
      <style:table-cell-properties fo:padding="0.097cm" fo:border-left="0.002cm solid #000000" fo:border-right="0.002cm solid #000000" fo:border-top="none" fo:border-bottom="0.002cm solid #000000"/>
    </style:style>
    <style:style style:name="Tabelle44" style:family="table">
      <style:table-properties style:width="15.986cm" fo:margin-left="1.021cm" fo:margin-right="-0.009cm" table:align="margins"/>
    </style:style>
    <style:style style:name="Tabelle44.A" style:family="table-column">
      <style:table-column-properties style:column-width="2.69cm" style:rel-column-width="11027*"/>
    </style:style>
    <style:style style:name="Tabelle44.B" style:family="table-column">
      <style:table-column-properties style:column-width="13.296cm" style:rel-column-width="54508*"/>
    </style:style>
    <style:style style:name="Tabelle44.A1" style:family="table-cell">
      <style:table-cell-properties fo:padding="0.097cm" fo:border-left="0.002cm solid #000000" fo:border-right="none" fo:border-top="0.002cm solid #000000" fo:border-bottom="0.002cm solid #000000"/>
    </style:style>
    <style:style style:name="Tabelle44.B1" style:family="table-cell">
      <style:table-cell-properties fo:padding="0.097cm" fo:border="0.002cm solid #000000"/>
    </style:style>
    <style:style style:name="Tabelle44.A2" style:family="table-cell" style:data-style-name="N0">
      <style:table-cell-properties fo:padding="0.097cm" fo:border-left="0.002cm solid #000000" fo:border-right="none" fo:border-top="none" fo:border-bottom="0.002cm solid #000000"/>
    </style:style>
    <style:style style:name="Tabelle44.B2" style:family="table-cell">
      <style:table-cell-properties fo:padding="0.097cm" fo:border-left="0.002cm solid #000000" fo:border-right="0.002cm solid #000000" fo:border-top="none" fo:border-bottom="0.002cm solid #000000"/>
    </style:style>
    <style:style style:name="Tabelle44.A4" style:family="table-cell">
      <style:table-cell-properties fo:padding="0.097cm" fo:border-left="0.002cm solid #000000" fo:border-right="none" fo:border-top="none" fo:border-bottom="0.002cm solid #000000"/>
    </style:style>
    <style:style style:name="Tabelle21" style:family="table">
      <style:table-properties style:width="15.986cm" fo:margin-left="1.021cm" fo:margin-right="-0.009cm" table:align="margins"/>
    </style:style>
    <style:style style:name="Tabelle21.A" style:family="table-column">
      <style:table-column-properties style:column-width="2.381cm" style:rel-column-width="9761*"/>
    </style:style>
    <style:style style:name="Tabelle21.B" style:family="table-column">
      <style:table-column-properties style:column-width="3.395cm" style:rel-column-width="13919*"/>
    </style:style>
    <style:style style:name="Tabelle21.C" style:family="table-column">
      <style:table-column-properties style:column-width="3.418cm" style:rel-column-width="14013*"/>
    </style:style>
    <style:style style:name="Tabelle21.E" style:family="table-column">
      <style:table-column-properties style:column-width="3.395cm" style:rel-column-width="13923*"/>
    </style:style>
    <style:style style:name="Tabelle21.A1" style:family="table-cell">
      <style:table-cell-properties fo:padding="0.097cm" fo:border-left="0.002cm solid #000000" fo:border-right="none" fo:border-top="0.002cm solid #000000" fo:border-bottom="0.002cm solid #000000"/>
    </style:style>
    <style:style style:name="Tabelle21.E1" style:family="table-cell">
      <style:table-cell-properties fo:padding="0.097cm" fo:border="0.002cm solid #000000"/>
    </style:style>
    <style:style style:name="Tabelle21.A2" style:family="table-cell">
      <style:table-cell-properties fo:padding="0.097cm" fo:border-left="0.002cm solid #000000" fo:border-right="none" fo:border-top="none" fo:border-bottom="0.002cm solid #000000"/>
    </style:style>
    <style:style style:name="Tabelle21.E2" style:family="table-cell">
      <style:table-cell-properties fo:padding="0.097cm" fo:border-left="0.002cm solid #000000" fo:border-right="0.002cm solid #000000" fo:border-top="none" fo:border-bottom="0.002cm solid #000000"/>
    </style:style>
    <style:style style:name="Tabelle22" style:family="table">
      <style:table-properties style:width="15.986cm" fo:margin-left="1.021cm" fo:margin-right="-0.009cm" table:align="margins"/>
    </style:style>
    <style:style style:name="Tabelle22.A" style:family="table-column">
      <style:table-column-properties style:column-width="2.381cm" style:rel-column-width="9761*"/>
    </style:style>
    <style:style style:name="Tabelle22.B" style:family="table-column">
      <style:table-column-properties style:column-width="3.395cm" style:rel-column-width="13919*"/>
    </style:style>
    <style:style style:name="Tabelle22.C" style:family="table-column">
      <style:table-column-properties style:column-width="3.418cm" style:rel-column-width="14013*"/>
    </style:style>
    <style:style style:name="Tabelle22.E" style:family="table-column">
      <style:table-column-properties style:column-width="3.395cm" style:rel-column-width="13923*"/>
    </style:style>
    <style:style style:name="Tabelle22.A1" style:family="table-cell">
      <style:table-cell-properties fo:padding="0.097cm" fo:border-left="0.002cm solid #000000" fo:border-right="none" fo:border-top="0.002cm solid #000000" fo:border-bottom="0.002cm solid #000000"/>
    </style:style>
    <style:style style:name="Tabelle22.E1" style:family="table-cell">
      <style:table-cell-properties fo:padding="0.097cm" fo:border="0.002cm solid #000000"/>
    </style:style>
    <style:style style:name="Tabelle22.A2" style:family="table-cell">
      <style:table-cell-properties fo:padding="0.097cm" fo:border-left="0.002cm solid #000000" fo:border-right="none" fo:border-top="none" fo:border-bottom="0.002cm solid #000000"/>
    </style:style>
    <style:style style:name="Tabelle22.E2" style:family="table-cell">
      <style:table-cell-properties fo:padding="0.097cm" fo:border-left="0.002cm solid #000000" fo:border-right="0.002cm solid #000000" fo:border-top="none" fo:border-bottom="0.002cm solid #000000"/>
    </style:style>
    <style:style style:name="P1" style:family="paragraph" style:parent-style-name="Footer">
      <style:text-properties style:font-name="Arial2"/>
    </style:style>
    <style:style style:name="P2" style:family="paragraph" style:parent-style-name="Standard">
      <style:text-properties style:font-name="Bitstream Vera Sans2"/>
    </style:style>
    <style:style style:name="P3" style:family="paragraph" style:parent-style-name="Standard">
      <style:text-properties style:font-name="Bitstream Vera Sans2" fo:font-style="normal" style:font-name-asian="OpenSymbol" style:font-style-asian="normal" style:font-name-complex="OpenSymbol" style:font-style-complex="normal"/>
    </style:style>
    <style:style style:name="P4" style:family="paragraph" style:parent-style-name="Standard">
      <style:paragraph-properties fo:orphans="2" fo:widows="2"/>
      <style:text-properties style:font-name="Bitstream Vera Sans2" fo:font-style="normal" style:font-name-asian="OpenSymbol" style:font-style-asian="normal" style:font-name-complex="OpenSymbol" style:font-style-complex="normal"/>
    </style:style>
    <style:style style:name="P5" style:family="paragraph" style:parent-style-name="Standard">
      <style:paragraph-properties fo:text-align="justify" style:justify-single-word="false" fo:orphans="2" fo:widows="2"/>
      <style:text-properties style:font-name="Bitstream Vera Sans2" fo:font-style="normal" style:font-name-asian="OpenSymbol" style:font-style-asian="normal" style:font-name-complex="OpenSymbol" style:font-style-complex="normal"/>
    </style:style>
    <style:style style:name="P6" style:family="paragraph" style:parent-style-name="Standard" style:master-page-name="">
      <style:paragraph-properties style:page-number="auto" fo:keep-with-next="always"/>
      <style:text-properties style:font-name="Bitstream Vera Sans2"/>
    </style:style>
    <style:style style:name="P7" style:family="paragraph" style:parent-style-name="Text_20_body_20_2" style:master-page-name="">
      <style:paragraph-properties fo:orphans="2" fo:widows="2" style:page-number="auto" fo:keep-with-next="always"/>
    </style:style>
    <style:style style:name="P8" style:family="paragraph" style:parent-style-name="Text_20_body_20_2" style:master-page-name="">
      <style:paragraph-properties fo:keep-together="auto" fo:orphans="0" fo:widows="0" style:page-number="auto" fo:keep-with-next="always"/>
      <style:text-properties style:font-name="Bitstream Vera Sans2"/>
    </style:style>
    <style:style style:name="P9" style:family="paragraph" style:parent-style-name="Text_20_body_20_2" style:master-page-name="">
      <style:paragraph-properties fo:keep-together="auto" fo:orphans="2" fo:widows="2" style:page-number="auto" fo:keep-with-next="always"/>
      <style:text-properties style:font-name="Bitstream Vera Sans2"/>
    </style:style>
    <style:style style:name="P10" style:family="paragraph" style:parent-style-name="Text_20_body_20_2" style:master-page-name="">
      <style:paragraph-properties fo:orphans="0" fo:widows="0" style:page-number="auto" fo:keep-with-next="always"/>
      <style:text-properties style:font-name="Bitstream Vera Sans2" fo:font-style="normal" style:font-name-asian="OpenSymbol" style:font-style-asian="normal" style:font-name-complex="OpenSymbol" style:font-style-complex="normal"/>
    </style:style>
    <style:style style:name="P11" style:family="paragraph" style:parent-style-name="Text_20_body_20_2" style:master-page-name="">
      <style:paragraph-properties fo:orphans="2" fo:widows="2" style:page-number="auto" fo:keep-with-next="always"/>
      <style:text-properties style:font-name="Bitstream Vera Sans2" fo:font-style="normal" style:font-name-asian="OpenSymbol" style:font-style-asian="normal" style:font-name-complex="OpenSymbol" style:font-style-complex="normal"/>
    </style:style>
    <style:style style:name="P12" style:family="paragraph" style:parent-style-name="Text_20_body_20_2" style:master-page-name="">
      <style:paragraph-properties fo:text-align="justify" style:justify-single-word="false" fo:keep-together="always" fo:orphans="0" fo:widows="0" style:page-number="auto" fo:keep-with-next="always"/>
      <style:text-properties style:font-name="Bitstream Vera Sans2" fo:font-style="normal" style:font-name-asian="OpenSymbol" style:font-style-asian="normal" style:font-name-complex="OpenSymbol" style:font-style-complex="normal"/>
    </style:style>
    <style:style style:name="P13" style:family="paragraph" style:parent-style-name="Standard" style:master-page-name="">
      <style:paragraph-properties style:page-number="auto"/>
      <style:text-properties style:font-name="Bitstream Vera Sans2"/>
    </style:style>
    <style:style style:name="P14" style:family="paragraph" style:parent-style-name="Standard" style:master-page-name="">
      <style:paragraph-properties fo:orphans="2" fo:widows="2" style:page-number="auto"/>
      <style:text-properties style:font-name="Bitstream Vera Sans2" fo:font-style="normal" style:font-name-asian="OpenSymbol1" style:font-style-asian="normal" style:font-name-complex="OpenSymbol1" style:font-style-complex="normal"/>
    </style:style>
    <style:style style:name="P15" style:family="paragraph" style:parent-style-name="Text_20_body_20_2" style:master-page-name="">
      <style:paragraph-properties fo:orphans="0" fo:widows="0" style:page-number="auto" fo:keep-with-next="auto"/>
    </style:style>
    <style:style style:name="P16" style:family="paragraph" style:parent-style-name="Text_20_body_20_2" style:master-page-name="">
      <style:paragraph-properties fo:keep-together="auto" fo:orphans="2" fo:widows="2" style:page-number="auto" fo:keep-with-next="auto"/>
    </style:style>
    <style:style style:name="P17" style:family="paragraph" style:parent-style-name="Text_20_body_20_2" style:master-page-name="">
      <style:paragraph-properties fo:orphans="2" fo:widows="2" style:page-number="auto" fo:keep-with-next="auto"/>
    </style:style>
    <style:style style:name="P18" style:family="paragraph" style:parent-style-name="Text_20_body_20_2" style:master-page-name="">
      <style:paragraph-properties fo:keep-together="auto" fo:orphans="2" fo:widows="2" style:page-number="auto" fo:keep-with-next="auto"/>
      <style:text-properties style:font-name="Bitstream Vera Sans2"/>
    </style:style>
    <style:style style:name="P19" style:family="paragraph" style:parent-style-name="Text_20_body_20_2" style:master-page-name="">
      <style:paragraph-properties fo:orphans="2" fo:widows="2" style:page-number="auto" fo:keep-with-next="auto"/>
      <style:text-properties style:font-name="Bitstream Vera Sans2" style:font-name-asian="OpenSymbol" style:font-name-complex="OpenSymbol"/>
    </style:style>
    <style:style style:name="P20" style:family="paragraph" style:parent-style-name="Text_20_body_20_2" style:master-page-name="">
      <style:paragraph-properties fo:text-align="start" style:justify-single-word="false" fo:orphans="2" fo:widows="2" style:page-number="auto" fo:keep-with-next="auto"/>
      <style:text-properties style:font-name="Bitstream Vera Sans2" fo:font-style="normal" style:font-name-asian="OpenSymbol" style:font-style-asian="normal" style:font-name-complex="OpenSymbol" style:font-style-complex="normal"/>
    </style:style>
    <style:style style:name="P21" style:family="paragraph" style:parent-style-name="Text_20_body_20_2" style:master-page-name="">
      <style:paragraph-properties fo:text-align="start" style:justify-single-word="false" fo:keep-together="auto" fo:orphans="2" fo:widows="2" style:page-number="auto" fo:keep-with-next="auto"/>
      <style:text-properties style:font-name="Bitstream Vera Sans2" fo:font-style="normal" style:font-name-asian="OpenSymbol" style:font-style-asian="normal" style:font-name-complex="OpenSymbol" style:font-style-complex="normal"/>
    </style:style>
    <style:style style:name="P22" style:family="paragraph" style:parent-style-name="Text_20_body_20_2" style:master-page-name="">
      <style:paragraph-properties fo:text-align="justify" style:justify-single-word="false" fo:keep-together="always" fo:orphans="0" fo:widows="0" style:page-number="auto" fo:keep-with-next="auto"/>
      <style:text-properties style:font-name="Bitstream Vera Sans2" fo:font-style="normal" style:font-name-asian="OpenSymbol" style:font-style-asian="normal" style:font-name-complex="OpenSymbol" style:font-style-complex="normal"/>
    </style:style>
    <style:style style:name="P23" style:family="paragraph" style:parent-style-name="Text_20_body_20_2" style:master-page-name="">
      <style:paragraph-properties fo:text-align="justify" style:justify-single-word="false" fo:orphans="2" fo:widows="2" style:page-number="auto" fo:keep-with-next="auto"/>
      <style:text-properties style:font-name="Bitstream Vera Sans2" fo:font-style="normal" style:font-name-asian="OpenSymbol" style:font-style-asian="normal" style:font-name-complex="OpenSymbol" style:font-style-complex="normal"/>
    </style:style>
    <style:style style:name="P24" style:family="paragraph" style:parent-style-name="Text_20_body_20_2" style:master-page-name="">
      <style:paragraph-properties fo:keep-together="auto" fo:orphans="2" fo:widows="2" style:page-number="auto"/>
    </style:style>
    <style:style style:name="P25" style:family="paragraph" style:parent-style-name="Text_20_body_20_2" style:master-page-name="">
      <style:paragraph-properties fo:orphans="2" fo:widows="2" style:page-number="auto"/>
    </style:style>
    <style:style style:name="P26" style:family="paragraph" style:parent-style-name="Text_20_body_20_2" style:master-page-name="">
      <style:paragraph-properties fo:keep-together="auto" fo:orphans="2" fo:widows="2" style:page-number="auto"/>
      <style:text-properties style:font-name="Bitstream Vera Sans2"/>
    </style:style>
    <style:style style:name="P27" style:family="paragraph" style:parent-style-name="Text_20_body_20_2" style:master-page-name="">
      <style:paragraph-properties fo:text-align="start" style:justify-single-word="false" fo:orphans="2" fo:widows="2" style:page-number="auto"/>
      <style:text-properties style:font-name="Bitstream Vera Sans2" fo:font-style="normal" style:font-name-asian="OpenSymbol" style:font-style-asian="normal" style:font-name-complex="OpenSymbol" style:font-style-complex="normal"/>
    </style:style>
    <style:style style:name="P28" style:family="paragraph" style:parent-style-name="Standard">
      <style:paragraph-properties fo:orphans="0" fo:widows="0" fo:keep-with-next="always"/>
      <style:text-properties style:font-name="Bitstream Vera Sans2" fo:font-style="normal" style:font-name-asian="OpenSymbol" style:font-style-asian="normal" style:font-name-complex="OpenSymbol" style:font-style-complex="normal"/>
    </style:style>
    <style:style style:name="P29" style:family="paragraph" style:parent-style-name="Table_20_Contents">
      <style:paragraph-properties fo:orphans="0" fo:widows="0" fo:keep-with-next="always"/>
      <style:text-properties style:font-name="Bitstream Vera Sans2" fo:font-size="12pt" fo:language="de" fo:country="DE" fo:font-weight="normal" fo:background-color="transparent" style:font-name-asian="OpenSymbol" style:font-size-asian="12pt" style:font-name-complex="OpenSymbol" style:font-size-complex="12pt"/>
    </style:style>
    <style:style style:name="P30" style:family="paragraph" style:parent-style-name="Table_20_Contents">
      <style:paragraph-properties fo:text-align="center" style:justify-single-word="false" fo:keep-together="always" fo:orphans="0" fo:widows="0" fo:keep-with-next="always"/>
      <style:text-properties style:font-name="Bitstream Vera Sans2" style:font-name-asian="OpenSymbol" style:font-name-complex="OpenSymbol"/>
    </style:style>
    <style:style style:name="P31" style:family="paragraph" style:parent-style-name="Table_20_Contents">
      <style:paragraph-properties fo:keep-together="always" fo:keep-with-next="always"/>
      <style:text-properties style:font-name="Bitstream Vera Sans2" fo:language="de" fo:country="DE" fo:font-weight="normal" style:font-name-asian="OpenSymbol" style:font-name-complex="OpenSymbol"/>
    </style:style>
    <style:style style:name="P32" style:family="paragraph" style:parent-style-name="Table_20_Contents">
      <style:paragraph-properties fo:orphans="0" fo:widows="0" fo:keep-with-next="always"/>
      <style:text-properties style:font-name="Bitstream Vera Sans2" fo:font-size="10pt" fo:language="de" fo:country="DE" fo:font-weight="normal" fo:background-color="transparent" style:font-name-asian="OpenSymbol" style:font-size-asian="10pt" style:font-name-complex="OpenSymbol" style:font-size-complex="10pt"/>
    </style:style>
    <style:style style:name="P33" style:family="paragraph" style:parent-style-name="Table_20_Contents">
      <style:paragraph-properties fo:orphans="0" fo:widows="0" fo:keep-with-next="always"/>
      <style:text-properties style:font-name="Bitstream Vera Sans2" fo:font-size="9pt" fo:language="de" fo:country="DE" fo:font-weight="normal" fo:background-color="transparent" style:font-name-asian="OpenSymbol" style:font-size-asian="9pt" style:font-name-complex="OpenSymbol" style:font-size-complex="9pt"/>
    </style:style>
    <style:style style:name="P34" style:family="paragraph" style:parent-style-name="Text_20_body_20_2">
      <style:paragraph-properties fo:keep-together="auto" fo:orphans="2" fo:widows="2" fo:keep-with-next="always"/>
    </style:style>
    <style:style style:name="P35" style:family="paragraph" style:parent-style-name="Text_20_body_20_2">
      <style:paragraph-properties fo:keep-together="auto" fo:orphans="0" fo:widows="0" fo:keep-with-next="always"/>
      <style:text-properties style:font-name="Bitstream Vera Sans2"/>
    </style:style>
    <style:style style:name="P36" style:family="paragraph" style:parent-style-name="Text_20_body_20_2">
      <style:paragraph-properties fo:keep-together="auto" fo:orphans="2" fo:widows="2" fo:keep-with-next="always"/>
      <style:text-properties style:font-name="Bitstream Vera Sans2"/>
    </style:style>
    <style:style style:name="P37" style:family="paragraph" style:parent-style-name="Text_20_body_20_2">
      <style:paragraph-properties fo:orphans="0" fo:widows="0" fo:keep-with-next="always"/>
      <style:text-properties style:font-name="Bitstream Vera Sans2" fo:font-style="normal" style:font-name-asian="OpenSymbol" style:font-style-asian="normal" style:font-name-complex="OpenSymbol" style:font-style-complex="normal"/>
    </style:style>
    <style:style style:name="P38" style:family="paragraph" style:parent-style-name="Text_20_body_20_2">
      <style:paragraph-properties fo:orphans="2" fo:widows="2" fo:keep-with-next="always"/>
      <style:text-properties style:font-name="Bitstream Vera Sans2" fo:font-style="normal" style:font-name-asian="OpenSymbol" style:font-style-asian="normal" style:font-name-complex="OpenSymbol" style:font-style-complex="normal"/>
    </style:style>
    <style:style style:name="P39" style:family="paragraph" style:parent-style-name="Text_20_body_20_2">
      <style:paragraph-properties fo:keep-together="auto" fo:orphans="0" fo:widows="0" fo:keep-with-next="always"/>
      <style:text-properties style:font-name="Bitstream Vera Sans2" fo:font-style="normal" style:font-name-asian="OpenSymbol" style:font-style-asian="normal" style:font-name-complex="OpenSymbol" style:font-style-complex="normal"/>
    </style:style>
    <style:style style:name="P40" style:family="paragraph" style:parent-style-name="Text_20_body_20_2">
      <style:paragraph-properties fo:keep-together="auto" fo:orphans="2" fo:widows="2" fo:keep-with-next="always"/>
      <style:text-properties style:font-name="Bitstream Vera Sans2" fo:font-style="normal" style:font-name-asian="OpenSymbol" style:font-style-asian="normal" style:font-name-complex="OpenSymbol" style:font-style-complex="normal"/>
    </style:style>
    <style:style style:name="P41" style:family="paragraph" style:parent-style-name="Text_20_body_20_2">
      <style:paragraph-properties fo:keep-together="always" fo:orphans="0" fo:widows="0" fo:keep-with-next="always"/>
      <style:text-properties style:font-name="Bitstream Vera Sans2" fo:font-style="normal" style:font-name-asian="OpenSymbol" style:font-style-asian="normal" style:font-name-complex="OpenSymbol" style:font-style-complex="normal"/>
    </style:style>
    <style:style style:name="P42" style:family="paragraph" style:parent-style-name="Text_20_body_20_2">
      <style:paragraph-properties fo:text-align="justify" style:justify-single-word="false" fo:orphans="0" fo:widows="0" fo:keep-with-next="always"/>
      <style:text-properties style:font-name="Bitstream Vera Sans2" fo:font-style="normal" style:font-name-asian="OpenSymbol" style:font-style-asian="normal" style:font-name-complex="OpenSymbol" style:font-style-complex="normal"/>
    </style:style>
    <style:style style:name="P43" style:family="paragraph" style:parent-style-name="Text_20_body_20_2">
      <style:paragraph-properties fo:text-align="justify" style:justify-single-word="false" fo:keep-together="always" fo:orphans="2" fo:widows="2" fo:keep-with-next="always"/>
      <style:text-properties style:font-name="Bitstream Vera Sans2" fo:font-style="normal" style:font-name-asian="OpenSymbol" style:font-style-asian="normal" style:font-name-complex="OpenSymbol" style:font-style-complex="normal"/>
    </style:style>
    <style:style style:name="P44" style:family="paragraph" style:parent-style-name="Text_20_body_20_2">
      <style:paragraph-properties fo:text-align="justify" style:justify-single-word="false" fo:keep-together="always" fo:orphans="0" fo:widows="0" fo:keep-with-next="always"/>
      <style:text-properties style:font-name="Bitstream Vera Sans2" fo:font-style="normal" style:font-name-asian="OpenSymbol" style:font-style-asian="normal" style:font-name-complex="OpenSymbol" style:font-style-complex="normal"/>
    </style:style>
    <style:style style:name="P45" style:family="paragraph" style:parent-style-name="Text_20_body_20_2">
      <style:paragraph-properties fo:text-align="justify" style:justify-single-word="false" fo:keep-together="auto" fo:orphans="0" fo:widows="0" fo:keep-with-next="always"/>
      <style:text-properties style:font-name="Bitstream Vera Sans2" fo:font-style="normal" style:font-name-asian="OpenSymbol" style:font-style-asian="normal" style:font-name-complex="OpenSymbol" style:font-style-complex="normal"/>
    </style:style>
    <style:style style:name="P46" style:family="paragraph" style:parent-style-name="Standard">
      <style:paragraph-properties fo:margin-left="0cm" fo:margin-right="0cm" fo:text-indent="0cm" style:auto-text-indent="false"/>
      <style:text-properties style:font-name="Bitstream Vera Sans2"/>
    </style:style>
    <style:style style:name="P47" style:family="paragraph" style:parent-style-name="Standard">
      <style:paragraph-properties fo:margin-left="0cm" fo:margin-right="0cm" fo:text-indent="0cm" style:auto-text-indent="false"/>
      <style:text-properties style:font-name="Bitstream Vera Sans2" fo:font-weight="bold" style:font-weight-asian="bold" style:font-weight-complex="bold"/>
    </style:style>
    <style:style style:name="P48" style:family="paragraph" style:parent-style-name="Standard">
      <style:paragraph-properties fo:margin-left="0cm" fo:margin-right="0cm" fo:text-align="justify" style:justify-single-word="false" fo:orphans="2" fo:widows="2" fo:text-indent="0cm" style:auto-text-indent="false"/>
      <style:text-properties style:font-name="Bitstream Vera Sans2" fo:font-size="10pt" fo:font-style="normal" style:font-name-asian="OpenSymbol" style:font-size-asian="10pt" style:font-style-asian="normal" style:font-name-complex="OpenSymbol" style:font-size-complex="10pt" style:font-style-complex="normal"/>
    </style:style>
    <style:style style:name="P49" style:family="paragraph" style:parent-style-name="Standard">
      <style:paragraph-properties fo:margin-left="0cm" fo:margin-right="0cm" fo:text-indent="0cm" style:auto-text-indent="false"/>
      <style:text-properties style:font-name="Bitstream Vera Sans2" fo:font-size="10pt" style:font-size-asian="10pt" style:font-size-complex="10pt"/>
    </style:style>
    <style:style style:name="P50" style:family="paragraph" style:parent-style-name="Text_20_body_20_2">
      <style:paragraph-properties fo:margin-left="0cm" fo:margin-right="0cm" fo:orphans="2" fo:widows="2" fo:text-indent="0cm" style:auto-text-indent="false"/>
    </style:style>
    <style:style style:name="P51" style:family="paragraph" style:parent-style-name="Text_20_body_20_2">
      <style:paragraph-properties fo:margin-left="0cm" fo:margin-right="0cm" fo:text-align="justify" style:justify-single-word="false" fo:orphans="2" fo:widows="2" fo:text-indent="0cm" style:auto-text-indent="false"/>
    </style:style>
    <style:style style:name="P52" style:family="paragraph" style:parent-style-name="Text_20_body_20_2">
      <style:paragraph-properties fo:margin-left="0cm" fo:margin-right="0cm" fo:orphans="2" fo:widows="2" fo:text-indent="0cm" style:auto-text-indent="false"/>
      <style:text-properties fo:font-size="10pt" style:font-size-asian="10pt" style:font-size-complex="10pt"/>
    </style:style>
    <style:style style:name="P53" style:family="paragraph" style:parent-style-name="Standard">
      <style:paragraph-properties fo:text-align="justify" style:justify-single-word="false" fo:orphans="2" fo:widows="2" fo:keep-with-next="auto"/>
      <style:text-properties style:font-name="Bitstream Vera Sans2" fo:font-style="normal" style:font-name-asian="OpenSymbol" style:font-style-asian="normal" style:font-name-complex="OpenSymbol" style:font-style-complex="normal"/>
    </style:style>
    <style:style style:name="P54" style:family="paragraph" style:parent-style-name="Standard">
      <style:paragraph-properties fo:orphans="2" fo:widows="2" fo:keep-with-next="auto"/>
    </style:style>
    <style:style style:name="P55" style:family="paragraph" style:parent-style-name="Table_20_Contents">
      <style:paragraph-properties fo:keep-with-next="auto"/>
      <style:text-properties style:font-name="Bitstream Vera Sans2"/>
    </style:style>
    <style:style style:name="P56" style:family="paragraph" style:parent-style-name="Table_20_Contents">
      <style:paragraph-properties fo:text-align="center" style:justify-single-word="false" fo:orphans="2" fo:widows="2" fo:keep-with-next="auto"/>
      <style:text-properties style:font-name="Bitstream Vera Sans2" fo:font-size="8pt" fo:language="de" fo:country="DE" fo:background-color="transparent" style:font-name-asian="OpenSymbol" style:font-size-asian="8pt" style:font-name-complex="OpenSymbol" style:font-size-complex="8pt"/>
    </style:style>
    <style:style style:name="P57" style:family="paragraph" style:parent-style-name="Table_20_Contents">
      <style:paragraph-properties fo:orphans="2" fo:widows="2" fo:keep-with-next="auto"/>
      <style:text-properties style:font-name="Bitstream Vera Sans2" fo:font-size="8pt" fo:language="de" fo:country="DE" fo:background-color="transparent" style:font-name-asian="OpenSymbol" style:font-size-asian="8pt" style:font-name-complex="OpenSymbol" style:font-size-complex="8pt"/>
    </style:style>
    <style:style style:name="P58" style:family="paragraph" style:parent-style-name="Table_20_Contents">
      <style:paragraph-properties fo:orphans="2" fo:widows="2" fo:keep-with-next="auto"/>
      <style:text-properties style:font-name="Bitstream Vera Sans2"/>
    </style:style>
    <style:style style:name="P59" style:family="paragraph" style:parent-style-name="Table_20_Contents">
      <style:paragraph-properties fo:keep-with-next="auto"/>
      <style:text-properties style:font-name="Bitstream Vera Sans2" fo:language="de" fo:country="DE" fo:font-weight="normal" style:font-name-asian="OpenSymbol" style:font-name-complex="OpenSymbol"/>
    </style:style>
    <style:style style:name="P60" style:family="paragraph" style:parent-style-name="Table_20_Contents">
      <style:paragraph-properties fo:text-align="center" style:justify-single-word="false" fo:keep-with-next="auto"/>
      <style:text-properties style:font-name="Bitstream Vera Sans2" fo:language="de" fo:country="DE" fo:font-weight="normal" style:font-name-asian="OpenSymbol" style:font-name-complex="OpenSymbol"/>
    </style:style>
    <style:style style:name="P61" style:family="paragraph" style:parent-style-name="Table_20_Contents">
      <style:paragraph-properties fo:text-align="start" style:justify-single-word="false" fo:keep-with-next="auto"/>
      <style:text-properties style:font-name="Bitstream Vera Sans2" fo:language="de" fo:country="DE" fo:font-weight="normal" style:font-name-asian="OpenSymbol" style:font-name-complex="OpenSymbol"/>
    </style:style>
    <style:style style:name="P62" style:family="paragraph" style:parent-style-name="Table_20_Contents">
      <style:paragraph-properties fo:keep-with-next="auto"/>
      <style:text-properties style:font-name="Bitstream Vera Sans2" fo:font-size="10pt" fo:language="de" fo:country="DE" fo:font-weight="normal" style:font-name-asian="OpenSymbol" style:font-size-asian="10pt" style:font-name-complex="OpenSymbol" style:font-size-complex="10pt"/>
    </style:style>
    <style:style style:name="P63" style:family="paragraph" style:parent-style-name="Table_20_Contents">
      <style:paragraph-properties fo:keep-with-next="auto"/>
      <style:text-properties style:font-name="Bitstream Vera Sans2" fo:font-size="10pt" style:font-size-asian="10pt" style:font-size-complex="10pt"/>
    </style:style>
    <style:style style:name="P64" style:family="paragraph" style:parent-style-name="Text_20_body_20_1">
      <style:paragraph-properties fo:orphans="2" fo:widows="2" fo:keep-with-next="auto"/>
      <style:text-properties style:font-name="Bitstream Vera Sans2"/>
    </style:style>
    <style:style style:name="P65" style:family="paragraph" style:parent-style-name="Text_20_body_20_2">
      <style:paragraph-properties fo:orphans="2" fo:widows="2" fo:keep-with-next="auto"/>
      <style:text-properties style:font-name="Arial2" fo:language="de" fo:country="DE"/>
    </style:style>
    <style:style style:name="P66" style:family="paragraph" style:parent-style-name="Text_20_body_20_2">
      <style:paragraph-properties fo:orphans="2" fo:widows="2" fo:keep-with-next="auto"/>
    </style:style>
    <style:style style:name="P67" style:family="paragraph" style:parent-style-name="Text_20_body_20_2">
      <style:paragraph-properties fo:text-align="justify" style:justify-single-word="false" fo:orphans="2" fo:widows="2" fo:keep-with-next="auto"/>
    </style:style>
    <style:style style:name="P68" style:family="paragraph" style:parent-style-name="Text_20_body_20_2">
      <style:paragraph-properties fo:orphans="0" fo:widows="0" fo:keep-with-next="auto"/>
    </style:style>
    <style:style style:name="P69" style:family="paragraph" style:parent-style-name="Text_20_body_20_2">
      <style:paragraph-properties fo:orphans="2" fo:widows="2" fo:keep-with-next="auto"/>
      <style:text-properties style:font-name="Bitstream Vera Sans2"/>
    </style:style>
    <style:style style:name="P70" style:family="paragraph" style:parent-style-name="Text_20_body_20_2">
      <style:paragraph-properties fo:text-align="start" style:justify-single-word="false" fo:orphans="2" fo:widows="2" fo:keep-with-next="auto"/>
      <style:text-properties style:font-name="Bitstream Vera Sans2"/>
    </style:style>
    <style:style style:name="P71" style:family="paragraph" style:parent-style-name="Text_20_body_20_2">
      <style:paragraph-properties fo:orphans="2" fo:widows="2" fo:keep-with-next="auto"/>
      <style:text-properties style:font-name="Bitstream Vera Sans2" style:font-name-asian="OpenSymbol" style:font-name-complex="OpenSymbol"/>
    </style:style>
    <style:style style:name="P72" style:family="paragraph" style:parent-style-name="Text_20_body_20_2">
      <style:paragraph-properties fo:text-align="start" style:justify-single-word="false" fo:orphans="2" fo:widows="2" fo:keep-with-next="auto"/>
      <style:text-properties style:font-name="Bitstream Vera Sans2" style:font-name-asian="OpenSymbol" style:font-name-complex="OpenSymbol"/>
    </style:style>
    <style:style style:name="P73" style:family="paragraph" style:parent-style-name="Text_20_body_20_2">
      <style:paragraph-properties fo:orphans="2" fo:widows="2" fo:keep-with-next="auto"/>
      <style:text-properties style:font-name="Bitstream Vera Sans2" fo:font-style="normal" style:font-name-asian="OpenSymbol" style:font-style-asian="normal" style:font-name-complex="OpenSymbol" style:font-style-complex="normal"/>
    </style:style>
    <style:style style:name="P74" style:family="paragraph" style:parent-style-name="Text_20_body_20_2">
      <style:paragraph-properties fo:text-align="start" style:justify-single-word="false" fo:orphans="2" fo:widows="2" fo:keep-with-next="auto"/>
      <style:text-properties style:font-name="Bitstream Vera Sans2" fo:font-style="normal" style:font-name-asian="OpenSymbol" style:font-style-asian="normal" style:font-name-complex="OpenSymbol" style:font-style-complex="normal"/>
    </style:style>
    <style:style style:name="P75" style:family="paragraph" style:parent-style-name="Text_20_body_20_2">
      <style:paragraph-properties fo:text-align="justify" style:justify-single-word="false" fo:orphans="2" fo:widows="2" fo:keep-with-next="auto"/>
      <style:text-properties style:font-name="Bitstream Vera Sans2" fo:font-style="normal" style:font-name-asian="OpenSymbol" style:font-style-asian="normal" style:font-name-complex="OpenSymbol" style:font-style-complex="normal"/>
    </style:style>
    <style:style style:name="P76" style:family="paragraph" style:parent-style-name="Text_20_body_20_2">
      <style:paragraph-properties fo:text-align="justify" style:justify-single-word="false" fo:keep-together="always" fo:orphans="0" fo:widows="0" fo:keep-with-next="auto"/>
      <style:text-properties style:font-name="Bitstream Vera Sans2" fo:font-style="normal" style:font-name-asian="OpenSymbol" style:font-style-asian="normal" style:font-name-complex="OpenSymbol" style:font-style-complex="normal"/>
    </style:style>
    <style:style style:name="P77" style:family="paragraph" style:parent-style-name="Text_20_body_20_2">
      <style:paragraph-properties fo:orphans="2" fo:widows="2" fo:keep-with-next="auto"/>
      <style:text-properties style:font-name="Bitstream Vera Sans2" fo:language="de" fo:country="DE" fo:font-style="normal" style:font-name-asian="OpenSymbol" style:font-style-asian="normal" style:font-name-complex="OpenSymbol" style:font-style-complex="normal"/>
    </style:style>
    <style:style style:name="P78" style:family="paragraph" style:parent-style-name="Text_20_body_20_2">
      <style:paragraph-properties fo:orphans="2" fo:widows="2" fo:keep-with-next="auto"/>
      <style:text-properties style:font-name="Bitstream Vera Sans2" fo:language="en" fo:country="US"/>
    </style:style>
    <style:style style:name="P79" style:family="paragraph" style:parent-style-name="Text_20_body_20_2">
      <style:paragraph-properties fo:text-align="justify" style:justify-single-word="false" fo:orphans="2" fo:widows="2" fo:keep-with-next="auto"/>
      <style:text-properties style:font-name="Bitstream Vera Sans2"/>
    </style:style>
    <style:style style:name="P80" style:family="paragraph" style:parent-style-name="Marginalia">
      <style:text-properties style:font-name="Bitstream Vera Sans2" fo:font-size="8pt"/>
    </style:style>
    <style:style style:name="P81" style:family="paragraph" style:parent-style-name="Text_20_body_20_2">
      <style:paragraph-properties fo:margin-left="1cm" fo:margin-right="0cm" fo:orphans="2" fo:widows="2" fo:text-indent="0cm" style:auto-text-indent="false" fo:break-before="auto" fo:break-after="auto">
        <style:tab-stops/>
      </style:paragraph-properties>
    </style:style>
    <style:style style:name="P82" style:family="paragraph" style:parent-style-name="Text_20_body_20_2">
      <style:paragraph-properties fo:margin-left="1cm" fo:margin-right="0cm" fo:orphans="2" fo:text-indent="0cm" style:auto-text-indent="false" fo:break-before="auto" fo:break-after="auto" fo:keep-with-next="always">
        <style:tab-stops/>
      </style:paragraph-properties>
    </style:style>
    <style:style style:name="P83" style:family="paragraph" style:parent-style-name="Text_20_body_20_2">
      <style:paragraph-properties fo:margin-left="1cm" fo:margin-right="0cm" fo:orphans="2" fo:widows="2" fo:text-indent="0cm" style:auto-text-indent="false"/>
    </style:style>
    <style:style style:name="P84" style:family="paragraph" style:parent-style-name="Text_20_body_20_2">
      <style:paragraph-properties fo:margin-left="1cm" fo:margin-right="0cm" fo:orphans="2" fo:text-indent="0cm" style:auto-text-indent="false">
        <style:tab-stops/>
      </style:paragraph-properties>
    </style:style>
    <style:style style:name="P85" style:family="paragraph" style:parent-style-name="Text_20_body_20_2">
      <style:paragraph-properties fo:margin-left="1cm" fo:margin-right="0cm" fo:text-indent="0cm" style:auto-text-indent="false"/>
      <style:text-properties style:font-name="Bitstream Vera Sans2"/>
    </style:style>
    <style:style style:name="P86" style:family="paragraph" style:parent-style-name="Text_20_body_20_2">
      <style:paragraph-properties fo:margin-left="1cm" fo:margin-right="0cm" fo:orphans="2" fo:widows="2" fo:text-indent="0cm" style:auto-text-indent="false"/>
      <style:text-properties style:font-name="Bitstream Vera Sans2" style:font-name-asian="OpenSymbol" style:font-name-complex="OpenSymbol"/>
    </style:style>
    <style:style style:name="P87" style:family="paragraph" style:parent-style-name="Text_20_body_20_2">
      <style:paragraph-properties fo:margin-left="1cm" fo:margin-right="0cm" fo:orphans="2" fo:widows="2" fo:text-indent="0cm" style:auto-text-indent="false"/>
      <style:text-properties style:font-name="Bitstream Vera Sans2" fo:font-style="normal" style:font-name-asian="OpenSymbol" style:font-style-asian="normal" style:font-name-complex="OpenSymbol" style:font-style-complex="normal"/>
    </style:style>
    <style:style style:name="P88" style:family="paragraph" style:parent-style-name="Text_20_body_20_2">
      <style:paragraph-properties fo:margin-left="1cm" fo:margin-right="0cm" fo:margin-top="0cm" fo:margin-bottom="0.212cm" fo:text-align="justify" style:justify-single-word="false" fo:keep-together="auto" fo:orphans="2" fo:widows="2" fo:hyphenation-ladder-count="no-limit" fo:text-indent="0cm" style:auto-text-indent="false">
        <style:tab-stops/>
        <style:drop-cap/>
      </style:paragraph-properties>
      <style:text-properties style:font-name="Bitstream Vera Sans2" fo:language="de" fo:country="DE" fo:font-style="normal" fo:font-weight="normal" style:font-name-asian="OpenSymbol" style:font-style-asian="normal" style:font-name-complex="OpenSymbol" style:font-style-complex="normal" fo:hyphenate="true" fo:hyphenation-remain-char-count="2" fo:hyphenation-push-char-count="2"/>
    </style:style>
    <style:style style:name="P89" style:family="paragraph" style:parent-style-name="Text_20_body_20_2">
      <style:paragraph-properties fo:margin-left="1cm" fo:margin-right="0cm" fo:margin-top="0cm" fo:margin-bottom="0.212cm" fo:text-align="justify" style:justify-single-word="false" fo:orphans="2" fo:widows="2" fo:hyphenation-ladder-count="no-limit" fo:text-indent="0cm" style:auto-text-indent="false">
        <style:tab-stops/>
        <style:drop-cap/>
      </style:paragraph-properties>
      <style:text-properties style:font-name="Bitstream Vera Sans2" fo:font-style="normal" style:font-name-asian="OpenSymbol" style:font-style-asian="normal" style:font-name-complex="OpenSymbol" style:font-style-complex="normal" fo:hyphenate="true" fo:hyphenation-remain-char-count="2" fo:hyphenation-push-char-count="2"/>
    </style:style>
    <style:style style:name="P90" style:family="paragraph" style:parent-style-name="Text_20_body_20_2">
      <style:paragraph-properties fo:margin-left="1cm" fo:margin-right="0cm" fo:margin-top="0cm" fo:margin-bottom="0.212cm" fo:text-align="justify" style:justify-single-word="false" fo:keep-together="auto" fo:orphans="2" fo:widows="2" fo:hyphenation-ladder-count="no-limit" fo:text-indent="0cm" style:auto-text-indent="false">
        <style:tab-stops/>
        <style:drop-cap/>
      </style:paragraph-properties>
      <style:text-properties fo:hyphenate="true" fo:hyphenation-remain-char-count="2" fo:hyphenation-push-char-count="2"/>
    </style:style>
    <style:style style:name="P91" style:family="paragraph" style:parent-style-name="Text_20_body_20_2">
      <style:paragraph-properties fo:margin-left="1cm" fo:margin-right="0cm" fo:margin-top="0cm" fo:margin-bottom="0.212cm" fo:text-align="justify" style:justify-single-word="false" fo:keep-together="auto" fo:hyphenation-ladder-count="no-limit" fo:text-indent="0cm" style:auto-text-indent="false" fo:keep-with-next="always">
        <style:tab-stops/>
        <style:drop-cap/>
      </style:paragraph-properties>
      <style:text-properties style:font-name="Bitstream Vera Sans2" fo:language="de" fo:country="DE" fo:font-style="normal" fo:font-weight="normal" style:font-name-asian="OpenSymbol" style:font-style-asian="normal" style:font-name-complex="OpenSymbol" style:font-style-complex="normal" fo:hyphenate="true" fo:hyphenation-remain-char-count="2" fo:hyphenation-push-char-count="2"/>
    </style:style>
    <style:style style:name="P92" style:family="paragraph" style:parent-style-name="Text_20_body_20_2">
      <style:paragraph-properties fo:margin-left="1cm" fo:margin-right="0cm" fo:margin-top="0cm" fo:margin-bottom="0.212cm" fo:text-align="justify" style:justify-single-word="false" fo:keep-together="auto" fo:orphans="2" fo:widows="2" fo:hyphenation-ladder-count="no-limit" fo:text-indent="0cm" style:auto-text-indent="false" fo:keep-with-next="auto">
        <style:tab-stops/>
        <style:drop-cap/>
      </style:paragraph-properties>
      <style:text-properties fo:hyphenate="true" fo:hyphenation-remain-char-count="2" fo:hyphenation-push-char-count="2"/>
    </style:style>
    <style:style style:name="P93" style:family="paragraph" style:parent-style-name="Text_20_body_20_2">
      <style:paragraph-properties fo:margin-left="1cm" fo:margin-right="0cm" fo:orphans="2" fo:widows="2" fo:text-indent="0cm" style:auto-text-indent="false" fo:keep-with-next="auto"/>
      <style:text-properties style:font-name="Bitstream Vera Sans2" fo:language="de" fo:country="DE" fo:font-style="normal" style:font-name-asian="OpenSymbol" style:font-style-asian="normal" style:font-name-complex="OpenSymbol" style:font-style-complex="normal"/>
    </style:style>
    <style:style style:name="P94" style:family="paragraph" style:parent-style-name="Table_20_Contents">
      <style:text-properties style:font-name="Bitstream Vera Sans2"/>
    </style:style>
    <style:style style:name="P95" style:family="paragraph" style:parent-style-name="Table_20_Contents">
      <style:text-properties style:font-name="Bitstream Vera Sans2" fo:language="en" fo:country="US"/>
    </style:style>
    <style:style style:name="P96" style:family="paragraph" style:parent-style-name="Table_20_Contents">
      <style:text-properties style:font-name="Bitstream Vera Sans2" fo:language="en" fo:country="US" fo:font-weight="normal" style:font-name-asian="OpenSymbol" style:font-name-complex="OpenSymbol"/>
    </style:style>
    <style:style style:name="P97" style:family="paragraph" style:parent-style-name="Table_20_Contents">
      <style:text-properties style:font-name="Bitstream Vera Sans2" fo:language="en" fo:country="US" style:font-name-asian="OpenSymbol" style:font-name-complex="OpenSymbol"/>
    </style:style>
    <style:style style:name="P98" style:family="paragraph" style:parent-style-name="Table_20_Contents">
      <style:text-properties style:font-name="Bitstream Vera Sans2" fo:font-size="9pt" fo:language="de" fo:country="DE" fo:font-weight="bold" style:font-name-asian="OpenSymbol" style:font-size-asian="9pt" style:font-weight-asian="bold" style:font-name-complex="OpenSymbol" style:font-size-complex="9pt" style:font-weight-complex="bold"/>
    </style:style>
    <style:style style:name="P99" style:family="paragraph" style:parent-style-name="Table_20_Contents">
      <style:paragraph-properties fo:text-align="center" style:justify-single-word="false"/>
      <style:text-properties style:font-name="Bitstream Vera Sans2" fo:font-size="9pt" fo:language="de" fo:country="DE" fo:font-weight="bold" style:font-name-asian="OpenSymbol" style:font-size-asian="9pt" style:font-weight-asian="bold" style:font-name-complex="OpenSymbol" style:font-size-complex="9pt" style:font-weight-complex="bold"/>
    </style:style>
    <style:style style:name="P100" style:family="paragraph" style:parent-style-name="Table_20_Contents">
      <style:paragraph-properties fo:line-height="0.349cm"/>
      <style:text-properties style:font-name="Bitstream Vera Sans2" fo:font-size="9pt" fo:language="de" fo:country="DE" fo:font-weight="bold" style:font-name-asian="OpenSymbol" style:font-size-asian="9pt" style:font-weight-asian="bold" style:font-name-complex="OpenSymbol" style:font-size-complex="9pt" style:font-weight-complex="bold"/>
    </style:style>
    <style:style style:name="P101" style:family="paragraph" style:parent-style-name="Table_20_Contents">
      <style:text-properties style:font-name="Bitstream Vera Sans2" fo:font-size="9pt" fo:language="de" fo:country="DE" fo:font-weight="bold" style:font-name-asian="OpenSymbol" style:font-weight-asian="bold" style:font-name-complex="OpenSymbol" style:font-weight-complex="bold"/>
    </style:style>
    <style:style style:name="P102" style:family="paragraph" style:parent-style-name="Table_20_Contents">
      <style:text-properties style:font-name="Bitstream Vera Sans2" fo:font-size="9pt" fo:language="de" fo:country="DE" fo:font-weight="normal" style:font-size-asian="9pt" style:font-size-complex="9pt"/>
    </style:style>
    <style:style style:name="P103" style:family="paragraph" style:parent-style-name="Table_20_Contents">
      <style:text-properties style:font-name="Bitstream Vera Sans2" fo:font-size="9pt" fo:language="de" fo:country="DE" fo:font-weight="normal" style:font-name-asian="OpenSymbol" style:font-size-asian="9pt" style:font-name-complex="OpenSymbol" style:font-size-complex="9pt"/>
    </style:style>
    <style:style style:name="P104" style:family="paragraph" style:parent-style-name="Table_20_Contents">
      <style:paragraph-properties fo:line-height="0.349cm"/>
      <style:text-properties style:font-name="Bitstream Vera Sans2" fo:font-size="9pt" fo:language="de" fo:country="DE" fo:font-weight="normal" style:font-name-asian="OpenSymbol" style:font-size-asian="9pt" style:font-name-complex="OpenSymbol" style:font-size-complex="9pt"/>
    </style:style>
    <style:style style:name="P105" style:family="paragraph" style:parent-style-name="Table_20_Contents">
      <style:paragraph-properties fo:line-height="100%"/>
      <style:text-properties style:font-name="Bitstream Vera Sans2" fo:font-size="9pt" fo:language="de" fo:country="DE" fo:font-weight="normal" style:font-name-asian="OpenSymbol" style:font-size-asian="9pt" style:font-weight-asian="normal" style:font-name-complex="OpenSymbol" style:font-size-complex="9pt" style:font-weight-complex="normal"/>
    </style:style>
    <style:style style:name="P106" style:family="paragraph" style:parent-style-name="Table_20_Contents">
      <style:paragraph-properties fo:line-height="100%" fo:text-align="center" style:justify-single-word="false"/>
      <style:text-properties style:font-name="Bitstream Vera Sans2" fo:font-size="9pt" fo:language="de" fo:country="DE" fo:font-weight="normal" style:font-name-asian="OpenSymbol" style:font-size-asian="9pt" style:font-weight-asian="normal" style:font-name-complex="OpenSymbol" style:font-size-complex="9pt" style:font-weight-complex="normal"/>
    </style:style>
    <style:style style:name="P107" style:family="paragraph" style:parent-style-name="Table_20_Contents">
      <style:text-properties style:font-name="Bitstream Vera Sans2" fo:font-size="9pt" fo:language="de" fo:country="DE" fo:font-weight="normal" style:font-name-asian="OpenSymbol" style:font-name-complex="OpenSymbol"/>
    </style:style>
    <style:style style:name="P108" style:family="paragraph" style:parent-style-name="Table_20_Contents">
      <style:text-properties style:font-name="Bitstream Vera Sans2" fo:font-size="9pt" fo:language="de" fo:country="DE" style:font-size-asian="9pt" style:font-size-complex="9pt"/>
    </style:style>
    <style:style style:name="P109" style:family="paragraph" style:parent-style-name="Table_20_Contents">
      <style:paragraph-properties fo:line-height="100%" fo:text-align="center" style:justify-single-word="false"/>
      <style:text-properties style:font-name="Bitstream Vera Sans2" fo:font-size="9pt" fo:language="de" fo:country="DE" style:font-name-asian="OpenSymbol" style:font-size-asian="9pt" style:font-name-complex="OpenSymbol" style:font-size-complex="9pt"/>
    </style:style>
    <style:style style:name="P110" style:family="paragraph" style:parent-style-name="Table_20_Contents">
      <style:paragraph-properties fo:text-align="center" style:justify-single-word="false"/>
      <style:text-properties style:font-name="Bitstream Vera Sans2" fo:font-size="9pt" fo:language="de" fo:country="DE" style:font-name-asian="OpenSymbol" style:font-size-asian="9pt" style:font-name-complex="OpenSymbol" style:font-size-complex="9pt"/>
    </style:style>
    <style:style style:name="P111" style:family="paragraph" style:parent-style-name="Table_20_Contents">
      <style:paragraph-properties fo:text-align="start" style:justify-single-word="false"/>
      <style:text-properties style:font-name="Bitstream Vera Sans2" fo:font-size="9pt" fo:language="de" fo:country="DE" style:font-name-asian="OpenSymbol" style:font-size-asian="9pt" style:font-name-complex="OpenSymbol" style:font-size-complex="9pt"/>
    </style:style>
    <style:style style:name="P112" style:family="paragraph" style:parent-style-name="Table_20_Contents">
      <style:text-properties style:font-name="Bitstream Vera Sans2" fo:font-size="9pt" style:font-size-asian="9pt" style:font-size-complex="9pt"/>
    </style:style>
    <style:style style:name="P113" style:family="paragraph" style:parent-style-name="Table_20_Contents">
      <style:paragraph-properties fo:text-align="center" style:justify-single-word="false"/>
      <style:text-properties style:font-name="Bitstream Vera Sans2" fo:font-size="9pt" style:font-size-asian="9pt" style:font-size-complex="9pt"/>
    </style:style>
    <style:style style:name="P114" style:family="paragraph" style:parent-style-name="Table_20_Contents">
      <style:paragraph-properties fo:text-align="start" style:justify-single-word="false"/>
      <style:text-properties style:font-name="Bitstream Vera Sans2" fo:font-size="9pt" style:font-size-asian="9pt" style:font-size-complex="9pt"/>
    </style:style>
    <style:style style:name="P115" style:family="paragraph" style:parent-style-name="Table_20_Contents">
      <style:paragraph-properties fo:line-height="100%" fo:text-align="center" style:justify-single-word="false"/>
      <style:text-properties style:font-name="Bitstream Vera Sans2" fo:font-size="9pt" fo:language="en" fo:country="US" style:font-name-asian="OpenSymbol" style:font-size-asian="9pt" style:font-name-complex="OpenSymbol" style:font-size-complex="9pt"/>
    </style:style>
    <style:style style:name="P116" style:family="paragraph" style:parent-style-name="Table_20_Contents">
      <style:paragraph-properties fo:line-height="100%"/>
      <style:text-properties style:font-name="Bitstream Vera Sans2" fo:font-size="9pt" fo:language="en" fo:country="US" fo:font-weight="normal" style:font-name-asian="OpenSymbol" style:font-size-asian="9pt" style:font-weight-asian="normal" style:font-name-complex="OpenSymbol" style:font-size-complex="9pt" style:font-weight-complex="normal"/>
    </style:style>
    <style:style style:name="P117" style:family="paragraph" style:parent-style-name="Table_20_Contents">
      <style:text-properties style:font-name="Bitstream Vera Sans2" fo:font-size="9pt" fo:language="en" fo:country="US" fo:font-weight="normal" style:font-size-asian="9pt" style:font-size-complex="9pt"/>
    </style:style>
    <style:style style:name="P118" style:family="paragraph" style:parent-style-name="Table_20_Contents">
      <style:paragraph-properties fo:text-align="start" style:justify-single-word="false"/>
      <style:text-properties style:font-name="Bitstream Vera Sans2" fo:font-size="9pt" fo:language="en" fo:country="US" style:font-size-asian="9pt" style:font-size-complex="9pt"/>
    </style:style>
    <style:style style:name="P119" style:family="paragraph" style:parent-style-name="Table_20_Contents">
      <style:text-properties style:font-name="Bitstream Vera Sans2" fo:font-size="9pt" fo:language="en" fo:country="GB" fo:font-weight="normal" style:font-name-asian="OpenSymbol" style:font-size-asian="9pt" style:font-name-complex="OpenSymbol" style:font-size-complex="9pt"/>
    </style:style>
    <style:style style:name="P120" style:family="paragraph" style:parent-style-name="Table_20_Contents">
      <style:text-properties style:font-name="Bitstream Vera Sans2" fo:font-weight="bold" style:font-name-asian="OpenSymbol" style:font-weight-asian="bold" style:font-name-complex="OpenSymbol" style:font-weight-complex="bold"/>
    </style:style>
    <style:style style:name="P121" style:family="paragraph" style:parent-style-name="Table_20_Contents">
      <style:text-properties style:font-name="Bitstream Vera Sans2" style:font-name-asian="OpenSymbol" style:font-name-complex="OpenSymbol"/>
    </style:style>
    <style:style style:name="P122" style:family="paragraph" style:parent-style-name="Table_20_Contents">
      <style:paragraph-properties fo:text-align="center" style:justify-single-word="false"/>
      <style:text-properties style:font-name="Bitstream Vera Sans2" style:font-name-asian="OpenSymbol" style:font-name-complex="OpenSymbol"/>
    </style:style>
    <style:style style:name="P123" style:family="paragraph" style:parent-style-name="Table_20_Contents">
      <style:paragraph-properties fo:text-align="start" style:justify-single-word="false"/>
      <style:text-properties style:font-name="Bitstream Vera Sans2" style:font-name-asian="OpenSymbol" style:font-name-complex="OpenSymbol"/>
    </style:style>
    <style:style style:name="P124" style:family="paragraph" style:parent-style-name="Table_20_Contents">
      <style:text-properties style:font-name="Bitstream Vera Sans2" style:font-name-asian="OpenSymbol" style:font-size-asian="12pt" style:font-style-asian="normal" style:font-weight-asian="normal" style:font-name-complex="OpenSymbol" style:font-size-complex="12pt" style:font-style-complex="normal" style:font-weight-complex="normal"/>
    </style:style>
    <style:style style:name="P125" style:family="paragraph" style:parent-style-name="Table_20_Contents">
      <style:text-properties style:font-name="Bitstream Vera Sans2" fo:language="de" fo:country="DE" style:font-name-asian="OpenSymbol" style:font-name-complex="OpenSymbol"/>
    </style:style>
    <style:style style:name="P126" style:family="paragraph" style:parent-style-name="Table_20_Contents">
      <style:text-properties style:font-name="Bitstream Vera Sans2" fo:language="de" fo:country="DE" fo:font-weight="normal" style:font-name-asian="OpenSymbol" style:font-name-complex="OpenSymbol"/>
    </style:style>
    <style:style style:name="P127" style:family="paragraph" style:parent-style-name="Table_20_Contents">
      <style:paragraph-properties fo:text-align="center" style:justify-single-word="false"/>
      <style:text-properties style:font-name="Bitstream Vera Sans2" fo:language="de" fo:country="DE" fo:font-weight="normal" style:font-name-asian="OpenSymbol" style:font-name-complex="OpenSymbol"/>
    </style:style>
    <style:style style:name="P128" style:family="paragraph" style:parent-style-name="Table_20_Contents">
      <style:text-properties style:font-name="Bitstream Vera Sans2" fo:language="de" fo:country="DE" fo:font-style="normal" fo:font-weight="bold" style:font-name-asian="OpenSymbol" style:font-style-asian="normal" style:font-weight-asian="bold" style:font-name-complex="OpenSymbol" style:font-style-complex="normal" style:font-weight-complex="bold"/>
    </style:style>
    <style:style style:name="P129" style:family="paragraph" style:parent-style-name="Table_20_Contents">
      <style:text-properties style:font-name="Bitstream Vera Sans2" fo:font-size="10pt" style:font-name-asian="OpenSymbol" style:font-size-asian="12pt" style:font-style-asian="normal" style:font-weight-asian="normal" style:font-name-complex="OpenSymbol" style:font-size-complex="12pt" style:font-style-complex="normal" style:font-weight-complex="normal"/>
    </style:style>
    <style:style style:name="P130" style:family="paragraph" style:parent-style-name="Table_20_Contents">
      <style:text-properties style:font-name="Bitstream Vera Sans2" fo:font-size="10pt" style:font-name-asian="OpenSymbol" style:font-size-asian="10pt" style:font-name-complex="OpenSymbol" style:font-size-complex="10pt"/>
    </style:style>
    <style:style style:name="P131" style:family="paragraph" style:parent-style-name="Table_20_Contents">
      <style:text-properties style:font-name="Bitstream Vera Sans2" fo:font-size="10pt" fo:language="de" fo:country="DE" style:font-name-asian="OpenSymbol" style:font-size-asian="12pt" style:font-style-asian="normal" style:font-weight-asian="normal" style:font-name-complex="OpenSymbol" style:font-size-complex="12pt" style:font-style-complex="normal" style:font-weight-complex="normal"/>
    </style:style>
    <style:style style:name="P132" style:family="paragraph" style:parent-style-name="Table_20_Contents">
      <style:text-properties style:font-name="Bitstream Vera Sans2" fo:font-size="10pt" fo:language="de" fo:country="DE" style:font-name-asian="OpenSymbol" style:font-size-asian="10pt" style:font-name-complex="OpenSymbol" style:font-size-complex="10pt"/>
    </style:style>
    <style:style style:name="P133" style:family="paragraph" style:parent-style-name="Table_20_Contents">
      <style:text-properties style:font-name="Bitstream Vera Sans2" fo:font-size="10pt" fo:language="de" fo:country="DE" fo:font-style="normal" fo:font-weight="bold" style:font-name-asian="OpenSymbol" style:font-size-asian="10pt" style:font-style-asian="normal" style:font-weight-asian="bold" style:font-name-complex="OpenSymbol" style:font-size-complex="10pt" style:font-style-complex="normal" style:font-weight-complex="bold"/>
    </style:style>
    <style:style style:name="P134" style:family="paragraph" style:parent-style-name="Table_20_Contents">
      <style:text-properties style:font-name="Bitstream Vera Sans2" fo:font-size="10pt" fo:language="de" fo:country="DE" fo:font-weight="bold" style:font-name-asian="OpenSymbol" style:font-size-asian="10pt" style:font-weight-asian="bold" style:font-name-complex="OpenSymbol" style:font-size-complex="10pt" style:font-weight-complex="bold"/>
    </style:style>
    <style:style style:name="P135" style:family="paragraph" style:parent-style-name="Table_20_Contents">
      <style:text-properties style:font-name="Bitstream Vera Sans2" fo:font-size="10pt" fo:language="en" fo:country="US" style:font-name-asian="OpenSymbol" style:font-size-asian="12pt" style:font-style-asian="normal" style:font-weight-asian="normal" style:font-name-complex="OpenSymbol" style:font-size-complex="12pt" style:font-style-complex="normal" style:font-weight-complex="normal"/>
    </style:style>
    <style:style style:name="P136" style:family="paragraph" style:parent-style-name="Table_20_Contents">
      <style:text-properties style:font-name="Bitstream Vera Sans2" fo:font-size="8pt" fo:language="de" fo:country="DE" style:font-name-asian="OpenSymbol" style:font-size-asian="8pt" style:font-name-complex="OpenSymbol" style:font-size-complex="8pt"/>
    </style:style>
    <style:style style:name="P137" style:family="paragraph" style:parent-style-name="Table_20_Contents">
      <style:text-properties style:font-name="Bitstream Vera Sans2" fo:font-size="8.5pt" fo:language="de" fo:country="DE" fo:font-weight="normal" style:font-name-asian="OpenSymbol" style:font-size-asian="8.5pt" style:font-name-complex="OpenSymbol" style:font-size-complex="8.5pt"/>
    </style:style>
    <style:style style:name="P138" style:family="paragraph" style:parent-style-name="Table_20_Contents">
      <style:text-properties style:font-name="Bitstream Vera Sans2" fo:font-size="8.5pt" fo:language="de" fo:country="DE" fo:font-weight="normal" style:font-name-asian="OpenSymbol" style:font-name-complex="OpenSymbol"/>
    </style:style>
    <style:style style:name="P139" style:family="paragraph" style:parent-style-name="Table_20_Contents">
      <style:text-properties style:font-name-asian="OpenSymbol" style:font-name-complex="OpenSymbol"/>
    </style:style>
    <style:style style:name="P140" style:family="paragraph" style:parent-style-name="Table_20_Contents">
      <style:paragraph-properties fo:text-align="center" style:justify-single-word="false"/>
      <style:text-properties style:font-name-asian="OpenSymbol" style:font-name-complex="OpenSymbol"/>
    </style:style>
    <style:style style:name="P141" style:family="paragraph" style:parent-style-name="Table_20_Contents">
      <style:paragraph-properties fo:text-align="start" style:justify-single-word="false"/>
      <style:text-properties style:font-name-asian="OpenSymbol" style:font-name-complex="OpenSymbol"/>
    </style:style>
    <style:style style:name="P142" style:family="paragraph" style:parent-style-name="Table_20_Contents">
      <style:paragraph-properties fo:text-align="center" style:justify-single-word="false"/>
      <style:text-properties style:font-name="Wingdings1" style:font-name-asian="Wingdings1" style:font-name-complex="Wingdings1"/>
    </style:style>
    <style:style style:name="P143" style:family="paragraph" style:parent-style-name="Table_20_Contents">
      <style:paragraph-properties fo:text-align="center" style:justify-single-word="false"/>
      <style:text-properties style:font-name="Wingdings" fo:font-size="9pt" style:font-name-asian="Wingdings" style:font-size-asian="9pt" style:font-name-complex="Wingdings" style:font-size-complex="9pt"/>
    </style:style>
    <style:style style:name="P144" style:family="paragraph" style:parent-style-name="Table_20_Contents">
      <style:paragraph-properties fo:text-align="center" style:justify-single-word="false"/>
      <style:text-properties fo:font-size="9pt" style:font-size-asian="9pt" style:font-size-complex="9pt"/>
    </style:style>
    <style:style style:name="P145" style:family="paragraph" style:parent-style-name="Table_20_Contents">
      <style:paragraph-properties fo:text-align="center" style:justify-single-word="false"/>
      <style:text-properties fo:font-size="9pt" fo:font-weight="bold" style:font-size-asian="9pt" style:font-weight-asian="bold" style:font-size-complex="9pt" style:font-weight-complex="bold"/>
    </style:style>
    <style:style style:name="P146" style:family="paragraph" style:parent-style-name="Table_20_Contents">
      <style:paragraph-properties fo:text-align="center" style:justify-single-word="false"/>
      <style:text-properties fo:font-size="9pt" fo:language="en" fo:country="US" style:font-size-asian="9pt" style:font-size-complex="9pt"/>
    </style:style>
    <style:style style:name="P147" style:family="paragraph" style:parent-style-name="Table_20_Contents">
      <style:text-properties fo:font-size="9pt" fo:language="de" fo:country="DE" style:font-size-asian="9pt" style:font-size-complex="9pt"/>
    </style:style>
    <style:style style:name="P148" style:family="paragraph" style:parent-style-name="Table_20_Contents">
      <style:paragraph-properties fo:text-align="center" style:justify-single-word="false"/>
      <style:text-properties fo:font-size="9pt" style:font-name-asian="OpenSymbol" style:font-size-asian="9pt" style:font-name-complex="OpenSymbol" style:font-size-complex="9pt"/>
    </style:style>
    <style:style style:name="P149" style:family="paragraph" style:parent-style-name="Table_20_Contents">
      <style:paragraph-properties fo:text-align="start" style:justify-single-word="false"/>
      <style:text-properties fo:font-size="9pt" style:font-name-asian="OpenSymbol" style:font-size-asian="9pt" style:font-name-complex="OpenSymbol" style:font-size-complex="9pt"/>
    </style:style>
    <style:style style:name="P150" style:family="paragraph" style:parent-style-name="Table_20_Contents">
      <style:paragraph-properties fo:text-align="center" style:justify-single-word="false"/>
      <style:text-properties fo:font-size="10pt" style:font-name-asian="OpenSymbol" style:font-size-asian="10pt" style:font-name-complex="OpenSymbol" style:font-size-complex="10pt"/>
    </style:style>
    <style:style style:name="P151" style:family="paragraph" style:parent-style-name="Table_20_Contents">
      <style:paragraph-properties fo:text-align="center" style:justify-single-word="false"/>
      <style:text-properties fo:font-size="10pt" fo:font-style="italic" fo:font-weight="bold" style:font-name-asian="OpenSymbol" style:font-size-asian="10pt" style:font-style-asian="italic" style:font-weight-asian="bold" style:font-name-complex="OpenSymbol" style:font-size-complex="10pt" style:font-style-complex="italic" style:font-weight-complex="bold"/>
    </style:style>
    <style:style style:name="P152" style:family="paragraph" style:parent-style-name="Table_20_Contents">
      <style:paragraph-properties fo:text-align="center" style:justify-single-word="false"/>
      <style:text-properties fo:font-style="italic" fo:font-weight="bold" style:font-name-asian="OpenSymbol" style:font-style-asian="italic" style:font-weight-asian="bold" style:font-name-complex="OpenSymbol" style:font-style-complex="italic" style:font-weight-complex="bold"/>
    </style:style>
    <style:style style:name="P153" style:family="paragraph" style:parent-style-name="Table_20_Contents">
      <style:paragraph-properties fo:margin-top="0cm" fo:margin-bottom="0.212cm" fo:text-align="justify" style:justify-single-word="false" fo:orphans="2" fo:widows="2" fo:hyphenation-ladder-count="no-limit">
        <style:tab-stops/>
        <style:drop-cap/>
      </style:paragraph-properties>
      <style:text-properties style:font-name="Bitstream Vera Sans2" fo:hyphenate="true" fo:hyphenation-remain-char-count="2" fo:hyphenation-push-char-count="2"/>
    </style:style>
    <style:style style:name="P154" style:family="paragraph" style:parent-style-name="Text_20_body_20_2">
      <style:paragraph-properties fo:margin-top="0cm" fo:margin-bottom="0.212cm" fo:text-align="justify" style:justify-single-word="false" fo:hyphenation-ladder-count="no-limit">
        <style:tab-stops/>
        <style:drop-cap/>
      </style:paragraph-properties>
      <style:text-properties fo:hyphenate="true" fo:hyphenation-remain-char-count="2" fo:hyphenation-push-char-count="2"/>
    </style:style>
    <style:style style:name="P155" style:family="paragraph" style:parent-style-name="Text_20_body_20_2">
      <style:paragraph-properties fo:margin-top="0cm" fo:margin-bottom="0.212cm" fo:text-align="start" style:justify-single-word="false" fo:hyphenation-ladder-count="no-limit">
        <style:tab-stops/>
        <style:drop-cap/>
      </style:paragraph-properties>
      <style:text-properties fo:hyphenate="true" fo:hyphenation-remain-char-count="2" fo:hyphenation-push-char-count="2"/>
    </style:style>
    <style:style style:name="P156" style:family="paragraph" style:parent-style-name="Text_20_body_20_2">
      <style:paragraph-properties fo:margin-top="0cm" fo:margin-bottom="0.212cm" fo:text-align="justify" style:justify-single-word="false" fo:hyphenation-ladder-count="no-limit">
        <style:tab-stops/>
        <style:drop-cap/>
      </style:paragraph-properties>
      <style:text-properties style:font-name="Bitstream Vera Sans2" fo:hyphenate="true" fo:hyphenation-remain-char-count="2" fo:hyphenation-push-char-count="2"/>
    </style:style>
    <style:style style:name="P157" style:family="paragraph" style:parent-style-name="Text_20_body_20_2">
      <style:paragraph-properties fo:margin-top="0cm" fo:margin-bottom="0.212cm" fo:text-align="justify" style:justify-single-word="false" fo:orphans="2" fo:widows="2" fo:hyphenation-ladder-count="no-limit">
        <style:tab-stops/>
        <style:drop-cap/>
      </style:paragraph-properties>
      <style:text-properties style:font-name="Bitstream Vera Sans2" fo:font-style="normal" fo:font-weight="normal" style:font-name-asian="OpenSymbol" style:font-style-asian="normal" style:font-name-complex="OpenSymbol" style:font-style-complex="normal" fo:hyphenate="true" fo:hyphenation-remain-char-count="2" fo:hyphenation-push-char-count="2"/>
    </style:style>
    <style:style style:name="P158" style:family="paragraph" style:parent-style-name="Text_20_body_20_2">
      <style:paragraph-properties fo:margin-top="0cm" fo:margin-bottom="0.212cm" fo:text-align="justify" style:justify-single-word="false" fo:orphans="2" fo:widows="2" fo:hyphenation-ladder-count="no-limit">
        <style:tab-stops/>
        <style:drop-cap/>
      </style:paragraph-properties>
      <style:text-properties style:font-name="Bitstream Vera Sans2" fo:font-style="normal" style:font-name-asian="OpenSymbol" style:font-style-asian="normal" style:font-name-complex="OpenSymbol" style:font-style-complex="normal" fo:hyphenate="true" fo:hyphenation-remain-char-count="2" fo:hyphenation-push-char-count="2"/>
    </style:style>
    <style:style style:name="P159" style:family="paragraph" style:parent-style-name="Text_20_body_20_2">
      <style:paragraph-properties fo:margin-top="0cm" fo:margin-bottom="0.212cm" fo:text-align="justify" style:justify-single-word="false" fo:hyphenation-ladder-count="no-limit">
        <style:tab-stops/>
        <style:drop-cap/>
      </style:paragraph-properties>
      <style:text-properties style:font-name="Bitstream Vera Sans2" fo:language="de" fo:country="DE" fo:hyphenate="true" fo:hyphenation-remain-char-count="2" fo:hyphenation-push-char-count="2"/>
    </style:style>
    <style:style style:name="P160" style:family="paragraph" style:parent-style-name="Text_20_body_20_2">
      <style:paragraph-properties fo:margin-top="0cm" fo:margin-bottom="0.212cm" fo:text-align="justify" style:justify-single-word="false" fo:hyphenation-ladder-count="no-limit">
        <style:tab-stops/>
        <style:drop-cap/>
      </style:paragraph-properties>
      <style:text-properties fo:font-size="10pt" style:font-size-asian="10pt" style:font-size-complex="10pt" fo:hyphenate="true" fo:hyphenation-remain-char-count="2" fo:hyphenation-push-char-count="2"/>
    </style:style>
    <style:style style:name="P161" style:family="paragraph" style:parent-style-name="Text_20_body_20_2" style:master-page-name="">
      <style:paragraph-properties fo:margin-top="0cm" fo:margin-bottom="0.212cm" fo:text-align="justify" style:justify-single-word="false" fo:keep-together="auto" fo:orphans="0" fo:widows="0" fo:hyphenation-ladder-count="no-limit" style:page-number="auto" fo:keep-with-next="always">
        <style:tab-stops/>
        <style:drop-cap/>
      </style:paragraph-properties>
      <style:text-properties fo:hyphenate="true" fo:hyphenation-remain-char-count="2" fo:hyphenation-push-char-count="2"/>
    </style:style>
    <style:style style:name="P162" style:family="paragraph" style:parent-style-name="Text_20_Body_20_Single">
      <style:text-properties style:font-name="Bitstream Vera Sans2" style:font-size-asian="16.1000003814697pt" style:font-size-complex="16.1000003814697pt"/>
    </style:style>
    <style:style style:name="P163" style:family="paragraph" style:parent-style-name="Text_20_body_20_1">
      <style:text-properties style:font-name="Bitstream Vera Sans2"/>
    </style:style>
    <style:style style:name="P164" style:family="paragraph" style:parent-style-name="Text_20_body_20_1">
      <style:paragraph-properties fo:margin-left="0.979cm" fo:margin-right="0cm" fo:orphans="2" fo:widows="2" fo:text-indent="0cm" style:auto-text-indent="false"/>
      <style:text-properties style:font-name="Bitstream Vera Sans2" fo:language="de" fo:country="DE" fo:font-style="normal" style:font-name-asian="OpenSymbol" style:font-style-asian="normal" style:font-name-complex="OpenSymbol" style:font-style-complex="normal"/>
    </style:style>
    <style:style style:name="P165" style:family="paragraph" style:parent-style-name="Text_20_body_20_1">
      <style:paragraph-properties fo:margin-left="0.979cm" fo:margin-right="0cm" fo:text-align="start" style:justify-single-word="false" fo:orphans="2" fo:widows="2" fo:text-indent="0cm" style:auto-text-indent="false"/>
      <style:text-properties style:font-name="Bitstream Vera Sans2" fo:language="de" fo:country="DE" fo:font-style="normal" style:font-name-asian="OpenSymbol" style:font-style-asian="normal" style:font-name-complex="OpenSymbol" style:font-style-complex="normal"/>
    </style:style>
    <style:style style:name="P166" style:family="paragraph" style:parent-style-name="Text_20_body_20_1">
      <style:paragraph-properties fo:margin-left="0.979cm" fo:margin-right="0cm" fo:orphans="2" fo:widows="2" fo:text-indent="0cm" style:auto-text-indent="false"/>
      <style:text-properties style:font-name="Bitstream Vera Sans2" fo:language="de" fo:country="DE"/>
    </style:style>
    <style:style style:name="P167" style:family="paragraph" style:parent-style-name="Text_20_body_20_2">
      <style:paragraph-properties fo:margin-left="0.979cm" fo:margin-right="0cm" fo:orphans="2" fo:widows="2" fo:text-indent="0cm" style:auto-text-indent="false" fo:keep-with-next="auto"/>
    </style:style>
    <style:style style:name="P168" style:family="paragraph" style:parent-style-name="Text_20_body_20_2">
      <style:paragraph-properties fo:margin-left="0.979cm" fo:margin-right="0cm" fo:orphans="2" fo:widows="2" fo:text-indent="0cm" style:auto-text-indent="false" fo:keep-with-next="auto"/>
      <style:text-properties style:font-name="Bitstream Vera Sans2" fo:language="de" fo:country="DE" fo:font-style="normal" style:font-name-asian="OpenSymbol" style:font-style-asian="normal" style:font-name-complex="OpenSymbol" style:font-style-complex="normal"/>
    </style:style>
    <style:style style:name="P169" style:family="paragraph" style:parent-style-name="Text_20_body_20_2">
      <style:paragraph-properties fo:margin-left="0.979cm" fo:margin-right="0cm" fo:orphans="2" fo:widows="2" fo:text-indent="0cm" style:auto-text-indent="false"/>
      <style:text-properties style:font-name="Bitstream Vera Sans2" fo:language="de" fo:country="DE" fo:font-style="normal" style:font-name-asian="OpenSymbol" style:font-style-asian="normal" style:font-name-complex="OpenSymbol" style:font-style-complex="normal"/>
    </style:style>
    <style:style style:name="P170" style:family="paragraph" style:parent-style-name="Text_20_body_20_1">
      <style:paragraph-properties fo:margin-left="1.005cm" fo:margin-right="0cm" fo:text-align="start" style:justify-single-word="false" fo:orphans="2" fo:widows="2" fo:text-indent="0cm" style:auto-text-indent="false"/>
      <style:text-properties style:font-name="Bitstream Vera Sans2" fo:language="de" fo:country="DE"/>
    </style:style>
    <style:style style:name="P171" style:family="paragraph" style:parent-style-name="Text_20_body_20_2">
      <style:paragraph-properties fo:margin-left="1.005cm" fo:margin-right="0cm" fo:orphans="2" fo:widows="2" fo:text-indent="0cm" style:auto-text-indent="false" fo:keep-with-next="auto"/>
      <style:text-properties style:font-name="Bitstream Vera Sans2" fo:font-style="normal" style:font-name-asian="OpenSymbol" style:font-style-asian="normal" style:font-name-complex="OpenSymbol" style:font-style-complex="normal"/>
    </style:style>
    <style:style style:name="P172" style:family="paragraph" style:parent-style-name="Text_20_body_20_2">
      <style:paragraph-properties fo:text-align="justify" style:justify-single-word="false" fo:orphans="2" fo:widows="2"/>
    </style:style>
    <style:style style:name="P173" style:family="paragraph" style:parent-style-name="Text_20_body_20_2">
      <style:paragraph-properties fo:orphans="2" fo:widows="2"/>
    </style:style>
    <style:style style:name="P174" style:family="paragraph" style:parent-style-name="Text_20_body_20_2">
      <style:paragraph-properties fo:orphans="0" fo:widows="0"/>
    </style:style>
    <style:style style:name="P175" style:family="paragraph" style:parent-style-name="Text_20_body_20_2">
      <style:paragraph-properties fo:text-align="start" style:justify-single-word="false" fo:orphans="2" fo:widows="2"/>
    </style:style>
    <style:style style:name="P176" style:family="paragraph" style:parent-style-name="Text_20_body_20_2">
      <style:paragraph-properties fo:keep-together="auto" fo:orphans="2" fo:widows="2"/>
    </style:style>
    <style:style style:name="P177" style:family="paragraph" style:parent-style-name="Text_20_body_20_2">
      <style:text-properties style:font-name="Bitstream Vera Sans2"/>
    </style:style>
    <style:style style:name="P178" style:family="paragraph" style:parent-style-name="Text_20_body_20_2">
      <style:paragraph-properties fo:text-align="start" style:justify-single-word="false" fo:orphans="2" fo:widows="2"/>
      <style:text-properties style:font-name="Bitstream Vera Sans2"/>
    </style:style>
    <style:style style:name="P179" style:family="paragraph" style:parent-style-name="Text_20_body_20_2">
      <style:paragraph-properties fo:orphans="2" fo:widows="2"/>
      <style:text-properties style:font-name="Bitstream Vera Sans2"/>
    </style:style>
    <style:style style:name="P180" style:family="paragraph" style:parent-style-name="Text_20_body_20_2">
      <style:paragraph-properties fo:orphans="2" fo:widows="2"/>
      <style:text-properties style:font-name="Bitstream Vera Sans2" style:font-name-asian="OpenSymbol" style:font-name-complex="OpenSymbol"/>
    </style:style>
    <style:style style:name="P181" style:family="paragraph" style:parent-style-name="Text_20_body_20_2">
      <style:paragraph-properties fo:text-align="start" style:justify-single-word="false" fo:orphans="2" fo:widows="2"/>
      <style:text-properties style:font-name="Bitstream Vera Sans2" style:font-name-asian="OpenSymbol" style:font-name-complex="OpenSymbol"/>
    </style:style>
    <style:style style:name="P182" style:family="paragraph" style:parent-style-name="Text_20_body_20_2">
      <style:text-properties style:font-name="Bitstream Vera Sans2" fo:font-style="normal" style:font-name-asian="OpenSymbol" style:font-style-asian="normal" style:font-name-complex="OpenSymbol" style:font-style-complex="normal"/>
    </style:style>
    <style:style style:name="P183" style:family="paragraph" style:parent-style-name="Text_20_body_20_2">
      <style:paragraph-properties fo:orphans="2" fo:widows="2"/>
      <style:text-properties style:font-name="Bitstream Vera Sans2" fo:font-style="normal" style:font-name-asian="OpenSymbol" style:font-style-asian="normal" style:font-name-complex="OpenSymbol" style:font-style-complex="normal"/>
    </style:style>
    <style:style style:name="P184" style:family="paragraph" style:parent-style-name="Text_20_body_20_2">
      <style:paragraph-properties fo:orphans="0" fo:widows="0"/>
      <style:text-properties style:font-name="Bitstream Vera Sans2" fo:font-style="normal" style:font-name-asian="OpenSymbol" style:font-style-asian="normal" style:font-name-complex="OpenSymbol" style:font-style-complex="normal"/>
    </style:style>
    <style:style style:name="P185" style:family="paragraph" style:parent-style-name="Text_20_body_20_2">
      <style:paragraph-properties fo:text-align="justify" style:justify-single-word="false" fo:orphans="2" fo:widows="2"/>
      <style:text-properties style:font-name="Bitstream Vera Sans2" fo:font-style="normal" style:font-name-asian="OpenSymbol" style:font-style-asian="normal" style:font-name-complex="OpenSymbol" style:font-style-complex="normal"/>
    </style:style>
    <style:style style:name="P186" style:family="paragraph" style:parent-style-name="Text_20_body_20_2">
      <style:paragraph-properties fo:text-align="justify" style:justify-single-word="false" fo:orphans="0" fo:widows="0"/>
      <style:text-properties style:font-name="Bitstream Vera Sans2" fo:font-style="normal" style:font-name-asian="OpenSymbol" style:font-style-asian="normal" style:font-name-complex="OpenSymbol" style:font-style-complex="normal"/>
    </style:style>
    <style:style style:name="P187" style:family="paragraph" style:parent-style-name="Text_20_body_20_2">
      <style:paragraph-properties fo:text-align="start" style:justify-single-word="false" fo:orphans="2" fo:widows="2"/>
      <style:text-properties style:font-name="Bitstream Vera Sans2" fo:font-style="normal" style:font-name-asian="OpenSymbol" style:font-style-asian="normal" style:font-name-complex="OpenSymbol" style:font-style-complex="normal"/>
    </style:style>
    <style:style style:name="P188" style:family="paragraph" style:parent-style-name="Text_20_body_20_2">
      <style:paragraph-properties fo:orphans="2" fo:widows="2"/>
      <style:text-properties style:font-name="Bitstream Vera Sans2" fo:language="de" fo:country="DE" fo:font-style="normal" style:font-name-asian="OpenSymbol" style:font-style-asian="normal" style:font-name-complex="OpenSymbol" style:font-style-complex="normal"/>
    </style:style>
    <style:style style:name="P189" style:family="paragraph" style:parent-style-name="Text_20_body_20_2">
      <style:paragraph-properties fo:orphans="0" fo:widows="0"/>
      <style:text-properties style:font-name="Bitstream Vera Sans2"/>
    </style:style>
    <style:style style:name="P190" style:family="paragraph" style:parent-style-name="Text_20_body_20_2">
      <style:paragraph-properties fo:text-align="justify" style:justify-single-word="false" fo:orphans="2" fo:widows="2"/>
      <style:text-properties style:font-name="Bitstream Vera Sans2"/>
    </style:style>
    <style:style style:name="P191" style:family="paragraph" style:parent-style-name="Text_20_body_20_2">
      <style:paragraph-properties fo:orphans="2" fo:widows="2"/>
      <style:text-properties fo:font-size="10pt" style:font-size-asian="10pt" style:font-size-complex="10pt"/>
    </style:style>
    <style:style style:name="P192" style:family="paragraph" style:parent-style-name="Cover_20_Title">
      <style:paragraph-properties fo:text-align="start" style:justify-single-word="false"/>
      <style:text-properties style:font-name="Bitstream Vera Sans2" fo:font-size="24pt" style:font-size-asian="24pt" style:font-size-complex="24pt"/>
    </style:style>
    <style:style style:name="P193" style:family="paragraph" style:parent-style-name="Text_20_body_20_1">
      <style:paragraph-properties fo:margin-left="1.058cm" fo:margin-right="0cm" fo:text-align="start" style:justify-single-word="false" fo:text-indent="0cm" style:auto-text-indent="false"/>
      <style:text-properties style:font-name="Bitstream Vera Sans2"/>
    </style:style>
    <style:style style:name="P194" style:family="paragraph" style:parent-style-name="List_20_Contents">
      <style:paragraph-properties fo:orphans="2" fo:widows="2"/>
      <style:text-properties style:font-name="Bitstream Vera Sans2"/>
    </style:style>
    <style:style style:name="P195" style:family="paragraph" style:parent-style-name="List_20_Contents">
      <style:paragraph-properties fo:orphans="2" fo:widows="2"/>
      <style:text-properties style:font-name="Bitstream Vera Sans2" fo:language="zxx" fo:country="none" style:language-asian="zxx" style:country-asian="none" style:language-complex="zxx" style:country-complex="none"/>
    </style:style>
    <style:style style:name="P196" style:family="paragraph" style:parent-style-name="Table_20_Contents">
      <style:paragraph-properties fo:margin-left="0.035cm" fo:margin-right="0.009cm" fo:margin-top="0cm" fo:margin-bottom="0.212cm" fo:text-align="start" style:justify-single-word="false" fo:orphans="2" fo:widows="2" fo:hyphenation-ladder-count="no-limit" fo:text-indent="0cm" style:auto-text-indent="false" fo:keep-with-next="auto" text:number-lines="false" text:line-number="0">
        <style:tab-stops/>
        <style:drop-cap/>
      </style:paragraph-properties>
      <style:text-properties style:font-name="Bitstream Vera Sans2" fo:font-size="9pt" fo:font-style="normal" style:font-name-asian="OpenSymbol" style:font-size-asian="9pt" style:font-style-asian="normal" style:font-name-complex="OpenSymbol" style:font-size-complex="9pt" style:font-style-complex="normal" fo:hyphenate="true" fo:hyphenation-remain-char-count="2" fo:hyphenation-push-char-count="2"/>
    </style:style>
    <style:style style:name="P197" style:family="paragraph" style:parent-style-name="Text_20_body_20_2">
      <style:paragraph-properties fo:margin-left="0.035cm" fo:margin-right="0.009cm" fo:text-align="start" style:justify-single-word="false" fo:orphans="2" fo:widows="2" fo:text-indent="0cm" style:auto-text-indent="false" fo:keep-with-next="auto"/>
      <style:text-properties fo:font-size="9pt" style:font-size-asian="9pt" style:font-size-complex="9pt"/>
    </style:style>
    <style:style style:name="P198" style:family="paragraph" style:parent-style-name="Text_20_body_20_2">
      <style:paragraph-properties fo:margin-left="0.273cm" fo:margin-right="0.009cm" fo:orphans="2" fo:widows="2" fo:text-indent="0cm" style:auto-text-indent="false" fo:keep-with-next="auto"/>
      <style:text-properties fo:font-size="9pt" style:font-size-asian="9pt" style:font-size-complex="9pt"/>
    </style:style>
    <style:style style:name="P199" style:family="paragraph" style:parent-style-name="Text_20_body_20_2">
      <style:paragraph-properties fo:margin-left="0.062cm" fo:margin-right="0.009cm" fo:orphans="2" fo:widows="2" fo:text-indent="0cm" style:auto-text-indent="false" fo:keep-with-next="auto"/>
      <style:text-properties fo:font-size="9pt" style:font-size-asian="9pt" style:font-size-complex="9pt"/>
    </style:style>
    <style:style style:name="P200" style:family="paragraph" style:parent-style-name="Text_20_body_20_2">
      <style:paragraph-properties fo:margin-left="0.062cm" fo:margin-right="0.009cm" fo:text-align="center" style:justify-single-word="false" fo:orphans="2" fo:widows="2" fo:text-indent="0cm" style:auto-text-indent="false" fo:keep-with-next="auto"/>
      <style:text-properties fo:font-size="9pt" style:font-size-asian="9pt" style:font-size-complex="9pt"/>
    </style:style>
    <style:style style:name="P201" style:family="paragraph" style:parent-style-name="Text_20_body_20_2">
      <style:paragraph-properties fo:margin-left="0.141cm" fo:margin-right="0.009cm" fo:orphans="2" fo:widows="2" fo:text-indent="0cm" style:auto-text-indent="false" fo:keep-with-next="auto"/>
      <style:text-properties fo:font-size="9pt" style:font-size-asian="9pt" style:font-size-complex="9pt"/>
    </style:style>
    <style:style style:name="P202" style:family="paragraph" style:parent-style-name="Text_20_body_20_2">
      <style:paragraph-properties fo:margin-left="0.3cm" fo:margin-right="0.009cm" fo:text-align="start" style:justify-single-word="false" fo:orphans="2" fo:widows="2" fo:text-indent="0cm" style:auto-text-indent="false" fo:keep-with-next="auto"/>
      <style:text-properties fo:font-size="9pt" style:font-size-asian="9pt" style:font-size-complex="9pt"/>
    </style:style>
    <style:style style:name="P203" style:family="paragraph" style:parent-style-name="Text_20_body_20_2">
      <style:paragraph-properties fo:margin-left="0.3cm" fo:margin-right="0.009cm" fo:orphans="2" fo:widows="2" fo:text-indent="0cm" style:auto-text-indent="false" fo:keep-with-next="auto"/>
      <style:text-properties fo:font-size="9pt" style:font-size-asian="9pt" style:font-size-complex="9pt"/>
    </style:style>
    <style:style style:name="P204" style:family="paragraph" style:parent-style-name="Text_20_body_20_2">
      <style:paragraph-properties fo:margin-left="0.3cm" fo:margin-right="0.009cm" fo:orphans="2" fo:widows="2" fo:text-indent="0cm" style:auto-text-indent="false" fo:keep-with-next="auto"/>
      <style:text-properties style:font-name="Bitstream Vera Sans2" fo:font-size="9pt" style:font-size-asian="9pt" style:font-size-complex="9pt"/>
    </style:style>
    <style:style style:name="P205" style:family="paragraph" style:parent-style-name="Table_20_Heading">
      <style:paragraph-properties fo:text-align="center" style:justify-single-word="false"/>
      <style:text-properties style:font-name="Bitstream Vera Sans2" fo:language="en" fo:country="US" style:font-name-asian="OpenSymbol" style:font-name-complex="OpenSymbol"/>
    </style:style>
    <style:style style:name="P206" style:family="paragraph" style:parent-style-name="Table_20_Heading">
      <style:paragraph-properties fo:text-align="center" style:justify-single-word="false"/>
      <style:text-properties style:font-name="Bitstream Vera Sans2" style:font-name-asian="OpenSymbol" style:font-name-complex="OpenSymbol"/>
    </style:style>
    <style:style style:name="P207" style:family="paragraph" style:parent-style-name="Heading_20_1" style:list-style-name="L1">
      <style:paragraph-properties fo:orphans="2" fo:widows="2"/>
      <style:text-properties style:font-name="Bitstream Vera Sans2" style:font-size-asian="16.1000003814697pt" style:font-size-complex="16.1000003814697pt"/>
    </style:style>
    <style:style style:name="P208" style:family="paragraph" style:parent-style-name="Heading_20_1" style:list-style-name="L1">
      <style:paragraph-properties fo:orphans="2" fo:widows="2"/>
      <style:text-properties style:font-name="Bitstream Vera Sans2" fo:language="de" fo:country="DE"/>
    </style:style>
    <style:style style:name="P209" style:family="paragraph" style:parent-style-name="Heading_20_1" style:list-style-name="L1">
      <style:text-properties style:font-name="Bitstream Vera Sans2"/>
    </style:style>
    <style:style style:name="P210" style:family="paragraph" style:parent-style-name="Heading_20_1" style:list-style-name="L1" style:master-page-name="">
      <style:paragraph-properties fo:orphans="2" fo:widows="2" style:page-number="auto" fo:break-before="page" fo:keep-with-next="auto"/>
      <style:text-properties style:font-name="Bitstream Vera Sans2"/>
    </style:style>
    <style:style style:name="P211" style:family="paragraph" style:parent-style-name="Heading_20_1" style:list-style-name="L1" style:master-page-name="">
      <style:paragraph-properties fo:orphans="2" fo:widows="2" style:page-number="auto" fo:break-before="page" fo:keep-with-next="auto"/>
      <style:text-properties style:font-name="Bitstream Vera Sans2" style:font-name-asian="OpenSymbol" style:font-name-complex="OpenSymbol"/>
    </style:style>
    <style:style style:name="P212" style:family="paragraph" style:parent-style-name="Heading_20_1" style:list-style-name="L1" style:master-page-name="">
      <style:paragraph-properties fo:orphans="2" fo:widows="2" style:page-number="auto" fo:break-before="page" fo:keep-with-next="auto"/>
      <style:text-properties style:font-name="Bitstream Vera Sans2" fo:language="zxx" fo:country="none" style:language-asian="zxx" style:country-asian="none" style:language-complex="zxx" style:country-complex="none"/>
    </style:style>
    <style:style style:name="P213" style:family="paragraph" style:parent-style-name="Heading_20_1" style:list-style-name="L1">
      <style:paragraph-properties fo:orphans="2" fo:widows="2" fo:keep-with-next="auto"/>
      <style:text-properties style:font-name="Bitstream Vera Sans2"/>
    </style:style>
    <style:style style:name="P214" style:family="paragraph" style:parent-style-name="Heading_20_2" style:list-style-name="L1"/>
    <style:style style:name="P215" style:family="paragraph" style:parent-style-name="Heading_20_2">
      <style:text-properties style:font-name="Bitstream Vera Sans2"/>
    </style:style>
    <style:style style:name="P216" style:family="paragraph" style:parent-style-name="Heading_20_2" style:list-style-name="L1">
      <style:text-properties style:font-name="Bitstream Vera Sans2"/>
    </style:style>
    <style:style style:name="P217" style:family="paragraph" style:parent-style-name="Heading_20_2" style:list-style-name="L1">
      <style:text-properties style:font-name="Bitstream Vera Sans2" fo:language="de" fo:country="DE"/>
    </style:style>
    <style:style style:name="P218" style:family="paragraph" style:parent-style-name="Heading_20_2" style:list-style-name="L1">
      <style:text-properties style:font-name="Bitstream Vera Sans2" fo:language="de" fo:country="DE" fo:font-style="normal" style:font-name-asian="HG Mincho Light J" style:font-name-complex="Arial Unicode MS1"/>
    </style:style>
    <style:style style:name="P219" style:family="paragraph" style:parent-style-name="Heading_20_2" style:list-style-name="L1">
      <style:paragraph-properties fo:orphans="2" fo:widows="2"/>
      <style:text-properties style:font-name="Bitstream Vera Sans2" fo:language="de" fo:country="DE" style:font-name-asian="OpenSymbol" style:font-name-complex="OpenSymbol"/>
    </style:style>
    <style:style style:name="P220" style:family="paragraph" style:parent-style-name="Heading_20_2" style:list-style-name="L1">
      <style:paragraph-properties>
        <style:drop-cap/>
      </style:paragraph-properties>
      <style:text-properties style:font-name="Bitstream Vera Sans2"/>
    </style:style>
    <style:style style:name="P221" style:family="paragraph" style:parent-style-name="Heading_20_2" style:list-style-name="L1">
      <style:paragraph-properties fo:orphans="2" fo:widows="2"/>
      <style:text-properties style:font-name="Bitstream Vera Sans2"/>
    </style:style>
    <style:style style:name="P222" style:family="paragraph" style:parent-style-name="Heading_20_2" style:list-style-name="L1">
      <style:paragraph-properties>
        <style:drop-cap/>
      </style:paragraph-properties>
    </style:style>
    <style:style style:name="P223" style:family="paragraph" style:parent-style-name="Heading_20_2" style:list-style-name="L1">
      <style:paragraph-properties fo:margin-left="0.499cm" fo:margin-right="0cm" fo:text-indent="0cm" style:auto-text-indent="false"/>
      <style:text-properties style:font-name="Bitstream Vera Sans2"/>
    </style:style>
    <style:style style:name="P224" style:family="paragraph" style:parent-style-name="Heading_20_2" style:list-style-name="L1" style:master-page-name="">
      <style:paragraph-properties style:page-number="auto"/>
      <style:text-properties style:font-name="Bitstream Vera Sans2"/>
    </style:style>
    <style:style style:name="P225" style:family="paragraph" style:parent-style-name="Heading_20_2" style:list-style-name="L1">
      <style:paragraph-properties fo:margin-left="1cm" fo:margin-right="0cm" fo:text-indent="0cm" style:auto-text-indent="false"/>
      <style:text-properties style:font-name="Bitstream Vera Sans2"/>
    </style:style>
    <style:style style:name="P226" style:family="paragraph" style:parent-style-name="Heading_20_2" style:list-style-name="L1">
      <style:paragraph-properties fo:orphans="0" fo:widows="0" fo:keep-with-next="always"/>
      <style:text-properties style:font-name="Bitstream Vera Sans2"/>
    </style:style>
    <style:style style:name="P227" style:family="paragraph" style:parent-style-name="Index_20_1">
      <style:paragraph-properties>
        <style:tab-stops>
          <style:tab-stop style:position="16.499cm" style:type="right" style:leader-style="dotted" style:leader-text="."/>
        </style:tab-stops>
      </style:paragraph-properties>
    </style:style>
    <style:style style:name="P228" style:family="paragraph" style:parent-style-name="Contents_20_1">
      <style:paragraph-properties>
        <style:tab-stops>
          <style:tab-stop style:position="16.499cm" style:type="right" style:leader-style="dotted" style:leader-text="."/>
        </style:tab-stops>
      </style:paragraph-properties>
    </style:style>
    <style:style style:name="P229" style:family="paragraph" style:parent-style-name="Contents_20_2">
      <style:paragraph-properties>
        <style:tab-stops>
          <style:tab-stop style:position="15.998cm" style:type="right" style:leader-style="dotted" style:leader-text="."/>
        </style:tab-stops>
      </style:paragraph-properties>
    </style:style>
    <style:style style:name="P230" style:family="paragraph" style:parent-style-name="Text_20_body_20_2" style:list-style-name="L4">
      <style:paragraph-properties fo:text-align="start" style:justify-single-word="false" fo:orphans="2" fo:widows="2"/>
      <style:text-properties style:font-name="Bitstream Vera Sans2"/>
    </style:style>
    <style:style style:name="P231" style:family="paragraph" style:parent-style-name="Text_20_body_20_2">
      <style:paragraph-properties fo:orphans="2" fo:widows="2"/>
      <style:text-properties style:font-name="Bitstream Vera Sans2"/>
    </style:style>
    <style:style style:name="P232" style:family="paragraph" style:parent-style-name="Text_20_body_20_2" style:list-style-name="L4">
      <style:paragraph-properties fo:orphans="2" fo:widows="2"/>
      <style:text-properties style:font-name="Bitstream Vera Sans2"/>
    </style:style>
    <style:style style:name="P233" style:family="paragraph" style:parent-style-name="Text_20_body_20_2" style:list-style-name="L5">
      <style:paragraph-properties fo:orphans="2" fo:widows="2"/>
      <style:text-properties style:font-name="Bitstream Vera Sans2"/>
    </style:style>
    <style:style style:name="P234" style:family="paragraph" style:parent-style-name="Text_20_body_20_2" style:list-style-name="L5">
      <style:paragraph-properties fo:text-align="justify" style:justify-single-word="false"/>
      <style:text-properties style:font-name="Bitstream Vera Sans2"/>
    </style:style>
    <style:style style:name="P235" style:family="paragraph" style:parent-style-name="Text_20_body_20_2">
      <style:paragraph-properties fo:orphans="2" fo:widows="2"/>
      <style:text-properties style:font-name="Bitstream Vera Sans2" fo:font-style="normal" style:font-name-asian="OpenSymbol" style:font-style-asian="normal" style:font-name-complex="OpenSymbol" style:font-style-complex="normal"/>
    </style:style>
    <style:style style:name="P236" style:family="paragraph" style:parent-style-name="Text_20_body_20_2">
      <style:paragraph-properties fo:orphans="2" fo:widows="2"/>
      <style:text-properties style:font-name="Bitstream Vera Sans2" style:font-name-asian="OpenSymbol" style:font-name-complex="OpenSymbol"/>
    </style:style>
    <style:style style:name="P237" style:family="paragraph" style:parent-style-name="Text_20_body_20_2">
      <style:paragraph-properties fo:orphans="2" fo:widows="2"/>
      <style:text-properties style:font-name="Bitstream Vera Sans2" fo:language="de" fo:country="DE" fo:font-style="normal" style:font-name-asian="OpenSymbol" style:font-style-asian="normal" style:font-name-complex="OpenSymbol" style:font-style-complex="normal"/>
    </style:style>
    <style:style style:name="P238" style:family="paragraph" style:parent-style-name="Text_20_body_20_2" style:list-style-name="L4">
      <style:paragraph-properties fo:orphans="2" fo:widows="2"/>
      <style:text-properties fo:color="#000000" style:font-name="Bitstream Vera Sans2" fo:font-size="12pt" style:font-name-asian="Helv" style:font-size-asian="12pt" style:font-name-complex="Helv" style:font-size-complex="12pt"/>
    </style:style>
    <style:style style:name="P239" style:family="paragraph" style:parent-style-name="Text_20_body_20_2">
      <style:paragraph-properties fo:orphans="2" fo:widows="2"/>
    </style:style>
    <style:style style:name="P240" style:family="paragraph" style:parent-style-name="Text_20_body_20_2">
      <style:paragraph-properties fo:orphans="0" fo:widows="0"/>
    </style:style>
    <style:style style:name="P241" style:family="paragraph" style:parent-style-name="Text_20_body_20_2">
      <style:paragraph-properties fo:orphans="2" fo:widows="2" fo:keep-with-next="auto"/>
      <style:text-properties style:font-name="Bitstream Vera Sans2"/>
    </style:style>
    <style:style style:name="P242" style:family="paragraph" style:parent-style-name="Text_20_body_20_2" style:list-style-name="L2">
      <style:paragraph-properties fo:orphans="2" fo:widows="2" fo:keep-with-next="auto"/>
      <style:text-properties style:font-name="Bitstream Vera Sans2"/>
    </style:style>
    <style:style style:name="P243" style:family="paragraph" style:parent-style-name="Text_20_body_20_2" style:list-style-name="L4">
      <style:paragraph-properties fo:orphans="2" fo:widows="2" fo:keep-with-next="auto"/>
      <style:text-properties style:font-name="Bitstream Vera Sans2"/>
    </style:style>
    <style:style style:name="P244" style:family="paragraph" style:parent-style-name="Text_20_body_20_2" style:list-style-name="L3">
      <style:paragraph-properties fo:text-align="start" style:justify-single-word="false" fo:orphans="2" fo:widows="2" fo:keep-with-next="auto"/>
      <style:text-properties style:font-name="Bitstream Vera Sans2"/>
    </style:style>
    <style:style style:name="P245" style:family="paragraph" style:parent-style-name="Text_20_body_20_2" style:list-style-name="L4">
      <style:paragraph-properties fo:text-align="start" style:justify-single-word="false" fo:orphans="2" fo:widows="2" fo:keep-with-next="auto"/>
      <style:text-properties style:font-name="Bitstream Vera Sans2"/>
    </style:style>
    <style:style style:name="P246" style:family="paragraph" style:parent-style-name="Text_20_body_20_2">
      <style:paragraph-properties fo:orphans="2" fo:widows="2" fo:keep-with-next="auto"/>
      <style:text-properties style:font-name="Bitstream Vera Sans2" fo:font-style="normal" style:font-name-asian="OpenSymbol" style:font-style-asian="normal" style:font-name-complex="OpenSymbol" style:font-style-complex="normal"/>
    </style:style>
    <style:style style:name="P247" style:family="paragraph" style:parent-style-name="Text_20_body_20_2" style:list-style-name="L2">
      <style:paragraph-properties fo:margin-left="0cm" fo:margin-right="0cm" fo:orphans="2" fo:widows="2" fo:text-indent="0cm" style:auto-text-indent="false"/>
      <style:text-properties style:font-name="Bitstream Vera Sans2"/>
    </style:style>
    <style:style style:name="P248" style:family="paragraph" style:parent-style-name="Text_20_body_20_2" style:list-style-name="L3" style:master-page-name="">
      <style:paragraph-properties fo:text-align="justify" style:justify-single-word="false" fo:keep-together="auto" fo:orphans="2" fo:widows="2" style:page-number="auto" fo:background-color="transparent" style:shadow="none" fo:keep-with-next="auto">
        <style:tab-stops/>
        <style:background-image/>
      </style:paragraph-properties>
      <style:text-properties style:font-name="Bitstream Vera Sans2"/>
    </style:style>
    <style:style style:name="P249" style:family="paragraph" style:parent-style-name="Text_20_body_20_2" style:list-style-name="L3">
      <style:paragraph-properties fo:text-align="justify" style:justify-single-word="false" fo:orphans="2" fo:widows="2" fo:background-color="transparent" style:shadow="none">
        <style:tab-stops/>
        <style:background-image/>
      </style:paragraph-properties>
      <style:text-properties style:font-name="Bitstream Vera Sans2"/>
    </style:style>
    <style:style style:name="P250" style:family="paragraph" style:parent-style-name="Text_20_body_20_2">
      <style:paragraph-properties fo:orphans="0" fo:widows="0" fo:keep-with-next="always"/>
    </style:style>
    <style:style style:name="P251" style:family="paragraph" style:parent-style-name="Text_20_body_20_2">
      <style:paragraph-properties fo:orphans="0" fo:widows="0" fo:keep-with-next="always"/>
      <style:text-properties style:font-name="Bitstream Vera Sans2" fo:font-style="normal" style:font-name-asian="OpenSymbol" style:font-style-asian="normal" style:font-name-complex="OpenSymbol" style:font-style-complex="normal"/>
    </style:style>
    <style:style style:name="P252" style:family="paragraph" style:parent-style-name="Text_20_body_20_2">
      <style:paragraph-properties fo:orphans="0" fo:widows="0" fo:keep-with-next="always"/>
      <style:text-properties style:font-name="Bitstream Vera Sans2"/>
    </style:style>
    <style:style style:name="P253" style:family="paragraph" style:parent-style-name="Text_20_body_20_2" style:master-page-name="">
      <style:paragraph-properties fo:margin-top="0cm" fo:margin-bottom="0.212cm" fo:text-align="justify" style:justify-single-word="false" fo:keep-together="auto" fo:orphans="2" fo:widows="2" fo:hyphenation-ladder-count="no-limit" style:page-number="auto" fo:background-color="transparent" fo:keep-with-next="auto">
        <style:tab-stops/>
        <style:drop-cap/>
        <style:background-image/>
      </style:paragraph-properties>
      <style:text-properties style:font-name="Bitstream Vera Sans2" fo:language="de" fo:country="DE" fo:font-weight="normal" fo:hyphenate="true" fo:hyphenation-remain-char-count="2" fo:hyphenation-push-char-count="2"/>
    </style:style>
    <style:style style:name="P254" style:family="paragraph" style:parent-style-name="Text_20_body_20_2">
      <style:paragraph-properties fo:margin-left="1cm" fo:margin-right="0cm" fo:margin-top="0cm" fo:margin-bottom="0.212cm" fo:text-align="justify" style:justify-single-word="false" fo:orphans="2" fo:widows="2" fo:hyphenation-ladder-count="no-limit" fo:text-indent="0cm" style:auto-text-indent="false">
        <style:tab-stops/>
        <style:drop-cap/>
      </style:paragraph-properties>
      <style:text-properties style:font-name="Bitstream Vera Sans2" fo:language="de" fo:country="DE" fo:font-style="normal" fo:font-weight="normal" style:font-name-asian="OpenSymbol" style:font-style-asian="normal" style:font-name-complex="OpenSymbol" style:font-style-complex="normal" fo:hyphenate="true" fo:hyphenation-remain-char-count="2" fo:hyphenation-push-char-count="2"/>
    </style:style>
    <style:style style:name="P255" style:family="paragraph" style:parent-style-name="Text_20_body_20_2">
      <style:paragraph-properties fo:margin-left="1cm" fo:margin-right="0cm" fo:margin-top="0cm" fo:margin-bottom="0.212cm" fo:text-align="justify" style:justify-single-word="false" fo:keep-together="auto" fo:orphans="2" fo:widows="2" fo:hyphenation-ladder-count="no-limit" fo:text-indent="0cm" style:auto-text-indent="false">
        <style:tab-stops/>
        <style:drop-cap/>
      </style:paragraph-properties>
      <style:text-properties style:font-name="Bitstream Vera Sans2" fo:language="de" fo:country="DE" fo:font-style="normal" fo:font-weight="normal" style:font-name-asian="OpenSymbol" style:font-style-asian="normal" style:font-name-complex="OpenSymbol" style:font-style-complex="normal" fo:hyphenate="true" fo:hyphenation-remain-char-count="2" fo:hyphenation-push-char-count="2"/>
    </style:style>
    <style:style style:name="P256" style:family="paragraph" style:parent-style-name="Cover_20_Title" style:master-page-name="First_20_Page">
      <style:paragraph-properties fo:text-align="start" style:justify-single-word="false" style:page-number="auto"/>
      <style:text-properties style:font-name="Bitstream Vera Sans2" fo:font-size="24pt" style:font-size-asian="24pt" style:font-size-complex="24pt"/>
    </style:style>
    <style:style style:name="P257" style:family="paragraph">
      <style:paragraph-properties text:enable-numbering="false" fo:margin-left="0cm" fo:margin-right="0cm" fo:margin-top="0cm" fo:margin-bottom="0cm" fo:line-height="100%" fo:text-align="center" fo:text-indent="0cm" style:writing-mode="lr-tb"/>
      <style:text-properties style:use-window-font-color="true" style:text-outline="false" style:font-name="Arial3" fo:font-size="18pt" fo:font-style="normal" fo:text-shadow="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258" style:family="paragraph">
      <style:paragraph-properties text:enable-numbering="false" fo:margin-left="0cm" fo:margin-right="0cm" fo:margin-top="0cm" fo:margin-bottom="0cm" fo:line-height="100%" fo:text-indent="0cm"/>
    </style:style>
    <style:style style:name="P259" style:family="paragraph">
      <style:paragraph-properties text:enable-numbering="false" fo:margin-left="0cm" fo:margin-right="0cm" fo:margin-top="0cm" fo:margin-bottom="0cm" fo:line-height="100%" fo:text-indent="0cm" style:writing-mode="lr-tb"/>
      <style:text-properties style:use-window-font-color="true" style:text-outline="false" style:font-name="Arial3" fo:font-size="9pt" fo:font-style="normal" fo:text-shadow="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260" style:family="paragraph">
      <style:paragraph-properties text:enable-numbering="false" fo:margin-left="0cm" fo:margin-right="0cm" fo:margin-top="0cm" fo:margin-bottom="0cm" fo:line-height="100%" fo:text-indent="0cm" style:writing-mode="lr-tb"/>
      <style:text-properties style:use-window-font-color="true" style:text-outline="false" style:font-name="Arial3" fo:font-size="8pt" fo:font-style="normal" fo:text-shadow="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261" style:family="paragraph">
      <style:paragraph-properties text:enable-numbering="false" fo:margin-left="0cm" fo:margin-right="0cm" fo:margin-top="0cm" fo:margin-bottom="0cm" fo:line-height="100%" fo:text-indent="0cm" style:writing-mode="lr-tb"/>
      <style:text-properties style:use-window-font-color="true" style:text-outline="false" style:font-name="Arial3" fo:font-size="18pt" fo:font-style="normal" fo:text-shadow="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262" style:family="paragraph">
      <style:paragraph-properties fo:text-align="center" style:writing-mode="lr-tb"/>
    </style:style>
    <style:style style:name="P263" style:family="paragraph">
      <style:paragraph-properties style:writing-mode="lr-tb"/>
    </style:style>
    <style:style style:name="P264" style:family="paragraph">
      <style:paragraph-properties text:enable-numbering="false" fo:margin-left="0cm" fo:margin-right="0cm" fo:margin-top="0cm" fo:margin-bottom="0cm" fo:line-height="100%" fo:text-align="center" fo:text-indent="0cm" style:writing-mode="lr-tb"/>
      <style:text-properties style:use-window-font-color="true" style:text-outline="false" style:font-name="Arial3" fo:font-size="18pt" fo:font-style="normal" fo:text-shadow="none" fo:font-weight="normal" style:font-name-asian="Arial Unicode MS" style:font-size-asian="18pt" style:font-style-asian="normal" style:font-weight-asian="normal" style:font-name-complex="Tahoma" style:font-size-complex="18pt" style:font-style-complex="normal" style:font-weight-complex="normal" style:text-emphasize="none" style:font-relief="none"/>
    </style:style>
    <style:style style:name="P265" style:family="paragraph">
      <style:paragraph-properties text:enable-numbering="false" fo:margin-left="0cm" fo:margin-right="0cm" fo:margin-top="0cm" fo:margin-bottom="0cm" fo:line-height="100%" fo:text-indent="0cm" style:writing-mode="lr-tb"/>
      <style:text-properties style:use-window-font-color="true" style:text-outline="false" style:font-name="Arial3" fo:font-size="14pt" fo:font-style="normal" fo:text-shadow="none" fo:font-weight="normal" style:font-name-asian="Arial Unicode MS" style:font-size-asian="14pt" style:font-style-asian="normal" style:font-weight-asian="normal" style:font-name-complex="Tahoma" style:font-size-complex="14pt" style:font-style-complex="normal" style:font-weight-complex="normal" style:text-emphasize="none" style:font-relief="none"/>
    </style:style>
    <style:style style:name="P266" style:family="paragraph">
      <style:paragraph-properties text:enable-numbering="false" fo:margin-left="0cm" fo:margin-right="0cm" fo:margin-top="0cm" fo:margin-bottom="0cm" fo:line-height="100%" fo:text-indent="0cm" style:writing-mode="lr-tb"/>
      <style:text-properties style:use-window-font-color="true" style:text-outline="false" style:font-name="Arial3" fo:font-size="7pt" fo:font-style="normal" fo:text-shadow="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267" style:family="paragraph">
      <style:paragraph-properties text:enable-numbering="false" fo:margin-left="0cm" fo:margin-right="0cm" fo:margin-top="0cm" fo:margin-bottom="0cm" fo:line-height="100%" fo:text-align="center" fo:text-indent="0cm"/>
    </style:style>
    <style:style style:name="P268" style:family="paragraph">
      <style:paragraph-properties text:enable-numbering="false" fo:margin-left="0cm" fo:margin-right="0cm" fo:margin-top="0cm" fo:margin-bottom="0cm" fo:line-height="100%" fo:text-indent="0cm" style:writing-mode="lr-tb"/>
      <style:text-properties style:use-window-font-color="true" style:text-outline="false" style:font-name="Arial3" fo:font-size="8pt" fo:font-style="normal" fo:text-shadow="none" fo:font-weight="bold"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269" style:family="paragraph">
      <style:paragraph-properties text:enable-numbering="false" fo:margin-left="0cm" fo:margin-right="0cm" fo:margin-top="0cm" fo:margin-bottom="0cm" fo:line-height="100%" fo:text-indent="0cm" style:writing-mode="lr-tb"/>
      <style:text-properties style:use-window-font-color="true" style:text-outline="false" style:font-name="Arial3" fo:font-size="12pt" fo:font-style="normal" fo:text-shadow="none" fo:font-weight="normal" style:font-name-asian="Arial Unicode MS" style:font-size-asian="12pt" style:font-style-asian="normal" style:font-weight-asian="normal" style:font-name-complex="Tahoma" style:font-size-complex="12pt" style:font-style-complex="normal" style:font-weight-complex="normal" style:text-emphasize="none" style:font-relief="none"/>
    </style:style>
    <style:style style:name="P270" style:family="paragraph">
      <style:paragraph-properties text:enable-numbering="false" fo:margin-left="0cm" fo:margin-right="0cm" fo:margin-top="0cm" fo:margin-bottom="0cm" fo:line-height="100%" fo:text-align="center" fo:text-indent="0cm" style:writing-mode="lr-tb"/>
      <style:text-properties style:use-window-font-color="true" style:text-outline="false" style:font-name="Arial3" fo:font-size="18pt" fo:font-style="normal" fo:text-shadow="none" fo:font-weight="normal" style:letter-kerning="true"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271" style:family="paragraph">
      <style:paragraph-properties text:enable-numbering="false" fo:margin-left="0cm" fo:margin-right="0cm" fo:margin-top="0cm" fo:margin-bottom="0cm" fo:line-height="100%" fo:text-indent="0cm" style:writing-mode="lr-tb"/>
      <style:text-properties style:use-window-font-color="true" style:text-outline="false" style:font-name="Arial3" fo:font-size="9pt" fo:font-style="normal" fo:text-shadow="none" fo:font-weight="normal" style:letter-kerning="true"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272" style:family="paragraph">
      <style:paragraph-properties text:enable-numbering="false" fo:margin-left="0cm" fo:margin-right="0cm" fo:margin-top="0cm" fo:margin-bottom="0cm" fo:line-height="100%" fo:text-indent="0cm" style:writing-mode="lr-tb"/>
      <style:text-properties style:use-window-font-color="true" style:text-outline="false" style:font-name="Arial3" fo:font-size="14pt" fo:font-style="normal" fo:text-shadow="none" fo:font-weight="normal" style:letter-kerning="true"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273" style:family="paragraph">
      <style:paragraph-properties text:enable-numbering="false" fo:margin-left="0cm" fo:margin-right="0cm" fo:margin-top="0cm" fo:margin-bottom="0cm" fo:line-height="100%" fo:text-indent="0cm" style:writing-mode="lr-tb"/>
      <style:text-properties fo:color="#00ff00" style:text-outline="false" style:font-name="Arial3" fo:font-size="10pt" fo:font-style="normal" fo:text-shadow="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274" style:family="paragraph">
      <style:paragraph-properties text:enable-numbering="false" fo:margin-left="0cm" fo:margin-right="0cm" fo:margin-top="0cm" fo:margin-bottom="0cm" fo:line-height="100%" fo:text-indent="0cm" style:writing-mode="lr-tb"/>
      <style:text-properties fo:color="#0000ff" style:text-outline="false" style:font-name="Arial3" fo:font-size="10pt" fo:font-style="normal" fo:text-shadow="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T1" style:family="text">
      <style:text-properties style:font-name="Arial2"/>
    </style:style>
    <style:style style:name="T2" style:family="text">
      <style:text-properties fo:language="en" fo:country="US"/>
    </style:style>
    <style:style style:name="T3" style:family="text">
      <style:text-properties fo:language="en" fo:country="US" fo:font-style="normal" style:font-name-asian="OpenSymbol" style:font-style-asian="normal" style:font-name-complex="OpenSymbol" style:font-style-complex="normal"/>
    </style:style>
    <style:style style:name="T4" style:family="text">
      <style:text-properties fo:language="en" fo:country="US" fo:font-style="normal" fo:font-weight="normal" style:font-name-asian="OpenSymbol" style:font-style-asian="normal" style:font-name-complex="OpenSymbol" style:font-style-complex="normal"/>
    </style:style>
    <style:style style:name="T5" style:family="text">
      <style:text-properties fo:language="en" fo:country="US" fo:font-weight="normal"/>
    </style:style>
    <style:style style:name="T6" style:family="text">
      <style:text-properties fo:language="en" fo:country="US" style:font-size-asian="16.1000003814697pt" style:font-size-complex="16.1000003814697pt"/>
    </style:style>
    <style:style style:name="T7" style:family="text">
      <style:text-properties fo:language="de" fo:country="DE"/>
    </style:style>
    <style:style style:name="T8" style:family="text">
      <style:text-properties fo:language="en" fo:country="GB"/>
    </style:style>
    <style:style style:name="T9" style:family="text">
      <style:text-properties style:font-name-asian="OpenSymbol" style:font-name-complex="OpenSymbol"/>
    </style:style>
    <style:style style:name="T10" style:family="text">
      <style:text-properties fo:font-style="normal" style:font-name-asian="OpenSymbol" style:font-style-asian="normal" style:font-name-complex="OpenSymbol" style:font-style-complex="normal"/>
    </style:style>
    <style:style style:name="T11" style:family="text">
      <style:text-properties fo:font-style="normal" fo:font-weight="normal" style:font-name-asian="OpenSymbol" style:font-style-asian="normal" style:font-name-complex="OpenSymbol" style:font-style-complex="normal"/>
    </style:style>
    <style:style style:name="T12" style:family="text">
      <style:text-properties fo:font-weight="normal"/>
    </style:style>
    <style:style style:name="T13" style:family="text">
      <style:text-properties fo:font-weight="normal" style:font-name-asian="OpenSymbol" style:font-name-complex="OpenSymbol"/>
    </style:style>
    <style:style style:name="T14" style:family="text">
      <style:text-properties style:font-name="Bitstream Vera Sans2"/>
    </style:style>
    <style:style style:name="T15" style:family="text">
      <style:text-properties style:font-name="Bitstream Vera Sans2" fo:language="en" fo:country="US"/>
    </style:style>
    <style:style style:name="T16" style:family="text">
      <style:text-properties style:font-name="Bitstream Vera Sans2" fo:language="en" fo:country="US" fo:font-style="normal" style:font-name-asian="OpenSymbol" style:font-style-asian="normal" style:font-name-complex="OpenSymbol" style:font-style-complex="normal"/>
    </style:style>
    <style:style style:name="T17" style:family="text">
      <style:text-properties style:font-name="Bitstream Vera Sans2" fo:language="en" fo:country="US" style:font-name-asian="OpenSymbol" style:font-name-complex="OpenSymbol"/>
    </style:style>
    <style:style style:name="T18" style:family="text">
      <style:text-properties style:font-name="Bitstream Vera Sans2" fo:language="de" fo:country="DE"/>
    </style:style>
    <style:style style:name="T19" style:family="text">
      <style:text-properties style:font-name="Bitstream Vera Sans2" fo:language="de" fo:country="DE" fo:font-style="normal" style:font-name-asian="OpenSymbol" style:font-style-asian="normal" style:font-name-complex="OpenSymbol" style:font-style-complex="normal"/>
    </style:style>
    <style:style style:name="T20" style:family="text">
      <style:text-properties style:font-name="Bitstream Vera Sans2" fo:language="de" fo:country="DE" fo:font-style="normal" fo:font-weight="normal" style:font-name-asian="OpenSymbol" style:font-style-asian="normal" style:font-name-complex="OpenSymbol" style:font-style-complex="normal"/>
    </style:style>
    <style:style style:name="T21" style:family="text">
      <style:text-properties style:font-name="Bitstream Vera Sans2" fo:font-style="normal" style:font-name-asian="OpenSymbol" style:font-style-asian="normal" style:font-name-complex="OpenSymbol" style:font-style-complex="normal"/>
    </style:style>
    <style:style style:name="T22" style:family="text">
      <style:text-properties style:font-name="Bitstream Vera Sans2" fo:font-style="normal" fo:font-weight="normal" style:font-name-asian="OpenSymbol" style:font-style-asian="normal" style:font-name-complex="OpenSymbol" style:font-style-complex="normal"/>
    </style:style>
    <style:style style:name="T23" style:family="text">
      <style:text-properties style:font-name="Bitstream Vera Sans2" style:font-name-asian="OpenSymbol" style:font-name-complex="OpenSymbol"/>
    </style:style>
    <style:style style:name="T24" style:family="text">
      <style:text-properties style:font-name="Bitstream Vera Sans2" fo:font-weight="normal" style:font-name-asian="OpenSymbol" style:font-name-complex="OpenSymbol"/>
    </style:style>
    <style:style style:name="T25" style:family="text">
      <style:text-properties style:font-name="Bitstream Vera Sans2" fo:font-weight="normal" fo:background-color="transparent" style:font-name-asian="OpenSymbol" style:font-name-complex="OpenSymbol"/>
    </style:style>
    <style:style style:name="T26" style:family="text">
      <style:text-properties style:font-name="Bitstream Vera Sans2" fo:language="zxx" fo:country="none" style:font-name-asian="OpenSymbol" style:language-asian="zxx" style:country-asian="none" style:font-name-complex="OpenSymbol" style:language-complex="zxx" style:country-complex="none"/>
    </style:style>
    <style:style style:name="T27" style:family="text">
      <style:text-properties fo:font-size="16pt" fo:language="de" fo:country="DE" fo:font-style="normal" fo:font-weight="bold" style:font-name-asian="HG Mincho Light J" style:font-size-asian="14pt" style:font-style-asian="italic" style:font-weight-asian="bold" style:font-name-complex="Arial Unicode MS1" style:font-size-complex="14pt" style:font-style-complex="italic" style:font-weight-complex="bold"/>
    </style:style>
    <style:style style:name="T28" style:family="text">
      <style:text-properties fo:font-size="8pt" fo:language="de" fo:country="DE" fo:background-color="transparent" style:font-name-asian="OpenSymbol" style:font-size-asian="8pt" style:font-name-complex="OpenSymbol" style:font-size-complex="8pt"/>
    </style:style>
    <style:style style:name="T29" style:family="text">
      <style:text-properties fo:font-size="8pt" fo:language="en" fo:country="US" fo:background-color="transparent" style:font-name-asian="OpenSymbol" style:font-size-asian="8pt" style:font-name-complex="OpenSymbol" style:font-size-complex="8pt"/>
    </style:style>
    <style:style style:name="T30" style:family="text">
      <style:text-properties style:text-position="super 58%"/>
    </style:style>
    <style:style style:name="T31" style:family="text">
      <style:text-properties fo:language="zxx" fo:country="none" style:language-asian="zxx" style:country-asian="none" style:language-complex="zxx" style:country-complex="none"/>
    </style:style>
    <style:style style:name="T32" style:family="text">
      <style:text-properties style:use-window-font-color="true" style:text-outline="false" style:font-name="Arial3" fo:font-size="9pt" fo:font-style="normal" fo:text-shadow="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T33" style:family="text">
      <style:text-properties style:use-window-font-color="true" style:text-outline="false" style:font-name="Arial3" fo:font-size="8pt" fo:font-style="normal" fo:text-shadow="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T34" style:family="text">
      <style:text-properties style:use-window-font-color="true" style:text-outline="false" style:font-name="Arial3" fo:font-size="18pt" fo:font-style="normal" fo:text-shadow="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T35" style:family="text">
      <style:text-properties style:use-window-font-color="true" style:text-outline="false" style:font-name="Arial3" fo:font-size="14pt" fo:font-style="normal" fo:text-shadow="none" fo:font-weight="normal" style:font-name-asian="Arial Unicode MS" style:font-size-asian="14pt" style:font-style-asian="normal" style:font-weight-asian="normal" style:font-name-complex="Tahoma" style:font-size-complex="14pt" style:font-style-complex="normal" style:font-weight-complex="normal" style:text-emphasize="none" style:font-relief="none"/>
    </style:style>
    <style:style style:name="T36" style:family="text">
      <style:text-properties style:use-window-font-color="true" style:text-outline="false" style:font-name="Arial3" fo:font-size="7pt" fo:font-style="normal" fo:text-shadow="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T37" style:family="text">
      <style:text-properties style:use-window-font-color="true" style:text-outline="false" style:font-name="Arial3" fo:font-size="8pt" fo:font-style="normal" fo:text-shadow="none" fo:font-weight="bold"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T38" style:family="text">
      <style:text-properties style:use-window-font-color="true" style:text-outline="false" style:font-name="Arial3" fo:font-size="12pt" fo:font-style="normal" fo:text-shadow="none" fo:font-weight="normal" style:font-name-asian="Arial Unicode MS" style:font-size-asian="12pt" style:font-style-asian="normal" style:font-weight-asian="normal" style:font-name-complex="Tahoma" style:font-size-complex="12pt" style:font-style-complex="normal" style:font-weight-complex="normal" style:text-emphasize="none" style:font-relief="none"/>
    </style:style>
    <style:style style:name="T39" style:family="text">
      <style:text-properties style:use-window-font-color="true" style:text-outline="false" style:font-name="Arial3" fo:font-size="9pt" fo:font-style="normal" fo:text-shadow="none" fo:font-weight="normal" style:letter-kerning="true"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T40" style:family="text">
      <style:text-properties style:use-window-font-color="true" style:text-outline="false" style:font-name="Arial3" fo:font-size="14pt" fo:font-style="normal" fo:text-shadow="none" fo:font-weight="normal" style:letter-kerning="true"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T41" style:family="text">
      <style:text-properties fo:color="#00ff00" style:text-outline="false" style:font-name="Arial3" fo:font-size="10pt" fo:font-style="normal" fo:text-shadow="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T42" style:family="text">
      <style:text-properties fo:color="#0000ff" style:text-outline="false" style:font-name="Arial3" fo:font-size="10pt" fo:font-style="normal" fo:text-shadow="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background-color="transparent" style:background-transparency="100%" fo:padding="0cm" fo:border="none" style:shadow="none" style:flow-with-text="false">
        <style:background-image/>
        <style:columns fo:column-count="1" fo:column-gap="0cm"/>
      </style:graphic-properties>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499cm, 8.999cm, 1.499cm, 0.499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1cm" fo:margin-right="0.101cm" fo:margin-top="1cm" fo:margin-bottom="1cm" style:run-through="foreground" style:wrap="left" style:number-wrapped-paragraphs="no-limit" style:wrap-contour="false" style:vertical-pos="from-top" style:vertical-rel="paragraph"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fo:margin-left="1cm" fo:margin-right="1cm" fo:margin-top="1cm" fo:margin-bottom="1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cm" fo:margin-right="0.3cm" fo:margin-top="0.3cm" fo:margin-bottom="0.3cm" style:vertical-pos="from-top" style:vertical-rel="paragraph"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10" style:family="graphic" style:parent-style-name="Graphics">
      <style:graphic-properties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499cm" fo:margin-right="0.101cm" fo:margin-top="0.499cm" fo:margin-bottom="0.499cm"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499cm" fo:margin-right="0.101cm" fo:margin-top="0.101cm" fo:margin-bottom="0.499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fo:padding="0.049cm" fo:border="0.035cm solid #000000" style:shadow="no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15" style:family="graphic" style:parent-style-name="Graphics">
      <style:graphic-properties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vertical-pos="from-top" style:vertical-rel="paragraph" style:horizontal-pos="from-left" style:horizontal-rel="paragraph" style:mirror="none" fo:clip="rect(0cm, 15cm, 0cm, 0cm)" draw:luminance="0%" draw:contrast="0%" draw:red="0%" draw:green="0%" draw:blue="0%" draw:gamma="100%" draw:color-inversion="false" draw:image-opacity="100%" draw:color-mode="standard"/>
    </style:style>
    <style:style style:name="fr20" style:family="graphic" style:parent-style-name="Graphics">
      <style:graphic-properties fo:margin-left="0.499cm" fo:margin-right="0.101cm" fo:margin-top="0.499cm" fo:margin-bottom="0.199cm"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Formula">
      <style:graphic-properties style:wrap="parallel" style:number-wrapped-paragraphs="no-limit" style:wrap-contour="false" style:vertical-pos="from-top" style:vertical-rel="paragraph" style:horizontal-pos="from-left" style:horizontal-rel="paragraph" fo:background-color="#ffffff" style:background-transparency="100%" style:shadow="none" draw:ole-draw-aspect="1">
        <style:background-image/>
      </style:graphic-properties>
    </style:style>
    <style:style style:name="fr22" style:family="graphic" style:parent-style-name="Formula">
      <style:graphic-properties style:vertical-pos="from-top" style:vertical-rel="paragraph" style:horizontal-pos="from-left" style:horizontal-rel="paragraph" style:shadow="none" draw:ole-draw-aspect="1"/>
    </style:style>
    <style:style style:name="fr23" style:family="graphic" style:parent-style-name="Formula">
      <style:graphic-properties style:wrap="parallel" style:number-wrapped-paragraphs="no-limit" style:wrap-contour="false" style:vertical-pos="from-top" style:vertical-rel="paragraph" style:horizontal-pos="from-left" style:horizontal-rel="paragraph" style:shadow="none" draw:ole-draw-aspect="1"/>
    </style:style>
    <style:style style:name="fr24" style:family="graphic" style:parent-style-name="Formula">
      <style:graphic-properties style:vertical-pos="from-top" style:vertical-rel="paragraph" style:horizontal-pos="from-left" style:horizontal-rel="paragraph" draw:ole-draw-aspect="1"/>
    </style:style>
    <style:style style:name="fr25" style:family="graphic" style:parent-style-name="Formula">
      <style:graphic-properties style:vertical-pos="middle" style:vertical-rel="text" style:horizontal-pos="from-left" style:horizontal-rel="paragraph-content" draw:ole-draw-aspect="1"/>
    </style:style>
    <style:style style:name="fr26" style:family="graphic" style:parent-style-name="OLE">
      <style:graphic-properties style:vertical-pos="from-top" style:vertical-rel="paragraph" style:horizontal-pos="from-left" style:horizontal-rel="paragraph" draw:ole-draw-aspect="1"/>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fo:background-color="#ffffff" style:editable="false">
        <style:columns fo:column-count="2" fo:column-gap="0.699cm">
          <style:column style:rel-width="32767*" fo:start-indent="0cm" fo:end-indent="0.349cm"/>
          <style:column style:rel-width="32768*" fo:start-indent="0.349cm" fo:end-indent="0cm"/>
        </style:columns>
        <style:background-image/>
      </style:section-properties>
    </style:style>
    <style:style style:name="Sect3" style:family="section">
      <style:section-properties style:editable="false">
        <style:columns fo:column-count="1" fo:column-gap="0cm"/>
      </style:section-properties>
    </style:style>
    <text:list-style style:name="L1">
      <text:list-level-style-number text:level="1" text:style-name="Numbering_20_Symbols" style:num-suffix="  " style:num-format="1">
        <style:list-level-properties text:min-label-width="0.801cm" text:min-label-distance="0.25cm"/>
      </text:list-level-style-number>
      <text:list-level-style-number text:level="2" style:num-suffix="  " style:num-format="1" text:display-levels="2">
        <style:list-level-properties text:space-before="0.1cm" text:min-label-width="0.801cm" text:min-label-distance="0.25cm"/>
      </text:list-level-style-number>
      <text:list-level-style-number text:level="3" style:num-suffix="  " style:num-format="1" text:display-levels="3">
        <style:list-level-properties text:space-before="0.1cm" text:min-label-width="0.801cm" text:min-label-distance="0.25cm"/>
      </text:list-level-style-number>
      <text:list-level-style-number text:level="4" style:num-format="1" text:display-levels="4">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format="">
        <style:list-level-properties/>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number text:level="1" text:style-name="Numbering_20_Symbols" style:num-suffix="." style:num-format="1" text:start-value="2">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style:style style:name="gr1"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49cm" svg:stroke-color="#0000ff" draw:marker-start-width="0.379cm" draw:marker-start-center="false" draw:marker-end-width="0.379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3" style:family="graphic">
      <style:graphic-properties draw:stroke="solid" svg:stroke-width="0.049cm" svg:stroke-color="#00ff00" draw:marker-start-width="0.379cm" draw:marker-start-center="false" draw:marker-end-width="0.379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4" style:family="graphic">
      <style:graphic-properties draw:stroke="solid" svg:stroke-width="0.049cm" svg:stroke-color="#ff00ff" draw:marker-start-width="0.379cm" draw:marker-start-center="false" draw:marker-end-width="0.379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5" style:family="graphic">
      <style:graphic-properties draw:stroke="solid" svg:stroke-width="0.049cm" svg:stroke-color="#23b8dc" draw:marker-start-width="0.379cm" draw:marker-start-center="false" draw:marker-end-width="0.379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6" style:family="graphic">
      <style:graphic-properties draw:stroke="none" svg:stroke-width="0cm" svg:stroke-color="#000000" draw:marker-start-width="0.3cm" draw:marker-start-center="false" draw:marker-end-width="0.3cm" draw:marker-end-center="false" draw:fill="none" draw:fill-color="#ffffff" fo:min-height="0.399cm" fo:padding-top="0.125cm" fo:padding-bottom="0.125cm" fo:padding-left="0.25cm" fo:padding-right="0.25cm" draw:shadow="hidden" draw:shadow-offset-x="0.3cm" draw:shadow-offset-y="0.3cm" draw:shadow-color="#808080" style:run-through="foreground"/>
    </style:style>
    <style:style style:name="gr7" style:family="graphic">
      <style:graphic-properties draw:stroke="solid" svg:stroke-width="0cm" svg:stroke-color="#000000" draw:marker-start="Dimension_20_Lines" draw:marker-start-width="0.3cm" draw:marker-start-center="false"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8" style:family="graphic">
      <style:graphic-properties style:run-through="foreground"/>
    </style:style>
    <style:style style:name="gr9" style:family="graphic">
      <style:graphic-properties draw:stroke="none" svg:stroke-width="0cm" svg:stroke-color="#000000" draw:marker-start-width="0.3cm" draw:marker-start-center="false" draw:marker-end-width="0.3cm" draw:marker-end-center="false" draw:fill="none" draw:fill-color="#ffffff" fo:min-height="0.497cm" fo:padding-top="0.125cm" fo:padding-bottom="0.125cm" fo:padding-left="0.25cm" fo:padding-right="0.25cm" draw:shadow="hidden" draw:shadow-offset-x="0.3cm" draw:shadow-offset-y="0.3cm" draw:shadow-color="#808080" style:run-through="foreground"/>
    </style:style>
    <style:style style:name="gr10" style:family="graphic">
      <style:graphic-properties draw:stroke="solid" svg:stroke-width="0.049cm" svg:stroke-color="#c0c0c0" draw:marker-start-width="0.379cm" draw:marker-start-center="false" draw:marker-end-width="0.379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11" style:family="graphic">
      <style:graphic-properties draw:stroke="solid" svg:stroke-width="0.049cm" svg:stroke-color="#008080" draw:marker-start-width="0.379cm" draw:marker-start-center="false" draw:marker-end-width="0.379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12" style:family="graphic">
      <style:graphic-properties draw:stroke="solid" svg:stroke-width="0.049cm" svg:stroke-color="#5c8526" draw:marker-start-width="0.379cm" draw:marker-start-center="false" draw:marker-end-width="0.379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13" style:family="graphic">
      <style:graphic-properties draw:stroke="solid" svg:stroke-width="0.049cm" svg:stroke-color="#808080" draw:marker-start-width="0.379cm" draw:marker-start-center="false" draw:marker-end-width="0.379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14" style:family="graphic">
      <style:graphic-properties draw:stroke="solid" svg:stroke-width="0cm" svg:stroke-color="#000000" draw:marker-start-width="0.3cm" draw:marker-start-center="false"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5" style:family="graphic">
      <style:graphic-properties draw:stroke="none" svg:stroke-width="0cm" svg:stroke-color="#000000" draw:marker-start-width="0.3cm" draw:marker-start-center="false" draw:marker-end-width="0.3cm" draw:marker-end-center="false" draw:fill="none" draw:fill-color="#ffffff" fo:min-height="0.4cm" fo:padding-top="0.125cm" fo:padding-bottom="0.125cm" fo:padding-left="0.25cm" fo:padding-right="0.25cm" draw:shadow="hidden" draw:shadow-offset-x="0.3cm" draw:shadow-offset-y="0.3cm" draw:shadow-color="#808080" style:run-through="foreground"/>
    </style:style>
    <style:style style:name="gr16" style:family="graphic">
      <style:graphic-properties draw:stroke="none" svg:stroke-width="0cm" svg:stroke-color="#000000" draw:marker-start-width="0.3cm" draw:marker-start-center="false" draw:marker-end-width="0.3cm" draw:marker-end-center="false" draw:fill="none" draw:fill-color="#ffffff" fo:min-height="0.799cm" fo:padding-top="0.125cm" fo:padding-bottom="0.125cm" fo:padding-left="0.25cm" fo:padding-right="0.25cm" draw:shadow="hidden" draw:shadow-offset-x="0.3cm" draw:shadow-offset-y="0.3cm" draw:shadow-color="#808080" style:run-through="foreground"/>
    </style:style>
    <style:style style:name="gr17" style:family="graphic">
      <style:graphic-properties draw:stroke="none" svg:stroke-width="0cm" svg:stroke-color="#000000" draw:marker-start-width="0.3cm" draw:marker-start-center="false" draw:marker-end-width="0.3cm" draw:marker-end-center="false" draw:fill="none" draw:fill-color="#ffffff" fo:min-height="0.402cm" fo:padding-top="0.125cm" fo:padding-bottom="0.125cm" fo:padding-left="0.25cm" fo:padding-right="0.25cm" draw:shadow="hidden" draw:shadow-offset-x="0.3cm" draw:shadow-offset-y="0.3cm" draw:shadow-color="#808080" style:run-through="foreground"/>
    </style:style>
    <style:style style:name="gr18" style:family="graphic">
      <style:graphic-properties draw:stroke="none" svg:stroke-width="0cm" svg:stroke-color="#000000" draw:marker-start-width="0.3cm" draw:marker-start-center="false" draw:marker-end-width="0.3cm" draw:marker-end-center="false" draw:fill="none" draw:fill-color="#ffffff" fo:min-height="0.801cm" fo:padding-top="0.125cm" fo:padding-bottom="0.125cm" fo:padding-left="0.25cm" fo:padding-right="0.25cm" draw:shadow="hidden" draw:shadow-offset-x="0.3cm" draw:shadow-offset-y="0.3cm" draw:shadow-color="#808080" style:run-through="foreground"/>
    </style:style>
    <style:style style:name="gr19" style:family="graphic">
      <style:graphic-properties draw:stroke="none" svg:stroke-width="0cm" svg:stroke-color="#000000" draw:marker-start-width="0.3cm" draw:marker-start-center="false" draw:marker-end-width="0.3cm" draw:marker-end-center="false" draw:fill="none" draw:fill-color="#ffffff" fo:min-height="0.355cm" fo:padding-top="0.125cm" fo:padding-bottom="0.125cm" fo:padding-left="0.25cm" fo:padding-right="0.25cm" draw:shadow="hidden" draw:shadow-offset-x="0.3cm" draw:shadow-offset-y="0.3cm" draw:shadow-color="#808080" style:run-through="foreground"/>
    </style:style>
    <style:style style:name="gr20" style:family="graphic">
      <style:graphic-properties draw:stroke="none" svg:stroke-width="0cm" svg:stroke-color="#000000" draw:marker-start-width="0.3cm" draw:marker-start-center="false" draw:marker-end-width="0.3cm" draw:marker-end-center="false" draw:fill="none" draw:fill-color="#ffffff" fo:min-height="0.356cm" fo:padding-top="0.125cm" fo:padding-bottom="0.125cm" fo:padding-left="0.25cm" fo:padding-right="0.25cm" draw:shadow="hidden" draw:shadow-offset-x="0.3cm" draw:shadow-offset-y="0.3cm" draw:shadow-color="#808080" style:run-through="foreground"/>
    </style:style>
    <style:style style:name="gr21" style:family="graphic">
      <style:graphic-properties draw:stroke="solid" svg:stroke-width="0cm" svg:stroke-color="#000000" draw:marker-start="Dimension_20_Lines" draw:marker-start-width="0.3cm" draw:marker-start-center="false" draw:marker-end="Dimension_20_Lines"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2" style:family="graphic">
      <style:graphic-properties draw:stroke="solid" svg:stroke-width="0.049cm" svg:stroke-color="#000000" draw:marker-start-width="0.379cm" draw:marker-start-center="false" draw:marker-end-width="0.379cm" draw:marker-end-center="false" draw:fill="none"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23" style:family="graphic">
      <style:graphic-properties draw:stroke="solid" svg:stroke-width="0.049cm" svg:stroke-color="#000000" draw:marker-start-width="0.379cm" draw:marker-start-center="false" draw:marker-end-width="0.379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24" style:family="graphic">
      <style:graphic-properties draw:stroke="solid" svg:stroke-width="0.049cm" svg:stroke-color="#000000" draw:marker-start="Circle" draw:marker-start-width="0.25cm" draw:marker-start-center="true" draw:marker-end-width="0.25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25" style:family="graphic">
      <style:graphic-properties draw:stroke="none" svg:stroke-width="0cm" svg:stroke-color="#000000" draw:marker-start-width="0.3cm" draw:marker-start-center="false" draw:marker-end-width="0.3cm" draw:marker-end-center="false" draw:fill="none" draw:fill-color="#ffffff" fo:min-height="0.586cm" fo:padding-top="0.125cm" fo:padding-bottom="0.125cm" fo:padding-left="0.25cm" fo:padding-right="0.25cm" draw:shadow="hidden" draw:shadow-offset-x="0.3cm" draw:shadow-offset-y="0.3cm" draw:shadow-color="#808080" style:run-through="foreground"/>
    </style:style>
    <style:style style:name="gr26" style:family="graphic">
      <style:graphic-properties draw:stroke="none" svg:stroke-width="0cm" svg:stroke-color="#000000" draw:marker-start-width="0.3cm" draw:marker-start-center="false" draw:marker-end-width="0.3cm" draw:marker-end-center="false" draw:fill="none" draw:fill-color="#ffffff" fo:min-height="0.75cm" fo:padding-top="0.125cm" fo:padding-bottom="0.125cm" fo:padding-left="0.25cm" fo:padding-right="0.25cm" draw:shadow="hidden" draw:shadow-offset-x="0.3cm" draw:shadow-offset-y="0.3cm" draw:shadow-color="#808080" style:run-through="foreground"/>
    </style:style>
    <style:style style:name="gr27" style:family="graphic">
      <style:graphic-properties draw:stroke="none" svg:stroke-width="0cm" svg:stroke-color="#000000" draw:marker-start-width="0.3cm" draw:marker-start-center="false" draw:marker-end-width="0.3cm" draw:marker-end-center="false" draw:fill="none" draw:fill-color="#ffffff" fo:min-height="0.587cm" fo:padding-top="0.125cm" fo:padding-bottom="0.125cm" fo:padding-left="0.25cm" fo:padding-right="0.25cm" draw:shadow="hidden" draw:shadow-offset-x="0.3cm" draw:shadow-offset-y="0.3cm" draw:shadow-color="#808080" style:run-through="foreground"/>
    </style:style>
    <style:style style:name="gr28" style:family="graphic">
      <style:graphic-properties svg:stroke-width="0.03cm" draw:marker-start-width="0.39cm" draw:marker-end-width="0.39cm" draw:fill="none" draw:textarea-horizontal-align="center" draw:textarea-vertical-align="middle" fo:padding-top="0.016cm" fo:padding-bottom="0.016cm" fo:padding-left="0.016cm" fo:padding-right="0.016cm" style:run-through="foreground"/>
    </style:style>
    <style:style style:name="gr29" style:family="graphic">
      <style:graphic-properties svg:stroke-width="0.049cm" draw:marker-start-width="0.42cm" draw:marker-end-width="0.42cm" draw:textarea-horizontal-align="center" draw:textarea-vertical-align="middle" fo:padding-top="0.025cm" fo:padding-bottom="0.025cm" fo:padding-left="0.025cm" fo:padding-right="0.025cm" style:run-through="foreground"/>
    </style:style>
    <style:style style:name="gr30" style:family="graphic">
      <style:graphic-properties svg:stroke-width="0.049cm" draw:marker-start-width="0.42cm" draw:marker-end="Arrow" draw:marker-end-width="0.42cm" draw:textarea-horizontal-align="center" draw:textarea-vertical-align="middle" fo:padding-top="0.025cm" fo:padding-bottom="0.025cm" fo:padding-left="0.025cm" fo:padding-right="0.025cm" style:run-through="foreground"/>
    </style:style>
    <style:style style:name="gr31" style:family="graphic">
      <style:graphic-properties draw:stroke="none" svg:stroke-color="#000000" draw:fill="none" draw:fill-color="#ffffff" fo:min-height="0.464cm" style:run-through="foreground"/>
    </style:style>
    <style:style style:name="gr32" style:family="graphic">
      <style:graphic-properties draw:stroke="none" svg:stroke-width="0cm" svg:stroke-color="#000000" draw:marker-start-width="0.3cm" draw:marker-start-center="false" draw:marker-end-width="0.3cm" draw:marker-end-center="false" draw:fill="none"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style>
    <style:style style:name="gr33" style:family="graphic">
      <style:graphic-properties draw:stroke="none" svg:stroke-width="0cm" svg:stroke-color="#000000" draw:marker-start-width="0.3cm" draw:marker-start-center="false" draw:marker-end-width="0.3cm" draw:marker-end-center="false" draw:fill="none" draw:fill-color="#ffffff" fo:min-height="1.764cm" fo:padding-top="0.125cm" fo:padding-bottom="0.125cm" fo:padding-left="0.25cm" fo:padding-right="0.25cm" draw:shadow="hidden" draw:shadow-offset-x="0.3cm" draw:shadow-offset-y="0.3cm" draw:shadow-color="#808080" style:run-through="foreground"/>
    </style:style>
    <style:style style:name="gr34" style:family="graphic">
      <style:graphic-properties draw:stroke="none" svg:stroke-width="0cm" svg:stroke-color="#000000" draw:marker-start-width="0.3cm" draw:marker-start-center="false" draw:marker-end-width="0.3cm" draw:marker-end-center="false" draw:fill="none" draw:fill-color="#ffffff" fo:min-height="0.903cm" fo:padding-top="0.125cm" fo:padding-bottom="0.125cm" fo:padding-left="0.25cm" fo:padding-right="0.25cm" draw:shadow="hidden" draw:shadow-offset-x="0.3cm" draw:shadow-offset-y="0.3cm" draw:shadow-color="#808080" style:run-through="foreground"/>
    </style:style>
    <style:style style:name="gr35" style:family="graphic">
      <style:graphic-properties draw:stroke="none" svg:stroke-width="0cm" svg:stroke-color="#000000" draw:marker-start-width="0.3cm" draw:marker-start-center="false" draw:marker-end-width="0.3cm" draw:marker-end-center="false" draw:fill="none" draw:fill-color="#ffffff" fo:min-height="0.39cm" fo:padding-top="0.125cm" fo:padding-bottom="0.125cm" fo:padding-left="0.25cm" fo:padding-right="0.25cm" draw:shadow="hidden" draw:shadow-offset-x="0.3cm" draw:shadow-offset-y="0.3cm" draw:shadow-color="#808080" style:run-through="foreground"/>
    </style:style>
    <style:style style:name="gr36" style:family="graphic">
      <style:graphic-properties draw:stroke="solid" svg:stroke-width="0.049cm" svg:stroke-color="#800080" draw:marker-start-width="0.379cm" draw:marker-start-center="false" draw:marker-end-width="0.379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37" style:family="graphic">
      <style:graphic-properties draw:stroke="none" svg:stroke-width="0cm" svg:stroke-color="#000000" draw:marker-start-width="0.3cm" draw:marker-start-center="false" draw:marker-end-width="0.3cm" draw:marker-end-center="false" draw:fill="none" draw:fill-color="#ffffff" fo:min-height="0.388cm" fo:padding-top="0.125cm" fo:padding-bottom="0.125cm" fo:padding-left="0.25cm" fo:padding-right="0.25cm" draw:shadow="hidden" draw:shadow-offset-x="0.3cm" draw:shadow-offset-y="0.3cm" draw:shadow-color="#808080" style:run-through="foreground"/>
    </style:style>
    <style:style style:name="gr38" style:family="graphic">
      <style:graphic-properties draw:stroke="solid" svg:stroke-width="0cm" svg:stroke-color="#000000" draw:marker-start="Arrow" draw:marker-start-width="0.101cm" draw:marker-start-center="false" draw:marker-end="Arrow" draw:marker-end-width="0.101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9" style:family="graphic">
      <style:graphic-properties draw:stroke="none" svg:stroke-width="0cm" svg:stroke-color="#000000" draw:marker-start-width="0.3cm" draw:marker-start-center="false" draw:marker-end-width="0.3cm" draw:marker-end-center="false" draw:fill="none" draw:fill-color="#ffffff" fo:min-height="0.337cm" fo:padding-top="0.125cm" fo:padding-bottom="0.125cm" fo:padding-left="0.25cm" fo:padding-right="0.25cm" draw:shadow="hidden" draw:shadow-offset-x="0.3cm" draw:shadow-offset-y="0.3cm" draw:shadow-color="#808080" style:run-through="foreground"/>
    </style:style>
    <style:style style:name="gr40" style:family="graphic">
      <style:graphic-properties draw:stroke="solid" svg:stroke-width="0cm" svg:stroke-color="#000000" draw:marker-start="Arrow" draw:marker-start-width="0.101cm" draw:marker-start-center="false" draw:marker-end-width="0.101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1" style:family="graphic">
      <style:graphic-properties draw:stroke="none" svg:stroke-width="0cm" svg:stroke-color="#000000" draw:marker-start-width="0.3cm" draw:marker-start-center="false" draw:marker-end-width="0.3cm" draw:marker-end-center="false" draw:fill="none"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style>
    <style:style style:name="gr42" style:family="graphic">
      <style:graphic-properties draw:stroke="none" svg:stroke-width="0cm" svg:stroke-color="#000000" draw:marker-start-width="0.3cm" draw:marker-start-center="false" draw:marker-end-width="0.3cm" draw:marker-end-center="false" draw:fill="none" draw:fill-color="#ffffff" fo:min-height="1.076cm" fo:padding-top="0.125cm" fo:padding-bottom="0.125cm" fo:padding-left="0.25cm" fo:padding-right="0.25cm" draw:shadow="hidden" draw:shadow-offset-x="0.3cm" draw:shadow-offset-y="0.3cm" draw:shadow-color="#808080" style:run-through="foreground"/>
    </style:style>
    <style:style style:name="gr43" style:family="graphic">
      <style:graphic-properties draw:stroke="none" svg:stroke-width="0cm" svg:stroke-color="#000000" draw:marker-start-width="0.3cm" draw:marker-start-center="false" draw:marker-end-width="0.3cm" draw:marker-end-center="false" draw:fill="none" draw:fill-color="#ffffff" fo:min-height="1.074cm" fo:padding-top="0.125cm" fo:padding-bottom="0.125cm" fo:padding-left="0.25cm" fo:padding-right="0.25cm" draw:shadow="hidden" draw:shadow-offset-x="0.3cm" draw:shadow-offset-y="0.3cm" draw:shadow-color="#808080" style:run-through="foreground"/>
    </style:style>
    <style:style style:name="gr44" style:family="graphic">
      <style:graphic-properties draw:stroke="none" svg:stroke-width="0cm" svg:stroke-color="#000000" draw:marker-start-width="0.3cm" draw:marker-start-center="false" draw:marker-end-width="0.3cm" draw:marker-end-center="false" draw:fill="none" draw:fill-color="#ffffff" fo:min-height="1.261cm" fo:padding-top="0.125cm" fo:padding-bottom="0.125cm" fo:padding-left="0.25cm" fo:padding-right="0.25cm" draw:shadow="hidden" draw:shadow-offset-x="0.3cm" draw:shadow-offset-y="0.3cm" draw:shadow-color="#808080" style:run-through="foreground"/>
    </style:style>
    <style:style style:name="gr45" style:family="graphic">
      <style:graphic-properties draw:stroke="none" svg:stroke-width="0cm" svg:stroke-color="#000000" draw:marker-start-width="0.3cm" draw:marker-start-center="false" draw:marker-end-width="0.3cm" draw:marker-end-center="false" draw:fill="none" draw:fill-color="#ffffff" fo:min-height="1.258cm" fo:padding-top="0.125cm" fo:padding-bottom="0.125cm" fo:padding-left="0.25cm" fo:padding-right="0.25cm" draw:shadow="hidden" draw:shadow-offset-x="0.3cm" draw:shadow-offset-y="0.3cm" draw:shadow-color="#808080" style:run-through="foreground"/>
    </style:style>
    <style:style style:name="gr46" style:family="graphic">
      <style:graphic-properties draw:stroke="solid" svg:stroke-width="0.049cm" svg:stroke-color="#00ff00" draw:marker-start-width="0.39cm" draw:marker-start-center="false" draw:marker-end-width="0.39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47" style:family="graphic">
      <style:graphic-properties draw:stroke="solid" svg:stroke-width="0cm" svg:stroke-color="#000000" draw:marker-start="Arrow"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8" style:family="graphic">
      <style:graphic-properties draw:stroke="none" svg:stroke-width="0cm" svg:stroke-color="#000000" draw:marker-start-width="0.3cm" draw:marker-start-center="false" draw:marker-end-width="0.3cm" draw:marker-end-center="false" draw:fill="none" draw:fill-color="#ffffff" fo:min-height="0.88cm" fo:padding-top="0.125cm" fo:padding-bottom="0.125cm" fo:padding-left="0.25cm" fo:padding-right="0.25cm" draw:shadow="hidden" draw:shadow-offset-x="0.3cm" draw:shadow-offset-y="0.3cm" draw:shadow-color="#808080" style:run-through="foreground"/>
    </style:style>
    <style:style style:name="gr49" style:family="graphic">
      <style:graphic-properties draw:stroke="none" svg:stroke-width="0cm" svg:stroke-color="#000000" draw:marker-start-width="0.3cm" draw:marker-start-center="false" draw:marker-end-width="0.3cm" draw:marker-end-center="false" draw:fill="none" draw:fill-color="#ffffff" fo:min-height="0.882cm" fo:padding-top="0.125cm" fo:padding-bottom="0.125cm" fo:padding-left="0.25cm" fo:padding-right="0.25cm" draw:shadow="hidden" draw:shadow-offset-x="0.3cm" draw:shadow-offset-y="0.3cm" draw:shadow-color="#808080" style:run-through="foreground"/>
    </style:style>
    <style:style style:name="gr50" style:family="graphic">
      <style:graphic-properties draw:stroke="solid" svg:stroke-width="0.049cm" svg:stroke-color="#00ff00" draw:marker-start-width="0.39cm" draw:marker-start-center="false" draw:marker-end="Arrow" draw:marker-end-width="0.39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51" style:family="graphic">
      <style:graphic-properties draw:stroke="solid" svg:stroke-width="0.049cm" svg:stroke-color="#00ff00" draw:marker-start="Arrow" draw:marker-start-width="0.39cm" draw:marker-start-center="false" draw:marker-end-width="0.39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52" style:family="graphic">
      <style:graphic-properties draw:stroke="solid" svg:stroke-width="0.049cm" svg:stroke-color="#000000" draw:marker-start-width="0.379cm" draw:marker-start-center="false" draw:marker-end="Arrow" draw:marker-end-width="0.199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53" style:family="graphic">
      <style:graphic-properties draw:stroke="solid" svg:stroke-width="0.049cm" svg:stroke-color="#ff0000" draw:marker-start-width="0.379cm" draw:marker-start-center="false" draw:marker-end-width="0.379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54" style:family="graphic">
      <style:graphic-properties draw:stroke="dash" draw:stroke-dash="Ultrafine_20_Dashed" svg:stroke-width="0.049cm" svg:stroke-color="#0000ff" draw:marker-start-width="0.379cm" draw:marker-start-center="false" draw:marker-end-width="0.379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55" style:family="graphic">
      <style:graphic-properties draw:stroke="dash" draw:stroke-dash="Ultrafine_20_Dashed" svg:stroke-width="0.049cm" svg:stroke-color="#ff0000" draw:marker-start-width="0.379cm" draw:marker-start-center="false" draw:marker-end-width="0.379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56" style:family="graphic">
      <style:graphic-properties draw:stroke="dash" draw:stroke-dash="Ultrafine_20_Dashed" svg:stroke-width="0.049cm" svg:stroke-color="#00ff00" draw:marker-start-width="0.379cm" draw:marker-start-center="false" draw:marker-end-width="0.379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57" style:family="graphic">
      <style:graphic-properties draw:stroke="none" svg:stroke-width="0cm" svg:stroke-color="#000000" draw:marker-start-width="0.3cm" draw:marker-start-center="false" draw:marker-end-width="0.3cm" draw:marker-end-center="false" draw:fill="none" draw:fill-color="#ffffff" fo:min-height="0.58cm" fo:padding-top="0.125cm" fo:padding-bottom="0.125cm" fo:padding-left="0.25cm" fo:padding-right="0.25cm" draw:shadow="hidden" draw:shadow-offset-x="0.3cm" draw:shadow-offset-y="0.3cm" draw:shadow-color="#808080" style:run-through="foreground"/>
    </style:style>
    <style:style style:name="gr58" style:family="graphic">
      <style:graphic-properties draw:stroke="none" svg:stroke-width="0cm" svg:stroke-color="#000000" draw:marker-start-width="0.3cm" draw:marker-start-center="false" draw:marker-end-width="0.3cm" draw:marker-end-center="false" draw:fill="none" draw:fill-color="#ffffff" fo:min-height="0.579cm" fo:padding-top="0.125cm" fo:padding-bottom="0.125cm" fo:padding-left="0.25cm" fo:padding-right="0.25cm" draw:shadow="hidden" draw:shadow-offset-x="0.3cm" draw:shadow-offset-y="0.3cm" draw:shadow-color="#808080" style:run-through="foreground"/>
    </style:style>
    <style:style style:name="gr59" style:family="graphic">
      <style:graphic-properties draw:stroke="solid" svg:stroke-width="0cm" svg:stroke-color="#000000" draw:marker-start="Circle" draw:marker-start-width="0.101cm" draw:marker-start-center="false"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0" style:family="graphic">
      <style:graphic-properties draw:stroke="solid" svg:stroke-width="0.049cm" svg:stroke-color="#000000" draw:marker-start-width="0.379cm" draw:marker-start-center="false" draw:marker-end="Arrow" draw:marker-end-width="0.379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61" style:family="graphic">
      <style:graphic-properties draw:stroke="dash" draw:stroke-dash="Fine_20_Dashed" svg:stroke-width="0.049cm" svg:stroke-color="#0000ff" draw:marker-start-width="0.379cm" draw:marker-start-center="false" draw:marker-end-width="0.379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62" style:family="graphic">
      <style:graphic-properties draw:stroke="none" svg:stroke-width="0cm" svg:stroke-color="#000000" draw:marker-start-width="0.3cm" draw:marker-start-center="false" draw:marker-end-width="0.3cm" draw:marker-end-center="false" draw:fill="solid" draw:fill-color="#ffffff" fo:min-height="0.628cm" fo:padding-top="0.125cm" fo:padding-bottom="0.125cm" fo:padding-left="0.25cm" fo:padding-right="0.25cm" draw:shadow="hidden" draw:shadow-offset-x="0.3cm" draw:shadow-offset-y="0.3cm" draw:shadow-color="#808080" style:run-through="foreground"/>
    </style:style>
    <style:style style:name="gr63" style:family="graphic">
      <style:graphic-properties draw:stroke="none" svg:stroke-width="0cm" svg:stroke-color="#000000" draw:marker-start-width="0.3cm" draw:marker-start-center="false" draw:marker-end-width="0.3cm" draw:marker-end-center="false" draw:fill="none" draw:fill-color="#ffffff" fo:min-height="0.372cm" fo:padding-top="0.125cm" fo:padding-bottom="0.125cm" fo:padding-left="0.25cm" fo:padding-right="0.25cm" draw:shadow="hidden" draw:shadow-offset-x="0.3cm" draw:shadow-offset-y="0.3cm" draw:shadow-color="#808080" style:run-through="foreground"/>
    </style:style>
    <style:style style:name="gr64" style:family="graphic">
      <style:graphic-properties draw:stroke="none" svg:stroke-width="0cm" svg:stroke-color="#000000" draw:marker-start-width="0.3cm" draw:marker-start-center="false" draw:marker-end-width="0.3cm" draw:marker-end-center="false" draw:fill="none" draw:fill-color="#ffffff" fo:min-height="0.333cm" fo:padding-top="0.125cm" fo:padding-bottom="0.125cm" fo:padding-left="0.25cm" fo:padding-right="0.25cm" draw:shadow="hidden" draw:shadow-offset-x="0.3cm" draw:shadow-offset-y="0.3cm" draw:shadow-color="#808080" style:run-through="foreground"/>
    </style:style>
    <style:style style:name="gr65"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66" style:family="graphic">
      <style:graphic-properties draw:stroke="none" svg:stroke-width="0cm" svg:stroke-color="#000000" draw:marker-start-width="0.3cm" draw:marker-start-center="false" draw:marker-end-width="0.3cm" draw:marker-end-center="false" draw:fill="none" draw:fill-color="#ffffff" fo:min-height="0.37cm" fo:padding-top="0.125cm" fo:padding-bottom="0.125cm" fo:padding-left="0.25cm" fo:padding-right="0.25cm" draw:shadow="hidden" draw:shadow-offset-x="0.3cm" draw:shadow-offset-y="0.3cm" draw:shadow-color="#808080" style:run-through="foreground"/>
    </style:style>
    <style:style style:name="gr67" style:family="graphic">
      <style:graphic-properties draw:stroke="solid" svg:stroke-width="0.049cm" svg:stroke-color="#9999ff" draw:marker-start-width="0.379cm" draw:marker-start-center="false" draw:marker-end-width="0.379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68" style:family="graphic">
      <style:graphic-properties draw:stroke="none" svg:stroke-color="#000000" draw:fill="none" draw:fill-color="#ffffff" fo:min-height="0.422cm" style:run-through="foreground"/>
    </style:style>
    <style:style style:name="gr69" style:family="graphic">
      <style:graphic-properties draw:stroke="none" svg:stroke-color="#000000" draw:fill="none" draw:fill-color="#ffffff" fo:min-height="0.42cm" style:run-through="foreground"/>
    </style:style>
    <style:style style:name="gr70" style:family="graphic">
      <style:graphic-properties svg:stroke-width="0.049cm" draw:marker-start-width="0.42cm" draw:marker-end-width="0.42cm" draw:fill="none" draw:textarea-horizontal-align="center" draw:textarea-vertical-align="middle" draw:auto-grow-height="false" fo:min-height="1.321cm" fo:min-width="0.88cm" fo:padding-top="0.025cm" fo:padding-bottom="0.025cm" fo:padding-left="0.025cm" fo:padding-right="0.025cm" style:run-through="foreground"/>
    </style:style>
    <style:style style:name="gr71" style:family="graphic">
      <style:graphic-properties svg:stroke-color="#ffffff" draw:fill="solid" draw:fill-color="#ffffff" draw:textarea-horizontal-align="center" draw:textarea-vertical-align="middle" style:run-through="foreground"/>
    </style:style>
    <style:style style:name="gr72" style:family="graphic">
      <style:graphic-properties draw:stroke="solid" svg:stroke-width="0.049cm" svg:stroke-color="#00ff00" draw:marker-start-width="0.379cm" draw:marker-start-center="false" draw:marker-end-width="0.379cm" draw:marker-end-center="false" draw:fill="none"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73" style:family="graphic">
      <style:graphic-properties draw:stroke="none" svg:stroke-width="0cm" svg:stroke-color="#000000" draw:marker-start-width="0.3cm" draw:marker-start-center="false" draw:marker-end-width="0.3cm" draw:marker-end-center="false" draw:fill="solid" draw:fill-color="#ffffff" fo:min-height="0.617cm" fo:padding-top="0.125cm" fo:padding-bottom="0.125cm" fo:padding-left="0.25cm" fo:padding-right="0.25cm" draw:shadow="hidden" draw:shadow-offset-x="0.3cm" draw:shadow-offset-y="0.3cm" draw:shadow-color="#808080" style:run-through="foreground"/>
    </style:style>
    <style:style style:name="gr74" style:family="graphic">
      <style:graphic-properties draw:stroke="none" svg:stroke-width="0cm" svg:stroke-color="#000000" draw:marker-start-width="0.3cm" draw:marker-start-center="false" draw:marker-end-width="0.3cm" draw:marker-end-center="false" draw:fill="none" draw:fill-color="#ffffff" fo:min-height="0.295cm" fo:padding-top="0.125cm" fo:padding-bottom="0.125cm" fo:padding-left="0.25cm" fo:padding-right="0.25cm" draw:shadow="hidden" draw:shadow-offset-x="0.3cm" draw:shadow-offset-y="0.3cm" draw:shadow-color="#808080" style:run-through="foreground"/>
    </style:style>
    <style:style style:name="gr75" style:family="graphic">
      <style:graphic-properties draw:stroke="none" svg:stroke-width="0cm" svg:stroke-color="#000000" draw:marker-start-width="0.3cm" draw:marker-start-center="false" draw:marker-end-width="0.3cm" draw:marker-end-center="false" draw:fill="none" draw:fill-color="#ffffff" fo:min-height="0.34cm" fo:padding-top="0.125cm" fo:padding-bottom="0.125cm" fo:padding-left="0.25cm" fo:padding-right="0.25cm" draw:shadow="hidden" draw:shadow-offset-x="0.3cm" draw:shadow-offset-y="0.3cm" draw:shadow-color="#808080" style:run-through="foreground"/>
    </style:style>
    <style:style style:name="gr76" style:family="graphic">
      <style:graphic-properties draw:stroke="none" svg:stroke-width="0cm" svg:stroke-color="#000000" draw:marker-start-width="0.3cm" draw:marker-start-center="false" draw:marker-end-width="0.3cm" draw:marker-end-center="false" draw:fill="solid" draw:fill-color="#ffffff" fo:min-height="0.609cm" fo:padding-top="0.125cm" fo:padding-bottom="0.125cm" fo:padding-left="0.25cm" fo:padding-right="0.25cm" draw:shadow="hidden" draw:shadow-offset-x="0.3cm" draw:shadow-offset-y="0.3cm" draw:shadow-color="#808080" style:run-through="foreground"/>
    </style:style>
    <style:style style:name="gr77" style:family="graphic">
      <style:graphic-properties draw:stroke="none" svg:stroke-width="0cm" svg:stroke-color="#000000" draw:marker-start-width="0.3cm" draw:marker-start-center="false" draw:marker-end-width="0.3cm" draw:marker-end-center="false" draw:fill="none" draw:fill-color="#ffffff" fo:min-height="0.288cm" fo:padding-top="0.125cm" fo:padding-bottom="0.125cm" fo:padding-left="0.25cm" fo:padding-right="0.25cm" draw:shadow="hidden" draw:shadow-offset-x="0.3cm" draw:shadow-offset-y="0.3cm" draw:shadow-color="#808080" style:run-through="foreground"/>
    </style:style>
    <style:style style:name="gr78" style:family="graphic">
      <style:graphic-properties draw:stroke="none" svg:stroke-width="0cm" svg:stroke-color="#000000" draw:marker-start-width="0.3cm" draw:marker-start-center="false" draw:marker-end-width="0.3cm" draw:marker-end-center="false" draw:fill="none" draw:fill-color="#ffffff" fo:min-height="0.335cm" fo:padding-top="0.125cm" fo:padding-bottom="0.125cm" fo:padding-left="0.25cm" fo:padding-right="0.25cm" draw:shadow="hidden" draw:shadow-offset-x="0.3cm" draw:shadow-offset-y="0.3cm" draw:shadow-color="#808080" style:run-through="foreground"/>
    </style:style>
    <style:style style:name="gr79" style:family="graphic">
      <style:graphic-properties draw:stroke="none" svg:stroke-width="0cm" svg:stroke-color="#000000" draw:marker-start-width="0.3cm" draw:marker-start-center="false" draw:marker-end-width="0.3cm" draw:marker-end-center="false" draw:fill="solid" draw:fill-color="#ffffff" fo:min-height="0.594cm" fo:padding-top="0.125cm" fo:padding-bottom="0.125cm" fo:padding-left="0.25cm" fo:padding-right="0.25cm" draw:shadow="hidden" draw:shadow-offset-x="0.3cm" draw:shadow-offset-y="0.3cm" draw:shadow-color="#808080" style:run-through="foreground"/>
    </style:style>
    <style:style style:name="gr80" style:family="graphic">
      <style:graphic-properties draw:stroke="none" svg:stroke-width="0cm" svg:stroke-color="#000000" draw:marker-start-width="0.3cm" draw:marker-start-center="false" draw:marker-end-width="0.3cm" draw:marker-end-center="false" draw:fill="none" draw:fill-color="#ffffff" fo:min-height="0.279cm" fo:padding-top="0.125cm" fo:padding-bottom="0.125cm" fo:padding-left="0.25cm" fo:padding-right="0.25cm" draw:shadow="hidden" draw:shadow-offset-x="0.3cm" draw:shadow-offset-y="0.3cm" draw:shadow-color="#808080" style:run-through="foreground"/>
    </style:style>
    <style:style style:name="gr81" style:family="graphic">
      <style:graphic-properties draw:stroke="none" svg:stroke-width="0cm" svg:stroke-color="#000000" draw:marker-start-width="0.3cm" draw:marker-start-center="false" draw:marker-end-width="0.3cm" draw:marker-end-center="false" draw:fill="none" draw:fill-color="#ffffff" fo:min-height="0.325cm" fo:padding-top="0.125cm" fo:padding-bottom="0.125cm" fo:padding-left="0.25cm" fo:padding-right="0.25cm" draw:shadow="hidden" draw:shadow-offset-x="0.3cm" draw:shadow-offset-y="0.3cm" draw:shadow-color="#808080" style:run-through="foreground"/>
    </style:style>
    <style:style style:name="gr82" style:family="graphic">
      <style:graphic-properties fo:margin-left="0cm" fo:margin-right="0cm" fo:margin-top="0cm" fo:margin-bottom="0cm" style:run-through="foreground" style:wrap="none" style:vertical-pos="from-top" style:vertical-rel="paragraph" style:horizontal-pos="from-left" style:horizontal-rel="paragraph" draw:wrap-influence-on-position="once-concurrent" style:flow-with-text="false"/>
    </style:style>
    <style:style style:name="gr83" style:family="graphic">
      <style:graphic-properties draw:stroke="none" svg:stroke-color="#000000" draw:fill="none" draw:fill-color="#ffffff" fo:min-height="0.406cm" style:run-through="foreground"/>
    </style:style>
    <style:style style:name="gr84" style:family="graphic">
      <style:graphic-properties draw:stroke="none" svg:stroke-color="#000000" draw:fill="none" draw:fill-color="#ffffff" fo:min-height="0.407cm" style:run-through="foreground"/>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6"/>
      <text:p text:style-name="P192">OSCAT</text:p>
      <text:p text:style-name="P192">LIBRARY</text:p>
      <text:p text:style-name="P192">Dokumentation</text:p>
      <text:p text:style-name="P193"><text:line-break/>Version 3.03</text:p>
      <text:p text:style-name="P163"/>
      <text:p text:style-name="P163"><draw:frame draw:style-name="fr3" draw:name="Grafik728" text:anchor-type="paragraph" svg:x="0.035cm" svg:y="0.968cm" svg:width="16.999cm" svg:height="16.999cm" draw:z-index="808"><draw:image xlink:href="Pictures/100000000000032000000320B996E000.png" xlink:type="simple" xlink:show="embed" xlink:actuate="onLoad"/></draw:frame></text:p>
      <text:p text:style-name="P163"><text:soft-page-break/></text:p>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80"><text:tab/></text:p>
      <text:p text:style-name="P162"/>
      <text:table-of-content text:style-name="Sect1" text:name="Inhaltsverzeichnis1">
        <text:table-of-content-source text:outline-level="5" text:use-index-marks="false">
          <text:index-title-template text:style-name="Contents_20_Heading">Inhaltsverzeichnis</text:index-title-template>
          <text:table-of-content-entry-template text:outline-level="1" text:style-name="Contents_20_1">
            <text:index-entry-chapter/>
            <text:index-entry-link-start text:style-name="Standard"/>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Standard"/>
            <text:index-entry-text/>
            <text:index-entry-link-end/>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link-start text:style-name="Internet_20_link"/>
            <text:index-entry-link-end/>
            <text:index-entry-text/>
            <text:index-entry-link-start text:style-name="Internet_20_link"/>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link-end/>
            <text:index-entry-text/>
            <text:index-entry-link-start text:style-name="Internet_20_link"/>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link-end/>
            <text:index-entry-text/>
            <text:index-entry-link-start text:style-name="Internet_20_link"/>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link-end/>
            <text:index-entry-text/>
            <text:index-entry-link-start text:style-name="Internet_20_link"/>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link-end/>
            <text:index-entry-text/>
            <text:index-entry-link-start text:style-name="Internet_20_link"/>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link-end/>
            <text:index-entry-text/>
            <text:index-entry-link-start text:style-name="Internet_20_link"/>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link-end/>
            <text:index-entry-text/>
            <text:index-entry-link-start text:style-name="Internet_20_link"/>
            <text:index-entry-link-end/>
            <text:index-entry-tab-stop style:type="right" style:leader-char="."/>
            <text:index-entry-page-number/>
          </text:table-of-content-entry-template>
        </text:table-of-content-source>
        <text:index-body>
          <text:index-title text:style-name="Sect3" text:name="Inhaltsverzeichnis1_Head">
            <text:p text:style-name="Contents_20_Heading">Inhaltsverzeichnis</text:p>
          </text:index-title>
          <text:p text:style-name="P228">1 <text:s/><text:a xlink:type="simple" xlink:href="#1.Rechtsgrundlagen|outline" text:style-name="Standard" text:visited-style-name="Standard">Rechtsgrundlagen</text:a><text:tab/>20</text:p>
          <text:p text:style-name="P229">1.1 <text:s/><text:a xlink:type="simple" xlink:href="#1.1.Haftungsausschluss|outline" text:style-name="Standard" text:visited-style-name="Standard">Haftungsausschluss</text:a><text:tab/>20</text:p>
          <text:p text:style-name="P229">1.2 <text:s/><text:a xlink:type="simple" xlink:href="#1.2.Lizenzbedingungen|outline" text:style-name="Standard" text:visited-style-name="Standard">Lizenzbedingungen</text:a><text:tab/>20</text:p>
          <text:p text:style-name="P229">1.3 <text:s/><text:a xlink:type="simple" xlink:href="#1.3.Eingetragene Markenzeichen|outline" text:style-name="Standard" text:visited-style-name="Standard">Eingetragene Markenzeichen</text:a><text:tab/>21</text:p>
          <text:p text:style-name="P229">1.4 <text:s/><text:a xlink:type="simple" xlink:href="#1.4.Bestimmungsgemäßer Gebrauch|outline" text:style-name="Standard" text:visited-style-name="Standard">Bestimmungsgemäßer Gebrauch</text:a><text:tab/>21</text:p>
          <text:p text:style-name="P229">1.5 <text:s/><text:a xlink:type="simple" xlink:href="#1.5.Sonstiges|outline" text:style-name="Standard" text:visited-style-name="Standard">Sonstiges</text:a><text:tab/>21</text:p>
          <text:p text:style-name="P228">2 <text:s/><text:a xlink:type="simple" xlink:href="#2.Einleitung|outline" text:style-name="Standard" text:visited-style-name="Standard">Einleitung</text:a><text:tab/>22</text:p>
          <text:p text:style-name="P229">2.1 <text:s/><text:a xlink:type="simple" xlink:href="#2.1.Ziele|outline" text:style-name="Standard" text:visited-style-name="Standard">Ziele</text:a><text:tab/>22</text:p>
          <text:p text:style-name="P229">2.2 <text:s/><text:a xlink:type="simple" xlink:href="#2.2.Konventionen|outline" text:style-name="Standard" text:visited-style-name="Standard">Konventionen</text:a><text:tab/>23</text:p>
          <text:p text:style-name="P229">2.3 <text:s/><text:a xlink:type="simple" xlink:href="#2.3.Testumgebung|outline" text:style-name="Standard" text:visited-style-name="Standard">Testumgebung</text:a><text:tab/>25</text:p>
          <text:p text:style-name="P229">2.4 <text:s/><text:a xlink:type="simple" xlink:href="#2.4.Globale Konstanten|outline" text:style-name="Standard" text:visited-style-name="Standard">Globale Konstanten</text:a><text:tab/>25</text:p>
          <text:p text:style-name="P229">1.1.<text:a xlink:type="simple" xlink:href="#1.1.Aktualität|outline" text:style-name="Standard" text:visited-style-name="Standard">Aktualität</text:a><text:tab/>27</text:p>
          <text:p text:style-name="P229">2.5 <text:s/><text:a xlink:type="simple" xlink:href="#2.5.Support|outline" text:style-name="Standard" text:visited-style-name="Standard">Support</text:a><text:tab/>27</text:p>
          <text:p text:style-name="P228">3 <text:s/><text:a xlink:type="simple" xlink:href="#3.Datentypen der OSCAT Bibliothek|outline" text:style-name="Standard" text:visited-style-name="Standard">Datentypen der OSCAT Bibliothek</text:a><text:tab/>28</text:p>
          <text:p text:style-name="P229">1.2.<text:a xlink:type="simple" xlink:href="#1.2.CALENDAR|outline" text:style-name="Standard" text:visited-style-name="Standard">CALENDAR</text:a><text:tab/>28</text:p>
          <text:p text:style-name="P229">3.1 <text:s/><text:a xlink:type="simple" xlink:href="#3.1.COMPLEX|outline" text:style-name="Standard" text:visited-style-name="Standard">COMPLEX</text:a><text:tab/>29</text:p>
          <text:p text:style-name="P229">3.2 <text:s/><text:a xlink:type="simple" xlink:href="#3.2.CONSTANTS_LANGUAGE|outline" text:style-name="Standard" text:visited-style-name="Standard">CONSTANTS_LANGUAGE</text:a><text:tab/>29</text:p>
          <text:p text:style-name="P229">3.3 <text:s/><text:a xlink:type="simple" xlink:href="#3.3.CONSTANTS_LOCATION|outline" text:style-name="Standard" text:visited-style-name="Standard">CONSTANTS_LOCATION</text:a><text:tab/>30</text:p>
          <text:p text:style-name="P229">3.4 <text:s/><text:a xlink:type="simple" xlink:href="#3.4.CONSTANTS_MATH|outline" text:style-name="Standard" text:visited-style-name="Standard">CONSTANTS_MATH</text:a><text:tab/>30</text:p>
          <text:p text:style-name="P229">3.5 <text:s/><text:a xlink:type="simple" xlink:href="#3.5.CONSTANTS_PHYS|outline" text:style-name="Standard" text:visited-style-name="Standard">CONSTANTS_PHYS</text:a><text:tab/>31</text:p>
          <text:p text:style-name="P229">3.6 <text:s/><text:a xlink:type="simple" xlink:href="#3.6.CONSTANTS_SETUP|outline" text:style-name="Standard" text:visited-style-name="Standard">CONSTANTS_SETUP</text:a><text:tab/>31</text:p>
          <text:p text:style-name="P229">3.7 <text:s/><text:a xlink:type="simple" xlink:href="#3.7.ESR_DATA|outline" text:style-name="Standard" text:visited-style-name="Standard">ESR_DATA</text:a><text:tab/>32</text:p>
          <text:p text:style-name="P229">3.8 <text:s/><text:a xlink:type="simple" xlink:href="#3.8.HOLIDAY_DATA|outline" text:style-name="Standard" text:visited-style-name="Standard">HOLIDAY_DATA</text:a><text:tab/>32</text:p>
          <text:p text:style-name="P229">3.9 <text:s/><text:a xlink:type="simple" xlink:href="#3.9.NETWORK_BUFFER|outline" text:style-name="Standard" text:visited-style-name="Standard">NETWORK_BUFFER</text:a><text:tab/>32</text:p>
          <text:p text:style-name="P229">3.10 <text:s/><text:a xlink:type="simple" xlink:href="#3.10.REAL2|outline" text:style-name="Standard" text:visited-style-name="Standard">REAL2</text:a><text:tab/>33</text:p>
          <text:p text:style-name="P229">3.11 <text:s/><text:a xlink:type="simple" xlink:href="#3.11.SDT|outline" text:style-name="Standard" text:visited-style-name="Standard">SDT</text:a><text:tab/>33</text:p>
          <text:p text:style-name="P229">3.12 <text:s/><text:a xlink:type="simple" xlink:href="#3.12.TIMER_EVENT|outline" text:style-name="Standard" text:visited-style-name="Standard">TIMER_EVENT</text:a><text:tab/>33</text:p>
          <text:p text:style-name="P229">3.13 <text:s/><text:a xlink:type="simple" xlink:href="#3.13.URL|outline" text:style-name="Standard" text:visited-style-name="Standard">URL</text:a><text:tab/>34</text:p>
          <text:p text:style-name="P229">3.14 <text:s/><text:a xlink:type="simple" xlink:href="#3.14.VEKTOR_3|outline" text:style-name="Standard" text:visited-style-name="Standard">VEKTOR_3</text:a><text:tab/>34</text:p>
          <text:p text:style-name="P228">4 <text:s/><text:a xlink:type="simple" xlink:href="#4.Diverse Funktionen|outline" text:style-name="Standard" text:visited-style-name="Standard">Diverse Funktionen</text:a><text:tab/>35</text:p>
          <text:p text:style-name="P229">4.1 <text:s/><text:a xlink:type="simple" xlink:href="#4.1.ESR_COLLECT|outline" text:style-name="Standard" text:visited-style-name="Standard">ESR_COLLECT</text:a><text:tab/>35</text:p>
          <text:p text:style-name="P229">4.2 <text:s/><text:a xlink:type="simple" xlink:href="#4.2.ESR_MON_B8|outline" text:style-name="Standard" text:visited-style-name="Standard">ESR_MON_B8</text:a><text:tab/>37</text:p>
          <text:p text:style-name="P229">4.3 <text:s/><text:a xlink:type="simple" xlink:href="#4.3.ESR_MON_R4|outline" text:style-name="Standard" text:visited-style-name="Standard">ESR_MON_R4</text:a><text:tab/>38</text:p>
          <text:p text:style-name="P229">4.4 <text:s/><text:a xlink:type="simple" xlink:href="#4.4.ESR_MON_X8|outline" text:style-name="Standard" text:visited-style-name="Standard">ESR_MON_X8</text:a><text:tab/>39</text:p>
          <text:p text:style-name="P229"><text:soft-page-break/>4.5 <text:s/><text:a xlink:type="simple" xlink:href="#4.5.OSCAT_VERSION|outline" text:style-name="Standard" text:visited-style-name="Standard">OSCAT_VERSION</text:a><text:tab/>40</text:p>
          <text:p text:style-name="P229">4.6 <text:s/><text:a xlink:type="simple" xlink:href="#4.6.STATUS_TO_ESR|outline" text:style-name="Standard" text:visited-style-name="Standard">STATUS_TO_ESR</text:a><text:tab/>40</text:p>
          <text:p text:style-name="P228">5 <text:s/><text:a xlink:type="simple" xlink:href="#5.Mathematik|outline" text:style-name="Standard" text:visited-style-name="Standard">Mathematik</text:a><text:tab/>42</text:p>
          <text:p text:style-name="P229">5.1 <text:s/><text:a xlink:type="simple" xlink:href="#5.1.ACOSH|outline" text:style-name="Standard" text:visited-style-name="Standard">ACOSH</text:a><text:tab/>42</text:p>
          <text:p text:style-name="P229">5.2 <text:s/><text:a xlink:type="simple" xlink:href="#5.2.ACOTH|outline" text:style-name="Standard" text:visited-style-name="Standard">ACOTH</text:a><text:tab/>42</text:p>
          <text:p text:style-name="P229">5.3 <text:s/><text:a xlink:type="simple" xlink:href="#5.3.AGDF|outline" text:style-name="Standard" text:visited-style-name="Standard">AGDF</text:a><text:tab/>43</text:p>
          <text:p text:style-name="P229">5.4 <text:s/><text:a xlink:type="simple" xlink:href="#5.4.ASINH|outline" text:style-name="Standard" text:visited-style-name="Standard">ASINH</text:a><text:tab/>43</text:p>
          <text:p text:style-name="P229">5.5 <text:s/><text:a xlink:type="simple" xlink:href="#5.5.ATAN2|outline" text:style-name="Standard" text:visited-style-name="Standard">ATAN2</text:a><text:tab/>43</text:p>
          <text:p text:style-name="P229">5.6 <text:s/><text:a xlink:type="simple" xlink:href="#5.6.ATANH|outline" text:style-name="Standard" text:visited-style-name="Standard">ATANH</text:a><text:tab/>44</text:p>
          <text:p text:style-name="P229">5.7 <text:s/><text:a xlink:type="simple" xlink:href="#5.7.BETA|outline" text:style-name="Standard" text:visited-style-name="Standard">BETA</text:a><text:tab/>44</text:p>
          <text:p text:style-name="P229">5.8 <text:s/><text:a xlink:type="simple" xlink:href="#5.8.BINOM|outline" text:style-name="Standard" text:visited-style-name="Standard">BINOM</text:a><text:tab/>45</text:p>
          <text:p text:style-name="P229">5.9 <text:s/><text:a xlink:type="simple" xlink:href="#5.9.CAUCHY|outline" text:style-name="Standard" text:visited-style-name="Standard">CAUCHY</text:a><text:tab/>45</text:p>
          <text:p text:style-name="P229">5.10 <text:s/><text:a xlink:type="simple" xlink:href="#5.10.CAUCHYCD|outline" text:style-name="Standard" text:visited-style-name="Standard">CAUCHYCD</text:a><text:tab/>46</text:p>
          <text:p text:style-name="P229">5.11 <text:s/><text:a xlink:type="simple" xlink:href="#5.11.CEIL|outline" text:style-name="Standard" text:visited-style-name="Standard">CEIL</text:a><text:tab/>46</text:p>
          <text:p text:style-name="P229">5.12 <text:s/><text:a xlink:type="simple" xlink:href="#5.12.CEIL2|outline" text:style-name="Standard" text:visited-style-name="Standard">CEIL2</text:a><text:tab/>47</text:p>
          <text:p text:style-name="P229">5.13 <text:s/><text:a xlink:type="simple" xlink:href="#5.13.CMP|outline" text:style-name="Standard" text:visited-style-name="Standard">CMP</text:a><text:tab/>47</text:p>
          <text:p text:style-name="P229">5.14 <text:s/><text:a xlink:type="simple" xlink:href="#5.14.COSH|outline" text:style-name="Standard" text:visited-style-name="Standard">COSH</text:a><text:tab/>48</text:p>
          <text:p text:style-name="P229">5.15 <text:s/><text:a xlink:type="simple" xlink:href="#5.15.COTH|outline" text:style-name="Standard" text:visited-style-name="Standard">COTH</text:a><text:tab/>48</text:p>
          <text:p text:style-name="P229">5.16 <text:s/><text:a xlink:type="simple" xlink:href="#5.16.D_TRUNC|outline" text:style-name="Standard" text:visited-style-name="Standard">D_TRUNC</text:a><text:tab/>49</text:p>
          <text:p text:style-name="P229">5.17 <text:s/><text:a xlink:type="simple" xlink:href="#5.17.DEC1|outline" text:style-name="Standard" text:visited-style-name="Standard">DEC1</text:a><text:tab/>49</text:p>
          <text:p text:style-name="P229">5.18 <text:s/><text:a xlink:type="simple" xlink:href="#5.18.DEG|outline" text:style-name="Standard" text:visited-style-name="Standard">DEG</text:a><text:tab/>50</text:p>
          <text:p text:style-name="P229">5.19 <text:s/><text:a xlink:type="simple" xlink:href="#5.19.DIFFER|outline" text:style-name="Standard" text:visited-style-name="Standard">DIFFER</text:a><text:tab/>50</text:p>
          <text:p text:style-name="P229">5.20 <text:s/><text:a xlink:type="simple" xlink:href="#5.20.ERF|outline" text:style-name="Standard" text:visited-style-name="Standard">ERF</text:a><text:tab/>51</text:p>
          <text:p text:style-name="P229">5.21 <text:s/><text:a xlink:type="simple" xlink:href="#5.21.ERFC|outline" text:style-name="Standard" text:visited-style-name="Standard">ERFC</text:a><text:tab/>51</text:p>
          <text:p text:style-name="P229">5.22 <text:s/><text:a xlink:type="simple" xlink:href="#5.22.EVEN|outline" text:style-name="Standard" text:visited-style-name="Standard">EVEN</text:a><text:tab/>51</text:p>
          <text:p text:style-name="P229">5.23 <text:s/><text:a xlink:type="simple" xlink:href="#5.23.EXP10|outline" text:style-name="Standard" text:visited-style-name="Standard">EXP10</text:a><text:tab/>52</text:p>
          <text:p text:style-name="P229">5.24 <text:s/><text:a xlink:type="simple" xlink:href="#5.24.EXPN|outline" text:style-name="Standard" text:visited-style-name="Standard">EXPN</text:a><text:tab/>52</text:p>
          <text:p text:style-name="P229">5.25 <text:s/><text:a xlink:type="simple" xlink:href="#5.25.FACT|outline" text:style-name="Standard" text:visited-style-name="Standard">FACT</text:a><text:tab/>53</text:p>
          <text:p text:style-name="P229">5.26 <text:s/><text:a xlink:type="simple" xlink:href="#5.26.FIB|outline" text:style-name="Standard" text:visited-style-name="Standard">FIB</text:a><text:tab/>53</text:p>
          <text:p text:style-name="P229">5.27 <text:s/><text:a xlink:type="simple" xlink:href="#5.27.FLOOR|outline" text:style-name="Standard" text:visited-style-name="Standard">FLOOR</text:a><text:tab/>54</text:p>
          <text:p text:style-name="P229">5.28 <text:s/><text:a xlink:type="simple" xlink:href="#5.28.FLOOR2|outline" text:style-name="Standard" text:visited-style-name="Standard">FLOOR2</text:a><text:tab/>54</text:p>
          <text:p text:style-name="P229">5.29 <text:s/><text:a xlink:type="simple" xlink:href="#5.29.FRACT|outline" text:style-name="Standard" text:visited-style-name="Standard">FRACT</text:a><text:tab/>55</text:p>
          <text:p text:style-name="P229">5.30 <text:s/><text:a xlink:type="simple" xlink:href="#5.30.GAMMA|outline" text:style-name="Standard" text:visited-style-name="Standard">GAMMA</text:a><text:tab/>55</text:p>
          <text:p text:style-name="P229">5.31 <text:s/><text:a xlink:type="simple" xlink:href="#5.31.GAUSS|outline" text:style-name="Standard" text:visited-style-name="Standard">GAUSS</text:a><text:tab/>56</text:p>
          <text:p text:style-name="P229">5.32 <text:s/><text:a xlink:type="simple" xlink:href="#5.32.GAUSSCD|outline" text:style-name="Standard" text:visited-style-name="Standard">GAUSSCD</text:a><text:tab/>56</text:p>
          <text:p text:style-name="P229">5.33 <text:s/><text:a xlink:type="simple" xlink:href="#5.33.GDF|outline" text:style-name="Standard" text:visited-style-name="Standard">GDF</text:a><text:tab/>57</text:p>
          <text:p text:style-name="P229">5.34 <text:s/><text:a xlink:type="simple" xlink:href="#5.34.GOLD|outline" text:style-name="Standard" text:visited-style-name="Standard">GOLD</text:a><text:tab/>57</text:p>
          <text:p text:style-name="P229">5.35 <text:s/><text:a xlink:type="simple" xlink:href="#5.35.HYPOT|outline" text:style-name="Standard" text:visited-style-name="Standard">HYPOT</text:a><text:tab/>58</text:p>
          <text:p text:style-name="P229">5.36 <text:s/><text:a xlink:type="simple" xlink:href="#5.36.INC|outline" text:style-name="Standard" text:visited-style-name="Standard">INC</text:a><text:tab/>58</text:p>
          <text:p text:style-name="P229">5.37 <text:s/><text:a xlink:type="simple" xlink:href="#5.37.INC1|outline" text:style-name="Standard" text:visited-style-name="Standard">INC1</text:a><text:tab/>59</text:p>
          <text:p text:style-name="P229">5.38 <text:s/><text:a xlink:type="simple" xlink:href="#5.38.INC2|outline" text:style-name="Standard" text:visited-style-name="Standard">INC2</text:a><text:tab/>59</text:p>
          <text:p text:style-name="P229">5.39 <text:s/><text:a xlink:type="simple" xlink:href="#5.39.INV|outline" text:style-name="Standard" text:visited-style-name="Standard">INV</text:a><text:tab/>60</text:p>
          <text:p text:style-name="P229">5.40 <text:s/><text:a xlink:type="simple" xlink:href="#5.40.LANGEVIN|outline" text:style-name="Standard" text:visited-style-name="Standard">LANGEVIN</text:a><text:tab/>61</text:p>
          <text:p text:style-name="P229"><text:soft-page-break/>5.41 <text:s/><text:a xlink:type="simple" xlink:href="#5.41.MAX3|outline" text:style-name="Standard" text:visited-style-name="Standard">MAX3</text:a><text:tab/>61</text:p>
          <text:p text:style-name="P229">5.42 <text:s/><text:a xlink:type="simple" xlink:href="#5.42.MIN3|outline" text:style-name="Standard" text:visited-style-name="Standard">MIN3</text:a><text:tab/>62</text:p>
          <text:p text:style-name="P229">5.43 <text:s/><text:a xlink:type="simple" xlink:href="#5.43.MID3|outline" text:style-name="Standard" text:visited-style-name="Standard">MID3</text:a><text:tab/>62</text:p>
          <text:p text:style-name="P229">5.44 <text:s/><text:a xlink:type="simple" xlink:href="#5.44.MODR|outline" text:style-name="Standard" text:visited-style-name="Standard">MODR</text:a><text:tab/>63</text:p>
          <text:p text:style-name="P229">5.45 <text:s/><text:a xlink:type="simple" xlink:href="#5.45.MUL_ADD|outline" text:style-name="Standard" text:visited-style-name="Standard">MUL_ADD</text:a><text:tab/>64</text:p>
          <text:p text:style-name="P229">5.46 <text:s/><text:a xlink:type="simple" xlink:href="#5.46.NEGX|outline" text:style-name="Standard" text:visited-style-name="Standard">NEGX</text:a><text:tab/>64</text:p>
          <text:p text:style-name="P229">5.47 <text:s/><text:a xlink:type="simple" xlink:href="#5.47.RAD|outline" text:style-name="Standard" text:visited-style-name="Standard">RAD</text:a><text:tab/>65</text:p>
          <text:p text:style-name="P229">5.48 <text:s/><text:a xlink:type="simple" xlink:href="#5.48.RDM|outline" text:style-name="Standard" text:visited-style-name="Standard">RDM</text:a><text:tab/>65</text:p>
          <text:p text:style-name="P229">5.49 <text:s/><text:a xlink:type="simple" xlink:href="#5.49.RDM2|outline" text:style-name="Standard" text:visited-style-name="Standard">RDM2</text:a><text:tab/>66</text:p>
          <text:p text:style-name="P229">5.50 <text:s/><text:a xlink:type="simple" xlink:href="#5.50.RDMDW|outline" text:style-name="Standard" text:visited-style-name="Standard">RDMDW</text:a><text:tab/>66</text:p>
          <text:p text:style-name="P229">5.51 <text:s/><text:a xlink:type="simple" xlink:href="#5.51.RND|outline" text:style-name="Standard" text:visited-style-name="Standard">RND</text:a><text:tab/>67</text:p>
          <text:p text:style-name="P229">5.52 <text:s/><text:a xlink:type="simple" xlink:href="#5.52.ROUND|outline" text:style-name="Standard" text:visited-style-name="Standard">ROUND</text:a><text:tab/>68</text:p>
          <text:p text:style-name="P229">5.53 <text:s/><text:a xlink:type="simple" xlink:href="#5.53.SGN|outline" text:style-name="Standard" text:visited-style-name="Standard">SGN</text:a><text:tab/>68</text:p>
          <text:p text:style-name="P229">5.54 <text:s/><text:a xlink:type="simple" xlink:href="#5.54.SIGMOID|outline" text:style-name="Standard" text:visited-style-name="Standard">SIGMOID</text:a><text:tab/>69</text:p>
          <text:p text:style-name="P229">5.55 <text:s/><text:a xlink:type="simple" xlink:href="#5.55.SIGN_I|outline" text:style-name="Standard" text:visited-style-name="Standard">SIGN_I</text:a><text:tab/>69</text:p>
          <text:p text:style-name="P229">5.56 <text:s/><text:a xlink:type="simple" xlink:href="#5.56.SIGN_R|outline" text:style-name="Standard" text:visited-style-name="Standard">SIGN_R</text:a><text:tab/>70</text:p>
          <text:p text:style-name="P229">5.57 <text:s/><text:a xlink:type="simple" xlink:href="#5.57.SINC|outline" text:style-name="Standard" text:visited-style-name="Standard">SINC</text:a><text:tab/>70</text:p>
          <text:p text:style-name="P229">5.58 <text:s/><text:a xlink:type="simple" xlink:href="#5.58.SINH|outline" text:style-name="Standard" text:visited-style-name="Standard">SINH</text:a><text:tab/>70</text:p>
          <text:p text:style-name="P229">5.59 <text:s/><text:a xlink:type="simple" xlink:href="#5.59.SQRTN|outline" text:style-name="Standard" text:visited-style-name="Standard">SQRTN</text:a><text:tab/>71</text:p>
          <text:p text:style-name="P229">5.60 <text:s/><text:a xlink:type="simple" xlink:href="#5.60.TANC|outline" text:style-name="Standard" text:visited-style-name="Standard">TANC</text:a><text:tab/>71</text:p>
          <text:p text:style-name="P229">5.61 <text:s/><text:a xlink:type="simple" xlink:href="#5.61.TANH|outline" text:style-name="Standard" text:visited-style-name="Standard">TANH</text:a><text:tab/>72</text:p>
          <text:p text:style-name="P229">5.62 <text:s/><text:a xlink:type="simple" xlink:href="#5.62.WINDOW|outline" text:style-name="Standard" text:visited-style-name="Standard">WINDOW</text:a><text:tab/>72</text:p>
          <text:p text:style-name="P229">5.63 <text:s/><text:a xlink:type="simple" xlink:href="#5.63.WINDOW2|outline" text:style-name="Standard" text:visited-style-name="Standard">WINDOW2</text:a><text:tab/>73</text:p>
          <text:p text:style-name="P228">6 <text:s/><text:a xlink:type="simple" xlink:href="#6.Array|outline" text:style-name="Standard" text:visited-style-name="Standard">Array</text:a><text:tab/>74</text:p>
          <text:p text:style-name="P229">6.1 <text:s/><text:a xlink:type="simple" xlink:href="#6.1._ARRAY_ABS|outline" text:style-name="Standard" text:visited-style-name="Standard">_ARRAY_ABS</text:a><text:tab/>74</text:p>
          <text:p text:style-name="P229">6.2 <text:s/><text:a xlink:type="simple" xlink:href="#6.2._ARRAY_ADD|outline" text:style-name="Standard" text:visited-style-name="Standard">_ARRAY_ADD</text:a><text:tab/>75</text:p>
          <text:p text:style-name="P229">6.3 <text:s/><text:a xlink:type="simple" xlink:href="#6.3._ARRAY_INIT|outline" text:style-name="Standard" text:visited-style-name="Standard">_ARRAY_INIT</text:a><text:tab/>75</text:p>
          <text:p text:style-name="P229">6.4 <text:s/><text:a xlink:type="simple" xlink:href="#6.4._ARRAY_MEDIAN|outline" text:style-name="Standard" text:visited-style-name="Standard">_ARRAY_MEDIAN</text:a><text:tab/>76</text:p>
          <text:p text:style-name="P229">6.5 <text:s/><text:a xlink:type="simple" xlink:href="#6.5._ARRAY_MUL|outline" text:style-name="Standard" text:visited-style-name="Standard">_ARRAY_MUL</text:a><text:tab/>77</text:p>
          <text:p text:style-name="P229">6.6 <text:s/><text:a xlink:type="simple" xlink:href="#6.6._ARRAY_SHUFFLE|outline" text:style-name="Standard" text:visited-style-name="Standard">_ARRAY_SHUFFLE</text:a><text:tab/>78</text:p>
          <text:p text:style-name="P229">6.7 <text:s/><text:a xlink:type="simple" xlink:href="#6.7._ARRAY_SORT|outline" text:style-name="Standard" text:visited-style-name="Standard">_ARRAY_SORT</text:a><text:tab/>79</text:p>
          <text:p text:style-name="P229">6.8 <text:s/><text:a xlink:type="simple" xlink:href="#6.8.ARRAY_AVG|outline" text:style-name="Standard" text:visited-style-name="Standard">ARRAY_AVG</text:a><text:tab/>80</text:p>
          <text:p text:style-name="P229">6.9 <text:s/><text:a xlink:type="simple" xlink:href="#6.9.ARRAY_GAV|outline" text:style-name="Standard" text:visited-style-name="Standard">ARRAY_GAV</text:a><text:tab/>80</text:p>
          <text:p text:style-name="P229">6.10 <text:s/><text:a xlink:type="simple" xlink:href="#6.10.ARRAY_HAV|outline" text:style-name="Standard" text:visited-style-name="Standard">ARRAY_HAV</text:a><text:tab/>81</text:p>
          <text:p text:style-name="P229">6.11 <text:s/><text:a xlink:type="simple" xlink:href="#6.11.ARRAY_MAX|outline" text:style-name="Standard" text:visited-style-name="Standard">ARRAY_MAX</text:a><text:tab/>82</text:p>
          <text:p text:style-name="P229">6.12 <text:s/><text:a xlink:type="simple" xlink:href="#6.12.ARRAY_MIN|outline" text:style-name="Standard" text:visited-style-name="Standard">ARRAY_MIN</text:a><text:tab/>82</text:p>
          <text:p text:style-name="P229">6.13 <text:s/><text:a xlink:type="simple" xlink:href="#6.13.ARRAY_SDV|outline" text:style-name="Standard" text:visited-style-name="Standard">ARRAY_SDV</text:a><text:tab/>83</text:p>
          <text:p text:style-name="P229">6.14 <text:s/><text:a xlink:type="simple" xlink:href="#6.14.ARRAY_SPR|outline" text:style-name="Standard" text:visited-style-name="Standard">ARRAY_SPR</text:a><text:tab/>84</text:p>
          <text:p text:style-name="P229">6.15 <text:s/><text:a xlink:type="simple" xlink:href="#6.15.ARRAY_SUM|outline" text:style-name="Standard" text:visited-style-name="Standard">ARRAY_SUM</text:a><text:tab/>84</text:p>
          <text:p text:style-name="P229">6.16 <text:s/><text:a xlink:type="simple" xlink:href="#6.16.ARRAY_TREND|outline" text:style-name="Standard" text:visited-style-name="Standard">ARRAY_TREND</text:a><text:tab/>85</text:p>
          <text:p text:style-name="P229">6.17 <text:s/><text:a xlink:type="simple" xlink:href="#6.17.ARRAY_VAR|outline" text:style-name="Standard" text:visited-style-name="Standard">ARRAY_VAR</text:a><text:tab/>86</text:p>
          <text:p text:style-name="P229">6.18 <text:s/><text:a xlink:type="simple" xlink:href="#6.18.IS_SORTED|outline" text:style-name="Standard" text:visited-style-name="Standard">IS_SORTED</text:a><text:tab/>86</text:p>
          <text:p text:style-name="P228"><text:soft-page-break/>7 <text:s/><text:a xlink:type="simple" xlink:href="#7.Komplexe Mathematik|outline" text:style-name="Standard" text:visited-style-name="Standard">Komplexe Mathematik</text:a><text:tab/>88</text:p>
          <text:p text:style-name="P229">7.1 <text:s/><text:a xlink:type="simple" xlink:href="#7.1.EINLEITUNG|outline" text:style-name="Standard" text:visited-style-name="Standard">EINLEITUNG</text:a><text:tab/>88</text:p>
          <text:p text:style-name="P229">7.2 <text:s/><text:a xlink:type="simple" xlink:href="#7.2.CABS|outline" text:style-name="Standard" text:visited-style-name="Standard">CABS</text:a><text:tab/>88</text:p>
          <text:p text:style-name="P229">7.3 <text:s/><text:a xlink:type="simple" xlink:href="#7.3.CACOS|outline" text:style-name="Standard" text:visited-style-name="Standard">CACOS</text:a><text:tab/>89</text:p>
          <text:p text:style-name="P229">7.4 <text:s/><text:a xlink:type="simple" xlink:href="#7.4.CACOSH|outline" text:style-name="Standard" text:visited-style-name="Standard">CACOSH</text:a><text:tab/>89</text:p>
          <text:p text:style-name="P229">7.5 <text:s/><text:a xlink:type="simple" xlink:href="#7.5.CADD|outline" text:style-name="Standard" text:visited-style-name="Standard">CADD</text:a><text:tab/>89</text:p>
          <text:p text:style-name="P229">7.6 <text:s/><text:a xlink:type="simple" xlink:href="#7.6.CARG|outline" text:style-name="Standard" text:visited-style-name="Standard">CARG</text:a><text:tab/>90</text:p>
          <text:p text:style-name="P229">7.7 <text:s/><text:a xlink:type="simple" xlink:href="#7.7.CASIN|outline" text:style-name="Standard" text:visited-style-name="Standard">CASIN</text:a><text:tab/>90</text:p>
          <text:p text:style-name="P229">7.8 <text:s/><text:a xlink:type="simple" xlink:href="#7.8.CASINH|outline" text:style-name="Standard" text:visited-style-name="Standard">CASINH</text:a><text:tab/>91</text:p>
          <text:p text:style-name="P229">7.9 <text:s/><text:a xlink:type="simple" xlink:href="#7.9.CATAN|outline" text:style-name="Standard" text:visited-style-name="Standard">CATAN</text:a><text:tab/>91</text:p>
          <text:p text:style-name="P229">7.10 <text:s/><text:a xlink:type="simple" xlink:href="#7.10.CATANH|outline" text:style-name="Standard" text:visited-style-name="Standard">CATANH</text:a><text:tab/>91</text:p>
          <text:p text:style-name="P229">7.11 <text:s/><text:a xlink:type="simple" xlink:href="#7.11.CCON|outline" text:style-name="Standard" text:visited-style-name="Standard">CCON</text:a><text:tab/>92</text:p>
          <text:p text:style-name="P229">7.12 <text:s/><text:a xlink:type="simple" xlink:href="#7.12.CCOS|outline" text:style-name="Standard" text:visited-style-name="Standard">CCOS</text:a><text:tab/>92</text:p>
          <text:p text:style-name="P229">7.13 <text:s/><text:a xlink:type="simple" xlink:href="#7.13.CCOSH|outline" text:style-name="Standard" text:visited-style-name="Standard">CCOSH</text:a><text:tab/>93</text:p>
          <text:p text:style-name="P229">7.14 <text:s/><text:a xlink:type="simple" xlink:href="#7.14.CDIV|outline" text:style-name="Standard" text:visited-style-name="Standard">CDIV</text:a><text:tab/>93</text:p>
          <text:p text:style-name="P229">7.15 <text:s/><text:a xlink:type="simple" xlink:href="#7.15.CEXP|outline" text:style-name="Standard" text:visited-style-name="Standard">CEXP</text:a><text:tab/>93</text:p>
          <text:p text:style-name="P229">7.16 <text:s/><text:a xlink:type="simple" xlink:href="#7.16.CINV|outline" text:style-name="Standard" text:visited-style-name="Standard">CINV</text:a><text:tab/>94</text:p>
          <text:p text:style-name="P229">7.17 <text:s/><text:a xlink:type="simple" xlink:href="#7.17.CLOG|outline" text:style-name="Standard" text:visited-style-name="Standard">CLOG</text:a><text:tab/>94</text:p>
          <text:p text:style-name="P229">7.18 <text:s/><text:a xlink:type="simple" xlink:href="#7.18.CMUL|outline" text:style-name="Standard" text:visited-style-name="Standard">CMUL</text:a><text:tab/>94</text:p>
          <text:p text:style-name="P229">7.19 <text:s/><text:a xlink:type="simple" xlink:href="#7.19.CPOL|outline" text:style-name="Standard" text:visited-style-name="Standard">CPOL</text:a><text:tab/>95</text:p>
          <text:p text:style-name="P229">7.20 <text:s/><text:a xlink:type="simple" xlink:href="#7.20.CPOW|outline" text:style-name="Standard" text:visited-style-name="Standard">CPOW</text:a><text:tab/>95</text:p>
          <text:p text:style-name="P229">7.21 <text:s/><text:a xlink:type="simple" xlink:href="#7.21.CSET|outline" text:style-name="Standard" text:visited-style-name="Standard">CSET</text:a><text:tab/>96</text:p>
          <text:p text:style-name="P229">7.22 <text:s/><text:a xlink:type="simple" xlink:href="#7.22.CSIN|outline" text:style-name="Standard" text:visited-style-name="Standard">CSIN</text:a><text:tab/>96</text:p>
          <text:p text:style-name="P229">7.23 <text:s/><text:a xlink:type="simple" xlink:href="#7.23.CSINH|outline" text:style-name="Standard" text:visited-style-name="Standard">CSINH</text:a><text:tab/>96</text:p>
          <text:p text:style-name="P229">7.24 <text:s/><text:a xlink:type="simple" xlink:href="#7.24.CSQRT|outline" text:style-name="Standard" text:visited-style-name="Standard">CSQRT</text:a><text:tab/>97</text:p>
          <text:p text:style-name="P229">7.25 <text:s/><text:a xlink:type="simple" xlink:href="#7.25.CSUB|outline" text:style-name="Standard" text:visited-style-name="Standard">CSUB</text:a><text:tab/>97</text:p>
          <text:p text:style-name="P229">7.26 <text:s/><text:a xlink:type="simple" xlink:href="#7.26.CTAN|outline" text:style-name="Standard" text:visited-style-name="Standard">CTAN</text:a><text:tab/>97</text:p>
          <text:p text:style-name="P229">7.27 <text:s/><text:a xlink:type="simple" xlink:href="#7.27.CTANH|outline" text:style-name="Standard" text:visited-style-name="Standard">CTANH</text:a><text:tab/>98</text:p>
          <text:p text:style-name="P228">8 <text:s/><text:a xlink:type="simple" xlink:href="#8.Arithmetik doppelter Genauigkeit|outline" text:style-name="Standard" text:visited-style-name="Standard">Arithmetik doppelter Genauigkeit</text:a><text:tab/>99</text:p>
          <text:p text:style-name="P229">8.1 <text:s/><text:a xlink:type="simple" xlink:href="#8.1.Einleitung|outline" text:style-name="Standard" text:visited-style-name="Standard">Einleitung</text:a><text:tab/>99</text:p>
          <text:p text:style-name="P229">8.2 <text:s/><text:a xlink:type="simple" xlink:href="#8.2.R2_ABS|outline" text:style-name="Standard" text:visited-style-name="Standard">R2_ABS</text:a><text:tab/>99</text:p>
          <text:p text:style-name="P229">8.3 <text:s/><text:a xlink:type="simple" xlink:href="#8.3.R2_ADD|outline" text:style-name="Standard" text:visited-style-name="Standard">R2_ADD</text:a><text:tab/>100</text:p>
          <text:p text:style-name="P229">8.4 <text:s/><text:a xlink:type="simple" xlink:href="#8.4.R2_ADD2|outline" text:style-name="Standard" text:visited-style-name="Standard">R2_ADD2</text:a><text:tab/>100</text:p>
          <text:p text:style-name="P229">8.5 <text:s/><text:a xlink:type="simple" xlink:href="#8.5.R2_MUL|outline" text:style-name="Standard" text:visited-style-name="Standard">R2_MUL</text:a><text:tab/>100</text:p>
          <text:p text:style-name="P229">8.6 <text:s/><text:a xlink:type="simple" xlink:href="#8.6.R2_SET|outline" text:style-name="Standard" text:visited-style-name="Standard">R2_SET</text:a><text:tab/>101</text:p>
          <text:p text:style-name="P228">9 <text:s/><text:a xlink:type="simple" xlink:href="#9.Arithmetische Funktionen|outline" text:style-name="Standard" text:visited-style-name="Standard">Arithmetische Funktionen</text:a><text:tab/>102</text:p>
          <text:p text:style-name="P229">9.1 <text:s/><text:a xlink:type="simple" xlink:href="#9.1.F_LIN|outline" text:style-name="Standard" text:visited-style-name="Standard">F_LIN</text:a><text:tab/>102</text:p>
          <text:p text:style-name="P229">9.2 <text:s/><text:a xlink:type="simple" xlink:href="#9.2.F_LIN2|outline" text:style-name="Standard" text:visited-style-name="Standard">F_LIN2</text:a><text:tab/>102</text:p>
          <text:p text:style-name="P229">9.3 <text:s/><text:a xlink:type="simple" xlink:href="#9.3.F_POLY|outline" text:style-name="Standard" text:visited-style-name="Standard">F_POLY</text:a><text:tab/>103</text:p>
          <text:p text:style-name="P229">9.4 <text:s/><text:a xlink:type="simple" xlink:href="#9.4.F_POWER|outline" text:style-name="Standard" text:visited-style-name="Standard">F_POWER</text:a><text:tab/>103</text:p>
          <text:p text:style-name="P229">9.5 <text:s/><text:a xlink:type="simple" xlink:href="#9.5.F_QUAD|outline" text:style-name="Standard" text:visited-style-name="Standard">F_QUAD</text:a><text:tab/>104</text:p>
          <text:p text:style-name="P229"><text:soft-page-break/>9.6 <text:s/><text:a xlink:type="simple" xlink:href="#9.6.FT_AVG|outline" text:style-name="Standard" text:visited-style-name="Standard">FT_AVG</text:a><text:tab/>104</text:p>
          <text:p text:style-name="P229">9.7 <text:s/><text:a xlink:type="simple" xlink:href="#9.7.FT_MIN_MAX|outline" text:style-name="Standard" text:visited-style-name="Standard">FT_MIN_MAX</text:a><text:tab/>105</text:p>
          <text:p text:style-name="P229">9.8 <text:s/><text:a xlink:type="simple" xlink:href="#9.8.FT_RMP|outline" text:style-name="Standard" text:visited-style-name="Standard">FT_RMP</text:a><text:tab/>106</text:p>
          <text:p text:style-name="P229">9.9 <text:s/><text:a xlink:type="simple" xlink:href="#9.9.LINEAR_INT|outline" text:style-name="Standard" text:visited-style-name="Standard">LINEAR_INT</text:a><text:tab/>107</text:p>
          <text:p text:style-name="P229">9.10 <text:s/><text:a xlink:type="simple" xlink:href="#9.10.POLYNOM_INT|outline" text:style-name="Standard" text:visited-style-name="Standard">POLYNOM_INT</text:a><text:tab/>108</text:p>
          <text:p text:style-name="P228">10 <text:s/><text:a xlink:type="simple" xlink:href="#10.Geometrische Funktionen|outline" text:style-name="Standard" text:visited-style-name="Standard">Geometrische Funktionen</text:a><text:tab/>110</text:p>
          <text:p text:style-name="P229">10.1 <text:s/><text:a xlink:type="simple" xlink:href="#10.1.CIRCLE_A|outline" text:style-name="Standard" text:visited-style-name="Standard">CIRCLE_A</text:a><text:tab/>110</text:p>
          <text:p text:style-name="P229">10.2 <text:s/><text:a xlink:type="simple" xlink:href="#10.2.CIRCLE_C|outline" text:style-name="Standard" text:visited-style-name="Standard">CIRCLE_C</text:a><text:tab/>110</text:p>
          <text:p text:style-name="P229">10.3 <text:s/><text:a xlink:type="simple" xlink:href="#10.3.CONE_V|outline" text:style-name="Standard" text:visited-style-name="Standard">CONE_V</text:a><text:tab/>111</text:p>
          <text:p text:style-name="P229">10.4 <text:s/><text:a xlink:type="simple" xlink:href="#10.4.ELLIPSE_A|outline" text:style-name="Standard" text:visited-style-name="Standard">ELLIPSE_A</text:a><text:tab/>111</text:p>
          <text:p text:style-name="P229">10.5 <text:s/><text:a xlink:type="simple" xlink:href="#10.5.ELLIPSE_C|outline" text:style-name="Standard" text:visited-style-name="Standard">ELLIPSE_C</text:a><text:tab/>111</text:p>
          <text:p text:style-name="P229">10.6 <text:s/><text:a xlink:type="simple" xlink:href="#10.6.SPHERE_V|outline" text:style-name="Standard" text:visited-style-name="Standard">SPHERE_V</text:a><text:tab/>112</text:p>
          <text:p text:style-name="P229">10.7 <text:s/><text:a xlink:type="simple" xlink:href="#10.7.TRIANGLE_A|outline" text:style-name="Standard" text:visited-style-name="Standard">TRIANGLE_A</text:a><text:tab/>112</text:p>
          <text:p text:style-name="P228">11 <text:s/><text:a xlink:type="simple" xlink:href="#11.Vektor Mathematik|outline" text:style-name="Standard" text:visited-style-name="Standard">Vektor Mathematik</text:a><text:tab/>114</text:p>
          <text:p text:style-name="P229">11.1 <text:s/><text:a xlink:type="simple" xlink:href="#11.1.Einleitung|outline" text:style-name="Standard" text:visited-style-name="Standard">Einleitung</text:a><text:tab/>114</text:p>
          <text:p text:style-name="P229">11.2 <text:s/><text:a xlink:type="simple" xlink:href="#11.2.V3_ABS|outline" text:style-name="Standard" text:visited-style-name="Standard">V3_ABS</text:a><text:tab/>114</text:p>
          <text:p text:style-name="P229">11.3 <text:s/><text:a xlink:type="simple" xlink:href="#11.3.V3_ADD|outline" text:style-name="Standard" text:visited-style-name="Standard">V3_ADD</text:a><text:tab/>115</text:p>
          <text:p text:style-name="P229">11.4 <text:s/><text:a xlink:type="simple" xlink:href="#11.4.V3_ANG|outline" text:style-name="Standard" text:visited-style-name="Standard">V3_ANG</text:a><text:tab/>115</text:p>
          <text:p text:style-name="P229">11.5 <text:s/><text:a xlink:type="simple" xlink:href="#11.5.V3_DPRO|outline" text:style-name="Standard" text:visited-style-name="Standard">V3_DPRO</text:a><text:tab/>115</text:p>
          <text:p text:style-name="P229">11.6 <text:s/><text:a xlink:type="simple" xlink:href="#11.6.V3_NORM|outline" text:style-name="Standard" text:visited-style-name="Standard">V3_NORM</text:a><text:tab/>116</text:p>
          <text:p text:style-name="P229">11.7 <text:s/><text:a xlink:type="simple" xlink:href="#11.7.V3_NUL|outline" text:style-name="Standard" text:visited-style-name="Standard">V3_NUL</text:a><text:tab/>116</text:p>
          <text:p text:style-name="P229">11.8 <text:s/><text:a xlink:type="simple" xlink:href="#11.8.V3_PAR|outline" text:style-name="Standard" text:visited-style-name="Standard">V3_PAR</text:a><text:tab/>117</text:p>
          <text:p text:style-name="P229">11.9 <text:s/><text:a xlink:type="simple" xlink:href="#11.9.V3_REV|outline" text:style-name="Standard" text:visited-style-name="Standard">V3_REV</text:a><text:tab/>117</text:p>
          <text:p text:style-name="P229">11.10 <text:s/><text:a xlink:type="simple" xlink:href="#11.10.V3_SMUL|outline" text:style-name="Standard" text:visited-style-name="Standard">V3_SMUL</text:a><text:tab/>118</text:p>
          <text:p text:style-name="P229">11.11 <text:s/><text:a xlink:type="simple" xlink:href="#11.11.V3_SUB|outline" text:style-name="Standard" text:visited-style-name="Standard">V3_SUB</text:a><text:tab/>118</text:p>
          <text:p text:style-name="P229">11.12 <text:s/><text:a xlink:type="simple" xlink:href="#11.12.V3_XANG|outline" text:style-name="Standard" text:visited-style-name="Standard">V3_XANG</text:a><text:tab/>118</text:p>
          <text:p text:style-name="P229">11.13 <text:s/><text:a xlink:type="simple" xlink:href="#11.13.V3_XPRO|outline" text:style-name="Standard" text:visited-style-name="Standard">V3_XPRO</text:a><text:tab/>119</text:p>
          <text:p text:style-name="P229">11.14 <text:s/><text:a xlink:type="simple" xlink:href="#11.14.V3_YANG|outline" text:style-name="Standard" text:visited-style-name="Standard">V3_YANG</text:a><text:tab/>119</text:p>
          <text:p text:style-name="P229">11.15 <text:s/><text:a xlink:type="simple" xlink:href="#11.15.V3_ZANG|outline" text:style-name="Standard" text:visited-style-name="Standard">V3_ZANG</text:a><text:tab/>120</text:p>
          <text:p text:style-name="P228">12 <text:s/><text:a xlink:type="simple" xlink:href="#12.Time &amp; Date|outline" text:style-name="Standard" text:visited-style-name="Standard">Time &amp; Date</text:a><text:tab/>121</text:p>
          <text:p text:style-name="P229">12.1 <text:s/><text:a xlink:type="simple" xlink:href="#12.1.CALENDAR_CALC|outline" text:style-name="Standard" text:visited-style-name="Standard">CALENDAR_CALC</text:a><text:tab/>121</text:p>
          <text:p text:style-name="P229">12.2 <text:s/><text:a xlink:type="simple" xlink:href="#12.2.DATE_ADD|outline" text:style-name="Standard" text:visited-style-name="Standard">DATE_ADD</text:a><text:tab/>122</text:p>
          <text:p text:style-name="P229">12.3 <text:s/><text:a xlink:type="simple" xlink:href="#12.3.DAY_OF_DATE|outline" text:style-name="Standard" text:visited-style-name="Standard">DAY_OF_DATE</text:a><text:tab/>122</text:p>
          <text:p text:style-name="P229">12.4 <text:s/><text:a xlink:type="simple" xlink:href="#12.4.DAY_OF_MONTH|outline" text:style-name="Standard" text:visited-style-name="Standard">DAY_OF_MONTH</text:a><text:tab/>123</text:p>
          <text:p text:style-name="P229">12.5 <text:s/><text:a xlink:type="simple" xlink:href="#12.5.DAY_OF_WEEK|outline" text:style-name="Standard" text:visited-style-name="Standard">DAY_OF_WEEK</text:a><text:tab/>123</text:p>
          <text:p text:style-name="P229">12.6 <text:s/><text:a xlink:type="simple" xlink:href="#12.6.DAY_OF_YEAR|outline" text:style-name="Standard" text:visited-style-name="Standard">DAY_OF_YEAR</text:a><text:tab/>124</text:p>
          <text:p text:style-name="P229">12.7 <text:s/><text:a xlink:type="simple" xlink:href="#12.7.DAY_TO_TIME|outline" text:style-name="Standard" text:visited-style-name="Standard">DAY_TO_TIME</text:a><text:tab/>124</text:p>
          <text:p text:style-name="P229">12.8 <text:s/><text:a xlink:type="simple" xlink:href="#12.8.DAYS_DELTA|outline" text:style-name="Standard" text:visited-style-name="Standard">DAYS_DELTA</text:a><text:tab/>125</text:p>
          <text:p text:style-name="P229">12.9 <text:s/><text:a xlink:type="simple" xlink:href="#12.9.DCF77|outline" text:style-name="Standard" text:visited-style-name="Standard">DCF77</text:a><text:tab/>125</text:p>
          <text:p text:style-name="P229"><text:soft-page-break/>12.10 <text:s/><text:a xlink:type="simple" xlink:href="#12.10.DST|outline" text:style-name="Standard" text:visited-style-name="Standard">DST</text:a><text:tab/>127</text:p>
          <text:p text:style-name="P229">12.11 <text:s/><text:a xlink:type="simple" xlink:href="#12.11.DT2_TO_SDT|outline" text:style-name="Standard" text:visited-style-name="Standard">DT2_TO_SDT</text:a><text:tab/>127</text:p>
          <text:p text:style-name="P229">12.12 <text:s/><text:a xlink:type="simple" xlink:href="#12.12.DT_TO_SDT|outline" text:style-name="Standard" text:visited-style-name="Standard">DT_TO_SDT</text:a><text:tab/>128</text:p>
          <text:p text:style-name="P229">12.13 <text:s/><text:a xlink:type="simple" xlink:href="#12.13.EASTER|outline" text:style-name="Standard" text:visited-style-name="Standard">EASTER</text:a><text:tab/>128</text:p>
          <text:p text:style-name="P229">12.14 <text:s/><text:a xlink:type="simple" xlink:href="#12.14.HOLIDAY|outline" text:style-name="Standard" text:visited-style-name="Standard">HOLIDAY</text:a><text:tab/>129</text:p>
          <text:p text:style-name="P229">12.15 <text:s/><text:a xlink:type="simple" xlink:href="#12.15.HOUR|outline" text:style-name="Standard" text:visited-style-name="Standard">HOUR</text:a><text:tab/>129</text:p>
          <text:p text:style-name="P229">12.16 <text:s/><text:a xlink:type="simple" xlink:href="#12.16.HOUR_OF_DT|outline" text:style-name="Standard" text:visited-style-name="Standard">HOUR_OF_DT</text:a><text:tab/>130</text:p>
          <text:p text:style-name="P229">12.17 <text:s/><text:a xlink:type="simple" xlink:href="#12.17.HOUR_TO_TIME|outline" text:style-name="Standard" text:visited-style-name="Standard">HOUR_TO_TIME</text:a><text:tab/>130</text:p>
          <text:p text:style-name="P229">12.18 <text:s/><text:a xlink:type="simple" xlink:href="#12.18.HOUR_TO_TOD|outline" text:style-name="Standard" text:visited-style-name="Standard">HOUR_TO_TOD</text:a><text:tab/>131</text:p>
          <text:p text:style-name="P229">12.19 <text:s/><text:a xlink:type="simple" xlink:href="#12.19.JD2000|outline" text:style-name="Standard" text:visited-style-name="Standard">JD2000</text:a><text:tab/>131</text:p>
          <text:p text:style-name="P229">12.20 <text:s/><text:a xlink:type="simple" xlink:href="#12.20.LEAP_DAY|outline" text:style-name="Standard" text:visited-style-name="Standard">LEAP_DAY</text:a><text:tab/>132</text:p>
          <text:p text:style-name="P229">12.21 <text:s/><text:a xlink:type="simple" xlink:href="#12.21.LEAP_OF_DATE|outline" text:style-name="Standard" text:visited-style-name="Standard">LEAP_OF_DATE</text:a><text:tab/>132</text:p>
          <text:p text:style-name="P229">12.22 <text:s/><text:a xlink:type="simple" xlink:href="#12.22.LEAP_YEAR|outline" text:style-name="Standard" text:visited-style-name="Standard">LEAP_YEAR</text:a><text:tab/>133</text:p>
          <text:p text:style-name="P229">12.23 <text:s/><text:a xlink:type="simple" xlink:href="#12.23.LTIME_TO_UTC|outline" text:style-name="Standard" text:visited-style-name="Standard">LTIME_TO_UTC</text:a><text:tab/>133</text:p>
          <text:p text:style-name="P229">12.24 <text:s/><text:a xlink:type="simple" xlink:href="#12.24.MINUTE|outline" text:style-name="Standard" text:visited-style-name="Standard">MINUTE</text:a><text:tab/>134</text:p>
          <text:p text:style-name="P229">12.25 <text:s/><text:a xlink:type="simple" xlink:href="#12.25.MINUTE_OF_DT|outline" text:style-name="Standard" text:visited-style-name="Standard">MINUTE_OF_DT</text:a><text:tab/>134</text:p>
          <text:p text:style-name="P229">12.26 <text:s/><text:a xlink:type="simple" xlink:href="#12.26.MINUTE_TO_TIME|outline" text:style-name="Standard" text:visited-style-name="Standard">MINUTE_TO_TIME</text:a><text:tab/>134</text:p>
          <text:p text:style-name="P229">12.27 <text:s/><text:a xlink:type="simple" xlink:href="#12.27.MONTH_BEGIN|outline" text:style-name="Standard" text:visited-style-name="Standard">MONTH_BEGIN</text:a><text:tab/>135</text:p>
          <text:p text:style-name="P229">12.28 <text:s/><text:a xlink:type="simple" xlink:href="#12.28.MONTH_END|outline" text:style-name="Standard" text:visited-style-name="Standard">MONTH_END</text:a><text:tab/>135</text:p>
          <text:p text:style-name="P229">12.29 <text:s/><text:a xlink:type="simple" xlink:href="#12.29.MONTH_OF_DATE|outline" text:style-name="Standard" text:visited-style-name="Standard">MONTH_OF_DATE</text:a><text:tab/>135</text:p>
          <text:p text:style-name="P229">12.30 <text:s/><text:a xlink:type="simple" xlink:href="#12.30.MULTIME|outline" text:style-name="Standard" text:visited-style-name="Standard">MULTIME</text:a><text:tab/>136</text:p>
          <text:p text:style-name="P229">12.31 <text:s/><text:a xlink:type="simple" xlink:href="#12.31.PERIOD|outline" text:style-name="Standard" text:visited-style-name="Standard">PERIOD</text:a><text:tab/>136</text:p>
          <text:p text:style-name="P229">12.32 <text:s/><text:a xlink:type="simple" xlink:href="#12.32.PERIOD2|outline" text:style-name="Standard" text:visited-style-name="Standard">PERIOD2</text:a><text:tab/>137</text:p>
          <text:p text:style-name="P229">12.33 <text:s/><text:a xlink:type="simple" xlink:href="#12.33.REFRACTION|outline" text:style-name="Standard" text:visited-style-name="Standard">REFRACTION</text:a><text:tab/>138</text:p>
          <text:p text:style-name="P229">12.34 <text:s/><text:a xlink:type="simple" xlink:href="#12.34.RTC_2|outline" text:style-name="Standard" text:visited-style-name="Standard">RTC_2</text:a><text:tab/>138</text:p>
          <text:p text:style-name="P229">12.35 <text:s/><text:a xlink:type="simple" xlink:href="#12.35.RTC_MS|outline" text:style-name="Standard" text:visited-style-name="Standard">RTC_MS</text:a><text:tab/>139</text:p>
          <text:p text:style-name="P229">12.36 <text:s/><text:a xlink:type="simple" xlink:href="#12.36.SDT_TO_DATE|outline" text:style-name="Standard" text:visited-style-name="Standard">SDT_TO_DATE</text:a><text:tab/>140</text:p>
          <text:p text:style-name="P229">12.37 <text:s/><text:a xlink:type="simple" xlink:href="#12.37.SDT_TO_DT|outline" text:style-name="Standard" text:visited-style-name="Standard">SDT_TO_DT</text:a><text:tab/>140</text:p>
          <text:p text:style-name="P229">12.38 <text:s/><text:a xlink:type="simple" xlink:href="#12.38.SDT_TO_TOD|outline" text:style-name="Standard" text:visited-style-name="Standard">SDT_TO_TOD</text:a><text:tab/>141</text:p>
          <text:p text:style-name="P229">12.39 <text:s/><text:a xlink:type="simple" xlink:href="#12.39.SECOND|outline" text:style-name="Standard" text:visited-style-name="Standard">SECOND</text:a><text:tab/>141</text:p>
          <text:p text:style-name="P229">12.40 <text:s/><text:a xlink:type="simple" xlink:href="#12.40.SECOND_OF_DT|outline" text:style-name="Standard" text:visited-style-name="Standard">SECOND_OF_DT</text:a><text:tab/>142</text:p>
          <text:p text:style-name="P229">12.41 <text:s/><text:a xlink:type="simple" xlink:href="#12.41.SECOND_TO_TIME|outline" text:style-name="Standard" text:visited-style-name="Standard">SECOND_TO_TIME</text:a><text:tab/>142</text:p>
          <text:p text:style-name="P229">12.42 <text:s/><text:a xlink:type="simple" xlink:href="#12.42.SET_DATE|outline" text:style-name="Standard" text:visited-style-name="Standard">SET_DATE</text:a><text:tab/>142</text:p>
          <text:p text:style-name="P229">12.43 <text:s/><text:a xlink:type="simple" xlink:href="#12.43.SET_DT|outline" text:style-name="Standard" text:visited-style-name="Standard">SET_DT</text:a><text:tab/>143</text:p>
          <text:p text:style-name="P229">12.44 <text:s/><text:a xlink:type="simple" xlink:href="#12.44.SET_TOD|outline" text:style-name="Standard" text:visited-style-name="Standard">SET_TOD</text:a><text:tab/>144</text:p>
          <text:p text:style-name="P229">12.45 <text:s/><text:a xlink:type="simple" xlink:href="#12.45.SUN_POS|outline" text:style-name="Standard" text:visited-style-name="Standard">SUN_POS</text:a><text:tab/>144</text:p>
          <text:p text:style-name="P229">12.46 <text:s/><text:a xlink:type="simple" xlink:href="#12.46.SUN_TIME|outline" text:style-name="Standard" text:visited-style-name="Standard">SUN_TIME</text:a><text:tab/>145</text:p>
          <text:p text:style-name="P229">12.47 <text:s/><text:a xlink:type="simple" xlink:href="#12.47.UTC_TO_LTIME|outline" text:style-name="Standard" text:visited-style-name="Standard">UTC_TO_LTIME</text:a><text:tab/>146</text:p>
          <text:p text:style-name="P229">12.48 <text:s/><text:a xlink:type="simple" xlink:href="#12.48.WORK_WEEK|outline" text:style-name="Standard" text:visited-style-name="Standard">WORK_WEEK</text:a><text:tab/>147</text:p>
          <text:p text:style-name="P229">12.49 <text:s/><text:a xlink:type="simple" xlink:href="#12.49.YEAR_BEGIN|outline" text:style-name="Standard" text:visited-style-name="Standard">YEAR_BEGIN</text:a><text:tab/>147</text:p>
          <text:p text:style-name="P229">12.50 <text:s/><text:a xlink:type="simple" xlink:href="#12.50.YEAR_END|outline" text:style-name="Standard" text:visited-style-name="Standard">YEAR_END</text:a><text:tab/>148</text:p>
          <text:p text:style-name="P229">12.51 <text:s/><text:a xlink:type="simple" xlink:href="#12.51.YEAR_OF_DATE|outline" text:style-name="Standard" text:visited-style-name="Standard">YEAR_OF_DATE</text:a><text:tab/>148</text:p>
          <text:p text:style-name="P228"><text:soft-page-break/>13 <text:s/><text:a xlink:type="simple" xlink:href="#13.String Funktionen|outline" text:style-name="Standard" text:visited-style-name="Standard">String Funktionen</text:a><text:tab/>149</text:p>
          <text:p text:style-name="P229">13.1 <text:s/><text:a xlink:type="simple" xlink:href="#13.1.BIN_TO_BYTE|outline" text:style-name="Standard" text:visited-style-name="Standard">BIN_TO_BYTE</text:a><text:tab/>149</text:p>
          <text:p text:style-name="P229">13.2 <text:s/><text:a xlink:type="simple" xlink:href="#13.2.BIN_TO_DWORD|outline" text:style-name="Standard" text:visited-style-name="Standard">BIN_TO_DWORD</text:a><text:tab/>149</text:p>
          <text:p text:style-name="P229">13.3 <text:s/><text:a xlink:type="simple" xlink:href="#13.3.BYTE_TO_STRB|outline" text:style-name="Standard" text:visited-style-name="Standard">BYTE_TO_STRB</text:a><text:tab/>150</text:p>
          <text:p text:style-name="P229">13.4 <text:s/><text:a xlink:type="simple" xlink:href="#13.4.BYTE_TO_STRH|outline" text:style-name="Standard" text:visited-style-name="Standard">BYTE_TO_STRH</text:a><text:tab/>150</text:p>
          <text:p text:style-name="P229">13.5 <text:s/><text:a xlink:type="simple" xlink:href="#13.5.CAPITALIZE|outline" text:style-name="Standard" text:visited-style-name="Standard">CAPITALIZE</text:a><text:tab/>151</text:p>
          <text:p text:style-name="P229">13.6 <text:s/><text:a xlink:type="simple" xlink:href="#13.6.CHARCODE|outline" text:style-name="Standard" text:visited-style-name="Standard">CHARCODE</text:a><text:tab/>151</text:p>
          <text:p text:style-name="P229">13.7 <text:s/><text:a xlink:type="simple" xlink:href="#13.7.CHARNAME|outline" text:style-name="Standard" text:visited-style-name="Standard">CHARNAME</text:a><text:tab/>152</text:p>
          <text:p text:style-name="P229">13.8 <text:s/><text:a xlink:type="simple" xlink:href="#13.8.CHR_TO_STRING|outline" text:style-name="Standard" text:visited-style-name="Standard">CHR_TO_STRING</text:a><text:tab/>153</text:p>
          <text:p text:style-name="P229">13.9 <text:s/><text:a xlink:type="simple" xlink:href="#13.9.CLEAN|outline" text:style-name="Standard" text:visited-style-name="Standard">CLEAN</text:a><text:tab/>153</text:p>
          <text:p text:style-name="P229">13.10 <text:s/><text:a xlink:type="simple" xlink:href="#13.10.CODE|outline" text:style-name="Standard" text:visited-style-name="Standard">CODE</text:a><text:tab/>154</text:p>
          <text:p text:style-name="P229">13.11 <text:s/><text:a xlink:type="simple" xlink:href="#13.11.COUNT_CHAR|outline" text:style-name="Standard" text:visited-style-name="Standard">COUNT_CHAR</text:a><text:tab/>154</text:p>
          <text:p text:style-name="P229">13.12 <text:s/><text:a xlink:type="simple" xlink:href="#13.12.DEC_TO_BYTE|outline" text:style-name="Standard" text:visited-style-name="Standard">DEC_TO_BYTE</text:a><text:tab/>155</text:p>
          <text:p text:style-name="P229">13.13 <text:s/><text:a xlink:type="simple" xlink:href="#13.13.DEC_TO_DWORD|outline" text:style-name="Standard" text:visited-style-name="Standard">DEC_TO_DWORD</text:a><text:tab/>155</text:p>
          <text:p text:style-name="P229">13.14 <text:s/><text:a xlink:type="simple" xlink:href="#13.14.DEC_TO_INT|outline" text:style-name="Standard" text:visited-style-name="Standard">DEC_TO_INT</text:a><text:tab/>156</text:p>
          <text:p text:style-name="P229">13.15 <text:s/><text:a xlink:type="simple" xlink:href="#13.15.DEL_CHARS|outline" text:style-name="Standard" text:visited-style-name="Standard">DEL_CHARS</text:a><text:tab/>156</text:p>
          <text:p text:style-name="P229">13.16 <text:s/><text:a xlink:type="simple" xlink:href="#13.16.DT_TO_STRF|outline" text:style-name="Standard" text:visited-style-name="Standard">DT_TO_STRF</text:a><text:tab/>157</text:p>
          <text:p text:style-name="P229">13.17 <text:s/><text:a xlink:type="simple" xlink:href="#13.17.DWORD_TO_STRB|outline" text:style-name="Standard" text:visited-style-name="Standard">DWORD_TO_STRB</text:a><text:tab/>159</text:p>
          <text:p text:style-name="P229">13.18 <text:s/><text:a xlink:type="simple" xlink:href="#13.18.DWORD_TO_STRF|outline" text:style-name="Standard" text:visited-style-name="Standard">DWORD_TO_STRF</text:a><text:tab/>159</text:p>
          <text:p text:style-name="P229">13.19 <text:s/><text:a xlink:type="simple" xlink:href="#13.19.DWORD_TO_STRH|outline" text:style-name="Standard" text:visited-style-name="Standard">DWORD_TO_STRH</text:a><text:tab/>160</text:p>
          <text:p text:style-name="P229">13.20 <text:s/><text:a xlink:type="simple" xlink:href="#13.20.EXEC|outline" text:style-name="Standard" text:visited-style-name="Standard">EXEC</text:a><text:tab/>160</text:p>
          <text:p text:style-name="P229">13.21 <text:s/><text:a xlink:type="simple" xlink:href="#13.21.FILL|outline" text:style-name="Standard" text:visited-style-name="Standard">FILL</text:a><text:tab/>161</text:p>
          <text:p text:style-name="P229">13.22 <text:s/><text:a xlink:type="simple" xlink:href="#13.22.FIND_CHAR|outline" text:style-name="Standard" text:visited-style-name="Standard">FIND_CHAR</text:a><text:tab/>161</text:p>
          <text:p text:style-name="P229">13.23 <text:s/><text:a xlink:type="simple" xlink:href="#13.23.FIND_CTRL|outline" text:style-name="Standard" text:visited-style-name="Standard">FIND_CTRL</text:a><text:tab/>162</text:p>
          <text:p text:style-name="P229">13.24 <text:s/><text:a xlink:type="simple" xlink:href="#13.24.FIND_NONUM|outline" text:style-name="Standard" text:visited-style-name="Standard">FIND_NONUM</text:a><text:tab/>162</text:p>
          <text:p text:style-name="P229">13.25 <text:s/><text:a xlink:type="simple" xlink:href="#13.25.FIND_NUM|outline" text:style-name="Standard" text:visited-style-name="Standard">FIND_NUM</text:a><text:tab/>163</text:p>
          <text:p text:style-name="P229">13.26 <text:s/><text:a xlink:type="simple" xlink:href="#13.26.FINDB|outline" text:style-name="Standard" text:visited-style-name="Standard">FINDB</text:a><text:tab/>163</text:p>
          <text:p text:style-name="P229">13.27 <text:s/><text:a xlink:type="simple" xlink:href="#13.27.FINDB_NONUM|outline" text:style-name="Standard" text:visited-style-name="Standard">FINDB_NONUM</text:a><text:tab/>164</text:p>
          <text:p text:style-name="P229">13.28 <text:s/><text:a xlink:type="simple" xlink:href="#13.28.FINDB_NUM|outline" text:style-name="Standard" text:visited-style-name="Standard">FINDB_NUM</text:a><text:tab/>164</text:p>
          <text:p text:style-name="P229">13.29 <text:s/><text:a xlink:type="simple" xlink:href="#13.29.FINDP|outline" text:style-name="Standard" text:visited-style-name="Standard">FINDP</text:a><text:tab/>165</text:p>
          <text:p text:style-name="P229">13.30 <text:s/><text:a xlink:type="simple" xlink:href="#13.30.FIX|outline" text:style-name="Standard" text:visited-style-name="Standard">FIX</text:a><text:tab/>165</text:p>
          <text:p text:style-name="P229">13.31 <text:s/><text:a xlink:type="simple" xlink:href="#13.31.FLOAT_TO_REAL|outline" text:style-name="Standard" text:visited-style-name="Standard">FLOAT_TO_REAL</text:a><text:tab/>166</text:p>
          <text:p text:style-name="P229">13.32 <text:s/><text:a xlink:type="simple" xlink:href="#13.32.FSTRING_TO_BYTE|outline" text:style-name="Standard" text:visited-style-name="Standard">FSTRING_TO_BYTE</text:a><text:tab/>167</text:p>
          <text:p text:style-name="P229">13.33 <text:s/><text:a xlink:type="simple" xlink:href="#13.33.FSTRING_TO_DT|outline" text:style-name="Standard" text:visited-style-name="Standard">FSTRING_TO_DT</text:a><text:tab/>167</text:p>
          <text:p text:style-name="P229">13.34 <text:s/><text:a xlink:type="simple" xlink:href="#13.34.FSTRING_TO_DWORD|outline" text:style-name="Standard" text:visited-style-name="Standard">FSTRING_TO_DWORD</text:a><text:tab/>168</text:p>
          <text:p text:style-name="P229">13.35 <text:s/><text:a xlink:type="simple" xlink:href="#13.35.FSTRING_TO_MONTH|outline" text:style-name="Standard" text:visited-style-name="Standard">FSTRING_TO_MONTH</text:a><text:tab/>168</text:p>
          <text:p text:style-name="P229">13.36 <text:s/><text:a xlink:type="simple" xlink:href="#13.36.FSTRING_TO_WEEK|outline" text:style-name="Standard" text:visited-style-name="Standard">FSTRING_TO_WEEK</text:a><text:tab/>169</text:p>
          <text:p text:style-name="P229">13.37 <text:s/><text:a xlink:type="simple" xlink:href="#13.37.FSTRING_TO_WEEKDAY|outline" text:style-name="Standard" text:visited-style-name="Standard">FSTRING_TO_WEEKDAY</text:a><text:tab/>170</text:p>
          <text:p text:style-name="P229">13.38 <text:s/><text:a xlink:type="simple" xlink:href="#13.38.HEX_TO_BYTE|outline" text:style-name="Standard" text:visited-style-name="Standard">HEX_TO_BYTE</text:a><text:tab/>170</text:p>
          <text:p text:style-name="P229">13.39 <text:s/><text:a xlink:type="simple" xlink:href="#13.39.HEX_TO_DWORD|outline" text:style-name="Standard" text:visited-style-name="Standard">HEX_TO_DWORD</text:a><text:tab/>171</text:p>
          <text:p text:style-name="P229">13.40 <text:s/><text:a xlink:type="simple" xlink:href="#13.40.IS_ALNUM|outline" text:style-name="Standard" text:visited-style-name="Standard">IS_ALNUM</text:a><text:tab/>171</text:p>
          <text:p text:style-name="P229">13.41 <text:s/><text:a xlink:type="simple" xlink:href="#13.41.IS_ALPHA|outline" text:style-name="Standard" text:visited-style-name="Standard">IS_ALPHA</text:a><text:tab/>172</text:p>
          <text:p text:style-name="P229">13.42 <text:s/><text:a xlink:type="simple" xlink:href="#13.42.IS_CC|outline" text:style-name="Standard" text:visited-style-name="Standard">IS_CC</text:a><text:tab/>172</text:p>
          <text:p text:style-name="P229">13.43 <text:s/><text:a xlink:type="simple" xlink:href="#13.43.IS_CTRL|outline" text:style-name="Standard" text:visited-style-name="Standard">IS_CTRL</text:a><text:tab/>173</text:p>
          <text:p text:style-name="P229">13.44 <text:s/><text:a xlink:type="simple" xlink:href="#13.44.IS_HEX|outline" text:style-name="Standard" text:visited-style-name="Standard">IS_HEX</text:a><text:tab/>173</text:p>
          <text:p text:style-name="P229"><text:soft-page-break/>13.45 <text:s/><text:a xlink:type="simple" xlink:href="#13.45.IS_LOWER|outline" text:style-name="Standard" text:visited-style-name="Standard">IS_LOWER</text:a><text:tab/>173</text:p>
          <text:p text:style-name="P229">13.46 <text:s/><text:a xlink:type="simple" xlink:href="#13.46.IS_NCC|outline" text:style-name="Standard" text:visited-style-name="Standard">IS_NCC</text:a><text:tab/>174</text:p>
          <text:p text:style-name="P229">13.47 <text:s/><text:a xlink:type="simple" xlink:href="#13.47.IS_NUM|outline" text:style-name="Standard" text:visited-style-name="Standard">IS_NUM</text:a><text:tab/>175</text:p>
          <text:p text:style-name="P229">13.48 <text:s/><text:a xlink:type="simple" xlink:href="#13.48.IS_UPPER|outline" text:style-name="Standard" text:visited-style-name="Standard">IS_UPPER</text:a><text:tab/>175</text:p>
          <text:p text:style-name="P229">13.49 <text:s/><text:a xlink:type="simple" xlink:href="#13.49.ISC_ALPHA|outline" text:style-name="Standard" text:visited-style-name="Standard">ISC_ALPHA</text:a><text:tab/>176</text:p>
          <text:p text:style-name="P229">13.50 <text:s/><text:a xlink:type="simple" xlink:href="#13.50.ISC_CTRL|outline" text:style-name="Standard" text:visited-style-name="Standard">ISC_CTRL</text:a><text:tab/>177</text:p>
          <text:p text:style-name="P229">13.51 <text:s/><text:a xlink:type="simple" xlink:href="#13.51.ISC_HEX|outline" text:style-name="Standard" text:visited-style-name="Standard">ISC_HEX</text:a><text:tab/>177</text:p>
          <text:p text:style-name="P229">13.52 <text:s/><text:a xlink:type="simple" xlink:href="#13.52.ISC_LOWER|outline" text:style-name="Standard" text:visited-style-name="Standard">ISC_LOWER</text:a><text:tab/>178</text:p>
          <text:p text:style-name="P229">13.53 <text:s/><text:a xlink:type="simple" xlink:href="#13.53.ISC_NUM|outline" text:style-name="Standard" text:visited-style-name="Standard">ISC_NUM</text:a><text:tab/>178</text:p>
          <text:p text:style-name="P229">13.54 <text:s/><text:a xlink:type="simple" xlink:href="#13.54.ISC_UPPER|outline" text:style-name="Standard" text:visited-style-name="Standard">ISC_UPPER</text:a><text:tab/>179</text:p>
          <text:p text:style-name="P229">13.55 <text:s/><text:a xlink:type="simple" xlink:href="#13.55.LOWERCASE|outline" text:style-name="Standard" text:visited-style-name="Standard">LOWERCASE</text:a><text:tab/>179</text:p>
          <text:p text:style-name="P229">13.56 <text:s/><text:a xlink:type="simple" xlink:href="#13.56.MESSAGE_4R|outline" text:style-name="Standard" text:visited-style-name="Standard">MESSAGE_4R</text:a><text:tab/>180</text:p>
          <text:p text:style-name="P229">13.57 <text:s/><text:a xlink:type="simple" xlink:href="#13.57.MESSAGE_8|outline" text:style-name="Standard" text:visited-style-name="Standard">MESSAGE_8</text:a><text:tab/>181</text:p>
          <text:p text:style-name="P229">13.58 <text:s/><text:a xlink:type="simple" xlink:href="#13.58.MIRROR|outline" text:style-name="Standard" text:visited-style-name="Standard">MIRROR</text:a><text:tab/>182</text:p>
          <text:p text:style-name="P229">13.59 <text:s/><text:a xlink:type="simple" xlink:href="#13.59.MONTH_TO_STRING|outline" text:style-name="Standard" text:visited-style-name="Standard">MONTH_TO_STRING</text:a><text:tab/>182</text:p>
          <text:p text:style-name="P229">13.60 <text:s/><text:a xlink:type="simple" xlink:href="#13.60.OCT_TO_BYTE|outline" text:style-name="Standard" text:visited-style-name="Standard">OCT_TO_BYTE</text:a><text:tab/>183</text:p>
          <text:p text:style-name="P229">13.61 <text:s/><text:a xlink:type="simple" xlink:href="#13.61.OCT_TO_DWORD|outline" text:style-name="Standard" text:visited-style-name="Standard">OCT_TO_DWORD</text:a><text:tab/>183</text:p>
          <text:p text:style-name="P229">13.62 <text:s/><text:a xlink:type="simple" xlink:href="#13.62.REAL_TO_STRF|outline" text:style-name="Standard" text:visited-style-name="Standard">REAL_TO_STRF</text:a><text:tab/>184</text:p>
          <text:p text:style-name="P229">13.63 <text:s/><text:a xlink:type="simple" xlink:href="#13.63.REPLACE_ALL|outline" text:style-name="Standard" text:visited-style-name="Standard">REPLACE_ALL</text:a><text:tab/>184</text:p>
          <text:p text:style-name="P229">13.64 <text:s/><text:a xlink:type="simple" xlink:href="#13.64.REPLACE_CHARS|outline" text:style-name="Standard" text:visited-style-name="Standard">REPLACE_CHARS</text:a><text:tab/>185</text:p>
          <text:p text:style-name="P229">13.65 <text:s/><text:a xlink:type="simple" xlink:href="#13.65.REPLACE_UML|outline" text:style-name="Standard" text:visited-style-name="Standard">REPLACE_UML</text:a><text:tab/>185</text:p>
          <text:p text:style-name="P229">13.66 <text:s/><text:a xlink:type="simple" xlink:href="#13.66.TICKER|outline" text:style-name="Standard" text:visited-style-name="Standard">TICKER</text:a><text:tab/>186</text:p>
          <text:p text:style-name="P229">13.67 <text:s/><text:a xlink:type="simple" xlink:href="#13.67.TO_LOWER|outline" text:style-name="Standard" text:visited-style-name="Standard">TO_LOWER</text:a><text:tab/>187</text:p>
          <text:p text:style-name="P229">13.68 <text:s/><text:a xlink:type="simple" xlink:href="#13.68.TO_UML|outline" text:style-name="Standard" text:visited-style-name="Standard">TO_UML</text:a><text:tab/>187</text:p>
          <text:p text:style-name="P229">13.69 <text:s/><text:a xlink:type="simple" xlink:href="#13.69.TO_UPPER|outline" text:style-name="Standard" text:visited-style-name="Standard">TO_UPPER</text:a><text:tab/>188</text:p>
          <text:p text:style-name="P229">13.70 <text:s/><text:a xlink:type="simple" xlink:href="#13.70.TRIM|outline" text:style-name="Standard" text:visited-style-name="Standard">TRIM</text:a><text:tab/>189</text:p>
          <text:p text:style-name="P229">13.71 <text:s/><text:a xlink:type="simple" xlink:href="#13.71.TRIM1|outline" text:style-name="Standard" text:visited-style-name="Standard">TRIM1</text:a><text:tab/>189</text:p>
          <text:p text:style-name="P229">13.72 <text:s/><text:a xlink:type="simple" xlink:href="#13.72.TRIME|outline" text:style-name="Standard" text:visited-style-name="Standard">TRIME</text:a><text:tab/>189</text:p>
          <text:p text:style-name="P229">13.73 <text:s/><text:a xlink:type="simple" xlink:href="#13.73.UPPERCASE|outline" text:style-name="Standard" text:visited-style-name="Standard">UPPERCASE</text:a><text:tab/>190</text:p>
          <text:p text:style-name="P229">13.74 <text:s/><text:a xlink:type="simple" xlink:href="#13.74.WEEKDAY_TO_STRING|outline" text:style-name="Standard" text:visited-style-name="Standard">WEEKDAY_TO_STRING</text:a><text:tab/>190</text:p>
          <text:p text:style-name="P228">14 <text:s/><text:a xlink:type="simple" xlink:href="#14.Speicherbausteine|outline" text:style-name="Standard" text:visited-style-name="Standard">Speicherbausteine</text:a><text:tab/>192</text:p>
          <text:p text:style-name="P229">14.1 <text:s/><text:a xlink:type="simple" xlink:href="#14.1.FIFO_16|outline" text:style-name="Standard" text:visited-style-name="Standard">FIFO_16</text:a><text:tab/>192</text:p>
          <text:p text:style-name="P229">14.2 <text:s/><text:a xlink:type="simple" xlink:href="#14.2.FIFO_32|outline" text:style-name="Standard" text:visited-style-name="Standard">FIFO_32</text:a><text:tab/>193</text:p>
          <text:p text:style-name="P229">14.3 <text:s/><text:a xlink:type="simple" xlink:href="#14.3.STACK_16|outline" text:style-name="Standard" text:visited-style-name="Standard">STACK_16</text:a><text:tab/>193</text:p>
          <text:p text:style-name="P229">14.4 <text:s/><text:a xlink:type="simple" xlink:href="#14.4.STACK_32|outline" text:style-name="Standard" text:visited-style-name="Standard">STACK_32</text:a><text:tab/>194</text:p>
          <text:p text:style-name="P228">15 <text:s/><text:a xlink:type="simple" xlink:href="#15.Takt Generatoren|outline" text:style-name="Standard" text:visited-style-name="Standard">Takt Generatoren</text:a><text:tab/>195</text:p>
          <text:p text:style-name="P229">15.1 <text:s/><text:a xlink:type="simple" xlink:href="#15.1.A_TRIG|outline" text:style-name="Standard" text:visited-style-name="Standard">A_TRIG</text:a><text:tab/>195</text:p>
          <text:p text:style-name="P229">15.2 <text:s/><text:a xlink:type="simple" xlink:href="#15.2.B_TRIG|outline" text:style-name="Standard" text:visited-style-name="Standard">B_TRIG</text:a><text:tab/>195</text:p>
          <text:p text:style-name="P229">15.3 <text:s/><text:a xlink:type="simple" xlink:href="#15.3.CLICK_CNT|outline" text:style-name="Standard" text:visited-style-name="Standard">CLICK_CNT</text:a><text:tab/>196</text:p>
          <text:p text:style-name="P229">15.4 <text:s/><text:a xlink:type="simple" xlink:href="#15.4.CLICK_DEC|outline" text:style-name="Standard" text:visited-style-name="Standard">CLICK_DEC</text:a><text:tab/>197</text:p>
          <text:p text:style-name="P229">15.5 <text:s/><text:a xlink:type="simple" xlink:href="#15.5.CLK_DIV|outline" text:style-name="Standard" text:visited-style-name="Standard">CLK_DIV</text:a><text:tab/>198</text:p>
          <text:p text:style-name="P229"><text:soft-page-break/>15.6 <text:s/><text:a xlink:type="simple" xlink:href="#15.6.CLK_N|outline" text:style-name="Standard" text:visited-style-name="Standard">CLK_N</text:a><text:tab/>199</text:p>
          <text:p text:style-name="P229">15.7 <text:s/><text:a xlink:type="simple" xlink:href="#15.7.CLK_PRG|outline" text:style-name="Standard" text:visited-style-name="Standard">CLK_PRG</text:a><text:tab/>200</text:p>
          <text:p text:style-name="P229">15.8 <text:s/><text:a xlink:type="simple" xlink:href="#15.8.CLK_PULSE|outline" text:style-name="Standard" text:visited-style-name="Standard">CLK_PULSE</text:a><text:tab/>200</text:p>
          <text:p text:style-name="P229">15.9 <text:s/><text:a xlink:type="simple" xlink:href="#15.9.CYCLE_4|outline" text:style-name="Standard" text:visited-style-name="Standard">CYCLE_4</text:a><text:tab/>202</text:p>
          <text:p text:style-name="P229">15.10 <text:s/><text:a xlink:type="simple" xlink:href="#15.10.D_TRIG|outline" text:style-name="Standard" text:visited-style-name="Standard">D_TRIG</text:a><text:tab/>202</text:p>
          <text:p text:style-name="P229">15.11 <text:s/><text:a xlink:type="simple" xlink:href="#15.11.GEN_BIT|outline" text:style-name="Standard" text:visited-style-name="Standard">GEN_BIT</text:a><text:tab/>203</text:p>
          <text:p text:style-name="P229">15.12 <text:s/><text:a xlink:type="simple" xlink:href="#15.12.GEN_SQ|outline" text:style-name="Standard" text:visited-style-name="Standard">GEN_SQ</text:a><text:tab/>205</text:p>
          <text:p text:style-name="P229">15.13 <text:s/><text:a xlink:type="simple" xlink:href="#15.13.SCHEDULER|outline" text:style-name="Standard" text:visited-style-name="Standard">SCHEDULER</text:a><text:tab/>206</text:p>
          <text:p text:style-name="P229">15.14 <text:s/><text:a xlink:type="simple" xlink:href="#15.14.SCHEDULER_2|outline" text:style-name="Standard" text:visited-style-name="Standard">SCHEDULER_2</text:a><text:tab/>206</text:p>
          <text:p text:style-name="P229">15.15 <text:s/><text:a xlink:type="simple" xlink:href="#15.15.SEQUENCE_4|outline" text:style-name="Standard" text:visited-style-name="Standard">SEQUENCE_4</text:a><text:tab/>207</text:p>
          <text:p text:style-name="P229">15.16 <text:s/><text:a xlink:type="simple" xlink:href="#15.16.SEQUENCE_64|outline" text:style-name="Standard" text:visited-style-name="Standard">SEQUENCE_64</text:a><text:tab/>210</text:p>
          <text:p text:style-name="P229">15.17 <text:s/><text:a xlink:type="simple" xlink:href="#15.17.SEQUENCE_8|outline" text:style-name="Standard" text:visited-style-name="Standard">SEQUENCE_8</text:a><text:tab/>211</text:p>
          <text:p text:style-name="P229">15.18 <text:s/><text:a xlink:type="simple" xlink:href="#15.18.TMAX|outline" text:style-name="Standard" text:visited-style-name="Standard">TMAX</text:a><text:tab/>212</text:p>
          <text:p text:style-name="P229">15.19 <text:s/><text:a xlink:type="simple" xlink:href="#15.19.TMIN|outline" text:style-name="Standard" text:visited-style-name="Standard">TMIN</text:a><text:tab/>213</text:p>
          <text:p text:style-name="P229">15.20 <text:s/><text:a xlink:type="simple" xlink:href="#15.20.TOF_1|outline" text:style-name="Standard" text:visited-style-name="Standard">TOF_1</text:a><text:tab/>214</text:p>
          <text:p text:style-name="P229">15.21 <text:s/><text:a xlink:type="simple" xlink:href="#15.21.TONOF|outline" text:style-name="Standard" text:visited-style-name="Standard">TONOF</text:a><text:tab/>215</text:p>
          <text:p text:style-name="P229">15.22 <text:s/><text:a xlink:type="simple" xlink:href="#15.22.TP_1|outline" text:style-name="Standard" text:visited-style-name="Standard">TP_1</text:a><text:tab/>215</text:p>
          <text:p text:style-name="P229">15.23 <text:s/><text:a xlink:type="simple" xlink:href="#15.23.TP_1D|outline" text:style-name="Standard" text:visited-style-name="Standard">TP_1D</text:a><text:tab/>216</text:p>
          <text:p text:style-name="P229">15.24 <text:s/><text:a xlink:type="simple" xlink:href="#15.24.TP_X|outline" text:style-name="Standard" text:visited-style-name="Standard">TP_X</text:a><text:tab/>217</text:p>
          <text:p text:style-name="P228">16 <text:s/><text:a xlink:type="simple" xlink:href="#16.Logik Bausteine|outline" text:style-name="Standard" text:visited-style-name="Standard">Logik Bausteine</text:a><text:tab/>218</text:p>
          <text:p text:style-name="P229">16.1 <text:s/><text:a xlink:type="simple" xlink:href="#16.1.BCDC_TO_INT|outline" text:style-name="Standard" text:visited-style-name="Standard">BCDC_TO_INT</text:a><text:tab/>218</text:p>
          <text:p text:style-name="P229">16.2 <text:s/><text:a xlink:type="simple" xlink:href="#16.2.BIT_COUNT|outline" text:style-name="Standard" text:visited-style-name="Standard">BIT_COUNT</text:a><text:tab/>218</text:p>
          <text:p text:style-name="P229">16.3 <text:s/><text:a xlink:type="simple" xlink:href="#16.3.BIT_LOAD_B|outline" text:style-name="Standard" text:visited-style-name="Standard">BIT_LOAD_B</text:a><text:tab/>219</text:p>
          <text:p text:style-name="P229">16.4 <text:s/><text:a xlink:type="simple" xlink:href="#16.4.BIT_LOAD_B2|outline" text:style-name="Standard" text:visited-style-name="Standard">BIT_LOAD_B2</text:a><text:tab/>219</text:p>
          <text:p text:style-name="P229">16.5 <text:s/><text:a xlink:type="simple" xlink:href="#16.5.BIT_LOAD_DW|outline" text:style-name="Standard" text:visited-style-name="Standard">BIT_LOAD_DW</text:a><text:tab/>220</text:p>
          <text:p text:style-name="P229">16.6 <text:s/><text:a xlink:type="simple" xlink:href="#16.6.BIT_LOAD_DW2|outline" text:style-name="Standard" text:visited-style-name="Standard">BIT_LOAD_DW2</text:a><text:tab/>220</text:p>
          <text:p text:style-name="P229">16.7 <text:s/><text:a xlink:type="simple" xlink:href="#16.7.BIT_LOAD_W|outline" text:style-name="Standard" text:visited-style-name="Standard">BIT_LOAD_W</text:a><text:tab/>221</text:p>
          <text:p text:style-name="P229">16.8 <text:s/><text:a xlink:type="simple" xlink:href="#16.8.BIT_LOAD_W2|outline" text:style-name="Standard" text:visited-style-name="Standard">BIT_LOAD_W2</text:a><text:tab/>221</text:p>
          <text:p text:style-name="P229">16.9 <text:s/><text:a xlink:type="simple" xlink:href="#16.9.BIT_OF_DWORD|outline" text:style-name="Standard" text:visited-style-name="Standard">BIT_OF_DWORD</text:a><text:tab/>222</text:p>
          <text:p text:style-name="P229">16.10 <text:s/><text:a xlink:type="simple" xlink:href="#16.10.BIT_TOGGLE_B|outline" text:style-name="Standard" text:visited-style-name="Standard">BIT_TOGGLE_B</text:a><text:tab/>222</text:p>
          <text:p text:style-name="P229">16.11 <text:s/><text:a xlink:type="simple" xlink:href="#16.11.BIT_TOGGLE_DW|outline" text:style-name="Standard" text:visited-style-name="Standard">BIT_TOGGLE_DW</text:a><text:tab/>223</text:p>
          <text:p text:style-name="P229">16.12 <text:s/><text:a xlink:type="simple" xlink:href="#16.12.BIT_TOGGLE_W|outline" text:style-name="Standard" text:visited-style-name="Standard">BIT_TOGGLE_W</text:a><text:tab/>223</text:p>
          <text:p text:style-name="P229">16.13 <text:s/><text:a xlink:type="simple" xlink:href="#16.13.BYTE_OF_BIT|outline" text:style-name="Standard" text:visited-style-name="Standard">BYTE_OF_BIT</text:a><text:tab/>224</text:p>
          <text:p text:style-name="P229">16.14 <text:s/><text:a xlink:type="simple" xlink:href="#16.14.BYTE_OF_DWORD|outline" text:style-name="Standard" text:visited-style-name="Standard">BYTE_OF_DWORD</text:a><text:tab/>224</text:p>
          <text:p text:style-name="P229">16.15 <text:s/><text:a xlink:type="simple" xlink:href="#16.15.BYTE_TO_BIT|outline" text:style-name="Standard" text:visited-style-name="Standard">BYTE_TO_BIT</text:a><text:tab/>225</text:p>
          <text:p text:style-name="P229">16.16 <text:s/><text:a xlink:type="simple" xlink:href="#16.16.CHECK_PARITY|outline" text:style-name="Standard" text:visited-style-name="Standard">CHECK_PARITY</text:a><text:tab/>225</text:p>
          <text:p text:style-name="P229">16.17 <text:s/><text:a xlink:type="simple" xlink:href="#16.17.CRC_CHECK|outline" text:style-name="Standard" text:visited-style-name="Standard">CRC_CHECK</text:a><text:tab/>226</text:p>
          <text:p text:style-name="P229">16.18 <text:s/><text:a xlink:type="simple" xlink:href="#16.18.CRC_GEN|outline" text:style-name="Standard" text:visited-style-name="Standard">CRC_GEN</text:a><text:tab/>227</text:p>
          <text:p text:style-name="P229">16.19 <text:s/><text:a xlink:type="simple" xlink:href="#16.19.DEC_2 |outline" text:style-name="Standard" text:visited-style-name="Standard">DEC_2 </text:a><text:tab/>230</text:p>
          <text:p text:style-name="P229">16.20 <text:s/><text:a xlink:type="simple" xlink:href="#16.20.DEC_4|outline" text:style-name="Standard" text:visited-style-name="Standard">DEC_4</text:a><text:tab/>230</text:p>
          <text:p text:style-name="P229">16.21 <text:s/><text:a xlink:type="simple" xlink:href="#16.21.DEC_8|outline" text:style-name="Standard" text:visited-style-name="Standard">DEC_8</text:a><text:tab/>231</text:p>
          <text:p text:style-name="P229">16.22 <text:s/><text:a xlink:type="simple" xlink:href="#16.22.DW_TO_REAL|outline" text:style-name="Standard" text:visited-style-name="Standard">DW_TO_REAL</text:a><text:tab/>233</text:p>
          <text:p text:style-name="P229">16.23 <text:s/><text:a xlink:type="simple" xlink:href="#16.23.DWORD_OF_BYTE|outline" text:style-name="Standard" text:visited-style-name="Standard">DWORD_OF_BYTE</text:a><text:tab/>233</text:p>
          <text:p text:style-name="P229"><text:soft-page-break/>16.24 <text:s/><text:a xlink:type="simple" xlink:href="#16.24.INT_TO_BCDC|outline" text:style-name="Standard" text:visited-style-name="Standard">INT_TO_BCDC</text:a><text:tab/>234</text:p>
          <text:p text:style-name="P229">16.25 <text:s/><text:a xlink:type="simple" xlink:href="#16.25.MATRIX|outline" text:style-name="Standard" text:visited-style-name="Standard">MATRIX</text:a><text:tab/>234</text:p>
          <text:p text:style-name="P229">16.26 <text:s/><text:a xlink:type="simple" xlink:href="#16.26.MUX_2|outline" text:style-name="Standard" text:visited-style-name="Standard">MUX_2</text:a><text:tab/>236</text:p>
          <text:p text:style-name="P229">16.27 <text:s/><text:a xlink:type="simple" xlink:href="#16.27.MUX_4|outline" text:style-name="Standard" text:visited-style-name="Standard">MUX_4</text:a><text:tab/>237</text:p>
          <text:p text:style-name="P229">16.28 <text:s/><text:a xlink:type="simple" xlink:href="#16.28.PARITY|outline" text:style-name="Standard" text:visited-style-name="Standard">PARITY</text:a><text:tab/>238</text:p>
          <text:p text:style-name="P229">16.29 <text:s/><text:a xlink:type="simple" xlink:href="#16.29.PIN_CODE|outline" text:style-name="Standard" text:visited-style-name="Standard">PIN_CODE</text:a><text:tab/>238</text:p>
          <text:p text:style-name="P229">16.30 <text:s/><text:a xlink:type="simple" xlink:href="#16.30.REAL_TO_DW|outline" text:style-name="Standard" text:visited-style-name="Standard">REAL_TO_DW</text:a><text:tab/>239</text:p>
          <text:p text:style-name="P229">16.31 <text:s/><text:a xlink:type="simple" xlink:href="#16.31.REVERSE|outline" text:style-name="Standard" text:visited-style-name="Standard">REVERSE</text:a><text:tab/>239</text:p>
          <text:p text:style-name="P229">16.32 <text:s/><text:a xlink:type="simple" xlink:href="#16.32.SHL1|outline" text:style-name="Standard" text:visited-style-name="Standard">SHL1</text:a><text:tab/>240</text:p>
          <text:p text:style-name="P229">16.33 <text:s/><text:a xlink:type="simple" xlink:href="#16.33.SHR1|outline" text:style-name="Standard" text:visited-style-name="Standard">SHR1</text:a><text:tab/>240</text:p>
          <text:p text:style-name="P229">16.34 <text:s/><text:a xlink:type="simple" xlink:href="#16.34.SWAP_BYTE|outline" text:style-name="Standard" text:visited-style-name="Standard">SWAP_BYTE</text:a><text:tab/>241</text:p>
          <text:p text:style-name="P229">16.35 <text:s/><text:a xlink:type="simple" xlink:href="#16.35.SWAP_BYTE2|outline" text:style-name="Standard" text:visited-style-name="Standard">SWAP_BYTE2</text:a><text:tab/>241</text:p>
          <text:p text:style-name="P229">16.36 <text:s/><text:a xlink:type="simple" xlink:href="#16.36.WORD_OF_BYTE|outline" text:style-name="Standard" text:visited-style-name="Standard">WORD_OF_BYTE</text:a><text:tab/>241</text:p>
          <text:p text:style-name="P229">16.37 <text:s/><text:a xlink:type="simple" xlink:href="#16.37.WORD_OF_DWORD|outline" text:style-name="Standard" text:visited-style-name="Standard">WORD_OF_DWORD</text:a><text:tab/>242</text:p>
          <text:p text:style-name="P228">17 <text:s/><text:a xlink:type="simple" xlink:href="#17.Latches, Flip-Flop und Schieberegister|outline" text:style-name="Standard" text:visited-style-name="Standard">Latches, Flip-Flop und Schieberegister</text:a><text:tab/>243</text:p>
          <text:p text:style-name="P229">17.1 <text:s/><text:a xlink:type="simple" xlink:href="#17.1.COUNT_BR|outline" text:style-name="Standard" text:visited-style-name="Standard">COUNT_BR</text:a><text:tab/>243</text:p>
          <text:p text:style-name="P229">17.2 <text:s/><text:a xlink:type="simple" xlink:href="#17.2.COUNT_DR|outline" text:style-name="Standard" text:visited-style-name="Standard">COUNT_DR</text:a><text:tab/>244</text:p>
          <text:p text:style-name="P229">17.3 <text:s/><text:a xlink:type="simple" xlink:href="#17.3.FF_D2E|outline" text:style-name="Standard" text:visited-style-name="Standard">FF_D2E</text:a><text:tab/>245</text:p>
          <text:p text:style-name="P229">17.4 <text:s/><text:a xlink:type="simple" xlink:href="#17.4.FF_D4E|outline" text:style-name="Standard" text:visited-style-name="Standard">FF_D4E</text:a><text:tab/>246</text:p>
          <text:p text:style-name="P229">17.5 <text:s/><text:a xlink:type="simple" xlink:href="#17.5.FF_DRE|outline" text:style-name="Standard" text:visited-style-name="Standard">FF_DRE</text:a><text:tab/>247</text:p>
          <text:p text:style-name="P229">17.6 <text:s/><text:a xlink:type="simple" xlink:href="#17.6.FF_JKE|outline" text:style-name="Standard" text:visited-style-name="Standard">FF_JKE</text:a><text:tab/>248</text:p>
          <text:p text:style-name="P229">17.7 <text:s/><text:a xlink:type="simple" xlink:href="#17.7.FF_RSE|outline" text:style-name="Standard" text:visited-style-name="Standard">FF_RSE</text:a><text:tab/>249</text:p>
          <text:p text:style-name="P229">17.8 <text:s/><text:a xlink:type="simple" xlink:href="#17.8.SELECT_8|outline" text:style-name="Standard" text:visited-style-name="Standard">SELECT_8</text:a><text:tab/>250</text:p>
          <text:p text:style-name="P229">17.9 <text:s/><text:a xlink:type="simple" xlink:href="#17.9.LATCH|outline" text:style-name="Standard" text:visited-style-name="Standard">LATCH</text:a><text:tab/>251</text:p>
          <text:p text:style-name="P229">17.10 <text:s/><text:a xlink:type="simple" xlink:href="#17.10.LATCH4|outline" text:style-name="Standard" text:visited-style-name="Standard">LATCH4</text:a><text:tab/>251</text:p>
          <text:p text:style-name="P229">17.11 <text:s/><text:a xlink:type="simple" xlink:href="#17.11.SHR_4E|outline" text:style-name="Standard" text:visited-style-name="Standard">SHR_4E</text:a><text:tab/>252</text:p>
          <text:p text:style-name="P229">17.12 <text:s/><text:a xlink:type="simple" xlink:href="#17.12.SHR_4UDE|outline" text:style-name="Standard" text:visited-style-name="Standard">SHR_4UDE</text:a><text:tab/>253</text:p>
          <text:p text:style-name="P229">17.13 <text:s/><text:a xlink:type="simple" xlink:href="#17.13.SHR_8PLE|outline" text:style-name="Standard" text:visited-style-name="Standard">SHR_8PLE</text:a><text:tab/>254</text:p>
          <text:p text:style-name="P229">17.14 <text:s/><text:a xlink:type="simple" xlink:href="#17.14.SHR_8UDE|outline" text:style-name="Standard" text:visited-style-name="Standard">SHR_8UDE</text:a><text:tab/>255</text:p>
          <text:p text:style-name="P229">17.15 <text:s/><text:a xlink:type="simple" xlink:href="#17.15.STORE_8|outline" text:style-name="Standard" text:visited-style-name="Standard">STORE_8</text:a><text:tab/>256</text:p>
          <text:p text:style-name="P229">17.16 <text:s/><text:a xlink:type="simple" xlink:href="#17.16.TOGGLE|outline" text:style-name="Standard" text:visited-style-name="Standard">TOGGLE</text:a><text:tab/>257</text:p>
          <text:p text:style-name="P228">18 <text:s/><text:a xlink:type="simple" xlink:href="#18.Signalgeneratoren|outline" text:style-name="Standard" text:visited-style-name="Standard">Signalgeneratoren</text:a><text:tab/>258</text:p>
          <text:p text:style-name="P229">18.1 <text:s/><text:a xlink:type="simple" xlink:href="#18.1._RMP_B|outline" text:style-name="Standard" text:visited-style-name="Standard">_RMP_B</text:a><text:tab/>258</text:p>
          <text:p text:style-name="P229">18.2 <text:s/><text:a xlink:type="simple" xlink:href="#18.2._RMP_NEXT|outline" text:style-name="Standard" text:visited-style-name="Standard">_RMP_NEXT</text:a><text:tab/>258</text:p>
          <text:p text:style-name="P229">18.3 <text:s/><text:a xlink:type="simple" xlink:href="#18.3._RMP_W|outline" text:style-name="Standard" text:visited-style-name="Standard">_RMP_W</text:a><text:tab/>260</text:p>
          <text:p text:style-name="P229">18.4 <text:s/><text:a xlink:type="simple" xlink:href="#18.4.GEN_PULSE|outline" text:style-name="Standard" text:visited-style-name="Standard">GEN_PULSE</text:a><text:tab/>260</text:p>
          <text:p text:style-name="P229">18.5 <text:s/><text:a xlink:type="simple" xlink:href="#18.5.GEN_PW2|outline" text:style-name="Standard" text:visited-style-name="Standard">GEN_PW2</text:a><text:tab/>261</text:p>
          <text:p text:style-name="P229">18.6 <text:s/><text:a xlink:type="simple" xlink:href="#18.6.GEN_RDM|outline" text:style-name="Standard" text:visited-style-name="Standard">GEN_RDM</text:a><text:tab/>262</text:p>
          <text:p text:style-name="P229">18.7 <text:s/><text:a xlink:type="simple" xlink:href="#18.7.GEN_RDT|outline" text:style-name="Standard" text:visited-style-name="Standard">GEN_RDT</text:a><text:tab/>263</text:p>
          <text:p text:style-name="P229">18.8 <text:s/><text:a xlink:type="simple" xlink:href="#18.8.GEN_RMP|outline" text:style-name="Standard" text:visited-style-name="Standard">GEN_RMP</text:a><text:tab/>263</text:p>
          <text:p text:style-name="P229">18.9 <text:s/><text:a xlink:type="simple" xlink:href="#18.9.GEN_SIN|outline" text:style-name="Standard" text:visited-style-name="Standard">GEN_SIN</text:a><text:tab/>264</text:p>
          <text:p text:style-name="P229"><text:soft-page-break/>18.10 <text:s/><text:a xlink:type="simple" xlink:href="#18.10.GEN_SQR|outline" text:style-name="Standard" text:visited-style-name="Standard">GEN_SQR</text:a><text:tab/>266</text:p>
          <text:p text:style-name="P229">18.11 <text:s/><text:a xlink:type="simple" xlink:href="#18.11.PWM_DC|outline" text:style-name="Standard" text:visited-style-name="Standard">PWM_DC</text:a><text:tab/>267</text:p>
          <text:p text:style-name="P229">18.12 <text:s/><text:a xlink:type="simple" xlink:href="#18.12.PWM_PW|outline" text:style-name="Standard" text:visited-style-name="Standard">PWM_PW</text:a><text:tab/>268</text:p>
          <text:p text:style-name="P229">18.13 <text:s/><text:a xlink:type="simple" xlink:href="#18.13.RMP_B|outline" text:style-name="Standard" text:visited-style-name="Standard">RMP_B</text:a><text:tab/>268</text:p>
          <text:p text:style-name="P229">18.14 <text:s/><text:a xlink:type="simple" xlink:href="#18.14.RMP_SOFT|outline" text:style-name="Standard" text:visited-style-name="Standard">RMP_SOFT</text:a><text:tab/>271</text:p>
          <text:p text:style-name="P229">18.15 <text:s/><text:a xlink:type="simple" xlink:href="#18.15.RMP_W|outline" text:style-name="Standard" text:visited-style-name="Standard">RMP_W</text:a><text:tab/>272</text:p>
          <text:p text:style-name="P228">19 <text:s/><text:a xlink:type="simple" xlink:href="#19.Signalverarbeitung|outline" text:style-name="Standard" text:visited-style-name="Standard">Signalverarbeitung</text:a><text:tab/>273</text:p>
          <text:p text:style-name="P229">19.1 <text:s/><text:a xlink:type="simple" xlink:href="#19.1.AIN|outline" text:style-name="Standard" text:visited-style-name="Standard">AIN</text:a><text:tab/>273</text:p>
          <text:p text:style-name="P229">19.2 <text:s/><text:a xlink:type="simple" xlink:href="#19.2.AIN1|outline" text:style-name="Standard" text:visited-style-name="Standard">AIN1</text:a><text:tab/>274</text:p>
          <text:p text:style-name="P229">19.3 <text:s/><text:a xlink:type="simple" xlink:href="#19.3.AOUT|outline" text:style-name="Standard" text:visited-style-name="Standard">AOUT</text:a><text:tab/>276</text:p>
          <text:p text:style-name="P229">19.4 <text:s/><text:a xlink:type="simple" xlink:href="#19.4.AOUT1|outline" text:style-name="Standard" text:visited-style-name="Standard">AOUT1</text:a><text:tab/>277</text:p>
          <text:p text:style-name="P229">19.5 <text:s/><text:a xlink:type="simple" xlink:href="#19.5.BYTE_TO_RANGE|outline" text:style-name="Standard" text:visited-style-name="Standard">BYTE_TO_RANGE</text:a><text:tab/>278</text:p>
          <text:p text:style-name="P229">19.6 <text:s/><text:a xlink:type="simple" xlink:href="#19.6.DELAY|outline" text:style-name="Standard" text:visited-style-name="Standard">DELAY</text:a><text:tab/>278</text:p>
          <text:p text:style-name="P229">19.7 <text:s/><text:a xlink:type="simple" xlink:href="#19.7.DELAY_4|outline" text:style-name="Standard" text:visited-style-name="Standard">DELAY_4</text:a><text:tab/>279</text:p>
          <text:p text:style-name="P229">19.8 <text:s/><text:a xlink:type="simple" xlink:href="#19.8.FADE|outline" text:style-name="Standard" text:visited-style-name="Standard">FADE</text:a><text:tab/>281</text:p>
          <text:p text:style-name="P229">19.9 <text:s/><text:a xlink:type="simple" xlink:href="#19.9.FILTER_DW|outline" text:style-name="Standard" text:visited-style-name="Standard">FILTER_DW</text:a><text:tab/>282</text:p>
          <text:p text:style-name="P229">19.10 <text:s/><text:a xlink:type="simple" xlink:href="#19.10.FILTER_I|outline" text:style-name="Standard" text:visited-style-name="Standard">FILTER_I</text:a><text:tab/>282</text:p>
          <text:p text:style-name="P229">19.11 <text:s/><text:a xlink:type="simple" xlink:href="#19.11.FILTER_MAV_DW|outline" text:style-name="Standard" text:visited-style-name="Standard">FILTER_MAV_DW</text:a><text:tab/>283</text:p>
          <text:p text:style-name="P229">19.12 <text:s/><text:a xlink:type="simple" xlink:href="#19.12.FILTER_MAV_W|outline" text:style-name="Standard" text:visited-style-name="Standard">FILTER_MAV_W</text:a><text:tab/>283</text:p>
          <text:p text:style-name="P229">19.13 <text:s/><text:a xlink:type="simple" xlink:href="#19.13.FILTER_W|outline" text:style-name="Standard" text:visited-style-name="Standard">FILTER_W</text:a><text:tab/>284</text:p>
          <text:p text:style-name="P229">19.14 <text:s/><text:a xlink:type="simple" xlink:href="#19.14.FILTER_WAV|outline" text:style-name="Standard" text:visited-style-name="Standard">FILTER_WAV</text:a><text:tab/>284</text:p>
          <text:p text:style-name="P229">19.15 <text:s/><text:a xlink:type="simple" xlink:href="#19.15.MIX|outline" text:style-name="Standard" text:visited-style-name="Standard">MIX</text:a><text:tab/>285</text:p>
          <text:p text:style-name="P229">19.16 <text:s/><text:a xlink:type="simple" xlink:href="#19.16.MUX_R2|outline" text:style-name="Standard" text:visited-style-name="Standard">MUX_R2</text:a><text:tab/>285</text:p>
          <text:p text:style-name="P229">19.17 <text:s/><text:a xlink:type="simple" xlink:href="#19.17.MUX_R4|outline" text:style-name="Standard" text:visited-style-name="Standard">MUX_R4</text:a><text:tab/>286</text:p>
          <text:p text:style-name="P229">19.18 <text:s/><text:a xlink:type="simple" xlink:href="#19.18.OFFSET|outline" text:style-name="Standard" text:visited-style-name="Standard">OFFSET</text:a><text:tab/>287</text:p>
          <text:p text:style-name="P229">19.19 <text:s/><text:a xlink:type="simple" xlink:href="#19.19.OFFSET2|outline" text:style-name="Standard" text:visited-style-name="Standard">OFFSET2</text:a><text:tab/>288</text:p>
          <text:p text:style-name="P229">19.20 <text:s/><text:a xlink:type="simple" xlink:href="#19.20.OVERRIDE|outline" text:style-name="Standard" text:visited-style-name="Standard">OVERRIDE</text:a><text:tab/>289</text:p>
          <text:p text:style-name="P229">19.21 <text:s/><text:a xlink:type="simple" xlink:href="#19.21.RANGE_TO_BYTE|outline" text:style-name="Standard" text:visited-style-name="Standard">RANGE_TO_BYTE</text:a><text:tab/>290</text:p>
          <text:p text:style-name="P229">19.22 <text:s/><text:a xlink:type="simple" xlink:href="#19.22.RANGE_TO_WORD|outline" text:style-name="Standard" text:visited-style-name="Standard">RANGE_TO_WORD</text:a><text:tab/>291</text:p>
          <text:p text:style-name="P229">19.23 <text:s/><text:a xlink:type="simple" xlink:href="#19.23.SCALE|outline" text:style-name="Standard" text:visited-style-name="Standard">SCALE</text:a><text:tab/>291</text:p>
          <text:p text:style-name="P229">19.24 <text:s/><text:a xlink:type="simple" xlink:href="#19.24.SCALE_B|outline" text:style-name="Standard" text:visited-style-name="Standard">SCALE_B</text:a><text:tab/>292</text:p>
          <text:p text:style-name="P229">19.25 <text:s/><text:a xlink:type="simple" xlink:href="#19.25.SCALE_B2|outline" text:style-name="Standard" text:visited-style-name="Standard">SCALE_B2</text:a><text:tab/>292</text:p>
          <text:p text:style-name="P229">19.26 <text:s/><text:a xlink:type="simple" xlink:href="#19.26.SCALE_B4|outline" text:style-name="Standard" text:visited-style-name="Standard">SCALE_B4</text:a><text:tab/>294</text:p>
          <text:p text:style-name="P229">19.27 <text:s/><text:a xlink:type="simple" xlink:href="#19.27.SCALE_B8|outline" text:style-name="Standard" text:visited-style-name="Standard">SCALE_B8</text:a><text:tab/>295</text:p>
          <text:p text:style-name="P229">19.28 <text:s/><text:a xlink:type="simple" xlink:href="#19.28.SCALE_D|outline" text:style-name="Standard" text:visited-style-name="Standard">SCALE_D</text:a><text:tab/>296</text:p>
          <text:p text:style-name="P229">19.29 <text:s/><text:a xlink:type="simple" xlink:href="#19.29.SCALE_R|outline" text:style-name="Standard" text:visited-style-name="Standard">SCALE_R</text:a><text:tab/>297</text:p>
          <text:p text:style-name="P229">19.30 <text:s/><text:a xlink:type="simple" xlink:href="#19.30.SCALE_X2|outline" text:style-name="Standard" text:visited-style-name="Standard">SCALE_X2</text:a><text:tab/>298</text:p>
          <text:p text:style-name="P229">19.31 <text:s/><text:a xlink:type="simple" xlink:href="#19.31.SCALE_X4|outline" text:style-name="Standard" text:visited-style-name="Standard">SCALE_X4</text:a><text:tab/>299</text:p>
          <text:p text:style-name="P229">19.32 <text:s/><text:a xlink:type="simple" xlink:href="#19.32.SCALE_X8|outline" text:style-name="Standard" text:visited-style-name="Standard">SCALE_X8</text:a><text:tab/>299</text:p>
          <text:p text:style-name="P229">19.33 <text:s/><text:a xlink:type="simple" xlink:href="#19.33.SEL2_OF_3|outline" text:style-name="Standard" text:visited-style-name="Standard">SEL2_OF_3</text:a><text:tab/>300</text:p>
          <text:p text:style-name="P229">19.34 <text:s/><text:a xlink:type="simple" xlink:href="#19.34.SEL2_OF_3B|outline" text:style-name="Standard" text:visited-style-name="Standard">SEL2_OF_3B</text:a><text:tab/>301</text:p>
          <text:p text:style-name="P229">19.35 <text:s/><text:a xlink:type="simple" xlink:href="#19.35.SH|outline" text:style-name="Standard" text:visited-style-name="Standard">SH</text:a><text:tab/>302</text:p>
          <text:p text:style-name="P229">19.36 <text:s/><text:a xlink:type="simple" xlink:href="#19.36.SH_1|outline" text:style-name="Standard" text:visited-style-name="Standard">SH_1</text:a><text:tab/>303</text:p>
          <text:p text:style-name="P229"><text:soft-page-break/>19.37 <text:s/><text:a xlink:type="simple" xlink:href="#19.37.SH_2|outline" text:style-name="Standard" text:visited-style-name="Standard">SH_2</text:a><text:tab/>304</text:p>
          <text:p text:style-name="P229">19.38 <text:s/><text:a xlink:type="simple" xlink:href="#19.38.SH_T|outline" text:style-name="Standard" text:visited-style-name="Standard">SH_T</text:a><text:tab/>305</text:p>
          <text:p text:style-name="P229">19.39 <text:s/><text:a xlink:type="simple" xlink:href="#19.39.STAIR|outline" text:style-name="Standard" text:visited-style-name="Standard">STAIR</text:a><text:tab/>306</text:p>
          <text:p text:style-name="P229">19.40 <text:s/><text:a xlink:type="simple" xlink:href="#19.40.STAIR2|outline" text:style-name="Standard" text:visited-style-name="Standard">STAIR2</text:a><text:tab/>307</text:p>
          <text:p text:style-name="P229">19.41 <text:s/><text:a xlink:type="simple" xlink:href="#19.41.TREND_DW|outline" text:style-name="Standard" text:visited-style-name="Standard">TREND_DW</text:a><text:tab/>309</text:p>
          <text:p text:style-name="P229">19.42 <text:s/><text:a xlink:type="simple" xlink:href="#19.42.WORD_TO_RANGE|outline" text:style-name="Standard" text:visited-style-name="Standard">WORD_TO_RANGE</text:a><text:tab/>309</text:p>
          <text:p text:style-name="P228">20 <text:s/><text:a xlink:type="simple" xlink:href="#20.Sensorik|outline" text:style-name="Standard" text:visited-style-name="Standard">Sensorik</text:a><text:tab/>310</text:p>
          <text:p text:style-name="P229">20.1 <text:s/><text:a xlink:type="simple" xlink:href="#20.1.MULTI_IN|outline" text:style-name="Standard" text:visited-style-name="Standard">MULTI_IN</text:a><text:tab/>310</text:p>
          <text:p text:style-name="P229">20.2 <text:s/><text:a xlink:type="simple" xlink:href="#20.2.RES_NI|outline" text:style-name="Standard" text:visited-style-name="Standard">RES_NI</text:a><text:tab/>311</text:p>
          <text:p text:style-name="P229">20.3 <text:s/><text:a xlink:type="simple" xlink:href="#20.3.RES_NTC|outline" text:style-name="Standard" text:visited-style-name="Standard">RES_NTC</text:a><text:tab/>312</text:p>
          <text:p text:style-name="P229">20.4 <text:s/><text:a xlink:type="simple" xlink:href="#20.4.RES_PT|outline" text:style-name="Standard" text:visited-style-name="Standard">RES_PT</text:a><text:tab/>313</text:p>
          <text:p text:style-name="P229">20.5 <text:s/><text:a xlink:type="simple" xlink:href="#20.5.RES_SI|outline" text:style-name="Standard" text:visited-style-name="Standard">RES_SI</text:a><text:tab/>314</text:p>
          <text:p text:style-name="P229">20.6 <text:s/><text:a xlink:type="simple" xlink:href="#20.6.SENSOR_INT|outline" text:style-name="Standard" text:visited-style-name="Standard">SENSOR_INT</text:a><text:tab/>314</text:p>
          <text:p text:style-name="P229">20.7 <text:s/><text:a xlink:type="simple" xlink:href="#20.7.TEMP_NI|outline" text:style-name="Standard" text:visited-style-name="Standard">TEMP_NI</text:a><text:tab/>315</text:p>
          <text:p text:style-name="P229">20.8 <text:s/><text:a xlink:type="simple" xlink:href="#20.8.TEMP_NTC|outline" text:style-name="Standard" text:visited-style-name="Standard">TEMP_NTC</text:a><text:tab/>316</text:p>
          <text:p text:style-name="P229">20.9 <text:s/><text:a xlink:type="simple" xlink:href="#20.9.TEMP_PT|outline" text:style-name="Standard" text:visited-style-name="Standard">TEMP_PT</text:a><text:tab/>317</text:p>
          <text:p text:style-name="P229">20.10 <text:s/><text:a xlink:type="simple" xlink:href="#20.10.TEMP_SI|outline" text:style-name="Standard" text:visited-style-name="Standard">TEMP_SI</text:a><text:tab/>318</text:p>
          <text:p text:style-name="P228">21 <text:s/><text:a xlink:type="simple" xlink:href="#21.Messbausteine|outline" text:style-name="Standard" text:visited-style-name="Standard">Messbausteine</text:a><text:tab/>319</text:p>
          <text:p text:style-name="P229">21.1 <text:s/><text:a xlink:type="simple" xlink:href="#21.1.ALARM_2|outline" text:style-name="Standard" text:visited-style-name="Standard">ALARM_2</text:a><text:tab/>319</text:p>
          <text:p text:style-name="P229">21.2 <text:s/><text:a xlink:type="simple" xlink:href="#21.2.BAR_GRAPH|outline" text:style-name="Standard" text:visited-style-name="Standard">BAR_GRAPH</text:a><text:tab/>320</text:p>
          <text:p text:style-name="P229">21.3 <text:s/><text:a xlink:type="simple" xlink:href="#21.3.CALIBRATE|outline" text:style-name="Standard" text:visited-style-name="Standard">CALIBRATE</text:a><text:tab/>322</text:p>
          <text:p text:style-name="P229">21.4 <text:s/><text:a xlink:type="simple" xlink:href="#21.4.CYCLE_TIME|outline" text:style-name="Standard" text:visited-style-name="Standard">CYCLE_TIME</text:a><text:tab/>323</text:p>
          <text:p text:style-name="P229">21.5 <text:s/><text:a xlink:type="simple" xlink:href="#21.5.DT_SIMU|outline" text:style-name="Standard" text:visited-style-name="Standard">DT_SIMU</text:a><text:tab/>323</text:p>
          <text:p text:style-name="P229">21.6 <text:s/><text:a xlink:type="simple" xlink:href="#21.6.METER|outline" text:style-name="Standard" text:visited-style-name="Standard">METER</text:a><text:tab/>324</text:p>
          <text:p text:style-name="P229">21.7 <text:s/><text:a xlink:type="simple" xlink:href="#21.7.METER_STAT|outline" text:style-name="Standard" text:visited-style-name="Standard">METER_STAT</text:a><text:tab/>326</text:p>
          <text:p text:style-name="P229">21.8 <text:s/><text:a xlink:type="simple" xlink:href="#21.8.M_D|outline" text:style-name="Standard" text:visited-style-name="Standard">M_D</text:a><text:tab/>327</text:p>
          <text:p text:style-name="P229">21.9 <text:s/><text:a xlink:type="simple" xlink:href="#21.9.M_T|outline" text:style-name="Standard" text:visited-style-name="Standard">M_T</text:a><text:tab/>327</text:p>
          <text:p text:style-name="P229">21.10 <text:s/><text:a xlink:type="simple" xlink:href="#21.10.M_TX|outline" text:style-name="Standard" text:visited-style-name="Standard">M_TX</text:a><text:tab/>328</text:p>
          <text:p text:style-name="P229">21.11 <text:s/><text:a xlink:type="simple" xlink:href="#21.11.ONTIME|outline" text:style-name="Standard" text:visited-style-name="Standard">ONTIME</text:a><text:tab/>329</text:p>
          <text:p text:style-name="P229">21.12 <text:s/><text:a xlink:type="simple" xlink:href="#21.12.T_PLC_MS|outline" text:style-name="Standard" text:visited-style-name="Standard">T_PLC_MS</text:a><text:tab/>331</text:p>
          <text:p text:style-name="P229">21.13 <text:s/><text:a xlink:type="simple" xlink:href="#21.13.T_PLC_US|outline" text:style-name="Standard" text:visited-style-name="Standard">T_PLC_US</text:a><text:tab/>332</text:p>
          <text:p text:style-name="P229">21.14 <text:s/><text:a xlink:type="simple" xlink:href="#21.14.TC_MS|outline" text:style-name="Standard" text:visited-style-name="Standard">TC_MS</text:a><text:tab/>334</text:p>
          <text:p text:style-name="P229">21.15 <text:s/><text:a xlink:type="simple" xlink:href="#21.15.TC_S|outline" text:style-name="Standard" text:visited-style-name="Standard">TC_S</text:a><text:tab/>334</text:p>
          <text:p text:style-name="P229">21.16 <text:s/><text:a xlink:type="simple" xlink:href="#21.16.TC_US|outline" text:style-name="Standard" text:visited-style-name="Standard">TC_US</text:a><text:tab/>335</text:p>
          <text:p text:style-name="P228">22 <text:s/><text:a xlink:type="simple" xlink:href="#22.Umrechnungen|outline" text:style-name="Standard" text:visited-style-name="Standard">Umrechnungen</text:a><text:tab/>336</text:p>
          <text:p text:style-name="P229">22.1 <text:s/><text:a xlink:type="simple" xlink:href="#22.1.ASTRO|outline" text:style-name="Standard" text:visited-style-name="Standard">ASTRO</text:a><text:tab/>336</text:p>
          <text:p text:style-name="P229">22.2 <text:s/><text:a xlink:type="simple" xlink:href="#22.2.BFT_TO_MS|outline" text:style-name="Standard" text:visited-style-name="Standard">BFT_TO_MS</text:a><text:tab/>337</text:p>
          <text:p text:style-name="P229">22.3 <text:s/><text:a xlink:type="simple" xlink:href="#22.3.C_TO_F|outline" text:style-name="Standard" text:visited-style-name="Standard">C_TO_F</text:a><text:tab/>337</text:p>
          <text:p text:style-name="P229">22.4 <text:s/><text:a xlink:type="simple" xlink:href="#22.4.C_TO_K|outline" text:style-name="Standard" text:visited-style-name="Standard">C_TO_K</text:a><text:tab/>337</text:p>
          <text:p text:style-name="P229"><text:soft-page-break/>22.5 <text:s/><text:a xlink:type="simple" xlink:href="#22.5.DEG_TO_DIR|outline" text:style-name="Standard" text:visited-style-name="Standard">DEG_TO_DIR</text:a><text:tab/>338</text:p>
          <text:p text:style-name="P229">22.6 <text:s/><text:a xlink:type="simple" xlink:href="#22.6.DIR_TO_DEG|outline" text:style-name="Standard" text:visited-style-name="Standard">DIR_TO_DEG</text:a><text:tab/>338</text:p>
          <text:p text:style-name="P229">22.7 <text:s/><text:a xlink:type="simple" xlink:href="#22.7.ENERGY|outline" text:style-name="Standard" text:visited-style-name="Standard">ENERGY</text:a><text:tab/>339</text:p>
          <text:p text:style-name="P229">22.8 <text:s/><text:a xlink:type="simple" xlink:href="#22.8.F_TO_C|outline" text:style-name="Standard" text:visited-style-name="Standard">F_TO_C</text:a><text:tab/>340</text:p>
          <text:p text:style-name="P229">22.9 <text:s/><text:a xlink:type="simple" xlink:href="#22.9.F_TO_OM|outline" text:style-name="Standard" text:visited-style-name="Standard">F_TO_OM</text:a><text:tab/>340</text:p>
          <text:p text:style-name="P229">22.10 <text:s/><text:a xlink:type="simple" xlink:href="#22.10.F_TO_PT|outline" text:style-name="Standard" text:visited-style-name="Standard">F_TO_PT</text:a><text:tab/>340</text:p>
          <text:p text:style-name="P229">22.11 <text:s/><text:a xlink:type="simple" xlink:href="#22.11.KMH_TO_MS|outline" text:style-name="Standard" text:visited-style-name="Standard">KMH_TO_MS</text:a><text:tab/>341</text:p>
          <text:p text:style-name="P229">22.12 <text:s/><text:a xlink:type="simple" xlink:href="#22.12.LENGTH|outline" text:style-name="Standard" text:visited-style-name="Standard">LENGTH</text:a><text:tab/>341</text:p>
          <text:p text:style-name="P229">22.13 <text:s/><text:a xlink:type="simple" xlink:href="#22.13.MS_TO_BFT|outline" text:style-name="Standard" text:visited-style-name="Standard">MS_TO_BFT</text:a><text:tab/>342</text:p>
          <text:p text:style-name="P229">22.14 <text:s/><text:a xlink:type="simple" xlink:href="#22.14.MS_TO_KMH|outline" text:style-name="Standard" text:visited-style-name="Standard">MS_TO_KMH</text:a><text:tab/>343</text:p>
          <text:p text:style-name="P229">22.15 <text:s/><text:a xlink:type="simple" xlink:href="#22.15.K_TO_C|outline" text:style-name="Standard" text:visited-style-name="Standard">K_TO_C</text:a><text:tab/>343</text:p>
          <text:p text:style-name="P229">22.16 <text:s/><text:a xlink:type="simple" xlink:href="#22.16.OM_TO_F|outline" text:style-name="Standard" text:visited-style-name="Standard">OM_TO_F</text:a><text:tab/>343</text:p>
          <text:p text:style-name="P229">22.17 <text:s/><text:a xlink:type="simple" xlink:href="#22.17.PRESSURE|outline" text:style-name="Standard" text:visited-style-name="Standard">PRESSURE</text:a><text:tab/>344</text:p>
          <text:p text:style-name="P229">22.18 <text:s/><text:a xlink:type="simple" xlink:href="#22.18.PT_TO_F|outline" text:style-name="Standard" text:visited-style-name="Standard">PT_TO_F</text:a><text:tab/>345</text:p>
          <text:p text:style-name="P229">22.19 <text:s/><text:a xlink:type="simple" xlink:href="#22.19.SPEED|outline" text:style-name="Standard" text:visited-style-name="Standard">SPEED</text:a><text:tab/>345</text:p>
          <text:p text:style-name="P229">22.20 <text:s/><text:a xlink:type="simple" xlink:href="#22.20.TEMPERATURE|outline" text:style-name="Standard" text:visited-style-name="Standard">TEMPERATURE</text:a><text:tab/>346</text:p>
          <text:p text:style-name="P228">23 <text:s/><text:a xlink:type="simple" xlink:href="#23.Regelungstechnik|outline" text:style-name="Standard" text:visited-style-name="Standard">Regelungstechnik</text:a><text:tab/>347</text:p>
          <text:p text:style-name="P229">23.1 <text:s/><text:a xlink:type="simple" xlink:href="#23.1.Einleitung|outline" text:style-name="Standard" text:visited-style-name="Standard">Einleitung</text:a><text:tab/>347</text:p>
          <text:p text:style-name="P229">23.2 <text:s/><text:a xlink:type="simple" xlink:href="#23.2.BAND_B|outline" text:style-name="Standard" text:visited-style-name="Standard">BAND_B</text:a><text:tab/>348</text:p>
          <text:p text:style-name="P229">23.3 <text:s/><text:a xlink:type="simple" xlink:href="#23.3.CONTROL_SET1|outline" text:style-name="Standard" text:visited-style-name="Standard">CONTROL_SET1</text:a><text:tab/>349</text:p>
          <text:p text:style-name="P229">23.4 <text:s/><text:a xlink:type="simple" xlink:href="#23.4.CONTROL_SET2|outline" text:style-name="Standard" text:visited-style-name="Standard">CONTROL_SET2</text:a><text:tab/>350</text:p>
          <text:p text:style-name="P229">23.5 <text:s/><text:a xlink:type="simple" xlink:href="#23.5.CTRL_IN|outline" text:style-name="Standard" text:visited-style-name="Standard">CTRL_IN</text:a><text:tab/>352</text:p>
          <text:p text:style-name="P229">23.6 <text:s/><text:a xlink:type="simple" xlink:href="#23.6.CTRL_OUT|outline" text:style-name="Standard" text:visited-style-name="Standard">CTRL_OUT</text:a><text:tab/>352</text:p>
          <text:p text:style-name="P229">23.7 <text:s/><text:a xlink:type="simple" xlink:href="#23.7.CTRL_PI|outline" text:style-name="Standard" text:visited-style-name="Standard">CTRL_PI</text:a><text:tab/>353</text:p>
          <text:p text:style-name="P229">23.8 <text:s/><text:a xlink:type="simple" xlink:href="#23.8.CTRL_PID|outline" text:style-name="Standard" text:visited-style-name="Standard">CTRL_PID</text:a><text:tab/>355</text:p>
          <text:p text:style-name="P229">23.9 <text:s/><text:a xlink:type="simple" xlink:href="#23.9.CTRL_PWM|outline" text:style-name="Standard" text:visited-style-name="Standard">CTRL_PWM</text:a><text:tab/>358</text:p>
          <text:p text:style-name="P229">23.10 <text:s/><text:a xlink:type="simple" xlink:href="#23.10.DEAD_BAND|outline" text:style-name="Standard" text:visited-style-name="Standard">DEAD_BAND</text:a><text:tab/>359</text:p>
          <text:p text:style-name="P229">23.11 <text:s/><text:a xlink:type="simple" xlink:href="#23.11.DEAD_BAND_A|outline" text:style-name="Standard" text:visited-style-name="Standard">DEAD_BAND_A</text:a><text:tab/>360</text:p>
          <text:p text:style-name="P229">23.12 <text:s/><text:a xlink:type="simple" xlink:href="#23.12.DEAD_ZONE|outline" text:style-name="Standard" text:visited-style-name="Standard">DEAD_ZONE</text:a><text:tab/>361</text:p>
          <text:p text:style-name="P229">23.13 <text:s/><text:a xlink:type="simple" xlink:href="#23.13.DEAD_ZONE2|outline" text:style-name="Standard" text:visited-style-name="Standard">DEAD_ZONE2</text:a><text:tab/>361</text:p>
          <text:p text:style-name="P229">23.14 <text:s/><text:a xlink:type="simple" xlink:href="#23.14.FT_DERIV|outline" text:style-name="Standard" text:visited-style-name="Standard">FT_DERIV</text:a><text:tab/>362</text:p>
          <text:p text:style-name="P229">23.15 <text:s/><text:a xlink:type="simple" xlink:href="#23.15.FT_IMP|outline" text:style-name="Standard" text:visited-style-name="Standard">FT_IMP</text:a><text:tab/>363</text:p>
          <text:p text:style-name="P229">23.16 <text:s/><text:a xlink:type="simple" xlink:href="#23.16.FT_INT|outline" text:style-name="Standard" text:visited-style-name="Standard">FT_INT</text:a><text:tab/>364</text:p>
          <text:p text:style-name="P229">23.17 <text:s/><text:a xlink:type="simple" xlink:href="#23.17.FT_INT2|outline" text:style-name="Standard" text:visited-style-name="Standard">FT_INT2</text:a><text:tab/>365</text:p>
          <text:p text:style-name="P229">23.18 <text:s/><text:a xlink:type="simple" xlink:href="#23.18.FT_PD|outline" text:style-name="Standard" text:visited-style-name="Standard">FT_PD</text:a><text:tab/>366</text:p>
          <text:p text:style-name="P229">23.19 <text:s/><text:a xlink:type="simple" xlink:href="#23.19.FT_PDT1|outline" text:style-name="Standard" text:visited-style-name="Standard">FT_PDT1</text:a><text:tab/>366</text:p>
          <text:p text:style-name="P229">23.20 <text:s/><text:a xlink:type="simple" xlink:href="#23.20.FT_PI|outline" text:style-name="Standard" text:visited-style-name="Standard">FT_PI</text:a><text:tab/>367</text:p>
          <text:p text:style-name="P229">23.21 <text:s/><text:a xlink:type="simple" xlink:href="#23.21.FT_PID|outline" text:style-name="Standard" text:visited-style-name="Standard">FT_PID</text:a><text:tab/>369</text:p>
          <text:p text:style-name="P229">23.22 <text:s/><text:a xlink:type="simple" xlink:href="#23.22.FT_PIDW|outline" text:style-name="Standard" text:visited-style-name="Standard">FT_PIDW</text:a><text:tab/>371</text:p>
          <text:p text:style-name="P229">23.23 <text:s/><text:a xlink:type="simple" xlink:href="#23.23.FT_PIDWL|outline" text:style-name="Standard" text:visited-style-name="Standard">FT_PIDWL</text:a><text:tab/>372</text:p>
          <text:p text:style-name="P229">23.24 <text:s/><text:a xlink:type="simple" xlink:href="#23.24.FT_PIW|outline" text:style-name="Standard" text:visited-style-name="Standard">FT_PIW</text:a><text:tab/>374</text:p>
          <text:p text:style-name="P229">23.25 <text:s/><text:a xlink:type="simple" xlink:href="#23.25.FT_PIWL|outline" text:style-name="Standard" text:visited-style-name="Standard">FT_PIWL</text:a><text:tab/>375</text:p>
          <text:p text:style-name="P229">23.26 <text:s/><text:a xlink:type="simple" xlink:href="#23.26.FT_PT1|outline" text:style-name="Standard" text:visited-style-name="Standard">FT_PT1</text:a><text:tab/>377</text:p>
          <text:p text:style-name="P229"><text:soft-page-break/>23.27 <text:s/><text:a xlink:type="simple" xlink:href="#23.27.FT_PT2|outline" text:style-name="Standard" text:visited-style-name="Standard">FT_PT2</text:a><text:tab/>378</text:p>
          <text:p text:style-name="P229">23.28 <text:s/><text:a xlink:type="simple" xlink:href="#23.28.FT_TN16|outline" text:style-name="Standard" text:visited-style-name="Standard">FT_TN16</text:a><text:tab/>379</text:p>
          <text:p text:style-name="P229">23.29 <text:s/><text:a xlink:type="simple" xlink:href="#23.29.FT_TN64|outline" text:style-name="Standard" text:visited-style-name="Standard">FT_TN64</text:a><text:tab/>380</text:p>
          <text:p text:style-name="P229">23.30 <text:s/><text:a xlink:type="simple" xlink:href="#23.30.FT_TN8|outline" text:style-name="Standard" text:visited-style-name="Standard">FT_TN8</text:a><text:tab/>381</text:p>
          <text:p text:style-name="P229">23.31 <text:s/><text:a xlink:type="simple" xlink:href="#23.31.HYST|outline" text:style-name="Standard" text:visited-style-name="Standard">HYST</text:a><text:tab/>381</text:p>
          <text:p text:style-name="P229">23.32 <text:s/><text:a xlink:type="simple" xlink:href="#23.32.HYST_1|outline" text:style-name="Standard" text:visited-style-name="Standard">HYST_1</text:a><text:tab/>383</text:p>
          <text:p text:style-name="P229">23.33 <text:s/><text:a xlink:type="simple" xlink:href="#23.33.HYST_2|outline" text:style-name="Standard" text:visited-style-name="Standard">HYST_2</text:a><text:tab/>384</text:p>
          <text:p text:style-name="P229">23.34 <text:s/><text:a xlink:type="simple" xlink:href="#23.34.HYST_3|outline" text:style-name="Standard" text:visited-style-name="Standard">HYST_3</text:a><text:tab/>385</text:p>
          <text:p text:style-name="P229">23.35 <text:s/><text:a xlink:type="simple" xlink:href="#23.35.INTEGRATE|outline" text:style-name="Standard" text:visited-style-name="Standard">INTEGRATE</text:a><text:tab/>386</text:p>
          <text:p text:style-name="P228">24 <text:s/><text:a xlink:type="simple" xlink:href="#24.Stellglieder|outline" text:style-name="Standard" text:visited-style-name="Standard">Stellglieder</text:a><text:tab/>387</text:p>
          <text:p text:style-name="P229">24.1 <text:s/><text:a xlink:type="simple" xlink:href="#24.1.ACTUATOR_2P|outline" text:style-name="Standard" text:visited-style-name="Standard">ACTUATOR_2P</text:a><text:tab/>387</text:p>
          <text:p text:style-name="P229">24.2 <text:s/><text:a xlink:type="simple" xlink:href="#24.2.ACTUATOR_3P|outline" text:style-name="Standard" text:visited-style-name="Standard">ACTUATOR_3P</text:a><text:tab/>388</text:p>
          <text:p text:style-name="P229">24.3 <text:s/><text:a xlink:type="simple" xlink:href="#24.3.ACTUATOR_A|outline" text:style-name="Standard" text:visited-style-name="Standard">ACTUATOR_A</text:a><text:tab/>390</text:p>
          <text:p text:style-name="P229">24.4 <text:s/><text:a xlink:type="simple" xlink:href="#24.4.ACTUATOR_COIL|outline" text:style-name="Standard" text:visited-style-name="Standard">ACTUATOR_COIL</text:a><text:tab/>391</text:p>
          <text:p text:style-name="P229">24.5 <text:s/><text:a xlink:type="simple" xlink:href="#24.5.ACTUATOR_PUMP|outline" text:style-name="Standard" text:visited-style-name="Standard">ACTUATOR_PUMP</text:a><text:tab/>392</text:p>
          <text:p text:style-name="P229">24.6 <text:s/><text:a xlink:type="simple" xlink:href="#24.6.ACTUATOR_UD|outline" text:style-name="Standard" text:visited-style-name="Standard">ACTUATOR_UD</text:a><text:tab/>393</text:p>
          <text:p text:style-name="P229">24.7 <text:s/><text:a xlink:type="simple" xlink:href="#24.7.AUTORUN|outline" text:style-name="Standard" text:visited-style-name="Standard">AUTORUN</text:a><text:tab/>394</text:p>
          <text:p text:style-name="P228">25 <text:s/><text:a xlink:type="simple" xlink:href="#25.Heizung Lüftung und Klima|outline" text:style-name="Standard" text:visited-style-name="Standard">Heizung Lüftung und Klima</text:a><text:tab/>397</text:p>
          <text:p text:style-name="P229">25.1 <text:s/><text:a xlink:type="simple" xlink:href="#25.1.AIR_DENSITY|outline" text:style-name="Standard" text:visited-style-name="Standard">AIR_DENSITY</text:a><text:tab/>397</text:p>
          <text:p text:style-name="P229">25.2 <text:s/><text:a xlink:type="simple" xlink:href="#25.2.AIR_ENTHALPY|outline" text:style-name="Standard" text:visited-style-name="Standard">AIR_ENTHALPY</text:a><text:tab/>397</text:p>
          <text:p text:style-name="P229">25.3 <text:s/><text:a xlink:type="simple" xlink:href="#25.3.BOILER|outline" text:style-name="Standard" text:visited-style-name="Standard">BOILER</text:a><text:tab/>398</text:p>
          <text:p text:style-name="P229">25.4 <text:s/><text:a xlink:type="simple" xlink:href="#25.4.BURNER|outline" text:style-name="Standard" text:visited-style-name="Standard">BURNER</text:a><text:tab/>400</text:p>
          <text:p text:style-name="P229">25.5 <text:s/><text:a xlink:type="simple" xlink:href="#25.5.DEW_CON|outline" text:style-name="Standard" text:visited-style-name="Standard">DEW_CON</text:a><text:tab/>404</text:p>
          <text:p text:style-name="P229">25.6 <text:s/><text:a xlink:type="simple" xlink:href="#25.6.DEW_RH|outline" text:style-name="Standard" text:visited-style-name="Standard">DEW_RH</text:a><text:tab/>405</text:p>
          <text:p text:style-name="P229">25.7 <text:s/><text:a xlink:type="simple" xlink:href="#25.7.DEW_TEMP|outline" text:style-name="Standard" text:visited-style-name="Standard">DEW_TEMP</text:a><text:tab/>405</text:p>
          <text:p text:style-name="P229">25.8 <text:s/><text:a xlink:type="simple" xlink:href="#25.8.HEAT_INDEX|outline" text:style-name="Standard" text:visited-style-name="Standard">HEAT_INDEX</text:a><text:tab/>406</text:p>
          <text:p text:style-name="P229">25.9 <text:s/><text:a xlink:type="simple" xlink:href="#25.9.HEAT_METER|outline" text:style-name="Standard" text:visited-style-name="Standard">HEAT_METER</text:a><text:tab/>406</text:p>
          <text:p text:style-name="P229">25.10 <text:s/><text:a xlink:type="simple" xlink:href="#25.10.HEAT_TEMP|outline" text:style-name="Standard" text:visited-style-name="Standard">HEAT_TEMP</text:a><text:tab/>408</text:p>
          <text:p text:style-name="P229">25.11 <text:s/><text:a xlink:type="simple" xlink:href="#25.11.LEGIONELLA|outline" text:style-name="Standard" text:visited-style-name="Standard">LEGIONELLA</text:a><text:tab/>410</text:p>
          <text:p text:style-name="P229">25.12 <text:s/><text:a xlink:type="simple" xlink:href="#25.12.SDD|outline" text:style-name="Standard" text:visited-style-name="Standard">SDD</text:a><text:tab/>413</text:p>
          <text:p text:style-name="P229">25.13 <text:s/><text:a xlink:type="simple" xlink:href="#25.13.T_AVG24|outline" text:style-name="Standard" text:visited-style-name="Standard">T_AVG24</text:a><text:tab/>414</text:p>
          <text:p text:style-name="P229">25.14 <text:s/><text:a xlink:type="simple" xlink:href="#25.14.TEMP_EXT|outline" text:style-name="Standard" text:visited-style-name="Standard">TEMP_EXT</text:a><text:tab/>415</text:p>
          <text:p text:style-name="P229">25.15 <text:s/><text:a xlink:type="simple" xlink:href="#25.15.WATER_CP|outline" text:style-name="Standard" text:visited-style-name="Standard">WATER_CP</text:a><text:tab/>416</text:p>
          <text:p text:style-name="P229">25.16 <text:s/><text:a xlink:type="simple" xlink:href="#25.16.WATER_DENSITY|outline" text:style-name="Standard" text:visited-style-name="Standard">WATER_DENSITY</text:a><text:tab/>417</text:p>
          <text:p text:style-name="P229">25.17 <text:s/><text:a xlink:type="simple" xlink:href="#25.17.WATER_ENTHALPY|outline" text:style-name="Standard" text:visited-style-name="Standard">WATER_ENTHALPY</text:a><text:tab/>418</text:p>
          <text:p text:style-name="P229">25.18 <text:s/><text:a xlink:type="simple" xlink:href="#25.18.WCT|outline" text:style-name="Standard" text:visited-style-name="Standard">WCT</text:a><text:tab/>418</text:p>
          <text:p text:style-name="P228">26 <text:s/><text:a xlink:type="simple" xlink:href="#26.Elektrotechnik|outline" text:style-name="Standard" text:visited-style-name="Standard">Elektrotechnik</text:a><text:tab/>420</text:p>
          <text:p text:style-name="P229">26.1 <text:s/><text:a xlink:type="simple" xlink:href="#26.1.CLICK|outline" text:style-name="Standard" text:visited-style-name="Standard">CLICK</text:a><text:tab/>420</text:p>
          <text:p text:style-name="P229">26.2 <text:s/><text:a xlink:type="simple" xlink:href="#26.2.CLICK_MODE|outline" text:style-name="Standard" text:visited-style-name="Standard">CLICK_MODE</text:a><text:tab/>422</text:p>
          <text:p text:style-name="P229"><text:soft-page-break/>26.3 <text:s/><text:a xlink:type="simple" xlink:href="#26.3.DEBOUNCE|outline" text:style-name="Standard" text:visited-style-name="Standard">DEBOUNCE</text:a><text:tab/>422</text:p>
          <text:p text:style-name="P229">26.4 <text:s/><text:a xlink:type="simple" xlink:href="#26.4.DIMM_I|outline" text:style-name="Standard" text:visited-style-name="Standard">DIMM_I</text:a><text:tab/>423</text:p>
          <text:p text:style-name="P229">26.5 <text:s/><text:a xlink:type="simple" xlink:href="#26.5.F_LAMP|outline" text:style-name="Standard" text:visited-style-name="Standard">F_LAMP</text:a><text:tab/>425</text:p>
          <text:p text:style-name="P229">26.6 <text:s/><text:a xlink:type="simple" xlink:href="#26.6.PULSE_LENGTH|outline" text:style-name="Standard" text:visited-style-name="Standard">PULSE_LENGTH</text:a><text:tab/>427</text:p>
          <text:p text:style-name="P229">26.7 <text:s/><text:a xlink:type="simple" xlink:href="#26.7.PULSE_T|outline" text:style-name="Standard" text:visited-style-name="Standard">PULSE_T</text:a><text:tab/>427</text:p>
          <text:p text:style-name="P229">26.8 <text:s/><text:a xlink:type="simple" xlink:href="#26.8.SW_RECONFIG|outline" text:style-name="Standard" text:visited-style-name="Standard">SW_RECONFIG</text:a><text:tab/>428</text:p>
          <text:p text:style-name="P229">26.9 <text:s/><text:a xlink:type="simple" xlink:href="#26.9.SWITCH_I|outline" text:style-name="Standard" text:visited-style-name="Standard">SWITCH_I</text:a><text:tab/>429</text:p>
          <text:p text:style-name="P229">26.10 <text:s/><text:a xlink:type="simple" xlink:href="#26.10.SWITCH_X|outline" text:style-name="Standard" text:visited-style-name="Standard">SWITCH_X</text:a><text:tab/>430</text:p>
          <text:p text:style-name="P229">26.11 <text:s/><text:a xlink:type="simple" xlink:href="#26.11.TIMER_1|outline" text:style-name="Standard" text:visited-style-name="Standard">TIMER_1</text:a><text:tab/>431</text:p>
          <text:p text:style-name="P229">26.12 <text:s/><text:a xlink:type="simple" xlink:href="#26.12.TIMER_2|outline" text:style-name="Standard" text:visited-style-name="Standard">TIMER_2</text:a><text:tab/>432</text:p>
          <text:p text:style-name="P229">26.13 <text:s/><text:a xlink:type="simple" xlink:href="#26.13.TIMER_EVENT_DECODE|outline" text:style-name="Standard" text:visited-style-name="Standard">TIMER_EVENT_DECODE</text:a><text:tab/>433</text:p>
          <text:p text:style-name="P229">26.14 <text:s/><text:a xlink:type="simple" xlink:href="#26.14.TIMER_EXT|outline" text:style-name="Standard" text:visited-style-name="Standard">TIMER_EXT</text:a><text:tab/>434</text:p>
          <text:p text:style-name="P229">26.15 <text:s/><text:a xlink:type="simple" xlink:href="#26.15.TIMER_P4|outline" text:style-name="Standard" text:visited-style-name="Standard">TIMER_P4</text:a><text:tab/>436</text:p>
          <text:p text:style-name="P228">27 <text:s/><text:a xlink:type="simple" xlink:href="#27.Jalousiesteuerung|outline" text:style-name="Standard" text:visited-style-name="Standard">Jalousiesteuerung</text:a><text:tab/>444</text:p>
          <text:p text:style-name="P229">27.1 <text:s/><text:a xlink:type="simple" xlink:href="#27.1.Einleitung|outline" text:style-name="Standard" text:visited-style-name="Standard">Einleitung</text:a><text:tab/>444</text:p>
          <text:p text:style-name="P229">27.2 <text:s/><text:a xlink:type="simple" xlink:href="#27.2.BLIND_ACTUATOR|outline" text:style-name="Standard" text:visited-style-name="Standard">BLIND_ACTUATOR</text:a><text:tab/>445</text:p>
          <text:p text:style-name="P229">27.3 <text:s/><text:a xlink:type="simple" xlink:href="#27.3.BLIND_CONTROL|outline" text:style-name="Standard" text:visited-style-name="Standard">BLIND_CONTROL</text:a><text:tab/>447</text:p>
          <text:p text:style-name="P229">27.4 <text:s/><text:a xlink:type="simple" xlink:href="#27.4.BLIND_INPUT|outline" text:style-name="Standard" text:visited-style-name="Standard">BLIND_INPUT</text:a><text:tab/>449</text:p>
          <text:p text:style-name="P229">27.5 <text:s/><text:a xlink:type="simple" xlink:href="#27.5.BLIND_NIGHT|outline" text:style-name="Standard" text:visited-style-name="Standard">BLIND_NIGHT</text:a><text:tab/>453</text:p>
          <text:p text:style-name="P229">27.6 <text:s/><text:a xlink:type="simple" xlink:href="#27.6.BLIND_SCENE|outline" text:style-name="Standard" text:visited-style-name="Standard">BLIND_SCENE</text:a><text:tab/>455</text:p>
          <text:p text:style-name="P229">27.7 <text:s/><text:a xlink:type="simple" xlink:href="#27.7.BLIND_SECURITY|outline" text:style-name="Standard" text:visited-style-name="Standard">BLIND_SECURITY</text:a><text:tab/>457</text:p>
          <text:p text:style-name="P229">27.8 <text:s/><text:a xlink:type="simple" xlink:href="#27.8.BLIND_SHADE|outline" text:style-name="Standard" text:visited-style-name="Standard">BLIND_SHADE</text:a><text:tab/>460</text:p>
          <text:p text:style-name="P228">28 <text:s/><text:a xlink:type="simple" xlink:href="#28.Automation|outline" text:style-name="Standard" text:visited-style-name="Standard">Automation</text:a><text:tab/>464</text:p>
          <text:p text:style-name="P229">28.1 <text:s/><text:a xlink:type="simple" xlink:href="#28.1.DRIVER_1|outline" text:style-name="Standard" text:visited-style-name="Standard">DRIVER_1</text:a><text:tab/>464</text:p>
          <text:p text:style-name="P229">28.2 <text:s/><text:a xlink:type="simple" xlink:href="#28.2.DRIVER_4|outline" text:style-name="Standard" text:visited-style-name="Standard">DRIVER_4</text:a><text:tab/>465</text:p>
          <text:p text:style-name="P229">28.3 <text:s/><text:a xlink:type="simple" xlink:href="#28.3.FLOW_CONTROL|outline" text:style-name="Standard" text:visited-style-name="Standard">FLOW_CONTROL</text:a><text:tab/>465</text:p>
          <text:p text:style-name="P229">28.4 <text:s/><text:a xlink:type="simple" xlink:href="#28.4.FT_PROFILE|outline" text:style-name="Standard" text:visited-style-name="Standard">FT_PROFILE</text:a><text:tab/>467</text:p>
          <text:p text:style-name="P229">28.5 <text:s/><text:a xlink:type="simple" xlink:href="#28.5.INC_DEC|outline" text:style-name="Standard" text:visited-style-name="Standard">INC_DEC</text:a><text:tab/>469</text:p>
          <text:p text:style-name="P229">28.6 <text:s/><text:a xlink:type="simple" xlink:href="#28.6.INTERLOCK|outline" text:style-name="Standard" text:visited-style-name="Standard">INTERLOCK</text:a><text:tab/>471</text:p>
          <text:p text:style-name="P229">28.7 <text:s/><text:a xlink:type="simple" xlink:href="#28.7.INTERLOCK_4|outline" text:style-name="Standard" text:visited-style-name="Standard">INTERLOCK_4</text:a><text:tab/>472</text:p>
          <text:p text:style-name="P229">28.8 <text:s/><text:a xlink:type="simple" xlink:href="#28.8.MANUAL|outline" text:style-name="Standard" text:visited-style-name="Standard">MANUAL</text:a><text:tab/>473</text:p>
          <text:p text:style-name="P229">28.9 <text:s/><text:a xlink:type="simple" xlink:href="#28.9.MANUAL_1|outline" text:style-name="Standard" text:visited-style-name="Standard">MANUAL_1</text:a><text:tab/>474</text:p>
          <text:p text:style-name="P229">28.10 <text:s/><text:a xlink:type="simple" xlink:href="#28.10.MANUAL_2|outline" text:style-name="Standard" text:visited-style-name="Standard">MANUAL_2</text:a><text:tab/>474</text:p>
          <text:p text:style-name="P229">28.11 <text:s/><text:a xlink:type="simple" xlink:href="#28.11.MANUAL_4|outline" text:style-name="Standard" text:visited-style-name="Standard">MANUAL_4</text:a><text:tab/>476</text:p>
          <text:p text:style-name="P229">28.12 <text:s/><text:a xlink:type="simple" xlink:href="#28.12.PARSET|outline" text:style-name="Standard" text:visited-style-name="Standard">PARSET</text:a><text:tab/>477</text:p>
          <text:p text:style-name="P229">28.13 <text:s/><text:a xlink:type="simple" xlink:href="#28.13.PARSET2|outline" text:style-name="Standard" text:visited-style-name="Standard">PARSET2</text:a><text:tab/>478</text:p>
          <text:p text:style-name="P229">28.14 <text:s/><text:a xlink:type="simple" xlink:href="#28.14.SIGNAL|outline" text:style-name="Standard" text:visited-style-name="Standard">SIGNAL</text:a><text:tab/>479</text:p>
          <text:p text:style-name="P229">28.15 <text:s/><text:a xlink:type="simple" xlink:href="#28.15.SIGNAL_4|outline" text:style-name="Standard" text:visited-style-name="Standard">SIGNAL_4</text:a><text:tab/>480</text:p>
          <text:p text:style-name="P229">28.16 <text:s/><text:a xlink:type="simple" xlink:href="#28.16.SRAMP|outline" text:style-name="Standard" text:visited-style-name="Standard">SRAMP</text:a><text:tab/>481</text:p>
          <text:p text:style-name="P229">28.17 <text:s/><text:a xlink:type="simple" xlink:href="#28.17.TANK_LEVEL|outline" text:style-name="Standard" text:visited-style-name="Standard">TANK_LEVEL</text:a><text:tab/>482</text:p>
          <text:p text:style-name="P229">28.18 <text:s/><text:a xlink:type="simple" xlink:href="#28.18.TUNE|outline" text:style-name="Standard" text:visited-style-name="Standard">TUNE</text:a><text:tab/>483</text:p>
          <text:p text:style-name="P229"><text:soft-page-break/>28.19 <text:s/><text:a xlink:type="simple" xlink:href="#28.19.TUNE2|outline" text:style-name="Standard" text:visited-style-name="Standard">TUNE2</text:a><text:tab/>484</text:p>
          <text:p text:style-name="P228">29 <text:s/><text:a xlink:type="simple" xlink:href="#29.Geräte Treiber|outline" text:style-name="Standard" text:visited-style-name="Standard">Geräte Treiber</text:a><text:tab/>486</text:p>
          <text:p text:style-name="P229">29.1 <text:s/><text:a xlink:type="simple" xlink:href="#29.1.IRTRANS|outline" text:style-name="Standard" text:visited-style-name="Standard">IRTRANS</text:a><text:tab/>486</text:p>
          <text:p text:style-name="P229">29.2 <text:s/><text:a xlink:type="simple" xlink:href="#29.2.IRTRANS_1|outline" text:style-name="Standard" text:visited-style-name="Standard">IRTRANS_1</text:a><text:tab/>486</text:p>
          <text:p text:style-name="P229">29.3 <text:s/><text:a xlink:type="simple" xlink:href="#29.3.IRTRANS_4|outline" text:style-name="Standard" text:visited-style-name="Standard">IRTRANS_4</text:a><text:tab/>488</text:p>
          <text:p text:style-name="P229">29.4 <text:s/><text:a xlink:type="simple" xlink:href="#29.4.IRTRANS_8|outline" text:style-name="Standard" text:visited-style-name="Standard">IRTRANS_8</text:a><text:tab/>488</text:p>
          <text:p text:style-name="P229">29.5 <text:s/><text:a xlink:type="simple" xlink:href="#29.5.IRTRANS_DECODE|outline" text:style-name="Standard" text:visited-style-name="Standard">IRTRANS_DECODE</text:a><text:tab/>489</text:p>
          <text:p text:style-name="P228">30 <text:s/><text:a xlink:type="simple" xlink:href="#30.Netzwerk und Kommunikation|outline" text:style-name="Standard" text:visited-style-name="Standard">Netzwerk und Kommunikation</text:a><text:tab/>492</text:p>
          <text:p text:style-name="P229">30.1 <text:s/><text:a xlink:type="simple" xlink:href="#30.1.HTML_DECODE|outline" text:style-name="Standard" text:visited-style-name="Standard">HTML_DECODE</text:a><text:tab/>492</text:p>
          <text:p text:style-name="P229">30.2 <text:s/><text:a xlink:type="simple" xlink:href="#30.2.HTML_ENCODE|outline" text:style-name="Standard" text:visited-style-name="Standard">HTML_ENCODE</text:a><text:tab/>493</text:p>
          <text:p text:style-name="P229">30.3 <text:s/><text:a xlink:type="simple" xlink:href="#30.3.IP4_CHECK|outline" text:style-name="Standard" text:visited-style-name="Standard">IP4_CHECK</text:a><text:tab/>493</text:p>
          <text:p text:style-name="P229">30.4 <text:s/><text:a xlink:type="simple" xlink:href="#30.4.IP4_DECODE|outline" text:style-name="Standard" text:visited-style-name="Standard">IP4_DECODE</text:a><text:tab/>494</text:p>
          <text:p text:style-name="P229">30.5 <text:s/><text:a xlink:type="simple" xlink:href="#30.5.IP4_TO_STRING|outline" text:style-name="Standard" text:visited-style-name="Standard">IP4_TO_STRING</text:a><text:tab/>495</text:p>
          <text:p text:style-name="P229">30.6 <text:s/><text:a xlink:type="simple" xlink:href="#30.6.IS_IP4|outline" text:style-name="Standard" text:visited-style-name="Standard">IS_IP4</text:a><text:tab/>495</text:p>
          <text:p text:style-name="P229">30.7 <text:s/><text:a xlink:type="simple" xlink:href="#30.7.IS_URLCHR|outline" text:style-name="Standard" text:visited-style-name="Standard">IS_URLCHR</text:a><text:tab/>496</text:p>
          <text:p text:style-name="P229">30.8 <text:s/><text:a xlink:type="simple" xlink:href="#30.8.STRING_TO_URL|outline" text:style-name="Standard" text:visited-style-name="Standard">STRING_TO_URL</text:a><text:tab/>496</text:p>
          <text:p text:style-name="P229">30.9 <text:s/><text:a xlink:type="simple" xlink:href="#30.9.URL_DECODE|outline" text:style-name="Standard" text:visited-style-name="Standard">URL_DECODE</text:a><text:tab/>497</text:p>
          <text:p text:style-name="P229">30.10 <text:s/><text:a xlink:type="simple" xlink:href="#30.10.URL_ENCODE|outline" text:style-name="Standard" text:visited-style-name="Standard">URL_ENCODE</text:a><text:tab/>497</text:p>
          <text:p text:style-name="P229">30.11 <text:s/><text:a xlink:type="simple" xlink:href="#30.11.URL_TO_STRING|outline" text:style-name="Standard" text:visited-style-name="Standard">URL_TO_STRING</text:a><text:tab/>498</text:p>
          <text:p text:style-name="P228">31 <text:s/><text:a xlink:type="simple" xlink:href="#31.BUFFER Management|outline" text:style-name="Standard" text:visited-style-name="Standard">BUFFER Management</text:a><text:tab/>499</text:p>
          <text:p text:style-name="P229">31.1 <text:s/><text:a xlink:type="simple" xlink:href="#31.1._BUFFER_CLEAR|outline" text:style-name="Standard" text:visited-style-name="Standard">_BUFFER_CLEAR</text:a><text:tab/>499</text:p>
          <text:p text:style-name="P229">31.2 <text:s/><text:a xlink:type="simple" xlink:href="#31.2._BUFFER_INIT|outline" text:style-name="Standard" text:visited-style-name="Standard">_BUFFER_INIT</text:a><text:tab/>499</text:p>
          <text:p text:style-name="P229">31.3 <text:s/><text:a xlink:type="simple" xlink:href="#31.3._BUFFER_INSERT|outline" text:style-name="Standard" text:visited-style-name="Standard">_BUFFER_INSERT</text:a><text:tab/>500</text:p>
          <text:p text:style-name="P229">31.4 <text:s/><text:a xlink:type="simple" xlink:href="#31.4.BUFFER_COMP|outline" text:style-name="Standard" text:visited-style-name="Standard">BUFFER_COMP</text:a><text:tab/>501</text:p>
          <text:p text:style-name="P229">31.5 <text:s/><text:a xlink:type="simple" xlink:href="#31.5.STRING_TO_BUFFER|outline" text:style-name="Standard" text:visited-style-name="Standard">STRING_TO_BUFFER</text:a><text:tab/>502</text:p>
          <text:p text:style-name="P229">31.6 <text:s/><text:a xlink:type="simple" xlink:href="#31.6.BUFFER_SEARCH|outline" text:style-name="Standard" text:visited-style-name="Standard">BUFFER_SEARCH</text:a><text:tab/>503</text:p>
          <text:p text:style-name="P229">31.7 <text:s/><text:a xlink:type="simple" xlink:href="#31.7.BUFFER_TO_STRING|outline" text:style-name="Standard" text:visited-style-name="Standard">BUFFER_TO_STRING</text:a><text:tab/>504</text:p>
          <text:p text:style-name="P228">32 <text:s/><text:a xlink:type="simple" xlink:href="#32.Listen Verarbeitung|outline" text:style-name="Standard" text:visited-style-name="Standard">Listen Verarbeitung</text:a><text:tab/>505</text:p>
          <text:p text:style-name="P229">32.1 <text:s/><text:a xlink:type="simple" xlink:href="#32.1.Einleitung|outline" text:style-name="Standard" text:visited-style-name="Standard">Einleitung</text:a><text:tab/>505</text:p>
          <text:p text:style-name="P229">32.2 <text:s/><text:a xlink:type="simple" xlink:href="#32.2.LIST_CLEAN|outline" text:style-name="Standard" text:visited-style-name="Standard">LIST_CLEAN</text:a><text:tab/>505</text:p>
          <text:p text:style-name="P229">32.3 <text:s/><text:a xlink:type="simple" xlink:href="#32.3.LIST_GET|outline" text:style-name="Standard" text:visited-style-name="Standard">LIST_GET</text:a><text:tab/>506</text:p>
          <text:p text:style-name="P229">32.4 <text:s/><text:a xlink:type="simple" xlink:href="#32.4.LIST_INSERT|outline" text:style-name="Standard" text:visited-style-name="Standard">LIST_INSERT</text:a><text:tab/>507</text:p>
          <text:p text:style-name="P229">32.5 <text:s/><text:a xlink:type="simple" xlink:href="#32.5.LIST_LEN|outline" text:style-name="Standard" text:visited-style-name="Standard">LIST_LEN</text:a><text:tab/>507</text:p>
          <text:p text:style-name="P229">32.6 <text:s/><text:a xlink:type="simple" xlink:href="#32.6.LIST_NEXT|outline" text:style-name="Standard" text:visited-style-name="Standard">LIST_NEXT</text:a><text:tab/>508</text:p>
          <text:p text:style-name="P229">1.3.<text:a xlink:type="simple" xlink:href="#1.3.LIST_RETRIEVE|outline" text:style-name="Standard" text:visited-style-name="Standard">LIST_RETRIEVE</text:a><text:tab/>509</text:p>
          <text:p text:style-name="P229">32.7 <text:s/><text:a xlink:type="simple" xlink:href="#32.7.LIST_RETRIEVE_MAX|outline" text:style-name="Standard" text:visited-style-name="Standard">LIST_RETRIEVE_MAX</text:a><text:tab/>509</text:p>
          <text:p text:style-name="P229">32.8 <text:s/><text:a xlink:type="simple" xlink:href="#32.8.LIST_RETRIEVE_MIN|outline" text:style-name="Standard" text:visited-style-name="Standard">LIST_RETRIEVE_MIN</text:a><text:tab/>510</text:p>
          <text:p text:style-name="P229"><text:soft-page-break/>32.9 <text:s/><text:a xlink:type="simple" xlink:href="#32.9.LIST_SORT_L|outline" text:style-name="Standard" text:visited-style-name="Standard">LIST_SORT_L</text:a><text:tab/>511</text:p>
        </text:index-body>
      </text:table-of-content>
      <text:p text:style-name="P162"/>
      <text:list xml:id="list37502386" text:style-name="L1">
        <text:list-item>
          <text:h text:style-name="P207" text:outline-level="1">Rechtsgrundlagen</text:h>
          <text:list>
            <text:list-item>
              <text:h text:style-name="P216" text:outline-level="2">Haftungsausschluss</text:h>
            </text:list-item>
          </text:list>
        </text:list-item>
      </text:list>
      <text:p text:style-name="P66">Die in der OSCAT Bibliothek enthaltenen Softwaremodule sind in der Absicht angeboten als Entwicklungsvorlage und Leitfaden zur Softwareentwicklung für SPS nach IEC61131-3 zu dienen. Eine Funktionsgarantie wird von den Entwicklern nicht übernommen und wird explizit ausgeschlossen. Da die in der Bibliothek enthaltenen Softwaremodule ohne jegliche Kosten bereitgestellt werden, besteht keinerlei Gewährleistung, soweit dies gesetzlich zulässig ist. Sofern nicht explizit schriftlich vereinbart, stellen die Copyright-Inhaber und / oder Dritte die Softwaremodule so zur Verfügung, „wie es ist“, ohne irgendeine Gewährleistung, weder ausdrücklich noch implizit, einschließlich - aber nicht begrenzt - auf Marktreife oder Verwendbarkeit für einen bestimmten Zweck. Das volle Risiko und die volle Verantwortung bezüglich Qualität, Fehlerfreiheit und Leistungsfähigkeit der Softwaremodule liegt beim Anwender selbst. Sollte sich die Bibliothek, oder Teile der Bibliothek als Fehlerhaft erweisen, liegen die Kosten für notwendigen Service, Reparatur und / oder Korrektur beim Anwender selbst. Sollten Teile oder die gesamte Bibliothek zur Erstellung von Anwendungssoftware verwendet werden, oder in Softwareprojekten eingesetzt werden, so haftet der Anwender für die Fehlerfreiheit, Funktion und Qualität der Anwendung. Eine Haftung durch OSCAT ist grundsätzlich ausgeschlossen. Der Anwender der OSCAT Bibliothek hat durch geeignete Tests und Freigaben und Qualitätssicherungsmaßnahmen dafür zu sorgen, dass durch eventuelle Fehler in der Bibliothek von OSCAT keine Schäden entstehen können. Die vorstehenden Lizenzbedingungen und Haftungsausschlüsse gelten gleichermaßen für die Softwarebibliothek, sowie die in diesem Handbuch angebotenen Beschreibungen und Erläuterungen, auch wenn dies nicht explizit erwähnt wird.</text:p>
      <text:list xml:id="list38452370" text:continue-numbering="true" text:style-name="L1">
        <text:list-item>
          <text:list>
            <text:list-item>
              <text:h text:style-name="P216" text:outline-level="2">Lizenzbedingungen</text:h>
            </text:list-item>
          </text:list>
        </text:list-item>
      </text:list>
      <text:p text:style-name="P65"><text:span text:style-name="T1">Die Verwendung der OSCAT Bibliothek ist kostenfrei und kann ohne Lizenzvereinbarung für private oder gewerbliche Zwecke eingesetzt werden. Eine Verbreitung der Bibliothek ist ausdrücklich erwünscht, hat aber kostenfrei und unter Hinweis auf un</text:span><text:span text:style-name="T1">sere Webpage </text:span><text:a xlink:type="simple" xlink:href="http://WWW.OSCAT.DE/"><text:span text:style-name="T1">WWW.OSCAT.DE</text:span></text:a><text:span text:style-name="T1"> zu erfolgen. Wird die Bibliothek in elektronischer Form </text:span><text:soft-page-break/><text:span text:style-name="T1">zum Down</text:span><text:span text:style-name="T1">load bereitgestellt, oder auf Datenträgern verbreitet, so ist sicherzustellen, dass ein deutlich erkennbarer Hinweis auf OSCAT und ein Weblink zu </text:span><text:a xlink:type="simple" xlink:href="http://WWW.OSCAT.DE/"><text:span text:style-name="T1">WWW.OSCAT.DE</text:span></text:a><text:span text:style-name="T1"> entsprechend enthalten sind.</text:span></text:p>
      <text:list xml:id="list38456384" text:continue-numbering="true" text:style-name="L1">
        <text:list-item>
          <text:list>
            <text:list-item>
              <text:h text:style-name="P216" text:outline-level="2">Eingetragene Markenzeichen</text:h>
            </text:list-item>
          </text:list>
        </text:list-item>
      </text:list>
      <text:p text:style-name="P66">Alle in dieser Beschreibung benutzen Markennamen werden ohne Verweis auf deren Eintragung beziehungsweise Besitzer verwendet. Die Existenz solcher Rechte kann daher nicht ausgeschlossen werden. Die benutzten Markennamen sind Eigentum des jeweiligen Besitzers. Eine Verwendung der Beschreibung für kommerzielle Zwecke ist daher nicht gestattet, auch nicht auszugsweise.</text:p>
      <text:list xml:id="list38467992" text:continue-numbering="true" text:style-name="L1">
        <text:list-item>
          <text:list>
            <text:list-item>
              <text:h text:style-name="P216" text:outline-level="2"><text:span text:style-name="T31">Bestimmungsgemäßer</text:span> Gebrauch</text:h>
            </text:list-item>
          </text:list>
        </text:list-item>
      </text:list>
      <text:p text:style-name="P66">Die in der OSCAT Bibliothek enthaltenen und in dieser Dokumentation beschriebenen Softwaremodule sind ausschließlich für Fachpersonal mit einer Ausbildung in SPS Programmierung. Die Anwender sind verantwortlich für die Einhaltung aller geltenden Normen und Vorschriften die bei der Anwendung zum tragen kommen. OSCAT weist weder im Handbuch noch in der Software auf diese Normen und Vorschriften hin.</text:p>
      <text:list xml:id="list38457669" text:continue-numbering="true" text:style-name="L1">
        <text:list-item>
          <text:list>
            <text:list-item>
              <text:h text:style-name="P216" text:outline-level="2">Sonstiges</text:h>
            </text:list-item>
          </text:list>
        </text:list-item>
      </text:list>
      <text:p text:style-name="P66">Alle Rechtsverbindlichen Regelungen befinden sich ausschließlich im Kapitel 1 dieses Handbuchs. Eine Ableitung oder Bezug von rechtlichen Ansprüchen aufgrund des Inhalts dieses Manuals außer den Bestimmungen in Kapitel 1 ist gänzlich ausgeschlossen.</text:p>
      <text:list xml:id="list38472991" text:continue-numbering="true" text:style-name="L1">
        <text:list-item>
          <text:h text:style-name="P210" text:outline-level="1">Einleitung</text:h>
          <text:list>
            <text:list-item>
              <text:h text:style-name="P216" text:outline-level="2">Ziele</text:h>
            </text:list-item>
          </text:list>
        </text:list-item>
      </text:list>
      <text:p text:style-name="P66"><text:span text:style-name="T14">OSCAT steht für "</text:span><text:span text:style-name="T2">Open</text:span> <text:span text:style-name="T2">Source</text:span> <text:span text:style-name="T2">Community</text:span> for Automation <text:span text:style-name="T2">Technology</text:span>".</text:p>
      <text:p text:style-name="P66"><text:span text:style-name="T14">OSCAT erstellt eine </text:span><text:span text:style-name="T15">Open</text:span><text:span text:style-name="T14"> </text:span><text:span text:style-name="T15">Source</text:span><text:span text:style-name="T14"> Bibliothek nach dem IEC61131-3 Standard, welche auf herstellerspezifische Funktionen verzichtet und deshalb auf alle IEC61131-3 kompatiblen Speicherprogrammierbaren Steuerungen portiert werden kann. Auch wenn Entwicklungen für SPS unter dem Einsatz von herstellerspezifischen Bibliotheken meist effizient zu lösen sind und diese Bibliotheken auch teilweise kostenfrei zur Verfügung gestellt werden, ergeben sich doch große Nachteile durch ihren Einsatz:</text:span></text:p>
      <text:list xml:id="list37503695" text:style-name="L2">
        <text:list-item>
          <text:p text:style-name="P242">Die Bibliotheken der Hersteller sind praktisch alle geschützt und der <text:span text:style-name="T2">Source</text:span> Code ist nicht frei zugänglich, was im Fehlerfall eine Fehlersuche und auch die Behebung des Fehlers enorm schwierig, oft sogar unmöglich macht.</text:p>
        </text:list-item>
        <text:list-item>
          <text:p text:style-name="P242">Die grafische Erstellung von Programmen kann mit herstellerspezifischen Bibliotheken schnell unübersichtlich, ineffizient und fehleranfällig werden, weil vorhandene Funktionen wegen des fehlenden <text:span text:style-name="T2">Source C</text:span>odes den eigentlichen Bedürfnissen nicht angepasst und erweitert werden können.</text:p>
        </text:list-item>
        <text:list-item>
          <text:p text:style-name="P242">Ein Wechsel der Hardware, insbesondere der Wechsel zu einem anderen Hersteller, ist durch die geschützten Bibliotheken verhindert und die Vorteile, die ein Standard wie IEC61131 <text:s/>bieten würde, werden so eingeschränkt. An einen Austausch einer herstellerspezifischen Bibliothek mit der eines Wettbewerbers ist ausgeschlossen, denn die Bibliotheken der Hersteller unterscheiden sich enorm in Umfang und Inhalt. <text:s/></text:p>
        </text:list-item>
        <text:list-item>
          <text:p text:style-name="P242">Das Verständnis komplexer Module ist ohne einen Einblick in den Sourcecode oft sehr schwierig. Dadurch werden Programme ineffizient und fehleranfällig.</text:p>
          <text:p text:style-name="P247">OSCAT will <text:span text:style-name="T7">mit</text:span><text:span text:style-name="T2"> </text:span><text:span text:style-name="T7">der</text:span><text:span text:style-name="T2"> </text:span><text:span text:style-name="T7">quelloffenen</text:span><text:span text:style-name="T2"> OSCAT </text:span><text:span text:style-name="T7">Bibliothek</text:span> einen mächtigen und umfassenden Standard für die Programmierung von SPS schaffen, der im <text:span text:style-name="T2">Source C</text:span>ode zur Verfügung steht und durch vielfältige Anwendungen ausführlich verifiziert und getestet wurde. Weiterhin fließen durch die Vielzahl der Anwendungen umfangreiche Erkenntnisse und Anregungen in die Bibliothek ein. Dadurch kann die Bibliothek als sehr praxisnah bezeichnet werden. OSCAT versteht seine Bibliothek als Entwicklungsvorlage und <text:soft-page-break/>nicht als ausgereiftes Produkt. Der Nutzer ist selbst verantwortlich dafür, eventuell in seiner Anwendung verwendete Module mit geeigneten Verfahren zu testen und die notwendige Fehlerfreiheit, Qualität und Funktionalität zu verifizieren. An dieser Stelle sei noch einmal auf die Lizenzbedingungen und den Haftungsausschluss in dieser Dokumentation hingewiesen.</text:p>
        </text:list-item>
      </text:list>
      <text:list xml:id="list38447903" text:continue-list="list38472991" text:style-name="L1">
        <text:list-item>
          <text:list>
            <text:list-item>
              <text:h text:style-name="P216" text:outline-level="2">Konventionen</text:h>
            </text:list-item>
          </text:list>
        </text:list-item>
      </text:list>
      <text:list xml:id="list37521891" text:style-name="L3">
        <text:list-item>
          <text:p text:style-name="P244">Direkte Manipulationen im Speicher:<text:line-break/>Funktionen, die Eingangswerte über <text:span text:style-name="T2">Pointer</text:span> verändern, wie zum Beispiel _Array_<text:span text:style-name="T2">Sort,</text:span> beginnen alle mit einem Unterstrich „_“<text:span text:style-name="T2">.</text:span> _Array_<text:span text:style-name="T2">Sort</text:span> sortiert ein Array direkt im Speicher, was den gravierenden Vorteil hat, dass ein eventuell sehr großes Array erst gar nicht der Funktion übergeben werden muss und deshalb Speicher in der Größe des Arrays und die Zeit zum Kopieren eingespart wird. Es wird allerdings nur erfahrenen Anwendern empfohlen diese Funktionen einzusetzen, da eine Fehlanwendung zu gravierenden Fehlern und Abstürzen führen kann! Bei Anwendung von Funktionen die mit einem „_“ beginnen ist besondere Sorgfalt angebracht und insbesondere darauf zu achten, dass die Aufrufparameter niemals undefinierte Werte annehmen können.</text:p>
        </text:list-item>
        <text:list-item>
          <text:p text:style-name="P244">Namensgebung bei Funktionen:<text:line-break/>Funktionsbausteine mit Zeitverhalten, wie etwa die Funktion PT1 werden durch die Namensgebung FT_Bausteinname (FT_PT1) beschrieben. Funktionen ohne Zeitbezug sind mit F_Bausteinname angegeben.</text:p>
        </text:list-item>
        <text:list-item>
          <text:p text:style-name="P244">Logische Gleichungen:<text:line-break/>Innerhalb dieses Handbuchs werden die logischen Verknüpfungen &amp; für UND bzw. AND, + für ODER bzw. OR, /A für ein negiertes A und # für XOR (exklusives ODER) verwendet.</text:p>
        </text:list-item>
        <text:list-item>
          <text:p text:style-name="P244"><draw:frame draw:style-name="fr4" draw:name="Grafik340" text:anchor-type="paragraph" svg:x="8.278cm" svg:y="0.277cm" svg:width="8.68cm" svg:height="7.879cm" draw:z-index="305"><draw:image xlink:href="Pictures/10000000000002E9000001AA7B2BA282.png" xlink:type="simple" xlink:show="embed" xlink:actuate="onLoad"/></draw:frame>Setup-Werte für Bausteine:<text:line-break/>Damit die Anwendung und Programmierung übersichtlich bleibt und komplexe Funktionen einfacher dargestellt werden können, haben viele der Bausteine der OSCAT Bibliothek einstellbare Parameter, die bei Anwendung durch einen Doppelklick auf das grafische Symbol des Bausteins bearbeitet werden können. Ein Doppelklick auf das Symbol öffnet eine Dialogbox, die das Bearbeiten der Setup-Werte erlaubt. Wird eine Funktion mehrfach verwendet, so können damit je Baustein die Setup-Werte einzeln festgelegt werden. Die Bearbeitung durch Doppelklick funktioniert unter CoDeSys ausschließlich in CFC. In ST müssen alle Parameter, auch die Setup-Parameter, im Aufruf <text:soft-page-break/>übergeben werden. Die Setup-Parameter werden einfach nach den normalen Eingängen angefügt. Die Parameter werden in der grafischen Oberfläche durch Doppelklick bearbeitet und dann wie Konstanten unter IEC61131 eingegeben. Es ist Dabei zu beachten dass Zeiten mit T#200ms und TRUE und FALSE in Großbuchstaben geschrieben sein müssen.<text:line-break/></text:p>
        </text:list-item>
        <text:list-item>
          <text:p text:style-name="P248"><text:span text:style-name="T2">Error- </text:span>und Status-<text:span text:style-name="T2">Reporting</text:span> (ESR):</text:p>
          <text:p text:style-name="P249">Komplexere Bausteine erhalten zum großen Teil einen <text:span text:style-name="T2">Error-</text:span> oder Status-Ausgang. Ein <text:span text:style-name="T2">Error-</text:span>Ausgang ist 0, falls kein Fehler bei der Ausführung auftritt. Tritt jedoch im Baustein ein Fehler auf, so nimmt dieser Ausgang einen Wert im Bereich 1 .. 99 an und meldet somit einen Fehler mit Fehlernummer. Ein Status- oder <text:span text:style-name="T2">Error-</text:span>Sammelmodul kann diese Meldungen sammeln und mit einem Zeitstempel versehen, in einer Datenbank bzw. Array speichern, oder per TCP/IP an übergeordnete Systeme weiterleiten. Ein Ausgang des Typs Status ist kompatibel zu einem <text:span text:style-name="T2">Error-</text:span>Ausgang mit identischer Funktion. Jedoch meldet ein Status-Ausgang nicht nur Fehler, sondern führt auch über Aktivitäten des Bausteins Protokoll. Werte zwischen 1 .. 99 sind weiterhin Fehlermeldungen. Zwischen 100 .. 199 befinden sind Meldungen über Zustandsveränderungen. Der Bereich 200 .. 255 ist reserviert für <text:span text:style-name="T2">Debug-</text:span>Meldungen. Mit dieser, innerhalb der OSCAT Bibliothek standardisierten Funktionalität, wird eine einfache und übergreifende Möglichkeit geboten, Betriebszustandsmeldungen und Fehlermeldungen auf einfache Weise zu integrieren, ohne die Funktion eines Systems zu beeinflussen. Bausteine, die dieses Verfahren unterstützen, werden ab der Revision 1.4 mit der Kennzeichnung „ESR-Fähig“ gekennzeichnet. Weitere Informationen zu den ESR-Bausteinen finden Sie im Abschnitt „Diverse Funktionen“.</text:p>
          <text:p text:style-name="P249"/>
        </text:list-item>
      </text:list>
      <text:list xml:id="list38456824" text:continue-list="list38447903" text:style-name="L1">
        <text:list-item>
          <text:list>
            <text:list-item>
              <text:h text:style-name="P216" text:outline-level="2"><text:soft-page-break/>Testumgebung</text:h>
            </text:list-item>
          </text:list>
        </text:list-item>
      </text:list>
      <text:p text:style-name="P69">Die OSCAT Bibliothek wird unter CoDeSys entwickelt und auf verschiedenen Systemen getestet.</text:p>
      <text:p text:style-name="P69">Die Testumgebung umfasst folgende Systeme:</text:p>
      <text:list xml:id="list37493776" text:style-name="L4">
        <text:list-item text:start-value="1">
          <text:p text:style-name="P245"><text:span text:style-name="T31">Beckhoff</text:span> BX 9000<text:line-break/>mit <text:span text:style-name="T31">TwinCAT</text:span> PLC <text:span text:style-name="T2">Control</text:span> Version 2.10.0</text:p>
        </text:list-item>
        <text:list-item>
          <text:p text:style-name="P245"><text:span text:style-name="T31">Beckhoff</text:span> CX 9001-1001<text:line-break/>mit <text:span text:style-name="T31">TwinCAT</text:span> PLC <text:span text:style-name="T2">Control</text:span> Version 2.10.0</text:p>
        </text:list-item>
        <text:list-item>
          <text:p text:style-name="P245"><text:span text:style-name="T31">Wago</text:span> 750-841 <text:line-break/>mit <text:span text:style-name="T31">Wago</text:span> <text:span text:style-name="T31">CoDeSys</text:span> Version 2.3.8.1</text:p>
        </text:list-item>
        <text:list-item>
          <text:p text:style-name="P230"><text:span text:style-name="T31">Möller</text:span> EC4P222<text:line-break/>mit <text:span text:style-name="T31">CoDeSys</text:span> Version 2.3.9.5</text:p>
        </text:list-item>
        <text:list-item>
          <text:p text:style-name="P243"><text:span text:style-name="T31">CoDeSys</text:span> Simulation auf I386 mit <text:span text:style-name="T31">CoDeSys</text:span> 2.3.9.10</text:p>
        </text:list-item>
        <text:list-item>
          <text:p text:style-name="P232"><text:span text:style-name="T31">CoDeSys</text:span> Simulation auf i386 mit <text:span text:style-name="T31">Codesys</text:span> 3.2 mit SP2</text:p>
        </text:list-item>
        <text:list-item>
          <text:p text:style-name="P232">S7 und STEP7: Die OSCAT Bibliothek wird seit Version 1.5 auf STEP7 übersetzt und auch verifiziert.</text:p>
        </text:list-item>
        <text:list-item>
          <text:p text:style-name="P238">PCWORX / MULTIPROG: Die OSCAT Bibliothek wird seit Version 2.6 auf MULTIPROG übersetzt und verifiziert.</text:p>
        </text:list-item>
      </text:list>
      <text:p text:style-name="P69">Wir sind stetig darum bemüht die OSCAT Bibliothek auch auf weiteren Testumgebungen zu testen.</text:p>
      <text:list xml:id="list38460144" text:continue-list="list38456824" text:style-name="L1">
        <text:list-item>
          <text:list>
            <text:list-item>
              <text:h text:style-name="P216" text:outline-level="2">Globale Konstanten</text:h>
            </text:list-item>
          </text:list>
        </text:list-item>
      </text:list>
      <text:p text:style-name="P18">Die OSCAT Bibliothek versucht globale Variablen zu vermeiden, um möglichst einfach in fremde Umgebungen integriert werden zu können. Globale Variablen sind nicht für Funktion oder den Datenaustausch zwischen Bausteinen nötig. Das Setup und die Konfiguration ist vollständig innerhalb der Module realisiert, um höchste Modularität und Portabilität zu gewährleisten. Für physikalische und mathematische Konstanten haben wir uns aus Gründen der Übersichtlichkeit jedoch dazu entschlossen, Globale Konstanten zu verwenden.</text:p>
      <text:p text:style-name="P66"><text:alphabetical-index-mark-start text:id="IMark226158368"/>MATH<text:alphabetical-index-mark-end text:id="IMark226158368"/><text:span text:style-name="T23"> :</text:span></text:p>
      <text:p text:style-name="P180">MATH definiert mathematische Konstanten. Die Konstanten sind in der TYP Definition CONSTANTS_MATH definiert.</text:p>
      <text:p text:style-name="P180"/>
      <text:p text:style-name="P66"><text:soft-page-break/><text:alphabetical-index-mark-start text:id="IMark226158368"/>PHYS<text:alphabetical-index-mark-end text:id="IMark226158368"/> :</text:p>
      <text:p text:style-name="P180">PHYS definiert physikalische Konstanten. Die Konstanten sind in der TYP Definition CONSTANTS_PHYS definiert.</text:p>
      <text:p text:style-name="P180"/>
      <text:p text:style-name="P173"><text:alphabetical-index-mark-start text:id="IMark226158368"/>LANGUAGE<text:alphabetical-index-mark-end text:id="IMark226158368"/> : </text:p>
      <text:p text:style-name="P180">LANGUAGE definiert Spracheinstellungen. Die Einstellungen sind in der TYP Definition CONSTANTS_LANGUAGE definiert.</text:p>
      <text:p text:style-name="P180"/>
      <text:p text:style-name="P173"><text:alphabetical-index-mark-start text:id="IMark226158368"/>SETUP<text:alphabetical-index-mark-end text:id="IMark226158368"/> : </text:p>
      <text:p text:style-name="P180">SETUP definiert allgemeine Grundeinstellungen. Die Einstellungen sind in der TYP Definition CONSTANTS_SETUP definiert.</text:p>
      <text:p text:style-name="P180"/>
      <text:p text:style-name="P173"><text:alphabetical-index-mark-start text:id="IMark226158368"/>LOCATION<text:alphabetical-index-mark-end text:id="IMark226158368"/> : </text:p>
      <text:p text:style-name="P180">LOCATION definiert Ortseinstellungen, hierzu zählen unter anderem auch Feiertagsdefinitionen. Die Einstellungen sind in der TYP Definition CONSTANTS_LOCATION definiert.</text:p>
      <text:p text:style-name="P180"/>
      <text:p text:style-name="P154"><text:alphabetical-index-mark-start text:id="IMark226158368"/><text:span text:style-name="T25">STRING_LENGTH</text:span><text:alphabetical-index-mark-end text:id="IMark226158368"/><text:span text:style-name="T23"> : INT := 80.</text:span></text:p>
      <text:p text:style-name="P173"><text:span text:style-name="T23">STRING_LENGTH ist per </text:span>Default<text:span text:style-name="T23"> 80, und wird von STRING Funktionen benutzt um eine Bereichsüberschreitung bei Verarbeitung von STRINGS zu vermeiden. STRING_LENGTH legt auch innerhalb der OSCAT LIB die maximale STRING Länge fest welche bei häufiger Nutzung des Datentyps STRING zu hohem Speicherverbrauch führen kann. Wenn in einer Anwendung nur kurze STRINGS verarbeitet werden müssen so kann über diese SETUP Konstante die STRING Länge entsprechend reduziert werden. Wir empfehlen STRINGS innerhalb der Anwendung unter Zuhilfenahme dieser <text:s/>Konstante zu definieren. Werden längere STRINGS als 80 Zeichen zur Verarbeitung nötig kann diese Konstante auf Werte bis 255 erhöht werden. <text:s/></text:span></text:p>
      <text:p text:style-name="P180">NEUER_STRING : STRING(STRING_LENGTH).</text:p>
      <text:p text:style-name="P180">Durch diese Definition ist auch der neu definierte STRING automatisch auf die Länge von STRING_LENGTH definiert und kann wenn nötig global geändert werden.</text:p>
      <text:p text:style-name="P173"/>
      <text:p text:style-name="P66"><text:alphabetical-index-mark-start text:id="IMark226158368"/>NETWORK_BUFFER_SIZE<text:alphabetical-index-mark-end text:id="IMark226158368"/><text:span text:style-name="T23"> : UINT := 4000.</text:span></text:p>
      <text:p text:style-name="P180">Mit Hilfe des Setup Parameters NETWORK_BUFFER_SIZE wird die Obergrenze der Datenstruktur NETWORK_BUFFER festgelegt. Die Vorgabewert kann bei Bedarf durch diese Konstante geändert werden. </text:p>
      <text:list xml:id="list37495453" text:style-name="Outline">
        <text:list-item>
          <text:list>
            <text:list-item>
              <text:h text:style-name="Heading_20_2" text:outline-level="2"><text:soft-page-break/>Aktualität</text:h>
            </text:list-item>
          </text:list>
        </text:list-item>
      </text:list>
      <text:p text:style-name="P66"><text:span text:style-name="T23">OSCAT aktualisiert diese Beschreibung fortlaufend. Es wird empfohlen sich die jeweils aktuellste Version von der OSCAT Homepage <text:s/>unter </text:span><text:a xlink:type="simple" xlink:href="http://www.oscat.de/"><text:span text:style-name="T23">www.OSCAT.DE</text:span></text:a><text:span text:style-name="T23"> zu laden. Hier wird das jeweils aktuellste Manual zum Download bereitgestellt. Neben dem Manual stellt OSCAT auch eine detaillierte Revision Historie bereit. Die "OSCAT Revision </text:span>History<text:span text:style-name="T23">" listet alle Revisionen der einzelnen Bausteine mit Änderungen und ab welcher </text:span>Release<text:span text:style-name="T23"> der Bibliothek dieser Baustein enthalten ist.</text:span></text:p>
      <text:list xml:id="list38457587" text:continue-list="list38460144" text:style-name="L1">
        <text:list-item>
          <text:list>
            <text:list-item>
              <text:h text:style-name="P216" text:outline-level="2">Support</text:h>
            </text:list-item>
          </text:list>
        </text:list-item>
      </text:list>
      <text:p text:style-name="P154"><text:span text:style-name="T24">Support wird durch die Vielzahl der Anwender selbst im Forum unter<text:line-break/></text:span><text:a xlink:type="simple" xlink:href="http://www.oscat.de/"><text:span text:style-name="T24">WWW.OSCAT.DE</text:span></text:a><text:span text:style-name="T24"> zur Verfügung gestellt. Ein Anspruch auf Support besteht aber generell nicht, auch dann nicht, wenn sich herausstellen sollte, dass die Bibliothek oder Teile der Bibliothek fehlerhaft sind. Der im Rahmen des OSCAT Forums bereitgestellte Support wird von Anwendern freiwillig und untereinander bereitgestellt. Updates der Bibliothek und der Dokumentation werden in der Regel einmal im Monat auf der Homepage <text:s/>von OSCAT unter </text:span><text:a xlink:type="simple" xlink:href="http://www.oscat.de/"><text:span text:style-name="T24">WWW.OSCAT.DE</text:span></text:a><text:span text:style-name="T24"> zur Verfügung gestellt. Ein Anspruch auf Wartung, Fehlerbehebung und Softwarepflege jedweder Art besteht generell nicht und ist als freiwillige Leistung von OSCAT anzusehen. Bitte senden Sie bei Support Anfragen keine email an OSCAT. Anfragen können schneller und effektiver bearbeitet werden wenn die Anfragen in unserem Forum gestellt werden.</text:span></text:p>
      <text:list xml:id="list38461833" text:continue-numbering="true" text:style-name="L1">
        <text:list-item>
          <text:h text:style-name="P208" text:outline-level="1">Datentypen der OSCAT Bibliothek</text:h>
        </text:list-item>
      </text:list>
      <text:p text:style-name="P154"><text:span text:style-name="T14">Die OSCAT Bibliothek definiert </text:span>neben<text:span text:style-name="T14"> den Standard Datentypen weitere Datentypen. Diese werden innerhalb der Bibliothek verwendet, können aber jederzeit von Anwender für eigene Deklarationen verwendet werden. Ein Löschen oder verändern von Datentypen kann dazu führen das Teile der Bibliothek sich nicht mehr kompilieren lassen.</text:span></text:p>
      <text:list xml:id="list38452379" text:continue-list="list37495453" text:style-name="Outline">
        <text:list-item>
          <text:list>
            <text:list-item>
              <text:h text:style-name="Heading_20_2" text:outline-level="2"><text:alphabetical-index-mark-start text:id="IMark226158368"/>CALENDAR<text:alphabetical-index-mark-end text:id="IMark226158368"/></text:h>
            </text:list-item>
          </text:list>
        </text:list-item>
      </text:list>
      <text:p text:style-name="Text_20_body_20_2">Eine Variable vom Typ CALENDAR kann benutzt werden um Programmweite Kalenderdaten zur Verfügung zu stellen. Im Abschnitt Datums und Zeitfunktionen finden sich diverse Funktionen um den Kalender fortlaufend zu aktualisieren.</text:p>
      <text:p text:style-name="Text_20_body_20_2">*.UTC : DT<text:tab/><text:tab/><text:tab/>Universelle Weltzeit</text:p>
      <text:p text:style-name="Text_20_body_20_2">*.LDT : DT<text:tab/><text:tab/><text:tab/>Lokalzeit</text:p>
      <text:p text:style-name="Text_20_body_20_2">*.LDATE : DATE<text:tab/><text:tab/>Lokales Datum</text:p>
      <text:p text:style-name="Text_20_body_20_2">*.LTOD : TOD<text:tab/><text:tab/>Lokale Tageszeit</text:p>
      <text:p text:style-name="Text_20_body_20_2">*.YEAR : INT<text:tab/><text:tab/>Lokales Jahr</text:p>
      <text:p text:style-name="Text_20_body_20_2">*.MONTH : INT<text:tab/><text:tab/>Lokales Monat</text:p>
      <text:p text:style-name="Text_20_body_20_2">*.DAY : INT<text:tab/><text:tab/>Lokaler Tag</text:p>
      <text:p text:style-name="Text_20_body_20_2">*.WEEKDAY : INT<text:tab/><text:tab/>Lokaler Wochentag</text:p>
      <text:p text:style-name="Text_20_body_20_2">*.OFFSET : INT<text:tab/><text:tab/>Offset der Lokalzeit zur Weltzeit in Minuten</text:p>
      <text:p text:style-name="Text_20_body_20_2">*.DST_EN : BOOL<text:tab/><text:tab/>Sommerzeit <text:span text:style-name="T15">Enable</text:span></text:p>
      <text:p text:style-name="Text_20_body_20_2">*.DST_ON : BOOL<text:tab/><text:tab/>Sommerzeit ist Aktiv</text:p>
      <text:p text:style-name="Text_20_body_20_2">*.NAME : STRING(5)<text:tab/><text:tab/>Name der Zeitzone</text:p>
      <text:p text:style-name="Text_20_body_20_2">*.LOCATION : INT<text:tab/><text:tab/><text:span text:style-name="T15">Location</text:span> Nummer (Siehe <text:span text:style-name="T15">Location</text:span> Setup)</text:p>
      <text:p text:style-name="Text_20_body_20_2">*.LONGITUDE : REAL<text:tab/><text:tab/>Längengrad des Ortes</text:p>
      <text:p text:style-name="Text_20_body_20_2">*.LATITUDE : REAL<text:tab/><text:tab/>Breitengrad des Ortes</text:p>
      <text:p text:style-name="Text_20_body_20_2">*.SUN_RISE : TOD<text:tab/><text:tab/>Zeitpunkt des Sonnenaufgangs</text:p>
      <text:p text:style-name="Text_20_body_20_2">*.SUN_SET : TOD<text:tab/><text:tab/>Zeitpunkt des Sonnenuntergangs</text:p>
      <text:p text:style-name="Text_20_body_20_2">*.NIGHT : BOOL<text:tab/><text:tab/>TRUE wenn Nacht</text:p>
      <text:p text:style-name="Text_20_body_20_2">*.HOLIDAY : BOOL<text:tab/><text:tab/>TRUE wenn Feiertag</text:p>
      <text:p text:style-name="Text_20_body_20_2"><text:soft-page-break/>*.HOLY_NAME : STRING(30)<text:tab/>Name des Feiertages</text:p>
      <text:list xml:id="list38442949" text:continue-list="list38461833" text:style-name="L1">
        <text:list-item>
          <text:list>
            <text:list-item>
              <text:h text:style-name="P217" text:outline-level="2"><text:alphabetical-index-mark-start text:id="IMark226158368"/>COMPLEX<text:alphabetical-index-mark-end text:id="IMark226158368"/></text:h>
            </text:list-item>
          </text:list>
        </text:list-item>
      </text:list>
      <text:p text:style-name="P159">Mit der Struktur COMPLEX werden komplexe Zahlen dargestellt-</text:p>
      <text:p text:style-name="P154">*<text:span text:style-name="T14">.RE<text:tab/>(</text:span>Realteil<text:span text:style-name="T14"> einer Komplexen Zahl)</text:span></text:p>
      <text:p text:style-name="P154">*<text:span text:style-name="T14">.IM<text:tab/>Imaginärteil einer Komplexen Zahl)</text:span></text:p>
      <text:list xml:id="list38455575" text:continue-numbering="true" text:style-name="L1">
        <text:list-item>
          <text:list>
            <text:list-item>
              <text:h text:style-name="P217" text:outline-level="2"><text:alphabetical-index-mark-start text:id="IMark226158368"/>CONSTANTS_LANGUAGE<text:alphabetical-index-mark-end text:id="IMark226158368"/></text:h>
            </text:list-item>
          </text:list>
        </text:list-item>
      </text:list>
      <text:p text:style-name="Text_20_body_20_2">Diese Struktur definiert verschiedene Sprachen als <text:span text:style-name="T15">String</text:span> Konstanten. Die Variable <text:s/>LANGUAGE der Globalen Variablenliste stellt diese in der Bibliothek zur Verfügung.</text:p>
      <text:p text:style-name="Text_20_body_20_2">*.DEFAULT : INT := 1 definiert die <text:span text:style-name="T15">default</text:span> Sprache (1=English, 2=Deutsch, 3= Französisch)</text:p>
      <text:p text:style-name="Text_20_body_20_2">Die <text:span text:style-name="T15">Default</text:span> Sprache wird immer dann verwendet wenn die Sprache 0 aufgerufen wird. Ist die Spracheinstellung &gt; 0 so wird die entsprechende Sprache gewählt.</text:p>
      <text:p text:style-name="Text_20_body_20_2">Spracheinstellung: 0 (es wird die unter DEFAULT spezifizierte Sprache verwendet)<text:tab/>(1 = Englisch, 2 = Deutsch 3 = Französisch)</text:p>
      <text:p text:style-name="Text_20_body_20_2">weitere Sprachen werden definiert indem die Struktur CONSTANTS_LANGUAGE erweitert wird.</text:p>
      <text:p text:style-name="Text_20_body_20_2">*.LMAX : INT := 3 <text:tab/>gibt an wie viele Sprachen zur Verfügung stehen</text:p>
      <text:p text:style-name="Text_20_body_20_2">*.WEEKDAYS : ARRAY[1..3, 1..7] OF STRING(10) :=<text:tab/></text:p>
      <text:p text:style-name="Text_20_body_20_2">'Monday','Tuesday','Wednesday','Thursday','Friday','Saturday','Sunday',</text:p>
      <text:p text:style-name="Text_20_body_20_2">'Montag','Dienstag','Mittwoch','Donnerstag','Freitag','Samstag','Sonntag';</text:p>
      <text:p text:style-name="Text_20_body_20_2">*.WEEKDAYS2 : ARRAY[1..3, 1..7] OF STRING(2) :=<text:tab/></text:p>
      <text:p text:style-name="Text_20_body_20_2">'Mo', 'Tu', 'We', 'Th', 'Fr', 'Sa', 'Su',</text:p>
      <text:p text:style-name="Text_20_body_20_2">'Mo', 'Di', 'Mi', 'Do', 'Fr', 'Sa', 'So';</text:p>
      <text:p text:style-name="Text_20_body_20_2">*.MONTHS : ARRAY[1..3, 1..12] OF STRING(10) :=<text:tab/><text:tab/></text:p>
      <text:p text:style-name="Text_20_body_20_2"><text:soft-page-break/>'January', 'February', 'March', 'April', 'May', 'June', 'July', 'August', 'September', 'October', 'November', 'December',</text:p>
      <text:p text:style-name="Text_20_body_20_2">'Januar', 'Februar', 'März', 'April', 'Mai', 'Juni', 'Juli', 'August', 'September', 'Oktober', 'November', 'Dezember';</text:p>
      <text:p text:style-name="Text_20_body_20_2">*.MONTHS3 : ARRAY[1..3, 1..12] OF STRING(3) :=<text:tab/><text:tab/></text:p>
      <text:p text:style-name="Text_20_body_20_2">'Jan', 'Feb', 'Mar', 'Apr', 'May', 'Jun', 'Jul', 'Aug', 'Sep', 'Oct', 'Nov', 'Dec',</text:p>
      <text:p text:style-name="Text_20_body_20_2">'Jan', 'Feb', 'Mrz', 'Apr', 'Mai', 'Jun', 'Jul', 'Aug', 'Sep', 'Okt', 'Nov', 'Dez';</text:p>
      <text:p text:style-name="Text_20_body_20_2">*.DIRS : ARRAY[1..3,0..15] OF STRING(3) :=<text:tab/><text:tab/></text:p>
      <text:p text:style-name="Text_20_body_20_2">'N','NNE','NE','ENE','E','ESE','SE','SSE','S','SSW','SW','WSW','W','WNW','NW','NNW'</text:p>
      <text:p text:style-name="Text_20_body_20_2">'N','NNO','NO','ONO','O','OSO','SO','SSO','S','SSW','SW','WSW','W','WNW','NW','NNW';</text:p>
      <text:list xml:id="list38442223" text:continue-numbering="true" text:style-name="L1">
        <text:list-item>
          <text:list>
            <text:list-item>
              <text:h text:style-name="P217" text:outline-level="2"><text:alphabetical-index-mark-start text:id="IMark226158368"/>CONSTANTS_LOCATION<text:alphabetical-index-mark-end text:id="IMark226158368"/></text:h>
            </text:list-item>
          </text:list>
        </text:list-item>
      </text:list>
      <text:p text:style-name="Text_20_body_20_2">Diese Struktur definiert Ortsabhängige Konstanten. Die Variable LOCATION der Globalen Variablenliste stellt diese in der Bibliothek zur Verfügung.</text:p>
      <text:p text:style-name="Text_20_body_20_2">*.DEFAULT : INT := 1</text:p>
      <text:p text:style-name="Text_20_body_20_2">(* 1=Deutschland, 2=Österreich, 3=Frankreich *)</text:p>
      <text:p text:style-name="Text_20_body_20_2">*.LMAX : INT := 3<text:tab/>gibt an wie viele Orte definiert sind</text:p>
      <text:p text:style-name="Text_20_body_20_2">*.HOLIDAY : ARRAY[1..3, 0..29] OF HOLIDAY_DATA</text:p>
      <text:p text:style-name="Text_20_body_20_2">in diesem Array sind die an dem Ort gültigen Feiertage definiert.</text:p>
      <text:list xml:id="list38459773" text:continue-numbering="true" text:style-name="L1">
        <text:list-item>
          <text:list>
            <text:list-item>
              <text:h text:style-name="P217" text:outline-level="2"><text:alphabetical-index-mark-start text:id="IMark226158368"/>CONSTANTS_MATH<text:alphabetical-index-mark-end text:id="IMark226158368"/></text:h>
            </text:list-item>
          </text:list>
        </text:list-item>
      </text:list>
      <text:p text:style-name="Text_20_body_20_2">Diese Struktur definiert mathematische Konstanten. Die Variable MATH der Globalen Variablenliste stellt diese in der Bibliothek zur Verfügung.</text:p>
      <text:p text:style-name="Text_20_body_20_2">*.PI : REAL := 3.14159265358<text:tab/><text:tab/>Kreiszahl PI</text:p>
      <text:p text:style-name="Text_20_body_20_2">*.PI2 : REAL := 6.28318530717<text:tab/>Kreiszahl PI * 2</text:p>
      <text:p text:style-name="Text_20_body_20_2">*.PI4 : REAL := <text:s/>12.566370614359<text:tab/>Kreiszahl PI * 4</text:p>
      <text:p text:style-name="Text_20_body_20_2">*.PI05 : REAL := <text:s/>1.5707963267949<text:tab/>Kreiszahl PI / 2<text:tab/><text:tab/><text:tab/></text:p>
      <text:p text:style-name="Text_20_body_20_2"><text:soft-page-break/>*.PI025 : REAL := 0.785398163397448<text:tab/>Kreiszahl PI / 4</text:p>
      <text:p text:style-name="Text_20_body_20_2">*.PI_INV : REAL := 0.318309886183791<text:tab/>1 / PI</text:p>
      <text:p text:style-name="Text_20_body_20_2">*.E : REAL := 2.718281828459045235<text:tab/>Eulersche Konstante e</text:p>
      <text:p text:style-name="Text_20_body_20_2">*.E_INV := 0.367879441171442<text:tab/>1 / e</text:p>
      <text:p text:style-name="Text_20_body_20_2">*.SQ2 : REAL := 1.4142135623731<text:tab/>Wurzel von 2</text:p>
      <text:list xml:id="list38468952" text:continue-numbering="true" text:style-name="L1">
        <text:list-item>
          <text:list>
            <text:list-item>
              <text:h text:style-name="P217" text:outline-level="2"><text:alphabetical-index-mark-start text:id="IMark226158368"/>CONSTANTS_PHYS<text:alphabetical-index-mark-end text:id="IMark226158368"/></text:h>
            </text:list-item>
          </text:list>
        </text:list-item>
      </text:list>
      <text:p text:style-name="Text_20_body_20_2">Diese Struktur definiert physikalische Konstanten. Die Struktur PHYS der Globalen Variablenliste stellt diese in der Bibliothek zur Verfügung.</text:p>
      <text:p text:style-name="Text_20_body_20_2">*.C : REAL := 299792458<text:tab/>Lichtgeschwindigkeit in m/s</text:p>
      <text:p text:style-name="Text_20_body_20_2">*.E : REAL := 1.60217653E-19<text:tab/>Elementarladung in Coulomb = A * s</text:p>
      <text:p text:style-name="Text_20_body_20_2">*.G : REAL := 9.80665<text:tab/>Erdbeschleunigung in m / s²</text:p>
      <text:p text:style-name="Text_20_body_20_2">*.T0 : REAL := -273.15<text:tab/>absoluter Nullpunkt in °C</text:p>
      <text:p text:style-name="Text_20_body_20_2">*.RU : REAL := 8.314472<text:tab/>Universelle Gaskonstante in J / (Mol · K)</text:p>
      <text:p text:style-name="Text_20_body_20_2">*.PN : REAL := 101325<text:tab/>Normaldruck in <text:span text:style-name="T31">Pa</text:span></text:p>
      <text:list xml:id="list38453296" text:continue-numbering="true" text:style-name="L1">
        <text:list-item>
          <text:list>
            <text:list-item>
              <text:h text:style-name="P217" text:outline-level="2"><text:alphabetical-index-mark-start text:id="IMark226158368"/>CONSTANTS_SETUP<text:alphabetical-index-mark-end text:id="IMark226158368"/></text:h>
            </text:list-item>
          </text:list>
        </text:list-item>
      </text:list>
      <text:p text:style-name="Text_20_body_20_2">Diese Struktur definiert Ortsabhängige Konstanten. Die Variable SETUP der Globalen Variablenliste stellt diese in der Bibliothek zur Verfügung.</text:p>
      <text:p text:style-name="Text_20_body_20_2">*.EXTENDED_ASCII : BOOL := TRUE erweitert den ASCII Zeichensatz um <text:tab/>Umlaute z.B. ÄÖÜ</text:p>
      <text:p text:style-name="Text_20_body_20_2">*.CHARNAMES[1..4] : STRING(253) speichert Unicode Zeichennamen</text:p>
      <text:p text:style-name="Text_20_body_20_2">*.MTH_OFS : ARRAY[1..12] OF INT := 0, 31, 59, 90, 120, 151, 181, 212, <text:tab/>243, 273, 304, 334;</text:p>
      <text:p text:style-name="Text_20_body_20_2">MTH_OFS wird in verschiedenen Datumsfunktionen verwendet, im Array steht der jeweilige Tagesoffset für die Monate des Jahres. Der 1. Februar eines Jahre ist z.B. der Tag 31 + 1.</text:p>
      <text:p text:style-name="Text_20_body_20_2">*.DECADES : ARRAY[0..8] OF REAL := 1,10,100,1000,10000,100000,</text:p>
      <text:p text:style-name="Text_20_body_20_2"><text:tab/>1000000,10000000,100000000; </text:p>
      <text:list xml:id="list38445996" text:continue-numbering="true" text:style-name="L1">
        <text:list-item>
          <text:list>
            <text:list-item>
              <text:h text:style-name="P217" text:outline-level="2"><text:soft-page-break/><text:alphabetical-index-mark-start text:id="IMark226158368"/>ESR_DATA<text:alphabetical-index-mark-end text:id="IMark226158368"/></text:h>
            </text:list-item>
          </text:list>
        </text:list-item>
      </text:list>
      <text:p text:style-name="Text_20_body_20_2">Die Struktur ESR_DATA wir für <text:span text:style-name="T15">Error-</text:span> und Status- <text:span text:style-name="T15">Reporting</text:span> Bausteine verwendet.</text:p>
      <text:p text:style-name="Text_20_body_20_2">*.TYP : BYTE<text:tab/><text:tab/>Datentyp</text:p>
      <text:p text:style-name="Text_20_body_20_2">*.ADRESS : STRING(10)<text:tab/>Adressbezeichnung</text:p>
      <text:p text:style-name="Text_20_body_20_2">*.DS : DT<text:tab/><text:tab/><text:tab/>Datums- Zeit- Stempel</text:p>
      <text:p text:style-name="Text_20_body_20_2">*.TS : TIME<text:tab/><text:tab/>Zeitstempel in Millisekunden</text:p>
      <text:p text:style-name="Text_20_body_20_2">*.DATA : ARRAY[0..7] OF BYTE<text:tab/>Datenpaket</text:p>
      <text:list xml:id="list38473630" text:continue-numbering="true" text:style-name="L1">
        <text:list-item>
          <text:list>
            <text:list-item>
              <text:h text:style-name="P217" text:outline-level="2"><text:alphabetical-index-mark-start text:id="IMark226158368"/>HOLIDAY_DATA<text:alphabetical-index-mark-end text:id="IMark226158368"/></text:h>
            </text:list-item>
          </text:list>
        </text:list-item>
      </text:list>
      <text:p text:style-name="Text_20_body_20_2">Die Struktur HOLIDAY_DATA findet Verwendung zur Definition und Beschreibung von Feiertagen.</text:p>
      <text:p text:style-name="Text_20_body_20_2">*.NAME : STRING(30)<text:tab/><text:tab/>Name des Feiertages</text:p>
      <text:p text:style-name="Text_20_body_20_2">*.DAY : SINT<text:tab/><text:tab/>Tag des Feiertages</text:p>
      <text:p text:style-name="Text_20_body_20_2">*.MONTH : SINT<text:tab/><text:tab/>Monat des Feiertages</text:p>
      <text:p text:style-name="Text_20_body_20_2">*.USE : SINT<text:tab/><text:tab/>aktiviert den Feiertag</text:p>
      <text:list xml:id="list38467916" text:continue-numbering="true" text:style-name="L1">
        <text:list-item>
          <text:list>
            <text:list-item>
              <text:h text:style-name="P223" text:outline-level="2"><text:alphabetical-index-mark-start text:id="IMark226158368"/>NETWORK_BUFFER<text:alphabetical-index-mark-end text:id="IMark226158368"/></text:h>
            </text:list-item>
          </text:list>
        </text:list-item>
      </text:list>
      <text:p text:style-name="P154"><text:span text:style-name="T14">*.SIZE : U</text:span>INT<text:tab/>Zeigt an wie viele Bytes der Puffer beinhaltet</text:p>
      <text:p text:style-name="P154">*.BUFFER<text:span text:style-name="T14"> : ARRAY[1..NETWORK_BUFFER_SIZE] OF BYTE<text:tab/>Puffer</text:span></text:p>
      <text:list xml:id="list38445483" text:continue-numbering="true" text:style-name="L1">
        <text:list-item>
          <text:list>
            <text:list-item>
              <text:h text:style-name="P223" text:outline-level="2"><text:soft-page-break/><text:alphabetical-index-mark-start text:id="IMark226158368"/>REAL2<text:alphabetical-index-mark-end text:id="IMark226158368"/></text:h>
            </text:list-item>
          </text:list>
        </text:list-item>
      </text:list>
      <text:p text:style-name="P154"><text:span text:style-name="T14">Die Struktur RE</text:span>AL2 simuliert auf Systemen ohne LREAL eine Gleitpunktzahl doppelter Genauigkeit. jedoch mit Einschränkungen und nur mit speziellen Funktionen.</text:p>
      <text:p text:style-name="P154">*.R1 : REAL<text:tab/><text:tab/>Grobteil der Doppelzahl</text:p>
      <text:p text:style-name="P154">*.RX : REAL<text:span text:style-name="T14"><text:tab/><text:tab/>Feinteil der Doppelzahl</text:span></text:p>
      <text:list xml:id="list38465160" text:continue-numbering="true" text:style-name="L1">
        <text:list-item>
          <text:list>
            <text:list-item>
              <text:h text:style-name="P223" text:outline-level="2"><text:alphabetical-index-mark-start text:id="IMark226158368"/>SDT<text:alphabetical-index-mark-end text:id="IMark226158368"/></text:h>
            </text:list-item>
          </text:list>
        </text:list-item>
      </text:list>
      <text:p text:style-name="P154"><text:span text:style-name="T14">Die Strukt</text:span>ur SDT definiert ein strukturiertes Zeit- Datums- Format.</text:p>
      <text:p text:style-name="P154">*.YEAR : INT<text:tab/><text:tab/>Jahr</text:p>
      <text:p text:style-name="P154">*.MONTH : INT<text:tab/><text:tab/>Monat</text:p>
      <text:p text:style-name="P154">*.DAY : IN<text:span text:style-name="T14">T<text:tab/><text:tab/>Tag</text:span></text:p>
      <text:p text:style-name="P154"><text:span text:style-name="T14">*.WEE</text:span>KDAY : INT<text:tab/><text:tab/>Wochentag (1 = Montag, 7 = Sonntag) </text:p>
      <text:p text:style-name="P154">*.HOUR : INT<text:tab/><text:tab/>Stunden</text:p>
      <text:p text:style-name="P154">*.MINUTE : INT<text:tab/><text:tab/>Minuten</text:p>
      <text:p text:style-name="P154">*.SECOND : INT<text:tab/><text:tab/>Sekunden</text:p>
      <text:p text:style-name="P154">*.MS : <text:span text:style-name="T14">INT<text:tab/><text:tab/><text:tab/>Millisekunden</text:span></text:p>
      <text:list xml:id="list38474617" text:continue-numbering="true" text:style-name="L1">
        <text:list-item>
          <text:list>
            <text:list-item>
              <text:h text:style-name="P223" text:outline-level="2"><text:alphabetical-index-mark-start text:id="IMark226158368"/>TIMER_EVENT<text:alphabetical-index-mark-end text:id="IMark226158368"/></text:h>
            </text:list-item>
          </text:list>
        </text:list-item>
      </text:list>
      <text:p text:style-name="P154"><text:span text:style-name="T14">Die Strukt</text:span>ur TIMER_EVENT definiert und speichert Vorgaben für Timer und Ereignisse.</text:p>
      <text:p text:style-name="P154">*.TYP : BYTE<text:tab/><text:tab/><text:tab/>Ereignistyp</text:p>
      <text:p text:style-name="P154">*.CHANNEL : BYTE<text:tab/><text:tab/><text:tab/>Kanal</text:p>
      <text:p text:style-name="P154">*.DAY : BYTE<text:tab/><text:tab/><text:tab/>Tag oder Tage</text:p>
      <text:p text:style-name="P154">*.START : TOD<text:tab/><text:tab/><text:tab/>Anfangszeit</text:p>
      <text:p text:style-name="P154">*.DURATION : TIME<text:tab/><text:tab/><text:tab/>Dauer</text:p>
      <text:p text:style-name="P154">*.LAND : BYTE<text:tab/><text:tab/><text:tab/>Logisches AND</text:p>
      <text:p text:style-name="P154"><text:soft-page-break/>*.LOR : BYTE<text:tab/><text:tab/><text:tab/>Logisches OR</text:p>
      <text:p text:style-name="P154">*.LAST : DWO<text:span text:style-name="T14">RD<text:tab/><text:tab/><text:tab/>letzte Aktivität des Ereignisses</text:span></text:p>
      <text:list xml:id="list38447561" text:continue-numbering="true" text:style-name="L1">
        <text:list-item>
          <text:list>
            <text:list-item>
              <text:h text:style-name="P223" text:outline-level="2"><text:alphabetical-index-mark-start text:id="IMark226158368"/>URL<text:alphabetical-index-mark-end text:id="IMark226158368"/></text:h>
            </text:list-item>
          </text:list>
        </text:list-item>
      </text:list>
      <text:p text:style-name="P154"><text:span text:style-name="T14">Die </text:span>Struktur<text:span text:style-name="T14"> URL speichert die einzelnen Bestandeile einer URL.</text:span></text:p>
      <text:p text:style-name="P154"><text:span text:style-name="T14">*.</text:span>PROTOCOL<text:span text:style-name="T14"> : STRING(10)<text:tab/><text:tab/>Protokoll</text:span></text:p>
      <text:p text:style-name="P154"><text:span text:style-name="T14">*.USE</text:span>R : STRING(20)<text:tab/><text:tab/><text:tab/>User Name</text:p>
      <text:p text:style-name="P154">*.PASSWORD : STRING(20)<text:tab/><text:tab/>Passwort</text:p>
      <text:p text:style-name="P154">*.DOMAIN : STRING(80)<text:tab/><text:tab/>Domain</text:p>
      <text:p text:style-name="P154">*.PORT : WORD<text:tab/><text:tab/><text:tab/>Port Nummer</text:p>
      <text:p text:style-name="P154">*.PATH : STRING(80)<text:tab/><text:tab/><text:tab/>Pfadangabe</text:p>
      <text:p text:style-name="P154">*.QUERY : STRING(40)<text:tab/><text:tab/><text:span text:style-name="T2">Query</text:span></text:p>
      <text:p text:style-name="P154">*.ANCHOR<text:span text:style-name="T14"> : STRING(40)<text:tab/><text:tab/>Anker</text:span></text:p>
      <text:list xml:id="list38445171" text:continue-numbering="true" text:style-name="L1">
        <text:list-item>
          <text:list>
            <text:list-item>
              <text:h text:style-name="P223" text:outline-level="2"><text:alphabetical-index-mark-start text:id="IMark226158368"/>VEKTOR_3<text:alphabetical-index-mark-end text:id="IMark226158368"/></text:h>
            </text:list-item>
          </text:list>
        </text:list-item>
      </text:list>
      <text:p text:style-name="P154"><text:span text:style-name="T14">Die </text:span>Struktur<text:span text:style-name="T14"> VEKTOR_3 speichert die 3 Vektoren eines dreidimensionalen Vektorraums.</text:span></text:p>
      <text:p text:style-name="P154"><text:span text:style-name="T14">*.X : </text:span>REAL<text:span text:style-name="T14"><text:tab/><text:tab/><text:tab/>Komponente in X - Richtung</text:span></text:p>
      <text:p text:style-name="P154"><text:span text:style-name="T14">*.Y : </text:span>REAL<text:span text:style-name="T14"><text:tab/><text:tab/><text:tab/>Komponente in Y - Richtung</text:span></text:p>
      <text:p text:style-name="P154"><text:span text:style-name="T14">*.Z : </text:span>REAL<text:span text:style-name="T14"><text:tab/><text:tab/><text:tab/>Komponente in Z - Richtung</text:span></text:p>
      <text:list xml:id="list38466787" text:continue-numbering="true" text:style-name="L1">
        <text:list-item>
          <text:h text:style-name="P209" text:outline-level="1"><text:alphabetical-index-mark-start text:id="IMark226158368"/>Diverse Funktionen<text:alphabetical-index-mark-end text:id="IMark226158368"/></text:h>
          <text:list>
            <text:list-item>
              <text:h text:style-name="P216" text:outline-level="2"><text:alphabetical-index-mark-start text:id="IMark226158368"/>ESR_COLLECT<text:alphabetical-index-mark-end text:id="IMark226158368"/></text:h>
            </text:list-item>
          </text:list>
        </text:list-item>
      </text:list>
      <text:p text:style-name="P69">Type<text:tab/>Funktionsbaustein</text:p>
      <text:p text:style-name="P2"><text:span text:style-name="T2">Input</text:span><text:tab/><text:span text:style-name="T12">ESR_0</text:span>..7 : ESR_DATA (ESR_Eingänge)</text:p>
      <text:p text:style-name="P179"><text:tab/>RST : BOOL (Asynchroner Reset Eingang)</text:p>
      <text:p text:style-name="P2"><text:span text:style-name="T12">Output</text:span><text:tab/><text:span text:style-name="T12">ESR_OUT</text:span> : <text:span text:style-name="T12">ESR_DATA</text:span> (Array mit dem ESR-Protokoll)</text:p>
      <text:p text:style-name="P2"><draw:frame draw:style-name="fr3" draw:name="Grafik254" text:anchor-type="paragraph" svg:x="1.222cm" svg:y="0.621cm" svg:width="3.69cm" svg:height="4.3cm" draw:z-index="366"><draw:image xlink:href="Pictures/10000000000001170000014511C380CE.png" xlink:type="simple" xlink:show="embed" xlink:actuate="onLoad"/></draw:frame><text:tab/>POS : <text:span text:style-name="T12">INT</text:span> (<text:span text:style-name="T12">Position</text:span> des <text:span text:style-name="T12">neusten</text:span> ESR Protokolls im Array)</text:p>
      <text:p text:style-name="P26"><text:line-break/>ESR_COLLECT sammelt ESR-Daten von bis zu 8 ESR-Bausteinen und speichert das Protokoll in einem Array. Der Ausgang POS zeigt an, an welcher Position des Arrays ESR_OUT sich die momentan letzte ESR-Meldung befindet. Sammelt der Baustein mehr als 64 Meldungen, so werden die ältesten Meldungen überschrieben. Mit dem Asynchronen Reset Eingang kann der Baustein jederzeit zurückgesetzt werden. Durch einen Reset werden alle gesammelten Reset Daten gelöscht und der Positionszeiger auf Null gestellt.</text:p>
      <text:p text:style-name="P8"><draw:frame draw:style-name="fr3" draw:name="Grafik256" text:anchor-type="paragraph" svg:x="1.078cm" svg:y="1.263cm" svg:width="11.15cm" svg:height="8.059cm" draw:z-index="211"><draw:image xlink:href="Pictures/100000000000023200000196069C2F5F.png" xlink:type="simple" xlink:show="embed" xlink:actuate="onLoad"/></draw:frame><text:soft-page-break/>Das folgende Beispiel demonstriert, wie ESR_COLLECT mit ESR-Bausteinen zusammen geschaltet wird.</text:p>
      <text:p text:style-name="P35"><text:line-break/>Der Ausgang ESR_OUT ist vom Typ ESR_DATA und setzt sich wie folgt zusammen:</text:p>
      <table:table table:name="Tabelle27" table:style-name="Tabelle27">
        <table:table-column table:style-name="Tabelle27.A"/>
        <table:table-column table:style-name="Tabelle27.B"/>
        <table:table-column table:style-name="Tabelle27.C"/>
        <table:table-column table:style-name="Tabelle27.D"/>
        <table:table-column table:style-name="Tabelle27.E"/>
        <table:table-column table:style-name="Tabelle27.F"/>
        <table:table-row>
          <table:table-cell table:style-name="Tabelle27.A1" office:value-type="string">
            <text:p text:style-name="P94">.TYP</text:p>
          </table:table-cell>
          <table:table-cell table:style-name="Tabelle27.A1" office:value-type="string">
            <text:p text:style-name="P94">.ADRESS</text:p>
          </table:table-cell>
          <table:table-cell table:style-name="Tabelle27.A1" office:value-type="string">
            <text:p text:style-name="P94">.DS</text:p>
          </table:table-cell>
          <table:table-cell table:style-name="Tabelle27.A1" office:value-type="string">
            <text:p text:style-name="P94">.TS</text:p>
          </table:table-cell>
          <table:table-cell table:style-name="Tabelle27.A1" office:value-type="string">
            <text:p text:style-name="P94">.DATA[0..7]</text:p>
          </table:table-cell>
          <table:table-cell table:style-name="Tabelle27.F1" office:value-type="string">
            <text:p text:style-name="P94"/>
          </table:table-cell>
        </table:table-row>
        <table:table-row>
          <table:table-cell table:style-name="Tabelle27.A2" office:value-type="string">
            <text:p text:style-name="P94">1</text:p>
          </table:table-cell>
          <table:table-cell table:style-name="Tabelle27.A2" office:value-type="string">
            <text:p text:style-name="P95">Label</text:p>
          </table:table-cell>
          <table:table-cell table:style-name="Tabelle27.A2" office:value-type="string">
            <text:p text:style-name="P94">Date</text:p>
          </table:table-cell>
          <table:table-cell table:style-name="Tabelle27.A2" office:value-type="string">
            <text:p text:style-name="P94">TIME</text:p>
          </table:table-cell>
          <table:table-cell table:style-name="Tabelle27.A2" office:value-type="string">
            <text:p text:style-name="P94">Status, 1 Byte</text:p>
          </table:table-cell>
          <table:table-cell table:style-name="Tabelle27.F2" office:value-type="string">
            <text:p text:style-name="P94">ESR <text:span text:style-name="T2">Error</text:span></text:p>
          </table:table-cell>
        </table:table-row>
        <table:table-row>
          <table:table-cell table:style-name="Tabelle27.A2" office:value-type="string">
            <text:p text:style-name="P94">2</text:p>
          </table:table-cell>
          <table:table-cell table:style-name="Tabelle27.A2" office:value-type="string">
            <text:p text:style-name="P95">Label</text:p>
          </table:table-cell>
          <table:table-cell table:style-name="Tabelle27.A2" office:value-type="string">
            <text:p text:style-name="P94">Date</text:p>
          </table:table-cell>
          <table:table-cell table:style-name="Tabelle27.A2" office:value-type="string">
            <text:p text:style-name="P94">TIME</text:p>
          </table:table-cell>
          <table:table-cell table:style-name="Tabelle27.A2" office:value-type="string">
            <text:p text:style-name="P94">Status, 1 Byte</text:p>
          </table:table-cell>
          <table:table-cell table:style-name="Tabelle27.F2" office:value-type="string">
            <text:p text:style-name="P94">ESR Status</text:p>
          </table:table-cell>
        </table:table-row>
        <table:table-row>
          <table:table-cell table:style-name="Tabelle27.A2" office:value-type="string">
            <text:p text:style-name="P94">3</text:p>
          </table:table-cell>
          <table:table-cell table:style-name="Tabelle27.A2" office:value-type="string">
            <text:p text:style-name="P95">Label</text:p>
          </table:table-cell>
          <table:table-cell table:style-name="Tabelle27.A2" office:value-type="string">
            <text:p text:style-name="P94">Date</text:p>
          </table:table-cell>
          <table:table-cell table:style-name="Tabelle27.A2" office:value-type="string">
            <text:p text:style-name="P94">TIME</text:p>
          </table:table-cell>
          <table:table-cell table:style-name="Tabelle27.A2" office:value-type="string">
            <text:p text:style-name="P94">Status, 1 Byte</text:p>
          </table:table-cell>
          <table:table-cell table:style-name="Tabelle27.F2" office:value-type="string">
            <text:p text:style-name="P94">ESR <text:span text:style-name="T2">Debug</text:span></text:p>
          </table:table-cell>
        </table:table-row>
        <table:table-row>
          <table:table-cell table:style-name="Tabelle27.A2" office:value-type="string">
            <text:p text:style-name="P94">10</text:p>
          </table:table-cell>
          <table:table-cell table:style-name="Tabelle27.A2" office:value-type="string">
            <text:p text:style-name="P95">Label</text:p>
          </table:table-cell>
          <table:table-cell table:style-name="Tabelle27.A2" office:value-type="string">
            <text:p text:style-name="P94">Date</text:p>
          </table:table-cell>
          <table:table-cell table:style-name="Tabelle27.A2" office:value-type="string">
            <text:p text:style-name="P94">TIME</text:p>
          </table:table-cell>
          <table:table-cell table:style-name="Tabelle27.A2" office:value-type="string">
            <text:p text:style-name="P94"><text:span text:style-name="T2">not</text:span> <text:span text:style-name="T2">used</text:span></text:p>
          </table:table-cell>
          <table:table-cell table:style-name="Tabelle27.F2" office:value-type="string">
            <text:p text:style-name="P94"><text:span text:style-name="T2">Boolean</text:span> input <text:span text:style-name="T2">low</text:span> <text:span text:style-name="T2">transition</text:span></text:p>
          </table:table-cell>
        </table:table-row>
        <table:table-row>
          <table:table-cell table:style-name="Tabelle27.A2" office:value-type="string">
            <text:p text:style-name="P94">11</text:p>
          </table:table-cell>
          <table:table-cell table:style-name="Tabelle27.A2" office:value-type="string">
            <text:p text:style-name="P95">Label</text:p>
          </table:table-cell>
          <table:table-cell table:style-name="Tabelle27.A2" office:value-type="string">
            <text:p text:style-name="P94">Date</text:p>
          </table:table-cell>
          <table:table-cell table:style-name="Tabelle27.A2" office:value-type="string">
            <text:p text:style-name="P94">TIME</text:p>
          </table:table-cell>
          <table:table-cell table:style-name="Tabelle27.A2" office:value-type="string">
            <text:p text:style-name="P94"><text:span text:style-name="T2">not</text:span> <text:span text:style-name="T2">used</text:span></text:p>
          </table:table-cell>
          <table:table-cell table:style-name="Tabelle27.F2" office:value-type="string">
            <text:p text:style-name="P94"><text:span text:style-name="T2">Boolean</text:span> input <text:span text:style-name="T2">high</text:span> <text:span text:style-name="T2">transition</text:span></text:p>
          </table:table-cell>
        </table:table-row>
        <table:table-row>
          <table:table-cell table:style-name="Tabelle27.A2" office:value-type="string">
            <text:p text:style-name="P94">20</text:p>
          </table:table-cell>
          <table:table-cell table:style-name="Tabelle27.A2" office:value-type="string">
            <text:p text:style-name="P95">Label</text:p>
          </table:table-cell>
          <table:table-cell table:style-name="Tabelle27.A2" office:value-type="string">
            <text:p text:style-name="P94">Date</text:p>
          </table:table-cell>
          <table:table-cell table:style-name="Tabelle27.A2" office:value-type="string">
            <text:p text:style-name="P94">TIME</text:p>
          </table:table-cell>
          <table:table-cell table:style-name="Tabelle27.A2" office:value-type="string">
            <text:p text:style-name="P94">Byte 0 - 3 Real <text:span text:style-name="T2">Value</text:span></text:p>
          </table:table-cell>
          <table:table-cell table:style-name="Tabelle27.F2" office:value-type="string">
            <text:p text:style-name="P94">Real <text:span text:style-name="T2">Value</text:span> <text:span text:style-name="T2">change</text:span></text:p>
          </table:table-cell>
        </table:table-row>
      </table:table>
      <text:p text:style-name="P179"/>
      <text:p text:style-name="P179">Die ESR Daten enthalten folgende Informationen:</text:p>
      <text:p text:style-name="P179">ESR_DATA.TYP<text:tab/>Datentyp siehe vorstehende Tabelle</text:p>
      <text:p text:style-name="P173"><text:span text:style-name="T14">ESR_DATA.ADRESS<text:tab/>bis zu 10 Zeichen langer </text:span><text:span text:style-name="T15">String</text:span><text:span text:style-name="T14"> der die Datenquelle </text:span></text:p>
      <text:p text:style-name="P179"><text:tab/><text:tab/>Bezeichnet</text:p>
      <text:p text:style-name="P179">ESR_DATA.DS<text:tab/>Datums Stempel von Typ DATATIME</text:p>
      <text:p text:style-name="P173"><text:span text:style-name="T14">ESR_DATA.TS<text:tab/>Zeitstempel vom Typ TIME (SPS </text:span><text:span text:style-name="T15">Timer</text:span><text:span text:style-name="T14">)</text:span></text:p>
      <text:p text:style-name="P179">ESR_DATA.DATA<text:tab/>bis zu 8 Byte Datenblock</text:p>
      <text:list xml:id="list38461145" text:continue-numbering="true" text:style-name="L1">
        <text:list-item>
          <text:list>
            <text:list-item>
              <text:h text:style-name="P216" text:outline-level="2"><text:soft-page-break/><text:alphabetical-index-mark-start text:id="IMark226158368"/>ESR_MON_B8<text:alphabetical-index-mark-end text:id="IMark226158368"/></text:h>
            </text:list-item>
          </text:list>
        </text:list-item>
      </text:list>
      <text:p text:style-name="P69">Type<text:tab/>Funktionsbaustein</text:p>
      <text:p text:style-name="P173"><text:span text:style-name="T15">Input</text:span><text:span text:style-name="T14"><text:tab/>S0..7 : BOOL (Signaleingänge)</text:span></text:p>
      <text:p text:style-name="P179"><text:tab/>DT_IN : DATE_TIME (Zeit- Datum-Eingang für Zeitstempel)</text:p>
      <text:p text:style-name="P179">Output<text:tab/>ESR_OUT : ESR_Data (ESR_Datenausgang)</text:p>
      <text:p text:style-name="P179"><text:tab/>ESR_FLAG : BOOL (TRUE, wenn ESR-Daten vorhanden sind)</text:p>
      <text:p text:style-name="P173"><draw:frame draw:style-name="fr3" draw:name="Grafik255" text:anchor-type="paragraph" svg:x="1.175cm" svg:y="0.757cm" svg:width="4.069cm" svg:height="4.89cm" draw:z-index="248"><draw:image xlink:href="Pictures/100000000000013400000172E4A36C0D.png" xlink:type="simple" xlink:show="embed" xlink:actuate="onLoad"/></draw:frame>Config<text:span text:style-name="T14"><text:tab/>A0..7 : STRING(10) (Bezeichnung der Eingänge)</text:span></text:p>
      <text:p text:style-name="P173"><text:span text:style-name="T14"><text:line-break/>ESR_MON_B8 überwacht bis zu 8 Binäre Signale auf Änderungen, und versieht sie mit einem </text:span><text:span text:style-name="T15">Zeitstempel</text:span><text:span text:style-name="T14"> und einer Bezeichnung. Die gesammelten Meldungen werden gepuffert und an einen Protokollbaustein über ESR_OUT weitergereicht. Der Ausgang ESR_FLAG wird auf TRUE gesetzt, wenn Meldungen vorhanden sind.</text:span></text:p>
      <text:p text:style-name="P178">Die ESR-Daten am Ausgang setzen sich wie folgt zusammen:</text:p>
      <text:p text:style-name="P66"><text:span text:style-name="T14">.TYP<text:tab/></text:span><text:span text:style-name="T15">11 </text:span>steigende<text:span text:style-name="T15"> </text:span>Flanke<text:span text:style-name="T15">, 10 </text:span>fallende<text:span text:style-name="T15"> </text:span>Flanke</text:p>
      <text:p text:style-name="P69">.ADRESS<text:tab/>Adresse Byte der ESR-Datenaufzeichnung</text:p>
      <text:p text:style-name="P69">.LINE<text:tab/>Liniennummer (Eingang) der ESR-Datenaufzeichnung</text:p>
      <text:p text:style-name="P69">.DS<text:tab/>Datumsstempel vom Typ DATE_TIME</text:p>
      <text:p text:style-name="P66"><text:span text:style-name="T14">.DT<text:tab/>Zeitstempel vom Typ TIME (SPS-</text:span><text:span text:style-name="T15">Timer</text:span><text:span text:style-name="T14">)</text:span></text:p>
      <text:p text:style-name="P79">.Data<text:tab/>Datenblock von 8 Byte unbelegt</text:p>
      <text:p text:style-name="P190"/>
      <text:p text:style-name="P190"/>
      <text:list xml:id="list38468154" text:continue-numbering="true" text:style-name="L1">
        <text:list-item>
          <text:list>
            <text:list-item>
              <text:h text:style-name="P216" text:outline-level="2"><text:soft-page-break/><text:alphabetical-index-mark-start text:id="IMark226158368"/>ESR_MON_R4<text:alphabetical-index-mark-end text:id="IMark226158368"/></text:h>
            </text:list-item>
          </text:list>
        </text:list-item>
      </text:list>
      <text:p text:style-name="P2"><text:span text:style-name="T12">Type</text:span><text:tab/><text:span text:style-name="T12">Funktionsbaustein</text:span></text:p>
      <text:p text:style-name="P66"><text:span text:style-name="T15">Input</text:span><text:span text:style-name="T14"><text:tab/>R0..3 : REAL (Signaleingänge)</text:span></text:p>
      <text:p text:style-name="P69"><text:tab/>DT_IN : DATE_TIME (Zeit- Datum-Eingang für Zeitstempel)</text:p>
      <text:p text:style-name="P69">Output<text:tab/>ESR_OUT : ESR_Data (ESR_Datenausgang)</text:p>
      <text:p text:style-name="P69"><text:tab/>ESR_FLAG : BOOL (TRUE, wenn ESR-Daten vorhanden sind)</text:p>
      <text:p text:style-name="P69">Config<text:tab/>A0..3 : STRING(10) (Signaladresse der Eingänge)</text:p>
      <text:p text:style-name="P69"><draw:frame draw:style-name="fr3" draw:name="Grafik259" text:anchor-type="paragraph" svg:x="1.166cm" svg:y="0.665cm" svg:width="4.069cm" svg:height="3.099cm" draw:z-index="214"><draw:image xlink:href="Pictures/1000000000000134000000EA867DD4FA.png" xlink:type="simple" xlink:show="embed" xlink:actuate="onLoad"/></draw:frame><text:tab/>S0..3 : REAL (Schwellenwerte für Signaländerung)</text:p>
      <text:p text:style-name="P173"><text:span text:style-name="T14"><text:line-break/>ESR_MON_R4 überwacht bis zu 4 Analoge Signale auf Änderungen und versieht sie mit einem </text:span>Zeit<text:span text:style-name="T15">s</text:span>tempel<text:span text:style-name="T14"> und der Signaladresse des entsprechenden Eingangs. Die gesammelten Meldungen werden gepuffert und an einen Protokollbaustein über ESR_OUT weitergereicht. Der Ausgang ESR_FLAG wird auf TRUE gesetzt, wenn Meldungen vorhanden sind. Eine Änderung eines Eingangs wird nur dann aufgezeichnet, wenn sich der Eingang um mehr als durch den Schwellenwert S vorgegebenen Wert geändert hat.</text:span></text:p>
      <text:p text:style-name="P66"><text:span text:style-name="T14">.TYP<text:tab/>20</text:span><text:span text:style-name="T15"> </text:span>Gleitpunktwert</text:p>
      <text:p text:style-name="P69">.ADRESS<text:tab/>Adresse Byte der ESR-Datenaufzeichnung</text:p>
      <text:p text:style-name="P69">.LINE<text:tab/>Liniennummer (Eingang) der ESR-Datenaufzeichnung</text:p>
      <text:p text:style-name="P69">.DS<text:tab/>Datumsstempel vom Typ DATE_TIME</text:p>
      <text:p text:style-name="P66"><text:span text:style-name="T14">.DT<text:tab/>Zeitstempel vom Typ TIME (SPS-</text:span><text:span text:style-name="T15">Timer</text:span><text:span text:style-name="T14">)</text:span></text:p>
      <text:p text:style-name="P79">.Data<text:tab/>Datenblock 4 Byte Real Wert</text:p>
      <text:p text:style-name="P190"/>
      <text:p text:style-name="P190"/>
      <text:p text:style-name="P190"/>
      <text:list xml:id="list38449378" text:continue-numbering="true" text:style-name="L1">
        <text:list-item>
          <text:list>
            <text:list-item>
              <text:h text:style-name="P216" text:outline-level="2"><text:soft-page-break/><text:alphabetical-index-mark-start text:id="IMark226158368"/>ESR_MON_X8<text:alphabetical-index-mark-end text:id="IMark226158368"/></text:h>
            </text:list-item>
          </text:list>
        </text:list-item>
      </text:list>
      <text:p text:style-name="P69">Type<text:tab/>Funktionsbaustein</text:p>
      <text:p text:style-name="P2"><text:span text:style-name="T5">Input</text:span><text:tab/>S0..7 : <text:span text:style-name="T12">Byte</text:span> (Statuseingänge)</text:p>
      <text:p text:style-name="P69"><text:tab/>DT_IN : DATE_TIME (Zeit-Datum-Eingang für Zeitstempel)</text:p>
      <text:p text:style-name="P69"><text:tab/>Mode : Byte (legt die zu verarbeitende Art von Meldungen fest)</text:p>
      <text:p text:style-name="P66"><text:span text:style-name="T14">Output<text:tab/>ESR_OUT : Array[0..7] </text:span><text:span text:style-name="T15">of</text:span><text:span text:style-name="T14"> ESR_DATA (gesammelte Meldungen)</text:span></text:p>
      <text:p text:style-name="P69"><text:tab/>ESR_FLAG : BOOL (TRUE, wenn Meldungen vorhanden sind)</text:p>
      <text:p text:style-name="P66"><draw:frame draw:style-name="fr3" draw:name="Grafik234" text:anchor-type="paragraph" svg:x="1.081cm" svg:y="0.69cm" svg:width="4.069cm" svg:height="5.339cm" draw:z-index="249"><draw:image xlink:href="Pictures/1000000000000134000001940DB60963.png" xlink:type="simple" xlink:show="embed" xlink:actuate="onLoad"/></draw:frame><text:span text:style-name="T14">Config<text:tab/>A0..7 : </text:span><text:span text:style-name="T15">STRING</text:span><text:span text:style-name="T14">(10) (Signaladresse der Eingänge)</text:span></text:p>
      <text:p text:style-name="P173"><text:span text:style-name="T14"><text:line-break/>ESR_MON_X8 sammelt Status-Meldungen von bis zu 8 ESR kompatiblen Bausteinen ein, versieht sie mit einem </text:span><text:span text:style-name="T15">Zeitstempel</text:span><text:span text:style-name="T14">, </text:span><text:span text:style-name="T15">Datumsstempel,</text:span><text:span text:style-name="T14"> Eingangsnummer und einer Bausteinadresse. Die gesammelten Meldungen werden gepuffert und an einen Protokollbaustein weitergereicht. Wenn Meldungen zur Weitergabe vorhanden sind, wird dies mit dem Signal ESR_FLAG signalisiert. AM Eingang DT_IN sollte die aktuelle Uhrzeit, die für den Zeitstempel der Meldungen dient anliegen. Der Eingang MODE legt fest, welche Statusmeldungen weitergereicht werden sollen. <text:s text:c="52"/></text:span></text:p>
      <text:list xml:id="list37498937" text:style-name="L5">
        <text:list-item>
          <text:p text:style-name="P234">Mode = 1, nur Fehlermeldungen werden verarbeitet.</text:p>
        </text:list-item>
        <text:list-item>
          <text:p text:style-name="P233">Mode = 2, Status- und Fehlermeldungen werden verarbeitet.</text:p>
        </text:list-item>
        <text:list-item>
          <text:p text:style-name="P233">Mode = 3, Fehler, Status und <text:span text:style-name="T2">Debug-</text:span>Meldungen werden verarbeitet.</text:p>
        </text:list-item>
      </text:list>
      <text:p text:style-name="P179">Wenn der Eingang MODE nicht beschaltet wird, werden automatisch alle Meldungen verarbeitet.</text:p>
      <text:p text:style-name="P175"><text:span text:style-name="T14">Die ESR-Daten am Ausgang setzen sich wie folgt zusammen:<text:line-break/>.TYP<text:tab/>1=Fehler, 2=Status, 3=</text:span><text:span text:style-name="T15">Debug<text:line-break/></text:span><text:span text:style-name="T14">.ADRESS<text:tab/>Adresse Byte der ESR-Datenaufzeichnung<text:line-break/>.LINE<text:tab/>Liniennummer (Eingang) der ESR-Datenaufzeichnung<text:line-break/>.DS<text:tab/>Datumsstempel vom Typ DATE_TIME<text:line-break/>.DT<text:tab/>Zeitstempel vom Typ TIME (SPS-</text:span><text:span text:style-name="T15">Timer</text:span><text:span text:style-name="T14">)<text:line-break/>.Data<text:tab/>Data Byte 0 enthält die Statusmeldung</text:span></text:p>
      <text:list xml:id="list38467351" text:continue-list="list38449378" text:style-name="L1">
        <text:list-item>
          <text:list>
            <text:list-item>
              <text:h text:style-name="P216" text:outline-level="2"><text:soft-page-break/><text:alphabetical-index-mark-start text:id="IMark226158368"/><text:alphabetical-index-mark-start text:id="IMark229047460"/>OSCAT_VERSION<text:alphabetical-index-mark-end text:id="IMark229047460"/><text:alphabetical-index-mark-end text:id="IMark226158368"/></text:h>
            </text:list-item>
          </text:list>
        </text:list-item>
      </text:list>
      <text:p text:style-name="P69">Type<text:tab/>Funktion : DWORD</text:p>
      <text:p text:style-name="P173"><text:span text:style-name="T15">Input</text:span><text:span text:style-name="T14"><text:tab/>IN : BOOL (wenn TRUE liefert der Baustein das </text:span><text:span text:style-name="T15">Release</text:span><text:span text:style-name="T14"> Datum)</text:span></text:p>
      <text:p text:style-name="P69">Output<text:tab/>(Version der Bibliothek)</text:p>
      <text:p text:style-name="P66"><draw:frame draw:style-name="fr3" draw:name="Grafik52" text:anchor-type="paragraph" svg:x="1.067cm" svg:y="0.259cm" svg:width="5.669cm" svg:height="0.99cm" draw:z-index="405"><draw:image xlink:href="Pictures/10000000000001AD0000004B7ADB2812.png" xlink:type="simple" xlink:show="embed" xlink:actuate="onLoad"/></draw:frame><text:span text:style-name="T14"><text:line-break/>OSCAT_VERSION gibt wenn IN = FALSE die aktuelle Versionsnummer als DWORD zurück. Wird IN auf TRUE gesetzt so wird das </text:span><text:span text:style-name="T15">Release</text:span><text:span text:style-name="T14"> Datum der aktuellen Version als DWORD zurückgegeben.</text:span></text:p>
      <text:p text:style-name="P179">Beispiel: <text:tab/>OSCAT_VERSION(FALSE) = 201 für Version 2.60</text:p>
      <text:p text:style-name="P179"><text:tab/>DWORD_TO_DATE(OSCAT_VERSION(TRUE)) = 2008-1-1</text:p>
      <text:list xml:id="list38443450" text:continue-numbering="true" text:style-name="L1">
        <text:list-item>
          <text:list>
            <text:list-item>
              <text:h text:style-name="P216" text:outline-level="2"><text:alphabetical-index-mark-start text:id="IMark226158368"/>STATUS_TO_ESR<text:alphabetical-index-mark-end text:id="IMark226158368"/></text:h>
            </text:list-item>
          </text:list>
        </text:list-item>
      </text:list>
      <text:p text:style-name="P69">Type<text:tab/>Funktion : ESR_DATA</text:p>
      <text:p text:style-name="P2"><text:span text:style-name="T5">Input</text:span><text:tab/><text:span text:style-name="T12">STATUS</text:span> : BYTE (Status Byte)</text:p>
      <text:p text:style-name="P69"><text:tab/>ADRESS : Byte (Adresse, Byte)</text:p>
      <text:p text:style-name="P69"><text:tab/>LINE : Byte (Eingangsnummer)</text:p>
      <text:p text:style-name="P69"><text:tab/>DT_IN : DATE_TIME (Zeit-Datum-Eingang)</text:p>
      <text:p text:style-name="P69"><text:tab/>TS : TIME (Zeit für Zeitstempel)</text:p>
      <text:p text:style-name="P69"><draw:frame draw:style-name="fr3" draw:name="Grafik233" text:anchor-type="paragraph" svg:x="1.035cm" svg:y="0.64cm" svg:width="5.42cm" svg:height="2.919cm" draw:z-index="192"><draw:image xlink:href="Pictures/100000000000019A000000DDF47B9A49.png" xlink:type="simple" xlink:show="embed" xlink:actuate="onLoad"/></draw:frame>Output<text:tab/>ESR_DATA (ESR-Datenblock)</text:p>
      <text:p text:style-name="P2"><text:line-break/><text:span text:style-name="T5">STATUS_TO_ESR</text:span> erzeugt einen ESR Datensatz aus den Eingangswerten.</text:p>
      <text:p text:style-name="P69">Ein STATUS im Bereich zwischen 1 .. 99 ist eine Fehlermeldung und wird als Typ 1 gekennzeichnet.</text:p>
      <text:p text:style-name="P173"><text:span text:style-name="T14">Status 100 .. 199 wird als Typ 2 gekennzeichnet und 200 .. 255 wird als Typ 3 gekennzeichnet (</text:span><text:span text:style-name="T15">Debug-I</text:span><text:span text:style-name="T14">nformation).</text:span></text:p>
      <text:p text:style-name="P178"><text:soft-page-break/>Die ESR-Daten am Ausgang setzen sich wie folgt zusammen:</text:p>
      <text:p text:style-name="P66"><text:span text:style-name="T14">.TYP<text:tab/>1=Fehler, 2=Status, 3=</text:span><text:span text:style-name="T15">Debug</text:span></text:p>
      <text:p text:style-name="P69">.ADRESS<text:tab/>Adresse Byte der ESR-Datenaufzeichnung</text:p>
      <text:p text:style-name="P69">.LINE<text:tab/>Liniennummer (Eingang) der ESR-Datenaufzeichnung</text:p>
      <text:p text:style-name="P69">.DS<text:tab/>Datumsstempel vom Typ DATE_TIME</text:p>
      <text:p text:style-name="P69">.DT<text:tab/>Zeitstempel vom Typ TIME (SPS-Timer)</text:p>
      <text:p text:style-name="P69">.Data<text:tab/>Datenblock von 8 Byte</text:p>
      <text:list xml:id="list38467598" text:continue-numbering="true" text:style-name="L1">
        <text:list-item>
          <text:h text:style-name="P213" text:outline-level="1">Mathematik</text:h>
          <text:list>
            <text:list-item>
              <text:h text:style-name="P216" text:outline-level="2"><text:alphabetical-index-mark-start text:id="IMark226158368"/>ACOSH<text:alphabetical-index-mark-end text:id="IMark226158368"/></text:h>
            </text:list-item>
          </text:list>
        </text:list-item>
      </text:list>
      <text:p text:style-name="P69">Type<text:tab/>Funktion : REAL</text:p>
      <text:p text:style-name="P66"><text:span text:style-name="T15">Input</text:span><text:span text:style-name="T14"><text:tab/>X : REAL (Eingangswert)</text:span></text:p>
      <text:p text:style-name="P69"><draw:frame draw:style-name="fr3" draw:name="Grafik235" text:anchor-type="paragraph" svg:x="1.085cm" svg:y="0.665cm" svg:width="2.731cm" svg:height="1.12cm" draw:z-index="193"><draw:image xlink:href="Pictures/10000000000000CE00000055726D026D.png" xlink:type="simple" xlink:show="embed" xlink:actuate="onLoad"/></draw:frame>Output<text:tab/>REAL (Ausgangswert)</text:p>
      <text:p text:style-name="P2"><text:line-break/><text:span text:style-name="T12">ACOSH</text:span> <text:span text:style-name="T12">Berechnet</text:span> den Arcus Cosinus Hyperbolicus nach folgender Formel:</text:p>
      <text:p text:style-name="P54"><draw:frame draw:style-name="fr21" draw:name="Objekt2" text:anchor-type="paragraph" svg:x="1.05cm" svg:y="0.011cm" svg:width="4.796cm" svg:height="0.587cm" draw:z-index="742"><draw:object xlink:href="./Object 2" xlink:type="simple" xlink:show="embed" xlink:actuate="onLoad"/><draw:image xlink:href="./ObjectReplacements/Object 2" xlink:type="simple" xlink:show="embed" xlink:actuate="onLoad"/></draw:frame> </text:p>
      <text:list xml:id="list38459806" text:continue-numbering="true" text:style-name="L1">
        <text:list-item>
          <text:list>
            <text:list-item>
              <text:h text:style-name="P216" text:outline-level="2"><text:alphabetical-index-mark-start text:id="IMark226158368"/>ACOTH<text:alphabetical-index-mark-end text:id="IMark226158368"/></text:h>
            </text:list-item>
          </text:list>
        </text:list-item>
      </text:list>
      <text:p text:style-name="P69">Type<text:tab/>Funktion : REAL</text:p>
      <text:p text:style-name="P66"><text:span text:style-name="T15">Input</text:span><text:span text:style-name="T14"><text:tab/>X : REAL (Eingangswert)</text:span></text:p>
      <text:p text:style-name="P69"><draw:frame draw:style-name="fr3" draw:name="Grafik236" text:anchor-type="paragraph" svg:x="1.198cm" svg:y="0.669cm" svg:width="2.731cm" svg:height="1.12cm" draw:z-index="194"><draw:image xlink:href="Pictures/10000000000000CE00000055C50D2A74.png" xlink:type="simple" xlink:show="embed" xlink:actuate="onLoad"/></draw:frame>Output<text:tab/>REAL (Ausgangswert)</text:p>
      <text:p text:style-name="P2"><text:span text:style-name="T12"><text:line-break/>ACOTH</text:span> <text:span text:style-name="T12">Berechnet</text:span> den Arcus Cotangens Hyperbolicus nach folgender Formel:</text:p>
      <text:p text:style-name="P2"><draw:frame draw:style-name="fr22" draw:name="Objekt3" text:anchor-type="paragraph" svg:x="1.011cm" svg:y="0.072cm" svg:width="3.801cm" svg:height="1.141cm" draw:z-index="743"><draw:object xlink:href="./Object 3" xlink:type="simple" xlink:show="embed" xlink:actuate="onLoad"/><draw:image xlink:href="./ObjectReplacements/Object 3" xlink:type="simple" xlink:show="embed" xlink:actuate="onLoad"/></draw:frame></text:p>
      <text:list xml:id="list38474432" text:continue-numbering="true" text:style-name="L1">
        <text:list-item>
          <text:list>
            <text:list-item>
              <text:h text:style-name="P216" text:outline-level="2"><text:soft-page-break/><text:alphabetical-index-mark-start text:id="IMark226158368"/>AGDF<text:alphabetical-index-mark-end text:id="IMark226158368"/></text:h>
            </text:list-item>
          </text:list>
        </text:list-item>
      </text:list>
      <text:p text:style-name="P69">Type<text:tab/>Funktion : REAL</text:p>
      <text:p text:style-name="P66"><text:span text:style-name="T15">Input</text:span><text:span text:style-name="T14"><text:tab/>X : REAL (Eingangswert)</text:span></text:p>
      <text:p text:style-name="P180"><draw:frame draw:style-name="fr3" draw:name="Grafik562" text:anchor-type="paragraph" svg:x="1.069cm" svg:y="0.69cm" svg:width="2.499cm" svg:height="0.99cm" draw:z-index="548"><draw:image xlink:href="Pictures/10000000000000BD0000004B10EE126F.png" xlink:type="simple" xlink:show="embed" xlink:actuate="onLoad"/></draw:frame>Output<text:tab/>REAL (Inverse Gundermannfunktion)</text:p>
      <text:p text:style-name="P180"><text:line-break/>AGDF berechnet die Inverse Gundermannfunktion.</text:p>
      <text:p text:style-name="P180"><draw:frame draw:style-name="fr23" draw:name="Objekt4" text:anchor-type="paragraph" svg:x="1.03cm" svg:y="0.651cm" svg:width="4.015cm" svg:height="1.141cm" draw:z-index="744"><draw:object xlink:href="./Object 4" xlink:type="simple" xlink:show="embed" xlink:actuate="onLoad"/><draw:image xlink:href="./ObjectReplacements/Object 4" xlink:type="simple" xlink:show="embed" xlink:actuate="onLoad"/></draw:frame>Die Berechnung erfolgt nach der Formel:</text:p>
      <text:p text:style-name="P180"/>
      <text:list xml:id="list38474913" text:continue-numbering="true" text:style-name="L1">
        <text:list-item>
          <text:list>
            <text:list-item>
              <text:h text:style-name="P216" text:outline-level="2"><text:alphabetical-index-mark-start text:id="IMark226158368"/>ASINH<text:alphabetical-index-mark-end text:id="IMark226158368"/></text:h>
            </text:list-item>
          </text:list>
        </text:list-item>
      </text:list>
      <text:p text:style-name="P69">Type<text:tab/>Funktion : REAL</text:p>
      <text:p text:style-name="P66"><text:span text:style-name="T15">Input</text:span><text:span text:style-name="T14"><text:tab/>X : REAL (Eingangswert)</text:span></text:p>
      <text:p text:style-name="P69"><draw:frame draw:style-name="fr3" draw:name="Grafik237" text:anchor-type="paragraph" svg:x="1.113cm" svg:y="0.69cm" svg:width="2.731cm" svg:height="1.12cm" draw:z-index="195"><draw:image xlink:href="Pictures/10000000000000CE00000055444AFE56.png" xlink:type="simple" xlink:show="embed" xlink:actuate="onLoad"/></draw:frame>Output<text:tab/>REAL (Ausgangswert)</text:p>
      <text:p text:style-name="P2"><text:span text:style-name="T12"><text:line-break/>ASINH</text:span> <text:span text:style-name="T12">Berechnet</text:span> den Arcus Sinus Hyperbolicus nach folgender Formel:</text:p>
      <text:p text:style-name="P69"><draw:frame draw:style-name="fr24" draw:name="Objekt5" text:anchor-type="paragraph" svg:x="1.032cm" svg:y="0.034cm" svg:width="4.27cm" svg:height="0.587cm" draw:z-index="745"><draw:object xlink:href="./Object 5" xlink:type="simple" xlink:show="embed" xlink:actuate="onLoad"/><draw:image xlink:href="./ObjectReplacements/Object 5" xlink:type="simple" xlink:show="embed" xlink:actuate="onLoad"/></draw:frame></text:p>
      <text:list xml:id="list38466598" text:continue-numbering="true" text:style-name="L1">
        <text:list-item>
          <text:list>
            <text:list-item>
              <text:h text:style-name="P216" text:outline-level="2"><text:alphabetical-index-mark-start text:id="IMark226158368"/>ATAN2<text:alphabetical-index-mark-end text:id="IMark226158368"/></text:h>
            </text:list-item>
          </text:list>
        </text:list-item>
      </text:list>
      <text:p text:style-name="P69">Type<text:tab/>Funktion : REAL</text:p>
      <text:p text:style-name="P66"><text:span text:style-name="T15">Input</text:span><text:span text:style-name="T14"><text:tab/>X : REAL (Eingangswert)</text:span></text:p>
      <text:p text:style-name="P69"><draw:frame draw:style-name="fr3" draw:name="Grafik553" text:anchor-type="paragraph" svg:x="1.046cm" svg:y="0.69cm" svg:width="3.18cm" svg:height="1.57cm" draw:z-index="536"><draw:image xlink:href="Pictures/10000000000000F00000007740E60F88.png" xlink:type="simple" xlink:show="embed" xlink:actuate="onLoad"/></draw:frame>Output<text:tab/>REAL (Ausgangswert)</text:p>
      <text:p text:style-name="P2"><text:soft-page-break/><text:line-break/>ATAN2 <text:span text:style-name="T12">Berechnet</text:span> den Winkel von Koordinaten (Y, X) in RAD. Das Ergebnis liegt zwischen -<text:span text:style-name="T9"> und +</text:span></text:p>
      <text:list xml:id="list38445144" text:continue-numbering="true" text:style-name="L1">
        <text:list-item>
          <text:list>
            <text:list-item>
              <text:h text:style-name="P216" text:outline-level="2"><text:alphabetical-index-mark-start text:id="IMark226158368"/>ATANH<text:alphabetical-index-mark-end text:id="IMark226158368"/></text:h>
            </text:list-item>
          </text:list>
        </text:list-item>
      </text:list>
      <text:p text:style-name="P69">Type<text:tab/>Funktion : REAL</text:p>
      <text:p text:style-name="P66"><text:span text:style-name="T15">Input</text:span><text:span text:style-name="T14"><text:tab/>X : REAL (Eingangswert)</text:span></text:p>
      <text:p text:style-name="P69"><draw:frame draw:style-name="fr3" draw:name="Grafik238" text:anchor-type="paragraph" svg:x="1.113cm" svg:y="0.672cm" svg:width="2.731cm" svg:height="1.12cm" draw:z-index="196"><draw:image xlink:href="Pictures/10000000000000CE00000055D2A10C58.png" xlink:type="simple" xlink:show="embed" xlink:actuate="onLoad"/></draw:frame>Output<text:tab/>REAL (Ausgangswert)</text:p>
      <text:p text:style-name="P2"><text:span text:style-name="T12"><text:line-break/>ATANH</text:span> <text:span text:style-name="T12">Berechnet</text:span> den <text:span text:style-name="T2">Arcus</text:span> Tangens Hyperbolicus nach folgender Formel:</text:p>
      <text:p text:style-name="P69"><draw:frame draw:style-name="fr24" draw:name="Objekt6" text:anchor-type="paragraph" svg:x="1.057cm" svg:y="0.002cm" svg:width="3.958cm" svg:height="1.141cm" draw:z-index="746"><draw:object xlink:href="./Object 6" xlink:type="simple" xlink:show="embed" xlink:actuate="onLoad"/><draw:image xlink:href="./ObjectReplacements/Object 6" xlink:type="simple" xlink:show="embed" xlink:actuate="onLoad"/></draw:frame></text:p>
      <text:list xml:id="list38473209" text:continue-numbering="true" text:style-name="L1">
        <text:list-item>
          <text:list>
            <text:list-item>
              <text:h text:style-name="P216" text:outline-level="2"><text:alphabetical-index-mark-start text:id="IMark226158368"/>BETA<text:alphabetical-index-mark-end text:id="IMark226158368"/></text:h>
            </text:list-item>
          </text:list>
        </text:list-item>
      </text:list>
      <text:p text:style-name="P69">Type<text:tab/>Funktion : DINT</text:p>
      <text:p text:style-name="P173"><text:span text:style-name="T15">Input</text:span><text:span text:style-name="T14"><text:tab/>N : INT (Eingangswert)</text:span></text:p>
      <text:p text:style-name="P179"><text:tab/>K : INT (Eingangswert)</text:p>
      <text:p text:style-name="P69"><draw:frame draw:style-name="fr3" draw:name="Grafik724" text:anchor-type="paragraph" svg:x="1.002cm" svg:y="0.699cm" svg:width="2.499cm" svg:height="1.39cm" draw:z-index="753"><draw:image xlink:href="Pictures/10000000000000BD00000069D070E5BD.png" xlink:type="simple" xlink:show="embed" xlink:actuate="onLoad"/></draw:frame>Output<text:tab/>DINT (Ausgangswert)</text:p>
      <text:p text:style-name="P179"><text:line-break/>BETA berechnet die Eulersche Beta Funktion.</text:p>
      <text:p text:style-name="P179"><draw:frame draw:style-name="fr3" draw:name="Grafik733" text:anchor-type="paragraph" svg:x="1.178cm" svg:y="0.056cm" svg:width="8.281cm" svg:height="1.588cm" draw:z-index="791"><draw:image xlink:href="Pictures/10000000000001390000003C7CA263B4.png" xlink:type="simple" xlink:show="embed" xlink:actuate="onLoad"/></draw:frame></text:p>
      <text:list xml:id="list38451254" text:continue-numbering="true" text:style-name="L1">
        <text:list-item>
          <text:list>
            <text:list-item>
              <text:h text:style-name="P216" text:outline-level="2"><text:soft-page-break/><text:alphabetical-index-mark-start text:id="IMark226158368"/>BINOM<text:alphabetical-index-mark-end text:id="IMark226158368"/></text:h>
            </text:list-item>
          </text:list>
        </text:list-item>
      </text:list>
      <text:p text:style-name="P69">Type<text:tab/>Funktion : DINT</text:p>
      <text:p text:style-name="P173"><text:span text:style-name="T15">Input</text:span><text:span text:style-name="T14"><text:tab/>N : INT (Eingangswert)</text:span></text:p>
      <text:p text:style-name="P179"><text:tab/>K : INT (Eingangswert)</text:p>
      <text:p text:style-name="P69"><draw:frame draw:style-name="fr3" draw:name="Grafik723" text:anchor-type="paragraph" svg:x="1.025cm" svg:y="0.699cm" svg:width="2.9cm" svg:height="1.39cm" draw:z-index="748"><draw:image xlink:href="Pictures/10000000000000DB00000069DE11038A.png" xlink:type="simple" xlink:show="embed" xlink:actuate="onLoad"/></draw:frame>Output<text:tab/>DINT (Ausgangswert)</text:p>
      <text:p text:style-name="P179"><draw:frame draw:style-name="fr3" draw:name="Grafik725" text:anchor-type="paragraph" svg:x="1.187cm" svg:y="3.175cm" svg:width="4.339cm" svg:height="1.296cm" draw:z-index="760"><draw:image xlink:href="Pictures/10000000000000A400000031A7A8C953.png" xlink:type="simple" xlink:show="embed" xlink:actuate="onLoad"/></draw:frame><text:line-break/>BINOM berechnet den Binominialkoeffizienten N über K für Ganzzahlige N und K.</text:p>
      <text:p text:style-name="P179"/>
      <text:list xml:id="list38454337" text:continue-numbering="true" text:style-name="L1">
        <text:list-item>
          <text:list>
            <text:list-item>
              <text:h text:style-name="P216" text:outline-level="2"><text:alphabetical-index-mark-start text:id="IMark226158368"/>CAUCHY<text:alphabetical-index-mark-end text:id="IMark226158368"/></text:h>
            </text:list-item>
          </text:list>
        </text:list-item>
      </text:list>
      <text:p text:style-name="P69">Type<text:tab/>Funktion : INT</text:p>
      <text:p text:style-name="P173"><text:span text:style-name="T15">Input</text:span><text:span text:style-name="T14"><text:tab/>X : REAL (Eingangswert)</text:span></text:p>
      <text:p text:style-name="P69"><draw:frame draw:style-name="fr3" draw:name="Grafik729" text:anchor-type="paragraph" svg:x="1.002cm" svg:y="0.676cm" svg:width="3.29cm" svg:height="1.79cm" draw:z-index="756"><draw:image xlink:href="Pictures/10000000000000F900000087C5B0F314.png" xlink:type="simple" xlink:show="embed" xlink:actuate="onLoad"/></draw:frame>Output<text:tab/>INT (Ausgangswert)</text:p>
      <text:p text:style-name="P179"><text:line-break/>CAUCHY berechnet die Dichtefunktion nach <text:span text:style-name="T31">Cauchy.</text:span></text:p>
      <text:p text:style-name="P195"><draw:frame draw:style-name="fr3" draw:name="Grafik731" text:anchor-type="paragraph" svg:x="1.002cm" svg:y="0.058cm" svg:width="5.345cm" svg:height="1.191cm" draw:z-index="759"><draw:image xlink:href="Pictures/10000000000000CA0000002D9FA47923.png" xlink:type="simple" xlink:show="embed" xlink:actuate="onLoad"/></draw:frame></text:p>
      <text:list xml:id="list38442322" text:continue-numbering="true" text:style-name="L1">
        <text:list-item>
          <text:list>
            <text:list-item>
              <text:h text:style-name="P216" text:outline-level="2"><text:soft-page-break/><text:alphabetical-index-mark-start text:id="IMark226158368"/>CAUCHYCD<text:alphabetical-index-mark-end text:id="IMark226158368"/></text:h>
            </text:list-item>
          </text:list>
        </text:list-item>
      </text:list>
      <text:p text:style-name="P69">Type<text:tab/>Funktion : INT</text:p>
      <text:p text:style-name="P173"><text:span text:style-name="T15">Input</text:span><text:span text:style-name="T14"><text:tab/>X : REAL (Eingangswert)</text:span></text:p>
      <text:p text:style-name="P69"><draw:frame draw:style-name="fr3" draw:name="Grafik730" text:anchor-type="paragraph" svg:x="0.981cm" svg:y="0.654cm" svg:width="3.69cm" svg:height="1.79cm" draw:z-index="757"><draw:image xlink:href="Pictures/100000000000011700000087921D49FC.png" xlink:type="simple" xlink:show="embed" xlink:actuate="onLoad"/></draw:frame>Output<text:tab/>INT (Ausgangswert)</text:p>
      <text:p text:style-name="P179"><text:line-break/>CAUCHYCD berechnet die Verteilungsfunktion nach <text:span text:style-name="T31">Cauchy.</text:span></text:p>
      <text:p text:style-name="P194"><draw:frame draw:style-name="fr3" draw:name="Grafik732" text:anchor-type="paragraph" svg:x="1.002cm" svg:y="0.164cm" svg:width="6.879cm" svg:height="1.085cm" draw:z-index="758"><draw:image xlink:href="Pictures/1000000000000104000000299BAC7A84.png" xlink:type="simple" xlink:show="embed" xlink:actuate="onLoad"/></draw:frame></text:p>
      <text:list xml:id="list38454342" text:continue-numbering="true" text:style-name="L1">
        <text:list-item>
          <text:list>
            <text:list-item>
              <text:h text:style-name="P216" text:outline-level="2"><text:alphabetical-index-mark-start text:id="IMark226158368"/>CEIL<text:alphabetical-index-mark-end text:id="IMark226158368"/></text:h>
            </text:list-item>
          </text:list>
        </text:list-item>
      </text:list>
      <text:p text:style-name="P69">Type<text:tab/>Funktion : INT</text:p>
      <text:p text:style-name="P173"><text:span text:style-name="T15">Input</text:span><text:span text:style-name="T14"><text:tab/>X : REAL (Eingangswert)</text:span></text:p>
      <text:p text:style-name="P69"><draw:frame draw:style-name="fr3" draw:name="Grafik267" text:anchor-type="paragraph" svg:x="1.074cm" svg:y="0.665cm" svg:width="2.281cm" svg:height="1.12cm" draw:z-index="220"><draw:image xlink:href="Pictures/10000000000000AC00000055C10B2B8F.png" xlink:type="simple" xlink:show="embed" xlink:actuate="onLoad"/></draw:frame>Output<text:tab/>INT (Ausgangswert)</text:p>
      <text:p text:style-name="P179"><text:line-break/>Die Funktion CEIL gibt den kleinsten ganzzahligen Wert größer gleich X zurück.</text:p>
      <text:p text:style-name="P179">Beispiel:<text:tab/>CEIL(3.14) = 4</text:p>
      <text:p text:style-name="P179"><text:tab/>CEIL(-3.14) = -3</text:p>
      <text:p text:style-name="P179"><text:tab/>CEIL(2) = 2</text:p>
      <text:p text:style-name="P179"/>
      <text:list xml:id="list38473198" text:continue-numbering="true" text:style-name="L1">
        <text:list-item>
          <text:list>
            <text:list-item>
              <text:h text:style-name="P216" text:outline-level="2"><text:soft-page-break/><text:alphabetical-index-mark-start text:id="IMark226158368"/>CEIL2<text:alphabetical-index-mark-end text:id="IMark226158368"/></text:h>
            </text:list-item>
          </text:list>
        </text:list-item>
      </text:list>
      <text:p text:style-name="P69">Type<text:tab/>Funktion : DINT</text:p>
      <text:p text:style-name="P173"><text:span text:style-name="T15">Input</text:span><text:span text:style-name="T14"><text:tab/>X : REAL (Eingangswert)</text:span></text:p>
      <text:p text:style-name="P69"><draw:frame draw:style-name="fr3" draw:name="Grafik533" text:anchor-type="paragraph" svg:x="1.023cm" svg:y="0.688cm" svg:width="2.799cm" svg:height="0.99cm" draw:z-index="517"><draw:image xlink:href="Pictures/10000000000000D40000004B4CA67AA2.png" xlink:type="simple" xlink:show="embed" xlink:actuate="onLoad"/></draw:frame>Output<text:tab/>DINT (Ausgangswert)</text:p>
      <text:p text:style-name="P179"><text:line-break/>Die Funktion CEIL2 gibt den kleinsten ganzzahligen Wert größer gleich X zurück.</text:p>
      <text:p text:style-name="P179">Beispiel:<text:tab/>CEIL2(3.14) = 4<text:tab/>CEIL2(-3.14) = -3</text:p>
      <text:p text:style-name="P179"><text:tab/>CEIL2(2) = 2</text:p>
      <text:list xml:id="list38451344" text:continue-numbering="true" text:style-name="L1">
        <text:list-item>
          <text:list>
            <text:list-item>
              <text:h text:style-name="P216" text:outline-level="2"><text:alphabetical-index-mark-start text:id="IMark226158368"/>CMP<text:alphabetical-index-mark-end text:id="IMark226158368"/></text:h>
            </text:list-item>
          </text:list>
        </text:list-item>
      </text:list>
      <text:p text:style-name="P69">Type<text:tab/>Funktion : BOOL</text:p>
      <text:p text:style-name="P173"><text:span text:style-name="T15">Input</text:span><text:span text:style-name="T14"><text:tab/>X, Y : REAL (Eingangswerte)</text:span></text:p>
      <text:p text:style-name="P179"><text:tab/>N : INT (Anzahl der Stellen die verglichen werden sollen)</text:p>
      <text:p text:style-name="P69"><draw:frame draw:style-name="fr3" draw:name="Grafik518" text:anchor-type="paragraph" svg:x="1.023cm" svg:y="0.69cm" svg:width="2.731cm" svg:height="2.02cm" draw:z-index="499"><draw:image xlink:href="Pictures/10000000000000CE00000099E8BFF303.png" xlink:type="simple" xlink:show="embed" xlink:actuate="onLoad"/></draw:frame>Output<text:tab/>BOOL (Ergebnis)</text:p>
      <text:p text:style-name="P179"><text:line-break/>CMP vergleicht 2 REAL Werte ob die ersten N Stellen gleich Sind.</text:p>
      <text:p text:style-name="P179">Beispiele:</text:p>
      <text:p text:style-name="P179">CMP(3.140,3.149,3) = TRUE<text:tab/>CMP(3.140,3.149,4) = FALSE</text:p>
      <text:p text:style-name="P179">CMP(0.015,0,016,1) = TRUE<text:tab/>CMP(0.015,0,016,2) = FALSE</text:p>
      <text:p text:style-name="P179">Bei der Funktion CMP ist zu beachten das durch die Duale Kodierung der Zahlen eine 0.1 im Dezimalsystem nicht unbedingt immer als 0.1 im Binärsystem dargestellt werden kann. Vielmehr kann es vorkommen das die 0.1 etwas kleiner oder größer dargestellt wird weil die Auflösung der Zahlencodierung im Binärsystem nicht exakt eine 0.1 zulässt. Aus diesem Grund kann die Funktion nicht immer zu 100% einen Unterschied von 1 an der letzten Stelle erkennen. Weiterhin ist zu beachten das ein Datentyp REAL mit 32 Bit nur eine Auflösung von 7 - 8 Dezimalstellen bietet.</text:p>
      <text:list xml:id="list38453784" text:continue-numbering="true" text:style-name="L1">
        <text:list-item>
          <text:list>
            <text:list-item>
              <text:h text:style-name="P216" text:outline-level="2"><text:soft-page-break/><text:alphabetical-index-mark-start text:id="IMark226158368"/>COSH<text:alphabetical-index-mark-end text:id="IMark226158368"/></text:h>
            </text:list-item>
          </text:list>
        </text:list-item>
      </text:list>
      <text:p text:style-name="P69">Type<text:tab/>Funktion : REAL</text:p>
      <text:p text:style-name="P66"><text:span text:style-name="T15">Input</text:span><text:span text:style-name="T14"><text:tab/>X : REAL (Eingangswert)</text:span></text:p>
      <text:p text:style-name="P69"><draw:frame draw:style-name="fr3" draw:name="Grafik239" text:anchor-type="paragraph" svg:x="1.104cm" svg:y="0.67cm" svg:width="2.731cm" svg:height="1.12cm" draw:z-index="197"><draw:image xlink:href="Pictures/10000000000000CE00000055DD9CC6D2.png" xlink:type="simple" xlink:show="embed" xlink:actuate="onLoad"/></draw:frame>Output<text:tab/>REAL (Ausgangswert)</text:p>
      <text:p text:style-name="P155"><text:span text:style-name="T14"><text:line-break/></text:span>COSH<text:span text:style-name="T14"> Berechnet den Cosinus Hyperbolicus nach folgender Formel:</text:span></text:p>
      <text:p text:style-name="P70"><draw:frame draw:style-name="fr25" draw:name="Objekt8" text:anchor-type="as-char" svg:width="2.766cm" svg:height="1.074cm" draw:z-index="763"><draw:object xlink:href="./Object 8" xlink:type="simple" xlink:show="embed" xlink:actuate="onLoad"/><draw:image xlink:href="./ObjectReplacements/Object 8" xlink:type="simple" xlink:show="embed" xlink:actuate="onLoad"/></draw:frame></text:p>
      <text:list xml:id="list38463924" text:continue-numbering="true" text:style-name="L1">
        <text:list-item>
          <text:list>
            <text:list-item>
              <text:h text:style-name="P216" text:outline-level="2"><text:alphabetical-index-mark-start text:id="IMark226158368"/>COTH<text:alphabetical-index-mark-end text:id="IMark226158368"/></text:h>
            </text:list-item>
          </text:list>
        </text:list-item>
      </text:list>
      <text:p text:style-name="P69">Type<text:tab/>Funktion : REAL</text:p>
      <text:p text:style-name="P66"><text:span text:style-name="T15">Input</text:span><text:span text:style-name="T14"><text:tab/>X : REAL (Eingangswert)</text:span></text:p>
      <text:p text:style-name="P69"><draw:frame draw:style-name="fr3" draw:name="Grafik240" text:anchor-type="paragraph" svg:x="1.039cm" svg:y="0.67cm" svg:width="2.281cm" svg:height="1.12cm" draw:z-index="198"><draw:image xlink:href="Pictures/10000000000000AC00000055FA2996C0.png" xlink:type="simple" xlink:show="embed" xlink:actuate="onLoad"/></draw:frame>Output<text:tab/>REAL (Ausgangswert)</text:p>
      <text:p text:style-name="P2"><text:line-break/><text:span text:style-name="T12">COTH</text:span> <text:span text:style-name="T12">Berechnet</text:span> den Cotangens Hyperbolicus nach folgender Formel:</text:p>
      <text:p text:style-name="P69"><draw:frame draw:style-name="fr25" draw:name="Objekt9" text:anchor-type="as-char" svg:width="2.434cm" svg:height="1.122cm" draw:z-index="764"><draw:object xlink:href="./Object 9" xlink:type="simple" xlink:show="embed" xlink:actuate="onLoad"/><draw:image xlink:href="./ObjectReplacements/Object 9" xlink:type="simple" xlink:show="embed" xlink:actuate="onLoad"/></draw:frame></text:p>
      <text:p text:style-name="P179">für Eingangswerte größer 20 oder kleiner als -20 liefert COTH den Näherungswert +1 beziehungsweise -1 was einer Genauigkeit besser 8 Stellen entspricht und somit unterhalb der Auflösung des Typs REAL liegt.</text:p>
      <text:p text:style-name="P179"/>
      <text:p text:style-name="P179"/>
      <text:list xml:id="list38454781" text:continue-numbering="true" text:style-name="L1">
        <text:list-item>
          <text:list>
            <text:list-item>
              <text:h text:style-name="P216" text:outline-level="2"><text:soft-page-break/><text:alphabetical-index-mark-start text:id="IMark226158368"/>D_TRUNC<text:alphabetical-index-mark-end text:id="IMark226158368"/></text:h>
            </text:list-item>
          </text:list>
        </text:list-item>
      </text:list>
      <text:p text:style-name="P69">Type<text:tab/>Funktion : DINT</text:p>
      <text:p text:style-name="P66"><text:span text:style-name="T15">Input</text:span><text:span text:style-name="T14"><text:tab/>X : REAL (Eingangswert)</text:span></text:p>
      <text:p text:style-name="P69"><draw:frame draw:style-name="fr3" draw:name="Grafik532" text:anchor-type="paragraph" svg:x="1.046cm" svg:y="0.706cm" svg:width="3.99cm" svg:height="0.99cm" draw:z-index="516"><draw:image xlink:href="Pictures/100000000000012E0000004BCA441158.png" xlink:type="simple" xlink:show="embed" xlink:actuate="onLoad"/></draw:frame>Output<text:tab/>DINT (Ausgangswert)</text:p>
      <text:p text:style-name="P2"><text:line-break/>D<text:span text:style-name="T12">_TRUNC liefert den ganzzahligen Teil eines REAL Wertes als DINT. Die IEC Routine TRUNC() unterstützt</text:span> nicht auf allen Systemen ein TRUNC nach DINT so dass wir aus Gründen der Kompatibilität diese Routine nachgebildet haben. Leider liefert auch ein REAL_TO_DINT nicht auf allen Systemen dasselbe Ergebnis. D_TRUNC prüft welches Ergebnis die IEC Funktionen liefern und nutzt die passende Funktion um ein brauchbares Ergebnis zu liefern.</text:p>
      <text:p text:style-name="P179">D_TRUNC(1.6) = 1</text:p>
      <text:p text:style-name="P179">D_TRUNC(-1.6) = -1</text:p>
      <text:list xml:id="list38443455" text:continue-numbering="true" text:style-name="L1">
        <text:list-item>
          <text:list>
            <text:list-item>
              <text:h text:style-name="P216" text:outline-level="2"><text:alphabetical-index-mark-start text:id="IMark226158368"/>DEC1<text:alphabetical-index-mark-end text:id="IMark226158368"/></text:h>
            </text:list-item>
          </text:list>
        </text:list-item>
      </text:list>
      <text:p text:style-name="P69">Type<text:tab/>Funktion : INT</text:p>
      <text:p text:style-name="P173"><text:span text:style-name="T15">Input</text:span><text:span text:style-name="T14"><text:tab/>X :INT ( Anzahl der Werte die X einnehmen kann)</text:span></text:p>
      <text:p text:style-name="P179"><text:tab/>N : INT (Variable die Hochgezählt wird)</text:p>
      <text:p text:style-name="P69"><draw:frame draw:style-name="fr3" draw:name="Grafik695" text:anchor-type="paragraph" svg:x="1.064cm" svg:y="0.681cm" svg:width="2.499cm" svg:height="1.39cm" draw:z-index="761"><draw:image xlink:href="Pictures/10000000000000BD0000006991F2F73D.png" xlink:type="simple" xlink:show="embed" xlink:actuate="onLoad"/></draw:frame>Output<text:tab/>INT (<text:span text:style-name="T31">Rückgabewert</text:span>)</text:p>
      <text:p text:style-name="P179"><text:line-break/>DEC1 zählt die Variable X von N-1 bis 0 und beginnt dann wieder bei N-1, so dass genau N verschiedene Werte beginnend bei N-1 bis einschließlich 0 erzeugt werden.</text:p>
      <text:list xml:id="list38469598" text:continue-numbering="true" text:style-name="L1">
        <text:list-item>
          <text:list>
            <text:list-item>
              <text:h text:style-name="P216" text:outline-level="2"><text:soft-page-break/><text:alphabetical-index-mark-start text:id="IMark226158368"/>DEG<text:alphabetical-index-mark-end text:id="IMark226158368"/></text:h>
            </text:list-item>
          </text:list>
        </text:list-item>
      </text:list>
      <text:p text:style-name="P69">Type<text:tab/>Funktion : REAL</text:p>
      <text:p text:style-name="P66"><text:span text:style-name="T15">Input</text:span><text:span text:style-name="T14"><text:tab/>Rad : REAL (Winkel in Bogenmaß)</text:span></text:p>
      <text:p text:style-name="P69">Output<text:tab/>REAL (Winkel in Grad)</text:p>
      <text:p text:style-name="P66"><draw:frame draw:style-name="fr3" draw:name="Grafik1" text:anchor-type="paragraph" svg:x="1.005cm" svg:y="0.127cm" svg:width="2.281cm" svg:height="1.12cm" draw:z-index="0"><draw:image xlink:href="Pictures/10000000000000AC0000005589998C96.png" xlink:type="simple" xlink:show="embed" xlink:actuate="onLoad"/></draw:frame><text:span text:style-name="T14"><text:line-break/>Die Funktion DEG konvertiert einen Winkelwert von Bogenmaß in Grad. Dabei wird berücksichtigt das der Eingang nicht größer als 2</text:span><text:span text:style-name="T23"> sein darf. Wenn RAD größer als 2 ist wird entsprechend 2 abgezogen bis der Eingang RAD zwischen 0 und 2 liegt.</text:span></text:p>
      <text:p text:style-name="P66"><text:span text:style-name="T14">DEG(</text:span><text:span text:style-name="T23">) = 180 Grad,<text:tab/>DEG(3) = 180 Grad</text:span></text:p>
      <text:p text:style-name="P180">DEG(0) = 0 Grad,<text:tab/>DEG(2) = 0 Grad</text:p>
      <text:list xml:id="list38443213" text:continue-numbering="true" text:style-name="L1">
        <text:list-item>
          <text:list>
            <text:list-item>
              <text:h text:style-name="P216" text:outline-level="2"><text:alphabetical-index-mark-start text:id="IMark226158368"/>DIFFER<text:alphabetical-index-mark-end text:id="IMark226158368"/></text:h>
            </text:list-item>
          </text:list>
        </text:list-item>
      </text:list>
      <text:p text:style-name="P69">Type<text:tab/>Funktion : BOOL</text:p>
      <text:p text:style-name="P66"><text:span text:style-name="T15">Input</text:span><text:span text:style-name="T14"><text:tab/>IN1 : REAL (Wert 1)</text:span></text:p>
      <text:p text:style-name="P69"><text:tab/>IN2 : REAL (Wert 2)</text:p>
      <text:p text:style-name="P69"><text:tab/>X : REAL (Mindestunterschied in1 zu in2)</text:p>
      <text:p text:style-name="P69"><draw:frame draw:style-name="fr3" draw:name="Grafik3" text:anchor-type="paragraph" svg:x="0.99cm" svg:y="1.159cm" svg:width="2.731cm" svg:height="2.02cm" draw:z-index="199"><draw:image xlink:href="Pictures/10000000000000CE000000991839EDB4.png" xlink:type="simple" xlink:show="embed" xlink:actuate="onLoad"/></draw:frame>Output<text:tab/>BOOL (TRUE, wenn sich in1 und in2 um mehr als x voneinander <text:tab/>unterscheiden)</text:p>
      <text:p text:style-name="P69"><text:line-break/>Die Funktion DIFFER wird TRUE, wenn in1 und in2 sich durch mehr als X voneinander unterscheiden.</text:p>
      <text:p text:style-name="P179"><draw:frame draw:style-name="fr25" draw:name="Objekt10" text:anchor-type="as-char" svg:width="4.006cm" svg:height="0.49cm" draw:z-index="765"><draw:object xlink:href="./Object 10" xlink:type="simple" xlink:show="embed" xlink:actuate="onLoad"/><draw:image xlink:href="./ObjectReplacements/Object 10" xlink:type="simple" xlink:show="embed" xlink:actuate="onLoad"/></draw:frame></text:p>
      <text:p text:style-name="P66"><text:span text:style-name="T14">Beispiel: <text:tab/></text:span><text:span text:style-name="T15">Differ</text:span><text:span text:style-name="T14">(100, 120, 10) ergibt TRUE</text:span></text:p>
      <text:p text:style-name="P66"><text:span text:style-name="T14"><text:tab/></text:span><text:span text:style-name="T15">Differ</text:span><text:span text:style-name="T14">(100,110,15) ergibt FALSE</text:span></text:p>
      <text:list xml:id="list38461141" text:continue-numbering="true" text:style-name="L1">
        <text:list-item>
          <text:list>
            <text:list-item>
              <text:h text:style-name="P216" text:outline-level="2"><text:soft-page-break/><text:alphabetical-index-mark-start text:id="IMark226158368"/>ERF<text:alphabetical-index-mark-end text:id="IMark226158368"/></text:h>
            </text:list-item>
          </text:list>
        </text:list-item>
      </text:list>
      <text:p text:style-name="P69">Type<text:tab/>Funktion : REAL</text:p>
      <text:p text:style-name="P66"><text:span text:style-name="T15">Input</text:span><text:span text:style-name="T14"><text:tab/>X : REAL (Eingangswert)</text:span></text:p>
      <text:p text:style-name="P69"><draw:frame draw:style-name="fr3" draw:name="Grafik547" text:anchor-type="paragraph" svg:x="1.067cm" svg:y="0.667cm" svg:width="2.101cm" svg:height="0.99cm" draw:z-index="532"><draw:image xlink:href="Pictures/100000000000009F0000004B962FDC81.png" xlink:type="simple" xlink:show="embed" xlink:actuate="onLoad"/></draw:frame>Output<text:tab/>REAL (Ergebnis)</text:p>
      <text:p text:style-name="P179"><text:line-break/>Die Funktion ERF berechnet die Fehlerfunktion von X. Die Fehlerfunktion wird mittels einer Näherungsformel berechnet, der maximale relative Fehler ist dabei kleiner als 1,3 * 10<text:span text:style-name="T30">-4</text:span>.</text:p>
      <text:list xml:id="list38454073" text:continue-numbering="true" text:style-name="L1">
        <text:list-item>
          <text:list>
            <text:list-item>
              <text:h text:style-name="P216" text:outline-level="2"><text:alphabetical-index-mark-start text:id="IMark226158368"/>ERFC<text:alphabetical-index-mark-end text:id="IMark226158368"/></text:h>
            </text:list-item>
          </text:list>
        </text:list-item>
      </text:list>
      <text:p text:style-name="P69">Type<text:tab/>Funktion : REAL</text:p>
      <text:p text:style-name="P66"><text:span text:style-name="T15">Input</text:span><text:span text:style-name="T14"><text:tab/>X : REAL (Eingangswert)</text:span></text:p>
      <text:p text:style-name="P69"><draw:frame draw:style-name="fr3" draw:name="Grafik548" text:anchor-type="paragraph" svg:x="1.046cm" svg:y="0.688cm" svg:width="2.499cm" svg:height="0.99cm" draw:z-index="533"><draw:image xlink:href="Pictures/10000000000000BD0000004B72567121.png" xlink:type="simple" xlink:show="embed" xlink:actuate="onLoad"/></draw:frame>Output<text:tab/>REAL (Ergebnis)</text:p>
      <text:p text:style-name="P179"><text:line-break/>Die Funktion ERFC berechnet die inverse Fehlerfunktion von X.</text:p>
      <text:list xml:id="list38467793" text:continue-numbering="true" text:style-name="L1">
        <text:list-item>
          <text:list>
            <text:list-item>
              <text:h text:style-name="P216" text:outline-level="2"><text:alphabetical-index-mark-start text:id="IMark226158368"/>EVEN<text:alphabetical-index-mark-end text:id="IMark226158368"/></text:h>
            </text:list-item>
          </text:list>
        </text:list-item>
      </text:list>
      <text:p text:style-name="P69">Type<text:tab/>Funktion : BOOL</text:p>
      <text:p text:style-name="P66"><text:span text:style-name="T15">Input</text:span><text:span text:style-name="T14"><text:tab/>in : DINT (Eingangswert)</text:span></text:p>
      <text:p text:style-name="P69"><draw:frame draw:style-name="fr3" draw:name="Grafik4" text:anchor-type="paragraph" svg:x="1.092cm" svg:y="0.67cm" svg:width="2.731cm" svg:height="1.12cm" draw:z-index="1"><draw:image xlink:href="Pictures/10000000000000CE0000005513ED54BB.png" xlink:type="simple" xlink:show="embed" xlink:actuate="onLoad"/></draw:frame>Output<text:tab/>BOOL (TRUE, wenn in gerade)</text:p>
      <text:p text:style-name="P66"><text:span text:style-name="T14"><text:line-break/>Die Funktion </text:span><text:span text:style-name="T23">EVEN wird TRUE, wenn der Eingang IN gerade ist und FALSE für ungerade IN.</text:span></text:p>
      <text:p text:style-name="P69"><text:soft-page-break/>Beispiel: <text:tab/>EVEN(2) ergibt TRUE</text:p>
      <text:p text:style-name="P180"><text:tab/>EVEN(3) ergibt FALSE</text:p>
      <text:list xml:id="list38460969" text:continue-numbering="true" text:style-name="L1">
        <text:list-item>
          <text:list>
            <text:list-item>
              <text:h text:style-name="P216" text:outline-level="2"><text:alphabetical-index-mark-start text:id="IMark226158368"/>EXP10<text:alphabetical-index-mark-end text:id="IMark226158368"/></text:h>
            </text:list-item>
          </text:list>
        </text:list-item>
      </text:list>
      <text:p text:style-name="P69">Type<text:tab/>Funktion : REAL</text:p>
      <text:p text:style-name="P66"><text:span text:style-name="T15">Input</text:span><text:span text:style-name="T14"><text:tab/>X : REAL (Eingangswert)</text:span></text:p>
      <text:p text:style-name="P69"><draw:frame draw:style-name="fr3" draw:name="Grafik389" text:anchor-type="paragraph" svg:x="1.046cm" svg:y="0.69cm" svg:width="2.9cm" svg:height="0.99cm" draw:z-index="363"><draw:image xlink:href="Pictures/10000000000000DB0000004B28084D9C.png" xlink:type="simple" xlink:show="embed" xlink:actuate="onLoad"/></draw:frame>Output<text:tab/>REAL (Exponentialfaktor zur Basis 10)</text:p>
      <text:p text:style-name="P66"><text:span text:style-name="T14"><text:line-break/>Die Funktion </text:span><text:span text:style-name="T23">EXP10 liefert den Exponentialwert zur Basis 10.</text:span></text:p>
      <text:p text:style-name="P180">EXP10(2) = 100</text:p>
      <text:p text:style-name="P180">EXP10(0) = 1</text:p>
      <text:p text:style-name="P180">EXP10(3.14) = 1380.384265</text:p>
      <text:list xml:id="list38457720" text:continue-numbering="true" text:style-name="L1">
        <text:list-item>
          <text:list>
            <text:list-item>
              <text:h text:style-name="P216" text:outline-level="2"><text:alphabetical-index-mark-start text:id="IMark226158368"/>EXPN<text:alphabetical-index-mark-end text:id="IMark226158368"/></text:h>
            </text:list-item>
          </text:list>
        </text:list-item>
      </text:list>
      <text:p text:style-name="P69">Type<text:tab/>Funktion : REAL</text:p>
      <text:p text:style-name="P66"><text:span text:style-name="T15">Input</text:span><text:span text:style-name="T14"><text:tab/>X : REAL (Eingangswert)</text:span></text:p>
      <text:p text:style-name="P179"><text:tab/>N : INT (Exponentialwert)</text:p>
      <text:p text:style-name="P71"><draw:frame draw:style-name="fr3" draw:name="Grafik391" text:anchor-type="paragraph" svg:x="1.023cm" svg:y="0.688cm" svg:width="2.499cm" svg:height="1.39cm" draw:z-index="365"><draw:image xlink:href="Pictures/10000000000000BD0000006984436BBF.png" xlink:type="simple" xlink:show="embed" xlink:actuate="onLoad"/></draw:frame>Output<text:tab/>REAL (Ergebnis X^N)</text:p>
      <text:p text:style-name="P173"><text:span text:style-name="T23"><text:line-break/>EXPN berechnet den Exponentialwert von X^N für Ganzzahlige N. EXPN ist speziell für SPS ohne </text:span>Floating<text:span text:style-name="T23"> </text:span>Point<text:span text:style-name="T23"> </text:span>Einheit<text:span text:style-name="T23"> geschrieben und ist ca. 30 mal schneller als die IEC Standard Funktion EXPT(). Zu beachten ist der Sonderfall das 0^0 wie mathematisch definiert eine 1 ergibt und nicht eine 0.</text:span></text:p>
      <text:p text:style-name="P180">EXPN(10,-2) = 0.01<text:tab/><text:tab/>EXPN(1.5,2) = 2.25</text:p>
      <text:p text:style-name="P180">EXPN(0,0) = 1</text:p>
      <text:list xml:id="list38448520" text:continue-numbering="true" text:style-name="L1">
        <text:list-item>
          <text:list>
            <text:list-item>
              <text:h text:style-name="P216" text:outline-level="2"><text:soft-page-break/><text:alphabetical-index-mark-start text:id="IMark226158368"/>FACT<text:alphabetical-index-mark-end text:id="IMark226158368"/></text:h>
            </text:list-item>
          </text:list>
        </text:list-item>
      </text:list>
      <text:p text:style-name="P69">Type<text:tab/>Funktion : DINT</text:p>
      <text:p text:style-name="P66"><text:span text:style-name="T15">Input</text:span><text:span text:style-name="T14"><text:tab/>X : INT (Eingangswert)</text:span></text:p>
      <text:p text:style-name="P69"><draw:frame draw:style-name="fr3" draw:name="Grafik5" text:anchor-type="paragraph" svg:x="1.021cm" svg:y="0.651cm" svg:width="2.281cm" svg:height="1.12cm" draw:z-index="2"><draw:image xlink:href="Pictures/10000000000000AC0000005553867366.png" xlink:type="simple" xlink:show="embed" xlink:actuate="onLoad"/></draw:frame>Output<text:tab/>DINT (Fakultät von X)</text:p>
      <text:p text:style-name="P66"><text:span text:style-name="T14"><text:line-break/>Die Funktion </text:span><text:span text:style-name="T23">FACT berechnet die Fakultät von X.</text:span></text:p>
      <text:p text:style-name="P71">Sie ist definiert für Eingangswerte von 0 .. 12. Für Werte kleiner Null und größer 12 wird das Ergebnis -1. für die Fakultät von größeren Zahlen ist die Funktion GAMMA geeignet.</text:p>
      <text:p text:style-name="P71">Für natürliche Zahlen X ist: <text:tab/>X! = 1*2*3...*(X-1)*X, <text:tab/>0! = 1</text:p>
      <text:p text:style-name="P69">Fakultäten für negative oder nicht ganze Zahlen sind nicht definiert.</text:p>
      <text:p text:style-name="P69">Beispiel:<text:tab/>1! = 1</text:p>
      <text:p text:style-name="P69"><text:tab/>2! = 1*2 = 2</text:p>
      <text:p text:style-name="P69"><text:tab/>5! = 1*2*3*4*5 = 120</text:p>
      <text:list xml:id="list38459574" text:continue-numbering="true" text:style-name="L1">
        <text:list-item>
          <text:list>
            <text:list-item>
              <text:h text:style-name="P216" text:outline-level="2"><text:alphabetical-index-mark-start text:id="IMark226158368"/>FIB<text:alphabetical-index-mark-end text:id="IMark226158368"/></text:h>
            </text:list-item>
          </text:list>
        </text:list-item>
      </text:list>
      <text:p text:style-name="P69">Type<text:tab/>Funktion : DINT</text:p>
      <text:p text:style-name="P173"><text:span text:style-name="T15">Input</text:span><text:span text:style-name="T14"><text:tab/>X : INT (Eingangswert)</text:span></text:p>
      <text:p text:style-name="P69">Output<text:tab/>DINT (Fibonacci Zahl)</text:p>
      <text:p text:style-name="P179"><draw:frame draw:style-name="fr3" draw:name="Grafik422" text:anchor-type="paragraph" svg:x="1.046cm" svg:y="0.034cm" svg:width="2.101cm" svg:height="0.99cm" draw:z-index="404"><draw:image xlink:href="Pictures/100000000000009F0000004BCC45FD77.png" xlink:type="simple" xlink:show="embed" xlink:actuate="onLoad"/></draw:frame><text:line-break/>FIB berechnet die Fibonacci Zahl. Die Fibonacci Zahl ist wie folgt definiert:</text:p>
      <text:p text:style-name="P179">FIB(0) = 0, FIB(1) = 1, FIB(2) = 1, FIB(3) = 2, FIB(4) = 3, FIB(5) = 5 .....</text:p>
      <text:p text:style-name="P179">Die Fibonacci Zahl von X ist gleich der Summe der Fibonacci Zahlen von X-1 und X-2. Die Funktion kann die Fibonacci Zahlen bis 46 berechnen, ist X &lt; 0 oder Größer als 46 gibt die Funktion -1 zurück.</text:p>
      <text:list xml:id="list38450844" text:continue-numbering="true" text:style-name="L1">
        <text:list-item>
          <text:list>
            <text:list-item>
              <text:h text:style-name="P216" text:outline-level="2"><text:soft-page-break/><text:alphabetical-index-mark-start text:id="IMark226158368"/>FLOOR<text:alphabetical-index-mark-end text:id="IMark226158368"/></text:h>
            </text:list-item>
          </text:list>
        </text:list-item>
      </text:list>
      <text:p text:style-name="P69">Type<text:tab/>Funktion : INT</text:p>
      <text:p text:style-name="P173"><text:span text:style-name="T15">Input</text:span><text:span text:style-name="T14"><text:tab/>X : REAL (Eingangswert)</text:span></text:p>
      <text:p text:style-name="P69"><draw:frame draw:style-name="fr3" draw:name="Grafik268" text:anchor-type="paragraph" svg:x="1.014cm" svg:y="0.693cm" svg:width="2.281cm" svg:height="1.12cm" draw:z-index="221"><draw:image xlink:href="Pictures/10000000000000AC00000055C21CD1DF.png" xlink:type="simple" xlink:show="embed" xlink:actuate="onLoad"/></draw:frame>Output<text:tab/>INT (Ausgangswert)</text:p>
      <text:p text:style-name="P179"><text:line-break/>Die Funktion FLOOR gibt den größten ganzzahligen Wert kleiner gleich X zurück.</text:p>
      <text:p text:style-name="P69">Beispiel:<text:tab/>FLOOR(3.14) = 3</text:p>
      <text:p text:style-name="P69"><text:tab/>FLOOR(-3.14) = -4</text:p>
      <text:p text:style-name="P179"><text:tab/>FLOOR(2) = 2</text:p>
      <text:list xml:id="list38463313" text:continue-numbering="true" text:style-name="L1">
        <text:list-item>
          <text:list>
            <text:list-item>
              <text:h text:style-name="P216" text:outline-level="2"><text:alphabetical-index-mark-start text:id="IMark226158368"/>FLOOR2<text:alphabetical-index-mark-end text:id="IMark226158368"/></text:h>
            </text:list-item>
          </text:list>
        </text:list-item>
      </text:list>
      <text:p text:style-name="P69">Type<text:tab/>Funktion : DINT</text:p>
      <text:p text:style-name="P173"><text:span text:style-name="T15">Input</text:span><text:span text:style-name="T14"><text:tab/>X : REAL (Eingangswert)</text:span></text:p>
      <text:p text:style-name="P69"><draw:frame draw:style-name="fr3" draw:name="Grafik534" text:anchor-type="paragraph" svg:x="1.046cm" svg:y="0.667cm" svg:width="3.6cm" svg:height="0.99cm" draw:z-index="518"><draw:image xlink:href="Pictures/10000000000001100000004B1CC1A5BB.png" xlink:type="simple" xlink:show="embed" xlink:actuate="onLoad"/></draw:frame>Output<text:tab/>DINT (Ausgangswert)</text:p>
      <text:p text:style-name="P179"><text:line-break/>Die Funktion FLOOR2 gibt den größten ganzzahligen Wert kleiner gleich X zurück.</text:p>
      <text:p text:style-name="P69">Beispiel:<text:tab/>FLOOR2(3.14) = 3</text:p>
      <text:p text:style-name="P69"><text:tab/>FLOOR2(-3.14) = -4</text:p>
      <text:p text:style-name="P179"><text:tab/>FLOOR2(2) = 2</text:p>
      <text:p text:style-name="P179"/>
      <text:list xml:id="list38468863" text:continue-numbering="true" text:style-name="L1">
        <text:list-item>
          <text:list>
            <text:list-item>
              <text:h text:style-name="P216" text:outline-level="2"><text:soft-page-break/><text:alphabetical-index-mark-start text:id="IMark226158368"/>FRACT<text:alphabetical-index-mark-end text:id="IMark226158368"/></text:h>
            </text:list-item>
          </text:list>
        </text:list-item>
      </text:list>
      <text:p text:style-name="P69">Type<text:tab/>Funktion : REAL</text:p>
      <text:p text:style-name="P66"><text:span text:style-name="T15">Input</text:span><text:span text:style-name="T14"><text:tab/></text:span><text:span text:style-name="T15">X</text:span><text:span text:style-name="T14"> : REAL (Eingangswert)</text:span></text:p>
      <text:p text:style-name="P69"><draw:frame draw:style-name="fr3" draw:name="Grafik525" text:anchor-type="paragraph" svg:x="1.046cm" svg:y="0.644cm" svg:width="3.2cm" svg:height="0.99cm" draw:z-index="507"><draw:image xlink:href="Pictures/10000000000000F20000004B2EC51BEC.png" xlink:type="simple" xlink:show="embed" xlink:actuate="onLoad"/></draw:frame>Output<text:tab/>REAL (Nachkommateil von X)</text:p>
      <text:p text:style-name="P173"><text:span text:style-name="T14"><text:line-break/>Die Funktion </text:span><text:span text:style-name="T23">FRACT liefert den Nachkommateil von X</text:span>.</text:p>
      <text:p text:style-name="P71">Beispiel:<text:tab/>FRACT(3.14) ergibt 0.14. </text:p>
      <text:p text:style-name="P180">Für X größer oder kleiner als +/- 2.14 * 10^9 liefert FRACT stets ein Null zurück. Das die Auflösung eines 32Bit REAL maximal bei 8 Dezimalstellen liegt kann aus Zahlen größer oder kleiner als +/- 2.14 * 10^9 kein Nachkommateil ermittelt werden, weil dieser auch in einer REAL Variable nicht abgespeichert werden kann.</text:p>
      <text:list xml:id="list38465733" text:continue-numbering="true" text:style-name="L1">
        <text:list-item>
          <text:list>
            <text:list-item>
              <text:h text:style-name="P216" text:outline-level="2"><text:alphabetical-index-mark-start text:id="IMark226158368"/>GAMMA<text:alphabetical-index-mark-end text:id="IMark226158368"/></text:h>
            </text:list-item>
          </text:list>
        </text:list-item>
      </text:list>
      <text:p text:style-name="P69">Type<text:tab/>Funktion : REAL</text:p>
      <text:p text:style-name="P66"><text:span text:style-name="T15">Input</text:span><text:span text:style-name="T14"><text:tab/>X : REAL (Eingangswert)</text:span></text:p>
      <text:p text:style-name="P71"><draw:frame draw:style-name="fr3" draw:name="Grafik394" text:anchor-type="paragraph" svg:x="1.067cm" svg:y="0.69cm" svg:width="2.9cm" svg:height="0.99cm" draw:z-index="369"><draw:image xlink:href="Pictures/10000000000000DB0000004BA1D74E86.png" xlink:type="simple" xlink:show="embed" xlink:actuate="onLoad"/></draw:frame>Output<text:tab/>REAL (Gamma Funktion)</text:p>
      <text:p text:style-name="P180"><text:line-break/>Die Funktion GAMMA berechnet die Gamma Funktion nach der Näherungsformel von NEMES.</text:p>
      <text:p text:style-name="P180"><draw:frame draw:style-name="fr24" draw:name="Objekt7" text:anchor-type="paragraph" svg:x="1.032cm" svg:y="0.153cm" svg:width="7.331cm" svg:height="1.903cm" draw:z-index="752"><draw:object xlink:href="./Object 7" xlink:type="simple" xlink:show="embed" xlink:actuate="onLoad"/><draw:image xlink:href="./ObjectReplacements/Object 7" xlink:type="simple" xlink:show="embed" xlink:actuate="onLoad"/></draw:frame></text:p>
      <text:p text:style-name="P180"/>
      <text:p text:style-name="P180"/>
      <text:p text:style-name="P180">Die Gamma Funktion kann für Ganzzahlige X als Ersatz für Die Fakultät verwendet werden.</text:p>
      <text:list xml:id="list38450036" text:continue-numbering="true" text:style-name="L1">
        <text:list-item>
          <text:list>
            <text:list-item>
              <text:h text:style-name="P216" text:outline-level="2"><text:soft-page-break/><text:alphabetical-index-mark-start text:id="IMark226158368"/>GAUSS<text:alphabetical-index-mark-end text:id="IMark226158368"/></text:h>
            </text:list-item>
          </text:list>
        </text:list-item>
      </text:list>
      <text:p text:style-name="P69">Type<text:tab/>Funktion : REAL</text:p>
      <text:p text:style-name="P66"><text:span text:style-name="T15">Input</text:span><text:span text:style-name="T14"><text:tab/>X : REAL (Eingangswert)</text:span></text:p>
      <text:p text:style-name="P179"><text:tab/>U : REAL (Lokalität der Funktion)</text:p>
      <text:p text:style-name="P179"><text:tab/>SI : REAL (Sigma, Spreizung der Funktion)</text:p>
      <text:p text:style-name="P71"><draw:frame draw:style-name="fr3" draw:name="Grafik546" text:anchor-type="paragraph" svg:x="1.025cm" svg:y="0.667cm" svg:width="3.069cm" svg:height="1.79cm" draw:z-index="531"><draw:image xlink:href="Pictures/10000000000000E800000087585A583F.png" xlink:type="simple" xlink:show="embed" xlink:actuate="onLoad"/></draw:frame>Output<text:tab/>REAL (Gauss Funktion)</text:p>
      <text:p text:style-name="P180"><text:line-break/>Die Funktion GAUSS berechnet die Normalverteilung nach folgender Formel:</text:p>
      <text:p text:style-name="P180"><draw:frame draw:style-name="fr25" draw:name="Objekt11" text:anchor-type="as-char" svg:width="4.295cm" svg:height="1.296cm" draw:z-index="766"><draw:object xlink:href="./Object 11" xlink:type="simple" xlink:show="embed" xlink:actuate="onLoad"/><draw:image xlink:href="./ObjectReplacements/Object 11" xlink:type="simple" xlink:show="embed" xlink:actuate="onLoad"/></draw:frame></text:p>
      <text:p text:style-name="P180">Die Normalverteilung ist die Dichtefunktion Normalverteilter Zufallsgrößen. Mit den Parameter U = 0 und SI = 1 entspricht sie der Standard Normalverteilung.</text:p>
      <text:list xml:id="list38444330" text:continue-numbering="true" text:style-name="L1">
        <text:list-item>
          <text:list>
            <text:list-item>
              <text:h text:style-name="P216" text:outline-level="2"><text:alphabetical-index-mark-start text:id="IMark226158368"/>GAUSSCD<text:alphabetical-index-mark-end text:id="IMark226158368"/></text:h>
            </text:list-item>
          </text:list>
        </text:list-item>
      </text:list>
      <text:p text:style-name="P69">Type<text:tab/>Funktion : REAL</text:p>
      <text:p text:style-name="P66"><text:span text:style-name="T15">Input</text:span><text:span text:style-name="T14"><text:tab/>X : REAL (Eingangswert)</text:span></text:p>
      <text:p text:style-name="P179"><text:tab/>U : REAL (Lokalität der Funktion)</text:p>
      <text:p text:style-name="P179"><text:tab/>SI : REAL (Sigma, Spreizung der Funktion)</text:p>
      <text:p text:style-name="P71"><draw:frame draw:style-name="fr3" draw:name="Grafik549" text:anchor-type="paragraph" svg:x="0.979cm" svg:y="0.688cm" svg:width="3.69cm" svg:height="1.79cm" draw:z-index="534"><draw:image xlink:href="Pictures/100000000000011700000087591522CC.png" xlink:type="simple" xlink:show="embed" xlink:actuate="onLoad"/></draw:frame>Output<text:tab/>REAL (Gauss Verteilungsfunktion)</text:p>
      <text:p text:style-name="P180"><text:line-break/>Die Funktion GAUSSCD berechnet die Verteilungsfunktion zur Normalverteilung nach folgender Formel:</text:p>
      <text:p text:style-name="P180"><draw:frame draw:style-name="fr25" draw:name="Objekt12" text:anchor-type="as-char" svg:width="6.197cm" svg:height="1.028cm" draw:z-index="767"><draw:object xlink:href="./Object 12" xlink:type="simple" xlink:show="embed" xlink:actuate="onLoad"/><draw:image xlink:href="./ObjectReplacements/Object 12" xlink:type="simple" xlink:show="embed" xlink:actuate="onLoad"/></draw:frame></text:p>
      <text:p text:style-name="P173"><text:soft-page-break/><text:span text:style-name="T23">Die Normalverteilung ist die Dichtefunktion Normalverteilter Zufallsgrößen. Mit den Parameter U = 0 und SI = 1 entspricht sie der Standard Normalverteilung. Die Verteilungsfunktion (</text:span>Cumulative<text:span text:style-name="T23"> Distribution </text:span>Function<text:span text:style-name="T23">).</text:span></text:p>
      <text:list xml:id="list38463692" text:continue-numbering="true" text:style-name="L1">
        <text:list-item>
          <text:list>
            <text:list-item>
              <text:h text:style-name="P216" text:outline-level="2"><text:alphabetical-index-mark-start text:id="IMark226158368"/>GDF<text:alphabetical-index-mark-end text:id="IMark226158368"/></text:h>
            </text:list-item>
          </text:list>
        </text:list-item>
      </text:list>
      <text:p text:style-name="P69">Type<text:tab/>Funktion : REAL</text:p>
      <text:p text:style-name="P66"><text:span text:style-name="T15">Input</text:span><text:span text:style-name="T14"><text:tab/>X : REAL (Eingangswert)</text:span></text:p>
      <text:p text:style-name="P180"><draw:frame draw:style-name="fr3" draw:name="Grafik561" text:anchor-type="paragraph" svg:x="1.067cm" svg:y="0.69cm" svg:width="2.101cm" svg:height="0.99cm" draw:z-index="547"><draw:image xlink:href="Pictures/100000000000009F0000004BC72D259E.png" xlink:type="simple" xlink:show="embed" xlink:actuate="onLoad"/></draw:frame>Output<text:tab/>REAL (Gundermannfunktion)</text:p>
      <text:p text:style-name="P180"><text:line-break/>GDF berechnet die Gundermannfunktion.</text:p>
      <text:p text:style-name="P180">Die Berechnung erfolgt nach der Formel:<draw:frame draw:style-name="fr25" draw:name="Objekt13" text:anchor-type="as-char" svg:width="3.762cm" svg:height="1.057cm" draw:z-index="768"><draw:object xlink:href="./Object 13" xlink:type="simple" xlink:show="embed" xlink:actuate="onLoad"/><draw:image xlink:href="./ObjectReplacements/Object 13" xlink:type="simple" xlink:show="embed" xlink:actuate="onLoad"/></draw:frame></text:p>
      <text:p text:style-name="P180">Das Ergebnis von GDF liegt zwischen -/2 und +/2.</text:p>
      <text:p text:style-name="P180">GDF(0) = 0</text:p>
      <text:list xml:id="list38458081" text:continue-numbering="true" text:style-name="L1">
        <text:list-item>
          <text:list>
            <text:list-item>
              <text:h text:style-name="P216" text:outline-level="2"><text:alphabetical-index-mark-start text:id="IMark226158368"/>GOLD<text:alphabetical-index-mark-end text:id="IMark226158368"/></text:h>
            </text:list-item>
          </text:list>
        </text:list-item>
      </text:list>
      <text:p text:style-name="P69">Type<text:tab/>Funktion : REAL</text:p>
      <text:p text:style-name="P66"><text:span text:style-name="T15">Input</text:span><text:span text:style-name="T14"><text:tab/>X : REAL (Eingangswert)</text:span></text:p>
      <text:p text:style-name="P180"><draw:frame draw:style-name="fr3" draw:name="Grafik563" text:anchor-type="paragraph" svg:x="1.067cm" svg:y="0.679cm" svg:width="2.499cm" svg:height="0.99cm" draw:z-index="549"><draw:image xlink:href="Pictures/10000000000000BD0000004B957390A6.png" xlink:type="simple" xlink:show="embed" xlink:actuate="onLoad"/></draw:frame>Output<text:tab/>REAL (Ergebnis der Goldenen Funktion)</text:p>
      <text:p text:style-name="P180"><text:line-break/>GOLD berechnet das Ergebnis der goldenen Funktion. GOLD(1) ergibt den Goldenen Schnitt, und GOLD(0) ergibt 1. GOLD(X) * GOLD(-X) ergibt immer 1. GOLD(X) ist das positive Ergebnis der Quadratischen Gleichung und -GOLD(-X) ist das negative Ergebnis der Quadratischen Gleichung.</text:p>
      <text:p text:style-name="P180">Die Berechnung erfolgt nach der Formel: <draw:frame draw:style-name="fr25" draw:name="Objekt14" text:anchor-type="as-char" svg:width="3.842cm" svg:height="1.108cm" draw:z-index="770"><draw:object xlink:href="./Object 14" xlink:type="simple" xlink:show="embed" xlink:actuate="onLoad"/><draw:image xlink:href="./ObjectReplacements/Object 14" xlink:type="simple" xlink:show="embed" xlink:actuate="onLoad"/></draw:frame></text:p>
      <text:list xml:id="list38451495" text:continue-numbering="true" text:style-name="L1">
        <text:list-item>
          <text:list>
            <text:list-item>
              <text:h text:style-name="P216" text:outline-level="2"><text:soft-page-break/><text:alphabetical-index-mark-start text:id="IMark226158368"/>HYPOT<text:alphabetical-index-mark-end text:id="IMark226158368"/></text:h>
            </text:list-item>
          </text:list>
        </text:list-item>
      </text:list>
      <text:p text:style-name="P69">Type<text:tab/>Funktion : REAL</text:p>
      <text:p text:style-name="P66"><text:span text:style-name="T15">Input</text:span><text:span text:style-name="T14"><text:tab/>X : REAL (X - Wert)</text:span></text:p>
      <text:p text:style-name="P179"><text:tab/>Y : REAL (Y - Wert)</text:p>
      <text:p text:style-name="P71"><draw:frame draw:style-name="fr3" draw:name="Grafik450" text:anchor-type="paragraph" svg:x="1.069cm" svg:y="0.69cm" svg:width="3.069cm" svg:height="1.39cm" draw:z-index="432"><draw:image xlink:href="Pictures/10000000000000E8000000695ECE4886.png" xlink:type="simple" xlink:show="embed" xlink:actuate="onLoad"/></draw:frame>Output<text:tab/>REAL (Länge der Hypotenuse)</text:p>
      <text:p text:style-name="P180"><text:line-break/>Die Funktion HYPOT berechnet die Hypotenuse eines Rechtwinkeligen Dreiecks nach dem Satz des Pythagoras.</text:p>
      <text:p text:style-name="P180"><draw:frame draw:style-name="fr25" draw:name="Objekt15" text:anchor-type="as-char" svg:width="2.939cm" svg:height="0.57cm" draw:z-index="771"><draw:object xlink:href="./Object 15" xlink:type="simple" xlink:show="embed" xlink:actuate="onLoad"/><draw:image xlink:href="./ObjectReplacements/Object 15" xlink:type="simple" xlink:show="embed" xlink:actuate="onLoad"/></draw:frame></text:p>
      <text:list xml:id="list38451068" text:continue-numbering="true" text:style-name="L1">
        <text:list-item>
          <text:list>
            <text:list-item>
              <text:h text:style-name="P216" text:outline-level="2"><text:alphabetical-index-mark-start text:id="IMark226158368"/>INC<text:alphabetical-index-mark-end text:id="IMark226158368"/></text:h>
            </text:list-item>
          </text:list>
        </text:list-item>
      </text:list>
      <text:p text:style-name="P69">Type<text:tab/>Funktion : INT</text:p>
      <text:p text:style-name="P66"><text:span text:style-name="T15">Input</text:span><text:span text:style-name="T14"><text:tab/>X : INT (Eingangswert)</text:span></text:p>
      <text:p text:style-name="P179"><text:tab/>D : INT (Wert, der zum Eingangswert addiert wird)</text:p>
      <text:p text:style-name="P179"><text:tab/>M : INT (Maximalwert für den Ausgang)</text:p>
      <text:p text:style-name="P71"><draw:frame draw:style-name="fr3" draw:name="Grafik266" text:anchor-type="paragraph" svg:x="1.088cm" svg:y="0.699cm" svg:width="1.829cm" svg:height="2.02cm" draw:z-index="219"><draw:image xlink:href="Pictures/100000000000008A000000999067DF01.png" xlink:type="simple" xlink:show="embed" xlink:actuate="onLoad"/></draw:frame>Output<text:tab/>INT (Ausgangswert)</text:p>
      <text:p text:style-name="P19"><text:line-break/>INC addiert zum Eingang X den Wert D und stellt sicher, dass der Ausgang INC nicht über den Wert M läuft. Ist das Ergebnis aus der Addition von X und D größer als M so wird wieder bei 0 begonnen. Die Funktion ist vor allem Sinnvoll beim adressieren von Arrays und Pufferspeichern. Auch beim Positionieren von Absolutwert Winkelgebern kann sie eingesetzt werden. INC kann auch mit einem negativen D zum decrementieren benutzt werden, dabei stellt INC sicher dass das Ergebnis nicht unter Null läuft. Wird von Null eins abgezogen beginnt INC wieder bei M.</text:p>
      <text:p text:style-name="P180">INC := X + D, weil D maximal den Wert M annehmen kann.</text:p>
      <text:p text:style-name="P180">Wird INC &gt; M so beginnt INC wieder bei 0.</text:p>
      <text:p text:style-name="P180"><text:soft-page-break/>Wird INC &lt; 0 so beginnt INC wieder bei M</text:p>
      <text:p text:style-name="P71">Beispiel:<text:tab/>INC(3, 2, 5) ergibt 5</text:p>
      <text:p text:style-name="P71"><text:tab/>INC(4, 2, 5) ergibt 0</text:p>
      <text:p text:style-name="P180"><text:tab/>INC(0,-1,7) ergibt 7</text:p>
      <text:list xml:id="list38473228" text:continue-numbering="true" text:style-name="L1">
        <text:list-item>
          <text:list>
            <text:list-item>
              <text:h text:style-name="P216" text:outline-level="2"><text:alphabetical-index-mark-start text:id="IMark226158368"/>INC1<text:alphabetical-index-mark-end text:id="IMark226158368"/></text:h>
            </text:list-item>
          </text:list>
        </text:list-item>
      </text:list>
      <text:p text:style-name="P69">Type<text:tab/>Funktion : INT</text:p>
      <text:p text:style-name="P173"><text:span text:style-name="T15">Input</text:span><text:span text:style-name="T14"><text:tab/>X : INT ( Anzahl der Werte die X einnehmen kann)</text:span></text:p>
      <text:p text:style-name="P173"><text:span text:style-name="T18"><text:tab/>N</text:span><text:span text:style-name="T14"> : INT (Variable die Hochgezählt wird)</text:span></text:p>
      <text:p text:style-name="P69"><draw:frame draw:style-name="fr3" draw:name="Grafik623" text:anchor-type="paragraph" svg:x="1.046cm" svg:y="0.631cm" svg:width="2.731cm" svg:height="1.57cm" draw:z-index="762"><draw:image xlink:href="Pictures/10000000000000CE0000007794680276.png" xlink:type="simple" xlink:show="embed" xlink:actuate="onLoad"/></draw:frame>Output<text:tab/>INT (<text:span text:style-name="T31">Rückgabewert</text:span>)</text:p>
      <text:p text:style-name="P179"><text:line-break/>INC1 zählt die Variable X von 0 .. N-1 und beginnt dann wieder bei 0, so dass genau N verschiedene Werte beginnend bei 0 erzeugt werden.</text:p>
      <text:list xml:id="list38447084" text:continue-numbering="true" text:style-name="L1">
        <text:list-item>
          <text:list>
            <text:list-item>
              <text:h text:style-name="P216" text:outline-level="2"><text:alphabetical-index-mark-start text:id="IMark226158368"/>INC2<text:alphabetical-index-mark-end text:id="IMark226158368"/></text:h>
            </text:list-item>
          </text:list>
        </text:list-item>
      </text:list>
      <text:p text:style-name="P69">Type<text:tab/>Funktion : INT</text:p>
      <text:p text:style-name="P66"><text:span text:style-name="T15">Input</text:span><text:span text:style-name="T14"><text:tab/>X : INT (Eingangswert)</text:span></text:p>
      <text:p text:style-name="P179"><text:tab/>D : INT (Wert, der zum Eingangswert addiert wird)</text:p>
      <text:p text:style-name="P179"><text:tab/>L : INT (unterer Grenzwert)</text:p>
      <text:p text:style-name="P179"><text:tab/>U : INT (oberer Grenzwert)</text:p>
      <text:p text:style-name="P71"><draw:frame draw:style-name="fr3" draw:name="Grafik661" text:anchor-type="paragraph" svg:x="1.002cm" svg:y="0.667cm" svg:width="2.499cm" svg:height="2.18cm" draw:z-index="650"><draw:image xlink:href="Pictures/10000000000000BD000000A5E0633009.png" xlink:type="simple" xlink:show="embed" xlink:actuate="onLoad"/></draw:frame>Output<text:tab/>INT (Ausgangswert)</text:p>
      <text:p text:style-name="P19"><text:soft-page-break/><text:line-break/>INC2 addiert zum Eingang X den Wert D und stellt sicher, dass der Ausgang INC nicht über den Wert U (oberer Grenzwert) oder unter den Wert L (unterer Grenzwert) läuft. Ist das Ergebnis aus der Addition von X und D größer als U so wird wieder bei L begonnen, Bei negativen D wird sichergestellt das bei Erreichen von L wieder bei U weiter gezählt wird. Die Funktion ist vor allem Sinnvoll beim adressieren von Arrays und Pufferspeichern. Auch beim Positionieren von Absolutwert Winkelgebern kann sie eingesetzt werden. INC2 kann auch mit einem negativen D zum decrementieren benutzt werden, dabei stellt INC2 sicher dass das Ergebnis nicht unter L läuft.</text:p>
      <text:p text:style-name="P180">INC2 := X + D, wobei L &lt;= INC2 &lt;= U gilt. </text:p>
      <text:p text:style-name="P180">Beispiel:<text:tab/>INC2(2, 2, -1, 3) ergibt -1</text:p>
      <text:p text:style-name="P71"><text:tab/>INC2(2, -2, -1, 3) ergibt 0</text:p>
      <text:p text:style-name="P180"><text:tab/>INC2(2, 1, -1, 3) ergibt 3</text:p>
      <text:p text:style-name="P180"><text:tab/>INC2(0, -2, -1, 3) ergibt 3</text:p>
      <text:list xml:id="list38472725" text:continue-numbering="true" text:style-name="L1">
        <text:list-item>
          <text:list>
            <text:list-item>
              <text:h text:style-name="P216" text:outline-level="2"><text:alphabetical-index-mark-start text:id="IMark226158368"/>INV<text:alphabetical-index-mark-end text:id="IMark226158368"/></text:h>
            </text:list-item>
          </text:list>
        </text:list-item>
      </text:list>
      <text:p text:style-name="P69">Type<text:tab/>Funktion : REAL</text:p>
      <text:p text:style-name="P173"><text:span text:style-name="T15">Input</text:span><text:span text:style-name="T14"><text:tab/>X : REAL (Eingangswert)</text:span></text:p>
      <text:p text:style-name="P180"><draw:frame draw:style-name="fr3" draw:name="Grafik727" text:anchor-type="paragraph" svg:x="1.023cm" svg:y="0.676cm" svg:width="2.101cm" svg:height="0.99cm" draw:z-index="755"><draw:image xlink:href="Pictures/100000000000009F0000004B23166FBF.png" xlink:type="simple" xlink:show="embed" xlink:actuate="onLoad"/></draw:frame>Output<text:tab/>REAL ( 1 / X )</text:p>
      <text:p text:style-name="P180"><text:line-break/>INV berechnet den Kehrwert von X:</text:p>
      <text:p text:style-name="P180"><draw:frame draw:style-name="fr25" draw:name="Objekt16" text:anchor-type="as-char" svg:width="1.773cm" svg:height="1.016cm" draw:z-index="814"><draw:object xlink:href="./Object 16" xlink:type="simple" xlink:show="embed" xlink:actuate="onLoad"/><draw:image xlink:href="./ObjectReplacements/Object 16" xlink:type="simple" xlink:show="embed" xlink:actuate="onLoad"/></draw:frame></text:p>
      <text:p text:style-name="P180"/>
      <text:p text:style-name="P180"/>
      <text:p text:style-name="P180"/>
      <text:list xml:id="list38464498" text:continue-numbering="true" text:style-name="L1">
        <text:list-item>
          <text:list>
            <text:list-item>
              <text:h text:style-name="P216" text:outline-level="2"><text:soft-page-break/><text:alphabetical-index-mark-start text:id="IMark226158368"/>LANGEVIN<text:alphabetical-index-mark-end text:id="IMark226158368"/></text:h>
            </text:list-item>
          </text:list>
        </text:list-item>
      </text:list>
      <text:p text:style-name="P69">Type<text:tab/>Funktion : REAL</text:p>
      <text:p text:style-name="P173"><text:span text:style-name="T15">Input</text:span><text:span text:style-name="T14"><text:tab/>X : REAL (Eingangswert)</text:span></text:p>
      <text:p text:style-name="P180"><draw:frame draw:style-name="fr3" draw:name="Grafik397" text:anchor-type="paragraph" svg:x="1.069cm" svg:y="0.69cm" svg:width="3.69cm" svg:height="0.99cm" draw:z-index="372"><draw:image xlink:href="Pictures/10000000000001170000004B30B6B040.png" xlink:type="simple" xlink:show="embed" xlink:actuate="onLoad"/></draw:frame>Output<text:tab/>REAL (Ausgangswert)</text:p>
      <text:p text:style-name="P173"><text:span text:style-name="T23"><text:line-break/>Die </text:span>Langevin<text:span text:style-name="T23"> Funktion ist der Sigmoidfunktion sehr ähnlich, nähert sich aber langsamer den Grenzwerten an. Im Gegensatz zur Sigmoidfunktion <text:s/>liegen die Grenzwerte bei -1 und +1. Die Langevin Funktion ist vor allem auf CPUs ohne Gleitkommaeinheit deutlich schneller als die </text:span>Sigmoidfunktion.</text:p>
      <text:p text:style-name="P180"><draw:frame draw:style-name="fr3" draw:name="Grafik398" text:anchor-type="paragraph" svg:x="1.046cm" svg:y="0.667cm" svg:width="7.92cm" svg:height="4.74cm" draw:z-index="373"><draw:image xlink:href="Pictures/100000000000018F000000EF2DA25492.png" xlink:type="simple" xlink:show="embed" xlink:actuate="onLoad"/></draw:frame>Die folgende Grafik verdeutlicht den Verlauf der Langevin Funktion:</text:p>
      <text:p text:style-name="P180"/>
      <text:list xml:id="list38470491" text:continue-numbering="true" text:style-name="L1">
        <text:list-item>
          <text:list>
            <text:list-item>
              <text:h text:style-name="P216" text:outline-level="2"><text:alphabetical-index-mark-start text:id="IMark226158368"/>MAX3<text:alphabetical-index-mark-end text:id="IMark226158368"/></text:h>
            </text:list-item>
          </text:list>
        </text:list-item>
      </text:list>
      <text:p text:style-name="P69">Type<text:tab/>Funktion : REAL</text:p>
      <text:p text:style-name="P66"><text:span text:style-name="T15">Input</text:span><text:span text:style-name="T14"><text:tab/>IN1 : REAL (Eingang 1)</text:span></text:p>
      <text:p text:style-name="P69"><text:tab/>IN2 : REAL (Eingang 2)</text:p>
      <text:p text:style-name="P69"><text:tab/>IN3 : REAL (Eingang 3)</text:p>
      <text:p text:style-name="P69"><draw:frame draw:style-name="fr3" draw:name="Grafik7" text:anchor-type="paragraph" svg:x="1.004cm" svg:y="0.688cm" svg:width="2.731cm" svg:height="2.02cm" draw:z-index="3"><draw:image xlink:href="Pictures/10000000000000CE0000009977E41C54.png" xlink:type="simple" xlink:show="embed" xlink:actuate="onLoad"/></draw:frame>Output<text:tab/>REAL (Maximalwert der 3 Eingänge)</text:p>
      <text:p text:style-name="P66"><text:soft-page-break/><text:span text:style-name="T14"><text:line-break/>Die Funktion </text:span><text:span text:style-name="T23">MAX3 liefert den Maximalwert von 3 Eingängen. Grundsätzlich sollte die im Standard Funktionsumfang nach IEC61131-3 enthaltene Funktion MAX mit einer variablen Anzahl von Eingängen ausgestattet sein. Da </text:span><text:span text:style-name="T23">aber in einigen Systemen <text:s/>die Funktion MAX nur 2 Eingänge unterstützt wird die Funktion MAX3 angeboten. </text:span></text:p>
      <text:p text:style-name="P71">Beispiel:<text:tab/>MAX3(1,3,2) = 3.</text:p>
      <text:list xml:id="list38454650" text:continue-numbering="true" text:style-name="L1">
        <text:list-item>
          <text:list>
            <text:list-item>
              <text:h text:style-name="P216" text:outline-level="2"><text:alphabetical-index-mark-start text:id="IMark226158368"/>MIN3<text:alphabetical-index-mark-end text:id="IMark226158368"/></text:h>
            </text:list-item>
          </text:list>
        </text:list-item>
      </text:list>
      <text:p text:style-name="P69">Type<text:tab/>Funktion : REAL</text:p>
      <text:p text:style-name="P66"><text:span text:style-name="T15">Input</text:span><text:span text:style-name="T14"><text:tab/>IN1 : REAL (Eingang 1)</text:span></text:p>
      <text:p text:style-name="P69"><text:tab/>IN2 : REAL (Eingang 2)</text:p>
      <text:p text:style-name="P69"><text:tab/>IN3 : REAL (Eingang 3)</text:p>
      <text:p text:style-name="P69"><draw:frame draw:style-name="fr3" draw:name="Grafik8" text:anchor-type="paragraph" svg:x="0.988cm" svg:y="0.663cm" svg:width="2.731cm" svg:height="2.02cm" draw:z-index="4"><draw:image xlink:href="Pictures/10000000000000CE00000099EEC65A2D.png" xlink:type="simple" xlink:show="embed" xlink:actuate="onLoad"/></draw:frame>Output<text:tab/>REAL (Minimalwert der 3 Eingänge)</text:p>
      <text:p text:style-name="P66"><text:span text:style-name="T14"><text:line-break/>Die Funktion </text:span><text:span text:style-name="T23">MIN3 liefert den Minimalwert von 3 Eingängen. Grundsätzlich sollte die im Standard Funktionsumfang nach IEC61131-3 enthaltene Funktion MIN mit einer variablen Anzahl von Eingängen ausgestattet sein. Da aber in einigen Systemen <text:s/>die Funktion MIN nur 2 Eingänge unterstützt wird die Funktion MIN3 angeboten.</text:span></text:p>
      <text:p text:style-name="P71">Beispiel:<text:tab/>MIN3(1,3,2) = 1.</text:p>
      <text:list xml:id="list38444971" text:continue-numbering="true" text:style-name="L1">
        <text:list-item>
          <text:list>
            <text:list-item>
              <text:h text:style-name="P216" text:outline-level="2"><text:alphabetical-index-mark-start text:id="IMark226158368"/>MID3<text:alphabetical-index-mark-end text:id="IMark226158368"/></text:h>
            </text:list-item>
          </text:list>
        </text:list-item>
      </text:list>
      <text:p text:style-name="P69">Type<text:tab/>Funktion : REAL</text:p>
      <text:p text:style-name="P66"><text:span text:style-name="T15">Input</text:span><text:span text:style-name="T14"><text:tab/>IN1 : REAL (Eingang 1)</text:span></text:p>
      <text:p text:style-name="P69"><text:tab/>IN2 : REAL (Eingang 2)</text:p>
      <text:p text:style-name="P69"><text:tab/>IN3 : REAL (Eingang 3)</text:p>
      <text:p text:style-name="P69"><draw:frame draw:style-name="fr3" draw:name="Grafik9" text:anchor-type="paragraph" svg:x="1.016cm" svg:y="0.607cm" svg:width="2.731cm" svg:height="2.02cm" draw:z-index="5"><draw:image xlink:href="Pictures/10000000000000CE000000998E173767.png" xlink:type="simple" xlink:show="embed" xlink:actuate="onLoad"/></draw:frame><text:soft-page-break/>Output<text:tab/>REAL (Mittlerer Wert der 3 Eingänge)</text:p>
      <text:p text:style-name="P66"><text:span text:style-name="T14"><text:line-break/>Die Funktion </text:span><text:span text:style-name="T23">MID3 liefert den mittleren Wert von 3 Eingängen, nicht aber den Mathematischen Mittelwert.</text:span></text:p>
      <text:p text:style-name="P71">Beispiel:<text:tab/>MID3(1,5,2) = 2.</text:p>
      <text:list xml:id="list38454317" text:continue-numbering="true" text:style-name="L1">
        <text:list-item>
          <text:list>
            <text:list-item>
              <text:h text:style-name="P216" text:outline-level="2"><text:alphabetical-index-mark-start text:id="IMark226158368"/>MODR<text:alphabetical-index-mark-end text:id="IMark226158368"/></text:h>
            </text:list-item>
          </text:list>
        </text:list-item>
      </text:list>
      <text:p text:style-name="P69">Type<text:tab/>Funktion : REAL</text:p>
      <text:p text:style-name="P66"><text:span text:style-name="T15">Input</text:span><text:span text:style-name="T14"><text:tab/>IN : REAL (Dividend)</text:span></text:p>
      <text:p text:style-name="P69"><text:tab/>DIVI : REAL (Divisor)</text:p>
      <text:p text:style-name="P69"><draw:frame draw:style-name="fr3" draw:name="Grafik10" text:anchor-type="paragraph" svg:x="1.076cm" svg:y="0.642cm" svg:width="2.731cm" svg:height="1.57cm" draw:z-index="6"><draw:image xlink:href="Pictures/10000000000000CE00000077B33127DD.png" xlink:type="simple" xlink:show="embed" xlink:actuate="onLoad"/></draw:frame>Output<text:tab/>REAL (Rest der Division)</text:p>
      <text:p text:style-name="P66"><text:span text:style-name="T14"><text:line-break/>Die Funktion </text:span><text:span text:style-name="T23">MODR liefert den Rest einer Division analog der Standardfunktion MOD, allerdings für REAL-Zahlen. MODR nutzt intern das Datenformat vom Typ DINT. Hierbei kann es zu einem Überlauf kommen weil DINT maximal +/- 2.14 * 10^9 speichern kann. Der Wertebereich von MODR ist deshalb auf +/- 2.14 * 10^9 begrenzt. Für DIVI = 0 liefert die Funktion 0 zurück.</text:span></text:p>
      <text:p text:style-name="P180">MODR(A, M) = A - M * FLOOR2(A / M).</text:p>
      <text:p text:style-name="P71">Beispiel:<text:tab/>MODR(5.5, 2.5) ergibt 0.5.</text:p>
      <text:p text:style-name="P180"/>
      <text:p text:style-name="P180"/>
      <text:list xml:id="list38453362" text:continue-numbering="true" text:style-name="L1">
        <text:list-item>
          <text:list>
            <text:list-item>
              <text:h text:style-name="P216" text:outline-level="2"><text:soft-page-break/><text:alphabetical-index-mark-start text:id="IMark226158368"/>MUL_ADD<text:alphabetical-index-mark-end text:id="IMark226158368"/></text:h>
            </text:list-item>
          </text:list>
        </text:list-item>
      </text:list>
      <text:p text:style-name="P69">Type<text:tab/>Funktion : REAL</text:p>
      <text:p text:style-name="P66"><text:span text:style-name="T15">Input</text:span><text:span text:style-name="T14"><text:tab/>X : REAL (Eingangswert)</text:span></text:p>
      <text:p text:style-name="P69"><text:tab/>K : REAL (Multiplikator)</text:p>
      <text:p text:style-name="P179"><text:tab/>O : REAL (Offset)</text:p>
      <text:p text:style-name="P71"><draw:frame draw:style-name="fr3" draw:name="Grafik288" text:anchor-type="paragraph" svg:x="1.108cm" svg:y="0.676cm" svg:width="4.069cm" svg:height="2.02cm" draw:z-index="241"><draw:image xlink:href="Pictures/1000000000000134000000997A29038C.png" xlink:type="simple" xlink:show="embed" xlink:actuate="onLoad"/></draw:frame>Output<text:tab/>: REAL (Ausgangswert)</text:p>
      <text:p text:style-name="P19"><text:line-break/>MUL_ADD multipliziert den Eingangswert X mit K und addiert O hinzu.</text:p>
      <text:p text:style-name="P72">MUL_ADD = X * K + O.<text:line-break/>MUL_ADD(0.5, 10, 2) ergibt 0.5 * 10 + 2 = 7.</text:p>
      <text:list xml:id="list38454943" text:continue-numbering="true" text:style-name="L1">
        <text:list-item>
          <text:list>
            <text:list-item>
              <text:h text:style-name="P216" text:outline-level="2"><text:alphabetical-index-mark-start text:id="IMark226158368"/>NEGX<text:alphabetical-index-mark-end text:id="IMark226158368"/></text:h>
            </text:list-item>
          </text:list>
        </text:list-item>
      </text:list>
      <text:p text:style-name="P69">Type<text:tab/>Funktion : REAL</text:p>
      <text:p text:style-name="P66"><text:span text:style-name="T15">Input</text:span><text:span text:style-name="T14"><text:tab/>X : REAL (Eingangswert)</text:span></text:p>
      <text:p text:style-name="P69"><draw:frame draw:style-name="fr3" draw:name="Grafik726" text:anchor-type="paragraph" svg:x="1.025cm" svg:y="0.697cm" svg:width="2.499cm" svg:height="0.99cm" draw:z-index="754"><draw:image xlink:href="Pictures/10000000000000BD0000004B14C72CAE.png" xlink:type="simple" xlink:show="embed" xlink:actuate="onLoad"/></draw:frame>Output<text:tab/>REAL (-X)</text:p>
      <text:p text:style-name="P179"><text:line-break/>NEGX liefert den negierten Eingangswert ( - X ) zurück.</text:p>
      <text:p text:style-name="P179"/>
      <text:p text:style-name="P179"/>
      <text:p text:style-name="P179"/>
      <text:p text:style-name="P179"/>
      <text:list xml:id="list38460322" text:continue-numbering="true" text:style-name="L1">
        <text:list-item>
          <text:list>
            <text:list-item>
              <text:h text:style-name="P216" text:outline-level="2"><text:soft-page-break/><text:alphabetical-index-mark-start text:id="IMark226158368"/>RAD<text:alphabetical-index-mark-end text:id="IMark226158368"/></text:h>
            </text:list-item>
          </text:list>
        </text:list-item>
      </text:list>
      <text:p text:style-name="P69">Type<text:tab/>Funktion : REAL</text:p>
      <text:p text:style-name="P66"><text:span text:style-name="T15">Input</text:span><text:span text:style-name="T14"><text:tab/>DEG : REAL (Winkel in Grad)</text:span></text:p>
      <text:p text:style-name="P69"><draw:frame draw:style-name="fr3" draw:name="Grafik2" text:anchor-type="paragraph" svg:x="1.065cm" svg:y="0.674cm" svg:width="2.281cm" svg:height="1.12cm" draw:z-index="133"><draw:image xlink:href="Pictures/10000000000000AC0000005599DCB18F.png" xlink:type="simple" xlink:show="embed" xlink:actuate="onLoad"/></draw:frame>Output<text:tab/>REAL (Winkel in Bogenmaß)</text:p>
      <text:p text:style-name="P71"><text:line-break/>Die Funktion RAD konvertiert einen Winkelwert von Grad in Bogenmaß. Dabei wird berücksichtigt das DEG nicht größer als 360 sein darf. Wenn DEG größer als 360 ist wird solange 360 abgezogen bis DEG zwischen 0 und 360 liegt.</text:p>
      <text:p text:style-name="P181">RAD(0) = 0<text:tab/><text:tab/>RAD(180) = <text:line-break/>RAD(360) = 0<text:tab/><text:tab/>RAD(540) = </text:p>
      <text:list xml:id="list38444467" text:continue-numbering="true" text:style-name="L1">
        <text:list-item>
          <text:list>
            <text:list-item>
              <text:h text:style-name="P216" text:outline-level="2"><text:alphabetical-index-mark-start text:id="IMark226158368"/>RDM<text:alphabetical-index-mark-end text:id="IMark226158368"/></text:h>
            </text:list-item>
          </text:list>
        </text:list-item>
      </text:list>
      <text:p text:style-name="P69">Type<text:tab/>Funktion : REAL</text:p>
      <text:p text:style-name="P66"><text:span text:style-name="T15">Input</text:span><text:span text:style-name="T14"><text:tab/>LAST : REAL (Letzter berechneter Wert)</text:span></text:p>
      <text:p text:style-name="P71"><draw:frame draw:style-name="fr3" draw:name="Grafik229" text:anchor-type="paragraph" svg:x="1.101cm" svg:y="0.651cm" svg:width="2.78cm" svg:height="1.12cm" draw:z-index="189"><draw:image xlink:href="Pictures/10000000000000D200000055326C5BC3.png" xlink:type="simple" xlink:show="embed" xlink:actuate="onLoad"/></draw:frame>Output<text:tab/>REAL (Zufallszahl zwischen 0 und 1)</text:p>
      <text:p text:style-name="P17"><text:span text:style-name="T23"><text:line-break/>RDM berechnet eine P</text:span>seudo-<text:span text:style-name="T23">Zufallszahl. Dazu wird der SPS-interne </text:span><text:span text:style-name="T2">Timer</text:span><text:span text:style-name="T23"> ausgelesen und in eine Pseudo-Zufallszahl überführt. Da RDM als Funktion und nicht als Funktionsbaustein geschrieben wurde, kann es keine Daten zwischen 2 Aufrufen speichern und muss deshalb mit Vorsicht angewendet werden. Wird RDM nur einmal je Zyklus aufgerufen, liefert sie hinreichend gute Zahlen. Wird sie aber mehrfach innerhalb eines Zyklus aufgerufen, so liefert sie dieselbe Zahl, weil höchstwahrscheinlich der SPS </text:span><text:span text:style-name="T2">Timer</text:span><text:span text:style-name="T23"> noch auf demselben Wert steht. Wird die Funktion mehrfach innerhalb eines Zyklus benötigt, so muss ihr bei jedem Aufruf eine unterschiedliche Startzahl (LAST) übergeben werden. Wird Sie hingegen nur einmal je Zyklus aufgerufen, genügt der Aufruf RDM(0). Als Startzahl kann bei jedem Aufruf die letzte ermittelte Zahl von RDM verwendet werden. Die von RDM gelieferten Zufallszahlen liegen zwischen 0 und 1, die 1 nicht enthalten (0 &lt;= Zufallszahl &lt; 1.</text:span></text:p>
      <text:list xml:id="list38448674" text:continue-numbering="true" text:style-name="L1">
        <text:list-item>
          <text:list>
            <text:list-item>
              <text:h text:style-name="P216" text:outline-level="2"><text:soft-page-break/><text:alphabetical-index-mark-start text:id="IMark226158368"/>RDM2<text:alphabetical-index-mark-end text:id="IMark226158368"/></text:h>
            </text:list-item>
          </text:list>
        </text:list-item>
      </text:list>
      <text:p text:style-name="P69">Type<text:tab/>Funktion : INT</text:p>
      <text:p text:style-name="P173"><text:span text:style-name="T15">Input</text:span><text:span text:style-name="T14"><text:tab/>LAST : INT (Letzter berechneter Wert)</text:span></text:p>
      <text:p text:style-name="P179"><text:tab/>LOW : INT (niedrigster generierter Wert)</text:p>
      <text:p text:style-name="P179"><text:tab/>HIGH : INT (höchster generierter Wert)</text:p>
      <text:p text:style-name="P71"><draw:frame draw:style-name="fr3" draw:name="Grafik481" text:anchor-type="paragraph" svg:x="1.046cm" svg:y="0.688cm" svg:width="2.731cm" svg:height="2.02cm" draw:z-index="463"><draw:image xlink:href="Pictures/10000000000000CE00000099FFFB0EE6.png" xlink:type="simple" xlink:show="embed" xlink:actuate="onLoad"/></draw:frame>Output<text:tab/>INT (Zufallszahl zwischen LOW und HIGH)</text:p>
      <text:p text:style-name="P173"><text:span text:style-name="T23"><text:line-break/>RDM2 erzeugt einen Integer </text:span><text:span text:style-name="T2">Random</text:span><text:span text:style-name="T23"> Wert im Bereich von LOW bis HIGH, wobei LOW und HIGH im Wertebereich enthalten sind. Wird die Funktion nur einmal je Zyklus benutzt kann der Eingangswert LAST auf 0 bleiben. Die Funktion RDM2 benutzt die SPS interne Zeitbasis zur Erzeugung der Zufallszahl. Da RDM2 eine als LAST einen Integer benutzt welcher das letzte Ergebnis zwischen LOW und HIGH darstellt kann es zu einer Situation führen die darin resultiert das RDM2 innerhalb eines Zyklus solange sicher SPS </text:span><text:span text:style-name="T2">Timer</text:span><text:span text:style-name="T23"> nicht verändert immer das gleiche Ergebnis liefert. Dies passiert immer dann wenn zufällig das Ergebnis auch dem Startwert entspricht. Da dann derselbe Startwert wieder verwendet wird wird innerhalb des gleichen Zyklus auch wieder das gleiche Ergebnis Zustande kommen. Dieser Fall tritt umso öfter auf je kleiner der durch LOW und HIGH bestimmte Be</text:span><text:span text:style-name="T23">reich für das Ergebnis ist. Man kann diesen Effekt leicht umgehen indem man als Startwert einen Schleifenzähler verwendet der definitiv bei jedem Aufruf einen neuen Wert aufweist, oder noch besser einen Schleifenzähler addiert mit dem letzten Ergebnis als Startwert verwendet.</text:span></text:p>
      <text:list xml:id="list38448165" text:continue-numbering="true" text:style-name="L1">
        <text:list-item>
          <text:list>
            <text:list-item>
              <text:h text:style-name="P224" text:outline-level="2"><text:alphabetical-index-mark-start text:id="IMark226158368"/>RDMDW<text:alphabetical-index-mark-end text:id="IMark226158368"/></text:h>
            </text:list-item>
          </text:list>
        </text:list-item>
      </text:list>
      <text:p text:style-name="P69">Type<text:tab/>Funktion : DWORD</text:p>
      <text:p text:style-name="P66"><text:span text:style-name="T15">Input</text:span><text:span text:style-name="T14"><text:tab/>LAST : DWORD (Letzter berechneter Wert)</text:span></text:p>
      <text:p text:style-name="P71"><draw:frame draw:style-name="fr3" draw:name="Grafik6" text:anchor-type="paragraph" svg:x="1.025cm" svg:y="0.69cm" svg:width="3.6cm" svg:height="0.99cm" draw:z-index="506"><draw:image xlink:href="Pictures/10000000000001100000004B82CDD7C2.png" xlink:type="simple" xlink:show="embed" xlink:actuate="onLoad"/></draw:frame>Output<text:tab/>DWORD (Zufälliges Bitmuster)</text:p>
      <text:p text:style-name="P66"><text:span text:style-name="T23"><text:line-break/>RDMDW berechnet eine </text:span><text:span text:style-name="T26">P</text:span><text:span text:style-name="T31">seudo</text:span>-<text:span text:style-name="T23">Zufallszahl mit 32 Bit Länge im Format </text:span><text:soft-page-break/><text:span text:style-name="T23">DWORD. Dazu wird der SPS-interne </text:span><text:span text:style-name="T2">Timer</text:span><text:span text:style-name="T23"> ausgelesen und in eine </text:span><text:span text:style-name="T17">Pseudo</text:span><text:span text:style-name="T23">-Zufallszahl überführt. Da RDMDW als Funktion und nicht als Funktionsbaustein geschrieben wurde, kann es keine Daten zwischen 2 Aufrufen speichern und muss deshalb mit Vorsicht angewendet werden. Wird RDMDW nur einmal je Zyklus aufgerufen, liefert sie hinreichend gute Zahlen. Wird sie aber mehrfach innerhalb eines Zyklus aufgerufen, so liefert sie dieselbe Zahl, weil höchstwahrscheinlich der SPS </text:span><text:span text:style-name="T2">Timer</text:span><text:span text:style-name="T23"> noch auf demselben Wert steht. Wird die Funktion mehrfach innerhalb eines Zyklus benötigt, so muss ihr bei jedem Aufruf eine unterschiedliche Startzahl (LAST) übergeben werden. Wird Sie hingegen nur einmal je Zyklus aufgerufen, genügt der Aufruf RDMDW(0). Als Startzahl kann bei jedem Aufruf die letzte ermittelte Zahl von RDMDW verwendet werden. Das von RDMDW gelieferte Ergebnis ist ein Zufälliges 32Bit breites Bit Muster.</text:span></text:p>
      <text:list xml:id="list38456228" text:continue-numbering="true" text:style-name="L1">
        <text:list-item>
          <text:list>
            <text:list-item>
              <text:h text:style-name="P216" text:outline-level="2"><text:alphabetical-index-mark-start text:id="IMark226158368"/>RND<text:alphabetical-index-mark-end text:id="IMark226158368"/></text:h>
            </text:list-item>
          </text:list>
        </text:list-item>
      </text:list>
      <text:p text:style-name="P69">Type<text:tab/>Funktion : REAL</text:p>
      <text:p text:style-name="P66"><text:span text:style-name="T15">Input</text:span><text:span text:style-name="T14"><text:tab/>X : REAL (Eingangswert)</text:span></text:p>
      <text:p text:style-name="P69"><text:tab/>N : Integer (Anzahl der Stellen)</text:p>
      <text:p text:style-name="P69"><draw:frame draw:style-name="fr3" draw:name="Grafik516" text:anchor-type="paragraph" svg:x="1.046cm" svg:y="0.667cm" svg:width="2.731cm" svg:height="1.57cm" draw:z-index="497"><draw:image xlink:href="Pictures/10000000000000CE0000007711D3F601.png" xlink:type="simple" xlink:show="embed" xlink:actuate="onLoad"/></draw:frame>Output<text:tab/>REAL (Gerundeter Wert)</text:p>
      <text:p text:style-name="P66"><text:span text:style-name="T14"><text:line-break/>Die Funktion R</text:span><text:span text:style-name="T23">ND rundet den Eingangswert IN auf N Stellen. Folgt der letzten Stelle eine Stelle größer 5 wird die letzte Stelle aufgerundet. RND nutzt intern die Standard Funktion TRUNC() welche den Eingangswert in einen INTEGER vom Typ DINT wandelt. Hierbei kann es zu einem Überlauf kommen weil DINT maximal +/- 2.14 * 10^9 speichern kann. Der Wertebereich von RND ist deshalb auf +/- 2.14 * 10^9 begrenzt. Siehe hierzu auch die Funktion ROUND welche den Eingangswert auf N Nachkommastellen rundet.</text:span></text:p>
      <text:p text:style-name="P180">Beispiel:<text:tab/>RND(355.55, 2) = 360</text:p>
      <text:p text:style-name="P180"><text:tab/>RND(3.555, 2) = 3.6</text:p>
      <text:p text:style-name="P180"><text:tab/>ROUND(3.555, 2) = 3.56</text:p>
      <text:list xml:id="list38464347" text:continue-numbering="true" text:style-name="L1">
        <text:list-item>
          <text:list>
            <text:list-item>
              <text:h text:style-name="P216" text:outline-level="2"><text:soft-page-break/><text:alphabetical-index-mark-start text:id="IMark226158368"/>ROUND<text:alphabetical-index-mark-end text:id="IMark226158368"/></text:h>
            </text:list-item>
          </text:list>
        </text:list-item>
      </text:list>
      <text:p text:style-name="P69">Type<text:tab/>Funktion : REAL</text:p>
      <text:p text:style-name="P66"><text:span text:style-name="T15">Input</text:span><text:span text:style-name="T14"><text:tab/>IN : REAL (Eingangswert)</text:span></text:p>
      <text:p text:style-name="P69"><text:tab/>N : Integer (Anzahl der Nachkommastellen)</text:p>
      <text:p text:style-name="P69"><draw:frame draw:style-name="fr3" draw:name="Grafik11" text:anchor-type="paragraph" svg:x="1.004cm" svg:y="0.635cm" svg:width="2.731cm" svg:height="1.57cm" draw:z-index="7"><draw:image xlink:href="Pictures/10000000000000CE0000007702B56EFC.png" xlink:type="simple" xlink:show="embed" xlink:actuate="onLoad"/></draw:frame>Output<text:tab/>REAL (Gerundeter Wert)</text:p>
      <text:p text:style-name="P66"><text:span text:style-name="T14"><text:line-break/>Die Funktion R</text:span><text:span text:style-name="T23">OUND rundet den Eingangswert in auf N Nachkommastellen. Folgt </text:span><text:span text:style-name="T23">der letzten Stelle ein </text:span>Digit<text:span text:style-name="T23"> größer 5 wird die letzte Stelle aufgerundet. ROUND nutzt intern die Standard Funktion TRUNC() welche den Eingangswert in einen INTEGER vom Typ DINT wandelt. Hierbei kann es zu einem Überlauf kommen weil DINT maxi</text:span><text:span text:style-name="T23">mal +/- 2.14 * 10^9 speichern kann. Der Wertebereich von ROUND ist deshalb auf +/- 2.14 * 10^9 begrenzt.</text:span></text:p>
      <text:p text:style-name="P71">Beispiel:<text:tab/>ROUND(3.555, 2) = 3.56</text:p>
      <text:list xml:id="list38466201" text:continue-numbering="true" text:style-name="L1">
        <text:list-item>
          <text:list>
            <text:list-item>
              <text:h text:style-name="P216" text:outline-level="2"><text:alphabetical-index-mark-start text:id="IMark226158368"/>SGN<text:alphabetical-index-mark-end text:id="IMark226158368"/></text:h>
            </text:list-item>
          </text:list>
        </text:list-item>
      </text:list>
      <text:p text:style-name="P69">Type<text:tab/>Funktion : INT</text:p>
      <text:p text:style-name="P173"><text:span text:style-name="T15">Input</text:span><text:span text:style-name="T14"><text:tab/>X : REAL (Eingangswert)</text:span></text:p>
      <text:p text:style-name="P69"><draw:frame draw:style-name="fr3" draw:name="Grafik351" text:anchor-type="paragraph" svg:x="1.09cm" svg:y="0.688cm" svg:width="2.101cm" svg:height="0.99cm" draw:z-index="329"><draw:image xlink:href="Pictures/100000000000009F0000004B75C35190.png" xlink:type="simple" xlink:show="embed" xlink:actuate="onLoad"/></draw:frame>Output<text:tab/>INT (<text:span text:style-name="T31">Signum</text:span> des Eingangs X)</text:p>
      <text:p text:style-name="P66"><text:span text:style-name="T14"><text:line-break/>Die Funktion SGN</text:span><text:span text:style-name="T23"> berechnet das </text:span><text:span text:style-name="T26">Signum</text:span><text:span text:style-name="T23"> von X.</text:span></text:p>
      <text:p text:style-name="P180">SGN = +1 wenn X &gt; 0</text:p>
      <text:p text:style-name="P180">SGN = 0 wenn X = 0</text:p>
      <text:p text:style-name="P180">SGN = -1 wenn X &lt; 0</text:p>
      <text:list xml:id="list38455282" text:continue-numbering="true" text:style-name="L1">
        <text:list-item>
          <text:list>
            <text:list-item>
              <text:h text:style-name="P216" text:outline-level="2"><text:soft-page-break/><text:alphabetical-index-mark-start text:id="IMark226158368"/>SIGMOID<text:alphabetical-index-mark-end text:id="IMark226158368"/></text:h>
            </text:list-item>
          </text:list>
        </text:list-item>
      </text:list>
      <text:p text:style-name="P69">Type<text:tab/>Funktion : INT</text:p>
      <text:p text:style-name="P173"><text:span text:style-name="T15">Input</text:span><text:span text:style-name="T14"><text:tab/>X : REAL (Eingangswert)</text:span></text:p>
      <text:p text:style-name="P69"><draw:frame draw:style-name="fr3" draw:name="Grafik395" text:anchor-type="paragraph" svg:x="1.069cm" svg:y="0.688cm" svg:width="3.69cm" svg:height="0.99cm" draw:z-index="370"><draw:image xlink:href="Pictures/10000000000001170000004BD297ADBD.png" xlink:type="simple" xlink:show="embed" xlink:actuate="onLoad"/></draw:frame>Output<text:tab/>REAL (Ergebnis der <text:span text:style-name="T31">Sigmoidfunktion</text:span>)</text:p>
      <text:p text:style-name="P173"><text:span text:style-name="T14"><text:line-break/>Die </text:span><text:span text:style-name="T31">Sigmoidfunktion</text:span><text:span text:style-name="T14"> wird auch </text:span><text:span text:style-name="T31">Schwanenhals</text:span><text:span text:style-name="T14">- Funktion genannt und wird durch die folgende Gleichung beschrieben:</text:span></text:p>
      <text:p text:style-name="P179">SIGMOID = 1 / (1 + EXP(-X))</text:p>
      <text:p text:style-name="P179">Die <text:span text:style-name="T31">Sigmoidfunktion</text:span> wird häufig als Aktivierungsfunktion verwendet. Durch seinen Verlauf eignet sich die <text:span text:style-name="T31">Sigmoidfunktion</text:span> für weiche Schaltübergänge.</text:p>
      <text:p text:style-name="P179"><draw:frame draw:style-name="fr3" draw:name="Grafik396" text:anchor-type="paragraph" svg:x="1.111cm" svg:y="0.688cm" svg:width="8.169cm" svg:height="2.87cm" draw:z-index="371"><draw:image xlink:href="Pictures/10000000000001A0000000B5346B6230.png" xlink:type="simple" xlink:show="embed" xlink:actuate="onLoad"/></draw:frame>Die folgende Grafik veranschaulicht den Verlauf der <text:span text:style-name="T31">Sigmoidfunktion</text:span>:</text:p>
      <text:p text:style-name="P179"/>
      <text:list xml:id="list38464803" text:continue-numbering="true" text:style-name="L1">
        <text:list-item>
          <text:list>
            <text:list-item>
              <text:h text:style-name="P216" text:outline-level="2"><text:alphabetical-index-mark-start text:id="IMark226158368"/>SIGN_I<text:alphabetical-index-mark-end text:id="IMark226158368"/></text:h>
            </text:list-item>
          </text:list>
        </text:list-item>
      </text:list>
      <text:p text:style-name="P69">Type<text:tab/>Funktion : BOOL</text:p>
      <text:p text:style-name="P66"><text:span text:style-name="T15">Input</text:span><text:span text:style-name="T14"><text:tab/>IN : DINT (Eingangswert)</text:span></text:p>
      <text:p text:style-name="P69"><draw:frame draw:style-name="fr3" draw:name="Grafik12" text:anchor-type="paragraph" svg:x="1.064cm" svg:y="0.661cm" svg:width="2.731cm" svg:height="1.12cm" draw:z-index="8"><draw:image xlink:href="Pictures/10000000000000CE0000005564D14BE4.png" xlink:type="simple" xlink:show="embed" xlink:actuate="onLoad"/></draw:frame>Output<text:tab/>BOOL (TRUE, wenn der Eingang negativ ist)</text:p>
      <text:p text:style-name="P66"><text:span text:style-name="T14"><text:line-break/>Die Funktion </text:span><text:span text:style-name="T23">SIGN_I liefert TRUE zurück, wenn der Eingangswert negativ ist. Die Eingangswerte sind vom Typ DINT.</text:span></text:p>
      <text:list xml:id="list38443955" text:continue-numbering="true" text:style-name="L1">
        <text:list-item>
          <text:list>
            <text:list-item>
              <text:h text:style-name="P216" text:outline-level="2"><text:soft-page-break/><text:alphabetical-index-mark-start text:id="IMark226158368"/>SIGN_R<text:alphabetical-index-mark-end text:id="IMark226158368"/></text:h>
            </text:list-item>
          </text:list>
        </text:list-item>
      </text:list>
      <text:p text:style-name="P69">Type<text:tab/>Funktion : BOOL</text:p>
      <text:p text:style-name="P66"><text:span text:style-name="T15">Input</text:span><text:span text:style-name="T14"><text:tab/>IN : REAL(Eingangswert)</text:span></text:p>
      <text:p text:style-name="P69"><draw:frame draw:style-name="fr3" draw:name="Grafik13" text:anchor-type="paragraph" svg:x="1.072cm" svg:y="0.598cm" svg:width="3.18cm" svg:height="1.12cm" draw:z-index="9"><draw:image xlink:href="Pictures/10000000000000F00000005540376921.png" xlink:type="simple" xlink:show="embed" xlink:actuate="onLoad"/></draw:frame>Output<text:tab/>BOOL (TRUE, wenn der Eingang negativ ist)</text:p>
      <text:p text:style-name="P71"><text:line-break/>Die Funktion SIGN_R liefert TRUE zurück, wenn der Eingangswert negativ ist. Die Eingangswerte sind vom Typ REAL.</text:p>
      <text:list xml:id="list38456764" text:continue-numbering="true" text:style-name="L1">
        <text:list-item>
          <text:list>
            <text:list-item>
              <text:h text:style-name="P216" text:outline-level="2"><text:alphabetical-index-mark-start text:id="IMark226158368"/>SINC<text:alphabetical-index-mark-end text:id="IMark226158368"/></text:h>
            </text:list-item>
          </text:list>
        </text:list-item>
      </text:list>
      <text:p text:style-name="P69">Type<text:tab/>Funktion : REAL</text:p>
      <text:p text:style-name="P66"><text:span text:style-name="T15">Input</text:span><text:span text:style-name="T14"><text:tab/>X : REAL (Eingangswert)</text:span></text:p>
      <text:p text:style-name="P71"><draw:frame draw:style-name="fr3" draw:name="Grafik517" text:anchor-type="paragraph" svg:x="1.002cm" svg:y="0.667cm" svg:width="2.731cm" svg:height="1.12cm" draw:z-index="498"><draw:image xlink:href="Pictures/10000000000000CE00000055459FC0E5.png" xlink:type="simple" xlink:show="embed" xlink:actuate="onLoad"/></draw:frame>Output<text:tab/>REAL (Ausgangswert)</text:p>
      <text:p text:style-name="P180"><text:line-break/>SINC berechnet den Sinus <text:span text:style-name="T31">Kardinalis</text:span> oder die Spaltfunktion.</text:p>
      <text:p text:style-name="P180"><draw:frame draw:style-name="fr25" draw:name="Objekt17" text:anchor-type="as-char" svg:width="2.445cm" svg:height="1.034cm" draw:z-index="774"><draw:object xlink:href="./Object 17" xlink:type="simple" xlink:show="embed" xlink:actuate="onLoad"/><draw:image xlink:href="./ObjectReplacements/Object 17" xlink:type="simple" xlink:show="embed" xlink:actuate="onLoad"/></draw:frame>Mit SINC(0) = 1.</text:p>
      <text:list xml:id="list38467494" text:continue-numbering="true" text:style-name="L1">
        <text:list-item>
          <text:list>
            <text:list-item>
              <text:h text:style-name="P216" text:outline-level="2"><text:alphabetical-index-mark-start text:id="IMark226158368"/>SINH<text:alphabetical-index-mark-end text:id="IMark226158368"/></text:h>
            </text:list-item>
          </text:list>
        </text:list-item>
      </text:list>
      <text:p text:style-name="P69">Type<text:tab/>Funktion : REAL</text:p>
      <text:p text:style-name="P66"><text:span text:style-name="T15">Input</text:span><text:span text:style-name="T14"><text:tab/>X : REAL (Eingangswert)</text:span></text:p>
      <text:p text:style-name="P69"><draw:frame draw:style-name="fr3" draw:name="Grafik241" text:anchor-type="paragraph" svg:x="1.067cm" svg:y="0.67cm" svg:width="2.281cm" svg:height="1.12cm" draw:z-index="200"><draw:image xlink:href="Pictures/10000000000000AC00000055B7D3663F.png" xlink:type="simple" xlink:show="embed" xlink:actuate="onLoad"/></draw:frame>Output<text:tab/>REAL (Ausgangswert)</text:p>
      <text:p text:style-name="P2"><text:span text:style-name="T13"><text:line-break/>SINH</text:span> <text:span text:style-name="T13">Berechnet</text:span> den Sinus <text:span text:style-name="T31">Hyperbolicus</text:span> nach folgender Formel:</text:p>
      <text:p text:style-name="P71"><text:soft-page-break/><draw:frame draw:style-name="fr25" draw:name="Objekt18" text:anchor-type="as-char" svg:width="3.014cm" svg:height="1.067cm" draw:z-index="775"><draw:object xlink:href="./Object 18" xlink:type="simple" xlink:show="embed" xlink:actuate="onLoad"/><draw:image xlink:href="./ObjectReplacements/Object 18" xlink:type="simple" xlink:show="embed" xlink:actuate="onLoad"/></draw:frame></text:p>
      <text:list xml:id="list38473558" text:continue-numbering="true" text:style-name="L1">
        <text:list-item>
          <text:list>
            <text:list-item>
              <text:h text:style-name="P216" text:outline-level="2"><text:alphabetical-index-mark-start text:id="IMark226158368"/>SQRTN<text:alphabetical-index-mark-end text:id="IMark226158368"/></text:h>
            </text:list-item>
          </text:list>
        </text:list-item>
      </text:list>
      <text:p text:style-name="P69">Type<text:tab/>Funktion : REAL</text:p>
      <text:p text:style-name="P66"><text:span text:style-name="T15">Input</text:span><text:span text:style-name="T14"><text:tab/>X : REAL (Eingangswert)</text:span></text:p>
      <text:p text:style-name="P69"><draw:frame draw:style-name="fr3" draw:name="Grafik257" text:anchor-type="paragraph" svg:x="0.984cm" svg:y="0.64cm" svg:width="2.731cm" svg:height="1.57cm" draw:z-index="212"><draw:image xlink:href="Pictures/10000000000000CE00000077C147416B.png" xlink:type="simple" xlink:show="embed" xlink:actuate="onLoad"/></draw:frame>Output<text:tab/>REAL (Ausgangswert)</text:p>
      <text:p text:style-name="P179"><text:line-break/>SQRTN Berechnet die N-fache Wurzel aus X nach folgender Formel:</text:p>
      <text:p text:style-name="P180"><draw:frame draw:style-name="fr25" draw:name="Objekt19" text:anchor-type="as-char" svg:width="2.088cm" svg:height="0.564cm" draw:z-index="776"><draw:object xlink:href="./Object 19" xlink:type="simple" xlink:show="embed" xlink:actuate="onLoad"/><draw:image xlink:href="./ObjectReplacements/Object 19" xlink:type="simple" xlink:show="embed" xlink:actuate="onLoad"/></draw:frame></text:p>
      <text:list xml:id="list38455494" text:continue-numbering="true" text:style-name="L1">
        <text:list-item>
          <text:list>
            <text:list-item>
              <text:h text:style-name="P216" text:outline-level="2"><text:alphabetical-index-mark-start text:id="IMark226158368"/>TANC<text:alphabetical-index-mark-end text:id="IMark226158368"/></text:h>
            </text:list-item>
          </text:list>
        </text:list-item>
      </text:list>
      <text:p text:style-name="P69">Type<text:tab/>Funktion : REAL</text:p>
      <text:p text:style-name="P66"><text:span text:style-name="T15">Input</text:span><text:span text:style-name="T14"><text:tab/>X : REAL (Eingangswert)</text:span></text:p>
      <text:p text:style-name="P69"><draw:frame draw:style-name="fr3" draw:name="Grafik721" text:anchor-type="paragraph" svg:x="1.087cm" svg:y="0.651cm" svg:width="2.731cm" svg:height="1.12cm" draw:z-index="741"><draw:image xlink:href="Pictures/10000000000000CE000000556003E833.png" xlink:type="simple" xlink:show="embed" xlink:actuate="onLoad"/></draw:frame>Output<text:tab/>REAL (Ausgangswert)</text:p>
      <text:p text:style-name="P2"><text:line-break/><text:span text:style-name="T13">TANC</text:span> Berechnet die TANC Funktion nach folgender Formel:</text:p>
      <text:p text:style-name="P71"><draw:frame draw:style-name="fr25" draw:name="Objekt20" text:anchor-type="as-char" svg:width="2.628cm" svg:height="1.032cm" draw:z-index="777"><draw:object xlink:href="./Object 20" xlink:type="simple" xlink:show="embed" xlink:actuate="onLoad"/><draw:image xlink:href="./ObjectReplacements/Object 20" xlink:type="simple" xlink:show="embed" xlink:actuate="onLoad"/></draw:frame> mit TANC(0) = 1.</text:p>
      <text:list xml:id="list38443492" text:continue-numbering="true" text:style-name="L1">
        <text:list-item>
          <text:list>
            <text:list-item>
              <text:h text:style-name="P216" text:outline-level="2"><text:soft-page-break/><text:alphabetical-index-mark-start text:id="IMark226158368"/>TANH<text:alphabetical-index-mark-end text:id="IMark226158368"/></text:h>
            </text:list-item>
          </text:list>
        </text:list-item>
      </text:list>
      <text:p text:style-name="P69">Type<text:tab/>Funktion : REAL</text:p>
      <text:p text:style-name="P66"><text:span text:style-name="T15">Input</text:span><text:span text:style-name="T14"><text:tab/>X : REAL (Eingangswert)</text:span></text:p>
      <text:p text:style-name="P69"><draw:frame draw:style-name="fr3" draw:name="Grafik242" text:anchor-type="paragraph" svg:x="1.087cm" svg:y="0.651cm" svg:width="2.731cm" svg:height="1.12cm" draw:z-index="201"><draw:image xlink:href="Pictures/10000000000000CE000000556003E833.png" xlink:type="simple" xlink:show="embed" xlink:actuate="onLoad"/></draw:frame>Output<text:tab/>REAL (Ausgangswert)</text:p>
      <text:p text:style-name="P2"><text:line-break/><text:span text:style-name="T13">TANH</text:span> Berechnet den <text:span text:style-name="T13">Tangens</text:span> <text:span text:style-name="T31">Hyperbolicus</text:span> nach folgender Formel:</text:p>
      <text:p text:style-name="P71"><draw:frame draw:style-name="fr25" draw:name="Objekt21" text:anchor-type="as-char" svg:width="3.02cm" svg:height="1.074cm" draw:z-index="778"><draw:object xlink:href="./Object 21" xlink:type="simple" xlink:show="embed" xlink:actuate="onLoad"/><draw:image xlink:href="./ObjectReplacements/Object 21" xlink:type="simple" xlink:show="embed" xlink:actuate="onLoad"/></draw:frame></text:p>
      <text:list xml:id="list38466154" text:continue-numbering="true" text:style-name="L1">
        <text:list-item>
          <text:list>
            <text:list-item>
              <text:h text:style-name="P216" text:outline-level="2"><text:alphabetical-index-mark-start text:id="IMark226158368"/>WINDOW<text:alphabetical-index-mark-end text:id="IMark226158368"/></text:h>
            </text:list-item>
          </text:list>
        </text:list-item>
      </text:list>
      <text:p text:style-name="P69">Type<text:tab/>Funktion : BOOL</text:p>
      <text:p text:style-name="P66"><text:span text:style-name="T15">Input</text:span><text:span text:style-name="T14"><text:tab/>LOW : REAL (unterer Grenzwert)</text:span></text:p>
      <text:p text:style-name="P69"><text:tab/>IN : REAL (Eingangswert)</text:p>
      <text:p text:style-name="P69"><text:tab/>HIGH : REAL (oberer Grenzwert)</text:p>
      <text:p text:style-name="P69"><draw:frame draw:style-name="fr3" draw:name="Grafik171" text:anchor-type="paragraph" svg:x="1.111cm" svg:y="0.695cm" svg:width="3.18cm" svg:height="2.02cm" draw:z-index="154"><draw:image xlink:href="Pictures/10000000000000F00000009985533CAB.png" xlink:type="simple" xlink:show="embed" xlink:actuate="onLoad"/></draw:frame>Output<text:tab/>BOOL (TRUE, wenn in &lt; HIGH und in &gt; LOW)</text:p>
      <text:p text:style-name="P71"><text:line-break/>Die Funktion WINDOW testet, ob der Eingangswert IN innerhalb der Grenzen, die durch LOW und HIGH definiert sind, liegt.</text:p>
      <text:p text:style-name="P180">WINDOW ist genau dann TRUE, wenn IN &lt; HIGH und IN &gt; LOW ist.</text:p>
      <text:p text:style-name="P180"/>
      <text:p text:style-name="P180"/>
      <text:list xml:id="list38468005" text:continue-numbering="true" text:style-name="L1">
        <text:list-item>
          <text:list>
            <text:list-item>
              <text:h text:style-name="P216" text:outline-level="2"><text:soft-page-break/><text:alphabetical-index-mark-start text:id="IMark226158368"/>WINDOW2<text:alphabetical-index-mark-end text:id="IMark226158368"/></text:h>
            </text:list-item>
          </text:list>
        </text:list-item>
      </text:list>
      <text:p text:style-name="P69">Type<text:tab/>Funktion : BOOL</text:p>
      <text:p text:style-name="P66"><text:span text:style-name="T15">Input</text:span><text:span text:style-name="T14"><text:tab/>LOW : REAL (unterer Grenzwert)</text:span></text:p>
      <text:p text:style-name="P69"><text:tab/>IN : REAL (Eingangswert)</text:p>
      <text:p text:style-name="P69"><text:tab/>HIGH : REAL (oberer Grenzwert)</text:p>
      <text:p text:style-name="P69"><draw:frame draw:style-name="fr3" draw:name="Grafik371" text:anchor-type="paragraph" svg:x="1.023cm" svg:y="0.69cm" svg:width="3.62cm" svg:height="2.02cm" draw:z-index="347"><draw:image xlink:href="Pictures/100000000000011200000099D81DA8B6.png" xlink:type="simple" xlink:show="embed" xlink:actuate="onLoad"/></draw:frame>Output<text:tab/>BOOL (TRUE, wenn in &lt;= HIGH und in &gt;= LOW)</text:p>
      <text:p text:style-name="P71"><text:line-break/>Die Funktion WINDOW2 testet, ob der Eingangswert IN &lt;= HIGH und IN &gt;= LOW ist. Im Gegensatz zur Funktion WINDOW die TRUE liefert wenn IN innerhalb der Grenzen LOW und HIGH liegt liefert WINDOW2 FALSE wenn IN außerhalb der Grenzen <text:s/>LOW und HIGH liegt.</text:p>
      <text:list xml:id="list38475056" text:continue-numbering="true" text:style-name="L1">
        <text:list-item>
          <text:h text:style-name="P211" text:outline-level="1">Array</text:h>
          <text:list>
            <text:list-item>
              <text:h text:style-name="P216" text:outline-level="2"><text:alphabetical-index-mark-start text:id="IMark226158368"/>_ARRAY_ABS<text:alphabetical-index-mark-end text:id="IMark226158368"/></text:h>
            </text:list-item>
          </text:list>
        </text:list-item>
      </text:list>
      <text:p text:style-name="P69">Type<text:tab/>Funktion : BOOL</text:p>
      <text:p text:style-name="P66"><text:span text:style-name="T15">Input</text:span><text:span text:style-name="T14"><text:tab/>PT : </text:span><text:span text:style-name="T15">Pointer</text:span><text:span text:style-name="T14"> (Zeiger auf das Array)</text:span></text:p>
      <text:p text:style-name="P69"><text:tab/>SIZE : UINT (Größe des Arrays)</text:p>
      <text:p text:style-name="P71"><draw:frame draw:style-name="fr3" draw:name="Grafik541" text:anchor-type="paragraph" svg:x="1.069cm" svg:y="0.667cm" svg:width="4.48cm" svg:height="1.39cm" draw:z-index="526"><draw:image xlink:href="Pictures/100000000000015300000069C7EC64D3.png" xlink:type="simple" xlink:show="embed" xlink:actuate="onLoad"/></draw:frame>Output<text:tab/>BOOL (TRUE)</text:p>
      <text:p text:style-name="P66"><text:span text:style-name="T23"><text:line-break/>Die Funktion _ARRAY</text:span>_<text:span text:style-name="T23">ABS rechnet die Elemente eines beliebigen Array </text:span>of<text:span text:style-name="T23"> REAL in den Absolutwert um. Beim Aufruf wird der Funktion ein </text:span>Pointer<text:span text:style-name="T23"> auf das zu initialisierende Array und dessen Größe in Bytes übergeben. Unter CoDeSys lautet der Aufruf: _ARRAY_ABS(ADR(Array), SIZEOF(Array), INIT), wobei Array der Name des zu manipulierenden Arrays ist. ADR ist eine Standardfunktion, die den </text:span>Pointer<text:span text:style-name="T23"> auf das Array ermittelt und SIZEOF ist eine Standardfunktion, die die Größe des Arrays ermittelt. Die Funktion liefert nur TRUE zurück. Das durch den </text:span>Pointer<text:span text:style-name="T23"> angegebene Array wird direkt im Speicher manipuliert.</text:span></text:p>
      <text:p text:style-name="P180">Diese Art der Bearbeitung von Arrays ist äußerst effizient, da kein zusätzlicher Speicher benötigt wird und keine Übergabewerte kopiert werden müssen.</text:p>
      <text:p text:style-name="P180"><text:line-break/>Aufruf:<text:tab/>_ARRAY_ABS(ADR(bigarray), SIZEOF(bigarray))</text:p>
      <text:p text:style-name="P71">Beipiel:<text:tab/>[0,-2,3,-1-5]<text:tab/> wird umgewandelt in [0,2,3,1,5]</text:p>
      <text:p text:style-name="P180"/>
      <text:p text:style-name="P180"/>
      <text:list xml:id="list38454490" text:continue-numbering="true" text:style-name="L1">
        <text:list-item>
          <text:list>
            <text:list-item>
              <text:h text:style-name="P216" text:outline-level="2"><text:soft-page-break/><text:alphabetical-index-mark-start text:id="IMark226158368"/>_ARRAY_ADD<text:alphabetical-index-mark-end text:id="IMark226158368"/></text:h>
            </text:list-item>
          </text:list>
        </text:list-item>
      </text:list>
      <text:p text:style-name="P69">Type<text:tab/>Funktion : BOOL</text:p>
      <text:p text:style-name="P66"><text:span text:style-name="T15">Input</text:span><text:span text:style-name="T14"><text:tab/>PT : </text:span><text:span text:style-name="T15">Pointer</text:span><text:span text:style-name="T14"> (Zeiger auf das Array)</text:span></text:p>
      <text:p text:style-name="P69"><text:tab/>SIZE : UINT (Größe des Arrays)</text:p>
      <text:p text:style-name="P179"><text:tab/>X : REAL (zu addierender Wert)</text:p>
      <text:p text:style-name="P71"><draw:frame draw:style-name="fr3" draw:name="Grafik542" text:anchor-type="paragraph" svg:x="1.025cm" svg:y="0.69cm" svg:width="4.48cm" svg:height="1.79cm" draw:z-index="527"><draw:image xlink:href="Pictures/100000000000015300000087506ED3FA.png" xlink:type="simple" xlink:show="embed" xlink:actuate="onLoad"/></draw:frame>Output<text:tab/>BOOL (TRUE)</text:p>
      <text:p text:style-name="P66"><text:span text:style-name="T23"><text:line-break/>Die Funktion _ARRAY</text:span>_<text:span text:style-name="T23">ADD addiert zu jedem Element eines beliebigen Array </text:span>of<text:span text:style-name="T23"> REAL den Wert X. Beim Aufruf wird der Funktion ein </text:span>Pointer<text:span text:style-name="T23"> auf das zu initialisierende Array und dessen Größe in Bytes übergeben. Unter CoDeSys lautet der Aufruf: _ARRAY_ADD(ADR(Array), SIZEOF(Array), INIT), wobei Array der Name des zu manipulierenden Arrays ist. ADR ist eine Standardfunktion, die den </text:span>Pointer<text:span text:style-name="T23"> auf das Array ermittelt und SIZEOF ist eine Standardfunktion, die die Größe des Arrays ermittelt. Die Funktion liefert nur TRUE zurück. Das durch den </text:span>Pointer<text:span text:style-name="T23"> angegebene Array wird direkt im Speicher manipuliert.</text:span></text:p>
      <text:p text:style-name="P180">Diese Art der Bearbeitung von Arrays ist äußerst effizient, da kein zusätzlicher Speicher benötigt wird und keine Übergabewerte kopiert werden müssen.</text:p>
      <text:p text:style-name="P180"><text:line-break/>Aufruf:<text:tab/>_ARRAY_ADD(ADR(bigarray), SIZEOF(bigarray), X)</text:p>
      <text:p text:style-name="P71">Beipiel:<text:tab/>[0,-2,3,-1-5]<text:tab/> ; X = 3 wird umgewandelt in [3,1,6,2,-2]</text:p>
      <text:list xml:id="list38448711" text:continue-numbering="true" text:style-name="L1">
        <text:list-item>
          <text:list>
            <text:list-item>
              <text:h text:style-name="P216" text:outline-level="2"><text:alphabetical-index-mark-start text:id="IMark226158368"/>_ARRAY_INIT<text:alphabetical-index-mark-end text:id="IMark226158368"/></text:h>
            </text:list-item>
          </text:list>
        </text:list-item>
      </text:list>
      <text:p text:style-name="P69">Type<text:tab/>Funktion : BOOL</text:p>
      <text:p text:style-name="P66"><text:span text:style-name="T15">Input</text:span><text:span text:style-name="T14"><text:tab/>PT : </text:span><text:span text:style-name="T15">Pointer</text:span><text:span text:style-name="T14"> (Zeiger auf das Array)</text:span></text:p>
      <text:p text:style-name="P69"><text:tab/>SIZE : UINT (Größe des Arrays)</text:p>
      <text:p text:style-name="P69"><text:tab/>INIT : REAL (Initialwert)</text:p>
      <text:p text:style-name="P71"><draw:frame draw:style-name="fr3" draw:name="Grafik56" text:anchor-type="paragraph" svg:x="1.021cm" svg:y="0.661cm" svg:width="4.069cm" svg:height="2.02cm" draw:z-index="37"><draw:image xlink:href="Pictures/100000000000013400000099EA740595.png" xlink:type="simple" xlink:show="embed" xlink:actuate="onLoad"/></draw:frame>Output<text:tab/>BOOL (TRUE)</text:p>
      <text:p text:style-name="P66"><text:soft-page-break/><text:span text:style-name="T23"><text:line-break/>Die Funktion _ARRAY</text:span>_<text:span text:style-name="T23">INIT initialisiert ein beliebiges Array </text:span>of<text:span text:style-name="T23"> REAL mit einem Initialwert. Beim Aufruf wird der Funktion ein </text:span>Pointer<text:span text:style-name="T23"> auf das zu initialisierende Array und dessen Größe in Bytes übergeben. Unter CoDeSys lautet der Aufruf: _ARRAY_INIT(ADR(Array), SIZEOF(Array), INIT), wobei Array der Name des zu manipulierenden Arrays ist. ADR ist eine Standardfunktion, die den </text:span>Pointer<text:span text:style-name="T23"> auf das Array ermittelt und SIZEOF ist eine Standardfunktion, die die Größe des Arrays ermittelt. Die Funktion liefert nur TRUE zurück. Das durch den </text:span>Pointer<text:span text:style-name="T23"> angegebene Array wird direkt im Speicher manipuliert.</text:span></text:p>
      <text:p text:style-name="P180">Diese Art der Bearbeitung von Arrays ist äußerst effizient, da kein zusätzlicher Speicher benötigt wird und keine Übergabewerte kopiert werden müssen.</text:p>
      <text:p text:style-name="P180"><text:line-break/>Beispiel:<text:tab/>_ARRAY_INIT(ADR(bigarray), SIZEOF(bigarray), 0)</text:p>
      <text:p text:style-name="P71"><text:tab/>initialisiert bigarray mit 0.</text:p>
      <text:list xml:id="list38456385" text:continue-numbering="true" text:style-name="L1">
        <text:list-item>
          <text:list>
            <text:list-item>
              <text:h text:style-name="P216" text:outline-level="2"><text:alphabetical-index-mark-start text:id="IMark226158368"/>_ARRAY_MEDIAN<text:alphabetical-index-mark-end text:id="IMark226158368"/></text:h>
            </text:list-item>
          </text:list>
        </text:list-item>
      </text:list>
      <text:p text:style-name="P81">Type<text:tab/>Funktion : REAL</text:p>
      <text:p text:style-name="P81">Input<text:tab/>PT : Pointer (Zeiger auf das Array)</text:p>
      <text:p text:style-name="P81"><text:tab/>SIZE : UINT (Größe des Arrays)</text:p>
      <text:p text:style-name="P81"><draw:frame draw:style-name="fr3" draw:name="Grafik54" text:anchor-type="paragraph" svg:x="0.995cm" svg:y="0.669cm" svg:width="5.42cm" svg:height="1.57cm" draw:z-index="36"><draw:image xlink:href="Pictures/100000000000019A00000077C58E8F4A.png" xlink:type="simple" xlink:show="embed" xlink:actuate="onLoad"/></draw:frame>Output<text:tab/>REAL (Medianwert des Arrays)</text:p>
      <text:p text:style-name="P66"><text:span text:style-name="T23"><text:line-break/>Die Funktion _ARRAY</text:span>_<text:span text:style-name="T23">MEDIAN ermittelt den Medianwert eines beliebigen Arrays </text:span>of<text:span text:style-name="T23"> REAL. Beim Aufruf wird der Funktion ein </text:span>Pointer<text:span text:style-name="T23"> auf das Array und dessen Größe in Bytes übergeben. Unter CoDeSys lautet der Aufruf: _ARRAY_MEDIAN(ADR(Array), SIZEOF(Array)), wobei Array der Name des zu manipulierenden Arrays ist. ADR() ist eine Standardfunktion, die den </text:span>Pointer<text:span text:style-name="T23"> auf das Array ermittelt und SIZEOF() ist eine Standardfunktion, die die Größe des Arrays ermittelt. Um den Medianwert zu ermitteln wird das durch den </text:span>Pointer<text:span text:style-name="T23"> referenzierte Array direkt im Speicher sortiert und bleibt </text:span><text:span text:style-name="T23">nach </text:span><text:soft-page-break/><text:span text:style-name="T23">beenden der Funktion sortiert. Die Funktion _ARRAY_MEDIAN verändert also den Inhalt des Arrays.</text:span></text:p>
      <text:p text:style-name="P173"><text:span text:style-name="T23">Diese Art der Bearbeitung von Arrays</text:span><text:span text:style-name="T23"> ist äußerst effizient, da kein zusätzlicher Speicher benötigt wird und keine Übergabewerte kopiert werden müssen.</text:span></text:p>
      <text:p text:style-name="P66"><text:span text:style-name="T23">Sollte ein Array bearbeitet werden, das nicht verändert werden darf, so ist es vor Übergabe des </text:span>Pointer<text:span text:style-name="T23"> und Aufruf der Funktion in ein temporäres Array zu kopieren.</text:span></text:p>
      <text:p text:style-name="P180"><text:line-break/>Beispiel:<text:tab/>_ARRAY_MEDIAN(ADR(bigarray), SIZEOF(bigarray))</text:p>
      <text:p text:style-name="P66"><text:span text:style-name="T23">Medianwert: <text:line-break/>Der Medianwert ist der Mittlere Wert einer sortierten Wertemenge.<text:line-break/></text:span>Median<text:span text:style-name="T23"> von (12, 0, 4, 7, 1) ist 4. Nach dem Ausführen der Funktion bleibt das Array sortiert im Speicher zurück (0, 1, 4, 7, 12).</text:span></text:p>
      <text:p text:style-name="P180">Wenn das Array eine gerade Anzahl von Elementen enthält ist der Medianwert der Mittelwert aus den beiden mittleren Werten des Arrays.</text:p>
      <text:list xml:id="list38459993" text:continue-numbering="true" text:style-name="L1">
        <text:list-item>
          <text:list>
            <text:list-item>
              <text:h text:style-name="P216" text:outline-level="2"><text:alphabetical-index-mark-start text:id="IMark226158368"/>_ARRAY_MUL<text:alphabetical-index-mark-end text:id="IMark226158368"/></text:h>
            </text:list-item>
          </text:list>
        </text:list-item>
      </text:list>
      <text:p text:style-name="P69">Type<text:tab/>Funktion : BOOL</text:p>
      <text:p text:style-name="P66"><text:span text:style-name="T15">Input</text:span><text:span text:style-name="T14"><text:tab/>PT : </text:span><text:span text:style-name="T15">Pointer</text:span><text:span text:style-name="T14"> (Zeiger auf das Array)</text:span></text:p>
      <text:p text:style-name="P69"><text:tab/>SIZE : UINT (Größe des Arrays)</text:p>
      <text:p text:style-name="P179"><text:tab/>X : REAL (Multiplikator)</text:p>
      <text:p text:style-name="P71"><draw:frame draw:style-name="fr3" draw:name="Grafik543" text:anchor-type="paragraph" svg:x="1.046cm" svg:y="0.667cm" svg:width="4.48cm" svg:height="1.79cm" draw:z-index="528"><draw:image xlink:href="Pictures/1000000000000153000000873B9DB8C5.png" xlink:type="simple" xlink:show="embed" xlink:actuate="onLoad"/></draw:frame>Output<text:tab/>BOOL (TRUE)</text:p>
      <text:p text:style-name="P66"><text:span text:style-name="T23"><text:line-break/>Die Funktion _ARRAY</text:span>_<text:span text:style-name="T23">MUL multipliziert jedes Element eines beliebigen Array </text:span>of<text:span text:style-name="T23"> REAL mit den Wert X. Beim Aufruf wird der Funktion ein </text:span>Pointer<text:span text:style-name="T23"> auf das zu initialisierende Array und dessen Größe in Bytes übergeben. Unter CoDeSys lautet der Aufruf: _ARRAY_MUL(ADR(Array), SIZEOF(Array), INIT), wobei Array der Name des zu manipulierenden Arrays ist. ADR ist eine Standardfunktion, die den </text:span>Pointer<text:span text:style-name="T23"> auf das Array ermittelt und SIZEOF ist eine Standardfunktion, die die Größe des Arrays ermittelt. Die Funktion liefert nur TRUE zurück. Das durch den </text:span>Pointer<text:span text:style-name="T23"> angegebene Array wird direkt im Speicher manipuliert.</text:span></text:p>
      <text:p text:style-name="P180"><text:soft-page-break/>Diese Art der Bearbeitung von Arrays ist äußerst effizient, da kein zusätzlicher Speicher benötigt wird und keine Übergabewerte kopiert werden müssen.</text:p>
      <text:p text:style-name="P180">Aufruf:<text:tab/>_ARRAY_MUL(ADR(bigarray), SIZEOF(bigarray), X)</text:p>
      <text:p text:style-name="P71">Beispiel:<text:tab/>[0,-2,3,-1-5]<text:tab/> ; X = 3 wird umgewandelt in [0,-6,9,-3,-15]</text:p>
      <text:list xml:id="list38458634" text:continue-numbering="true" text:style-name="L1">
        <text:list-item>
          <text:list>
            <text:list-item>
              <text:h text:style-name="P216" text:outline-level="2"><text:alphabetical-index-mark-start text:id="IMark226158368"/>_ARRAY_SHUFFLE<text:alphabetical-index-mark-end text:id="IMark226158368"/></text:h>
            </text:list-item>
          </text:list>
        </text:list-item>
      </text:list>
      <text:p text:style-name="P81">Type<text:tab/>Funktion : BOOL</text:p>
      <text:p text:style-name="P81">Input<text:tab/>PT : Pointer (Zeiger auf das Array)</text:p>
      <text:p text:style-name="P81"><text:tab/>SIZE : UINT (Größe des Arrays)</text:p>
      <text:p text:style-name="P81"><draw:frame draw:style-name="fr3" draw:name="Grafik500" text:anchor-type="paragraph" svg:x="1.046cm" svg:y="0.69cm" svg:width="6.77cm" svg:height="1.57cm" draw:z-index="481"><draw:image xlink:href="Pictures/10000000000002000000007758CE69F6.png" xlink:type="simple" xlink:show="embed" xlink:actuate="onLoad"/></draw:frame>Output<text:tab/>BOOL (Returns TRUE)</text:p>
      <text:p text:style-name="P66"><text:span text:style-name="T23"><text:line-break/>Die Funktion _ARRAY</text:span>_<text:span text:style-name="T23">SHUFFLE vertauscht die Elemente eines beliebigen Arrays </text:span>of<text:span text:style-name="T23"> REAL nach einem Zufallsprinzip. Beim Aufruf wird der Funktion ein </text:span>Pointer<text:span text:style-name="T23"> auf das Array und dessen Größe in Bytes übergeben. Unter CoDeSys lautet der Aufruf: _ARRAY_SHUFFLE(ADR(Array), SIZEOF(Array)), wobei Array der Name des zu manipulierenden Arrays ist. ADR() ist eine Standardfunktion, die den </text:span>Pointer<text:span text:style-name="T23"> auf das Array ermittelt und SIZEOF() ist eine Standardfunktion, die die Größe des Arrays ermittelt. Das durch den </text:span>Pointer<text:span text:style-name="T23"> referenzierte Array wird direkt im Speicher manipuliert und steht nach beenden der Funktion direkt zur Verfügung. Die Funktion _ARRAY_SHUFFLE verändert also den Inhalt des Arrays.</text:span></text:p>
      <text:p text:style-name="P180">Diese Art der Bearbeitung von Arrays ist äußerst effizient, da kein zusätzlicher Speicher benötigt wird und keine Übergabewerte kopiert werden müssen.</text:p>
      <text:p text:style-name="P66"><text:span text:style-name="T23">Sollte ein Array bearbeitet werden, das nicht verändert werden darf, so ist es vor Übergabe des </text:span>Pointer<text:span text:style-name="T23"> und Aufruf der Funktion in ein temporäres Array zu kopieren.</text:span></text:p>
      <text:p text:style-name="P180"><text:line-break/>Beispiel:<text:tab/>_ARRAY_SHUFFLE(ADR(bigarray), SIZEOF(bigarray))</text:p>
      <text:p text:style-name="P66"><text:span text:style-name="T23">Ein Aufruf der Funktion _ARRAY_SHUFFLE könnte ein Array wie folgt verändern. Da die Funktion einen </text:span>Pseudo<text:span text:style-name="T23"> </text:span>Random<text:span text:style-name="T23"> Algorithmus verwendet wird das Ergebnis bei jedem Aufruf ein anderes sein, die Ergebnisse sind nicht </text:span><text:soft-page-break/><text:span text:style-name="T23">reproduzierbar, auch nicht durch einen Neustart des Programms oder der Steuerung.</text:span></text:p>
      <text:p text:style-name="P180">Ausgangsarray: <text:tab/>(0,1,2,3,4,5,6,7,8,9)</text:p>
      <text:p text:style-name="P180">Ergebnis:<text:tab/><text:tab/>(5,0,3,9,7,2,1,8,4,6)</text:p>
      <text:p text:style-name="P180">Das Ergebnis ist aber nicht wiederholbar, die Funktion liefert nach jedem Aufruf oder Auch Neustart eine neue Reihenfolge.</text:p>
      <text:list xml:id="list38445143" text:continue-numbering="true" text:style-name="L1">
        <text:list-item>
          <text:list>
            <text:list-item>
              <text:h text:style-name="P218" text:outline-level="2"><text:alphabetical-index-mark-start text:id="IMark226158368"/>_ARRAY_SORT<text:alphabetical-index-mark-end text:id="IMark226158368"/></text:h>
            </text:list-item>
          </text:list>
        </text:list-item>
      </text:list>
      <text:p text:style-name="P84">Type<text:tab/>Funktion : BOOL</text:p>
      <text:p text:style-name="P84">Input<text:tab/>PT : Pointer (Zeiger auf das Array)</text:p>
      <text:p text:style-name="P84"><text:tab/>SIZE : UINT (Größe des Arrays)</text:p>
      <text:p text:style-name="P84"><draw:frame draw:style-name="fr3" draw:name="Grafik55" text:anchor-type="paragraph" svg:x="0.997cm" svg:y="0.619cm" svg:width="4.521cm" svg:height="1.57cm" draw:z-index="792"><draw:image xlink:href="Pictures/100000000000015600000077819AAEF4.png" xlink:type="simple" xlink:show="embed" xlink:actuate="onLoad"/></draw:frame>Output<text:tab/>BOOL (TRUE)</text:p>
      <text:p text:style-name="P66"><text:span text:style-name="T23"><text:line-break/>Die Funktion _ARRAY</text:span>_<text:span text:style-name="T23">SORT sortiert ein beliebiges Array </text:span>of<text:span text:style-name="T23"> REAL in aufsteigender Reihenfolge. Beim Aufruf wird der Funktion ein </text:span>Pointer<text:span text:style-name="T23"> auf das zu sortierende Array und dessen Größe in Bytes übergeben. Unter CoDeSys lautet der Aufruf: _ARRAY_SORT(ADR(Array), SIZEOF(Array)), wobei Array der Name des zu sortierenden Arrays ist. ADR ist eine Standardfunktion, die den </text:span>Pointer<text:span text:style-name="T23"> auf das Array ermittelt und SIZEOF ist eine Standardfunktion, die die Größe des Arrays ermittelt.</text:span></text:p>
      <text:p text:style-name="P173"><text:span text:style-name="T23">Die Funktion liefert nur TRUE zurück. Das durch den </text:span>Pointer<text:span text:style-name="T23"> angegebene Array wird direkt im Speicher Manipuliert.</text:span></text:p>
      <text:p text:style-name="P66"><text:span text:style-name="T23">Diese Art der Bearbeitung von Arrays</text:span><text:span text:style-name="T23"> ist äußerst effizient, da kein zusätzlicher Speicher benötigt wird und keine Übergabewerte kopiert werden müssen.<text:line-break/><text:line-break/>Beispiel:<text:tab/>_ARRAY_SORT(ADR(bigarray), SIZEOF(bigarray))</text:span></text:p>
      <text:list xml:id="list38457046" text:continue-numbering="true" text:style-name="L1">
        <text:list-item>
          <text:list>
            <text:list-item>
              <text:h text:style-name="P216" text:outline-level="2"><text:soft-page-break/><text:alphabetical-index-mark-start text:id="IMark226158368"/>ARRAY_AVG<text:alphabetical-index-mark-end text:id="IMark226158368"/></text:h>
            </text:list-item>
          </text:list>
        </text:list-item>
      </text:list>
      <text:p text:style-name="P81">Type<text:tab/>Funktion : REAL</text:p>
      <text:p text:style-name="P81">Input<text:tab/>PT : Pointer (Zeiger auf das Array)</text:p>
      <text:p text:style-name="P81"><text:tab/>SIZE : UINT (Größe des Arrays)</text:p>
      <text:p text:style-name="P81"><draw:frame draw:style-name="fr3" draw:name="Grafik53" text:anchor-type="paragraph" svg:x="1cm" svg:y="0.658cm" svg:width="4.069cm" svg:height="1.57cm" draw:z-index="38"><draw:image xlink:href="Pictures/100000000000013400000077D3895A4B.png" xlink:type="simple" xlink:show="embed" xlink:actuate="onLoad"/></draw:frame>Output<text:tab/>REAL (Mittelwert des Arrays)</text:p>
      <text:p text:style-name="P66"><text:span text:style-name="T23"><text:line-break/>Die Funktion ARRAY</text:span>_<text:span text:style-name="T23">AVG ermittelt den Mittelwert eines beliebigen Arrays </text:span>of<text:span text:style-name="T23"> REAL. Bei Aufruf wird der Funktion ein </text:span>Pointer<text:span text:style-name="T23"> auf das Array und dessen </text:span><text:span text:style-name="T23">Größe in Bytes übergeben. Unter CoDeSys lautet der Aufruf: ARRAY_AVG(ADR(Array), SIZEOF(Array)), wobei Array der Name des zu durchsuchenden Arrays ist. ADR ist eine Standardfunktion, die den </text:span>Pointer<text:span text:style-name="T23"> auf das Array ermittelt und SIZEOF ist eine Standardfunktion, die die Größe des Arrays ermittelt. Um den Maximalwert zu ermitteln wird das durch den </text:span>Pointer<text:span text:style-name="T23"> referenzierte Array direkt im Speicher durchsucht. Die Funktion ARRAY_AVG verändert den Inhalt des Arrays nicht.</text:span></text:p>
      <text:p text:style-name="P173"><text:span text:style-name="T23">Diese Art der Bearbeitung von Arrays</text:span><text:span text:style-name="T23"> ist äußerst effizient, da kein zusätzlicher Speicher benötigt wird und keine Übergabewerte kopiert werden müssen.</text:span></text:p>
      <text:p text:style-name="P71">Beispiel:<text:tab/>ARRAY_AVG(ADR(bigarray), SIZEOF(bigarray))</text:p>
      <text:list xml:id="list38472686" text:continue-numbering="true" text:style-name="L1">
        <text:list-item>
          <text:list>
            <text:list-item>
              <text:h text:style-name="P216" text:outline-level="2"><text:alphabetical-index-mark-start text:id="IMark226158368"/>ARRAY_GAV<text:alphabetical-index-mark-end text:id="IMark226158368"/></text:h>
            </text:list-item>
          </text:list>
        </text:list-item>
      </text:list>
      <text:p text:style-name="P81">Type<text:tab/>Funktion : REAL</text:p>
      <text:p text:style-name="P81">Input<text:tab/>PT : Pointer (Zeiger auf das Array)</text:p>
      <text:p text:style-name="P81"><text:tab/>SIZE : UINT (Größe des Arrays)</text:p>
      <text:p text:style-name="P81"><draw:frame draw:style-name="fr3" draw:name="Grafik544" text:anchor-type="paragraph" svg:x="1.002cm" svg:y="0.667cm" svg:width="4.09cm" svg:height="1.39cm" draw:z-index="529"><draw:image xlink:href="Pictures/100000000000013500000069C6796EE1.png" xlink:type="simple" xlink:show="embed" xlink:actuate="onLoad"/></draw:frame>Output<text:tab/>REAL (Mittelwert des Arrays)</text:p>
      <text:p text:style-name="P66"><text:span text:style-name="T23"><text:line-break/>Die Funktion ARRAY</text:span>_<text:span text:style-name="T23">GAV ermittelt den geometrischen Mittelwert eines beliebigen Arrays </text:span>of<text:span text:style-name="T23"> REAL. Bei Aufruf wird der Funktion ein </text:span>Pointer<text:span text:style-name="T23"> auf das Array und dessen Größe in Bytes übergeben. Unter CoDeSys lautet der Aufruf: ARRAY_GAV(ADR(Array), SIZEOF(Array)), wobei Array der Name des </text:span><text:span text:style-name="T23">zu </text:span><text:soft-page-break/><text:span text:style-name="T23">durchsuchenden Arrays ist. ADR ist eine Standardfunktion, die den </text:span>Pointer<text:span text:style-name="T23"> auf das Array ermittelt und SIZEOF ist eine Standardfunktion, die die Größe des Arrays ermittelt. Um den Maximalwert zu ermitteln wird das durch den </text:span>Pointer<text:span text:style-name="T23"> referenzierte Array direkt im Speicher durchsucht. Die Funktion ARRAY_GAV verändert den Inhalt des Arrays nicht.</text:span></text:p>
      <text:p text:style-name="P180">Diese Art der Bearbeitung von Arrays ist äußerst effizient, da kein zusätzlicher Speicher benötigt wird und keine Übergabewerte kopiert werden müssen.</text:p>
      <text:p text:style-name="P71">Beispiel:<text:tab/>ARRAY_GAV(ADR(bigarray), SIZEOF(bigarray))</text:p>
      <text:list xml:id="list38457061" text:continue-numbering="true" text:style-name="L1">
        <text:list-item>
          <text:list>
            <text:list-item>
              <text:h text:style-name="P216" text:outline-level="2"><text:alphabetical-index-mark-start text:id="IMark226158368"/>ARRAY_HAV<text:alphabetical-index-mark-end text:id="IMark226158368"/></text:h>
            </text:list-item>
          </text:list>
        </text:list-item>
      </text:list>
      <text:p text:style-name="P81">Type<text:tab/>Funktion : REAL</text:p>
      <text:p text:style-name="P81">Input<text:tab/>PT : Pointer (Zeiger auf das Array)</text:p>
      <text:p text:style-name="P81"><text:tab/>SIZE : UINT (Größe des Arrays)</text:p>
      <text:p text:style-name="P81"><draw:frame draw:style-name="fr3" draw:name="Grafik545" text:anchor-type="paragraph" svg:x="1.025cm" svg:y="0.667cm" svg:width="4.09cm" svg:height="1.39cm" draw:z-index="530"><draw:image xlink:href="Pictures/1000000000000135000000698E514B3C.png" xlink:type="simple" xlink:show="embed" xlink:actuate="onLoad"/></draw:frame>Output<text:tab/>REAL (Mittelwert des Arrays)</text:p>
      <text:p text:style-name="P66"><text:span text:style-name="T23"><text:line-break/>Die Funktion ARRAY</text:span>_<text:span text:style-name="T23">HAV ermittelt den harmonischen Mittelwert eines beliebigen Arrays </text:span>of<text:span text:style-name="T23"> REAL. Bei Aufruf wird der Funktion ein </text:span>Pointer<text:span text:style-name="T23"> auf das Array und dessen Größe in Bytes übergeben. Unter CoDeSys lautet der Aufruf: ARRAY_HAV(ADR(Array), SIZEOF(Array)), wobei Array der Name des zu durchsuchenden Arrays ist. ADR ist eine Standardfunktion, die den </text:span>Pointer<text:span text:style-name="T23"> auf das Array ermittelt und SIZEOF ist eine Standardfunktion, die die Größe des Arrays ermittelt. Um den Maximalwert zu ermitteln wird das durch den </text:span>Pointer<text:span text:style-name="T23"> referenzierte Array direkt im Speicher durchsucht. Die Funktion ARRAY_HAV verändert den Inhalt des Arrays nicht.</text:span></text:p>
      <text:p text:style-name="P180">Diese Art der Bearbeitung von Arrays ist äußerst effizient, da kein zusätzlicher Speicher benötigt wird und keine Übergabewerte kopiert werden müssen.</text:p>
      <text:p text:style-name="P71">Beispiel:<text:tab/>ARRAY_HAV(ADR(bigarray), SIZEOF(bigarray))</text:p>
      <text:list xml:id="list38460540" text:continue-numbering="true" text:style-name="L1">
        <text:list-item>
          <text:list>
            <text:list-item>
              <text:h text:style-name="P216" text:outline-level="2"><text:soft-page-break/><text:alphabetical-index-mark-start text:id="IMark226158368"/>ARRAY_MAX<text:alphabetical-index-mark-end text:id="IMark226158368"/></text:h>
            </text:list-item>
          </text:list>
        </text:list-item>
      </text:list>
      <text:p text:style-name="P69">Type<text:tab/>Funktion : REAL</text:p>
      <text:p text:style-name="P66"><text:span text:style-name="T15">Input</text:span><text:span text:style-name="T14"><text:tab/>PT : </text:span><text:span text:style-name="T15">Pointer</text:span><text:span text:style-name="T14"> (Zeiger auf das Array)</text:span></text:p>
      <text:p text:style-name="P69"><text:tab/>SIZE : UINT (Größe des Arrays)</text:p>
      <text:p text:style-name="P71"><draw:frame draw:style-name="fr3" draw:name="Grafik78" text:anchor-type="paragraph" svg:x="1.05cm" svg:y="0.688cm" svg:width="4.069cm" svg:height="1.57cm" draw:z-index="43"><draw:image xlink:href="Pictures/100000000000013400000077D47641F7.png" xlink:type="simple" xlink:show="embed" xlink:actuate="onLoad"/></draw:frame>Output<text:tab/>REAL (Maximalwert des Arrays)</text:p>
      <text:p text:style-name="P66"><text:span text:style-name="T23"><text:line-break/>Die Funktion ARRAY</text:span>_<text:span text:style-name="T23">MAX ermittelt den Maximalwert eines beliebigen Arrays </text:span>of<text:span text:style-name="T23"> REAL. Bei Aufruf wird der Funktion ein </text:span>Pointer<text:span text:style-name="T23"> auf das Array und dessen Größe in Bytes übergeben. Unter CoDeSys lautet der Aufruf: </text:span><text:span text:style-name="T23">Array_MAX(ADR(Array), SIZEOF(Array)), wobei Array der Name des zu </text:span><text:span text:style-name="T23">durchsuchenden Arrays ist. ADR ist eine Standard Funktion die den </text:span>Pointer<text:span text:style-name="T23"> auf das Array ermittelt und SIZEOF ist eine Standard Funktion die die Größe des Arrays ermittelt. Um den Maximalwert zu ermitteln wird das durch den </text:span>Pointer<text:span text:style-name="T23"> referenzierte Array direkt im Speicher durchsucht. Die Funktion ARRAY_MAX verändert den Inhalt des Arrays nicht.</text:span></text:p>
      <text:p text:style-name="P173"><text:span text:style-name="T23">Diese Art der Bearbeitung von Arrays</text:span><text:span text:style-name="T23"> ist äußerst effizient, da kein zusätzlicher Speicher benötigt wird und keine Übergabewerte kopiert werden müssen.</text:span></text:p>
      <text:p text:style-name="P180">Beispiel:<text:tab/>ARRAY_MAX(ADR(bigarray), SIZEOF(bigarray))</text:p>
      <text:list xml:id="list38445499" text:continue-numbering="true" text:style-name="L1">
        <text:list-item>
          <text:list>
            <text:list-item>
              <text:h text:style-name="P216" text:outline-level="2"><text:alphabetical-index-mark-start text:id="IMark226158368"/>ARRAY_MIN<text:alphabetical-index-mark-end text:id="IMark226158368"/></text:h>
            </text:list-item>
          </text:list>
        </text:list-item>
      </text:list>
      <text:p text:style-name="P69">Type<text:tab/>Funktion : REAL</text:p>
      <text:p text:style-name="P66"><text:span text:style-name="T15">Input</text:span><text:span text:style-name="T14"><text:tab/>PT : </text:span><text:span text:style-name="T15">Pointer</text:span><text:span text:style-name="T14"> (Zeiger auf das Array)</text:span></text:p>
      <text:p text:style-name="P69"><text:tab/>SIZE : UINT (Größe des Arrays)</text:p>
      <text:p text:style-name="P71"><draw:frame draw:style-name="fr3" draw:name="Grafik57" text:anchor-type="paragraph" svg:x="1.023cm" svg:y="0.661cm" svg:width="4.069cm" svg:height="1.57cm" draw:z-index="39"><draw:image xlink:href="Pictures/10000000000001340000007765BD2321.png" xlink:type="simple" xlink:show="embed" xlink:actuate="onLoad"/></draw:frame>Output<text:tab/>REAL (Minimalwert des Arrays)</text:p>
      <text:p text:style-name="P66"><text:span text:style-name="T23"><text:line-break/>Die Funktion ARRAY</text:span>_<text:span text:style-name="T23">MIN ermittelt den Minimalwert eines beliebigen Arrays </text:span>of<text:span text:style-name="T23"> REAL. Beim Aufruf wird der Funktion ein </text:span>Pointer<text:span text:style-name="T23"> auf das Array und dessen Größe in Bytes übergeben. Unter CoDeSys lautet der Aufruf: AR</text:span><text:soft-page-break/><text:span text:style-name="T23">RAY</text:span>_<text:span text:style-name="T23">MIN(ADR(Array), SIZEOF(Array)), wobei Array der Name des zu durchsuchenden Arrays ist. ADR() ist eine Standardfunktion, die den </text:span>Pointer<text:span text:style-name="T23"> auf das Array ermittelt und SIZEOF() ist eine Standardfunktion, die die Größe des Arrays ermittelt. Um den Maximalwert zu ermitteln wird das durch den </text:span>Pointer<text:span text:style-name="T23"> referenzierte Array direkt im Speicher durchsucht. Die Funktion ARRAY</text:span>_<text:span text:style-name="T23">MIN verändert den Inhalt des Arrays nicht.</text:span></text:p>
      <text:p text:style-name="P173"><text:span text:style-name="T23">Diese Art der Bearbeitung von Arrays ist</text:span><text:span text:style-name="T23"> äußerst effizient, da kein zusätzlicher Speicher benötigt wird und keine Übergabewerte kopiert werden müssen.</text:span></text:p>
      <text:p text:style-name="P71">Beispiel:<text:tab/>ARRAY_MIN(ADR(bigarray), SIZEOF(bigarray))</text:p>
      <text:list xml:id="list38466742" text:continue-numbering="true" text:style-name="L1">
        <text:list-item>
          <text:list>
            <text:list-item>
              <text:h text:style-name="P216" text:outline-level="2"><text:alphabetical-index-mark-start text:id="IMark226158368"/>ARRAY_SDV<text:alphabetical-index-mark-end text:id="IMark226158368"/></text:h>
            </text:list-item>
          </text:list>
        </text:list-item>
      </text:list>
      <text:p text:style-name="P69">Type<text:tab/>Funktion : REAL</text:p>
      <text:p text:style-name="P66"><text:span text:style-name="T15">Input</text:span><text:span text:style-name="T14"><text:tab/>PT : </text:span><text:span text:style-name="T15">Pointer</text:span><text:span text:style-name="T14"> (Zeiger auf das Array)</text:span></text:p>
      <text:p text:style-name="P69"><text:tab/>SIZE : UINT (Größe des Arrays)</text:p>
      <text:p text:style-name="P71"><draw:frame draw:style-name="fr3" draw:name="Grafik297" text:anchor-type="paragraph" svg:x="0.974cm" svg:y="0.653cm" svg:width="4.069cm" svg:height="1.57cm" draw:z-index="254"><draw:image xlink:href="Pictures/100000000000013400000077749EF1C2.png" xlink:type="simple" xlink:show="embed" xlink:actuate="onLoad"/></draw:frame>Output<text:tab/>REAL (Standardabweichung des Arrays)</text:p>
      <text:p text:style-name="P66"><text:span text:style-name="T23"><text:line-break/>Die Funktion ARRAY</text:span>_<text:span text:style-name="T23">SDV ermittelt die Standardabweichung (Standard </text:span>Deviation<text:span text:style-name="T23">) eines beliebigen Arrays </text:span>of<text:span text:style-name="T23"> REAL. Beim Aufruf wird der Funktion ein </text:span>Pointer<text:span text:style-name="T23"> auf das Array und dessen Größe in Bytes übergeben. Unter CoDeSys lautet der Aufruf: ARRAY_SDV(ADR(Array), SIZEOF(Array)), wobei Array der Name des zu durchsuchenden Arrays ist. ADR() ist eine Standardfunktion, die den </text:span>Pointer<text:span text:style-name="T23"> auf das Array ermittelt und SIZEOF() ist eine Standardfunktion, die die Größe des Arrays ermittelt. Um den Maximalwert zu ermitteln wird das durch den </text:span>Pointer<text:span text:style-name="T23"> referenzierte Array direkt im Speicher durchsucht. Die Funktion ARRAY</text:span>_<text:span text:style-name="T23">SDV verändert den Inhalt des Arrays nicht.</text:span></text:p>
      <text:p text:style-name="P173"><text:span text:style-name="T23">Diese Art der Bearbeitung von Arrays ist</text:span><text:span text:style-name="T23"> äußerst effizient, da kein zusätzlicher Speicher benötigt wird und keine Übergabewerte kopiert werden müssen.</text:span></text:p>
      <text:p text:style-name="P71">Beispiel:<text:tab/>ARRAY_SDV(ADR(bigarray), SIZEOF(bigarray))</text:p>
      <text:list xml:id="list38473390" text:continue-numbering="true" text:style-name="L1">
        <text:list-item>
          <text:list>
            <text:list-item>
              <text:h text:style-name="P216" text:outline-level="2"><text:soft-page-break/><text:alphabetical-index-mark-start text:id="IMark226158368"/>ARRAY_SPR<text:alphabetical-index-mark-end text:id="IMark226158368"/></text:h>
            </text:list-item>
          </text:list>
        </text:list-item>
      </text:list>
      <text:p text:style-name="P69">Type<text:tab/>Funktion : REAL</text:p>
      <text:p text:style-name="P66"><text:span text:style-name="T15">Input</text:span><text:span text:style-name="T14"><text:tab/>PT : </text:span><text:span text:style-name="T15">Pointer</text:span><text:span text:style-name="T14"> (Zeiger auf das Array)</text:span></text:p>
      <text:p text:style-name="P69"><text:tab/>SIZE : UINT (Größe des Arrays)</text:p>
      <text:p text:style-name="P71"><draw:frame draw:style-name="fr3" draw:name="Grafik58" text:anchor-type="paragraph" svg:x="0.998cm" svg:y="0.658cm" svg:width="3.62cm" svg:height="1.57cm" draw:z-index="40"><draw:image xlink:href="Pictures/100000000000011200000077B9CF2C5C.png" xlink:type="simple" xlink:show="embed" xlink:actuate="onLoad"/></draw:frame>Output<text:tab/>REAL (Streuung des Arrays)</text:p>
      <text:p text:style-name="P66"><text:span text:style-name="T23"><text:line-break/>Die Funktion ARRAY</text:span>_<text:span text:style-name="T23">SPR ermittelt die Streuung eines beliebigen Arrays </text:span>of<text:span text:style-name="T23"> REAL. Die Streuung ist der Maximalwert im Array minus dem Minimalwert </text:span><text:span text:style-name="T23">des Arrays. Beim Aufruf wird der Funktion ein </text:span>Pointer<text:span text:style-name="T23"> auf das Array und </text:span><text:span text:style-name="T23">dessen Größe in Bytes übergeben. Unter CoDeSys lautet der Aufruf: ARRAY_SPR(ADR(Array), SIZEOF(Array)), wobei Array der Name des zu durchsuchenden Arrays ist. ADR ist eine Standardfunktion, die den </text:span>Pointer<text:span text:style-name="T23"> auf das Array ermittelt und SIZEOF ist eine Standardfunktion, die die Größe des Arrays ermittelt. Um den Maximalwert zu ermitteln wird das durch den </text:span>Pointer<text:span text:style-name="T23"> referenzierte Array direkt im Speicher durchsucht. Die Funktion ARRAY_SPR verändert den Inhalt des Arrays nicht.</text:span></text:p>
      <text:p text:style-name="P173"><text:span text:style-name="T23">Diese Art der Bearbeitung von Arrays</text:span><text:span text:style-name="T23"> ist äußerst effizient, da kein zusätzlicher Speicher benötigt wird und keine Übergabewerte kopiert werden müssen.</text:span></text:p>
      <text:p text:style-name="P71">Beispiel:<text:tab/>ARRAY_SPR(ADR(bigarray), SIZEOF(bigarray)) =</text:p>
      <text:p text:style-name="P71"><text:tab/>Maximalwert(bigarray) - Minimalwert(bigarray)</text:p>
      <text:list xml:id="list38459475" text:continue-numbering="true" text:style-name="L1">
        <text:list-item>
          <text:list>
            <text:list-item>
              <text:h text:style-name="P216" text:outline-level="2"><text:alphabetical-index-mark-start text:id="IMark226158368"/>ARRAY_SUM<text:alphabetical-index-mark-end text:id="IMark226158368"/></text:h>
            </text:list-item>
          </text:list>
        </text:list-item>
      </text:list>
      <text:p text:style-name="P69">Type<text:tab/>Funktion : REAL</text:p>
      <text:p text:style-name="P66"><text:span text:style-name="T15">Input</text:span><text:span text:style-name="T14"><text:tab/>PT : </text:span><text:span text:style-name="T15">Pointer</text:span><text:span text:style-name="T14"> (Zeiger auf das Array)</text:span></text:p>
      <text:p text:style-name="P69"><text:tab/>SIZE : UINT (Größe des Arrays)</text:p>
      <text:p text:style-name="P71"><draw:frame draw:style-name="fr3" draw:name="Grafik59" text:anchor-type="paragraph" svg:x="1.053cm" svg:y="0.753cm" svg:width="4.069cm" svg:height="1.57cm" draw:z-index="41"><draw:image xlink:href="Pictures/10000000000001340000007766F9E5F4.png" xlink:type="simple" xlink:show="embed" xlink:actuate="onLoad"/></draw:frame>Output<text:tab/>REAL (Summe aller Werte des Arrays)</text:p>
      <text:p text:style-name="P66"><text:span text:style-name="T23"><text:line-break/>Die Funktion ARRAY</text:span>_<text:span text:style-name="T23">SUM ermittelt die Summe aller Werte eines beliebigen </text:span><text:soft-page-break/><text:span text:style-name="T23">Arrays </text:span>of<text:span text:style-name="T23"> REAL. Beim Aufruf wird der Funktion ein </text:span>Pointer<text:span text:style-name="T23"> auf das Array und dessen Größe in Bytes übergeben. Unter CoDeSys lautet der Aufruf: ARRAY_SUM(ADR(Array), SIZEOF(Array)) wobei Array der Name des zu durchsuchenden Arrays ist. ADR() ist eine Standardfunktion, die den </text:span>Pointer<text:span text:style-name="T23"> auf das Array ermittelt und SIZEOF() ist eine Standardfunktion, die die Größe des Arrays ermittelt. Um den Maximalwert zu ermitteln wird das durch den </text:span>Pointer<text:span text:style-name="T23"> referenzierte Array direkt im Speicher durchsucht. Die Funktion ARRAY_SUM verändert den Inhalt des Arrays nicht.</text:span></text:p>
      <text:p text:style-name="P173"><text:span text:style-name="T23">Diese Art der Bearbeitung von Arrays</text:span><text:span text:style-name="T23"> ist äußerst effizient, da kein zusätzlicher Speicher benötigt wird und keine Übergabewerte kopiert werden müssen.</text:span></text:p>
      <text:p text:style-name="P71">Beispiel:<text:tab/>ARRAY_SUM(ADR(bigarray), SIZEOF(bigarray))</text:p>
      <text:list xml:id="list38470980" text:continue-numbering="true" text:style-name="L1">
        <text:list-item>
          <text:list>
            <text:list-item>
              <text:h text:style-name="P216" text:outline-level="2"><text:alphabetical-index-mark-start text:id="IMark226158368"/>ARRAY_TREND<text:alphabetical-index-mark-end text:id="IMark226158368"/></text:h>
            </text:list-item>
          </text:list>
        </text:list-item>
      </text:list>
      <text:p text:style-name="P69">Type<text:tab/>Funktion : REAL</text:p>
      <text:p text:style-name="P66"><text:span text:style-name="T15">Input</text:span><text:span text:style-name="T14"><text:tab/>PT : </text:span><text:span text:style-name="T15">Pointer</text:span><text:span text:style-name="T14"> (Zeiger auf das Array)</text:span></text:p>
      <text:p text:style-name="P69"><text:tab/>SIZE : UINT (Größe des Arrays)</text:p>
      <text:p text:style-name="P71"><draw:frame draw:style-name="fr3" draw:name="Grafik60" text:anchor-type="paragraph" svg:x="1.078cm" svg:y="0.672cm" svg:width="4.521cm" svg:height="1.57cm" draw:z-index="42"><draw:image xlink:href="Pictures/1000000000000156000000772337FB00.png" xlink:type="simple" xlink:show="embed" xlink:actuate="onLoad"/></draw:frame>Output<text:tab/>REAL (Trendentwicklung des Arrays)</text:p>
      <text:p text:style-name="P66"><text:span text:style-name="T23"><text:line-break/>Die Funktion ARRAY</text:span>_<text:span text:style-name="T23">TREND ermittelt den Trend der Werte eines beliebigen Arrays </text:span>of<text:span text:style-name="T23"> REAL. Beim Aufruf wird der Funktion ein </text:span>Pointer<text:span text:style-name="T23"> auf das Array und dessen Größe in Bytes übergeben. Unter CoDeSys lautet der Aufruf: ARRAY_TREND(ADR(Array), SIZEOF(Array)), wobei Array der Name des zu durchsuchenden Arrays ist. ADR() ist eine Standardfunktion, die den </text:span>Pointer<text:span text:style-name="T23"> auf das Array ermittelt und SIZEOF() ist eine Standardfunktion, die die Größe des Arrays ermittelt. Um den Trend zu ermitteln wird das durch den </text:span>Pointer<text:span text:style-name="T23"> referenzierte Array direkt im Speicher durchsucht. Die Funktion ARRAY_TREND verändert den Inhalt des Arrays nicht. </text:span><text:span text:style-name="T23">Diese Art der Bearbeitung von Arrays ist äußerst effizient, da kein zusätzlicher Speicher benötigt wird und keine Übergabewerte kopiert werden müssen. Der Trend wird ermittelt, indem der Durchschnitt der unteren Hälfte der Werte des Arrays vom Durchschnitt der Werte der oberen Hälfte des Arrays abgezogen wird.</text:span></text:p>
      <text:p text:style-name="P71">Beispiel:<text:tab/>ARRAY_TREND(ADR(bigarray), SIZEOF(bigarray))</text:p>
      <text:list xml:id="list38449293" text:continue-numbering="true" text:style-name="L1">
        <text:list-item>
          <text:list>
            <text:list-item>
              <text:h text:style-name="P216" text:outline-level="2"><text:soft-page-break/><text:alphabetical-index-mark-start text:id="IMark226158368"/>ARRAY_VAR<text:alphabetical-index-mark-end text:id="IMark226158368"/></text:h>
            </text:list-item>
          </text:list>
        </text:list-item>
      </text:list>
      <text:p text:style-name="P69">Type<text:tab/>Funktion : REAL</text:p>
      <text:p text:style-name="P66"><text:span text:style-name="T15">Input</text:span><text:span text:style-name="T14"><text:tab/>PT : </text:span><text:span text:style-name="T15">Pointer</text:span><text:span text:style-name="T14"> (Zeiger auf das Array)</text:span></text:p>
      <text:p text:style-name="P69"><text:tab/>SIZE : UINT (Größe des Arrays)</text:p>
      <text:p text:style-name="P71"><draw:frame draw:style-name="fr3" draw:name="Grafik298" text:anchor-type="paragraph" svg:x="1.113cm" svg:y="0.693cm" svg:width="3.62cm" svg:height="1.57cm" draw:z-index="255"><draw:image xlink:href="Pictures/100000000000011200000077FE7BD5D4.png" xlink:type="simple" xlink:show="embed" xlink:actuate="onLoad"/></draw:frame>Output<text:tab/>REAL (Varianz des Arrays)</text:p>
      <text:p text:style-name="P66"><text:span text:style-name="T23"><text:line-break/>Die Funktion ARRAY</text:span>_<text:span text:style-name="T23">VAR ermittelt die Varianz eines beliebigen Arrays </text:span>of<text:span text:style-name="T23"> REAL. Beim Aufruf wird der Funktion ein </text:span>Pointer<text:span text:style-name="T23"> auf das Array und dessen </text:span><text:span text:style-name="T23">Größe in Bytes übergeben. Unter CoDeSys lautet der Aufruf: </text:span><text:span text:style-name="T23">ARRAY_VAR(ADR(Array), SIZEOF(Array)) wobei Array der Name des zu durchsuchenden Arrays ist. ADR() ist eine Standardfunktion, die den </text:span>Pointer<text:span text:style-name="T23"> auf das Array ermittelt und SIZEOF() ist eine Standardfunktion, die die Größe des Arrays ermittelt. Um den Maximalwert zu ermitteln wird das durch den </text:span>Pointer<text:span text:style-name="T23"> referenzierte Array direkt im Speicher durchsucht. Die Funktion ARRAY_VAR verändert den Inhalt des Arrays nicht.</text:span></text:p>
      <text:p text:style-name="P173"><text:span text:style-name="T23">Diese Art der Bearbeitung von Arrays</text:span><text:span text:style-name="T23"> ist äußerst effizient, da kein zusätzlicher Speicher benötigt wird und keine Übergabewerte kopiert werden müssen.</text:span></text:p>
      <text:p text:style-name="P71">Beispiel:<text:tab/>ARRAY_VAR(ADR(bigarray), SIZEOF(bigarray))</text:p>
      <text:list xml:id="list38464090" text:continue-numbering="true" text:style-name="L1">
        <text:list-item>
          <text:list>
            <text:list-item>
              <text:h text:style-name="P218" text:outline-level="2"><text:alphabetical-index-mark-start text:id="IMark226158368"/>IS_SORTED<text:alphabetical-index-mark-end text:id="IMark226158368"/></text:h>
            </text:list-item>
          </text:list>
        </text:list-item>
      </text:list>
      <text:p text:style-name="P82">Type<text:tab/>Funktion : BOOL</text:p>
      <text:p text:style-name="P82">Input<text:tab/>PT : Pointer (Zeiger auf das Array)</text:p>
      <text:p text:style-name="P82"><text:tab/>SIZE : UINT (Größe des Arrays)</text:p>
      <text:p text:style-name="P82">Output<text:tab/>BOOL (TRUE)</text:p>
      <text:p text:style-name="P66"><draw:frame draw:style-name="fr3" draw:name="Grafik538" text:anchor-type="paragraph" svg:x="1.046cm" svg:y="0.012cm" svg:width="4.551cm" svg:height="1.76cm" draw:z-index="522"><draw:image xlink:href="Pictures/100000000000015800000085C262DFD3.png" xlink:type="simple" xlink:show="embed" xlink:actuate="onLoad"/></draw:frame><text:span text:style-name="T23"><text:line-break/>Die Funktion IS</text:span>_<text:span text:style-name="T23">SORTED prüft ob ein beliebiges Array </text:span>of<text:span text:style-name="T23"> REAL in aufsteigender Reihenfolge sortiert ist. Beim Aufruf wird der Funktion ein </text:span>Pointer<text:span text:style-name="T23"> auf das zu sortierende Array und dessen Größe in Bytes übergeben. Unter </text:span><text:span text:style-name="T23">Co</text:span><text:soft-page-break/><text:span text:style-name="T23">DeSys lautet der Aufruf: _ARRAY_SORT(ADR(Array), SIZEOF(Array)), wobei Array der Name des zu sortierenden Arrays ist. ADR ist eine Standardfunktion, die den </text:span>Pointer<text:span text:style-name="T23"> auf das Array ermittelt und SIZEOF ist eine Standardfunktion, die die Größe des Arrays ermittelt.</text:span></text:p>
      <text:p text:style-name="P180">Die Funktion liefert TRUE zurück wenn das Array in aufsteigender Reihenfolge sortiert ist.</text:p>
      <text:p text:style-name="P71">Diese Art der Bearbeitung von Arrays ist äußerst effizient, da kein zusätzlicher Speicher benötigt wird und keine Übergabewerte kopiert werden müssen.<text:line-break/><text:line-break/>Beispiel:<text:tab/>IS_SORTED(ADR(bigarray), SIZEOF(bigarray))</text:p>
      <text:list xml:id="list38458684" text:continue-numbering="true" text:style-name="L1">
        <text:list-item>
          <text:h text:style-name="P211" text:outline-level="1">Komplexe Mathematik</text:h>
          <text:list>
            <text:list-item>
              <text:h text:style-name="P219" text:outline-level="2">EINLEITUNG</text:h>
            </text:list-item>
          </text:list>
        </text:list-item>
      </text:list>
      <text:p text:style-name="P173">Komplexe Zahlen werden mit dem definierten Typ COMPLEX abgebildet.</text:p>
      <text:p text:style-name="P173">Der Typ COMPLEX setzt sich aus einem Realteil und einem Imaginärteil zusammen, beide Komponenten sind vom Typ REAL.</text:p>
      <text:p text:style-name="P173">Die komplexe Zahl Z vom Typ COMPLEX besteht aus:</text:p>
      <text:p text:style-name="P173">*.RE<text:tab/>Realteil vom Typ REAL.</text:p>
      <text:p text:style-name="P173">*.IM<text:tab/>Imaginärteil vom Typ REAL.</text:p>
      <text:list xml:id="list38447943" text:continue-numbering="true" text:style-name="L1">
        <text:list-item>
          <text:list>
            <text:list-item>
              <text:h text:style-name="P216" text:outline-level="2"><text:alphabetical-index-mark-start text:id="IMark226158368"/>CABS<text:alphabetical-index-mark-end text:id="IMark226158368"/></text:h>
            </text:list-item>
          </text:list>
        </text:list-item>
      </text:list>
      <text:p text:style-name="P69">Type<text:tab/>Funktion : REAL</text:p>
      <text:p text:style-name="P173"><text:span text:style-name="T15">Input</text:span><text:span text:style-name="T14"><text:tab/>X : </text:span><text:span text:style-name="T15">COMPLEX</text:span><text:span text:style-name="T14"> (Eingangswert)</text:span></text:p>
      <text:p text:style-name="P71"><draw:frame draw:style-name="fr3" draw:name="Grafik451" text:anchor-type="paragraph" svg:x="1.046cm" svg:y="0.667cm" svg:width="2.499cm" svg:height="0.99cm" draw:z-index="433"><draw:image xlink:href="Pictures/10000000000000BD0000004B47D289CA.png" xlink:type="simple" xlink:show="embed" xlink:actuate="onLoad"/></draw:frame>Output<text:tab/>REAL (Ergebnis)</text:p>
      <text:p text:style-name="P173"><text:span text:style-name="T21"><text:line-break/>CABS berechnet die Länge des Vektors einer komplexen Zahl. Der Absolutwert wird auch Modul oder </text:span><text:span text:style-name="T16">Magnitude</text:span><text:span text:style-name="T21"> genannt.</text:span></text:p>
      <text:p text:style-name="P183">CABS = SQRT(X.RE² + X.IM²)</text:p>
      <text:p text:style-name="P183"/>
      <text:p text:style-name="P183"/>
      <text:list xml:id="list38471597" text:continue-numbering="true" text:style-name="L1">
        <text:list-item>
          <text:list>
            <text:list-item>
              <text:h text:style-name="P216" text:outline-level="2"><text:soft-page-break/><text:alphabetical-index-mark-start text:id="IMark226158368"/>CACOS<text:alphabetical-index-mark-end text:id="IMark226158368"/></text:h>
            </text:list-item>
          </text:list>
        </text:list-item>
      </text:list>
      <text:p text:style-name="P69">Type<text:tab/>Funktion : COMPLEX</text:p>
      <text:p text:style-name="P173"><text:span text:style-name="T15">Input</text:span><text:span text:style-name="T14"><text:tab/>X : </text:span><text:span text:style-name="T15">COMPLEX</text:span><text:span text:style-name="T14"> (Eingangswert)</text:span></text:p>
      <text:p text:style-name="P73"><draw:frame draw:style-name="fr3" draw:name="Grafik452" text:anchor-type="paragraph" svg:x="1.046cm" svg:y="0.667cm" svg:width="3.069cm" svg:height="0.99cm" draw:z-index="434"><draw:image xlink:href="Pictures/10000000000000E80000004BFB7A3760.png" xlink:type="simple" xlink:show="embed" xlink:actuate="onLoad"/></draw:frame>Output<text:tab/>COMPLEX (Ergebnis)</text:p>
      <text:p text:style-name="P183"><text:line-break/>CACOS berechnet den Arcus Kosinus einer Komplexen Zahl.</text:p>
      <text:p text:style-name="P173"><text:span text:style-name="T21">Der Wertebereich des Ergebnisses liegt zwischen [0,] für den Realteil und [-</text:span>∞,+∞] für den Imaginärteil.</text:p>
      <text:list xml:id="list38449101" text:continue-numbering="true" text:style-name="L1">
        <text:list-item>
          <text:list>
            <text:list-item>
              <text:h text:style-name="P216" text:outline-level="2"><text:alphabetical-index-mark-start text:id="IMark226158368"/>CACOSH<text:alphabetical-index-mark-end text:id="IMark226158368"/></text:h>
            </text:list-item>
          </text:list>
        </text:list-item>
      </text:list>
      <text:p text:style-name="P69">Type<text:tab/>Funktion : COMPLEX</text:p>
      <text:p text:style-name="P173"><text:span text:style-name="T15">Input</text:span><text:span text:style-name="T14"><text:tab/>X : </text:span><text:span text:style-name="T15">COMPLEX</text:span><text:span text:style-name="T14"> (Eingangswert)</text:span></text:p>
      <text:p text:style-name="P73"><draw:frame draw:style-name="fr3" draw:name="Grafik453" text:anchor-type="paragraph" svg:x="1.023cm" svg:y="0.688cm" svg:width="3.47cm" svg:height="0.99cm" draw:z-index="435"><draw:image xlink:href="Pictures/10000000000001060000004BE367B82E.png" xlink:type="simple" xlink:show="embed" xlink:actuate="onLoad"/></draw:frame>Output<text:tab/>COMPLEX (Ergebnis)</text:p>
      <text:p text:style-name="P183"><text:line-break/>CACOSH berechnet den Arcus Kosinus Hyperbolicus einer Komplexen Zahl.</text:p>
      <text:p text:style-name="P173"><text:span text:style-name="T21">Der Wertebereich des Ergebnisses liegt zwischen [-</text:span>,+<text:span text:style-name="T21"></text:span>] für den Imaginärteil.</text:p>
      <text:list xml:id="list38450642" text:continue-numbering="true" text:style-name="L1">
        <text:list-item>
          <text:list>
            <text:list-item>
              <text:h text:style-name="P216" text:outline-level="2"><text:alphabetical-index-mark-start text:id="IMark226158368"/>CADD<text:alphabetical-index-mark-end text:id="IMark226158368"/></text:h>
            </text:list-item>
          </text:list>
        </text:list-item>
      </text:list>
      <text:p text:style-name="P69">Type<text:tab/>Funktion : COMPLEX</text:p>
      <text:p text:style-name="P173"><text:span text:style-name="T15">Input</text:span><text:span text:style-name="T14"><text:tab/>X : </text:span><text:span text:style-name="T15">COMPLEX</text:span><text:span text:style-name="T14"> (Eingangswert)</text:span></text:p>
      <text:p text:style-name="P173"><text:span text:style-name="T14"><text:tab/>Y : </text:span><text:span text:style-name="T15">COMPLEX</text:span><text:span text:style-name="T14"> (Eingangswert)</text:span></text:p>
      <text:p text:style-name="P73"><draw:frame draw:style-name="fr3" draw:name="Grafik454" text:anchor-type="paragraph" svg:x="1.046cm" svg:y="0.667cm" svg:width="2.499cm" svg:height="1.39cm" draw:z-index="436"><draw:image xlink:href="Pictures/10000000000000BD0000006970DE4401.png" xlink:type="simple" xlink:show="embed" xlink:actuate="onLoad"/></draw:frame>Output<text:tab/>COMPLEX (Ergebnis)</text:p>
      <text:p text:style-name="P183"><text:soft-page-break/><text:line-break/>CADD addiert zwei Komplexe Zahlen X und Y.</text:p>
      <text:list xml:id="list38455054" text:continue-numbering="true" text:style-name="L1">
        <text:list-item>
          <text:list>
            <text:list-item>
              <text:h text:style-name="P216" text:outline-level="2"><text:alphabetical-index-mark-start text:id="IMark226158368"/>CARG<text:alphabetical-index-mark-end text:id="IMark226158368"/></text:h>
            </text:list-item>
          </text:list>
        </text:list-item>
      </text:list>
      <text:p text:style-name="P69">Type<text:tab/>Funktion : REAL</text:p>
      <text:p text:style-name="P173"><text:span text:style-name="T15">Input</text:span><text:span text:style-name="T14"><text:tab/>X : </text:span><text:span text:style-name="T15">COMPLEX</text:span><text:span text:style-name="T14"> (Eingangswert)<text:tab/></text:span></text:p>
      <text:p text:style-name="P73"><draw:frame draw:style-name="fr3" draw:name="Grafik474" text:anchor-type="paragraph" svg:x="1.046cm" svg:y="0.667cm" svg:width="2.499cm" svg:height="0.99cm" draw:z-index="456"><draw:image xlink:href="Pictures/10000000000000BD0000004B584A85A4.png" xlink:type="simple" xlink:show="embed" xlink:actuate="onLoad"/></draw:frame>Output<text:tab/>REAL (Ergebnis)</text:p>
      <text:p text:style-name="P183"><text:line-break/>CARG berechnet den Winkel einer Komplexen Zahl im Koordinatensystem.</text:p>
      <text:p text:style-name="P173"><text:span text:style-name="T21">Der Wertebereich des Ergebnisses liegt zwischen [-</text:span>,+<text:span text:style-name="T21"></text:span>].</text:p>
      <text:list xml:id="list38473516" text:continue-numbering="true" text:style-name="L1">
        <text:list-item>
          <text:list>
            <text:list-item>
              <text:h text:style-name="P216" text:outline-level="2"><text:alphabetical-index-mark-start text:id="IMark226158368"/>CASIN<text:alphabetical-index-mark-end text:id="IMark226158368"/></text:h>
            </text:list-item>
          </text:list>
        </text:list-item>
      </text:list>
      <text:p text:style-name="P69">Type<text:tab/>Funktion : COMPLEX</text:p>
      <text:p text:style-name="P173"><text:span text:style-name="T15">Input</text:span><text:span text:style-name="T14"><text:tab/>X : </text:span><text:span text:style-name="T15">COMPLEX</text:span><text:span text:style-name="T14"> (Eingangswert)</text:span></text:p>
      <text:p text:style-name="P73"><draw:frame draw:style-name="fr3" draw:name="Grafik455" text:anchor-type="paragraph" svg:x="1.069cm" svg:y="0.667cm" svg:width="3.069cm" svg:height="0.99cm" draw:z-index="437"><draw:image xlink:href="Pictures/10000000000000E80000004B48080954.png" xlink:type="simple" xlink:show="embed" xlink:actuate="onLoad"/></draw:frame>Output<text:tab/>COMPLEX (Ergebnis)</text:p>
      <text:p text:style-name="P183"><text:line-break/>CASIN berechnet den Arcus Sinus einer Komplexen Zahl.</text:p>
      <text:p text:style-name="P173"><text:span text:style-name="T21">Der Wertebereich des Ergebnisses liegt zwischen [-/2</text:span>,+<text:span text:style-name="T21"></text:span>/2] für den Realteil.</text:p>
      <text:list xml:id="list38458197" text:continue-numbering="true" text:style-name="L1">
        <text:list-item>
          <text:list>
            <text:list-item>
              <text:h text:style-name="P216" text:outline-level="2"><text:soft-page-break/><text:alphabetical-index-mark-start text:id="IMark226158368"/>CASINH<text:alphabetical-index-mark-end text:id="IMark226158368"/></text:h>
            </text:list-item>
          </text:list>
        </text:list-item>
      </text:list>
      <text:p text:style-name="P69">Type<text:tab/>Funktion : COMPLEX</text:p>
      <text:p text:style-name="P173"><text:span text:style-name="T15">Input</text:span><text:span text:style-name="T14"><text:tab/>X : </text:span><text:span text:style-name="T15">COMPLEX</text:span><text:span text:style-name="T14"> (Eingangswert)</text:span></text:p>
      <text:p text:style-name="P73"><draw:frame draw:style-name="fr3" draw:name="Grafik456" text:anchor-type="paragraph" svg:x="1.025cm" svg:y="0.667cm" svg:width="3.47cm" svg:height="0.99cm" draw:z-index="438"><draw:image xlink:href="Pictures/10000000000001060000004B5A55B9DE.png" xlink:type="simple" xlink:show="embed" xlink:actuate="onLoad"/></draw:frame>Output<text:tab/>COMPLEX (Ergebnis)</text:p>
      <text:p text:style-name="P183"><text:line-break/>CASINH berechnet den Arcus Sinus Hyperbolicus einer Komplexen Zahl.</text:p>
      <text:p text:style-name="P173"><text:span text:style-name="T21">Der Wertebereich des Ergebnisses liegt zwischen [-</text:span>,+<text:span text:style-name="T21"></text:span>] für den Imaginärteil.</text:p>
      <text:list xml:id="list38453902" text:continue-numbering="true" text:style-name="L1">
        <text:list-item>
          <text:list>
            <text:list-item>
              <text:h text:style-name="P216" text:outline-level="2"><text:alphabetical-index-mark-start text:id="IMark226158368"/>CATAN<text:alphabetical-index-mark-end text:id="IMark226158368"/></text:h>
            </text:list-item>
          </text:list>
        </text:list-item>
      </text:list>
      <text:p text:style-name="P69">Type<text:tab/>Funktion : COMPLEX</text:p>
      <text:p text:style-name="P173"><text:span text:style-name="T15">Input</text:span><text:span text:style-name="T14"><text:tab/>X : </text:span><text:span text:style-name="T15">COMPLEX</text:span><text:span text:style-name="T14"> (Eingangswert)</text:span></text:p>
      <text:p text:style-name="P73"><draw:frame draw:style-name="fr3" draw:name="Grafik457" text:anchor-type="paragraph" svg:x="1.023cm" svg:y="0.667cm" svg:width="3.069cm" svg:height="0.99cm" draw:z-index="439"><draw:image xlink:href="Pictures/10000000000000E80000004B303591AB.png" xlink:type="simple" xlink:show="embed" xlink:actuate="onLoad"/></draw:frame>Output<text:tab/>COMPLEX (Ergebnis)</text:p>
      <text:p text:style-name="P183"><text:line-break/>CATAN berechnet den Arcus Tangens einer Komplexen Zahl.</text:p>
      <text:p text:style-name="P173"><text:span text:style-name="T21">Der Wertebereich des Ergebnisses liegt zwischen [-/2</text:span>,+<text:span text:style-name="T21"></text:span>/2] für den Realteil.</text:p>
      <text:list xml:id="list38457154" text:continue-numbering="true" text:style-name="L1">
        <text:list-item>
          <text:list>
            <text:list-item>
              <text:h text:style-name="P216" text:outline-level="2"><text:alphabetical-index-mark-start text:id="IMark226158368"/>CATANH<text:alphabetical-index-mark-end text:id="IMark226158368"/></text:h>
            </text:list-item>
          </text:list>
        </text:list-item>
      </text:list>
      <text:p text:style-name="P69">Type<text:tab/>Funktion : COMPLEX</text:p>
      <text:p text:style-name="P173"><text:span text:style-name="T15">Input</text:span><text:span text:style-name="T14"><text:tab/>X : </text:span><text:span text:style-name="T15">COMPLEX</text:span><text:span text:style-name="T14"> (Eingangswert)</text:span></text:p>
      <text:p text:style-name="P73"><draw:frame draw:style-name="fr3" draw:name="Grafik458" text:anchor-type="paragraph" svg:x="1.023cm" svg:y="0.69cm" svg:width="3.47cm" svg:height="0.99cm" draw:z-index="440"><draw:image xlink:href="Pictures/10000000000001060000004B76DD456D.png" xlink:type="simple" xlink:show="embed" xlink:actuate="onLoad"/></draw:frame>Output<text:tab/>COMPLEX (Ergebnis)</text:p>
      <text:p text:style-name="P183"><text:soft-page-break/><text:line-break/>CATANH berechnet den Arcus Tangens Hyperbolicus einer Komplexen Zahl.</text:p>
      <text:p text:style-name="P173"><text:span text:style-name="T21">Der Wertebereich des Ergebnisses liegt zwischen [-/2</text:span>,+<text:span text:style-name="T21"></text:span>/2] für den Imaginärteil.</text:p>
      <text:list xml:id="list38449863" text:continue-numbering="true" text:style-name="L1">
        <text:list-item>
          <text:list>
            <text:list-item>
              <text:h text:style-name="P216" text:outline-level="2"><text:alphabetical-index-mark-start text:id="IMark226158368"/>CCON<text:alphabetical-index-mark-end text:id="IMark226158368"/></text:h>
            </text:list-item>
          </text:list>
        </text:list-item>
      </text:list>
      <text:p text:style-name="P69">Type<text:tab/>Funktion : COMPLEX</text:p>
      <text:p text:style-name="P173"><text:span text:style-name="T15">Input</text:span><text:span text:style-name="T14"><text:tab/>X : </text:span><text:span text:style-name="T15">COMPLEX</text:span><text:span text:style-name="T14"> (Eingangswert)</text:span></text:p>
      <text:p text:style-name="P66"><draw:frame draw:style-name="fr3" draw:name="Grafik475" text:anchor-type="paragraph" svg:x="1.046cm" svg:y="0.623cm" svg:width="2.499cm" svg:height="0.99cm" draw:z-index="457"><draw:image xlink:href="Pictures/10000000000000BD0000004B644EC334.png" xlink:type="simple" xlink:show="embed" xlink:actuate="onLoad"/></draw:frame>Output<text:tab/>COMPLEX (Ergebnis)</text:p>
      <text:p text:style-name="P173"><text:line-break/>CCON berechnet die Konjugation einer komplexen Zahl.</text:p>
      <text:p text:style-name="P173">CCON.RE = X.RE</text:p>
      <text:p text:style-name="P173">CCON.IM = -X.IM</text:p>
      <text:list xml:id="list38462033" text:continue-numbering="true" text:style-name="L1">
        <text:list-item>
          <text:list>
            <text:list-item>
              <text:h text:style-name="P216" text:outline-level="2"><text:alphabetical-index-mark-start text:id="IMark226158368"/>CCOS<text:alphabetical-index-mark-end text:id="IMark226158368"/></text:h>
            </text:list-item>
          </text:list>
        </text:list-item>
      </text:list>
      <text:p text:style-name="P69">Type<text:tab/>Funktion : COMPLEX</text:p>
      <text:p text:style-name="P173"><text:span text:style-name="T15">Input</text:span><text:span text:style-name="T14"><text:tab/>X : </text:span><text:span text:style-name="T15">COMPLEX</text:span><text:span text:style-name="T14"> (Eingangswert)</text:span></text:p>
      <text:p text:style-name="P73"><draw:frame draw:style-name="fr3" draw:name="Grafik459" text:anchor-type="paragraph" svg:x="1.025cm" svg:y="0.688cm" svg:width="2.671cm" svg:height="0.99cm" draw:z-index="441"><draw:image xlink:href="Pictures/10000000000000CA0000004B9B792AE6.png" xlink:type="simple" xlink:show="embed" xlink:actuate="onLoad"/></draw:frame>Output<text:tab/>COMPLEX (Ergebnis)</text:p>
      <text:p text:style-name="P183"><text:line-break/>CCOS berechnet den Kosinus einer Komplexen Zahl.</text:p>
      <text:list xml:id="list38445473" text:continue-numbering="true" text:style-name="L1">
        <text:list-item>
          <text:list>
            <text:list-item>
              <text:h text:style-name="P216" text:outline-level="2"><text:soft-page-break/><text:alphabetical-index-mark-start text:id="IMark226158368"/>CCOSH<text:alphabetical-index-mark-end text:id="IMark226158368"/></text:h>
            </text:list-item>
          </text:list>
        </text:list-item>
      </text:list>
      <text:p text:style-name="P69">Type<text:tab/>Funktion : COMPLEX</text:p>
      <text:p text:style-name="P173"><text:span text:style-name="T15">Input</text:span><text:span text:style-name="T14"><text:tab/>X : </text:span><text:span text:style-name="T15">COMPLEX</text:span><text:span text:style-name="T14"> (Eingangswert)</text:span></text:p>
      <text:p text:style-name="P73"><draw:frame draw:style-name="fr3" draw:name="Grafik460" text:anchor-type="paragraph" svg:x="1.046cm" svg:y="0.667cm" svg:width="2.9cm" svg:height="0.99cm" draw:z-index="442"><draw:image xlink:href="Pictures/10000000000000DB0000004BB5A0614D.png" xlink:type="simple" xlink:show="embed" xlink:actuate="onLoad"/></draw:frame>Output<text:tab/>COMPLEX (Ergebnis)</text:p>
      <text:p text:style-name="P183"><text:line-break/>CCOSH berechnet den Kosinus Hyperbolicus einer Komplexen Zahl.</text:p>
      <text:list xml:id="list38446685" text:continue-numbering="true" text:style-name="L1">
        <text:list-item>
          <text:list>
            <text:list-item>
              <text:h text:style-name="P216" text:outline-level="2"><text:alphabetical-index-mark-start text:id="IMark226158368"/>CDIV<text:alphabetical-index-mark-end text:id="IMark226158368"/></text:h>
            </text:list-item>
          </text:list>
        </text:list-item>
      </text:list>
      <text:p text:style-name="P69">Type<text:tab/>Funktion : COMPLEX</text:p>
      <text:p text:style-name="P173"><text:span text:style-name="T15">Input</text:span><text:span text:style-name="T14"><text:tab/>X : </text:span><text:span text:style-name="T15">COMPLEX</text:span><text:span text:style-name="T14"> (Eingangswert)</text:span></text:p>
      <text:p text:style-name="P173"><text:span text:style-name="T14"><text:tab/>Y : </text:span><text:span text:style-name="T15">COMPLEX</text:span><text:span text:style-name="T14"> (Eingangswert)</text:span></text:p>
      <text:p text:style-name="P73"><draw:frame draw:style-name="fr3" draw:name="Grafik461" text:anchor-type="paragraph" svg:x="1.046cm" svg:y="0.69cm" svg:width="2.499cm" svg:height="1.39cm" draw:z-index="443"><draw:image xlink:href="Pictures/10000000000000BD0000006905B42262.png" xlink:type="simple" xlink:show="embed" xlink:actuate="onLoad"/></draw:frame>Output<text:tab/>COMPLEX (Ergebnis)</text:p>
      <text:p text:style-name="P183"><text:line-break/>CDIV dividiert zwei komplexe Zahlen X / Y.</text:p>
      <text:list xml:id="list38472669" text:continue-numbering="true" text:style-name="L1">
        <text:list-item>
          <text:list>
            <text:list-item>
              <text:h text:style-name="P216" text:outline-level="2"><text:alphabetical-index-mark-start text:id="IMark226158368"/>CEXP<text:alphabetical-index-mark-end text:id="IMark226158368"/></text:h>
            </text:list-item>
          </text:list>
        </text:list-item>
      </text:list>
      <text:p text:style-name="P69">Type<text:tab/>Funktion : COMPLEX</text:p>
      <text:p text:style-name="P173"><text:span text:style-name="T15">Input</text:span><text:span text:style-name="T14"><text:tab/>X : </text:span><text:span text:style-name="T15">COMPLEX</text:span><text:span text:style-name="T14"> (Eingangswert)</text:span></text:p>
      <text:p text:style-name="P73"><draw:frame draw:style-name="fr3" draw:name="Grafik462" text:anchor-type="paragraph" svg:x="1.067cm" svg:y="0.667cm" svg:width="2.499cm" svg:height="0.99cm" draw:z-index="444"><draw:image xlink:href="Pictures/10000000000000BD0000004BF8922481.png" xlink:type="simple" xlink:show="embed" xlink:actuate="onLoad"/></draw:frame>Output<text:tab/>COMPLEX (Ergebnis)</text:p>
      <text:p text:style-name="P183"><text:line-break/>CEXP berechnet den komplexen Exponent zur Basis E, CEXP = E^X.</text:p>
      <text:list xml:id="list38473257" text:continue-numbering="true" text:style-name="L1">
        <text:list-item>
          <text:list>
            <text:list-item>
              <text:h text:style-name="P216" text:outline-level="2"><text:soft-page-break/><text:alphabetical-index-mark-start text:id="IMark226158368"/>CINV<text:alphabetical-index-mark-end text:id="IMark226158368"/></text:h>
            </text:list-item>
          </text:list>
        </text:list-item>
      </text:list>
      <text:p text:style-name="P69">Type<text:tab/>Funktion : COMPLEX</text:p>
      <text:p text:style-name="P173"><text:span text:style-name="T15">Input</text:span><text:span text:style-name="T14"><text:tab/>X : </text:span><text:span text:style-name="T15">COMPLEX</text:span><text:span text:style-name="T14"> (Eingangswert)</text:span></text:p>
      <text:p text:style-name="P73"><draw:frame draw:style-name="fr3" draw:name="Grafik463" text:anchor-type="paragraph" svg:x="1.002cm" svg:y="0.654cm" svg:width="2.671cm" svg:height="0.99cm" draw:z-index="445"><draw:image xlink:href="Pictures/10000000000000CA0000004B60446FF9.png" xlink:type="simple" xlink:show="embed" xlink:actuate="onLoad"/></draw:frame>Output<text:tab/>COMPLEX (Ergebnis)</text:p>
      <text:p text:style-name="P183"><text:line-break/>CINV berechnet der Kehrwert einer Komplexen Zahl, CINV = 1/X</text:p>
      <text:list xml:id="list38471197" text:continue-numbering="true" text:style-name="L1">
        <text:list-item>
          <text:list>
            <text:list-item>
              <text:h text:style-name="P216" text:outline-level="2"><text:alphabetical-index-mark-start text:id="IMark226158368"/>CLOG<text:alphabetical-index-mark-end text:id="IMark226158368"/></text:h>
            </text:list-item>
          </text:list>
        </text:list-item>
      </text:list>
      <text:p text:style-name="P69">Type<text:tab/>Funktion : COMPLEX</text:p>
      <text:p text:style-name="P173"><text:span text:style-name="T15">Input</text:span><text:span text:style-name="T14"><text:tab/>X : </text:span><text:span text:style-name="T15">COMPLEX</text:span><text:span text:style-name="T14"> (Eingangswert)</text:span></text:p>
      <text:p text:style-name="P73"><draw:frame draw:style-name="fr3" draw:name="Grafik464" text:anchor-type="paragraph" svg:x="1.046cm" svg:y="0.667cm" svg:width="2.499cm" svg:height="0.99cm" draw:z-index="446"><draw:image xlink:href="Pictures/10000000000000BD0000004BE4FE7252.png" xlink:type="simple" xlink:show="embed" xlink:actuate="onLoad"/></draw:frame>Output<text:tab/>COMPLEX(Ergebnis)</text:p>
      <text:p text:style-name="P183"><text:line-break/>CLOG berechnet den natürlichen Logarithmus einer Komplexen Zahl zur Basis E.</text:p>
      <text:p text:style-name="P183">CLOG(X) = LOG(e)(X).</text:p>
      <text:p text:style-name="P173"><text:span text:style-name="T21">Der Wertebereich des Ergebnisses liegt zwischen [-</text:span>,+<text:span text:style-name="T21"></text:span>] für den Imaginärteil.</text:p>
      <text:list xml:id="list38444347" text:continue-numbering="true" text:style-name="L1">
        <text:list-item>
          <text:list>
            <text:list-item>
              <text:h text:style-name="P216" text:outline-level="2"><text:alphabetical-index-mark-start text:id="IMark226158368"/>CMUL<text:alphabetical-index-mark-end text:id="IMark226158368"/></text:h>
            </text:list-item>
          </text:list>
        </text:list-item>
      </text:list>
      <text:p text:style-name="P69">Type<text:tab/>Funktion : COMPLEX</text:p>
      <text:p text:style-name="P173"><text:span text:style-name="T15">Input</text:span><text:span text:style-name="T14"><text:tab/>X : </text:span><text:span text:style-name="T15">COMPLEX</text:span><text:span text:style-name="T14"> (Eingangswert)</text:span></text:p>
      <text:p text:style-name="P173"><text:span text:style-name="T14"><text:tab/>Y : </text:span><text:span text:style-name="T15">COMPLEX</text:span><text:span text:style-name="T14"> (Eingangswert)</text:span></text:p>
      <text:p text:style-name="P73"><draw:frame draw:style-name="fr3" draw:name="Grafik465" text:anchor-type="paragraph" svg:x="1.025cm" svg:y="0.667cm" svg:width="2.499cm" svg:height="1.39cm" draw:z-index="447"><draw:image xlink:href="Pictures/10000000000000BD000000699EAEDCD1.png" xlink:type="simple" xlink:show="embed" xlink:actuate="onLoad"/></draw:frame>Output<text:tab/>COMPLEX (Ergebnis)</text:p>
      <text:p text:style-name="P183"><text:soft-page-break/><text:line-break/>CMUL Multipliziert zwei Komplexe Zahlen X und Y.</text:p>
      <text:list xml:id="list38447555" text:continue-numbering="true" text:style-name="L1">
        <text:list-item>
          <text:list>
            <text:list-item>
              <text:h text:style-name="P216" text:outline-level="2"><text:alphabetical-index-mark-start text:id="IMark226158368"/>CPOL<text:alphabetical-index-mark-end text:id="IMark226158368"/></text:h>
            </text:list-item>
          </text:list>
        </text:list-item>
      </text:list>
      <text:p text:style-name="P69">Type<text:tab/>Funktion : COMPLEX</text:p>
      <text:p text:style-name="P173"><text:span text:style-name="T15">Input</text:span><text:span text:style-name="T14"><text:tab/>L : </text:span><text:span text:style-name="T15">REAL </text:span><text:span text:style-name="T14">(Länge oder Raduis)</text:span></text:p>
      <text:p text:style-name="P173"><text:span text:style-name="T14"><text:tab/>A : </text:span><text:span text:style-name="T15">REAL </text:span><text:span text:style-name="T14">(Winkelwert)</text:span></text:p>
      <text:p text:style-name="P73"><draw:frame draw:style-name="fr3" draw:name="Grafik476" text:anchor-type="paragraph" svg:x="1.025cm" svg:y="0.688cm" svg:width="2.499cm" svg:height="1.39cm" draw:z-index="458"><draw:image xlink:href="Pictures/10000000000000BD000000694E970513.png" xlink:type="simple" xlink:show="embed" xlink:actuate="onLoad"/></draw:frame>Output<text:tab/>COMPLEX (Ergebnis)</text:p>
      <text:p text:style-name="P183"><text:line-break/>CPOL erzeugt eine Komplexe Zahl aus der Polarform. Die Eingangswerte L und A spezifizieren die Länge (Radius) und den Winkel.</text:p>
      <text:list xml:id="list38462347" text:continue-numbering="true" text:style-name="L1">
        <text:list-item>
          <text:list>
            <text:list-item>
              <text:h text:style-name="P216" text:outline-level="2"><text:alphabetical-index-mark-start text:id="IMark226158368"/>CPOW<text:alphabetical-index-mark-end text:id="IMark226158368"/></text:h>
            </text:list-item>
          </text:list>
        </text:list-item>
      </text:list>
      <text:p text:style-name="P69">Type<text:tab/>Funktion : COMPLEX</text:p>
      <text:p text:style-name="P173"><text:span text:style-name="T15">Input</text:span><text:span text:style-name="T14"><text:tab/>X : </text:span><text:span text:style-name="T15">COMPLEX</text:span><text:span text:style-name="T14"> (Eingangswert)</text:span></text:p>
      <text:p text:style-name="P179"><text:tab/>Y : COMPLEX (Eingangswert 2)</text:p>
      <text:p text:style-name="P73"><draw:frame draw:style-name="fr3" draw:name="Grafik466" text:anchor-type="paragraph" svg:x="1.069cm" svg:y="0.683cm" svg:width="2.499cm" svg:height="1.39cm" draw:z-index="448"><draw:image xlink:href="Pictures/10000000000000BD00000069D528B387.png" xlink:type="simple" xlink:show="embed" xlink:actuate="onLoad"/></draw:frame>Output<text:tab/>COMPLEX (Ergebnis)</text:p>
      <text:p text:style-name="P183"><text:line-break/>CPOW berechnet die Potenz zweier Komplexer Zahlen, CPOW = X^Y.</text:p>
      <text:list xml:id="list38459995" text:continue-numbering="true" text:style-name="L1">
        <text:list-item>
          <text:list>
            <text:list-item>
              <text:h text:style-name="P216" text:outline-level="2"><text:soft-page-break/><text:alphabetical-index-mark-start text:id="IMark226158368"/>CSET<text:alphabetical-index-mark-end text:id="IMark226158368"/></text:h>
            </text:list-item>
          </text:list>
        </text:list-item>
      </text:list>
      <text:p text:style-name="P69">Type<text:tab/>Funktion : COMPLEX</text:p>
      <text:p text:style-name="P173"><text:span text:style-name="T15">Input</text:span><text:span text:style-name="T14"><text:tab/>RE : </text:span><text:span text:style-name="T15">COMPLEX</text:span><text:span text:style-name="T14"> (Realer Eingangswert)</text:span></text:p>
      <text:p text:style-name="P179"><text:tab/>IM : REAL (Imaginärer Eingangswert)</text:p>
      <text:p text:style-name="P73"><draw:frame draw:style-name="fr3" draw:name="Grafik467" text:anchor-type="paragraph" svg:x="1.067cm" svg:y="0.681cm" svg:width="2.499cm" svg:height="1.39cm" draw:z-index="449"><draw:image xlink:href="Pictures/10000000000000BD000000692BFA81EF.png" xlink:type="simple" xlink:show="embed" xlink:actuate="onLoad"/></draw:frame>Output<text:tab/>COMPLEX (Ergebnis)</text:p>
      <text:p text:style-name="P183"><text:line-break/>CSET erzeugt aus den beiden Eingangskomponenten RE und IM eine komplexe Zahl vom Typ COMPLEX.</text:p>
      <text:list xml:id="list38470626" text:continue-numbering="true" text:style-name="L1">
        <text:list-item>
          <text:list>
            <text:list-item>
              <text:h text:style-name="P216" text:outline-level="2"><text:alphabetical-index-mark-start text:id="IMark226158368"/>CSIN<text:alphabetical-index-mark-end text:id="IMark226158368"/></text:h>
            </text:list-item>
          </text:list>
        </text:list-item>
      </text:list>
      <text:p text:style-name="P69">Type<text:tab/>Funktion : COMPLEX</text:p>
      <text:p text:style-name="P173"><text:span text:style-name="T15">Input</text:span><text:span text:style-name="T14"><text:tab/>X : </text:span><text:span text:style-name="T15">COMPLEX</text:span><text:span text:style-name="T14"> (Eingangswert)</text:span></text:p>
      <text:p text:style-name="P73"><draw:frame draw:style-name="fr3" draw:name="Grafik468" text:anchor-type="paragraph" svg:x="1.002cm" svg:y="0.688cm" svg:width="2.499cm" svg:height="0.99cm" draw:z-index="450"><draw:image xlink:href="Pictures/10000000000000BD0000004BF5BC599C.png" xlink:type="simple" xlink:show="embed" xlink:actuate="onLoad"/></draw:frame>Output<text:tab/>COMPLEX (Ergebnis)</text:p>
      <text:p text:style-name="P183"><text:line-break/>CSIN berechnet den Sinus einer Komplexen Zahl.</text:p>
      <text:list xml:id="list38448943" text:continue-numbering="true" text:style-name="L1">
        <text:list-item>
          <text:list>
            <text:list-item>
              <text:h text:style-name="P216" text:outline-level="2"><text:alphabetical-index-mark-start text:id="IMark226158368"/>CSINH<text:alphabetical-index-mark-end text:id="IMark226158368"/></text:h>
            </text:list-item>
          </text:list>
        </text:list-item>
      </text:list>
      <text:p text:style-name="P69">Type<text:tab/>Funktion : COMPLEX</text:p>
      <text:p text:style-name="P173"><text:span text:style-name="T15">Input</text:span><text:span text:style-name="T14"><text:tab/>X : </text:span><text:span text:style-name="T15">COMPLEX</text:span><text:span text:style-name="T14"> (Eingangswert)</text:span></text:p>
      <text:p text:style-name="P73"><draw:frame draw:style-name="fr3" draw:name="Grafik469" text:anchor-type="paragraph" svg:x="1.046cm" svg:y="0.69cm" svg:width="2.9cm" svg:height="0.99cm" draw:z-index="451"><draw:image xlink:href="Pictures/10000000000000DB0000004B60DCB7CC.png" xlink:type="simple" xlink:show="embed" xlink:actuate="onLoad"/></draw:frame>Output<text:tab/>COMPLEX (Ergebnis)</text:p>
      <text:p text:style-name="P183"><text:line-break/>CSINH berechnet den Sinus Hyperbolicus einer Komplexen Zahl.</text:p>
      <text:list xml:id="list38470091" text:continue-numbering="true" text:style-name="L1">
        <text:list-item>
          <text:list>
            <text:list-item>
              <text:h text:style-name="P216" text:outline-level="2"><text:soft-page-break/><text:alphabetical-index-mark-start text:id="IMark226158368"/>CSQRT<text:alphabetical-index-mark-end text:id="IMark226158368"/></text:h>
            </text:list-item>
          </text:list>
        </text:list-item>
      </text:list>
      <text:p text:style-name="P69">Type<text:tab/>Funktion : REAL</text:p>
      <text:p text:style-name="P173"><text:span text:style-name="T15">Input</text:span><text:span text:style-name="T14"><text:tab/>X : </text:span><text:span text:style-name="T15">COMPLEX</text:span><text:span text:style-name="T14"> (Eingangswert)</text:span></text:p>
      <text:p text:style-name="P73"><draw:frame draw:style-name="fr3" draw:name="Grafik470" text:anchor-type="paragraph" svg:x="1.069cm" svg:y="0.69cm" svg:width="3.069cm" svg:height="0.99cm" draw:z-index="452"><draw:image xlink:href="Pictures/10000000000000E80000004BB12BC871.png" xlink:type="simple" xlink:show="embed" xlink:actuate="onLoad"/></draw:frame>Output<text:tab/>REAL (Ergebnis)</text:p>
      <text:p text:style-name="P183"><text:line-break/>CSQRT berechnet die Quadratwurzel aus einer Komplexen Zahl.</text:p>
      <text:list xml:id="list38463908" text:continue-numbering="true" text:style-name="L1">
        <text:list-item>
          <text:list>
            <text:list-item>
              <text:h text:style-name="P216" text:outline-level="2"><text:alphabetical-index-mark-start text:id="IMark226158368"/>CSUB<text:alphabetical-index-mark-end text:id="IMark226158368"/></text:h>
            </text:list-item>
          </text:list>
        </text:list-item>
      </text:list>
      <text:p text:style-name="P69">Type<text:tab/>Funktion : COMPLEX</text:p>
      <text:p text:style-name="P173"><text:span text:style-name="T15">Input</text:span><text:span text:style-name="T14"><text:tab/>X : </text:span><text:span text:style-name="T15">COMPLEX</text:span><text:span text:style-name="T14"> (Eingangswert)</text:span></text:p>
      <text:p text:style-name="P173"><text:span text:style-name="T14"><text:tab/>Y : </text:span><text:span text:style-name="T15">COMPLEX</text:span><text:span text:style-name="T14"> (Eingangswert)</text:span></text:p>
      <text:p text:style-name="P73"><draw:frame draw:style-name="fr3" draw:name="Grafik471" text:anchor-type="paragraph" svg:x="1.025cm" svg:y="0.688cm" svg:width="2.499cm" svg:height="1.39cm" draw:z-index="453"><draw:image xlink:href="Pictures/10000000000000BD00000069D8AEC336.png" xlink:type="simple" xlink:show="embed" xlink:actuate="onLoad"/></draw:frame>Output<text:tab/>COMPLEX (Ergebnis)</text:p>
      <text:p text:style-name="P183"><text:line-break/>CSUB Subtrahiert zwei komplexe Zahlen, CSUB = X - Y.</text:p>
      <text:list xml:id="list38452373" text:continue-numbering="true" text:style-name="L1">
        <text:list-item>
          <text:list>
            <text:list-item>
              <text:h text:style-name="P216" text:outline-level="2"><text:alphabetical-index-mark-start text:id="IMark226158368"/>CTAN<text:alphabetical-index-mark-end text:id="IMark226158368"/></text:h>
            </text:list-item>
          </text:list>
        </text:list-item>
      </text:list>
      <text:p text:style-name="P69">Type<text:tab/>Funktion : COMPLEX</text:p>
      <text:p text:style-name="P173"><text:span text:style-name="T15">Input</text:span><text:span text:style-name="T14"><text:tab/>X : </text:span><text:span text:style-name="T15">COMPLEX</text:span><text:span text:style-name="T14"> (Eingangswert)</text:span></text:p>
      <text:p text:style-name="P73"><draw:frame draw:style-name="fr3" draw:name="Grafik472" text:anchor-type="paragraph" svg:x="1.046cm" svg:y="0.69cm" svg:width="2.671cm" svg:height="0.99cm" draw:z-index="454"><draw:image xlink:href="Pictures/10000000000000CA0000004BE20CA863.png" xlink:type="simple" xlink:show="embed" xlink:actuate="onLoad"/></draw:frame>Output<text:tab/>COMPLEX (Ergebnis)</text:p>
      <text:p text:style-name="P183"><text:line-break/>CTAN berechnet den Tangens einer Komplexen Zahl.</text:p>
      <text:list xml:id="list38463761" text:continue-numbering="true" text:style-name="L1">
        <text:list-item>
          <text:list>
            <text:list-item>
              <text:h text:style-name="P216" text:outline-level="2"><text:soft-page-break/><text:alphabetical-index-mark-start text:id="IMark226158368"/>CTANH<text:alphabetical-index-mark-end text:id="IMark226158368"/></text:h>
            </text:list-item>
          </text:list>
        </text:list-item>
      </text:list>
      <text:p text:style-name="P69">Type<text:tab/>Funktion : COMPLEX</text:p>
      <text:p text:style-name="P173"><text:span text:style-name="T15">Input</text:span><text:span text:style-name="T14"><text:tab/>X : </text:span><text:span text:style-name="T15">COMPLEX</text:span><text:span text:style-name="T14"> (Eingangswert)</text:span></text:p>
      <text:p text:style-name="P73"><draw:frame draw:style-name="fr3" draw:name="Grafik473" text:anchor-type="paragraph" svg:x="1.046cm" svg:y="0.69cm" svg:width="2.9cm" svg:height="0.99cm" draw:z-index="455"><draw:image xlink:href="Pictures/10000000000000DB0000004B6B9236A4.png" xlink:type="simple" xlink:show="embed" xlink:actuate="onLoad"/></draw:frame>Output<text:tab/>COMPLEX (Ergebnis)</text:p>
      <text:p text:style-name="P183"><text:line-break/>CTANH berechnet den Tangens Hyperbolicus einer Komplexen Zahl.</text:p>
      <text:list xml:id="list38463144" text:continue-numbering="true" text:style-name="L1">
        <text:list-item>
          <text:h text:style-name="P211" text:outline-level="1">Arithmetik doppelter Genauigkeit</text:h>
          <text:list>
            <text:list-item>
              <text:h text:style-name="P219" text:outline-level="2">Einleitung</text:h>
            </text:list-item>
          </text:list>
        </text:list-item>
      </text:list>
      <text:p text:style-name="P173">Gleitpunktzahlen werden im Format REAL abgespeichert. Ein gängiges Datenformat nach IEC754 benutzt dazu ein 24Bit breite Mantisse und einen 8Bit Exponenten. Daraus resultiert eine Genauigkeit von 7-8 Dezimalstellen. Normalerweise ist dies für Anwendungen in der Steuerungstechnik mehr als Ausreichend, kann aber in bestimmten Fällen zu einem Problem führen. Ein Typischer Fall der mit einfacher Genauigkeit nur unzureichend gelöst werden kann sind Verbrauchsmesser. Möchte man bis zu Mehreren Mwh (Megawattstunden) an Gesamtverbrauch Aufsummieren und dabei eine kleinste Leistung von 1mW (Milliwatt) im Abstand von 10ms Messen und berücksichtigen, so benötigt man eine Auflösung von 3.6 * 10^7 (entspricht 10MWs) und dabei würde man 1 * 10^-5 Ws aufaddieren wollen. Um dies zu bewerkstelligen benötigt man eine Auflösung von 12 Stellen.</text:p>
      <text:p text:style-name="P173">Die von OSCAT implementierte Doppelte REAL Genauigkeit hat eine Auflösung von etwa 15 Stellen. Der hierfür Implementierte Datentyp REAL2 besteht aus R1 und RX, hierbei wird in RX der Wert mir den ersten 7-8 Stellen als Real gespeichert und der Rest in einem Weiteren REAL R1. Dieser Datentyp hat den Vorteil das keine Wandlung von REAL2 zu REAL notwendig, ist, vielmehr ist der Teil RX bereits der einfache REAL Wert.</text:p>
      <text:list xml:id="list38456565" text:continue-numbering="true" text:style-name="L1">
        <text:list-item>
          <text:list>
            <text:list-item>
              <text:h text:style-name="P216" text:outline-level="2"><text:alphabetical-index-mark-start text:id="IMark226158368"/>R2_ABS<text:alphabetical-index-mark-end text:id="IMark226158368"/></text:h>
            </text:list-item>
          </text:list>
        </text:list-item>
      </text:list>
      <text:p text:style-name="P69">Type<text:tab/>Funktion : REAL2</text:p>
      <text:p text:style-name="P173"><text:span text:style-name="T15">Input</text:span><text:span text:style-name="T14"><text:tab/>X : </text:span><text:span text:style-name="T15">REAL2</text:span><text:span text:style-name="T14"> (Eingangswert)<text:tab/></text:span></text:p>
      <text:p text:style-name="P73"><draw:frame draw:style-name="fr3" draw:name="Grafik535" text:anchor-type="paragraph" svg:x="1.025cm" svg:y="0.751cm" svg:width="3.2cm" svg:height="0.99cm" draw:z-index="520"><draw:image xlink:href="Pictures/10000000000000F20000004B426DB2C5.png" xlink:type="simple" xlink:show="embed" xlink:actuate="onLoad"/></draw:frame>Output<text:tab/>REAL2 (Ergebnis mit Doppelter Genauigkeit)</text:p>
      <text:p text:style-name="P188"><text:line-break/>R2_ABS liefert den Absolutwert von X in doppelter Genauigkeit.</text:p>
      <text:list xml:id="list38470966" text:continue-numbering="true" text:style-name="L1">
        <text:list-item>
          <text:list>
            <text:list-item>
              <text:h text:style-name="P216" text:outline-level="2"><text:soft-page-break/><text:alphabetical-index-mark-start text:id="IMark226158368"/>R2_ADD<text:alphabetical-index-mark-end text:id="IMark226158368"/></text:h>
            </text:list-item>
          </text:list>
        </text:list-item>
      </text:list>
      <text:p text:style-name="P69">Type<text:tab/>Funktion : REAL2</text:p>
      <text:p text:style-name="P173"><text:span text:style-name="T15">Input</text:span><text:span text:style-name="T14"><text:tab/>X : </text:span><text:span text:style-name="T15">REAL2</text:span><text:span text:style-name="T14"> (Eingangswert)</text:span></text:p>
      <text:p text:style-name="P179"><text:tab/>Y : REAL (zu Addierender Wert)</text:p>
      <text:p text:style-name="P73"><draw:frame draw:style-name="fr3" draw:name="Grafik529" text:anchor-type="paragraph" svg:x="1.046cm" svg:y="0.667cm" svg:width="3.6cm" svg:height="1.39cm" draw:z-index="514"><draw:image xlink:href="Pictures/1000000000000110000000693CA33BB7.png" xlink:type="simple" xlink:show="embed" xlink:actuate="onLoad"/></draw:frame>Output<text:tab/>REAL2 (Ergebnis mit Doppelter Genauigkeit)</text:p>
      <text:p text:style-name="P183"><text:line-break/>R2_ADD addiert zu einem Wert mit doppelter Genauigkeit X einen Wert einfacher Genauigkeit Y. Das Ergebnis hat wieder Doppelte Genauigkeit.</text:p>
      <text:list xml:id="list38453899" text:continue-numbering="true" text:style-name="L1">
        <text:list-item>
          <text:list>
            <text:list-item>
              <text:h text:style-name="P216" text:outline-level="2"><text:alphabetical-index-mark-start text:id="IMark226158368"/>R2_ADD2<text:alphabetical-index-mark-end text:id="IMark226158368"/></text:h>
            </text:list-item>
          </text:list>
        </text:list-item>
      </text:list>
      <text:p text:style-name="P69">Type<text:tab/>Funktion : REAL2</text:p>
      <text:p text:style-name="P173"><text:span text:style-name="T15">Input</text:span><text:span text:style-name="T14"><text:tab/>X : </text:span><text:span text:style-name="T15">REAL2</text:span><text:span text:style-name="T14"> (Eingangswert)</text:span></text:p>
      <text:p text:style-name="P179"><text:tab/>Y : REAL2 (zu Addierender Wert)</text:p>
      <text:p text:style-name="P73"><draw:frame draw:style-name="fr3" draw:name="Grafik531" text:anchor-type="paragraph" svg:x="1.046cm" svg:y="0.69cm" svg:width="3.99cm" svg:height="1.39cm" draw:z-index="519"><draw:image xlink:href="Pictures/100000000000012E000000695BCD19FA.png" xlink:type="simple" xlink:show="embed" xlink:actuate="onLoad"/></draw:frame>Output<text:tab/>REAL2 (Ergebnis mit Doppelter Genauigkeit)</text:p>
      <text:p text:style-name="P183"><text:line-break/>R2_ADD2 addiert zu einem Wert doppelter Genauigkeit X einen anderen Wert doppelter Genauigkeit Y. Das Ergebnis hat wieder doppelte Genauigkeit.</text:p>
      <text:list xml:id="list38445626" text:continue-numbering="true" text:style-name="L1">
        <text:list-item>
          <text:list>
            <text:list-item>
              <text:h text:style-name="P216" text:outline-level="2"><text:alphabetical-index-mark-start text:id="IMark226158368"/>R2_MUL<text:alphabetical-index-mark-end text:id="IMark226158368"/></text:h>
            </text:list-item>
          </text:list>
        </text:list-item>
      </text:list>
      <text:p text:style-name="P69">Type<text:tab/>Funktion : REAL2</text:p>
      <text:p text:style-name="P173"><text:span text:style-name="T15">Input</text:span><text:span text:style-name="T14"><text:tab/>X : </text:span><text:span text:style-name="T15">REAL2</text:span><text:span text:style-name="T14"> (Eingangswert)</text:span></text:p>
      <text:p text:style-name="P179"><text:tab/>Y : REAL (Multiplikator)</text:p>
      <text:p text:style-name="P73"><draw:frame draw:style-name="fr3" draw:name="Grafik530" text:anchor-type="paragraph" svg:x="1.046cm" svg:y="0.688cm" svg:width="3.6cm" svg:height="1.39cm" draw:z-index="515"><draw:image xlink:href="Pictures/1000000000000110000000693FA39E01.png" xlink:type="simple" xlink:show="embed" xlink:actuate="onLoad"/></draw:frame>Output<text:tab/>REAL2 (Ergebnis mit Doppelter Genauigkeit)</text:p>
      <text:p text:style-name="P183"><text:soft-page-break/><text:line-break/>R2_MUL Multipliziert einen Wert Doppelter Genauigkeit X mit einem Wert einfacher Genauigkeit Y. Das Ergebnis hat wieder Doppelte Genauigkeit.</text:p>
      <text:list xml:id="list38444895" text:continue-numbering="true" text:style-name="L1">
        <text:list-item>
          <text:list>
            <text:list-item>
              <text:h text:style-name="P216" text:outline-level="2"><text:alphabetical-index-mark-start text:id="IMark226158368"/>R2_SET<text:alphabetical-index-mark-end text:id="IMark226158368"/></text:h>
            </text:list-item>
          </text:list>
        </text:list-item>
      </text:list>
      <text:p text:style-name="P69">Type<text:tab/>Funktion : REAL2</text:p>
      <text:p text:style-name="P173"><text:span text:style-name="T15">Input</text:span><text:span text:style-name="T14"><text:tab/>X : </text:span><text:span text:style-name="T15">REAL</text:span><text:span text:style-name="T14"> (Eingangswert)<text:tab/></text:span></text:p>
      <text:p text:style-name="P73"><draw:frame draw:style-name="fr3" draw:name="Grafik580" text:anchor-type="paragraph" svg:x="1.023cm" svg:y="0.688cm" svg:width="3.62cm" svg:height="1.12cm" draw:z-index="574"><draw:image xlink:href="Pictures/1000000000000112000000554FF0BA69.png" xlink:type="simple" xlink:show="embed" xlink:actuate="onLoad"/></draw:frame>Output<text:tab/>REAL2 (Ergebnis mit Doppelter Genauigkeit)</text:p>
      <text:p text:style-name="P183"><text:line-break/>R2_SET setzt einen Wert Doppelter Genauigkeit auf den Eingangswert X mit einfacher Genauigkeit.</text:p>
      <text:list xml:id="list38464223" text:continue-numbering="true" text:style-name="L1">
        <text:list-item>
          <text:h text:style-name="P210" text:outline-level="1">Arithmetische Funktionen</text:h>
          <text:list>
            <text:list-item>
              <text:h text:style-name="P216" text:outline-level="2"><text:alphabetical-index-mark-start text:id="IMark226158368"/>F_LIN<text:alphabetical-index-mark-end text:id="IMark226158368"/></text:h>
            </text:list-item>
          </text:list>
        </text:list-item>
      </text:list>
      <text:p text:style-name="P69">Type<text:tab/>Funktion : REAL</text:p>
      <text:p text:style-name="P66"><text:span text:style-name="T15">Input</text:span><text:span text:style-name="T14"><text:tab/>X : REAL</text:span></text:p>
      <text:p text:style-name="P69"><text:tab/>A : REAL</text:p>
      <text:p text:style-name="P69"><text:tab/>B : REAL</text:p>
      <text:p text:style-name="P73"><draw:frame draw:style-name="fr3" draw:name="Grafik61" text:anchor-type="paragraph" svg:x="1.108cm" svg:y="0.619cm" svg:width="2.731cm" svg:height="2.02cm" draw:z-index="314"><draw:image xlink:href="Pictures/10000000000000CE000000998D7045F1.png" xlink:type="simple" xlink:show="embed" xlink:actuate="onLoad"/></draw:frame>Output<text:tab/>REAL (F_LIN = A*X + B)</text:p>
      <text:p text:style-name="P73"><text:line-break/>Die Funktion F_LIN Berechnet den Y-Wert einer linearen Gleichung.</text:p>
      <text:p text:style-name="P73">F_LIN = A*X + B</text:p>
      <text:list xml:id="list38451788" text:continue-numbering="true" text:style-name="L1">
        <text:list-item>
          <text:list>
            <text:list-item>
              <text:h text:style-name="P216" text:outline-level="2"><text:alphabetical-index-mark-start text:id="IMark226158368"/>F_LIN2<text:alphabetical-index-mark-end text:id="IMark226158368"/></text:h>
            </text:list-item>
          </text:list>
        </text:list-item>
      </text:list>
      <text:p text:style-name="P69">Type<text:tab/>Funktion : REAL</text:p>
      <text:p text:style-name="P66"><text:span text:style-name="T15">Input</text:span><text:span text:style-name="T14"><text:tab/>X : REAL</text:span></text:p>
      <text:p text:style-name="P69"><text:tab/>X1, Y1 : REAL (erste Koordinate)</text:p>
      <text:p text:style-name="P69"><text:tab/>X2, Y2 : REAL (zweite Koordinate)</text:p>
      <text:p text:style-name="P73"><draw:frame draw:style-name="fr3" draw:name="Grafik62" text:anchor-type="paragraph" svg:x="1.208cm" svg:y="1.191cm" svg:width="3.18cm" svg:height="2.919cm" draw:z-index="315"><draw:image xlink:href="Pictures/10000000000000F0000000DDC0EF1FAA.png" xlink:type="simple" xlink:show="embed" xlink:actuate="onLoad"/></draw:frame>Output<text:tab/>REAL (Wert auf der Geraden, die durch die obigen 2 Punkte <text:s text:c="6"/><text:tab/>definiert ist.)</text:p>
      <text:p text:style-name="P73"><text:soft-page-break/><text:line-break/>Die Funktion F_LIN2 Berechnet den Y-Wert einer linearen Gleichung.</text:p>
      <text:p text:style-name="P73">Die Gerade ist dabei durch die Spezifikation zweier Koordinatenpunkte (X1,Y1; X2,Y2) definiert.</text:p>
      <text:list xml:id="list38471475" text:continue-numbering="true" text:style-name="L1">
        <text:list-item>
          <text:list>
            <text:list-item>
              <text:h text:style-name="P216" text:outline-level="2"><text:alphabetical-index-mark-start text:id="IMark226158368"/>F_POLY<text:alphabetical-index-mark-end text:id="IMark226158368"/></text:h>
            </text:list-item>
          </text:list>
        </text:list-item>
      </text:list>
      <text:p text:style-name="P69">Type<text:tab/>Funktion : REAL</text:p>
      <text:p text:style-name="P66"><text:span text:style-name="T15">Input</text:span><text:span text:style-name="T14"><text:tab/>X : REAL (Eingang)</text:span></text:p>
      <text:p text:style-name="P66"><text:span text:style-name="T14"><text:tab/>C : ARRAY[0..7] </text:span><text:span text:style-name="T15">of</text:span><text:span text:style-name="T14"> REAL (Polynomkoeffizienten)</text:span></text:p>
      <text:p text:style-name="P73"><draw:frame draw:style-name="fr3" draw:name="Grafik576" text:anchor-type="paragraph" svg:x="1.025cm" svg:y="0.667cm" svg:width="3.62cm" svg:height="1.57cm" draw:z-index="564"><draw:image xlink:href="Pictures/10000000000001120000007780B092A3.png" xlink:type="simple" xlink:show="embed" xlink:actuate="onLoad"/></draw:frame>Output<text:tab/>REAL (Ergebnis der Polynomgleichung)</text:p>
      <text:p text:style-name="P183"><text:line-break/>F_POLY errechnet ein Polynom 7ten Grades.</text:p>
      <text:p text:style-name="P183">F_POLY = C[0] + C[1] * X^1 + C[2] * X^2 + ...C[7] * X^7</text:p>
      <text:list xml:id="list38452528" text:continue-numbering="true" text:style-name="L1">
        <text:list-item>
          <text:list>
            <text:list-item>
              <text:h text:style-name="P216" text:outline-level="2"><text:alphabetical-index-mark-start text:id="IMark226158368"/>F_POWER<text:alphabetical-index-mark-end text:id="IMark226158368"/></text:h>
            </text:list-item>
          </text:list>
        </text:list-item>
      </text:list>
      <text:p text:style-name="P69">Type<text:tab/>Funktion : REAL</text:p>
      <text:p text:style-name="P66"><text:span text:style-name="T15">Input</text:span><text:span text:style-name="T14"><text:tab/>A : REAL</text:span></text:p>
      <text:p text:style-name="P69"><text:tab/>X : REAL </text:p>
      <text:p text:style-name="P69"><text:tab/>N : REAL </text:p>
      <text:p text:style-name="P73"><draw:frame draw:style-name="fr3" draw:name="Grafik63" text:anchor-type="paragraph" svg:x="1.025cm" svg:y="0.637cm" svg:width="3.62cm" svg:height="2.02cm" draw:z-index="316"><draw:image xlink:href="Pictures/1000000000000112000000999EE15A3D.png" xlink:type="simple" xlink:show="embed" xlink:actuate="onLoad"/></draw:frame>Output<text:tab/>REAL (Ergebnis der Gleichung F_POWER = A * X^N)</text:p>
      <text:p text:style-name="P66"><text:span text:style-name="T21"><text:line-break/>F_Power berechnet die Potenzfunktion nach der Gleichung F_POWER = A * X</text:span>n<text:span text:style-name="T21">.</text:span></text:p>
      <text:list xml:id="list38443930" text:continue-numbering="true" text:style-name="L1">
        <text:list-item>
          <text:list>
            <text:list-item>
              <text:h text:style-name="P216" text:outline-level="2"><text:soft-page-break/><text:alphabetical-index-mark-start text:id="IMark226158368"/><text:alphabetical-index-mark-start text:id="IMark99425812"/>F_QUAD<text:alphabetical-index-mark-end text:id="IMark99425812"/><text:alphabetical-index-mark-end text:id="IMark226158368"/></text:h>
            </text:list-item>
          </text:list>
        </text:list-item>
      </text:list>
      <text:p text:style-name="P69">Type<text:tab/>Funktion : REAL</text:p>
      <text:p text:style-name="P66"><text:span text:style-name="T15">Input</text:span><text:span text:style-name="T14"><text:tab/>X : REAL</text:span></text:p>
      <text:p text:style-name="P69"><text:tab/>X : REAL</text:p>
      <text:p text:style-name="P69"><text:tab/>A, B, C : REAL</text:p>
      <text:p text:style-name="P73"><draw:frame draw:style-name="fr3" draw:name="Grafik64" text:anchor-type="paragraph" svg:x="1.139cm" svg:y="0.598cm" svg:width="3.18cm" svg:height="2.469cm" draw:z-index="317"><draw:image xlink:href="Pictures/10000000000000F0000000BB061BCE6D.png" xlink:type="simple" xlink:show="embed" xlink:actuate="onLoad"/></draw:frame>Output<text:tab/>REAL (F_QUAD = A * X² + B * X + C)</text:p>
      <text:p text:style-name="P73"><text:line-break/>F_QUAD berechnet das Ergebnis einer quadratischen Gleichung nach der Formel f_QUAD = A * X² + B * X + C.</text:p>
      <text:list xml:id="list38452463" text:continue-numbering="true" text:style-name="L1">
        <text:list-item>
          <text:list>
            <text:list-item>
              <text:h text:style-name="P216" text:outline-level="2"><text:alphabetical-index-mark-start text:id="IMark226158368"/>FT_AVG<text:alphabetical-index-mark-end text:id="IMark226158368"/></text:h>
            </text:list-item>
          </text:list>
        </text:list-item>
      </text:list>
      <text:p text:style-name="P69">Type<text:tab/>Funktionsbaustein</text:p>
      <text:p text:style-name="P66"><text:span text:style-name="T15">Input</text:span><text:span text:style-name="T14"><text:tab/>IN : REAL (Eingangssignal)</text:span></text:p>
      <text:p text:style-name="P69"><text:tab/>E : BOOL (Freigabe Eingang)</text:p>
      <text:p text:style-name="P69"><text:tab/>N : INT (Anzahl der Werte über die der Mittelwert gebildet wird)</text:p>
      <text:p text:style-name="P69"><text:tab/>RST : BOOL (Reset Eingang)</text:p>
      <text:p text:style-name="P73"><draw:frame draw:style-name="fr3" draw:name="Grafik65" text:anchor-type="paragraph" svg:x="1.023cm" svg:y="0.69cm" svg:width="2.101cm" svg:height="2.311cm" draw:z-index="715"><draw:image xlink:href="Pictures/100000000000009F000000AF582EBC93.png" xlink:type="simple" xlink:show="embed" xlink:actuate="onLoad"/></draw:frame>Output<text:tab/>REAL (Gleitender Mittelwert über die letzten N Werte)</text:p>
      <text:p text:style-name="P66"><text:span text:style-name="T21"><text:line-break/>Der Funktionsbaustein FT_AVG berechnet einen gleitenden Mittelwert jeweils über die letzten N Werte. Durch den Eingang RST können die gespeicherten Werte gelöscht werden. N ist definiert von 0 .. 32. N=0 bedeutet das Ausgangssignal = Eingangssignal ist. N=5 bildet den Mittelwert über die letzten 5 Werte. Der Mittelwert wird maximal über 32 Werte gebildet. Durch den Eingang E kann kontrolliert werden, wann der Eingang gelesen wird. Hierdurch kann auf einfache Weise ein </text:span><text:span text:style-name="T16">Sample</text:span><text:span text:style-name="T21"> und Hold Baustein wie zum Beispiel SH_1 mit FT_AVG verknüpft werden. Beim ersten Aufruf von </text:span><text:soft-page-break/><text:span text:style-name="T21">FT_AVG wird der Puffer mit dem Eingangssignal geladen, um zu vermeiden dass ein </text:span><text:span text:style-name="T16">Ramp</text:span><text:span text:style-name="T21">-</text:span><text:span text:style-name="T16">up</text:span><text:span text:style-name="T21"> stattfindet.</text:span></text:p>
      <text:p text:style-name="P183"><draw:frame draw:style-name="fr5" draw:name="Grafik67" text:anchor-type="paragraph" svg:x="1.111cm" svg:y="1.628cm" svg:width="11.18cm" svg:height="2.649cm" draw:z-index="321"><draw:image xlink:href="Pictures/100000000000034D000000C8F3B4B0FE.png" xlink:type="simple" xlink:show="embed" xlink:actuate="onLoad"/></draw:frame>Im folgenden Beispiel liest SH_1 einmal pro Sekunde den Eingangswert Signal_in und gibt diese Werte einmal pro Sekunde an FT_AVG weiter, welcher dann aus den letzten 8 Werten den Mittelwert bildet.</text:p>
      <text:p text:style-name="P183"/>
      <text:list xml:id="list38447934" text:continue-numbering="true" text:style-name="L1">
        <text:list-item>
          <text:list>
            <text:list-item>
              <text:h text:style-name="P216" text:outline-level="2"><text:alphabetical-index-mark-start text:id="IMark226158368"/>FT_MIN_MAX<text:alphabetical-index-mark-end text:id="IMark226158368"/></text:h>
            </text:list-item>
          </text:list>
        </text:list-item>
      </text:list>
      <text:p text:style-name="P69">Type<text:tab/>Funktionsbaustein</text:p>
      <text:p text:style-name="P66"><text:span text:style-name="T15">Input</text:span><text:span text:style-name="T14"><text:tab/>IN : REAL (Eingangssignal)</text:span></text:p>
      <text:p text:style-name="P73"><text:tab/>RST : BOOL (Reset Eingang)</text:p>
      <text:p text:style-name="P73">Output<text:tab/>MX : REAL (Maximalwert des Eingangssignal)</text:p>
      <text:p text:style-name="P73"><draw:frame draw:style-name="fr3" draw:name="Grafik70" text:anchor-type="paragraph" svg:x="0.91cm" svg:y="0.635cm" svg:width="3.18cm" svg:height="1.75cm" draw:z-index="318"><draw:image xlink:href="Pictures/10000000000000F00000008491601B3B.png" xlink:type="simple" xlink:show="embed" xlink:actuate="onLoad"/></draw:frame><text:tab/>MN : REAL (Minimalwert des Eingangssignal)</text:p>
      <text:p text:style-name="P73"><text:line-break/>FT_MIN_MAX Speichert den Minimal- und Maximalwert eines Eingangssignals IN und stellt diese beiden Werte an den Ausgängen MN und MX zur Verfügung bis er durch einen Reset wieder gelöscht wird. Ein Reset setzt MN und MX auf den zum Zeitpunkt des Resets anliegenden Eingangswert zurück.</text:p>
      <text:p text:style-name="P183"/>
      <text:p text:style-name="P183"/>
      <text:list xml:id="list384744321" text:continue-numbering="true" text:style-name="L1">
        <text:list-item>
          <text:list>
            <text:list-item>
              <text:h text:style-name="P216" text:outline-level="2"><text:soft-page-break/><text:alphabetical-index-mark-start text:id="IMark226158368"/>FT_RMP<text:alphabetical-index-mark-end text:id="IMark226158368"/></text:h>
            </text:list-item>
          </text:list>
        </text:list-item>
      </text:list>
      <text:p text:style-name="P69">Type<text:tab/>Funktionsbaustein</text:p>
      <text:p text:style-name="P66"><text:span text:style-name="T15">Input</text:span><text:span text:style-name="T14"><text:tab/>IN : REAL (Eingangssignal)</text:span></text:p>
      <text:p text:style-name="P73"><text:tab/>KR : REAL (Geschwindigkeit des Anstiegs in 1 / Sekunden)</text:p>
      <text:p text:style-name="P73"><text:tab/>KF : REAL (Geschwindigkeit des Abfalls in 1 / Sekunden)</text:p>
      <text:p text:style-name="P73">Output<text:tab/>OUT : REAL (Ausgangssignal)</text:p>
      <text:p text:style-name="P73"><text:tab/>BUSY : BOOL (Zeigt an ob Ausgang Steigt oder Fällt)</text:p>
      <text:p text:style-name="P73"><draw:frame draw:style-name="fr3" draw:name="Grafik73" text:anchor-type="paragraph" svg:x="1.046cm" svg:y="1.196cm" svg:width="2.731cm" svg:height="2.649cm" draw:z-index="319"><draw:image xlink:href="Pictures/10000000000000CE000000C88B5155A1.png" xlink:type="simple" xlink:show="embed" xlink:actuate="onLoad"/></draw:frame><text:tab/>UD : BOOL (TRUE, wenn Ausgang steigt und FALSE, wenn <text:s text:c="7"/><text:tab/>Ausgang fällt)</text:p>
      <text:p text:style-name="P73"><text:line-break/>Der Ausgang OUT folgt dem Eingang mit einer linearen Rampe mit definierter Anstiegs- oder Abfall-Geschwindigkeit (KR und KF). K = 1 bedeutet, dass der Ausgang mit 1 Einheit pro Sekunde steigt oder fällt. Der K Faktor muss größer als 0 sein. Der Ausgang UD ist TRUE, wenn das Ausgangssignal steigt und FALSE, wenn es abfällt. Wenn der Ausgang den Eingangswert erreicht hat ist BUSY FALSE, ansonsten ist BUSY TRUE und zeigt an, dass eine steigende oder fallende Rampe aktiv ist.</text:p>
      <text:p text:style-name="P183">Das Ausgangssignal folgt solange dem Eingangssignal wie die Anstiegs- oder Abfall-Geschwindigkeit des Eingangssignals kleiner ist, als die durch KR und KF definierte maximale Anstiegs- oder Abfall-Geschwindigkeit. Verändert sich das Eingangssignal schneller, so läuft der Ausgang mit der Geschwindigkeit KR oder KF dem Eingangssignal hinterher. Die Rampenerzeugung ist Zeitecht, was bedeutet, dass FT_RMP zu jeder Ausführung berechnet wo der Ausgang stehen sollte und diesen Wert auf den Ausgang legt. Die Ausgangsveränderung ist also abhängig von der Zykluszeit und erfolgt nicht in gleichen Schritten. Wird eine Rampe aus lauter gleichen Schritten benötigt, so stehen die Bausteine RMP_B und RMP_W zur Verfügung.</text:p>
      <text:p text:style-name="P179"><draw:g text:anchor-type="paragraph" draw:z-index="320" draw:style-name="gr1"><draw:line draw:style-name="gr60" draw:text-style-name="P257" svg:x1="1.648cm" svg:y1="4.067cm" svg:x2="1.652cm" svg:y2="1.058cm"><text:p/></draw:line><draw:line draw:style-name="gr60" draw:text-style-name="P257" svg:x1="1.48cm" svg:y1="3.99cm" svg:x2="9.709cm" svg:y2="3.99cm"><text:p/></draw:line><draw:line draw:style-name="gr61" draw:text-style-name="P257" svg:x1="1.648cm" svg:y1="3.987cm" svg:x2="3.127cm" svg:y2="2.6cm"><text:p/></draw:line><draw:frame draw:style-name="gr62" draw:text-style-name="P261" svg:width="0.772cm" svg:height="0.983cm" svg:x="9.709cm" svg:y="3.78cm"><draw:text-box><text:p text:style-name="P258"><text:span text:style-name="T34">T</text:span></text:p></draw:text-box></draw:frame><draw:frame draw:style-name="gr63" draw:text-style-name="P273" svg:width="0.71cm" svg:height="1.064cm" svg:x="2.097cm" svg:y="2.21cm"><draw:text-box><text:p text:style-name="P258"><text:span text:style-name="T41">IN</text:span></text:p></draw:text-box></draw:frame><draw:frame draw:style-name="gr64" draw:text-style-name="P274" svg:width="1.135cm" svg:height="1.064cm" svg:x="4.872cm" svg:y="2.88cm"><draw:text-box><text:p text:style-name="P258"><text:span text:style-name="T42">OUT</text:span></text:p></draw:text-box></draw:frame><draw:line draw:style-name="gr3" draw:text-style-name="P257" svg:x1="3.951cm" svg:y1="2.472cm" svg:x2="2.306cm" svg:y2="2.732cm"><text:p/></draw:line><draw:line draw:style-name="gr3" draw:text-style-name="P257" svg:x1="1.651cm" svg:y1="3.986cm" svg:x2="2.303cm" svg:y2="2.728cm"><text:p/></draw:line><draw:line draw:style-name="gr3" draw:text-style-name="P257" svg:x1="3.948cm" svg:y1="2.472cm" svg:x2="4.19cm" svg:y2="3.99cm"><text:p/></draw:line><draw:line draw:style-name="gr3" draw:text-style-name="P257" svg:x1="6.02cm" svg:y1="3.99cm" svg:x2="4.191cm" svg:y2="3.99cm"><text:p/></draw:line><draw:line draw:style-name="gr3" draw:text-style-name="P257" svg:x1="6.022cm" svg:y1="3.987cm" svg:x2="8.063cm" svg:y2="3.646cm"><text:p/></draw:line><draw:line draw:style-name="gr3" draw:text-style-name="P257" svg:x1="8.062cm" svg:y1="2.343cm" svg:x2="8.064cm" svg:y2="3.652cm"><text:p/></draw:line><draw:line draw:style-name="gr3" draw:text-style-name="P257" svg:x1="8.064cm" svg:y1="2.343cm" svg:x2="10.122cm" svg:y2="2.343cm"><text:p/></draw:line><draw:line draw:style-name="gr61" draw:text-style-name="P257" svg:x1="3.949cm" svg:y1="2.472cm" svg:x2="3.126cm" svg:y2="2.603cm"><text:p/></draw:line><draw:line draw:style-name="gr61" draw:text-style-name="P257" svg:x1="3.948cm" svg:y1="2.472cm" svg:x2="5.206cm" svg:y2="3.99cm"><text:p/></draw:line><draw:line draw:style-name="gr61" draw:text-style-name="P257" svg:x1="5.207cm" svg:y1="3.99cm" svg:x2="6.106cm" svg:y2="3.99cm"><text:p/></draw:line><draw:line draw:style-name="gr61" draw:text-style-name="P257" svg:x1="8.062cm" svg:y1="3.646cm" svg:x2="6.106cm" svg:y2="3.987cm"><text:p/></draw:line><draw:line draw:style-name="gr61" draw:text-style-name="P257" svg:x1="8.062cm" svg:y1="3.651cm" svg:x2="9.504cm" svg:y2="2.343cm"><text:p/></draw:line><draw:line draw:style-name="gr61" draw:text-style-name="P257" svg:x1="9.915cm" svg:y1="2.343cm" svg:x2="9.504cm" svg:y2="2.343cm"><text:p/></draw:line></draw:g>Die folgende Grafik zeigt den Verlauf des Ausgangs in Abhängigkeit eines Eingangssignals:</text:p>
      <text:list xml:id="list38472349" text:continue-numbering="true" text:style-name="L1">
        <text:list-item>
          <text:list>
            <text:list-item>
              <text:h text:style-name="P216" text:outline-level="2"><text:soft-page-break/><text:alphabetical-index-mark-start text:id="IMark226158368"/>LINEAR_INT<text:alphabetical-index-mark-end text:id="IMark226158368"/></text:h>
            </text:list-item>
          </text:list>
        </text:list-item>
      </text:list>
      <text:p text:style-name="P69">Type<text:tab/>Funktion</text:p>
      <text:p text:style-name="P66"><text:span text:style-name="T15">Input</text:span><text:span text:style-name="T14"><text:tab/>X : REAL (Eingangssignal)</text:span></text:p>
      <text:p text:style-name="P73"><text:tab/>XY : ARRAY[1..20,0..1] (Aufsteigend sortierte Wertepaare)</text:p>
      <text:p text:style-name="P73"><text:tab/>PTS : INT (Anzahl der Wertepaare)</text:p>
      <text:p text:style-name="P73"><draw:frame draw:style-name="fr3" draw:name="Grafik337" text:anchor-type="paragraph" svg:x="1.046cm" svg:y="0.667cm" svg:width="4.48cm" svg:height="1.79cm" draw:z-index="322"><draw:image xlink:href="Pictures/100000000000015300000087B6D18086.png" xlink:type="simple" xlink:show="embed" xlink:actuate="onLoad"/></draw:frame>Output<text:tab/>REAL (Ausgangssignal)</text:p>
      <text:p text:style-name="P183"><text:line-break/>LINEAR_INT ist ein linearer Interpolations Baustein. Eine beliebige Kennlinie wird mit maximal 20 Koordinatenwerten (X,Y) beschrieben und dadurch in bis zu 19 lineare Segmente zerlegt. Die Definition der Koordinatenwerte wird in einem Array übergeben welches die Kennlinie mit einzelnen X,Y Wertepaaren beschreibt. Die Wertepaare müssen aufsteigend nach dem X_Wert Sortiert sein. Wird ein X-Wert außerhalb des durch die Wertepaare beschriebenen Bereiches abgefragt, so wird das erste beziehungsweise letzte lineare Segment extrapoliert und der entsprechende Wert Ausgegeben. Um die Anzahl der Definitionspunkte flexibel zu halten wird am Eingang PTS die Anzahl der Punkte vorgegeben. Die mögliche Punktezahl liegt im Bereich 3 bis 20, wobei jeder Einzelpunkt mit X- und Y-Wert dargestellt ist.</text:p>
      <text:p text:style-name="P183">Beispiel:</text:p>
      <text:p text:style-name="P183">VAR</text:p>
      <text:p text:style-name="P183"><text:s text:c="5"/>BEISPIEL : ARRAY[1..4,0..1] := -10,-0.53, 10,0.53, 100,88.3, 200,122.2;</text:p>
      <text:p text:style-name="P183">END_VAR</text:p>
      <text:p text:style-name="P183">für obige Definition ergeben sich folgende Ergebnisse:</text:p>
      <text:p text:style-name="P183">LINEAR_INT(0, Beispiel, 4) = 0;</text:p>
      <text:p text:style-name="P183">LINEAR_INT(30.0, Beispiel, 4) = 20.0344;</text:p>
      <text:p text:style-name="P183">LINEAR_INT(66.41, Beispiel, 4) = 55.54229;</text:p>
      <text:p text:style-name="P183">LINEAR_INT(800.0, Beispiel, 4) = 325.6;</text:p>
      <text:p text:style-name="P183"/>
      <text:list xml:id="list38471914" text:continue-numbering="true" text:style-name="L1">
        <text:list-item>
          <text:list>
            <text:list-item>
              <text:h text:style-name="P216" text:outline-level="2"><text:soft-page-break/><text:alphabetical-index-mark-start text:id="IMark226158368"/>POLYNOM_INT<text:alphabetical-index-mark-end text:id="IMark226158368"/></text:h>
            </text:list-item>
          </text:list>
        </text:list-item>
      </text:list>
      <text:p text:style-name="P69">Type<text:tab/>Funktion</text:p>
      <text:p text:style-name="P66"><text:span text:style-name="T15">Input</text:span><text:span text:style-name="T14"><text:tab/>X : REAL (Eingangssignal)</text:span></text:p>
      <text:p text:style-name="P73"><text:tab/>XY : ARRAY[1..5,0..1] (Aufsteigend sortierte Wertepaare)</text:p>
      <text:p text:style-name="P73"><text:tab/>PTS : INT (Anzahl der Wertepaare)</text:p>
      <text:p text:style-name="P73"><draw:frame draw:style-name="fr3" draw:name="Grafik338" text:anchor-type="paragraph" svg:x="1.09cm" svg:y="0.688cm" svg:width="4.881cm" svg:height="1.79cm" draw:z-index="323"><draw:image xlink:href="Pictures/1000000000000171000000874EEE3D15.png" xlink:type="simple" xlink:show="embed" xlink:actuate="onLoad"/></draw:frame>Output<text:tab/>REAL (Ausgangssignal)</text:p>
      <text:p text:style-name="P173"><text:span text:style-name="T21"><text:line-break/>POLYNOM_INT interpoliert eine Anzahl von Wertepaaren mit einem Polynom N-fachen Grades. Die Anzahl der Wertepaare ist PTS und N entspricht der Anzahl der Wertepaare (PTS). Eine beliebige Kennlinie wird mit maximal 5 Koordinatenwerten (X,Y) beschrieben und intern mit einem Polynom beschrieben. Die Definition der Koordinatenwerte wird in einem Array übergeben welches die Kennlinie mit einzelnen X,Y Wertepaaren beschreibt. Die Wertepaare müssen aufsteigend nach dem X_Wert Sortiert sein. Wird ein X-Wert außerhalb des durch die Wertepaare beschriebenen Bereiches abgefragt, so wird dieser gemäß dem ermittelten Polygon berechnet, es ist hierbei aber zu beachten das durch ein Polynom höheren Grades Schwingungen oberhalb und unterhalb des Definitionsbereiches auftreten können und berechnete Werte in diesem Bereich meist nicht sinnvoll sind. Vor der Anwendung einer Polynominterpolation sind unbedingt Grundlagen hierzu, zum Beispiel in Wikipedia, nachzulesen. Um die Anzahl der Definitionspunkte flexibel zu halten wird am Eingang PTS die </text:span><text:span text:style-name="T21">Anzahl der Punkte vorgegeben. Die mögliche Punktezahl liegt im Bereich 3 bis 5, wobei jeder Einzelpunkt mit X- und Y-Wert dargestellt ist. Ein </text:span><text:span text:style-name="T19">Polynominterpolation</text:span><text:span text:style-name="T21"> mit mehr als 5 Punkten führt zu erhöhter Schwingneigung und ist aus diesem Grunde abzulehnen.</text:span></text:p>
      <text:p text:style-name="P183">Das folgende Beispiel zeigt die Definition für das Array XY und einige Werte:</text:p>
      <text:p text:style-name="P183">VAR</text:p>
      <text:p text:style-name="P183"><text:s text:c="5"/>BEISPIEL : ARRAY[1..5,0..1] := -10,-0.53, 10,0.53, 100,88.3, 200,122.2;</text:p>
      <text:p text:style-name="P183">END_VAR</text:p>
      <text:p text:style-name="P183">für obige Definition ergeben sich folgende Ergebnisse:</text:p>
      <text:p text:style-name="P183">POLYNOM_INT(0, Beispiel, 4) = -1.397069;</text:p>
      <text:p text:style-name="P183">POLYNOM_INT(30.0, Beispiel, 4) = 11.4257;</text:p>
      <text:p text:style-name="P183">POLYNOM_INT(66.41, Beispiel, 4) = 47.74527;</text:p>
      <text:p text:style-name="P183">POLYNOM_INT(800.0, Beispiel, 4) = -19617.94;</text:p>
      <text:p text:style-name="P183"><text:soft-page-break/>Bei den Ergebnissen im Beispiel ist deutlich zu erkennen das der Wert von -19617.94 für den Eingang X = 800 keinen Sinn macht, da er außerhalb des definierten Bereichs von -10 bis +200 liegt.</text:p>
      <text:p text:style-name="P173"><draw:frame draw:style-name="fr3" draw:name="Grafik339" text:anchor-type="paragraph" svg:x="0.981cm" svg:y="2.152cm" svg:width="15.998cm" svg:height="11.277cm" draw:z-index="324"><draw:image xlink:href="Pictures/100000000000030F00000228FBA36C26.png" xlink:type="simple" xlink:show="embed" xlink:actuate="onLoad"/></draw:frame><text:span text:style-name="T21">Die folgende </text:span><text:span text:style-name="T16">Trace</text:span><text:span text:style-name="T21"> Aufzeichnung zeigt den Verlauf des Ausgangs zum Eingang. Hierbei sind deutlich die Überschwinger des Polygons gegenüber ei</text:span><text:span text:style-name="T21">ner linearen Interpolation zu erkennen. Grün = Eingang X, Rot = lineare Interpolation, Blau = Polynom Interpolation.</text:span></text:p>
      <text:p text:style-name="P183"/>
      <text:list xml:id="list38456264" text:continue-numbering="true" text:style-name="L1">
        <text:list-item>
          <text:h text:style-name="P210" text:outline-level="1">Geometrische Funktionen</text:h>
          <text:list>
            <text:list-item>
              <text:h text:style-name="P216" text:outline-level="2"><text:alphabetical-index-mark-start text:id="IMark226158368"/>CIRCLE_A<text:alphabetical-index-mark-end text:id="IMark226158368"/></text:h>
            </text:list-item>
          </text:list>
        </text:list-item>
      </text:list>
      <text:p text:style-name="P73">Type<text:tab/>Funktion</text:p>
      <text:p text:style-name="P66"><text:span text:style-name="T15">Input</text:span><text:span text:style-name="T14"><text:tab/>RX : REAL (Kreisradius)</text:span></text:p>
      <text:p text:style-name="P179"><text:tab/>AX : REAL (Winkelsegment, 360 = gesamter Kreis)</text:p>
      <text:p text:style-name="P73"><draw:frame draw:style-name="fr3" draw:name="Grafik347" text:anchor-type="paragraph" svg:x="1.002cm" svg:y="0.688cm" svg:width="3.69cm" svg:height="1.39cm" draw:z-index="325"><draw:image xlink:href="Pictures/10000000000001170000006934D17BAA.png" xlink:type="simple" xlink:show="embed" xlink:actuate="onLoad"/></draw:frame>Output<text:tab/>REAL (Fläche des Kreissegments)</text:p>
      <text:p text:style-name="P183"><draw:frame draw:style-name="fr6" draw:name="Grafik355" text:anchor-type="paragraph" svg:x="12.465cm" svg:y="0.473cm" svg:width="3.32cm" svg:height="3.251cm" draw:z-index="333"><draw:image xlink:href="Pictures/10000000000000FB000000F63FAFD69A.png" xlink:type="simple" xlink:show="embed" xlink:actuate="onLoad"/></draw:frame><text:line-break/>CIRCLE_A berechnet die Fläche eines Kreissegments mit den Winkel AX und dem Radius RX. Wird der Winkel AX = 360 gesetzt so wird die Kreisfläche berechnet.</text:p>
      <text:list xml:id="list38452807" text:continue-numbering="true" text:style-name="L1">
        <text:list-item>
          <text:list>
            <text:list-item>
              <text:h text:style-name="P216" text:outline-level="2"><text:alphabetical-index-mark-start text:id="IMark226158368"/>CIRCLE_C<text:alphabetical-index-mark-end text:id="IMark226158368"/></text:h>
            </text:list-item>
          </text:list>
        </text:list-item>
      </text:list>
      <text:p text:style-name="P73">Type<text:tab/>Funktion</text:p>
      <text:p text:style-name="P66"><text:span text:style-name="T15">Input</text:span><text:span text:style-name="T14"><text:tab/>RX : REAL (Kreisradius)</text:span></text:p>
      <text:p text:style-name="P179"><text:tab/>AX : REAL (Winkelsegment, 360 = gesamter Kreis)</text:p>
      <text:p text:style-name="P73"><draw:frame draw:style-name="fr3" draw:name="Grafik348" text:anchor-type="paragraph" svg:x="1.046cm" svg:y="0.693cm" svg:width="3.69cm" svg:height="1.39cm" draw:z-index="326"><draw:image xlink:href="Pictures/100000000000011700000069037AE6EF.png" xlink:type="simple" xlink:show="embed" xlink:actuate="onLoad"/></draw:frame><draw:frame draw:style-name="fr7" draw:name="Grafik356" text:anchor-type="paragraph" svg:x="12.398cm" svg:y="1.72cm" svg:width="3.32cm" svg:height="3.27cm" draw:z-index="335"><draw:image xlink:href="Pictures/10000000000000FB000000F737E3925C.png" xlink:type="simple" xlink:show="embed" xlink:actuate="onLoad"/></draw:frame>Output<text:tab/>REAL (Kreisbogenlänge bzw. Kreisumfang)</text:p>
      <text:p text:style-name="P183"><text:line-break/>CIRCLE_C berechnet die Bogenlänge eines Kreisbogens mit den Winkel AX und dem Radius RX. Wird der Winkel AX = 360 gesetzt so wird der Kreisumfang berechnet.</text:p>
      <text:list xml:id="list38443615" text:continue-numbering="true" text:style-name="L1">
        <text:list-item>
          <text:list>
            <text:list-item>
              <text:h text:style-name="P216" text:outline-level="2"><text:soft-page-break/><text:alphabetical-index-mark-start text:id="IMark215639240"/>CONE_V<text:alphabetical-index-mark-end text:id="IMark215639240"/></text:h>
            </text:list-item>
          </text:list>
        </text:list-item>
      </text:list>
      <text:p text:style-name="P73">Type<text:tab/>Funktion</text:p>
      <text:p text:style-name="P66"><text:span text:style-name="T15">Input</text:span><text:span text:style-name="T14"><text:tab/>RX : REAL (Kreisradius der Grundfläche)</text:span></text:p>
      <text:p text:style-name="P179"><text:tab/>HX : REAL (Höhe des Kegels)</text:p>
      <text:p text:style-name="P73"><draw:frame draw:style-name="fr3" draw:name="Grafik354" text:anchor-type="paragraph" svg:x="1.069cm" svg:y="0.69cm" svg:width="3.29cm" svg:height="1.39cm" draw:z-index="332"><draw:image xlink:href="Pictures/10000000000000F9000000690604D8EF.png" xlink:type="simple" xlink:show="embed" xlink:actuate="onLoad"/></draw:frame><draw:frame draw:style-name="fr7" draw:name="Grafik357" text:anchor-type="paragraph" svg:x="13.481cm" svg:y="0.25cm" svg:width="3.54cm" svg:height="3.521cm" draw:z-index="334"><draw:image xlink:href="Pictures/100000000000010C0000010A2FE17E7C.png" xlink:type="simple" xlink:show="embed" xlink:actuate="onLoad"/></draw:frame>Output<text:tab/>REAL (Volumen des Kegels)</text:p>
      <text:p text:style-name="P183"><text:line-break/>KONE_V berechnet das Volumen eines Kegels mit dem Radius RX und der Höhe HX.</text:p>
      <text:list xml:id="list38469468" text:continue-numbering="true" text:style-name="L1">
        <text:list-item>
          <text:list>
            <text:list-item>
              <text:h text:style-name="P216" text:outline-level="2"><text:alphabetical-index-mark-start text:id="IMark215641480"/>ELLIPSE_A<text:alphabetical-index-mark-end text:id="IMark215641480"/></text:h>
            </text:list-item>
          </text:list>
        </text:list-item>
      </text:list>
      <text:p text:style-name="P73">Type<text:tab/>Funktion</text:p>
      <text:p text:style-name="P66"><text:span text:style-name="T15">Input</text:span><text:span text:style-name="T14"><text:tab/>R1 : REAL (Radius 1)</text:span></text:p>
      <text:p text:style-name="P179"><text:tab/>R2 : REAL (Radius 2)</text:p>
      <text:p text:style-name="P73"><draw:frame draw:style-name="fr3" draw:name="Grafik349" text:anchor-type="paragraph" svg:x="1.046cm" svg:y="0.69cm" svg:width="4.09cm" svg:height="1.39cm" draw:z-index="327"><draw:image xlink:href="Pictures/100000000000013500000069D218990B.png" xlink:type="simple" xlink:show="embed" xlink:actuate="onLoad"/></draw:frame>Output<text:tab/>REAL (Fläche der Ellipse)</text:p>
      <text:p text:style-name="P183"><draw:frame draw:style-name="fr7" draw:name="Grafik358" text:anchor-type="paragraph" svg:x="12.931cm" svg:y="1.007cm" svg:width="4.02cm" svg:height="2.041cm" draw:z-index="336"><draw:image xlink:href="Pictures/10000000000001300000009A4CCE2EC8.png" xlink:type="simple" xlink:show="embed" xlink:actuate="onLoad"/></draw:frame><text:line-break/>ELLIPSE_A berechnet die Fläche einer Ellipse die durch die Radien R1 und R2 definiert ist.</text:p>
      <text:list xml:id="list38464202" text:continue-numbering="true" text:style-name="L1">
        <text:list-item>
          <text:list>
            <text:list-item>
              <text:h text:style-name="P216" text:outline-level="2"><text:alphabetical-index-mark-start text:id="IMark215641480"/>ELLIPSE_C<text:alphabetical-index-mark-end text:id="IMark215641480"/></text:h>
            </text:list-item>
          </text:list>
        </text:list-item>
      </text:list>
      <text:p text:style-name="P73">Type<text:tab/>Funktion</text:p>
      <text:p text:style-name="P66"><text:span text:style-name="T15">Input</text:span><text:span text:style-name="T14"><text:tab/>R1 : REAL (Radius 1)</text:span></text:p>
      <text:p text:style-name="P179"><text:tab/>R2 : REAL (Radius 2)</text:p>
      <text:p text:style-name="P73"><draw:frame draw:style-name="fr3" draw:name="Grafik350" text:anchor-type="paragraph" svg:x="1.046cm" svg:y="0.688cm" svg:width="4.09cm" svg:height="1.39cm" draw:z-index="328"><draw:image xlink:href="Pictures/10000000000001350000006932DBCE2F.png" xlink:type="simple" xlink:show="embed" xlink:actuate="onLoad"/></draw:frame>Output<text:tab/>REAL (Umfang der Ellipse)</text:p>
      <text:p text:style-name="P183"><draw:frame draw:style-name="fr7" draw:name="Grafik359" text:anchor-type="paragraph" svg:x="12.952cm" svg:y="0.882cm" svg:width="4.02cm" svg:height="2.041cm" draw:z-index="337"><draw:image xlink:href="Pictures/10000000000001300000009A4CCE2EC8.png" xlink:type="simple" xlink:show="embed" xlink:actuate="onLoad"/></draw:frame><text:soft-page-break/><text:line-break/>ELLIPSE_C berechnet den Umfang einer Ellipse die durch die Radien R1 und R2 definiert ist.</text:p>
      <text:list xml:id="list38471890" text:continue-numbering="true" text:style-name="L1">
        <text:list-item>
          <text:list>
            <text:list-item>
              <text:h text:style-name="P216" text:outline-level="2"><text:alphabetical-index-mark-start text:id="IMark215641480"/>SPHERE_V<text:alphabetical-index-mark-end text:id="IMark215641480"/></text:h>
            </text:list-item>
          </text:list>
        </text:list-item>
      </text:list>
      <text:p text:style-name="P73">Type<text:tab/>Funktion</text:p>
      <text:p text:style-name="P66"><text:span text:style-name="T15">Input</text:span><text:span text:style-name="T14"><text:tab/>RX : REAL (Radius )</text:span></text:p>
      <text:p text:style-name="P183"><draw:frame draw:style-name="fr3" draw:name="Grafik352" text:anchor-type="paragraph" svg:x="1.067cm" svg:y="0.769cm" svg:width="3.69cm" svg:height="0.99cm" draw:z-index="330"><draw:image xlink:href="Pictures/10000000000001170000004B59ABAFAF.png" xlink:type="simple" xlink:show="embed" xlink:actuate="onLoad"/></draw:frame>Output<text:tab/>REAL (Volumen der Kugel)</text:p>
      <text:p text:style-name="P183"><text:line-break/>SPHERE_V berechnet das Volumen einer Kugel mit dem Radius RX.</text:p>
      <text:list xml:id="list38453606" text:continue-numbering="true" text:style-name="L1">
        <text:list-item>
          <text:list>
            <text:list-item>
              <text:h text:style-name="P216" text:outline-level="2"><text:alphabetical-index-mark-start text:id="IMark215641480"/>TRIANGLE_A<text:alphabetical-index-mark-end text:id="IMark215641480"/></text:h>
            </text:list-item>
          </text:list>
        </text:list-item>
      </text:list>
      <text:p text:style-name="P73">Type<text:tab/>Funktion</text:p>
      <text:p text:style-name="P66"><text:span text:style-name="T15">Input</text:span><text:span text:style-name="T14"><text:tab/>S1 : REAL (Seitenlänge 1)</text:span></text:p>
      <text:p text:style-name="P179"><text:tab/>A : REAL (Winkel zwischen Seite 1 und Seite 2)</text:p>
      <text:p text:style-name="P179"><text:tab/>S2 : REAL (Seitenlänge 2)</text:p>
      <text:p text:style-name="P69"><text:tab/>S3 : REAL (Seitenlänge 3)</text:p>
      <text:p text:style-name="P183"><draw:frame draw:style-name="fr3" draw:name="Grafik353" text:anchor-type="paragraph" svg:x="1.002cm" svg:y="0.688cm" svg:width="4.48cm" svg:height="2.18cm" draw:z-index="331"><draw:image xlink:href="Pictures/1000000000000153000000A54817C519.png" xlink:type="simple" xlink:show="embed" xlink:actuate="onLoad"/></draw:frame><draw:frame draw:style-name="fr8" draw:name="Grafik360" text:anchor-type="paragraph" svg:x="13.416cm" svg:y="0.321cm" svg:width="3.5cm" svg:height="2.341cm" draw:z-index="338"><draw:image xlink:href="Pictures/1000000000000109000000B1502364E8.png" xlink:type="simple" xlink:show="embed" xlink:actuate="onLoad"/></draw:frame>Output<text:tab/>REAL (Fläche des Dreiecks)</text:p>
      <text:p text:style-name="P173"><text:span text:style-name="T21"><text:line-break/>TRIANGLE_A berechnet die Fläche eines beliebigen Dreiecks. Das Dreieck kann wahlweise durch 2 Seiten und den durch die Seiten 1 und 2 aufge</text:span><text:soft-page-break/><text:span text:style-name="T21">spannten Winkel (S1, S2 und A) definiert sein oder wenn A = 0 dann wird die Fläche aus den drei Seiten (S1, S2 und S3) berechnet.</text:span></text:p>
      <text:list xml:id="list38471277" text:continue-numbering="true" text:style-name="L1">
        <text:list-item>
          <text:h text:style-name="P210" text:outline-level="1">Vektor Mathematik</text:h>
          <text:list>
            <text:list-item>
              <text:h text:style-name="P225" text:outline-level="2">Einleitung</text:h>
            </text:list-item>
          </text:list>
        </text:list-item>
      </text:list>
      <text:p text:style-name="P173">Vektoren werden mit dem definierten Typ VEKTOR_3 abgebildet.</text:p>
      <text:p text:style-name="P173">Der Typ VEKTOR_3 setzt sich aus 3 Komponenten X, Y und Z zusammen, alle Komponenten sind vom Typ REAL.</text:p>
      <text:p text:style-name="P173">Der Vektor V vom Typ Vektor besteht aus:</text:p>
      <text:p text:style-name="P173">V.X<text:tab/>X Komponente vom Typ REAL.</text:p>
      <text:p text:style-name="P93">V.Y<text:tab/>Y Komponente vom Typ REAL.</text:p>
      <text:p text:style-name="P93">V.Z<text:tab/>Z Komponente vom Typ REAL.</text:p>
      <text:list xml:id="list38451233" text:continue-numbering="true" text:style-name="L1">
        <text:list-item>
          <text:list>
            <text:list-item>
              <text:h text:style-name="P216" text:outline-level="2"><text:alphabetical-index-mark-start text:id="IMark225902392"/>V3_ABS<text:alphabetical-index-mark-end text:id="IMark225902392"/></text:h>
            </text:list-item>
          </text:list>
        </text:list-item>
      </text:list>
      <text:p text:style-name="P73">Type<text:tab/>Funktion</text:p>
      <text:p text:style-name="P66"><text:span text:style-name="T15">Input</text:span><text:span text:style-name="T14"><text:tab/>A : VECTOR_3 (Vektor mit den Koordinaten X, Y, Z)</text:span></text:p>
      <text:p text:style-name="P183"><draw:frame draw:style-name="fr3" draw:name="Grafik411" text:anchor-type="paragraph" svg:x="1.046cm" svg:y="0.667cm" svg:width="3.29cm" svg:height="0.99cm" draw:z-index="386"><draw:image xlink:href="Pictures/10000000000000F90000004B69237409.png" xlink:type="simple" xlink:show="embed" xlink:actuate="onLoad"/></draw:frame>Output<text:tab/>REAL (Absolute Länge des Vektors)</text:p>
      <text:p text:style-name="P183"><text:line-break/>V3_ABS berechnet den Absolutwert (Länge) eines Vektors in einen dreidimensionalen Koordinatensystem.</text:p>
      <text:p text:style-name="P183">V3_ABS(3,4,5) = 7.071...</text:p>
      <text:p text:style-name="P183"/>
      <text:list xml:id="list38468342" text:continue-numbering="true" text:style-name="L1">
        <text:list-item>
          <text:list>
            <text:list-item>
              <text:h text:style-name="P216" text:outline-level="2"><text:soft-page-break/><text:alphabetical-index-mark-start text:id="IMark225902392"/>V3_ADD<text:alphabetical-index-mark-end text:id="IMark225902392"/></text:h>
            </text:list-item>
          </text:list>
        </text:list-item>
      </text:list>
      <text:p text:style-name="P73">Type<text:tab/>Funktion</text:p>
      <text:p text:style-name="P66"><text:span text:style-name="T15">Input</text:span><text:span text:style-name="T14"><text:tab/>A : VECTOR_3 (Vektor mit den Koordinaten X, Y, Z)</text:span></text:p>
      <text:p text:style-name="P179"><text:tab/>B : VECTOR_3 (Vektor mit den Koordinaten X, Y, Z)</text:p>
      <text:p text:style-name="P73"><draw:frame draw:style-name="fr3" draw:name="Grafik410" text:anchor-type="paragraph" svg:x="1.069cm" svg:y="0.688cm" svg:width="3.29cm" svg:height="1.39cm" draw:z-index="385"><draw:image xlink:href="Pictures/10000000000000F90000006921776C3F.png" xlink:type="simple" xlink:show="embed" xlink:actuate="onLoad"/></draw:frame>Output<text:tab/>VECTOR_3 (Vektor mit den Koordinaten X, Y, Z)</text:p>
      <text:p text:style-name="P183"><text:line-break/>V3_ADD addiert 2 dreidimensionale Vektoren.</text:p>
      <text:p text:style-name="P183">V3_ADD([3,4,5],[1,2,3]) = (4,6,8)</text:p>
      <text:list xml:id="list38460679" text:continue-numbering="true" text:style-name="L1">
        <text:list-item>
          <text:list>
            <text:list-item>
              <text:h text:style-name="P216" text:outline-level="2"><text:alphabetical-index-mark-start text:id="IMark225902392"/>V3_ANG<text:alphabetical-index-mark-end text:id="IMark225902392"/></text:h>
            </text:list-item>
          </text:list>
        </text:list-item>
      </text:list>
      <text:p text:style-name="P73">Type<text:tab/>Funktion</text:p>
      <text:p text:style-name="P66"><text:span text:style-name="T15">Input</text:span><text:span text:style-name="T14"><text:tab/>A : VECTOR_3 (Vektor mit den Koordinaten X, Y, Z)</text:span></text:p>
      <text:p text:style-name="P179"><text:tab/>B : VECTOR_3 (Vektor mit den Koordinaten X, Y, Z)</text:p>
      <text:p text:style-name="P73"><draw:frame draw:style-name="fr3" draw:name="Grafik409" text:anchor-type="paragraph" svg:x="1.046cm" svg:y="0.683cm" svg:width="3.29cm" svg:height="1.39cm" draw:z-index="384"><draw:image xlink:href="Pictures/10000000000000F900000069B13991B5.png" xlink:type="simple" xlink:show="embed" xlink:actuate="onLoad"/></draw:frame>Output<text:tab/>REAL (Winkel in Bogenmaß)</text:p>
      <text:p text:style-name="P183"><text:line-break/>V3_ANG berechnet den Winkel zwischen 2 dreidimensionalen Vektoren</text:p>
      <text:p text:style-name="P183">V3_ANG([1,0,0],[0,1,0]) = 1,57.. ( PI / 2)</text:p>
      <text:list xml:id="list38461669" text:continue-numbering="true" text:style-name="L1">
        <text:list-item>
          <text:list>
            <text:list-item>
              <text:h text:style-name="P216" text:outline-level="2"><text:alphabetical-index-mark-start text:id="IMark225902392"/>V3_DPRO<text:alphabetical-index-mark-end text:id="IMark225902392"/></text:h>
            </text:list-item>
          </text:list>
        </text:list-item>
      </text:list>
      <text:p text:style-name="P73">Type<text:tab/>Funktion</text:p>
      <text:p text:style-name="P66"><text:span text:style-name="T15">Input</text:span><text:span text:style-name="T14"><text:tab/>A : VECTOR_3 (Vektor mit den Koordinaten X, Y, Z)</text:span></text:p>
      <text:p text:style-name="P179"><text:tab/>B : VECTOR_3 (Vektor mit den Koordinaten X, Y, Z)</text:p>
      <text:p text:style-name="P73"><draw:frame draw:style-name="fr3" draw:name="Grafik408" text:anchor-type="paragraph" svg:x="1.067cm" svg:y="0.69cm" svg:width="3.69cm" svg:height="1.39cm" draw:z-index="383"><draw:image xlink:href="Pictures/1000000000000117000000697ED0B366.png" xlink:type="simple" xlink:show="embed" xlink:actuate="onLoad"/></draw:frame>Output<text:tab/>REAL (Skalares Produkt)</text:p>
      <text:p text:style-name="P183"><text:soft-page-break/><text:line-break/>V3_DPRO berechnet das Skalare Produkt zweier dreidimensionaler Vektoren.</text:p>
      <text:p text:style-name="P183">V3_DPRO([1,2,3],[3,1,2]) = 11</text:p>
      <text:p text:style-name="P183">Das Skalare Produkt berechnet sich aus A.X*B.X + A.Y*B.Y + A.Z*B.Z</text:p>
      <text:list xml:id="list38443801" text:continue-numbering="true" text:style-name="L1">
        <text:list-item>
          <text:list>
            <text:list-item>
              <text:h text:style-name="P216" text:outline-level="2"><text:alphabetical-index-mark-start text:id="IMark225902392"/>V3_NORM<text:alphabetical-index-mark-end text:id="IMark225902392"/></text:h>
            </text:list-item>
          </text:list>
        </text:list-item>
      </text:list>
      <text:p text:style-name="P73">Type<text:tab/>Funktion</text:p>
      <text:p text:style-name="P66"><text:span text:style-name="T15">Input</text:span><text:span text:style-name="T14"><text:tab/>A : VECTOR_3 (Vektor mit den Koordinaten X, Y, Z)</text:span></text:p>
      <text:p text:style-name="P183"><draw:frame draw:style-name="fr3" draw:name="Grafik407" text:anchor-type="paragraph" svg:x="1.046cm" svg:y="0.667cm" svg:width="3.69cm" svg:height="0.99cm" draw:z-index="382"><draw:image xlink:href="Pictures/10000000000001170000004B7D8268FE.png" xlink:type="simple" xlink:show="embed" xlink:actuate="onLoad"/></draw:frame>Output<text:tab/>VECTOR_3 (Vektor mit den Koordinaten X, Y, Z)</text:p>
      <text:p text:style-name="P183"><text:line-break/>V3_NORM erzeugt aus einen beliebigen dreidimensionalen Vektor einen auf die Länge 1 Normierten Vektor mit gleicher Richtung. Ein Vektor mit der Länge 1 wird Einheitsvektor genannt</text:p>
      <text:p text:style-name="P183">V3_NORM(3,0,0) = (1,0,0)</text:p>
      <text:list xml:id="list38473818" text:continue-numbering="true" text:style-name="L1">
        <text:list-item>
          <text:list>
            <text:list-item>
              <text:h text:style-name="P216" text:outline-level="2"><text:alphabetical-index-mark-start text:id="IMark225902392"/>V3_NUL<text:alphabetical-index-mark-end text:id="IMark225902392"/></text:h>
            </text:list-item>
          </text:list>
        </text:list-item>
      </text:list>
      <text:p text:style-name="P73">Type<text:tab/>Funktion</text:p>
      <text:p text:style-name="P66"><text:span text:style-name="T15">Input</text:span><text:span text:style-name="T14"><text:tab/>A : VECTOR_3 (Vektor mit den Koordinaten X, Y, Z)</text:span></text:p>
      <text:p text:style-name="P183"><draw:frame draw:style-name="fr3" draw:name="Grafik412" text:anchor-type="paragraph" svg:x="1.046cm" svg:y="0.69cm" svg:width="3.29cm" svg:height="0.99cm" draw:z-index="387"><draw:image xlink:href="Pictures/10000000000000F90000004B78E7F143.png" xlink:type="simple" xlink:show="embed" xlink:actuate="onLoad"/></draw:frame>Output<text:tab/>BOOL (TRUE wenn Vektor ein Nullvektor ist)</text:p>
      <text:p text:style-name="P183">V3_NUL prüft ob der Vektor A ein Nullvektor ist. Ein Vektor ist dann ein Nullvektor wenn alle Komponenten (X, Y, Z) gleich Null sind.</text:p>
      <text:p text:style-name="P183">V3_NUL(0,0,0) = TRUE</text:p>
      <text:list xml:id="list38446729" text:continue-numbering="true" text:style-name="L1">
        <text:list-item>
          <text:list>
            <text:list-item>
              <text:h text:style-name="P216" text:outline-level="2"><text:soft-page-break/><text:alphabetical-index-mark-start text:id="IMark225902392"/>V3_PAR<text:alphabetical-index-mark-end text:id="IMark225902392"/></text:h>
            </text:list-item>
          </text:list>
        </text:list-item>
      </text:list>
      <text:p text:style-name="P73">Type<text:tab/>Funktion</text:p>
      <text:p text:style-name="P66"><text:span text:style-name="T15">Input</text:span><text:span text:style-name="T14"><text:tab/>A : VECTOR_3 (Vektor mit den Koordinaten X, Y, Z)</text:span></text:p>
      <text:p text:style-name="P179"><text:tab/>B : VECTOR_3 (Vektor mit den Koordinaten X, Y, Z)</text:p>
      <text:p text:style-name="P73"><draw:frame draw:style-name="fr3" draw:name="Grafik406" text:anchor-type="paragraph" svg:x="1.09cm" svg:y="0.688cm" svg:width="3.29cm" svg:height="1.39cm" draw:z-index="381"><draw:image xlink:href="Pictures/10000000000000F90000006944ADD1BC.png" xlink:type="simple" xlink:show="embed" xlink:actuate="onLoad"/></draw:frame>Output<text:tab/>BOOL (TRUE wenn die beiden Vektoren parallel sind)</text:p>
      <text:p text:style-name="P183"><text:line-break/>V3_PAR wird dann TRUE wenn die beiden Vektoren A und B Parallel sind. Ein Nullvektor ist Parallel zu jedem Vektor da er keine Richtung hat. Zwei Vektoren A und B die in Gegensätzliche Richtung zeigen sind Parallel.</text:p>
      <text:p text:style-name="P183">V3_PAR([1,1,1],[2,2,2]) = TRUE</text:p>
      <text:p text:style-name="P183">V3_PAR([1,1,1],[-1,-1,-1]) = TRUE</text:p>
      <text:p text:style-name="P183">V3_PAR([1,2,3],[0,0,0]) = TRUE</text:p>
      <text:p text:style-name="P183">V3_PAR([1,2,3],[1,0,0]) = FALSE</text:p>
      <text:list xml:id="list38444780" text:continue-numbering="true" text:style-name="L1">
        <text:list-item>
          <text:list>
            <text:list-item>
              <text:h text:style-name="P216" text:outline-level="2"><text:alphabetical-index-mark-start text:id="IMark225902392"/>V3_REV<text:alphabetical-index-mark-end text:id="IMark225902392"/></text:h>
            </text:list-item>
          </text:list>
        </text:list-item>
      </text:list>
      <text:p text:style-name="P73">Type<text:tab/>Funktion</text:p>
      <text:p text:style-name="P66"><text:span text:style-name="T15">Input</text:span><text:span text:style-name="T14"><text:tab/>A : VECTOR_3 (Vektor mit den Koordinaten X, Y, Z)</text:span></text:p>
      <text:p text:style-name="P73">Output<text:tab/>VECTOR_3 (Vektor mit den Koordinaten X, Y, Z)</text:p>
      <text:p text:style-name="P183"><draw:frame draw:style-name="fr3" draw:name="Grafik405" text:anchor-type="paragraph" svg:x="1.046cm" svg:y="0.039cm" svg:width="3.29cm" svg:height="0.99cm" draw:z-index="380"><draw:image xlink:href="Pictures/10000000000000F90000004B49AC343D.png" xlink:type="simple" xlink:show="embed" xlink:actuate="onLoad"/></draw:frame><text:line-break/>V3_REV erzeugt einen Vektor mit dem identischen Betrag von A aber mit entgegengesetzter Richtung. A - V3_REV(A) = 0.</text:p>
      <text:p text:style-name="P183">V3_REV(1,2,3) = (-1,-2,-3)</text:p>
      <text:list xml:id="list38465523" text:continue-numbering="true" text:style-name="L1">
        <text:list-item>
          <text:list>
            <text:list-item>
              <text:h text:style-name="P216" text:outline-level="2"><text:soft-page-break/><text:alphabetical-index-mark-start text:id="IMark225902392"/>V3_SMUL<text:alphabetical-index-mark-end text:id="IMark225902392"/></text:h>
            </text:list-item>
          </text:list>
        </text:list-item>
      </text:list>
      <text:p text:style-name="P73">Type<text:tab/>Funktion</text:p>
      <text:p text:style-name="P66"><text:span text:style-name="T15">Input</text:span><text:span text:style-name="T14"><text:tab/>A : VECTOR_3 (Vektor mit den Koordinaten X, Y, Z)</text:span></text:p>
      <text:p text:style-name="P179"><text:tab/>M : REAL (Skalarer Multiplikator)</text:p>
      <text:p text:style-name="P73"><draw:frame draw:style-name="fr3" draw:name="Grafik404" text:anchor-type="paragraph" svg:x="1.046cm" svg:y="0.667cm" svg:width="3.69cm" svg:height="1.39cm" draw:z-index="379"><draw:image xlink:href="Pictures/100000000000011700000069E5B6B284.png" xlink:type="simple" xlink:show="embed" xlink:actuate="onLoad"/></draw:frame>Output<text:tab/>VECTOR_3 (Vektor mit den Koordinaten X, Y, Z)</text:p>
      <text:p text:style-name="P183"><text:line-break/>V3_SMUL Multipliziert einen dreidimensionalen Vektor A mit dem Skalar M.</text:p>
      <text:p text:style-name="P183">V3_SMUL([1,2,3],10) = (10,20,30)</text:p>
      <text:list xml:id="list38456965" text:continue-numbering="true" text:style-name="L1">
        <text:list-item>
          <text:list>
            <text:list-item>
              <text:h text:style-name="P216" text:outline-level="2"><text:alphabetical-index-mark-start text:id="IMark225902392"/>V3_SUB<text:alphabetical-index-mark-end text:id="IMark225902392"/></text:h>
            </text:list-item>
          </text:list>
        </text:list-item>
      </text:list>
      <text:p text:style-name="P73">Type<text:tab/>Funktion</text:p>
      <text:p text:style-name="P66"><text:span text:style-name="T15">Input</text:span><text:span text:style-name="T14"><text:tab/>A : VECTOR_3 (Vektor mit den Koordinaten X, Y, Z)</text:span></text:p>
      <text:p text:style-name="P179"><text:tab/>B : VECTOR_3 (Vektor mit den Koordinaten X, Y, Z)</text:p>
      <text:p text:style-name="P73"><draw:frame draw:style-name="fr3" draw:name="Grafik403" text:anchor-type="paragraph" svg:x="1.067cm" svg:y="0.69cm" svg:width="3.29cm" svg:height="1.39cm" draw:z-index="378"><draw:image xlink:href="Pictures/10000000000000F900000069F2733006.png" xlink:type="simple" xlink:show="embed" xlink:actuate="onLoad"/></draw:frame>Output<text:tab/>VECTOR_3 (Vektor mit den Koordinaten X, Y, Z)</text:p>
      <text:p text:style-name="P183"><text:line-break/>V3_SUB Subtrahiert den Vektor B von A</text:p>
      <text:p text:style-name="P183">V3_SUB([3,3,3],[1,2,3]) = (2,1,0)</text:p>
      <text:p text:style-name="P183">V3_SUB([1,2,3],[1,-2,-3]) = (0,4,6)</text:p>
      <text:list xml:id="list38469211" text:continue-numbering="true" text:style-name="L1">
        <text:list-item>
          <text:list>
            <text:list-item>
              <text:h text:style-name="P216" text:outline-level="2"><text:alphabetical-index-mark-start text:id="IMark225902392"/>V3_XANG<text:alphabetical-index-mark-end text:id="IMark225902392"/></text:h>
            </text:list-item>
          </text:list>
        </text:list-item>
      </text:list>
      <text:p text:style-name="P73">Type<text:tab/>Funktion</text:p>
      <text:p text:style-name="P66"><text:span text:style-name="T15">Input</text:span><text:span text:style-name="T14"><text:tab/>A : VECTOR_3 (Vektor mit den Koordinaten X, Y, Z)</text:span></text:p>
      <text:p text:style-name="P183"><draw:frame draw:style-name="fr3" draw:name="Grafik402" text:anchor-type="paragraph" svg:x="1.067cm" svg:y="0.69cm" svg:width="3.69cm" svg:height="0.99cm" draw:z-index="377"><draw:image xlink:href="Pictures/10000000000001170000004BFE1C7216.png" xlink:type="simple" xlink:show="embed" xlink:actuate="onLoad"/></draw:frame>Output<text:tab/>REAL (Winkel zur X-Achse)</text:p>
      <text:p text:style-name="P183"><text:soft-page-break/><text:line-break/>V3_XANG berechnet den Winkel zwischen Der X-Achse des Koordinatensystems und einem dreidimensionalen Vektor A in Bogenmaß</text:p>
      <text:p text:style-name="P183">V3_XANG(1,2,3) = 1.300..</text:p>
      <text:list xml:id="list384726861" text:continue-numbering="true" text:style-name="L1">
        <text:list-item>
          <text:list>
            <text:list-item>
              <text:h text:style-name="P216" text:outline-level="2"><text:alphabetical-index-mark-start text:id="IMark225902392"/>V3_XPRO<text:alphabetical-index-mark-end text:id="IMark225902392"/></text:h>
            </text:list-item>
          </text:list>
        </text:list-item>
      </text:list>
      <text:p text:style-name="P73">Type<text:tab/>Funktion</text:p>
      <text:p text:style-name="P66"><text:span text:style-name="T15">Input</text:span><text:span text:style-name="T14"><text:tab/>A : VECTOR_3 (Vektor mit den Koordinaten X, Y, Z)</text:span></text:p>
      <text:p text:style-name="P179"><text:tab/>B : VECTOR_3 (Vektor mit den Koordinaten X, Y, Z)</text:p>
      <text:p text:style-name="P183"><draw:frame draw:style-name="fr3" draw:name="Grafik401" text:anchor-type="paragraph" svg:x="1.069cm" svg:y="0.677cm" svg:width="3.69cm" svg:height="1.39cm" draw:z-index="376"><draw:image xlink:href="Pictures/100000000000011700000069DA40C2AB.png" xlink:type="simple" xlink:show="embed" xlink:actuate="onLoad"/></draw:frame>Output<text:tab/>VECTOR_3 (Vektor mit den Koordinaten X, Y, Z)</text:p>
      <text:p text:style-name="P183"><text:line-break/>V3_XPRO berechnet das Kreuzprodukt zweier dreidimensionaler Vektoren A und B</text:p>
      <text:p text:style-name="P183">V3_XPRO([1,2,3],[2,1,2]) = (1,4,-3)</text:p>
      <text:list xml:id="list38456811" text:continue-numbering="true" text:style-name="L1">
        <text:list-item>
          <text:list>
            <text:list-item>
              <text:h text:style-name="P216" text:outline-level="2"><text:alphabetical-index-mark-start text:id="IMark225902392"/>V3_YANG<text:alphabetical-index-mark-end text:id="IMark225902392"/></text:h>
            </text:list-item>
          </text:list>
        </text:list-item>
      </text:list>
      <text:p text:style-name="P73">Type<text:tab/>Funktion</text:p>
      <text:p text:style-name="P66"><text:span text:style-name="T15">Input</text:span><text:span text:style-name="T14"><text:tab/>A : VECTOR_3 (Vektor mit den Koordinaten X, Y, Z)</text:span></text:p>
      <text:p text:style-name="P183"><draw:frame draw:style-name="fr3" draw:name="Grafik400" text:anchor-type="paragraph" svg:x="1.046cm" svg:y="0.693cm" svg:width="3.69cm" svg:height="0.99cm" draw:z-index="375"><draw:image xlink:href="Pictures/10000000000001170000004B6A2FA867.png" xlink:type="simple" xlink:show="embed" xlink:actuate="onLoad"/></draw:frame>Output<text:tab/>REAL (Winkel zur Y-Achse)</text:p>
      <text:p text:style-name="P183"><text:line-break/>V3_YANG berechnet den Winkel zwischen Der Y-Achse des Koordinatensystems und einem dreidimensionalen Vektor A in Bogenmaß</text:p>
      <text:p text:style-name="P183">V3_YANG(1,2,3) = 1.006..</text:p>
      <text:list xml:id="list38454033" text:continue-numbering="true" text:style-name="L1">
        <text:list-item>
          <text:list>
            <text:list-item>
              <text:h text:style-name="P216" text:outline-level="2"><text:soft-page-break/><text:alphabetical-index-mark-start text:id="IMark225902392"/>V3_ZANG<text:alphabetical-index-mark-end text:id="IMark225902392"/></text:h>
            </text:list-item>
          </text:list>
        </text:list-item>
      </text:list>
      <text:p text:style-name="P73">Type<text:tab/>Funktion</text:p>
      <text:p text:style-name="P66"><text:span text:style-name="T15">Input</text:span><text:span text:style-name="T14"><text:tab/>A : VECTOR_3 (Vektor mit den Koordinaten X, Y, Z)</text:span></text:p>
      <text:p text:style-name="P183"><draw:frame draw:style-name="fr3" draw:name="Grafik399" text:anchor-type="paragraph" svg:x="1.067cm" svg:y="0.693cm" svg:width="3.69cm" svg:height="0.99cm" draw:z-index="374"><draw:image xlink:href="Pictures/10000000000001170000004B57C492F9.png" xlink:type="simple" xlink:show="embed" xlink:actuate="onLoad"/></draw:frame>Output<text:tab/>REAL (Winkel zur Z-Achse)</text:p>
      <text:p text:style-name="P183"><text:line-break/>V3_ZANG berechnet den Winkel zwischen Der Z-Achse des Koordinatensystems und einem dreidimensionalen Vektor A in Bogenmaß</text:p>
      <text:p text:style-name="P183">V3_ZANG(1,2,3) = 0.640..</text:p>
      <text:list xml:id="list38470083" text:continue-numbering="true" text:style-name="L1">
        <text:list-item>
          <text:h text:style-name="P210" text:outline-level="1"><text:span text:style-name="T2">Time</text:span> &amp; <text:span text:style-name="T2">Date</text:span></text:h>
          <text:list>
            <text:list-item>
              <text:h text:style-name="P216" text:outline-level="2"><text:alphabetical-index-mark-start text:id="IMark225902392"/>CALENDAR_CALC<text:alphabetical-index-mark-end text:id="IMark225902392"/></text:h>
            </text:list-item>
          </text:list>
        </text:list-item>
      </text:list>
      <text:p text:style-name="P69">Type<text:tab/>Funktionsbaustein</text:p>
      <text:p text:style-name="P66"><draw:frame draw:style-name="fr3" draw:name="Grafik28" text:anchor-type="paragraph" svg:x="0.979cm" svg:y="0.667cm" svg:width="3.29cm" svg:height="1.12cm" draw:z-index="724"><draw:image xlink:href="Pictures/10000000000000F900000055CA579326.png" xlink:type="simple" xlink:show="embed" xlink:actuate="onLoad"/></draw:frame><text:span text:style-name="T15">IN_OUT</text:span><text:span text:style-name="T14"><text:tab/>XCAL : CALENDAR (externe Variable)</text:span></text:p>
      <text:p text:style-name="P173"><text:span text:style-name="T14"><text:line-break/>CALENDAR_CALC berechnet vollautomatisch alle Werte in einer Struktur vom Typ CALENDAR ausgehend vom Wert UTC in der Struktur. XCAL ist ein </text:span><text:span text:style-name="T15">Pointer</text:span><text:span text:style-name="T14"> auf eine externe oder globale Variable vom Typ CALENDAR. CALENDAR_CALC kann so über die Struktur XCAL im gesamten Programm Kalenderwerte zur Verfügung stellen. <text:s/>CALENDAR_CALC ermittelt bei jeder Veränderung des Wertes .UTC in XCAL automatisch alle anderen Werte in der Struktur. Alleine der Wert XCAL in der Struktur muss von einem RTC Baustein gespeist werden. Die Definition des strukturierten Typs CALENDAR finden Sie in Kapitel Datenstrukturen.</text:span></text:p>
      <text:p text:style-name="P179"><draw:frame draw:style-name="fr3" draw:name="Grafik29" text:anchor-type="paragraph" svg:x="1.111cm" svg:y="3.288cm" svg:width="12.513cm" svg:height="4.974cm" draw:z-index="725"><draw:image xlink:href="Pictures/10000000000001D9000000BC793664E2.png" xlink:type="simple" xlink:show="embed" xlink:actuate="onLoad"/></draw:frame>Das folgende Beispiel zeigt wie der Baustein SYSRTCGETTIME die RTC der CPU ausliest und die aktuelle Zeit in SYSTEMCAL.UTC schreibt. CALENDAR_CALC prüft bei jedem Zyklus ob sich der Wert in .UTC verändert hat und wenn ja ermittelt es die anderen Werte der Struktur automatisch. Der Ausgang WDAY zeigt wie man aus der Struktur Daten zur Weiterverarbeitung ausliest.</text:p>
      <text:p text:style-name="P179"><text:s/></text:p>
      <text:list xml:id="list38452734" text:continue-numbering="true" text:style-name="L1">
        <text:list-item>
          <text:list>
            <text:list-item>
              <text:h text:style-name="P216" text:outline-level="2"><text:soft-page-break/><text:alphabetical-index-mark-start text:id="IMark225902392"/>DATE_ADD<text:alphabetical-index-mark-end text:id="IMark225902392"/></text:h>
            </text:list-item>
          </text:list>
        </text:list-item>
      </text:list>
      <text:p text:style-name="P69">Type<text:tab/>Funktion</text:p>
      <text:p text:style-name="P66"><text:span text:style-name="T15">Input</text:span><text:span text:style-name="T14"><text:tab/>IDATE : DATE (Eingangsdatum)</text:span></text:p>
      <text:p text:style-name="P69"><text:tab/>D : INT (zu addierende Tage)</text:p>
      <text:p text:style-name="P69"><text:tab/>W : INT (zu addierende Wochen)</text:p>
      <text:p text:style-name="P69"><text:tab/>M : INT (zu addierende Monate)</text:p>
      <text:p text:style-name="P69"><text:tab/>Y : INT (zu addierende Jahre)</text:p>
      <text:p text:style-name="P69"><draw:frame draw:style-name="fr3" draw:name="Grafik14" text:anchor-type="paragraph" svg:x="1.007cm" svg:y="0.674cm" svg:width="3.62cm" svg:height="2.919cm" draw:z-index="10"><draw:image xlink:href="Pictures/1000000000000112000000DD8322226C.png" xlink:type="simple" xlink:show="embed" xlink:actuate="onLoad"/></draw:frame>Output<text:tab/>DATE (Ergebnisdatum)</text:p>
      <text:p text:style-name="P66"><text:span text:style-name="T14"><text:line-break/>Die Funktion DATE</text:span><text:span text:style-name="T23">_ADD addiert Tage, Wochen, Monate, und Jahre zu einem Datum hinzu. Es werden erst die angegebenen Tage und Wochen addiert, dann die Monate und zuletzt die Jahre.</text:span></text:p>
      <text:p text:style-name="P71">Die Eingangswerte können sowohl positiv, wie auch negativ sein. Es kann also auch von einem Datum subtrahiert werden.</text:p>
      <text:p text:style-name="P180">Vor allem bei negativen Eingangswerten ist zu beachten das das Datum beim addieren von negativen Werten wie zum Beispiel -3000 Tage nicht unter den 1.1.1970 läuft, dies würde einen Überlauf des Datentyps DATE zur folge haben und undefinierte Werte ergeben. <text:s/></text:p>
      <text:p text:style-name="P71">Beispiel:<text:tab/>DATE_ADD(1.1.2007,3,1,-1,-2) = 11.12.2005</text:p>
      <text:p text:style-name="P71"><text:tab/>addiert 3 Tage und 1 Woche hinzu und zieht dann 1 Monat und 2 <text:tab/>Jahre ab.</text:p>
      <text:list xml:id="list38463858" text:continue-numbering="true" text:style-name="L1">
        <text:list-item>
          <text:list>
            <text:list-item>
              <text:h text:style-name="P216" text:outline-level="2"><text:alphabetical-index-mark-start text:id="IMark225902392"/>DAY_OF_DATE<text:alphabetical-index-mark-end text:id="IMark225902392"/></text:h>
            </text:list-item>
          </text:list>
        </text:list-item>
      </text:list>
      <text:p text:style-name="P69">Type<text:tab/>Funktion : DINT</text:p>
      <text:p text:style-name="P66"><text:span text:style-name="T15">Input</text:span><text:span text:style-name="T14"><text:tab/>IDATE : DATE (Eingangsdatum)</text:span></text:p>
      <text:p text:style-name="P71"><draw:frame draw:style-name="fr3" draw:name="Grafik320" text:anchor-type="paragraph" svg:x="0.984cm" svg:y="0.676cm" svg:width="4.881cm" svg:height="0.99cm" draw:z-index="280"><draw:image xlink:href="Pictures/10000000000001710000004BF7E90938.png" xlink:type="simple" xlink:show="embed" xlink:actuate="onLoad"/></draw:frame>Output<text:tab/>DINT (Tag im Monat des Eingangsdatums)</text:p>
      <text:p text:style-name="P66"><text:soft-page-break/><text:span text:style-name="T23"><text:line-break/>Die Funktion DAY_OF_DATE berechnet den Tag seit dem 1.1.1970. Das Ergebnis der Funktion ist vom Typ DINT weil der gesamte DATE </text:span>Range<text:span text:style-name="T23"> 49710 Tage umfasst.</text:span></text:p>
      <text:list xml:id="list38448404" text:continue-numbering="true" text:style-name="L1">
        <text:list-item>
          <text:list>
            <text:list-item>
              <text:h text:style-name="P216" text:outline-level="2"><text:alphabetical-index-mark-start text:id="IMark225902392"/>DAY_OF_MONTH<text:alphabetical-index-mark-end text:id="IMark225902392"/></text:h>
            </text:list-item>
          </text:list>
        </text:list-item>
      </text:list>
      <text:p text:style-name="P69">Type<text:tab/>Funktion : INT</text:p>
      <text:p text:style-name="P66"><text:span text:style-name="T15">Input</text:span><text:span text:style-name="T14"><text:tab/>IDATE : DATE (Eingangsdatum)</text:span></text:p>
      <text:p text:style-name="P71"><draw:frame draw:style-name="fr3" draw:name="Grafik15" text:anchor-type="paragraph" svg:x="1.069cm" svg:y="0.626cm" svg:width="5.42cm" svg:height="1.12cm" draw:z-index="11"><draw:image xlink:href="Pictures/100000000000019A00000055C59DB1D3.png" xlink:type="simple" xlink:show="embed" xlink:actuate="onLoad"/></draw:frame>Output<text:tab/>INT (Tag im Monat des Eingangsdatums)</text:p>
      <text:p text:style-name="P71"><text:line-break/>Die Funktion DAY_OF_MONTH berechnet den Tag des Monats aus dem Eingangsdatum IDATE.</text:p>
      <text:list xml:id="list38444713" text:continue-numbering="true" text:style-name="L1">
        <text:list-item>
          <text:list>
            <text:list-item>
              <text:h text:style-name="P216" text:outline-level="2"><text:alphabetical-index-mark-start text:id="IMark225902392"/>DAY_OF_WEEK<text:alphabetical-index-mark-end text:id="IMark225902392"/></text:h>
            </text:list-item>
          </text:list>
        </text:list-item>
      </text:list>
      <text:p text:style-name="P69">Type<text:tab/>Funktion : INT</text:p>
      <text:p text:style-name="P173"><text:span text:style-name="T15">Input</text:span><text:span text:style-name="T14"><text:tab/>IDATE : DATE (Eingangsdatum)</text:span></text:p>
      <text:p text:style-name="P71"><draw:frame draw:style-name="fr3" draw:name="Grafik40" text:anchor-type="paragraph" svg:x="1.046cm" svg:y="0.718cm" svg:width="4.881cm" svg:height="0.99cm" draw:z-index="693"><draw:image xlink:href="Pictures/10000000000001710000004BDAF08181.png" xlink:type="simple" xlink:show="embed" xlink:actuate="onLoad"/></draw:frame>Output<text:tab/>INT (Monat im Jahr des Eingangsdatums)</text:p>
      <text:p text:style-name="P180"><text:line-break/>Die Funktion DAY_OF_WEEK berechnet den Wochentag aus dem Eingangsdatum IDATE.</text:p>
      <text:p text:style-name="P71">Montag = 1... Sonntag = 7. Die Berechnung erfolgt gemäß ISO8601.</text:p>
      <text:p text:style-name="P180">Beispiel:<text:tab/>DAY_OF_WEEK(D#2007-1-8) = 1</text:p>
      <text:list xml:id="list38447678" text:continue-numbering="true" text:style-name="L1">
        <text:list-item>
          <text:list>
            <text:list-item>
              <text:h text:style-name="P216" text:outline-level="2"><text:soft-page-break/><text:alphabetical-index-mark-start text:id="IMark225902392"/>DAY_OF_YEAR<text:alphabetical-index-mark-end text:id="IMark225902392"/></text:h>
            </text:list-item>
          </text:list>
        </text:list-item>
      </text:list>
      <text:p text:style-name="P69">Type<text:tab/>Funktion : INT</text:p>
      <text:p text:style-name="P66"><text:span text:style-name="T15">Input</text:span><text:span text:style-name="T14"><text:tab/>IDATE : DATE (Eingangsdatum)</text:span></text:p>
      <text:p text:style-name="P71"><draw:frame draw:style-name="fr3" draw:name="Grafik16" text:anchor-type="paragraph" svg:x="1.064cm" svg:y="0.642cm" svg:width="4.521cm" svg:height="1.12cm" draw:z-index="12"><draw:image xlink:href="Pictures/1000000000000156000000551D100965.png" xlink:type="simple" xlink:show="embed" xlink:actuate="onLoad"/></draw:frame>Output<text:tab/>INT (Tag im Jahr des Eingangsdatums)</text:p>
      <text:p text:style-name="P71"><text:line-break/>Die Funktion DAY_OF_YEAR berechnet den Tag des Jahres aus dem Eingangsdatum IDATE. Schaltjahre werden entsprechend dem gregorianischen Kalender berücksichtigt. Die Funktion ist definiert für die Jahre 1970 – 2099.</text:p>
      <text:p text:style-name="P71">Beispiel:<text:tab/>DAY_OF_YEAR(31.12.2007) = 365</text:p>
      <text:p text:style-name="P71"><text:tab/>DAY_OF_YEAR(31.12.2008) = 366</text:p>
      <text:list xml:id="list38463118" text:continue-numbering="true" text:style-name="L1">
        <text:list-item>
          <text:list>
            <text:list-item>
              <text:h text:style-name="P216" text:outline-level="2"><text:alphabetical-index-mark-start text:id="IMark225902392"/>DAY_TO_TIME<text:alphabetical-index-mark-end text:id="IMark225902392"/></text:h>
            </text:list-item>
          </text:list>
        </text:list-item>
      </text:list>
      <text:p text:style-name="P66"><text:span text:style-name="T14">Type<text:tab/>Funktion : </text:span><text:span text:style-name="T15">TIME</text:span></text:p>
      <text:p text:style-name="P66"><text:span text:style-name="T15">Input</text:span><text:span text:style-name="T14"><text:tab/></text:span><text:span text:style-name="T15">Input</text:span><text:span text:style-name="T14"> : REAL (Anzahl Tage mit Nachkommastellen)</text:span></text:p>
      <text:p text:style-name="P66"><draw:frame draw:style-name="fr3" draw:name="Grafik17" text:anchor-type="paragraph" svg:x="1.094cm" svg:y="0.63cm" svg:width="4.521cm" svg:height="1.12cm" draw:z-index="13"><draw:image xlink:href="Pictures/1000000000000156000000554BC81FE9.png" xlink:type="simple" xlink:show="embed" xlink:actuate="onLoad"/></draw:frame><text:span text:style-name="T23">Output<text:tab/></text:span>TIME<text:span text:style-name="T23"> (</text:span>TIME<text:span text:style-name="T23">)</text:span></text:p>
      <text:p text:style-name="P71"><text:line-break/>Die Funktion DAY_TO_TIME berechnet einen Zeitwert (TIME) aus dem Eingangswert in Tagen als REAL.</text:p>
      <text:p text:style-name="P71">Beispiel:<text:tab/>DAY_TO_TIME(1.1) = T#26h24m</text:p>
      <text:p text:style-name="P180"/>
      <text:p text:style-name="P180"/>
      <text:p text:style-name="P180"/>
      <text:list xml:id="list38458799" text:continue-numbering="true" text:style-name="L1">
        <text:list-item>
          <text:list>
            <text:list-item>
              <text:h text:style-name="P216" text:outline-level="2"><text:soft-page-break/><text:alphabetical-index-mark-start text:id="IMark225902392"/>DAYS_DELTA<text:alphabetical-index-mark-end text:id="IMark225902392"/></text:h>
            </text:list-item>
          </text:list>
        </text:list-item>
      </text:list>
      <text:p text:style-name="P69">Type<text:tab/>Funktion : DINT</text:p>
      <text:p text:style-name="P66"><text:span text:style-name="T15">Input</text:span><text:span text:style-name="T14"><text:tab/>DATE_1 : DATE (Datum1)</text:span></text:p>
      <text:p text:style-name="P69"><text:tab/>DATE_2 : DATE (Datum2)</text:p>
      <text:p text:style-name="P71"><draw:frame draw:style-name="fr3" draw:name="Grafik18" text:anchor-type="paragraph" svg:x="1.053cm" svg:y="0.644cm" svg:width="4.069cm" svg:height="1.57cm" draw:z-index="14"><draw:image xlink:href="Pictures/100000000000013400000077A905C2D3.png" xlink:type="simple" xlink:show="embed" xlink:actuate="onLoad"/></draw:frame>Output<text:tab/>DINT (Differenz der beiden Eingangsdatums in Tagen)</text:p>
      <text:p text:style-name="P71"><text:line-break/>Die Funktion DAYS_DELTA berechnet die Differenz zweier Daten in Tagen.</text:p>
      <text:p text:style-name="P71">Beispiel:<text:tab/>DAYS_DELTA(10.1.2007, 1.1.2007) = -9</text:p>
      <text:p text:style-name="P71"><text:tab/>DAYS_DELTA(1.1.2007, 10.1.2007) = 9</text:p>
      <text:p text:style-name="P66"><text:span text:style-name="T23">Das Ergebnis der Funktion ist vom Typ DINT weil der gesamte DATE </text:span>Range<text:span text:style-name="T23"> 49710 Tage umfasst.</text:span></text:p>
      <text:list xml:id="list38443415" text:continue-numbering="true" text:style-name="L1">
        <text:list-item>
          <text:list>
            <text:list-item>
              <text:h text:style-name="P216" text:outline-level="2"><text:alphabetical-index-mark-start text:id="IMark225902392"/>DCF77<text:alphabetical-index-mark-end text:id="IMark225902392"/></text:h>
            </text:list-item>
          </text:list>
        </text:list-item>
      </text:list>
      <text:p text:style-name="P69">Type<text:tab/>Funktionsbaustein</text:p>
      <text:p text:style-name="P66"><text:span text:style-name="T15">Input</text:span><text:span text:style-name="T14"><text:tab/>REC : BOOL (Eingang für den DCF77 Empfänger)</text:span></text:p>
      <text:p text:style-name="P179"><text:tab/>SET : BOOL (Asynchroner SET Eingang)</text:p>
      <text:p text:style-name="P179"><text:tab/>SDT : DT (Anfangswert für RTC)</text:p>
      <text:p text:style-name="P179"><text:tab/>DSI : BOOL (Sommerzeit Eingang)</text:p>
      <text:p text:style-name="P71">Output<text:tab/>TP : BOOL (Puls zum Setzen von nachgeschalteten Uhren)</text:p>
      <text:p text:style-name="P71"><text:tab/>DS : BOOL (TRUE, wenn Sommerzeit herrscht)</text:p>
      <text:p text:style-name="P66"><text:span text:style-name="T23"><text:tab/></text:span>WDAY<text:span text:style-name="T23"> : INT (Wochentag)</text:span></text:p>
      <text:p text:style-name="P71"><text:tab/>ERROR : BOOL (TRUE, wenn REC kein Signal liefert)</text:p>
      <text:p text:style-name="P71"><text:tab/>RTC : DT (Synchronisierte Weltzeit UTC)</text:p>
      <text:p text:style-name="P71"><text:tab/>RTC1 : DT (Synchronisierte Lokalzeit)</text:p>
      <text:p text:style-name="P71"><text:tab/>MSEC : INT (Millisekunden von RTC und RTC1)</text:p>
      <text:p text:style-name="P71"><text:tab/>SYNC : BOOL (TRUE, wenn RTC mit DCF synchron ist)</text:p>
      <text:p text:style-name="P66"><text:span text:style-name="T23">Config<text:tab/>SYNC_TIMEOUT : TIME (</text:span>Default<text:span text:style-name="T23"> = T#2m)</text:span></text:p>
      <text:p text:style-name="P66"><text:span text:style-name="T23"><text:tab/>TIME_OFFSET : INT (Zeit Offset für RTC1, </text:span>Default<text:span text:style-name="T23"> = 1 Stunde)</text:span></text:p>
      <text:p text:style-name="P66"><draw:frame draw:style-name="fr3" draw:name="Grafik19" text:anchor-type="paragraph" svg:x="0.981cm" svg:y="0.646cm" svg:width="3.62cm" svg:height="4.44cm" draw:z-index="535"><draw:image xlink:href="Pictures/1000000000000112000001500A7AB421.png" xlink:type="simple" xlink:show="embed" xlink:actuate="onLoad"/></draw:frame><text:soft-page-break/><text:span text:style-name="T23"><text:tab/>DST_EN : BOOL (Sommerzeit für RTC1, </text:span>Default<text:span text:style-name="T23"> = TRUE)</text:span></text:p>
      <text:p text:style-name="P66"><text:span text:style-name="T23"><text:line-break/>Die Funktion DCF77 dekodiert das Serielle Signal eines DCF77 Empfängers und steuert 2 interne Uhren RTC und RTC1, oder über den Ausgang TP auch externe (nachgeschaltete) Uhren. Ein Ausgang DS wird TRUE, wenn Sommerzeit herrscht. Der Ausgang WDAY gibt den Wochentag an (1 = Montag). Der Ausgang ERROR wird TRUE, wenn kein gültiges Signal Empfangen wird. Die Internen Uhren laufen aber trotzdem weiter, wenn Sie bereits synchronisiert sind. Ein <text:s/>weiterer Ausgang SYNC zeigt an dass die internen Uhren mit DCF77 synchronisiert sind und wird FALSE, wenn sie länger als durch die Setup-Variable SYNC_TIMEOUT festgelegte Zeit nicht mehr synchronisiert wurden. Die internen Uhren laufen in jedem Fall mit der Genauigkeit des SPS-</text:span>Timers<text:span text:style-name="T23"> weiter. Durch einen Doppelklick auf das Symbol im CFC Editor können weitere Setup-Variablem definiert werden. Hierbei legt SYNC_TIMEOUT fest, nach welcher Zeit das Ausgangssignal SYNC, FALSE wird, wenn die internen Uhren RTC und RTC1 nicht mehr durch DCF77 synchronisiert wurden. Die Variable TIME_OFFSET legt die Zeitdifferenz der Lokalzeit (RTC1) von der UTC fest. </text:span>Default<text:span text:style-name="T23"> ist 1 Stunde für MEZ (Mitteleuropäische Zeit). Die Variable TIME_OFFSET ist vom Typ INTEGER damit auch Zeitzonen mit negativem Offset (Westlich von Greenwich) möglich sind.</text:span></text:p>
      <text:p text:style-name="P180">Durch DST_EN wird festgelegt, ob RTC1 automatisch auf Sommerzeit schalten soll oder nicht. Der Ausgang MSEC erweitert die auf RTC und RTC1 zur Verfügung gestellte Zeit um Millisekunden. Der Eingang SDT dient dazu die internen Uhren RTC und RTC1 auf einen definierten Anfangswert zu setzen damit sofort nach den Start eine gültige Uhrzeit zur Verfügung steht. Während des ersten Zyklus wird Datum und Zeit von SDT nach RTC kopiert, und läuft ab dem ersten Zyklus. Falls nötig kann mit den asynchronen Setz Eingang SET die interne UHR jederzeit neu gestellt werden. Sie wird aber nach einem Zyklus wieder von einem Gültigen DCF77 Signal überschrieben, ausser der Eingang SET bleibt auf TRUE. Sobald ein gültiges DCF77 Signal dekodiert wurde wird RTC und RTC1 auf die entsprechende genauere DCF77 Zeit synchronisiert. Am Eingang SDT kann zum Beispiel die Uhrzeit aus der in der SPS enthaltenen Hardware Uhr verwendet werden, es muss aber sichergestellt werden das DCF77 erst dann aufgerufen wird wenn bereits eine gültige Uhrzeit an SDT anliegt, den DCF77 liest diesen Wert nur ein einziges mal im ersten Zyklus ein, oder immer dann wenn der Eingang SET auf TRUE steht.</text:p>
      <text:list xml:id="list38462148" text:continue-numbering="true" text:style-name="L1">
        <text:list-item>
          <text:list>
            <text:list-item>
              <text:h text:style-name="P216" text:outline-level="2"><text:soft-page-break/><text:alphabetical-index-mark-start text:id="IMark225902392"/>DST<text:alphabetical-index-mark-end text:id="IMark225902392"/></text:h>
            </text:list-item>
          </text:list>
        </text:list-item>
      </text:list>
      <text:p text:style-name="P69">Type<text:tab/>Funktion : BOOL</text:p>
      <text:p text:style-name="P66"><text:span text:style-name="T15">Input</text:span><text:span text:style-name="T14"><text:tab/>UTC : DATE_TIME (Weltzeit)</text:span></text:p>
      <text:p text:style-name="P69"><text:tab/>TIME_Zone_Offset : TIME (Differenz zur Weltzeit (UTC)</text:p>
      <text:p text:style-name="P71"><draw:frame draw:style-name="fr3" draw:name="Grafik20" text:anchor-type="paragraph" svg:x="1.046cm" svg:y="0.683cm" svg:width="2.281cm" svg:height="0.99cm" draw:z-index="339"><draw:image xlink:href="Pictures/10000000000000AC0000004BD8BA5DD3.png" xlink:type="simple" xlink:show="embed" xlink:actuate="onLoad"/></draw:frame>Output<text:tab/>BOOL (TRUE, wenn Sommerzeit)</text:p>
      <text:p text:style-name="P71"><text:line-break/>Die Funktion DST überprüft, ob im Augenblick Sommerzeit herrscht, oder nicht. Sie kann dazu benutzt werden eine vorhandene nicht-Sommerzeit fähige Uhr sekundengenau auf Sommer- und Winterzeit umzustellen.</text:p>
      <text:p text:style-name="P180">Die Funktion DST schaltet am letzten Sonntag des März um 01:00 UTC (02:00 MEZ) auf Sommerzeit (03:00 MESZ) und am letzten Sonntag des Oktober um 01:00 UTC (03:00 MESZ) auf 02:00 MEZ zurück. Der Ausgang von DST ist dann TRUE, wenn Sommerzeit herrscht.</text:p>
      <text:p text:style-name="P180">Die Sommerzeit wird aufgrund von UTC (Weltzeit) berechnet. Eine Berechnung von Ortszeit nach Sommerzeit ist generell nicht möglich weil im letzten Sonntag des Oktobers die Stunde von 02:00 - 03:00 MEZ beziehungsweise MESZ doppelt existiert. Die Sommerzeit wird in allen Ländern der EU seit 1992 zur selben Sekunde nach Weltzeit umgestellt. In Mitteleuropa um 02:00, in England um 01:00 und in Griechenland um 04:00. Durch die Berechnung mithilfe der Weltzeit wird die Sommerzeit für alle Europäischen Zeitzonen richtig berechnet.</text:p>
      <text:p text:style-name="P180"/>
      <text:p text:style-name="P180"/>
      <text:p text:style-name="P180"/>
      <text:p text:style-name="P180"/>
      <text:list xml:id="list38449063" text:continue-numbering="true" text:style-name="L1">
        <text:list-item>
          <text:list>
            <text:list-item>
              <text:h text:style-name="P216" text:outline-level="2"><text:alphabetical-index-mark-start text:id="IMark225902392"/>DT2_TO_SDT<text:alphabetical-index-mark-end text:id="IMark225902392"/></text:h>
            </text:list-item>
          </text:list>
        </text:list-item>
      </text:list>
      <text:p text:style-name="P69">Type<text:tab/>Funktion : SDT</text:p>
      <text:p text:style-name="P66"><text:span text:style-name="T15">Input</text:span><text:span text:style-name="T14"><text:tab/>DI : DATE (Datum)</text:span></text:p>
      <text:p text:style-name="P179"><text:tab/>TI : TOD (Tageszeit)</text:p>
      <text:p text:style-name="P71"><draw:frame draw:style-name="fr3" draw:name="Grafik702" text:anchor-type="paragraph" svg:x="1.067cm" svg:y="0.688cm" svg:width="4.48cm" svg:height="1.39cm" draw:z-index="704"><draw:image xlink:href="Pictures/100000000000015300000069B5E08A38.png" xlink:type="simple" xlink:show="embed" xlink:actuate="onLoad"/></draw:frame>Output<text:tab/>SDT (Strukturierter Datums Zeit Wert vom Typ SDT)</text:p>
      <text:p text:style-name="P180"><text:soft-page-break/><text:line-break/>DT2_TO_SDT wandelt ein Datum und eine Tageszeit um in eine strukturierte Datum Tageszeit vom Typ SDT.</text:p>
      <text:list xml:id="list38460430" text:continue-numbering="true" text:style-name="L1">
        <text:list-item>
          <text:list>
            <text:list-item>
              <text:h text:style-name="P216" text:outline-level="2"><text:alphabetical-index-mark-start text:id="IMark225902392"/>DT_TO_SDT<text:alphabetical-index-mark-end text:id="IMark225902392"/></text:h>
            </text:list-item>
          </text:list>
        </text:list-item>
      </text:list>
      <text:p text:style-name="P69">Type<text:tab/>Funktion : SDT</text:p>
      <text:p text:style-name="P66"><text:span text:style-name="T15">Input</text:span><text:span text:style-name="T14"><text:tab/>DTI : DT (Datum Zeit Wert)</text:span></text:p>
      <text:p text:style-name="P71"><draw:frame draw:style-name="fr3" draw:name="Grafik703" text:anchor-type="paragraph" svg:x="1.046cm" svg:y="0.667cm" svg:width="4.09cm" svg:height="0.99cm" draw:z-index="705"><draw:image xlink:href="Pictures/10000000000001350000004BC20211A6.png" xlink:type="simple" xlink:show="embed" xlink:actuate="onLoad"/></draw:frame>Output<text:tab/>SDT (Strukturierter Datums Zeit Wert vom Typ SDT)</text:p>
      <text:p text:style-name="P71"><text:line-break/>DT_TO_SDT wandelt ein Datum Zeitwert um in eine strukturierte Datum Tageszeit vom Typ SDT.</text:p>
      <text:list xml:id="list38451759" text:continue-numbering="true" text:style-name="L1">
        <text:list-item>
          <text:list>
            <text:list-item>
              <text:h text:style-name="P216" text:outline-level="2"><text:alphabetical-index-mark-start text:id="IMark225902392"/>EASTER<text:alphabetical-index-mark-end text:id="IMark225902392"/></text:h>
            </text:list-item>
          </text:list>
        </text:list-item>
      </text:list>
      <text:p text:style-name="P69">Type<text:tab/>Funktion : DATE</text:p>
      <text:p text:style-name="P66"><text:span text:style-name="T15">Input</text:span><text:span text:style-name="T14"><text:tab/>YEAR : INT (Jahr)</text:span></text:p>
      <text:p text:style-name="P71"><draw:frame draw:style-name="fr3" draw:name="Grafik21" text:anchor-type="paragraph" svg:x="1.09cm" svg:y="0.623cm" svg:width="2.731cm" svg:height="1.12cm" draw:z-index="15"><draw:image xlink:href="Pictures/10000000000000CE0000005555310D79.png" xlink:type="simple" xlink:show="embed" xlink:actuate="onLoad"/></draw:frame>Output<text:tab/>DATE (Datum des Ostersonntag für das angegebene Jahr)</text:p>
      <text:p text:style-name="P71"><text:line-break/>Die Funktion EASTER berechnet für ein gegebenes Jahr das Datum des Ostersonntags. Die meisten kirchlichen Feiertage haben einen festen Abstand von Ostern, sodass für den Fall, dass Ostern für ein Jahr bekannt ist, diese Feiertage auch einfach ermittelt werden können. EASTER wird auch im Modul HOLIDAY verwendet um Feiertage zu berechnen.</text:p>
      <text:list xml:id="list38461825" text:continue-numbering="true" text:style-name="L1">
        <text:list-item>
          <text:list>
            <text:list-item>
              <text:h text:style-name="P216" text:outline-level="2"><text:soft-page-break/><text:alphabetical-index-mark-start text:id="IMark225902392"/>HOLIDAY<text:alphabetical-index-mark-end text:id="IMark225902392"/></text:h>
            </text:list-item>
          </text:list>
        </text:list-item>
      </text:list>
      <text:p text:style-name="P69">Type<text:tab/>Funktionsbaustein</text:p>
      <text:p text:style-name="P66"><text:span text:style-name="T15">Input</text:span><text:span text:style-name="T14"><text:tab/>DATE_IN : DATE (Eingangsdatum)</text:span></text:p>
      <text:p text:style-name="P179"><text:tab/>COUNTRY : INT (gewünschtes Land)</text:p>
      <text:p text:style-name="P179"><text:tab/>FRIDAY : BOOL (Y wird TRUE an Freitagen wenn TRUE)</text:p>
      <text:p text:style-name="P179"><text:tab/>SATURDAY : BOOL (Y wird TRUE an Samstagen wenn TRUE)</text:p>
      <text:p text:style-name="P179"><text:tab/>SUNDAY : BOOL (Y wird TRUE an Sonntagen wenn TRUE)</text:p>
      <text:p text:style-name="P71">Output<text:tab/>Y : BOOL (TRUE, wenn DATE_IN ein Feiertag ist)</text:p>
      <text:p text:style-name="P71"><draw:frame draw:style-name="fr3" draw:name="Grafik22" text:anchor-type="paragraph" svg:x="1.023cm" svg:y="0.688cm" svg:width="3.69cm" svg:height="2.709cm" draw:z-index="685"><draw:image xlink:href="Pictures/1000000000000117000000CD9AB8CE87.png" xlink:type="simple" xlink:show="embed" xlink:actuate="onLoad"/></draw:frame><text:tab/>Name : STRING(30) (Name des heutigen Feiertags)</text:p>
      <text:p text:style-name="P71"><text:line-break/>Die Funktion HOLIDAY zeigt am Ausgang Y mit TRUE Feiertage an und liefert auch den Namen des aktuellen Feiertags am Ausgang NAME. HOLIDAY kann zusätzlich zu Feiergagen auch an den Wochentagen Freitag, Samstag oder Sonntag aktiv werden und am Ausgang Y TRUE liefern, abhängig davon ob die Eingänge FRIDAY, SATURDAY oder SUNDAY auf TRUE gesetzt sind. Im Globalen Setup werden Name und Datum von Feiertagen definiert und sind auch dort für andere Länder universell anpassbar. Feiertage können als festes Datum, mit einem Abstand von Ostern oder Wochentag vor einem festen Datum definiert werden. Der Eingang COUNTRY wählt die dem Land entsprechende Tabelle aus den Setup Daten aus. Die Feiertage sind unter Globale Konstanten im Abschnitt "LOCATION SETUP" vordefinert und können dort erweitert oder angepasst werden.</text:p>
      <text:list xml:id="list38446180" text:continue-numbering="true" text:style-name="L1">
        <text:list-item>
          <text:list>
            <text:list-item>
              <text:h text:style-name="P216" text:outline-level="2"><text:alphabetical-index-mark-start text:id="IMark225902392"/>HOUR<text:alphabetical-index-mark-end text:id="IMark225902392"/></text:h>
            </text:list-item>
          </text:list>
        </text:list-item>
      </text:list>
      <text:p text:style-name="P69">Type<text:tab/>Funktion : INT</text:p>
      <text:p text:style-name="P66"><text:span text:style-name="T15">Input</text:span><text:span text:style-name="T14"><text:tab/>ITOD : TIMEOFDAY (Tageszeit)</text:span></text:p>
      <text:p text:style-name="P71"><draw:frame draw:style-name="fr3" draw:name="Grafik23" text:anchor-type="paragraph" svg:x="1.037cm" svg:y="0.693cm" svg:width="2.281cm" svg:height="1.12cm" draw:z-index="16"><draw:image xlink:href="Pictures/10000000000000AC00000055919540D9.png" xlink:type="simple" xlink:show="embed" xlink:actuate="onLoad"/></draw:frame>Output<text:tab/>INT (aktuelle Stunde)</text:p>
      <text:p text:style-name="P71"><text:soft-page-break/><text:line-break/>Die Funktion HOUR extrahiert die aktuelle Stunde aus der Tageszeit.</text:p>
      <text:p text:style-name="P71">Beispiel:<text:tab/>HOUR(22:55:13) = 22</text:p>
      <text:list xml:id="list38467696" text:continue-numbering="true" text:style-name="L1">
        <text:list-item>
          <text:list>
            <text:list-item>
              <text:h text:style-name="P216" text:outline-level="2"><text:alphabetical-index-mark-start text:id="IMark225902392"/>HOUR_OF_DT<text:alphabetical-index-mark-end text:id="IMark225902392"/></text:h>
            </text:list-item>
          </text:list>
        </text:list-item>
      </text:list>
      <text:p text:style-name="P69">Type<text:tab/>Funktion : INT</text:p>
      <text:p text:style-name="P66"><text:span text:style-name="T15">Input</text:span><text:span text:style-name="T14"><text:tab/>XDT : DATETIME (Eingangswert)</text:span></text:p>
      <text:p text:style-name="P180"><draw:frame draw:style-name="fr3" draw:name="Grafik608" text:anchor-type="paragraph" svg:x="1.069cm" svg:y="0.688cm" svg:width="4.48cm" svg:height="0.99cm" draw:z-index="604"><draw:image xlink:href="Pictures/10000000000001530000004B0E0700DB.png" xlink:type="simple" xlink:show="embed" xlink:actuate="onLoad"/></draw:frame>Output<text:tab/>INT (aktuelle Stunde)</text:p>
      <text:p text:style-name="P180"><text:line-break/>HOUR_OF_DT extrahiert die momentane Stunde aus einem DT Wert.</text:p>
      <text:p text:style-name="P180">HOUR_OF_DT(DT#2008-6-6-10:22:20) = 10</text:p>
      <text:list xml:id="list38474154" text:continue-numbering="true" text:style-name="L1">
        <text:list-item>
          <text:list>
            <text:list-item>
              <text:h text:style-name="P216" text:outline-level="2"><text:alphabetical-index-mark-start text:id="IMark225902392"/>HOUR_TO_TIME<text:alphabetical-index-mark-end text:id="IMark225902392"/></text:h>
            </text:list-item>
          </text:list>
        </text:list-item>
      </text:list>
      <text:p text:style-name="P69">Type<text:tab/>Funktion : TIME</text:p>
      <text:p text:style-name="P66"><text:span text:style-name="T15">Input</text:span><text:span text:style-name="T14"><text:tab/>INPUT : REAL (Anzahl Stunden mit Nachkommastellen)</text:span></text:p>
      <text:p text:style-name="P71"><draw:frame draw:style-name="fr3" draw:name="Grafik24" text:anchor-type="paragraph" svg:x="1.058cm" svg:y="0.697cm" svg:width="4.971cm" svg:height="1.12cm" draw:z-index="17"><draw:image xlink:href="Pictures/100000000000017800000055BE7D0FD3.png" xlink:type="simple" xlink:show="embed" xlink:actuate="onLoad"/></draw:frame>Output<text:tab/>TIME (TIME)</text:p>
      <text:p text:style-name="P71"><text:line-break/>Die Funktion HOUR_TO_TIME berechnet einen Zeitwert (TIME) aus dem Eingangswert in Stunden als REAL.</text:p>
      <text:p text:style-name="P71">Beispiel:<text:tab/>HOUR_TO_TIME(1.1) = T#1h6m</text:p>
      <text:list xml:id="list38470808" text:continue-numbering="true" text:style-name="L1">
        <text:list-item>
          <text:list>
            <text:list-item>
              <text:h text:style-name="P216" text:outline-level="2"><text:soft-page-break/><text:alphabetical-index-mark-start text:id="IMark225902392"/>HOUR_TO_TOD<text:alphabetical-index-mark-end text:id="IMark225902392"/></text:h>
            </text:list-item>
          </text:list>
        </text:list-item>
      </text:list>
      <text:p text:style-name="P69">Type<text:tab/>Funktion : TIME</text:p>
      <text:p text:style-name="P66"><text:span text:style-name="T15">Input</text:span><text:span text:style-name="T14"><text:tab/>INPUT : REAL (Anzahl Stunden mit Nachkommastellen)</text:span></text:p>
      <text:p text:style-name="P71"><draw:frame draw:style-name="fr3" draw:name="Grafik25" text:anchor-type="paragraph" svg:x="1.062cm" svg:y="0.681cm" svg:width="4.521cm" svg:height="1.12cm" draw:z-index="18"><draw:image xlink:href="Pictures/1000000000000156000000555D155473.png" xlink:type="simple" xlink:show="embed" xlink:actuate="onLoad"/></draw:frame>Output<text:tab/>TIME (Tageszeit)</text:p>
      <text:p text:style-name="P71"><text:line-break/>Die Funktion HOUR_TO_TOD berechnet eine Tageszeit (TIMEOFDAY) aus dem Eingangswert in Stunden als REAL.</text:p>
      <text:p text:style-name="P71">Beispiel:<text:tab/>HOUR_TO_TOD(12.1) = 12:06:00</text:p>
      <text:list xml:id="list38450419" text:continue-numbering="true" text:style-name="L1">
        <text:list-item>
          <text:list>
            <text:list-item>
              <text:h text:style-name="P216" text:outline-level="2"><text:alphabetical-index-mark-start text:id="IMark225902392"/>JD2000<text:alphabetical-index-mark-end text:id="IMark225902392"/></text:h>
            </text:list-item>
          </text:list>
        </text:list-item>
      </text:list>
      <text:p text:style-name="P69">Type<text:tab/>Funktion : REAL</text:p>
      <text:p text:style-name="P66"><text:span text:style-name="T15">Input</text:span><text:span text:style-name="T14"><text:tab/>INPUT : DTI (Gregorianisches Datum)</text:span></text:p>
      <text:p text:style-name="P180"><draw:frame draw:style-name="fr3" draw:name="Grafik665" text:anchor-type="paragraph" svg:x="1.025cm" svg:y="0.667cm" svg:width="3.29cm" svg:height="0.99cm" draw:z-index="656"><draw:image xlink:href="Pictures/10000000000000F90000004B7B3C8EB0.png" xlink:type="simple" xlink:show="embed" xlink:actuate="onLoad"/></draw:frame>Output<text:tab/>REAL (astronomischer julianischer Tag seit dem 1.1.2000 12:00)</text:p>
      <text:p text:style-name="P180"><text:line-break/>JD2000 berechnet das astronomische Julianische Datum seit dem 1. Januar 2000 12:00 (dem Standardäquinoktium).</text:p>
      <text:p text:style-name="P173"><text:span text:style-name="T23">Das Julianische Datum gibt die Zeit in Tagen seit dem 1. Januar 4713 12:00 vor Chr. als Gleitkommazahl an. Der 1. Januar 2000 00:00 entspricht dem Julianischen Datum </text:span><text:span text:style-name="T14">2451544,5. Da ein Datum wie der 1. Januar 2000 bereits die Auflösungsgrenze eines REAL mit ca. 7 Stellen überschreiten würde kann das Julianische Datum nicht sinnvoll mit dem Datentyp REAL dargestellt werden. Die Funktion JD2000 zählt die Julianischen Tage seit dem 1.1.2000 12:00 Mittags und kann so ein aktuelle Datum sinnvoll im Datentyp REAL darstellen.</text:span></text:p>
      <text:list xml:id="list38468263" text:continue-numbering="true" text:style-name="L1">
        <text:list-item>
          <text:list>
            <text:list-item>
              <text:h text:style-name="P216" text:outline-level="2"><text:soft-page-break/><text:alphabetical-index-mark-start text:id="IMark225902392"/>LEAP_DAY<text:alphabetical-index-mark-end text:id="IMark225902392"/></text:h>
            </text:list-item>
          </text:list>
        </text:list-item>
      </text:list>
      <text:p text:style-name="P69">Type<text:tab/>Funktion : BOOL</text:p>
      <text:p text:style-name="P66"><text:span text:style-name="T15">Input</text:span><text:span text:style-name="T14"><text:tab/>IDATE : DATE (Eingangsdatum)</text:span></text:p>
      <text:p text:style-name="P71"><draw:frame draw:style-name="fr3" draw:name="Grafik626" text:anchor-type="paragraph" svg:x="1.067cm" svg:y="0.667cm" svg:width="3.859cm" svg:height="0.99cm" draw:z-index="621"><draw:image xlink:href="Pictures/10000000000001240000004B8EF3C8A3.png" xlink:type="simple" xlink:show="embed" xlink:actuate="onLoad"/></draw:frame>Output<text:tab/>BOOL (TRUE, wenn der aktuelle Tag ein 29. Februar ist)</text:p>
      <text:p text:style-name="P66"><text:span text:style-name="T23"><text:line-break/>Die Funktion LEAP_DAY testet ob das Eingangsdatum ein Schalttag beziehungsweise ein 29. Februar ist. Der Test hat Gültigkeit für den Zeitrum </text:span><text:span text:style-name="T23">1970 - 2099. Im Jahr 2100 wird ein Schaltjahr angezeigt obwohl dies keines ist. Da aber der Wertebereich des Datums nach IEC61131-3 nur bis zum Jahr 2106 reicht wird auf diese Korrektur verzichtet.</text:span></text:p>
      <text:p text:style-name="P180">Beispiel:<text:tab/>LEAP_DAY(D#2004-02-29) = TRUE</text:p>
      <text:list xml:id="list38473652" text:continue-numbering="true" text:style-name="L1">
        <text:list-item>
          <text:list>
            <text:list-item>
              <text:h text:style-name="P216" text:outline-level="2"><text:alphabetical-index-mark-start text:id="IMark225902392"/>LEAP_OF_DATE<text:alphabetical-index-mark-end text:id="IMark225902392"/></text:h>
            </text:list-item>
          </text:list>
        </text:list-item>
      </text:list>
      <text:p text:style-name="P69">Type<text:tab/>Funktion : BOOL</text:p>
      <text:p text:style-name="P66"><text:span text:style-name="T15">Input</text:span><text:span text:style-name="T14"><text:tab/>IDATE : DATE (Eingangsdatum)</text:span></text:p>
      <text:p text:style-name="P71"><draw:frame draw:style-name="fr3" draw:name="Grafik26" text:anchor-type="paragraph" svg:x="1.076cm" svg:y="0.679cm" svg:width="4.971cm" svg:height="1.12cm" draw:z-index="19"><draw:image xlink:href="Pictures/10000000000001780000005586B3E068.png" xlink:type="simple" xlink:show="embed" xlink:actuate="onLoad"/></draw:frame>Output<text:tab/>BOOL (TRUE, wenn IDATE in einem Schaltjahr liegt)</text:p>
      <text:p text:style-name="P71"><text:line-break/>Die Funktion LEAP_OF_DATE testet, ob das Eingangsdatum in einem Schaltjahr liegt. Die Funktion berechnet, ob ein Datum innerhalb eines Schaltjahres liegt und gibt gegebenenfalls TRUE aus. Der Test hat Gültigkeit für den Zeitrum 1970 - 2099. im Jahr 2100 wird ein Schaltjahr angezeigt obwohl dies keines ist. Da aber der Wertebereich des Datums nach IEC61131-3 nur bis zum Jahr 2106 reicht wird auf diese Korrektur verzichtet.</text:p>
      <text:p text:style-name="P180">Beispiel:<text:tab/>LEAP_OF_YEAR(D#2004-01-12) = TRUE</text:p>
      <text:list xml:id="list38445019" text:continue-numbering="true" text:style-name="L1">
        <text:list-item>
          <text:list>
            <text:list-item>
              <text:h text:style-name="P216" text:outline-level="2"><text:soft-page-break/><text:alphabetical-index-mark-start text:id="IMark225902392"/>LEAP_YEAR<text:alphabetical-index-mark-end text:id="IMark225902392"/></text:h>
            </text:list-item>
          </text:list>
        </text:list-item>
      </text:list>
      <text:p text:style-name="P69">Type<text:tab/>Funktion : BOOL</text:p>
      <text:p text:style-name="P66"><text:span text:style-name="T15">Input</text:span><text:span text:style-name="T14"><text:tab/>YR : INT (Jahreszahl)</text:span></text:p>
      <text:p text:style-name="P71"><draw:frame draw:style-name="fr3" draw:name="Grafik27" text:anchor-type="paragraph" svg:x="1.053cm" svg:y="0.626cm" svg:width="4.069cm" svg:height="1.12cm" draw:z-index="20"><draw:image xlink:href="Pictures/100000000000013400000055AE5B01E9.png" xlink:type="simple" xlink:show="embed" xlink:actuate="onLoad"/></draw:frame>Output<text:tab/>BOOL (TRUE, wenn das angegebene Jahr ein Schaltjahr ist)</text:p>
      <text:p text:style-name="P71"><text:line-break/>Die Funktion LEAP_YEAR testet, ob das Eingangsjahr ein Schaltjahr ist und gibt gegebenenfalls TRUE aus. Der Test hat Gültigkeit für den Zeitrum 1970 - 2099. im Jahr 2100 wird ein Schaltjahr angezeigt obwohl dies keines ist. Da aber der Wertebereich des Datums nach IEC61131-3 nur bis zum Jahr 2106 reicht wird auf diese Korrektur verzichtet.</text:p>
      <text:list xml:id="list38452598" text:continue-numbering="true" text:style-name="L1">
        <text:list-item>
          <text:list>
            <text:list-item>
              <text:h text:style-name="P216" text:outline-level="2"><text:alphabetical-index-mark-start text:id="IMark225902392"/>LTIME_TO_UTC<text:alphabetical-index-mark-end text:id="IMark225902392"/></text:h>
            </text:list-item>
          </text:list>
        </text:list-item>
      </text:list>
      <text:p text:style-name="P69">Type<text:tab/>Funktion : DATE_TIME</text:p>
      <text:p text:style-name="P66"><text:span text:style-name="T15">Input</text:span><text:span text:style-name="T14"><text:tab/>LTIME : DATE_TIME (Lokalzeit)</text:span></text:p>
      <text:p text:style-name="P69"><text:tab/>DST : BOOL (TRUE, wenn Sommerzeit herrscht)</text:p>
      <text:p text:style-name="P69"><text:tab/>TIME_ZONE_OFFSET : INT (Zeitdifferenz zur Weltzeit in Minuten)</text:p>
      <text:p text:style-name="P71"><draw:frame draw:style-name="fr3" draw:name="Grafik311" text:anchor-type="paragraph" svg:x="1.125cm" svg:y="0.982cm" svg:width="6.32cm" svg:height="2.02cm" draw:z-index="269"><draw:image xlink:href="Pictures/10000000000001DE00000099D3EB4E1C.png" xlink:type="simple" xlink:show="embed" xlink:actuate="onLoad"/></draw:frame>Output<text:tab/>DATE_TIME (UTC, Weltzeit)</text:p>
      <text:p text:style-name="P183"><text:line-break/>LTIME_TO_UTC errechnet UTC (Weltzeit) von einer vorgegebenen Lokalzeit.<text:line-break/>Die Weltzeit wird errechnet indem TIME_ZONE_OFFSET von der Lokalzeit LTIME subtrahiert wird. Wenn die Sommerzeit aktiv ist (DST = TRUE), wird eine weitere Stunde von LTIME abgezogen. </text:p>
      <text:p text:style-name="P173">Anmerkung: Diese Funktion gilt nur innerhalb des europäischen Kontinents!</text:p>
      <text:p text:style-name="P173">Für andere Regionen gelten unterschiedliche Regeln für die Sommerzeit.</text:p>
      <text:list xml:id="list38471590" text:continue-numbering="true" text:style-name="L1">
        <text:list-item>
          <text:list>
            <text:list-item>
              <text:h text:style-name="P216" text:outline-level="2"><text:soft-page-break/><text:alphabetical-index-mark-start text:id="IMark225902392"/>MINUTE<text:alphabetical-index-mark-end text:id="IMark225902392"/></text:h>
            </text:list-item>
          </text:list>
        </text:list-item>
      </text:list>
      <text:p text:style-name="P69">Type<text:tab/>Funktion : INT</text:p>
      <text:p text:style-name="P66"><text:span text:style-name="T15">Input</text:span><text:span text:style-name="T14"><text:tab/>ITOD : TIMEOFDAY (Tageszeit)</text:span></text:p>
      <text:p text:style-name="P71"><draw:frame draw:style-name="fr3" draw:name="Grafik30" text:anchor-type="paragraph" svg:x="1.058cm" svg:y="0.688cm" svg:width="3.18cm" svg:height="1.12cm" draw:z-index="21"><draw:image xlink:href="Pictures/10000000000000F0000000558127FD0E.png" xlink:type="simple" xlink:show="embed" xlink:actuate="onLoad"/></draw:frame>Output<text:tab/>INT (aktuelle Minute)</text:p>
      <text:p text:style-name="P71"><text:line-break/>Die Funktion MINUTE extrahiert die aktuelle Minute aus der Tageszeit.</text:p>
      <text:p text:style-name="P73">Beispiel:<text:tab/>MINUTE(22:55:13) = 55</text:p>
      <text:list xml:id="list38459775" text:continue-numbering="true" text:style-name="L1">
        <text:list-item>
          <text:list>
            <text:list-item>
              <text:h text:style-name="P216" text:outline-level="2"><text:alphabetical-index-mark-start text:id="IMark225902392"/>MINUTE_OF_DT<text:alphabetical-index-mark-end text:id="IMark225902392"/></text:h>
            </text:list-item>
          </text:list>
        </text:list-item>
      </text:list>
      <text:p text:style-name="P69">Type<text:tab/>Funktion : INT</text:p>
      <text:p text:style-name="P66"><text:span text:style-name="T15">Input</text:span><text:span text:style-name="T14"><text:tab/>XDT : DATETIME (Eingangswert)</text:span></text:p>
      <text:p text:style-name="P180"><draw:frame draw:style-name="fr3" draw:name="Grafik609" text:anchor-type="paragraph" svg:x="1.09cm" svg:y="0.667cm" svg:width="5.279cm" svg:height="0.99cm" draw:z-index="605"><draw:image xlink:href="Pictures/100000000000018F0000004BBB5AA8F7.png" xlink:type="simple" xlink:show="embed" xlink:actuate="onLoad"/></draw:frame>Output<text:tab/>INT (aktuelle Minute)</text:p>
      <text:p text:style-name="P180">MINUTE_OF_DT extrahiert die momentane Minute aus einem DT Wert.</text:p>
      <text:p text:style-name="P183">MINUTE_OF_DT(DT#2008-6-6-10:22:20) = 22</text:p>
      <text:list xml:id="list38455183" text:continue-numbering="true" text:style-name="L1">
        <text:list-item>
          <text:list>
            <text:list-item>
              <text:h text:style-name="P216" text:outline-level="2"><text:alphabetical-index-mark-start text:id="IMark225902392"/>MINUTE_TO_TIME<text:alphabetical-index-mark-end text:id="IMark225902392"/></text:h>
            </text:list-item>
          </text:list>
        </text:list-item>
      </text:list>
      <text:p text:style-name="P69">Type<text:tab/>Funktion : TIME</text:p>
      <text:p text:style-name="P66"><text:span text:style-name="T15">Input</text:span><text:span text:style-name="T14"><text:tab/>ITOD : REAL (Anzahl Minuten mit Nachkommastellen)</text:span></text:p>
      <text:p text:style-name="P71"><draw:frame draw:style-name="fr3" draw:name="Grafik31" text:anchor-type="paragraph" svg:x="1.041cm" svg:y="0.635cm" svg:width="5.42cm" svg:height="1.12cm" draw:z-index="22"><draw:image xlink:href="Pictures/100000000000019A0000005573580FE8.png" xlink:type="simple" xlink:show="embed" xlink:actuate="onLoad"/></draw:frame>Output<text:tab/>TIME (TIME)</text:p>
      <text:p text:style-name="P71">Die Funktion MINUTE_TO_TIME berechnet einen Zeitwert (TIME) aus dem Eingangswert in Minuten als REAL.</text:p>
      <text:p text:style-name="P73">Beispiel:<text:tab/>MINUTE_TO_TIME(122.5) = T#2h2m30s</text:p>
      <text:list xml:id="list38450612" text:continue-numbering="true" text:style-name="L1">
        <text:list-item>
          <text:list>
            <text:list-item>
              <text:h text:style-name="P216" text:outline-level="2"><text:soft-page-break/><text:alphabetical-index-mark-start text:id="IMark225902392"/>MONTH_BEGIN<text:alphabetical-index-mark-end text:id="IMark225902392"/></text:h>
            </text:list-item>
          </text:list>
        </text:list-item>
      </text:list>
      <text:p text:style-name="P69">Type<text:tab/>Funktion : DATE</text:p>
      <text:p text:style-name="P173"><text:span text:style-name="T15">Input</text:span><text:span text:style-name="T14"><text:tab/>Y : DATE (aktuelles Datum)</text:span></text:p>
      <text:p text:style-name="P71"><draw:frame draw:style-name="fr3" draw:name="Grafik624" text:anchor-type="paragraph" svg:x="1.067cm" svg:y="0.69cm" svg:width="4.881cm" svg:height="0.99cm" draw:z-index="619"><draw:image xlink:href="Pictures/10000000000001710000004B9FBA4FD0.png" xlink:type="simple" xlink:show="embed" xlink:actuate="onLoad"/></draw:frame>Output<text:tab/>DATE (Datum des 1. Tages des aktuellen Monats)</text:p>
      <text:p text:style-name="P183"><text:line-break/>MONTH_BEGIN berechnet das Datum des 1. Tages des aktuellen Monats und aktuellen Jahres.</text:p>
      <text:p text:style-name="P183">MONTH_BEGIN(D#2008-2-13) = D#2008-2-1</text:p>
      <text:list xml:id="list38460026" text:continue-numbering="true" text:style-name="L1">
        <text:list-item>
          <text:list>
            <text:list-item>
              <text:h text:style-name="P216" text:outline-level="2"><text:alphabetical-index-mark-start text:id="IMark225902392"/>MONTH_END<text:alphabetical-index-mark-end text:id="IMark225902392"/></text:h>
            </text:list-item>
          </text:list>
        </text:list-item>
      </text:list>
      <text:p text:style-name="P69">Type<text:tab/>Funktion : DATE</text:p>
      <text:p text:style-name="P173"><text:span text:style-name="T15">Input</text:span><text:span text:style-name="T14"><text:tab/>Y : DATE (aktuelles Datum)</text:span></text:p>
      <text:p text:style-name="P71"><draw:frame draw:style-name="fr3" draw:name="Grafik625" text:anchor-type="paragraph" svg:x="1.002cm" svg:y="0.667cm" svg:width="4.26cm" svg:height="0.99cm" draw:z-index="620"><draw:image xlink:href="Pictures/10000000000001420000004B525202F7.png" xlink:type="simple" xlink:show="embed" xlink:actuate="onLoad"/></draw:frame>Output<text:tab/>DATE (Datum des letzten Tages des aktuellen Monats)</text:p>
      <text:p text:style-name="P183"><text:line-break/>MONTH_END berechnet das Datum des letzten Tages des aktuellen Monats und aktuellen Jahres.</text:p>
      <text:p text:style-name="P183">MONTH_END(D#2008-2-13) = D#2008-2-29</text:p>
      <text:list xml:id="list38475532" text:continue-numbering="true" text:style-name="L1">
        <text:list-item>
          <text:list>
            <text:list-item>
              <text:h text:style-name="P214" text:outline-level="2"><text:alphabetical-index-mark-start text:id="IMark225902392"/><text:alphabetical-index-mark-start text:id="IMark226120852"/>MONTH_OF_DATE<text:alphabetical-index-mark-end text:id="IMark226120852"/><text:alphabetical-index-mark-end text:id="IMark225902392"/></text:h>
            </text:list-item>
          </text:list>
        </text:list-item>
      </text:list>
      <text:p text:style-name="P69">Type<text:tab/>Funktion : INT</text:p>
      <text:p text:style-name="P66"><text:span text:style-name="T15">Input</text:span><text:span text:style-name="T14"><text:tab/>IDATE : DATE (Eingangsdatum)</text:span></text:p>
      <text:p text:style-name="P71"><draw:frame draw:style-name="fr3" draw:name="Grafik32" text:anchor-type="paragraph" svg:x="1.046cm" svg:y="0.644cm" svg:width="5.669cm" svg:height="0.99cm" draw:z-index="694"><draw:image xlink:href="Pictures/10000000000001AD0000004B1C9725D1.png" xlink:type="simple" xlink:show="embed" xlink:actuate="onLoad"/></draw:frame>Output<text:tab/>INT (Monat im Jahr des Eingangsdatums)</text:p>
      <text:p text:style-name="P71"><text:soft-page-break/><text:line-break/>Die Funktion MONTH berechnet den Monat des Jahres aus dem Eingangsdatum IDATE.</text:p>
      <text:p text:style-name="P71">Beispiel:<text:tab/>MONTH_OF_DATE(D#2007-12-31) = 12</text:p>
      <text:p text:style-name="P180"><text:tab/>MONTH_OF_DATE(D#2006-1-1) = 1</text:p>
      <text:list xml:id="list38451310" text:continue-numbering="true" text:style-name="L1">
        <text:list-item>
          <text:list>
            <text:list-item>
              <text:h text:style-name="P216" text:outline-level="2"><text:alphabetical-index-mark-start text:id="IMark225902392"/>MULTIME<text:alphabetical-index-mark-end text:id="IMark225902392"/></text:h>
            </text:list-item>
          </text:list>
        </text:list-item>
      </text:list>
      <text:p text:style-name="P69">Type<text:tab/>Funktion : TIME</text:p>
      <text:p text:style-name="P66"><text:span text:style-name="T15">Input</text:span><text:span text:style-name="T14"><text:tab/>T : TIME (Eingangszeit)</text:span></text:p>
      <text:p text:style-name="P69"><text:tab/>M : REAL (Multiplikator)</text:p>
      <text:p text:style-name="P71"><draw:frame draw:style-name="fr3" draw:name="Grafik33" text:anchor-type="paragraph" svg:x="1.014cm" svg:y="0.609cm" svg:width="3.62cm" svg:height="1.57cm" draw:z-index="23"><draw:image xlink:href="Pictures/10000000000001120000007763C04288.png" xlink:type="simple" xlink:show="embed" xlink:actuate="onLoad"/></draw:frame>Output<text:tab/>TIME (Ergebnis Eingangszeit Multipliziert mit M)</text:p>
      <text:p text:style-name="P71"><text:line-break/>Die Funktion MULTIME Multipliziert einen Zeitwert mit einem Multiplikator.</text:p>
      <text:p text:style-name="P71">Beispiel:<text:tab/>MULTIME(T#1h10m, 2.5) = T#2h55m</text:p>
      <text:list xml:id="list38471940" text:continue-numbering="true" text:style-name="L1">
        <text:list-item>
          <text:list>
            <text:list-item>
              <text:h text:style-name="P216" text:outline-level="2"><text:alphabetical-index-mark-start text:id="IMark225902392"/>PERIOD<text:alphabetical-index-mark-end text:id="IMark225902392"/></text:h>
            </text:list-item>
          </text:list>
        </text:list-item>
      </text:list>
      <text:p text:style-name="P69">Type<text:tab/>Funktion : BOOL</text:p>
      <text:p text:style-name="P66"><text:span text:style-name="T15">Input</text:span><text:span text:style-name="T14"><text:tab/>D1 : DATE (Perioden Beginn)</text:span></text:p>
      <text:p text:style-name="P69"><text:tab/>DX : DATE (zu testendes Datum)</text:p>
      <text:p text:style-name="P179"><text:tab/>D1 : DATE (Perioden Ende)</text:p>
      <text:p text:style-name="P71"><draw:frame draw:style-name="fr3" draw:name="Grafik326" text:anchor-type="paragraph" svg:x="1.067cm" svg:y="0.684cm" svg:width="3.29cm" svg:height="1.79cm" draw:z-index="291"><draw:image xlink:href="Pictures/10000000000000F90000008763C94FCE.png" xlink:type="simple" xlink:show="embed" xlink:actuate="onLoad"/></draw:frame>Output<text:tab/>BOOL (TRUE wenn DX innerhalb der Periode D1 .. D2 liegt)</text:p>
      <text:p text:style-name="P71"><text:line-break/>Die Funktion PERIOD prüft, ob ein Eingangsdatum DX größer gleich D1 und <text:soft-page-break/>kleiner gleich D2 ist. Wenn das Datum DX im Zeitraum zwischen D1 und D2 (D1 und D2 eingeschlossen) liegt wird der Ausgang der Funktion TRUE gesetzt. PERIOD ignoriert dabei die Jahreszahlen in den Datumsangaben D1, D2 und DX. Die Prüfung erfolgt nur auf Monate und Tage, sodass diese Funktion für jedes Jahr funktioniert. Die zu Prüfende Periode kann auch über den 31. Dezember hinaus erstrecken, also zum Beispiel vom 1.9. – 15.3. Eine typische Anwendung ist die Prüfung, ob eine Heizperiode vorliegt. Damit PERIOD richtig rechnet dürfen die beiden Datumsangaben D1 und D2 nicht in einem Schaltjahr liegen. Es kann zum Beispiel immer das Jahr 2001 oder auch jedes beliebige andere Jahr das kein Schaltjahr ist verwendet werden.</text:p>
      <text:p text:style-name="P180">PERIOD(1.10.2001, 12.11.2007, 31.3.2001) ergibt TRUE, weil das zu prüfende Datum innerhalb der Periode vom 1.10 - 31.3. liegt.</text:p>
      <text:list xml:id="list38472780" text:continue-numbering="true" text:style-name="L1">
        <text:list-item>
          <text:list>
            <text:list-item>
              <text:h text:style-name="P216" text:outline-level="2"><text:alphabetical-index-mark-start text:id="IMark225902392"/>PERIOD2<text:alphabetical-index-mark-end text:id="IMark225902392"/></text:h>
            </text:list-item>
          </text:list>
        </text:list-item>
      </text:list>
      <text:p text:style-name="P69">Type<text:tab/>Funktion : BOOL</text:p>
      <text:p text:style-name="P66"><text:span text:style-name="T15">Input</text:span><text:span text:style-name="T14"><text:tab/>DP : ARRAY[0..3,0..1] </text:span><text:span text:style-name="T15">of</text:span><text:span text:style-name="T14"> DATE (Perioden)</text:span></text:p>
      <text:p text:style-name="P69"><text:tab/>DX : DATE (zu testendes Datum)</text:p>
      <text:p text:style-name="P180"><draw:frame draw:style-name="fr3" draw:name="Grafik560" text:anchor-type="paragraph" svg:x="1.046cm" svg:y="0.667cm" svg:width="3.69cm" svg:height="1.39cm" draw:z-index="546"><draw:image xlink:href="Pictures/1000000000000117000000697AC157C0.png" xlink:type="simple" xlink:show="embed" xlink:actuate="onLoad"/></draw:frame>Output<text:tab/>BOOL (TRUE wenn DX innerhalb einer der Perioden liegt)</text:p>
      <text:p text:style-name="P173"><text:span text:style-name="T23"><text:line-break/>PERIOD2 prüft ob das Datum DX innerhalb einer von 4 spezifizierten Perioden liegt. Die Perioden werden in einem ARRAY[0..3,0..1] </text:span>of<text:span text:style-name="T23"> DATE spezifiziert. Im Gegensatz zur Funktion PERIOD prüft PERIOD2 auch das Jahr. Die Perioden werden im ARRAY DP spezifiziert, wobei DP[N,0] das Anfangsdatum der Periode N DP[N,1] das Enddatum der Periode N ist.</text:span></text:p>
      <text:p text:style-name="P180">Die Funktion Prüft nach der Formel: DX &gt;= DP[N,0] AND DX &gt;= DP[N,1]. Es wird Dabei jeweils N=0 bis 3 geprüft. Wenn DX in eine der 4 Perioden fällt wird der Ausgang auf TRUE gesetzt.</text:p>
      <text:p text:style-name="P180">Die einzelnen Perioden Müssen nicht sortiert vorliegen. PERIOD2 kann benutzt werden um Ferien oder Urlaubszeiten zu definieren. PERIOD2 prüft nicht wiederkehrende Perioden, wobei die Funktion PERIOD jährlich wiederkehrende Perioden Prüft.</text:p>
      <text:list xml:id="list38447826" text:continue-numbering="true" text:style-name="L1">
        <text:list-item>
          <text:list>
            <text:list-item>
              <text:h text:style-name="P216" text:outline-level="2"><text:soft-page-break/><text:alphabetical-index-mark-start text:id="IMark225902392"/>REFRACTION<text:alphabetical-index-mark-end text:id="IMark225902392"/></text:h>
            </text:list-item>
          </text:list>
        </text:list-item>
      </text:list>
      <text:p text:style-name="P69">Type<text:tab/>Funktion : REAL</text:p>
      <text:p text:style-name="P66"><text:span text:style-name="T15">Input</text:span><text:span text:style-name="T14"><text:tab/>ELEV : REAL (Elevation in Grad über Horizont)</text:span></text:p>
      <text:p text:style-name="P180"><draw:frame draw:style-name="fr3" draw:name="Grafik664" text:anchor-type="paragraph" svg:x="1.069cm" svg:y="0.688cm" svg:width="4.48cm" svg:height="0.99cm" draw:z-index="655"><draw:image xlink:href="Pictures/10000000000001530000004BB276BEA9.png" xlink:type="simple" xlink:show="embed" xlink:actuate="onLoad"/></draw:frame>Output<text:tab/>REAL (Refraktion in Grad)</text:p>
      <text:p text:style-name="P180"><text:line-break/>REFRACTION berechnet die atmosphärische Brechung. Ein Himmelskörper erscheint durch die Lichtbrechung in der Atmosphäre um die Refraktion höher über dem Horizont als er tatsächlich ist. Die Refraktion beträgt 0 am Zenith (um 12:00 Mittags) und nimmt nahe des Horizonts stark zu. Bei 0° ( am Horizont) beträgt die Refraktion -0,59° und 10° über dem Horizont beträgt Sie 0,09°. Die Refraktion wird benötigt um berechnete Umlaufbahnen von Himmelskörpern oder auch Satelliten zu korrigieren so dass Sie mit der Beobachtung übereinstimmen. Der Baustein berechnet einen Mittelwert für einen Luftdruck von 1010mBar und 10°C. Wenn die Sonne tatsächlich bei 0° also exakt am Horizont steht erscheint sie wegen der Refraktion bei 0,59 ° über dem Horizont. Der Sichtbare Sonnenstand ist der tatsächliche (astronomische) Sonnenstand H + die Refraktion.</text:p>
      <text:list xml:id="list38469868" text:continue-numbering="true" text:style-name="L1">
        <text:list-item>
          <text:list>
            <text:list-item>
              <text:h text:style-name="P216" text:outline-level="2"><text:alphabetical-index-mark-start text:id="IMark225902392"/>RTC_2<text:alphabetical-index-mark-end text:id="IMark225902392"/></text:h>
            </text:list-item>
          </text:list>
        </text:list-item>
      </text:list>
      <text:p text:style-name="P69">Type<text:tab/>Funktionsbaustein</text:p>
      <text:p text:style-name="P66"><text:span text:style-name="T15">Input</text:span><text:span text:style-name="T14"><text:tab/>SET : BOOL (Set Eingang)</text:span></text:p>
      <text:p text:style-name="P69"><text:tab/>SDT : DT (Set Datum und Zeit)</text:p>
      <text:p text:style-name="P179"><text:tab/>SMS : INT (Set Millisekunden)</text:p>
      <text:p text:style-name="P179"><text:tab/>DEN : BOOL (Automatische Sommerzeitumstellung Ein)</text:p>
      <text:p text:style-name="P179"><text:tab/>OFS : INT (Offset der Lokalzeit LDT von der Weltzeit UDT)</text:p>
      <text:p text:style-name="P71">Output<text:tab/>UDT : DT (Datums und Zeit Ausgang für Weltzeit)</text:p>
      <text:p text:style-name="P180"><text:tab/>LDT : DT (Lokalzeit)</text:p>
      <text:p text:style-name="P180"><text:tab/>DSO : BOOL (Sommerzeit aktiv)</text:p>
      <text:p text:style-name="P180"><draw:frame draw:style-name="fr3" draw:name="Grafik441" text:anchor-type="paragraph" svg:x="1.111cm" svg:y="0.667cm" svg:width="2.731cm" svg:height="3.099cm" draw:z-index="428"><draw:image xlink:href="Pictures/10000000000000CE000000EA5E427DA7.png" xlink:type="simple" xlink:show="embed" xlink:actuate="onLoad"/></draw:frame><text:tab/>XMS : INT (Millisekunden)</text:p>
      <text:p text:style-name="P173"><text:soft-page-break/><text:span text:style-name="T23"><text:line-break/>RTC_2 ist ein Uhrenbaustein der UTC und Lokale Zeit an den Ausgängen UDT und LDT zur Verfügung stellt. Die Uhrzeit wird automatisch beim ersten Start und immer dann wenn SET auf TRUE ist auf den Wert von SDT und SMS gesetzt. Wenn SET = FALSE läuft die Zeit selbständig weiter und liefert am Ausgang UDT das aktuelle Datum und die Uhrzeit für Weltzeit (UTC), sowie am Ausgang LDT die aktuelle Lokalzeit. Der Ausgang LDT entspricht UDT + OFS + Sommerzeit wenn diese aktuell ist. Die Sommerzeit wird wenn DEN TRUE ist automatisch am letzten Sonntag des März um 01:00 UTC (02:00 MEZ) auf Sommerzeit (03:00 MESZ) und am letzten Sonntag des Oktober um 01:00 UTC (03:00 MESZ) auf 02:00 MEZ zurück gestellt. Der Ausgang DSO ist dann TRUE, wenn Sommerzeit herrscht. Wenn DEN FALSE ist wird keine Sommerzeitumstellung vorgenommen. Die Genauigkeit der Uhr hängt vom Millisekunden </text:span>Timer<text:span text:style-name="T23"> der SPS ab. Der Eingang OFS spezifiziert den Zeitversatz von LDT zu UDT, für MEZ ist dieser Wert 1 Stunde. OFS wird als Integer spezifiziert damit auch ein negativer Offset möglich ist. RTC_2 übernimmt beim Power </text:span>Up<text:span text:style-name="T23"> automatisch die an SDT anliegende Startzeit und Datum. Der Ausgang XMS stellt die Millisekunden zur Verfügung und zählt in jeder Sekunde von 0 – 999. </text:span></text:p>
      <text:p text:style-name="P180"><draw:frame draw:style-name="fr3" draw:name="Grafik442" text:anchor-type="paragraph" svg:x="1.817cm" svg:y="0.651cm" svg:width="10.7cm" svg:height="2.17cm" draw:z-index="430"><draw:image xlink:href="Pictures/100000000000024200000075D8A4868B.png" xlink:type="simple" xlink:show="embed" xlink:actuate="onLoad"/></draw:frame>Im folgenden Beispiel wird beim Start die Systemzeit übernommen.</text:p>
      <text:p text:style-name="P180"/>
      <text:list xml:id="list38447770" text:continue-numbering="true" text:style-name="L1">
        <text:list-item>
          <text:list>
            <text:list-item>
              <text:h text:style-name="P216" text:outline-level="2"><text:alphabetical-index-mark-start text:id="IMark225902392"/>RTC_MS<text:alphabetical-index-mark-end text:id="IMark225902392"/></text:h>
            </text:list-item>
          </text:list>
        </text:list-item>
      </text:list>
      <text:p text:style-name="P69">Type<text:tab/>Funktionsbaustein</text:p>
      <text:p text:style-name="P66"><text:span text:style-name="T15">Input</text:span><text:span text:style-name="T14"><text:tab/>SET : BOOL (Set Eingang)</text:span></text:p>
      <text:p text:style-name="P69"><text:tab/>SDT : DT (Set Datum und Zeit)</text:p>
      <text:p text:style-name="P179"><text:tab/>SMS : INT (Set Millisekunden)</text:p>
      <text:p text:style-name="P71">Output<text:tab/>XDT : DT (Datums und Zeit Ausgang)</text:p>
      <text:p text:style-name="P180"><draw:frame draw:style-name="fr3" draw:name="Grafik440" text:anchor-type="paragraph" svg:x="1.002cm" svg:y="0.667cm" svg:width="2.731cm" svg:height="2.2cm" draw:z-index="429"><draw:image xlink:href="Pictures/10000000000000CE000000A6C9D4B444.png" xlink:type="simple" xlink:show="embed" xlink:actuate="onLoad"/></draw:frame><text:soft-page-break/><text:tab/>XMS : INT (Millisekunden Ausgang)</text:p>
      <text:p text:style-name="P173"><text:span text:style-name="T23"><text:line-break/>RTC_MS ist ein Uhrenbaustein mit einer Auflösung von Millisekunden und Datum. Die Uhrzeit wird automatisch beim ersten Start und immer dann wenn SET auf TRUE ist auf den Wert von SDT und SMS gesetzt. Wenn SET = FALSE läuft die Zeit selbständig weiter und liefert am Ausgang XDT das aktuelle Datum und die Uhrzeit, sowie am Ausgang XMS die Millisekunden. Der Ausgang XMS zählt in jeder Sekunde von 0 - 999 und beginnt mit der nächsten Sekunde wieder bei 0. Die Genauigkeit der Uhr hängt vom Millisekunden </text:span>Timer<text:span text:style-name="T23"> der SPS ab.</text:span></text:p>
      <text:list xml:id="list38447086" text:continue-numbering="true" text:style-name="L1">
        <text:list-item>
          <text:list>
            <text:list-item>
              <text:h text:style-name="P216" text:outline-level="2"><text:alphabetical-index-mark-start text:id="IMark225902392"/>SDT_TO_DATE<text:alphabetical-index-mark-end text:id="IMark225902392"/></text:h>
            </text:list-item>
          </text:list>
        </text:list-item>
      </text:list>
      <text:p text:style-name="P69">Type<text:tab/>Funktion : DATE</text:p>
      <text:p text:style-name="P173"><text:span text:style-name="T15">Input</text:span><text:span text:style-name="T14"><text:tab/>DTI : SDT (Eingangswert als strukturierter Datums / Zeitwert)</text:span></text:p>
      <text:p text:style-name="P86"><draw:frame draw:style-name="fr3" draw:name="Grafik704" text:anchor-type="paragraph" svg:x="1.067cm" svg:y="0.667cm" svg:width="4.881cm" svg:height="0.99cm" draw:z-index="706"><draw:image xlink:href="Pictures/10000000000001710000004B11B234AE.png" xlink:type="simple" xlink:show="embed" xlink:actuate="onLoad"/></draw:frame>Output<text:tab/>DATE (Datumswert)</text:p>
      <text:p text:style-name="P86"><text:line-break/>SDT_TO_DATE erzeugt einen Datumswert aus einem strukturierten Datums- Zeit-Wert</text:p>
      <text:list xml:id="list38471560" text:continue-numbering="true" text:style-name="L1">
        <text:list-item>
          <text:list>
            <text:list-item>
              <text:h text:style-name="P216" text:outline-level="2"><text:alphabetical-index-mark-start text:id="IMark225902392"/>SDT_TO_DT<text:alphabetical-index-mark-end text:id="IMark225902392"/></text:h>
            </text:list-item>
          </text:list>
        </text:list-item>
      </text:list>
      <text:p text:style-name="P69">Type<text:tab/>Funktion : DT</text:p>
      <text:p text:style-name="P173"><text:span text:style-name="T15">Input</text:span><text:span text:style-name="T14"><text:tab/>DTI : SDT (Eingangswert als strukturierter Datums / Zeitwert)</text:span></text:p>
      <text:p text:style-name="P86"><draw:frame draw:style-name="fr3" draw:name="Grafik706" text:anchor-type="paragraph" svg:x="1.046cm" svg:y="0.644cm" svg:width="4.09cm" svg:height="0.99cm" draw:z-index="708"><draw:image xlink:href="Pictures/10000000000001350000004B1713BCA6.png" xlink:type="simple" xlink:show="embed" xlink:actuate="onLoad"/></draw:frame>Output<text:tab/>DT (Datums- Zeit-wert)</text:p>
      <text:p text:style-name="P86"><text:soft-page-break/><text:line-break/>SDT_TO_DT erzeugt einen Datums- Zeit-wert aus einem strukturierten Datums- Zeit-Wert</text:p>
      <text:list xml:id="list38457287" text:continue-numbering="true" text:style-name="L1">
        <text:list-item>
          <text:list>
            <text:list-item>
              <text:h text:style-name="P216" text:outline-level="2"><text:alphabetical-index-mark-start text:id="IMark225902392"/>SDT_TO_TOD<text:alphabetical-index-mark-end text:id="IMark225902392"/></text:h>
            </text:list-item>
          </text:list>
        </text:list-item>
      </text:list>
      <text:p text:style-name="P69">Type<text:tab/>Funktion : TOD</text:p>
      <text:p text:style-name="P173"><text:span text:style-name="T15">Input</text:span><text:span text:style-name="T14"><text:tab/>DTI : SDT (Eingangswert als strukturierter Datums / Zeitwert)</text:span></text:p>
      <text:p text:style-name="P86"><draw:frame draw:style-name="fr3" draw:name="Grafik705" text:anchor-type="paragraph" svg:x="1.046cm" svg:y="0.667cm" svg:width="4.48cm" svg:height="0.99cm" draw:z-index="707"><draw:image xlink:href="Pictures/10000000000001530000004BE9E443D2.png" xlink:type="simple" xlink:show="embed" xlink:actuate="onLoad"/></draw:frame>Output<text:tab/>TOD (Tageszeit)</text:p>
      <text:p text:style-name="P86"><text:line-break/>SDT_TO_TOD erzeugt eine Tageszeit aus einem strukturierten Datums- Zeit-Wert</text:p>
      <text:list xml:id="list38451677" text:continue-numbering="true" text:style-name="L1">
        <text:list-item>
          <text:list>
            <text:list-item>
              <text:h text:style-name="P216" text:outline-level="2"><text:alphabetical-index-mark-start text:id="IMark225902392"/>SECOND<text:alphabetical-index-mark-end text:id="IMark225902392"/></text:h>
            </text:list-item>
          </text:list>
        </text:list-item>
      </text:list>
      <text:p text:style-name="P69">Type<text:tab/>Funktion : REAL</text:p>
      <text:p text:style-name="P66"><text:span text:style-name="T15">Input</text:span><text:span text:style-name="T14"><text:tab/>ITOD : TOD (Tageszeit)</text:span></text:p>
      <text:p text:style-name="P71"><draw:frame draw:style-name="fr3" draw:name="Grafik34" text:anchor-type="paragraph" svg:x="1.102cm" svg:y="0.667cm" svg:width="3.18cm" svg:height="1.12cm" draw:z-index="24"><draw:image xlink:href="Pictures/10000000000000F000000055F069EDE2.png" xlink:type="simple" xlink:show="embed" xlink:actuate="onLoad"/></draw:frame>Output<text:tab/>REAL (Sekunden und Millisekunden der Tageszeit)</text:p>
      <text:p text:style-name="P66"><text:span text:style-name="T23"><text:line-break/>Die Funktion </text:span>SECOND<text:span text:style-name="T23"> extrahiert den Sekundenanteil aus der Tageszeit</text:span></text:p>
      <text:p text:style-name="P66"><text:span text:style-name="T23">Beispiel:<text:tab/></text:span>SECOND<text:span text:style-name="T23">(22:10:12.331) = 12.331</text:span></text:p>
      <text:p text:style-name="P180"/>
      <text:list xml:id="list38472791" text:continue-numbering="true" text:style-name="L1">
        <text:list-item>
          <text:list>
            <text:list-item>
              <text:h text:style-name="P216" text:outline-level="2"><text:soft-page-break/><text:alphabetical-index-mark-start text:id="IMark225902392"/>SECOND_OF_DT<text:alphabetical-index-mark-end text:id="IMark225902392"/></text:h>
            </text:list-item>
          </text:list>
        </text:list-item>
      </text:list>
      <text:p text:style-name="P69">Type<text:tab/>Funktion : INT</text:p>
      <text:p text:style-name="P66"><text:span text:style-name="T15">Input</text:span><text:span text:style-name="T14"><text:tab/>XDT : DATETIME (Eingangswert)</text:span></text:p>
      <text:p text:style-name="P180"><draw:frame draw:style-name="fr3" draw:name="Grafik610" text:anchor-type="paragraph" svg:x="1.046cm" svg:y="0.614cm" svg:width="5.279cm" svg:height="0.99cm" draw:z-index="606"><draw:image xlink:href="Pictures/100000000000018F0000004BE5590CCA.png" xlink:type="simple" xlink:show="embed" xlink:actuate="onLoad"/></draw:frame>Output<text:tab/>INT (aktuelle Sekunde)</text:p>
      <text:p text:style-name="P180"><text:line-break/>SECOND_OF_DT extrahiert die momentane Sekunde aus einem DT Wert.</text:p>
      <text:p text:style-name="P180">SECOND_OF_DT(DT#2008-6-6-10:22:20) = 20</text:p>
      <text:list xml:id="list38475819" text:continue-numbering="true" text:style-name="L1">
        <text:list-item>
          <text:list>
            <text:list-item>
              <text:h text:style-name="P216" text:outline-level="2"><text:alphabetical-index-mark-start text:id="IMark225902392"/>SECOND_TO_TIME<text:alphabetical-index-mark-end text:id="IMark225902392"/></text:h>
            </text:list-item>
          </text:list>
        </text:list-item>
      </text:list>
      <text:p text:style-name="P69">Type<text:tab/>Funktion : TIME</text:p>
      <text:p text:style-name="P66"><text:span text:style-name="T15">Input</text:span><text:span text:style-name="T14"><text:tab/>INPUT : REAL (Anzahl Sekunden mit Nachkommastellen)</text:span></text:p>
      <text:p text:style-name="P71"><draw:frame draw:style-name="fr3" draw:name="Grafik35" text:anchor-type="paragraph" svg:x="1.078cm" svg:y="0.663cm" svg:width="5.42cm" svg:height="1.12cm" draw:z-index="44"><draw:image xlink:href="Pictures/100000000000019A000000553EEC73AE.png" xlink:type="simple" xlink:show="embed" xlink:actuate="onLoad"/></draw:frame>Output<text:tab/>TIME (TIME)</text:p>
      <text:p text:style-name="P71"><text:line-break/>Die Funktion SECOND_TO_TIME berechnet einen Zeitwert (TIME) aus dem Eingangswert in Sekunden als REAL.</text:p>
      <text:p text:style-name="P73">Beispiel:<text:tab/>SECOND_TO_TIME(63.123) = T#1m3s123ms</text:p>
      <text:list xml:id="list38472620" text:continue-numbering="true" text:style-name="L1">
        <text:list-item>
          <text:list>
            <text:list-item>
              <text:h text:style-name="P216" text:outline-level="2"><text:alphabetical-index-mark-start text:id="IMark225902392"/>SET_DATE<text:alphabetical-index-mark-end text:id="IMark225902392"/></text:h>
            </text:list-item>
          </text:list>
        </text:list-item>
      </text:list>
      <text:p text:style-name="P69">Type<text:tab/>Funktion : DATE</text:p>
      <text:p text:style-name="P66"><text:span text:style-name="T15">Input</text:span><text:span text:style-name="T14"><text:tab/>YEAR : INT (Jahreszahl)</text:span></text:p>
      <text:p text:style-name="P69"><text:tab/>MONTH : INT (Monat)</text:p>
      <text:p text:style-name="P69"><text:tab/>DAY : INT (Tag)</text:p>
      <text:p text:style-name="P71"><draw:frame draw:style-name="fr3" draw:name="Grafik36" text:anchor-type="paragraph" svg:x="1.039cm" svg:y="0.665cm" svg:width="3.62cm" svg:height="2.02cm" draw:z-index="25"><draw:image xlink:href="Pictures/10000000000001120000009949531E17.png" xlink:type="simple" xlink:show="embed" xlink:actuate="onLoad"/></draw:frame>Output<text:tab/>DATE (Zusammengesetztes Datum)</text:p>
      <text:p text:style-name="P66"><text:soft-page-break/><text:span text:style-name="T23"><text:line-break/>Die Funktion SET_DATE berechnet einen Datum (DATE) aus den Eingangswerten Tag, Monat und Jahr. </text:span><text:span text:style-name="T21">SET_DATE überprüft dabei nicht die Gültigkeit eines Datums. Zum Beispiel darf auch der 30. Februar gesetzt werden was natürlich den 1.3. oder bei einem Schaltjahr dem 2. März ergibt. SET_DATE kann deshalb auch benutzt werden um einen beliebigen Tag im Jahr zu erzeugen. Dies kann eine durchaus </text:span><text:span text:style-name="T21">Sinnvolle Anwendung sein. In diesem Fall darf der Monat auch 0 betragen. Eine un</text:span><text:span text:style-name="T21">gültige Monatsangabe ergibt immer ein Datum in Bezug auf den Januar. Ein ungültiger Monat ( Monat &lt; 1 oder Monat &gt; 12) wird immer als Januar interpretiert.</text:span></text:p>
      <text:p text:style-name="P183">Beispiel:<text:tab/>SET_DATE(2007,1,365) = 31.12.2007</text:p>
      <text:p text:style-name="P73">Beispiel:<text:tab/>SET_DATE(2007, 1, 22) = 22.1.2007</text:p>
      <text:list xml:id="list38456121" text:continue-numbering="true" text:style-name="L1">
        <text:list-item>
          <text:list>
            <text:list-item>
              <text:h text:style-name="P216" text:outline-level="2"><text:alphabetical-index-mark-start text:id="IMark225902392"/>SET_DT<text:alphabetical-index-mark-end text:id="IMark225902392"/></text:h>
            </text:list-item>
          </text:list>
        </text:list-item>
      </text:list>
      <text:p text:style-name="P69">Type<text:tab/>Funktion : DATE_TIME</text:p>
      <text:p text:style-name="P66"><text:span text:style-name="T15">Input</text:span><text:span text:style-name="T14"><text:tab/>YEAR : INT (Jahreszahl)</text:span></text:p>
      <text:p text:style-name="P69"><text:tab/>MONTH : INT (Monat)</text:p>
      <text:p text:style-name="P69"><text:tab/>DAY : INT (Tag)</text:p>
      <text:p text:style-name="P69"><text:tab/>HOUR : INT (Stunde)</text:p>
      <text:p text:style-name="P69"><text:tab/>MINUTE : INT (Minute)</text:p>
      <text:p text:style-name="P69"><text:tab/>SECOND : INT (Sekunden)</text:p>
      <text:p text:style-name="P71"><draw:frame draw:style-name="fr3" draw:name="Grafik37" text:anchor-type="paragraph" svg:x="1.028cm" svg:y="0.654cm" svg:width="3.18cm" svg:height="3.371cm" draw:z-index="26"><draw:image xlink:href="Pictures/10000000000000F0000000FF67464D95.png" xlink:type="simple" xlink:show="embed" xlink:actuate="onLoad"/></draw:frame>Output<text:tab/>DATE_TIME (Zusammengesetztes Zeitdatum)</text:p>
      <text:p text:style-name="P71"><text:line-break/>Die Funktion SET_DT berechnet einen Zeit-Datumswert (DATE_TIME) aus den Eingangswerten Tag, Monat, Jahr, Stunde, Minute und Sekunden.</text:p>
      <text:p text:style-name="P73"><text:soft-page-break/>Beispiel:<text:tab/>Set_DT(2007, 1, 22, 13, 10, 22) = DT#2007-1-22-13:10:22</text:p>
      <text:list xml:id="list38462130" text:continue-numbering="true" text:style-name="L1">
        <text:list-item>
          <text:list>
            <text:list-item>
              <text:h text:style-name="P216" text:outline-level="2"><text:alphabetical-index-mark-start text:id="IMark225902392"/>SET_TOD<text:alphabetical-index-mark-end text:id="IMark225902392"/></text:h>
            </text:list-item>
          </text:list>
        </text:list-item>
      </text:list>
      <text:p text:style-name="P69">Type<text:tab/>Funktion : TOD</text:p>
      <text:p text:style-name="P66"><text:span text:style-name="T15">Input</text:span><text:span text:style-name="T14"><text:tab/>HOUR : INT (Stunde)</text:span></text:p>
      <text:p text:style-name="P69"><text:tab/>MINUTE : INT (Minute)</text:p>
      <text:p text:style-name="P69"><text:tab/>SECOND : REAL (Sekunden und Millisekunden)</text:p>
      <text:p text:style-name="P71"><draw:frame draw:style-name="fr3" draw:name="Grafik38" text:anchor-type="paragraph" svg:x="1.011cm" svg:y="0.654cm" svg:width="3.62cm" svg:height="2.02cm" draw:z-index="27"><draw:image xlink:href="Pictures/1000000000000112000000996C6C258E.png" xlink:type="simple" xlink:show="embed" xlink:actuate="onLoad"/></draw:frame>Output<text:tab/>TOD (Ausgangswert Tageszeit)</text:p>
      <text:p text:style-name="P71"><text:line-break/>Die Funktion SET_TOD berechnet eine Tageszeit (TOD) aus den Eingangswerten Stunde, Minute und Sekunden.</text:p>
      <text:p text:style-name="P73">Beispiel:<text:tab/>Set_TOD(13, 10, 22.33) = 13:10:22.330</text:p>
      <text:list xml:id="list38465142" text:continue-numbering="true" text:style-name="L1">
        <text:list-item>
          <text:list>
            <text:list-item>
              <text:h text:style-name="P216" text:outline-level="2"><text:alphabetical-index-mark-start text:id="IMark225902392"/>SUN_POS<text:alphabetical-index-mark-end text:id="IMark225902392"/></text:h>
            </text:list-item>
          </text:list>
        </text:list-item>
      </text:list>
      <text:p text:style-name="P2"><text:span text:style-name="T12">Type</text:span><text:tab/><text:span text:style-name="T11">Funktionsbaustein</text:span></text:p>
      <text:p text:style-name="P66"><text:span text:style-name="T15">Input</text:span><text:span text:style-name="T14"><text:tab/>LATITUDE : REAL (Breitengrad des Bezugsortes)</text:span></text:p>
      <text:p text:style-name="P66"><text:span text:style-name="T14"><text:tab/></text:span><text:span text:style-name="T15">LONGITUDE</text:span><text:span text:style-name="T14"> : REAL (Längengrad des Bezugsortes)</text:span></text:p>
      <text:p text:style-name="P69"><text:tab/>UTC : DATE_TIME (Weltzeit)</text:p>
      <text:p text:style-name="P66"><text:span text:style-name="T23">Output<text:tab/></text:span><text:span text:style-name="T21">B : REAL (Sonnenazimut in Grad von Nord)</text:span></text:p>
      <text:p text:style-name="P73"><draw:frame draw:style-name="fr3" draw:name="Grafik258" text:anchor-type="paragraph" svg:x="1.111cm" svg:y="0.665cm" svg:width="3.62cm" svg:height="2.2cm" draw:z-index="213"><draw:image xlink:href="Pictures/1000000000000112000000A6060A45F1.png" xlink:type="simple" xlink:show="embed" xlink:actuate="onLoad"/></draw:frame><text:tab/>HR : REAL (Sonnenhöhe in Grad über Horizont mit Refraktion)</text:p>
      <text:p text:style-name="P173"><text:span text:style-name="T14"><text:line-break/>SUN_POS </text:span><text:span text:style-name="T22">berechnet</text:span><text:span text:style-name="T14"> die exakte Position der Sonne zur aktuellen Zeit. Die </text:span><text:soft-page-break/><text:span text:style-name="T14">Zeit wird als Weltzeit (UTC) angegeben. Lokalzeit muss vorher umgerechnet werden. Beim Sonnenstand ist die atmosphärische Refraktion für 1010mbar und 10°C bereits berücksichtigt. Die Genauigkeit ist besser als 0,1 Grad für den Zeitraum von 2000 bis 2050. Mögliche Anwendungen von SUN_POS sind die Nachführung von Solarpanels oder eine vom Sonnenstand abhängige Nachführung der Lamellen von Jalousien. SUN_POS ist ein </text:span><text:span text:style-name="T14">aufwendiger </text:span><text:span text:style-name="T14">Algorithmus der aber exakte Werte liefert. Um die Belastung einer SPS so gering wie möglich zu halten wird die Berechnung nur alle 10 Sekunden ausgeführt, was einer Ungenauigkeit von 0,04 Grad entspricht.</text:span></text:p>
      <text:list xml:id="list38475875" text:continue-numbering="true" text:style-name="L1">
        <text:list-item>
          <text:list>
            <text:list-item>
              <text:h text:style-name="P216" text:outline-level="2"><text:alphabetical-index-mark-start text:id="IMark225902392"/>SUN_TIME<text:alphabetical-index-mark-end text:id="IMark225902392"/></text:h>
            </text:list-item>
          </text:list>
        </text:list-item>
      </text:list>
      <text:p text:style-name="P69">Type<text:tab/>Funktionsbaustein</text:p>
      <text:p text:style-name="P66"><text:span text:style-name="T15">Input</text:span><text:span text:style-name="T14"><text:tab/>LATITUDE : REAL (Breitengrad des Bezugsortes)</text:span></text:p>
      <text:p text:style-name="P66"><text:span text:style-name="T14"><text:tab/></text:span><text:span text:style-name="T15">LONGITUDE</text:span><text:span text:style-name="T14"> : REAL (Längengrad des Bezugsortes)</text:span></text:p>
      <text:p text:style-name="P69"><text:tab/>UTC : DATE_TIME (Weltzeit)</text:p>
      <text:p text:style-name="P66"><text:span text:style-name="T23">Output<text:tab/>SUN_</text:span>MIDDAY<text:span text:style-name="T23"> : TOD (Uhrzeit, zu der die Sonne exakt im <text:s text:c="6"/><text:tab/>Süden steht)</text:span></text:p>
      <text:p text:style-name="P173"><text:span text:style-name="T23"><text:tab/>SUN_</text:span>RISE<text:span text:style-name="T23"> : TOD (Zeit des Sonnenaufgangs)</text:span></text:p>
      <text:p text:style-name="P71"><text:tab/>SUN_SET : TOD (Zeit des Sonnenuntergangs)</text:p>
      <text:p text:style-name="P66"><draw:frame draw:style-name="fr3" draw:name="Grafik39" text:anchor-type="paragraph" svg:x="1.088cm" svg:y="1.147cm" svg:width="5.42cm" svg:height="2.649cm" draw:z-index="28"><draw:image xlink:href="Pictures/100000000000019A000000C89A3B50C2.png" xlink:type="simple" xlink:show="embed" xlink:actuate="onLoad"/></draw:frame><text:span text:style-name="T23"><text:tab/>SUN_</text:span>DECLINATION<text:span text:style-name="T23"> : REAL (Sonnenwinkel, wenn die Sonne genau <text:tab/>im <text:tab/>Süden Steht)</text:span></text:p>
      <text:p text:style-name="P66"><text:span text:style-name="T23"><text:line-break/>Der Funktionsbaustein SUN_TIME ist ein Astrotimer. Er berechnet Sonnenaufgang </text:span><text:span text:style-name="T23">und Sonnenuntergang für einen beliebigen Tag, definiert durch den Eingang UTC. Außer Sonnen Auf- und Untergang wird auch die Zeit des Sonnenazimut (Tageshöchststand im Süden) und der Sonnenwinkel im Azimut berechnet. Damit SUN_TIME unabhängig vom Einsatzort funktioniert werden alle Zeiten in UTC (Weltzeit) berechnet und können bei Bedarf wieder in Lokalzeit umgerechnet werden. zusätzlich zu den Zeiten für Sonnenaufgang und Sonnenuntergang berechnet der Baustein auch noch den Winkel der Sonneneinstrahlung über dem Horizont SUN_DECLINATION. SUM_TIME benutzt einen aufwendigen Algorithmus, um die Belastung einer </text:span><text:soft-page-break/><text:span text:style-name="T23">SPS so gering wie möglich zu halten merkt sich der Baustein des aktuellen Tag und stellt sicher das die Werte für jeden Tag nur einmal berechnet werden. </text:span><text:span text:style-name="T21">SUN_TIME wird für die Steuerung von Jalousien benutzt, um sie kurz vor Sonnenaufgang hochzuziehen, damit man im Schlafzimmer die Dämmerung genießen kann. Weitere Anwendungen sind im Gartenbau um Bewässerung anhand des Sonnen auf- und Untergangs zu steuern oder </text:span><text:span text:style-name="T21">auch zum </text:span><text:span text:style-name="T21">Nachführen von Solarpanels. Weitere Berechnungen des <text:s/>Sonnenstandes stellt der Baustein SUN_POS zur Verfügung.</text:span></text:p>
      <text:list xml:id="list38447354" text:continue-numbering="true" text:style-name="L1">
        <text:list-item>
          <text:list>
            <text:list-item>
              <text:h text:style-name="P216" text:outline-level="2"><text:alphabetical-index-mark-start text:id="IMark225902392"/>UTC_TO_LTIME<text:alphabetical-index-mark-end text:id="IMark225902392"/></text:h>
            </text:list-item>
          </text:list>
        </text:list-item>
      </text:list>
      <text:p text:style-name="P69">Type<text:tab/>Funktionsbaustein</text:p>
      <text:p text:style-name="P66"><text:span text:style-name="T15">Input</text:span><text:span text:style-name="T14"><text:tab/>UTC : DATE_TIME (Weltzeit)</text:span></text:p>
      <text:p text:style-name="P69"><text:tab/>DST_ENABLE : BOOL (TRUE erlaubt Sommerzeit)</text:p>
      <text:p text:style-name="P69"><text:tab/>TIME_ZONE_OFFSET : INT (Zeitdifferenz zur Weltzeit in Minuten)</text:p>
      <text:p text:style-name="P71"><draw:frame draw:style-name="fr3" draw:name="Grafik713" text:anchor-type="paragraph" svg:x="1.002cm" svg:y="0.667cm" svg:width="6.47cm" svg:height="1.79cm" draw:z-index="731"><draw:image xlink:href="Pictures/10000000000001E90000008718D125BB.png" xlink:type="simple" xlink:show="embed" xlink:actuate="onLoad"/></draw:frame>Output<text:tab/>LOCAL_DT : DATE_TIME (Lokalzeit)</text:p>
      <text:p text:style-name="P71"><text:line-break/>Der Funktionsbaustein UTC_TO_LTIME errechnet aus der Weltzeit am Eingang UTC eine Lokalzeit (LOCAL_DT) mit automatischer Sommerzeitumschaltung falls DST_ENABLE auf TRUE steht. Ist DST_ENABLE FALSE wird die Lokalzeit ohne Sommerzeitumschaltung berechnet.</text:p>
      <text:p text:style-name="P173"><text:span text:style-name="T23">Dieser Funktionsbaustein benötigt </text:span><text:span text:style-name="T21">UTC am Eingang, welche normalerweise von der SPS zur Verfügung gestellt wird und durch eine Routine des Herstellers gelesen werden kann.</text:span></text:p>
      <text:p text:style-name="P183"><draw:frame draw:style-name="fr3" draw:name="Grafik714" text:anchor-type="paragraph" svg:x="1.023cm" svg:y="1.656cm" svg:width="15.998cm" svg:height="1.305cm" draw:z-index="732"><draw:image xlink:href="Pictures/100000000000034100000044EE45FC11.png" xlink:type="simple" xlink:show="embed" xlink:actuate="onLoad"/></draw:frame>Im folgenden Beispiel ist die Anwendung für eine WAGO 750-841 CPU dargestellt. Das Auslesen der internen Uhr wird durch die Herstellerroutine SYSRTCGETTIME erledigt. Die SPS-Uhr muss in diesem Fall auf Weltzeit eingestellt werden.</text:p>
      <text:p text:style-name="P183"/>
      <text:p text:style-name="P183"/>
      <text:list xml:id="list38447970" text:continue-numbering="true" text:style-name="L1">
        <text:list-item>
          <text:list>
            <text:list-item>
              <text:h text:style-name="P216" text:outline-level="2"><text:soft-page-break/><text:alphabetical-index-mark-start text:id="IMark225902392"/>WORK_WEEK<text:alphabetical-index-mark-end text:id="IMark225902392"/></text:h>
            </text:list-item>
          </text:list>
        </text:list-item>
      </text:list>
      <text:p text:style-name="P69">Type<text:tab/>Funktion : INT</text:p>
      <text:p text:style-name="P66"><text:span text:style-name="T15">Input</text:span><text:span text:style-name="T14"><text:tab/>IDATE : DATE (Eingangsdatum)</text:span></text:p>
      <text:p text:style-name="P71"><draw:frame draw:style-name="fr3" draw:name="Grafik41" text:anchor-type="paragraph" svg:x="1.081cm" svg:y="0.676cm" svg:width="4.069cm" svg:height="1.12cm" draw:z-index="29"><draw:image xlink:href="Pictures/1000000000000134000000554EF08597.png" xlink:type="simple" xlink:show="embed" xlink:actuate="onLoad"/></draw:frame>Output<text:tab/>INT (Arbeitswoche des Eingangsdatums)</text:p>
      <text:p text:style-name="P71"><text:line-break/>Die Funktion WORK_WEEK berechnet die Kalenderwoche aus dem Eingangsdatum IDATE. Die Kalenderwoche startet mit 1 für die erste Woche des Jahres. Der erste Donnerstag im Jahr liegt immer in der ersten Kalenderwoche. Wenn ein Jahr mit einem Donnerstag anfängt oder mit einem Donnerstag endet hat dieses Jahr 53 Kalenderwochen. Ist der erste Tag eines Jahres ein Dienstag, Mittwoch oder Donnerstag so beginnt die Kalenderwoche 1 bereits im Dezember des Vorjahres. Wenn der erste Tag eines Jahres Freitag, Samstag oder Sonntag ist so erstreckt sich die letzte Kalenderwoche des Vorjahres in den Januar. Die Berechnung erfolgt gemäß ISO8601.</text:p>
      <text:p text:style-name="P173"><text:span text:style-name="T23">Da die Arbeitswoche ( </text:span><text:span text:style-name="T15">Work</text:span><text:span text:style-name="T23"> </text:span><text:span text:style-name="T15">Week</text:span><text:span text:style-name="T23">) international nicht immer einheitlich Verwendung findet ist vor der Anwendung der Funktion zu klären ob die Arbeitswoche gemäß ISO8601 der in der Anwendung gewünschten Funktion entspricht.</text:span></text:p>
      <text:list xml:id="list38447955" text:continue-numbering="true" text:style-name="L1">
        <text:list-item>
          <text:list>
            <text:list-item>
              <text:h text:style-name="P216" text:outline-level="2"><text:alphabetical-index-mark-start text:id="IMark225902392"/>YEAR_BEGIN<text:alphabetical-index-mark-end text:id="IMark225902392"/></text:h>
            </text:list-item>
          </text:list>
        </text:list-item>
      </text:list>
      <text:p text:style-name="P69">Type<text:tab/>Funktion : DATE</text:p>
      <text:p text:style-name="P173"><text:span text:style-name="T15">Input</text:span><text:span text:style-name="T14"><text:tab/>Y : INT (Jahreszahl)</text:span></text:p>
      <text:p text:style-name="P71"><draw:frame draw:style-name="fr3" draw:name="Grafik85" text:anchor-type="paragraph" svg:x="1.069cm" svg:y="0.667cm" svg:width="4.48cm" svg:height="0.99cm" draw:z-index="397"><draw:image xlink:href="Pictures/10000000000001530000004BA0B36DD1.png" xlink:type="simple" xlink:show="embed" xlink:actuate="onLoad"/></draw:frame>Output<text:tab/>DATE (Datum des 1. Januars für die Jahreszahl)</text:p>
      <text:p text:style-name="P180"><text:line-break/>YEAR_BEGIN berechnet das Datum des 1. Januars für das Jahr Y.</text:p>
      <text:list xml:id="list38464761" text:continue-numbering="true" text:style-name="L1">
        <text:list-item>
          <text:list>
            <text:list-item>
              <text:h text:style-name="P216" text:outline-level="2"><text:soft-page-break/><text:alphabetical-index-mark-start text:id="IMark225902392"/>YEAR_END<text:alphabetical-index-mark-end text:id="IMark225902392"/></text:h>
            </text:list-item>
          </text:list>
        </text:list-item>
      </text:list>
      <text:p text:style-name="P69">Type<text:tab/>Funktion : DATE</text:p>
      <text:p text:style-name="P173"><text:span text:style-name="T15">Input</text:span><text:span text:style-name="T14"><text:tab/>Y : INT (Jahreszahl)</text:span></text:p>
      <text:p text:style-name="P71"><draw:frame draw:style-name="fr3" draw:name="Grafik694" text:anchor-type="paragraph" svg:x="1.046cm" svg:y="0.69cm" svg:width="3.69cm" svg:height="0.99cm" draw:z-index="695"><draw:image xlink:href="Pictures/10000000000001170000004B653EF57E.png" xlink:type="simple" xlink:show="embed" xlink:actuate="onLoad"/></draw:frame>Output<text:tab/>DATE (Datum des 31. Dezembers für die Jahreszahl)</text:p>
      <text:p text:style-name="P180"><text:line-break/>YEAR_END berechnet das Datum des 31. Dezembers für das Jahr Y.</text:p>
      <text:list xml:id="list38445202" text:continue-numbering="true" text:style-name="L1">
        <text:list-item>
          <text:list>
            <text:list-item>
              <text:h text:style-name="P216" text:outline-level="2"><text:alphabetical-index-mark-start text:id="IMark225902392"/>YEAR_OF_DATE<text:alphabetical-index-mark-end text:id="IMark225902392"/></text:h>
            </text:list-item>
          </text:list>
        </text:list-item>
      </text:list>
      <text:p text:style-name="P69">Type<text:tab/>Funktion : INT</text:p>
      <text:p text:style-name="P173"><text:span text:style-name="T15">Input</text:span><text:span text:style-name="T14"><text:tab/>IDATE : DATE (Eingangsdatum)</text:span></text:p>
      <text:p text:style-name="P71"><draw:frame draw:style-name="fr3" draw:name="Grafik42" text:anchor-type="paragraph" svg:x="1.025cm" svg:y="0.644cm" svg:width="5.279cm" svg:height="0.99cm" draw:z-index="696"><draw:image xlink:href="Pictures/100000000000018F0000004B21F6D762.png" xlink:type="simple" xlink:show="embed" xlink:actuate="onLoad"/></draw:frame>Output<text:tab/>INT (Jahr des Eingangsdatums)</text:p>
      <text:p text:style-name="P71"><text:line-break/>Die Funktion YEAR_OF_DATE berechnet das entsprechende Jahr aus dem Eingangsdatum IDATE.</text:p>
      <text:p text:style-name="P71">Beispiel:<text:tab/>YEAR_OF_DATE(31.12.2007) = 2007</text:p>
      <text:list xml:id="list38446687" text:continue-numbering="true" text:style-name="L1">
        <text:list-item>
          <text:h text:style-name="P210" text:outline-level="1"><text:span text:style-name="T2">String</text:span> Funktionen</text:h>
          <text:list>
            <text:list-item>
              <text:h text:style-name="P216" text:outline-level="2"><text:alphabetical-index-mark-start text:id="IMark225902392"/>BIN_TO_BYTE<text:alphabetical-index-mark-end text:id="IMark225902392"/></text:h>
            </text:list-item>
          </text:list>
        </text:list-item>
      </text:list>
      <text:p text:style-name="P69">Type<text:tab/>Funktion : BYTE</text:p>
      <text:p text:style-name="P66"><text:span text:style-name="T15">Input</text:span><text:span text:style-name="T14"><text:tab/>BIN : STRING(12) (Oktale Zeichenkette)</text:span></text:p>
      <text:p text:style-name="P73"><draw:frame draw:style-name="fr3" draw:name="Grafik636" text:anchor-type="paragraph" svg:x="1.046cm" svg:y="0.667cm" svg:width="4.881cm" svg:height="0.99cm" draw:z-index="630"><draw:image xlink:href="Pictures/10000000000001710000004B52AA7156.png" xlink:type="simple" xlink:show="embed" xlink:actuate="onLoad"/></draw:frame>Output<text:tab/>BYTE (Ausgangswert)</text:p>
      <text:p text:style-name="P73"><text:line-break/>Die Funktion BIN_TO_BYTE konvertiert eine binär kodierte Zeichenkette in einen BYTE Wert. Es werden dabei nur die binären Zeichen sind '0' und '1' interpretiert, alle anderen in BIN vorkommenden Zeichen werden ignoriert.</text:p>
      <text:p text:style-name="P183">Beispiel:<text:tab/>BIN_TO_BYTE('11') ergibt 3.</text:p>
      <text:list xml:id="list38458804" text:continue-numbering="true" text:style-name="L1">
        <text:list-item>
          <text:list>
            <text:list-item>
              <text:h text:style-name="P216" text:outline-level="2"><text:alphabetical-index-mark-start text:id="IMark225902392"/>BIN_TO_DWORD<text:alphabetical-index-mark-end text:id="IMark225902392"/></text:h>
            </text:list-item>
          </text:list>
        </text:list-item>
      </text:list>
      <text:p text:style-name="P69">Type<text:tab/>Funktion : DWORD</text:p>
      <text:p text:style-name="P66"><text:span text:style-name="T15">Input</text:span><text:span text:style-name="T14"><text:tab/>BIN : STRING(40) (Oktale Zeichenkette)</text:span></text:p>
      <text:p text:style-name="P73">Output<text:tab/>DWORD (Ausgangswert)</text:p>
      <text:p text:style-name="P73"><draw:frame draw:style-name="fr3" draw:name="Grafik637" text:anchor-type="paragraph" svg:x="1.023cm" svg:y="0.035cm" svg:width="5.279cm" svg:height="0.99cm" draw:z-index="631"><draw:image xlink:href="Pictures/100000000000018F0000004B408A4D3E.png" xlink:type="simple" xlink:show="embed" xlink:actuate="onLoad"/></draw:frame><text:line-break/>Die Funktion BIN_TO_DWORD konvertiert eine binär kodierte Zeichenkette in einen BYTE Wert. Es werden dabei nur die binären Zeichen sind '0' und '1' interpretiert, alle anderen in BIN vorkommenden Zeichen werden ignoriert.</text:p>
      <text:p text:style-name="P73">Beispiel:<text:tab/>BIN_TO_DWORD('11') ergibt 3.</text:p>
      <text:list xml:id="list38461246" text:continue-numbering="true" text:style-name="L1">
        <text:list-item>
          <text:list>
            <text:list-item>
              <text:h text:style-name="P216" text:outline-level="2"><text:soft-page-break/><text:alphabetical-index-mark-start text:id="IMark225902392"/>BYTE_TO_STRB<text:alphabetical-index-mark-end text:id="IMark225902392"/></text:h>
            </text:list-item>
          </text:list>
        </text:list-item>
      </text:list>
      <text:p text:style-name="P2">Type<text:tab/><text:span text:style-name="T11">Funktion</text:span> : STRING</text:p>
      <text:p text:style-name="P66"><text:span text:style-name="T15">Input</text:span><text:span text:style-name="T14"><text:tab/>IN : BYTE (Eingangswert)</text:span></text:p>
      <text:p text:style-name="P73"><draw:frame draw:style-name="fr3" draw:name="Grafik305" text:anchor-type="paragraph" svg:x="1.032cm" svg:y="0.619cm" svg:width="5.87cm" svg:height="1.12cm" draw:z-index="264"><draw:image xlink:href="Pictures/10000000000001BC0000005559EEB8A5.png" xlink:type="simple" xlink:show="embed" xlink:actuate="onLoad"/></draw:frame>Output<text:tab/>STRING(8) (Ergebnis STRING)</text:p>
      <text:p text:style-name="P188"><text:line-break/>BYTE_TO_STRB konvertiert ein Byte in einen STRING fester Länge. Der Ausgangsstring ist exakt 8 Stellen lang und entspricht der bitweisen Schreibweise des Wertes IN. Der Ausgangsstring besteht aus den Zeichen '0' und '1'. Das <text:s/>niederwertigste Bit ist rechts im STRING. Falls ein STRING mit weniger als 8 Zeichen benötigt wird kann dieser mit der Standardfunktion RIGHT() entsprechend abgeschnitten werden. Der Aufruf RIGHT(BYTE_TO_STRB(X),4) ergibt einen STRING mit 4 Zeichen, die dem Inhalt der untersten 4 Bit von X entspricht.</text:p>
      <text:p text:style-name="P188">Beispiel:<text:tab/>BYTE_TO_STRB(3) = '00000011'</text:p>
      <text:list xml:id="list38449144" text:continue-numbering="true" text:style-name="L1">
        <text:list-item>
          <text:list>
            <text:list-item>
              <text:h text:style-name="P216" text:outline-level="2"><text:alphabetical-index-mark-start text:id="IMark225902392"/>BYTE_TO_STRH<text:alphabetical-index-mark-end text:id="IMark225902392"/></text:h>
            </text:list-item>
          </text:list>
        </text:list-item>
      </text:list>
      <text:p text:style-name="P2">Type<text:tab/><text:span text:style-name="T11">Funktion</text:span> : STRING</text:p>
      <text:p text:style-name="P66"><text:span text:style-name="T15">Input</text:span><text:span text:style-name="T14"><text:tab/>IN : BYTE (Eingangswert)</text:span></text:p>
      <text:p text:style-name="P183"><draw:frame draw:style-name="fr3" draw:name="Grafik306" text:anchor-type="paragraph" svg:x="1.048cm" svg:y="0.658cm" svg:width="5.87cm" svg:height="1.12cm" draw:z-index="265"><draw:image xlink:href="Pictures/10000000000001BC000000552A28D0FB.png" xlink:type="simple" xlink:show="embed" xlink:actuate="onLoad"/></draw:frame>Output<text:tab/>STRING(2) (Ergebnis STRING)</text:p>
      <text:p text:style-name="P188"><text:line-break/>BYTE_TO_STRH konvertiert ein Byte in einen STRING fester Länge. Der Ausgangsstring ist exakt 2 Stellen lang und entspricht der Hexadezimalen Schreibweise des Wertes von IN. Der Ausgangsstring besteht aus den Zeichen '0' .. '1' und 'A' .. 'F'. Das <text:s/>niederwertigste Zeichen steht rechts im STRING.</text:p>
      <text:p text:style-name="P164">Beispiel:<text:tab/>BYTE_TO_STRH(15) = '0F'</text:p>
      <text:list xml:id="list38443776" text:continue-numbering="true" text:style-name="L1">
        <text:list-item>
          <text:list>
            <text:list-item>
              <text:h text:style-name="P216" text:outline-level="2"><text:soft-page-break/><text:alphabetical-index-mark-start text:id="IMark225902392"/>CAPITALIZE<text:alphabetical-index-mark-end text:id="IMark225902392"/></text:h>
            </text:list-item>
          </text:list>
        </text:list-item>
      </text:list>
      <text:p text:style-name="P2">Type<text:tab/><text:span text:style-name="T11">Funktion</text:span> : STRING</text:p>
      <text:p text:style-name="P66"><text:span text:style-name="T15">Input</text:span><text:span text:style-name="T14"><text:tab/>STR : STRING (Eingangsstring)</text:span></text:p>
      <text:p text:style-name="P73"><draw:frame draw:style-name="fr3" draw:name="Grafik497" text:anchor-type="paragraph" svg:x="1.046cm" svg:y="0.667cm" svg:width="4.521cm" svg:height="1.12cm" draw:z-index="478"><draw:image xlink:href="Pictures/1000000000000156000000551DF95B3E.png" xlink:type="simple" xlink:show="embed" xlink:actuate="onLoad"/></draw:frame>Output<text:tab/>STRING (Ergebnis STRING)</text:p>
      <text:p text:style-name="P168"><text:line-break/>CAPITALIZE setzt alle Anfangsbuchstaben in STR auf Großbuchstaben. Bei der Konvertierung wird die Globale Setup Konstante EXTENDED_ASCII berücksichtigt. Wenn EXTENDED_ASCII = TRUE werden Zeichen des erweiterten ASCII Zeichensatzes nach ISO 8859-1 berücksichtigt.</text:p>
      <text:p text:style-name="P169">CAPITALIZE('hugo wallenstein') = 'Hugo Wallenstein'</text:p>
      <text:list xml:id="list38474690" text:continue-numbering="true" text:style-name="L1">
        <text:list-item>
          <text:list>
            <text:list-item>
              <text:h text:style-name="P216" text:outline-level="2"><text:alphabetical-index-mark-start text:id="IMark225902392"/>CHARCODE<text:alphabetical-index-mark-end text:id="IMark225902392"/></text:h>
            </text:list-item>
          </text:list>
        </text:list-item>
      </text:list>
      <text:p text:style-name="P2">Type<text:tab/><text:span text:style-name="T11">Funktion</text:span> : BYTE</text:p>
      <text:p text:style-name="P66"><text:span text:style-name="T15">Input</text:span><text:span text:style-name="T14"><text:tab/>STR : STRING(10) (Eingangsstring)</text:span></text:p>
      <text:p text:style-name="P73"><draw:frame draw:style-name="fr3" draw:name="Grafik566" text:anchor-type="paragraph" svg:x="1.067cm" svg:y="0.688cm" svg:width="4.521cm" svg:height="1.12cm" draw:z-index="551"><draw:image xlink:href="Pictures/10000000000001560000005532B45A0F.png" xlink:type="simple" xlink:show="embed" xlink:actuate="onLoad"/></draw:frame>Output<text:tab/>BYTE (Zeichencode)</text:p>
      <text:p text:style-name="P167"><text:span text:style-name="T19"><text:line-break/>CHARCODE liefert den Byte Code eines </text:span><text:span text:style-name="T16">Named</text:span><text:span text:style-name="T19"> </text:span><text:span text:style-name="T16">Characters. </text:span><text:span text:style-name="T19">Eine</text:span><text:span text:style-name="T16"> </text:span><text:span text:style-name="T19">Liste</text:span><text:span text:style-name="T16"> </text:span><text:span text:style-name="T19">der</text:span><text:span text:style-name="T16"> Codes </text:span><text:span text:style-name="T19">mit</text:span><text:span text:style-name="T16"> </text:span><text:span text:style-name="T19">Namen</text:span><text:span text:style-name="T16"> </text:span><text:span text:style-name="T19">befindet sich unter der Funktion CHARNAME. Falls für den Namen in STR keine Zeichenname bekannt ist wird 0 zurückgegeben. Besteht STR nur aus einem Zeichen, so wird der Code dieses Zeichens <text:s/>zurückgegeben. CHARCODE benutzt die globalen Variablen SETUP.CHARNAMES die die Liste der Namen mit Codes enthalten.</text:span></text:p>
      <text:p text:style-name="P169">Beispiel: <text:tab/>CHARCODE('euro') = 128 und entspricht dem Zeichen €</text:p>
      <text:p text:style-name="P169"><text:tab/>CHARCODE(',') = 44</text:p>
      <text:list xml:id="list38455463" text:continue-numbering="true" text:style-name="L1">
        <text:list-item>
          <text:list>
            <text:list-item>
              <text:h text:style-name="P216" text:outline-level="2"><text:soft-page-break/><text:alphabetical-index-mark-start text:id="IMark225902392"/>CHARNAME<text:alphabetical-index-mark-end text:id="IMark225902392"/></text:h>
            </text:list-item>
          </text:list>
        </text:list-item>
      </text:list>
      <text:p text:style-name="P2">Type<text:tab/><text:span text:style-name="T11">Funktion</text:span> : STRING(10)</text:p>
      <text:p text:style-name="P66"><text:span text:style-name="T15">Input</text:span><text:span text:style-name="T14"><text:tab/>C : BYTE (Zeichencode)</text:span></text:p>
      <text:p text:style-name="P73"><draw:frame draw:style-name="fr3" draw:name="Grafik567" text:anchor-type="paragraph" svg:x="1.023cm" svg:y="0.688cm" svg:width="4.521cm" svg:height="1.12cm" draw:z-index="552"><draw:image xlink:href="Pictures/10000000000001560000005532B45A0F.png" xlink:type="simple" xlink:show="embed" xlink:actuate="onLoad"/></draw:frame>Output<text:tab/>STRING (Zeichenname)</text:p>
      <text:p text:style-name="P168"><text:line-break/>CHARNAME ermittelt den Zeichennamen für einen Zeichencode.</text:p>
      <text:p text:style-name="P169"><draw:frame draw:style-name="fr26" draw:name="Objekt1" text:anchor-type="paragraph" svg:x="1.002cm" svg:y="0.66cm" svg:width="13.716cm" svg:height="16.582cm" draw:z-index="553"><draw:object xlink:href="./Object 1" xlink:type="simple" xlink:show="embed" xlink:actuate="onLoad"/><draw:image xlink:href="./ObjectReplacements/Object 1" xlink:type="simple" xlink:show="embed" xlink:actuate="onLoad"/></draw:frame>Beispiel: CHARNAME(128) = 'euro'</text:p>
      <text:p text:style-name="P169"><text:soft-page-break/>Falls für einen Code kein Name bekannt ist wird der Code als einzelnes Zeichen zurückgegeben. Für den Code 0 wird eine leere Zeichenkette zurückgegeben. CHARCODE benutzt die globalen Variablen SETUP.CHARNAMES die die Liste der Namen mit Codes enthalten.</text:p>
      <text:list xml:id="list38446964" text:continue-numbering="true" text:style-name="L1">
        <text:list-item>
          <text:list>
            <text:list-item>
              <text:h text:style-name="P216" text:outline-level="2"><text:alphabetical-index-mark-start text:id="IMark225902392"/>CHR_TO_STRING<text:alphabetical-index-mark-end text:id="IMark225902392"/></text:h>
            </text:list-item>
          </text:list>
        </text:list-item>
      </text:list>
      <text:p text:style-name="P2">Type<text:tab/><text:span text:style-name="T12">Funktion</text:span> : STRING</text:p>
      <text:p text:style-name="P66"><text:span text:style-name="T15">Input</text:span><text:span text:style-name="T14"><text:tab/>C : Byte (Eingangswert)</text:span></text:p>
      <text:p text:style-name="P73"><draw:frame draw:style-name="fr3" draw:name="Grafik231" text:anchor-type="paragraph" svg:x="1.069cm" svg:y="0.699cm" svg:width="5.669cm" svg:height="0.99cm" draw:z-index="807"><draw:image xlink:href="Pictures/10000000000001AD0000004B306E753A.png" xlink:type="simple" xlink:show="embed" xlink:actuate="onLoad"/></draw:frame>Output<text:tab/>STRING (Ergebnis STRING)</text:p>
      <text:p text:style-name="P73"><text:line-break/>CHR_TO_STRING formt ein ASCII Zeichen aus einem Byte und liefert es als einen ein Zeichen langen STRING.</text:p>
      <text:list xml:id="list38453953" text:continue-numbering="true" text:style-name="L1">
        <text:list-item>
          <text:list>
            <text:list-item>
              <text:h text:style-name="P216" text:outline-level="2"><text:alphabetical-index-mark-start text:id="IMark225902392"/>CLEAN<text:alphabetical-index-mark-end text:id="IMark225902392"/></text:h>
            </text:list-item>
          </text:list>
        </text:list-item>
      </text:list>
      <text:p text:style-name="P2">Type<text:tab/><text:span text:style-name="T12">Funktion</text:span> : STRING</text:p>
      <text:p text:style-name="P66"><text:span text:style-name="T15">Input</text:span><text:span text:style-name="T14"><text:tab/>IN : STRING (Eingangswert)</text:span></text:p>
      <text:p text:style-name="P179"><text:tab/>CX : STRING (Alle Zeichen die nicht gelöscht werden sollen)</text:p>
      <text:p text:style-name="P73"><draw:frame draw:style-name="fr3" draw:name="Grafik631" text:anchor-type="paragraph" svg:x="1.067cm" svg:y="0.667cm" svg:width="2.9cm" svg:height="1.39cm" draw:z-index="625"><draw:image xlink:href="Pictures/10000000000000DB00000069689B5570.png" xlink:type="simple" xlink:show="embed" xlink:actuate="onLoad"/></draw:frame>Output<text:tab/>STRING (Ergebnis STRING)</text:p>
      <text:p text:style-name="P183"><text:line-break/>CLEAN löscht alle Zeichen aus einer Zeichenkette die nicht in der Zeichenkette CX enthalten sind.</text:p>
      <text:p text:style-name="P183">CLEAN('Nr.1 23#', '0123456789') = '123'</text:p>
      <text:list xml:id="list38468114" text:continue-numbering="true" text:style-name="L1">
        <text:list-item>
          <text:list>
            <text:list-item>
              <text:h text:style-name="P216" text:outline-level="2"><text:soft-page-break/><text:alphabetical-index-mark-start text:id="IMark225902392"/>CODE<text:alphabetical-index-mark-end text:id="IMark225902392"/></text:h>
            </text:list-item>
          </text:list>
        </text:list-item>
      </text:list>
      <text:p text:style-name="P2">Type<text:tab/><text:span text:style-name="T12">Funktion</text:span> : BYTE</text:p>
      <text:p text:style-name="P66"><text:span text:style-name="T15">Input</text:span><text:span text:style-name="T14"><text:tab/>STR : STRING (Zeichenkette)</text:span></text:p>
      <text:p text:style-name="P179"><text:tab/>POS : INT (Position an der das Zeichen gelesen wird)</text:p>
      <text:p text:style-name="P73"><draw:frame draw:style-name="fr3" draw:name="Grafik514" text:anchor-type="paragraph" svg:x="1.046cm" svg:y="0.667cm" svg:width="3.18cm" svg:height="1.57cm" draw:z-index="493"><draw:image xlink:href="Pictures/10000000000000F000000077AEA6C437.png" xlink:type="simple" xlink:show="embed" xlink:actuate="onLoad"/></draw:frame>Output<text:tab/>BYTE (Code des Zeichens an der Position POS)</text:p>
      <text:p text:style-name="P183"><text:line-break/>CODE ermittelt den Numerischen Code eines Zeichens an der Stelle POS in STR. wird CODE mit einer Position kleiner 1 oder größer der Länge von STR aufgerufen wird 0 zurückgegeben.</text:p>
      <text:p text:style-name="P183">Beispiel: CODE('ABC 123',4) = 32 (Das Zeichen ' ' wird mit dem Wert 32 kodiert.</text:p>
      <text:list xml:id="list38463540" text:continue-numbering="true" text:style-name="L1">
        <text:list-item>
          <text:list>
            <text:list-item>
              <text:h text:style-name="P216" text:outline-level="2"><text:alphabetical-index-mark-start text:id="IMark225902392"/>COUNT_CHAR<text:alphabetical-index-mark-end text:id="IMark225902392"/></text:h>
            </text:list-item>
          </text:list>
        </text:list-item>
      </text:list>
      <text:p text:style-name="P2">Type<text:tab/><text:span text:style-name="T12">Funktion</text:span> : STRING</text:p>
      <text:p text:style-name="P66"><text:span text:style-name="T15">Input</text:span><text:span text:style-name="T14"><text:tab/>STR : STRING (Zeichenkette)</text:span></text:p>
      <text:p text:style-name="P179"><text:tab/>CHR : Byte (Suchzeichen)</text:p>
      <text:p text:style-name="P73"><draw:frame draw:style-name="fr3" draw:name="Grafik487" text:anchor-type="paragraph" svg:x="1.046cm" svg:y="0.688cm" svg:width="5.42cm" svg:height="1.57cm" draw:z-index="468"><draw:image xlink:href="Pictures/100000000000019A00000077004F76A6.png" xlink:type="simple" xlink:show="embed" xlink:actuate="onLoad"/></draw:frame>Output<text:tab/>STRING (Ergebnis STRING)</text:p>
      <text:p text:style-name="P73"><text:line-break/>COUNT_CHAR ermittelt wie oft das Zeichen CHR in der Zeichenkette STR vorkommt. Um auch nach Sonderzeichen und Steuerzeichen suchen zu können wird das Suchzeichen CHR als BYTE angegeben.</text:p>
      <text:p text:style-name="P183"/>
      <text:list xml:id="list38474641" text:continue-numbering="true" text:style-name="L1">
        <text:list-item>
          <text:list>
            <text:list-item>
              <text:h text:style-name="P216" text:outline-level="2"><text:soft-page-break/><text:alphabetical-index-mark-start text:id="IMark225902392"/>DEC_TO_BYTE<text:alphabetical-index-mark-end text:id="IMark225902392"/></text:h>
            </text:list-item>
          </text:list>
        </text:list-item>
      </text:list>
      <text:p text:style-name="P69">Type<text:tab/>Funktion : BYTE</text:p>
      <text:p text:style-name="P66"><text:span text:style-name="T15">Input</text:span><text:span text:style-name="T14"><text:tab/>DEC : STRING(10) (dezimale kodierte Zeichenkette)</text:span></text:p>
      <text:p text:style-name="P73"><draw:frame draw:style-name="fr3" draw:name="Grafik646" text:anchor-type="paragraph" svg:x="1.046cm" svg:y="0.688cm" svg:width="4.881cm" svg:height="0.99cm" draw:z-index="637"><draw:image xlink:href="Pictures/10000000000001710000004B1101EB13.png" xlink:type="simple" xlink:show="embed" xlink:actuate="onLoad"/></draw:frame>Output<text:tab/>BYTE (Ausgangswert)</text:p>
      <text:p text:style-name="P73"><text:line-break/>Die Funktion DEC_TO_BYTE konvertiert eine dezimal kodierte Zeichenkette in einen BYTE Wert. Es werden dabei nur die dezimalen Zeichen sind '0'..'9' interpretiert, alle anderen in DEC vorkommenden Zeichen werden ignoriert.</text:p>
      <text:p text:style-name="P183">Beispiel:<text:tab/>DEC_TO_BYTE('34') ergibt 34.</text:p>
      <text:list xml:id="list38460280" text:continue-numbering="true" text:style-name="L1">
        <text:list-item>
          <text:list>
            <text:list-item>
              <text:h text:style-name="P216" text:outline-level="2"><text:alphabetical-index-mark-start text:id="IMark225902392"/>DEC_TO_DWORD<text:alphabetical-index-mark-end text:id="IMark225902392"/></text:h>
            </text:list-item>
          </text:list>
        </text:list-item>
      </text:list>
      <text:p text:style-name="P69">Type<text:tab/>Funktion : DWORD</text:p>
      <text:p text:style-name="P66"><text:span text:style-name="T15">Input</text:span><text:span text:style-name="T14"><text:tab/>DEC : STRING(20) (dezimale kodierte Zeichenkette)</text:span></text:p>
      <text:p text:style-name="P73"><draw:frame draw:style-name="fr3" draw:name="Grafik647" text:anchor-type="paragraph" svg:x="1.046cm" svg:y="0.688cm" svg:width="5.279cm" svg:height="0.99cm" draw:z-index="636"><draw:image xlink:href="Pictures/100000000000018F0000004B88033294.png" xlink:type="simple" xlink:show="embed" xlink:actuate="onLoad"/></draw:frame>Output<text:tab/>DWORD (Ausgangswert)</text:p>
      <text:p text:style-name="P73"><text:line-break/>Die Funktion DEC_TO_DWORD konvertiert eine dezimal kodierte Zeichenkette in einen BYTE Wert. Es werden dabei nur die dezimalen Zeichen sind '0'..'9' interpretiert, alle anderen in DEC vorkommenden Zeichen werden ignoriert.</text:p>
      <text:p text:style-name="P183">Beispiel:<text:tab/>DEC_TO_DWORD('34') ergibt 34.</text:p>
      <text:p text:style-name="P183"/>
      <text:p text:style-name="P183"/>
      <text:p text:style-name="P183"/>
      <text:list xml:id="list38462801" text:continue-numbering="true" text:style-name="L1">
        <text:list-item>
          <text:list>
            <text:list-item>
              <text:h text:style-name="P216" text:outline-level="2"><text:soft-page-break/><text:alphabetical-index-mark-start text:id="IMark225902392"/>DEC_TO_INT<text:alphabetical-index-mark-end text:id="IMark225902392"/></text:h>
            </text:list-item>
          </text:list>
        </text:list-item>
      </text:list>
      <text:p text:style-name="P69">Type<text:tab/>Funktion : INT</text:p>
      <text:p text:style-name="P66"><text:span text:style-name="T15">Input</text:span><text:span text:style-name="T14"><text:tab/>DEC : STRING(10) (dezimale kodierte Zeichenkette)</text:span></text:p>
      <text:p text:style-name="P73"><draw:frame draw:style-name="fr3" draw:name="Grafik648" text:anchor-type="paragraph" svg:x="1.069cm" svg:y="0.695cm" svg:width="4.48cm" svg:height="0.99cm" draw:z-index="635"><draw:image xlink:href="Pictures/10000000000001530000004B6F217B9B.png" xlink:type="simple" xlink:show="embed" xlink:actuate="onLoad"/></draw:frame>Output<text:tab/>INT (Ausgangswert)</text:p>
      <text:p text:style-name="P73"><text:line-break/>Die Funktion DEC_TO_INT konvertiert eine dezimal kodierte Zeichenkette in einen BYTE Wert. Es werden dabei nur die dezimalen Zeichen sind '0'..'9' und '-' interpretiert, alle anderen in DEC vorkommenden Zeichen werden ignoriert.</text:p>
      <text:p text:style-name="P183">Beispiel:<text:tab/>DEC_TO_INT('-34') ergibt -34.</text:p>
      <text:list xml:id="list38446544" text:continue-numbering="true" text:style-name="L1">
        <text:list-item>
          <text:list>
            <text:list-item>
              <text:h text:style-name="P216" text:outline-level="2"><text:alphabetical-index-mark-start text:id="IMark225902392"/>DEL_CHARS<text:alphabetical-index-mark-end text:id="IMark225902392"/></text:h>
            </text:list-item>
          </text:list>
        </text:list-item>
      </text:list>
      <text:p text:style-name="P2">Type<text:tab/><text:span text:style-name="T12">Funktion</text:span> : STRING</text:p>
      <text:p text:style-name="P66"><text:span text:style-name="T15">Input</text:span><text:span text:style-name="T14"><text:tab/>IN : STRING (Eingangswert)</text:span></text:p>
      <text:p text:style-name="P179"><text:tab/>CX : STRING (Alle Zeichen die gelöscht werden sollen)</text:p>
      <text:p text:style-name="P73"><draw:frame draw:style-name="fr3" draw:name="Grafik632" text:anchor-type="paragraph" svg:x="1.023cm" svg:y="0.688cm" svg:width="4.09cm" svg:height="1.39cm" draw:z-index="626"><draw:image xlink:href="Pictures/100000000000013500000069432143A6.png" xlink:type="simple" xlink:show="embed" xlink:actuate="onLoad"/></draw:frame>Output<text:tab/>STRING (Ergebnis STRING)</text:p>
      <text:p text:style-name="P183"><text:line-break/>DEL_CHARS löscht alle Zeichen aus einer Zeichenkette die in der Zeichenkette CX enthalten sind.</text:p>
      <text:p text:style-name="P183">CLEAN('Nr.1 23#', ' #ABCDEFG') = 'Nr.123'</text:p>
      <text:p text:style-name="P183"/>
      <text:p text:style-name="P183"/>
      <text:list xml:id="list38470452" text:continue-numbering="true" text:style-name="L1">
        <text:list-item>
          <text:list>
            <text:list-item>
              <text:h text:style-name="P216" text:outline-level="2"><text:soft-page-break/><text:alphabetical-index-mark-start text:id="IMark225902392"/>DT_TO_STRF<text:alphabetical-index-mark-end text:id="IMark225902392"/></text:h>
            </text:list-item>
          </text:list>
        </text:list-item>
      </text:list>
      <text:p text:style-name="P2">Type<text:tab/><text:span text:style-name="T12">Funktion</text:span> : STRING</text:p>
      <text:p text:style-name="P66"><text:span text:style-name="T15">Input</text:span><text:span text:style-name="T14"><text:tab/>DTI : DT (Datum und Zeit Eingangswert)</text:span></text:p>
      <text:p text:style-name="P179"><text:tab/>MS : INT (Millisekunden Eingang)</text:p>
      <text:p text:style-name="P179"><text:tab/>FMT : STRING (Vorgabe für Ausgangs Format)</text:p>
      <text:p text:style-name="P179"><text:tab/>FILL : STRING(1) (Füllzeichen)</text:p>
      <text:p text:style-name="P179"><text:tab/>LANG : INT (Sprachvorgabe)</text:p>
      <text:p text:style-name="P66"><draw:frame draw:style-name="fr3" draw:name="Grafik684" text:anchor-type="paragraph" svg:x="1.025cm" svg:y="0.676cm" svg:width="4.971cm" svg:height="2.919cm" draw:z-index="692"><draw:image xlink:href="Pictures/1000000000000178000000DDB59A5580.png" xlink:type="simple" xlink:show="embed" xlink:actuate="onLoad"/></draw:frame><text:span text:style-name="T21">Output<text:tab/>STRING(32) (Ergebnis </text:span><text:span text:style-name="T16">String</text:span><text:span text:style-name="T21">)</text:span></text:p>
      <text:p text:style-name="P173"><text:span text:style-name="T21"><text:line-break/>DT_TO_STRF konvertiert einen DATETIME Wert in eine f</text:span><text:span text:style-name="T19">ormatierte</text:span><text:span text:style-name="T21"> Zeichenkette. Am Eingang DTI liegt der zu konvertierende DATETIME Wert an und mit der Zeichenkette FMT wird das entsprechende Ausgangsformat bestimmt. Der Eingang LANG bestimmt dabei die zu benutzende Sprache (0= LANGUAGE_DEFAULT, 1= Englisch und 2 = Deutsch). Die Spracheinstellungen werden im entsprechenden Absatz der Globalen Konstanten vorgenommen und können dort angepasst oder Erweitert werden. Zusätzlich zu Datum und Zeit können am Eingang MS auch Millisekunden verarbeitet werden.</text:span></text:p>
      <text:p text:style-name="P183">Die erzeugte Zeichenkette entspricht der Zeichenkette FMT wobei in der Zeichenkette alle Zeichen '#' gefolgt von einem Großbuchstaben mit dem entsprechenden Wert ersetzt werden. Die folgende Tabelle definiert die Formatierungszeichen:</text:p>
      <table:table table:name="Tabelle41" table:style-name="Tabelle41">
        <table:table-column table:style-name="Tabelle41.A"/>
        <table:table-column table:style-name="Tabelle41.B"/>
        <table:table-row>
          <table:table-cell table:style-name="Tabelle41.A1" office:value-type="string">
            <text:p text:style-name="P103">#A</text:p>
          </table:table-cell>
          <table:table-cell table:style-name="Tabelle41.B1" office:value-type="string">
            <text:p text:style-name="P103">Jahreszahl mit 4 Stellen (2008)</text:p>
          </table:table-cell>
        </table:table-row>
        <table:table-row>
          <table:table-cell table:style-name="Tabelle41.A2" office:value-type="string">
            <text:p text:style-name="P103">#B</text:p>
          </table:table-cell>
          <table:table-cell table:style-name="Tabelle41.B2" office:value-type="string">
            <text:p text:style-name="P103">Jahreszahl 2-Stellig z.B. (08)</text:p>
          </table:table-cell>
        </table:table-row>
        <table:table-row>
          <table:table-cell table:style-name="Tabelle41.A2" office:value-type="string">
            <text:p text:style-name="P103">#C</text:p>
          </table:table-cell>
          <table:table-cell table:style-name="Tabelle41.B2" office:value-type="string">
            <text:p text:style-name="P103">Monat 1-2 Stellig (1,12)</text:p>
          </table:table-cell>
        </table:table-row>
        <table:table-row>
          <table:table-cell table:style-name="Tabelle41.A2" office:value-type="string">
            <text:p text:style-name="P103">#D</text:p>
          </table:table-cell>
          <table:table-cell table:style-name="Tabelle41.B2" office:value-type="string">
            <text:p text:style-name="P103">Monat 2 Stellig (01, 12) die 0 oder ein anders Zeichen muss am Eingang FILL anliegen.</text:p>
          </table:table-cell>
        </table:table-row>
        <table:table-row>
          <table:table-cell table:style-name="Tabelle41.A2" office:value-type="string">
            <text:p text:style-name="P103">#E</text:p>
          </table:table-cell>
          <table:table-cell table:style-name="Tabelle41.B2" office:value-type="string">
            <text:p text:style-name="P103">Monat 3 Buchstaben (Jan) </text:p>
          </table:table-cell>
        </table:table-row>
        <table:table-row>
          <table:table-cell table:style-name="Tabelle41.A2" office:value-type="string">
            <text:p text:style-name="P103">#F</text:p>
          </table:table-cell>
          <table:table-cell table:style-name="Tabelle41.B2" office:value-type="string">
            <text:p text:style-name="P103">Monat ausgeschrieben (Januar)</text:p>
          </table:table-cell>
        </table:table-row>
        <table:table-row>
          <table:table-cell table:style-name="Tabelle41.A2" office:value-type="string">
            <text:p text:style-name="P103">#G</text:p>
          </table:table-cell>
          <table:table-cell table:style-name="Tabelle41.B2" office:value-type="string">
            <text:p text:style-name="P103">Tag 1 oder 2 stellig (1, 31)</text:p>
          </table:table-cell>
        </table:table-row>
        <table:table-row>
          <table:table-cell table:style-name="Tabelle41.A2" office:value-type="string">
            <text:p text:style-name="P103">#H</text:p>
          </table:table-cell>
          <table:table-cell table:style-name="Tabelle41.B2" office:value-type="string">
            <text:p text:style-name="P103">Tag 2 Stellig (01, 31) die 0 oder ein anders Zeichen muss am Eingang FILL anliegen.</text:p>
          </table:table-cell>
        </table:table-row>
        <table:table-row>
          <table:table-cell table:style-name="Tabelle41.A2" office:value-type="string">
            <text:p text:style-name="P103">#I</text:p>
          </table:table-cell>
          <table:table-cell table:style-name="Tabelle41.B2" office:value-type="string">
            <text:p text:style-name="P103">Wochentag als Zahl (1 = Montag, 7= Sonntag)</text:p>
          </table:table-cell>
        </table:table-row>
        <text:soft-page-break/>
        <table:table-row>
          <table:table-cell table:style-name="Tabelle41.A2" office:value-type="string">
            <text:p text:style-name="P103">#J</text:p>
          </table:table-cell>
          <table:table-cell table:style-name="Tabelle41.B2" office:value-type="string">
            <text:p text:style-name="P103">Wochentag 2 Buchstaben (Mo)</text:p>
          </table:table-cell>
        </table:table-row>
        <table:table-row>
          <table:table-cell table:style-name="Tabelle41.A2" office:value-type="string">
            <text:p text:style-name="P103">#K</text:p>
          </table:table-cell>
          <table:table-cell table:style-name="Tabelle41.B2" office:value-type="string">
            <text:p text:style-name="P103">Wochentag ausgeschrieben (Montag)</text:p>
          </table:table-cell>
        </table:table-row>
        <table:table-row>
          <table:table-cell table:style-name="Tabelle41.A2" office:value-type="string">
            <text:p text:style-name="P103">#L</text:p>
          </table:table-cell>
          <table:table-cell table:style-name="Tabelle41.B2" office:value-type="string">
            <text:p text:style-name="P103">AM oder PM für Amerikanische Datumsformate</text:p>
          </table:table-cell>
        </table:table-row>
        <table:table-row>
          <table:table-cell table:style-name="Tabelle41.A2" office:value-type="string">
            <text:p text:style-name="P103">#M</text:p>
          </table:table-cell>
          <table:table-cell table:style-name="Tabelle41.B2" office:value-type="string">
            <text:p text:style-name="P103">Stunde in 24 Stunden Format 1 - 2 Stellig (0, 23)</text:p>
          </table:table-cell>
        </table:table-row>
        <table:table-row>
          <table:table-cell table:style-name="Tabelle41.A2" office:value-type="string">
            <text:p text:style-name="P103">#N</text:p>
          </table:table-cell>
          <table:table-cell table:style-name="Tabelle41.B2" office:value-type="string">
            <text:p text:style-name="P103">Stunde in 24 Stunden Format 2 Stellig (00, 23) die 0 oder ein anders Zeichen muss am Eingang FILL anliegen.</text:p>
          </table:table-cell>
        </table:table-row>
        <table:table-row>
          <table:table-cell table:style-name="Tabelle41.A2" office:value-type="string">
            <text:p text:style-name="P103">#O</text:p>
          </table:table-cell>
          <table:table-cell table:style-name="Tabelle41.B2" office:value-type="string">
            <text:p text:style-name="P103">Stunde in 12 Stunden Format 1 - 2 Stellig (1, 12)</text:p>
          </table:table-cell>
        </table:table-row>
        <table:table-row>
          <table:table-cell table:style-name="Tabelle41.A2" office:value-type="string">
            <text:p text:style-name="P103">#P</text:p>
          </table:table-cell>
          <table:table-cell table:style-name="Tabelle41.B2" office:value-type="string">
            <text:p text:style-name="P103">Stunde in 12 Stunden Format 2 Stellig (01, 12) die 0 oder ein anders Zeichen muss am Eingang FILL anliegen.</text:p>
          </table:table-cell>
        </table:table-row>
        <table:table-row>
          <table:table-cell table:style-name="Tabelle41.A2" office:value-type="string">
            <text:p text:style-name="P103">#Q</text:p>
          </table:table-cell>
          <table:table-cell table:style-name="Tabelle41.B2" office:value-type="string">
            <text:p text:style-name="P103">Minuten 1 - 2 Stellig (0, 59)</text:p>
          </table:table-cell>
        </table:table-row>
        <table:table-row>
          <table:table-cell table:style-name="Tabelle41.A2" office:value-type="string">
            <text:p text:style-name="P103">#R</text:p>
          </table:table-cell>
          <table:table-cell table:style-name="Tabelle41.B2" office:value-type="string">
            <text:p text:style-name="P103">Minuten 2 Stellig (00, 59) die 0 oder ein anders Zeichen muss am Eingang FILL anliegen.</text:p>
          </table:table-cell>
        </table:table-row>
        <table:table-row>
          <table:table-cell table:style-name="Tabelle41.A2" office:value-type="string">
            <text:p text:style-name="P103">#S</text:p>
          </table:table-cell>
          <table:table-cell table:style-name="Tabelle41.B2" office:value-type="string">
            <text:p text:style-name="P103">Sekunden 1 - 2 Stellig (0, 59)</text:p>
          </table:table-cell>
        </table:table-row>
        <table:table-row>
          <table:table-cell table:style-name="Tabelle41.A2" office:value-type="string">
            <text:p text:style-name="P103">#T</text:p>
          </table:table-cell>
          <table:table-cell table:style-name="Tabelle41.B2" office:value-type="string">
            <text:p text:style-name="P103">Sekunden 2 Stellig (00, 59) die 0 oder ein anders Zeichen muss am Eingang FILL anliegen.</text:p>
          </table:table-cell>
        </table:table-row>
        <table:table-row>
          <table:table-cell table:style-name="Tabelle41.A2" office:value-type="string">
            <text:p text:style-name="P103">#U</text:p>
          </table:table-cell>
          <table:table-cell table:style-name="Tabelle41.B2" office:value-type="string">
            <text:p text:style-name="P103">Millisekunden 1 - 3 Stellig (0, 999)</text:p>
          </table:table-cell>
        </table:table-row>
        <table:table-row>
          <table:table-cell table:style-name="Tabelle41.A2" office:value-type="string">
            <text:p text:style-name="P103">#V</text:p>
          </table:table-cell>
          <table:table-cell table:style-name="Tabelle41.B2" office:value-type="string">
            <text:p text:style-name="P103">Millisekunden 3 Stellig (000, 999) die 0 oder ein anders Zeichen muss am Eingang FILL anliegen.</text:p>
          </table:table-cell>
        </table:table-row>
        <table:table-row>
          <table:table-cell table:style-name="Tabelle41.A2" office:value-type="string">
            <text:p text:style-name="P103">#W</text:p>
          </table:table-cell>
          <table:table-cell table:style-name="Tabelle41.B2" office:value-type="string">
            <text:p text:style-name="P103">Tag 2 Stellig aber vorne mit Blank aufgefüllt (' 1' ..'31')</text:p>
          </table:table-cell>
        </table:table-row>
        <table:table-row>
          <table:table-cell table:style-name="Tabelle41.A2" office:value-type="string">
            <text:p text:style-name="P103">#X</text:p>
          </table:table-cell>
          <table:table-cell table:style-name="Tabelle41.B2" office:value-type="string">
            <text:p text:style-name="P103">Monat 2 Stellig aber vorne mit Blank aufgefüllt (' 1' ..'12')</text:p>
          </table:table-cell>
        </table:table-row>
      </table:table>
      <text:p text:style-name="P183"/>
      <text:p text:style-name="P183">Beispiele:</text:p>
      <text:p text:style-name="P183">DT_TO_STRF(DT#2008-1-1, 'Datum '#C. #F #A', 2) = '1. Januar 2008'</text:p>
      <text:p text:style-name="P183">DT_TO_STRF(DT#2008-1-1-13:43:12, '#J #M:#Q am #C. #E #A', 2) = </text:p>
      <text:p text:style-name="P183"><text:tab/>'Di 13:43 am 1. Jan 2008'</text:p>
      <text:p text:style-name="P183"/>
      <text:p text:style-name="P183"/>
      <text:p text:style-name="P183"/>
      <text:p text:style-name="P183"/>
      <text:list xml:id="list38446251" text:continue-numbering="true" text:style-name="L1">
        <text:list-item>
          <text:list>
            <text:list-item>
              <text:h text:style-name="P216" text:outline-level="2"><text:soft-page-break/><text:alphabetical-index-mark-start text:id="IMark225902392"/>DWORD_TO_STRB<text:alphabetical-index-mark-end text:id="IMark225902392"/></text:h>
            </text:list-item>
          </text:list>
        </text:list-item>
      </text:list>
      <text:p text:style-name="P2">Type<text:tab/><text:span text:style-name="T12">Funktion</text:span> : STRING</text:p>
      <text:p text:style-name="P66">Input<text:span text:style-name="T14"><text:tab/>IN : DWORD (Eingangswert)</text:span></text:p>
      <text:p text:style-name="P73"><draw:frame draw:style-name="fr3" draw:name="Grafik303" text:anchor-type="paragraph" svg:x="1.074cm" svg:y="0.663cm" svg:width="6.77cm" svg:height="1.12cm" draw:z-index="263"><draw:image xlink:href="Pictures/100000000000020000000055A61AE4B1.png" xlink:type="simple" xlink:show="embed" xlink:actuate="onLoad"/></draw:frame>Output<text:tab/>STRING(32) (Ergebnis String)</text:p>
      <text:p text:style-name="P188"><text:line-break/>DWORD_TO_STRB konvertiert ein DWORD, Word oder Byte in einen STRING fester Länge. Der Ausgangsstring ist exakt 32 Stellen lang und entspricht der bitweisen Schreibweise des Wertes IN. Der Ausgangsstring besteht aus den Zeichen '0' und '1'. Das <text:s/>niederwertigste Bit steht links im STRING. DWORD_TO_STRB kann als Input Byte, Word und DWORD Typen verarbeiten. Der Ausgang ist aber unabhängig vom Eingangstyp immer ein STRING mit 32 Zeichen. Falls ein kürzerer STRING benötigt wird, kann dieser mit der Standard Funktion RIGHT() entsprechend abgeschnitten werden. Der Aufruf RIGHT(DWORD_TO_STRB(X),8) ergibt einen STRING mit 8 Zeichen die dem Inhalt des untersten Bytes von X entsprechen.</text:p>
      <text:p text:style-name="P165">Beispiel:<text:tab/>DWORD_TO_STRB(127) = '00000000000000000000000001111111'</text:p>
      <text:list xml:id="list38474248" text:continue-numbering="true" text:style-name="L1">
        <text:list-item>
          <text:list>
            <text:list-item>
              <text:h text:style-name="P216" text:outline-level="2"><text:alphabetical-index-mark-start text:id="IMark225902392"/>DWORD_TO_STRF<text:alphabetical-index-mark-end text:id="IMark225902392"/></text:h>
            </text:list-item>
          </text:list>
        </text:list-item>
      </text:list>
      <text:p text:style-name="P69">Type<text:tab/>Funktion : STRING</text:p>
      <text:p text:style-name="P66"><text:span text:style-name="T15">Input</text:span><text:span text:style-name="T14"><text:tab/>IN : DWORD (Eingangswert)</text:span></text:p>
      <text:p text:style-name="P179"><text:tab/>N : Int (Länge des Ergebnis Strings)</text:p>
      <text:p text:style-name="P73"><draw:frame draw:style-name="fr3" draw:name="Grafik230" text:anchor-type="paragraph" svg:x="1.092cm" svg:y="0.691cm" svg:width="6.77cm" svg:height="1.57cm" draw:z-index="190"><draw:image xlink:href="Pictures/100000000000020000000077F00DC735.png" xlink:type="simple" xlink:show="embed" xlink:actuate="onLoad"/></draw:frame>Output<text:tab/>STRING (Ergebnis String)</text:p>
      <text:p text:style-name="P173"><text:line-break/>DWORD_TO_STRF konvertiert ein DWORD, Word oder Byte in einen STRING fester Länge. Der Ausgangsstring ist exakt N Stellen lang, wobei führende Nullen eingefügt werden oder führende Stellen abgeschnitten werden. Die maximale erlaubte Länge N ist 20 Digits.</text:p>
      <text:p text:style-name="P170"><text:soft-page-break/><text:line-break/>Beispiel:<text:tab/>DWORD_TO_STRF(5123, 6) = '005123'<text:line-break/><text:tab/>DWORD_TO_STRF(5123, 3) = '123'</text:p>
      <text:list xml:id="list38443709" text:continue-numbering="true" text:style-name="L1">
        <text:list-item>
          <text:list>
            <text:list-item>
              <text:h text:style-name="P216" text:outline-level="2"><text:alphabetical-index-mark-start text:id="IMark225902392"/>DWORD_TO_STRH<text:alphabetical-index-mark-end text:id="IMark225902392"/></text:h>
            </text:list-item>
          </text:list>
        </text:list-item>
      </text:list>
      <text:p text:style-name="P2">Type<text:tab/><text:span text:style-name="T12">Funktion</text:span> : STRING</text:p>
      <text:p text:style-name="P66"><text:span text:style-name="T15">Input</text:span><text:span text:style-name="T14"><text:tab/>IN : DWORD (Eingangswert)</text:span></text:p>
      <text:p text:style-name="P66"><draw:frame draw:style-name="fr3" draw:name="Grafik304" text:anchor-type="paragraph" svg:x="0.982cm" svg:y="0.642cm" svg:width="6.77cm" svg:height="1.12cm" draw:z-index="262"><draw:image xlink:href="Pictures/100000000000020000000055CC4855F7.png" xlink:type="simple" xlink:show="embed" xlink:actuate="onLoad"/></draw:frame><text:span text:style-name="T21">Output<text:tab/>STRING(8) (Ergebnis </text:span><text:span text:style-name="T16">String</text:span><text:span text:style-name="T21">)</text:span></text:p>
      <text:p text:style-name="P173"><text:line-break/>DWORD_TO_STRH konvertiert ein DWORD, Word oder Byte in einen STRING fester Länge. Der Ausgangsstring ist exakt 8 Stellen lang und entspricht der hexadezimalen Schreibweise des Wertes IN. Der Ausgangsstring besteht aus den Zeichen '0' .. '1' und 'A' .. 'F'. Das niederwertigste Hexadezimal-Zeichen steht rechts im STRING. DWORD_TO_STRH kann als Input Byte, Word und DWORD Typen verarbeiten. Der Ausgang ist aber unabhängig vom Eingangstyp immer ein STRING mit 32 Zeichen. Falls ein kürzerer STRING benötigt wird, kann dieser mit der Standardfunktion RIGHT() entsprechend abgeschnitten werden. Der Aufruf RIGHT(DWORD_TO_STRH(X),4) ergibt einen STRING mit 4 Zeichen die dem Inhalt der untersten 2 Bytes von X entsprechen.</text:p>
      <text:p text:style-name="P166">Beispiel:<text:tab/>DWORD_TO_STRH(127) = '0000007F'</text:p>
      <text:list xml:id="list38469182" text:continue-numbering="true" text:style-name="L1">
        <text:list-item>
          <text:list>
            <text:list-item>
              <text:h text:style-name="P216" text:outline-level="2"><text:alphabetical-index-mark-start text:id="IMark225902392"/>EXEC<text:alphabetical-index-mark-end text:id="IMark225902392"/></text:h>
            </text:list-item>
          </text:list>
        </text:list-item>
      </text:list>
      <text:p text:style-name="P69">Type<text:tab/>Funktion : STRING</text:p>
      <text:p text:style-name="P66"><text:span text:style-name="T15">Input</text:span><text:span text:style-name="T14"><text:tab/>STR : STRING (Eingabe STRING)</text:span></text:p>
      <text:p text:style-name="P73"><draw:frame draw:style-name="fr3" draw:name="Grafik43" text:anchor-type="paragraph" svg:x="1.087cm" svg:y="0.684cm" svg:width="2.281cm" svg:height="1.12cm" draw:z-index="30"><draw:image xlink:href="Pictures/10000000000000AC00000055753EEDAC.png" xlink:type="simple" xlink:show="embed" xlink:actuate="onLoad"/></draw:frame>Output<text:tab/>STRING (Ergebnis STRING)</text:p>
      <text:p text:style-name="P73"><text:line-break/>Die Funktion EXEC arbeitet Mathematische Ausdrücke ab und liefert das Er<text:soft-page-break/>gebnis als STRING zurück. Der Ausdruck darf nur ein einfacher Ausdruck mit einem Operator und ohne Klammern sein. Bei Fehlern, wie zum Beispiel einem Teilen durch Null liefert EXEC den Rückgabestring 'ERROR'.</text:p>
      <text:p text:style-name="P73">Die zulässigen Operatoren sind:<text:tab/>+, - *, /, ^, SIN, COS, TAN, SQRT.</text:p>
      <text:p text:style-name="P73">Als Zahlen sind REAL und Integer-Zahlen zulässig.</text:p>
      <text:p text:style-name="P73">Beispiel:<text:tab/>EXEC('3^2') = '9'</text:p>
      <text:p text:style-name="P73"><text:tab/>EXEC('4-2') = '2'</text:p>
      <text:list xml:id="list38456360" text:continue-numbering="true" text:style-name="L1">
        <text:list-item>
          <text:list>
            <text:list-item>
              <text:h text:style-name="P216" text:outline-level="2"><text:alphabetical-index-mark-start text:id="IMark225902392"/>FILL<text:alphabetical-index-mark-end text:id="IMark225902392"/></text:h>
            </text:list-item>
          </text:list>
        </text:list-item>
      </text:list>
      <text:p text:style-name="P69">Type<text:tab/>Funktion : STRING</text:p>
      <text:p text:style-name="P66"><text:span text:style-name="T15">Input</text:span><text:span text:style-name="T14"><text:tab/>C : BYTE (</text:span><text:span text:style-name="T15">Character</text:span><text:span text:style-name="T14"> Code)</text:span></text:p>
      <text:p text:style-name="P179"><text:tab/>L : INT (Länge der Zeichenkette)</text:p>
      <text:p text:style-name="P73"><draw:frame draw:style-name="fr3" draw:name="Grafik537" text:anchor-type="paragraph" svg:x="1.069cm" svg:y="0.688cm" svg:width="2.281cm" svg:height="1.57cm" draw:z-index="521"><draw:image xlink:href="Pictures/10000000000000AC00000077A47A6952.png" xlink:type="simple" xlink:show="embed" xlink:actuate="onLoad"/></draw:frame>Output<text:tab/>STRING (Ergebnis STRING)</text:p>
      <text:p text:style-name="P183"><text:line-break/>FILL erzeugt eine Zeichenkette bestehend aus dem Zeichen C mit der Länge L.</text:p>
      <text:p text:style-name="P183">FILL(49,5) = '11111'</text:p>
      <text:p text:style-name="P183">Die Funktion FILL wertet auch die Globale Setup Konstante STRING_LENGTH aus und begrenzt die maximale Länge L der Zeichenkette auf STRING_LENGTH.</text:p>
      <text:list xml:id="list38463137" text:continue-numbering="true" text:style-name="L1">
        <text:list-item>
          <text:list>
            <text:list-item>
              <text:h text:style-name="P216" text:outline-level="2"><text:alphabetical-index-mark-start text:id="IMark225902392"/>FIND_CHAR<text:alphabetical-index-mark-end text:id="IMark225902392"/></text:h>
            </text:list-item>
          </text:list>
        </text:list-item>
      </text:list>
      <text:p text:style-name="P69">Type<text:tab/>Funktion : INT</text:p>
      <text:p text:style-name="P173"><text:span text:style-name="T15">Input</text:span><text:span text:style-name="T14"><text:tab/>STR : STRING (Eingabe STRING)</text:span></text:p>
      <text:p text:style-name="P179"><text:tab/>POS : INT (Startposition)</text:p>
      <text:p text:style-name="P73"><draw:frame draw:style-name="fr3" draw:name="Grafik485" text:anchor-type="paragraph" svg:x="1.023cm" svg:y="0.614cm" svg:width="4.09cm" svg:height="1.39cm" draw:z-index="464"><draw:image xlink:href="Pictures/1000000000000135000000699422C29F.png" xlink:type="simple" xlink:show="embed" xlink:actuate="onLoad"/></draw:frame>Output<text:tab/>INT (Position des ersten Zeichens das kein Steuerzeichen ist)</text:p>
      <text:p text:style-name="P183"><text:soft-page-break/><text:line-break/>FIND_CHAR durchsucht die Zeichenkette STR ab der Position POS und gibt die Position zurück an der das erste Zeichen steht das kein Steuerzeichen ist. Steuerzeichen sind alle Zeichen deren Wert kleiner 32 oder 127 ist. Bei der Prüfung wird die Globale Setup Konstante EXTENDED_ASCII berücksichtigt. Wenn EXTENDED_ASCII = TRUE ist werden Zeichen des erweiterten ASCII Zeichensatzes nach ISO 8859-1 berücksichtigt. Umlaute wie Ä,Ö,Ü werden nur dann berücksichtigt wenn die Globale Konstante <text:s/>EXTENDED_ASCII = TRUE ist. Wenn EXTENDED_ASCII = FALSE ist werden Zeichen des erweiterten Zeichensatzes mit einem Wert &gt; 127 als Steuerzeichen interpretiert.</text:p>
      <text:list xml:id="list38470475" text:continue-numbering="true" text:style-name="L1">
        <text:list-item>
          <text:list>
            <text:list-item>
              <text:h text:style-name="P216" text:outline-level="2"><text:alphabetical-index-mark-start text:id="IMark225902392"/>FIND_CTRL<text:alphabetical-index-mark-end text:id="IMark225902392"/></text:h>
            </text:list-item>
          </text:list>
        </text:list-item>
      </text:list>
      <text:p text:style-name="P69">Type<text:tab/>Funktion : INT</text:p>
      <text:p text:style-name="P173"><text:span text:style-name="T15">Input</text:span><text:span text:style-name="T14"><text:tab/>STR : STRING (Eingabe STRING)</text:span></text:p>
      <text:p text:style-name="P179"><text:tab/>POS : INT (Startposition)</text:p>
      <text:p text:style-name="P73"><draw:frame draw:style-name="fr3" draw:name="Grafik486" text:anchor-type="paragraph" svg:x="1.046cm" svg:y="0.667cm" svg:width="4.09cm" svg:height="1.39cm" draw:z-index="465"><draw:image xlink:href="Pictures/100000000000013500000069E528D1A3.png" xlink:type="simple" xlink:show="embed" xlink:actuate="onLoad"/></draw:frame>Output<text:tab/>INT (Position des ersten Zeichens das ein Steuerzeichen ist)</text:p>
      <text:p text:style-name="P73"><text:line-break/>FIND_CTRL durchsucht die Zeichenkette STR ab der Position POS und gibt die Position zurück an der das nächste Steuerzeichen steht. Steuerzeichen sind alle Zeichen deren Wert kleiner 32 oder 127 ist.</text:p>
      <text:list xml:id="list38453248" text:continue-numbering="true" text:style-name="L1">
        <text:list-item>
          <text:list>
            <text:list-item>
              <text:h text:style-name="P216" text:outline-level="2"><text:alphabetical-index-mark-start text:id="IMark225902392"/>FIND_NONUM<text:alphabetical-index-mark-end text:id="IMark225902392"/></text:h>
            </text:list-item>
          </text:list>
        </text:list-item>
      </text:list>
      <text:p text:style-name="P69">Type<text:tab/>Funktion : INT</text:p>
      <text:p text:style-name="P66"><text:span text:style-name="T15">Input</text:span><text:span text:style-name="T14"><text:tab/>STR : STRING (Eingabestring)</text:span></text:p>
      <text:p text:style-name="P179"><text:tab/>POS : INT (Position an der die Suche beginnt)</text:p>
      <text:p text:style-name="P73"><draw:frame draw:style-name="fr3" draw:name="Grafik44" text:anchor-type="paragraph" svg:x="1.023cm" svg:y="0.667cm" svg:width="4.48cm" svg:height="1.39cm" draw:z-index="466"><draw:image xlink:href="Pictures/100000000000015300000069BB7FFC73.png" xlink:type="simple" xlink:show="embed" xlink:actuate="onLoad"/></draw:frame>Output<text:tab/>INT (Position des ersten Zeichens, das keine Zahl oder Punkt ist)</text:p>
      <text:p text:style-name="P73"><text:soft-page-break/><text:line-break/>Die Funktion FIND_NONUM durchsucht STR ab der Startposition POS von links nach rechts und liefert die erste Stelle die keine Nummer ist zurück.</text:p>
      <text:p text:style-name="P73">Nummern sind die Buchstaben "0..9" und "."</text:p>
      <text:p text:style-name="P73">Beispiel:<text:tab/>FIND_NONUM('4+33',1) = 2</text:p>
      <text:list xml:id="list38473231" text:continue-numbering="true" text:style-name="L1">
        <text:list-item>
          <text:list>
            <text:list-item>
              <text:h text:style-name="P216" text:outline-level="2"><text:alphabetical-index-mark-start text:id="IMark225902392"/>FIND_NUM<text:alphabetical-index-mark-end text:id="IMark225902392"/></text:h>
            </text:list-item>
          </text:list>
        </text:list-item>
      </text:list>
      <text:p text:style-name="P69">Type<text:tab/>Funktion : INT</text:p>
      <text:p text:style-name="P173"><text:span text:style-name="T15">Input</text:span><text:span text:style-name="T14"><text:tab/>STR : STRING (Eingabestring)</text:span></text:p>
      <text:p text:style-name="P179"><text:tab/>POS : INT (Position an der die Suche beginnt)</text:p>
      <text:p text:style-name="P73">Output<text:tab/>INT (Position des ersten Zeichens, das eine Zahl oder Punkt ist)</text:p>
      <text:p text:style-name="P73"><draw:frame draw:style-name="fr3" draw:name="Grafik45" text:anchor-type="paragraph" svg:x="1.069cm" svg:y="0.064cm" svg:width="3.69cm" svg:height="1.39cm" draw:z-index="467"><draw:image xlink:href="Pictures/100000000000011700000069DBD267B1.png" xlink:type="simple" xlink:show="embed" xlink:actuate="onLoad"/></draw:frame><text:line-break/>Die Funktion FIND_NUM durchsucht STR ab der Position POS von links nach rechts und liefert die erste Stelle die eine Nummer ist zurück.</text:p>
      <text:p text:style-name="P73">Nummern sind die Buchstaben "0..9" und "."</text:p>
      <text:p text:style-name="P73">Beispiel:<text:tab/>FIND_NONUM('4+33',1) = 1</text:p>
      <text:list xml:id="list38446055" text:continue-numbering="true" text:style-name="L1">
        <text:list-item>
          <text:list>
            <text:list-item>
              <text:h text:style-name="P216" text:outline-level="2"><text:alphabetical-index-mark-start text:id="IMark225902392"/>FINDB<text:alphabetical-index-mark-end text:id="IMark225902392"/></text:h>
            </text:list-item>
          </text:list>
        </text:list-item>
      </text:list>
      <text:p text:style-name="P69">Type<text:tab/>Funktion : INT</text:p>
      <text:p text:style-name="P173"><text:span text:style-name="T15">Input</text:span><text:span text:style-name="T14"><text:tab/>STR1 : STRING (Eingabestring)</text:span></text:p>
      <text:p text:style-name="P69"><text:tab/>STR2 : STRING (Suchstring)</text:p>
      <text:p text:style-name="P73"><draw:frame draw:style-name="fr3" draw:name="Grafik46" text:anchor-type="paragraph" svg:x="1.064cm" svg:y="0.686cm" svg:width="2.731cm" svg:height="1.57cm" draw:z-index="31"><draw:image xlink:href="Pictures/10000000000000CE000000771B8C3274.png" xlink:type="simple" xlink:show="embed" xlink:actuate="onLoad"/></draw:frame>Output<text:tab/>INT (Position des letzten Vorkommens von STR2 in STR1)</text:p>
      <text:p text:style-name="P73"><text:soft-page-break/><text:line-break/>Die Funktion FINDB durchsucht STR1 auf das Vorkommen von STR2 und liefert die letzte Position von STR2 in STR1 zurück.</text:p>
      <text:p text:style-name="P183">Falls STR2 nicht gefunden wird, wird eine 0 zurückgegeben.</text:p>
      <text:p text:style-name="P73">Beispiel:<text:tab/>FINDB('abs12fir12bus12', '12') = 14</text:p>
      <text:list xml:id="list38469137" text:continue-numbering="true" text:style-name="L1">
        <text:list-item>
          <text:list>
            <text:list-item>
              <text:h text:style-name="P216" text:outline-level="2"><text:alphabetical-index-mark-start text:id="IMark225902392"/>FINDB_NONUM<text:alphabetical-index-mark-end text:id="IMark225902392"/></text:h>
            </text:list-item>
          </text:list>
        </text:list-item>
      </text:list>
      <text:p text:style-name="P69">Type<text:tab/>Funktion : INT</text:p>
      <text:p text:style-name="P66"><text:span text:style-name="T15">Input</text:span><text:span text:style-name="T14"><text:tab/>STR : STRING (Eingabestring)</text:span></text:p>
      <text:p text:style-name="P73"><draw:frame draw:style-name="fr3" draw:name="Grafik47" text:anchor-type="paragraph" svg:x="1.058cm" svg:y="0.679cm" svg:width="4.971cm" svg:height="1.12cm" draw:z-index="32"><draw:image xlink:href="Pictures/100000000000017800000055590B5D00.png" xlink:type="simple" xlink:show="embed" xlink:actuate="onLoad"/></draw:frame>Output<text:tab/>INT (Position des letzten Buchstaben, der keine Nummer ist)</text:p>
      <text:p text:style-name="P73"><text:line-break/>Die Funktion FINDB_NONUM durchsucht STR von rechts nach links und liefert die letzte Stelle die keine Nummer ist zurück.</text:p>
      <text:p text:style-name="P183">Nummern sind die Buchstaben "0..9" und ".".</text:p>
      <text:p text:style-name="P73">Beispiel:<text:tab/>FINDB_NONUM('4+33+1') = 5</text:p>
      <text:list xml:id="list38472309" text:continue-numbering="true" text:style-name="L1">
        <text:list-item>
          <text:list>
            <text:list-item>
              <text:h text:style-name="P216" text:outline-level="2"><text:alphabetical-index-mark-start text:id="IMark225902392"/>FINDB_NUM<text:alphabetical-index-mark-end text:id="IMark225902392"/></text:h>
            </text:list-item>
          </text:list>
        </text:list-item>
      </text:list>
      <text:p text:style-name="P69">Type<text:tab/>Funktion : INT</text:p>
      <text:p text:style-name="P66"><text:span text:style-name="T15">Input</text:span><text:span text:style-name="T14"><text:tab/>STR : STRING (Eingabestring)</text:span></text:p>
      <text:p text:style-name="P73"><draw:frame draw:style-name="fr3" draw:name="Grafik48" text:anchor-type="paragraph" svg:x="1.078cm" svg:y="0.644cm" svg:width="4.521cm" svg:height="1.12cm" draw:z-index="33"><draw:image xlink:href="Pictures/100000000000015600000055651EBE0A.png" xlink:type="simple" xlink:show="embed" xlink:actuate="onLoad"/></draw:frame>Output<text:tab/>INT (Position des letzten Zeichens, das eine Zahl oder Punkt ist)</text:p>
      <text:p text:style-name="P73"><text:line-break/>Die Funktion FINDB_NUM durchsucht STR von Rechts nach links und liefert die letzte Stelle die eine Nummer ist.</text:p>
      <text:p text:style-name="P183"><text:soft-page-break/>Nummern sind die Buchstaben "0..9" und ".".</text:p>
      <text:p text:style-name="P73">Beispiel:<text:tab/>FINDB_NUM('4+33+1hh') = 6</text:p>
      <text:list xml:id="list38472667" text:continue-numbering="true" text:style-name="L1">
        <text:list-item>
          <text:list>
            <text:list-item>
              <text:h text:style-name="P216" text:outline-level="2"><text:alphabetical-index-mark-start text:id="IMark225902392"/>FINDP<text:alphabetical-index-mark-end text:id="IMark225902392"/></text:h>
            </text:list-item>
          </text:list>
        </text:list-item>
      </text:list>
      <text:p text:style-name="P69">Type<text:tab/>Funktion : INT</text:p>
      <text:p text:style-name="P66"><text:span text:style-name="T15">Input</text:span><text:span text:style-name="T14"><text:tab/>STR : STRING (Eingabestring)</text:span></text:p>
      <text:p text:style-name="P179"><text:tab/>SRC : STRING (Suchstring)</text:p>
      <text:p text:style-name="P179"><text:tab/>POS : INT (Position ab der gesucht wird)</text:p>
      <text:p text:style-name="P73"><draw:frame draw:style-name="fr3" draw:name="Grafik445" text:anchor-type="paragraph" svg:x="1.002cm" svg:y="0.607cm" svg:width="3.18cm" svg:height="2.02cm" draw:z-index="422"><draw:image xlink:href="Pictures/10000000000000F0000000997833D160.png" xlink:type="simple" xlink:show="embed" xlink:actuate="onLoad"/></draw:frame>Output<text:tab/>INT (Position des ersten Buchstabens des gefundenen Strings)</text:p>
      <text:p text:style-name="P183"><text:line-break/>FINDP sucht in einer Zeichenkette STR ab der Position POS nach einer Zeichenkette SRC. Wird die Zeichenkette SRC gefunden so wird die Position des ersten Zeichens von SRC innerhalb von STR ausgegeben. Wird die Zeichenkette ab der Position POS nicht gefunden wird eine 0 ausgegeben. Wird eine Leere Zeichenkette als Suchstring vorgegeben liefert der Baustein das Ergebnis 0.</text:p>
      <text:p text:style-name="P183">Beispiel: <text:tab/>FINDP('ein Fuchs ist ein Tier','ein',1) = 1;</text:p>
      <text:p text:style-name="P183"><text:tab/>FINDP('ein Fuchs ist ein Tier','ein',2) = 15;</text:p>
      <text:p text:style-name="P183"><text:tab/>FINDP('ein Fuchs ist ein Tier','ein',16) = 0;</text:p>
      <text:list xml:id="list38465397" text:continue-numbering="true" text:style-name="L1">
        <text:list-item>
          <text:list>
            <text:list-item>
              <text:h text:style-name="P216" text:outline-level="2"><text:alphabetical-index-mark-start text:id="IMark225902392"/>FIX<text:alphabetical-index-mark-end text:id="IMark225902392"/></text:h>
            </text:list-item>
          </text:list>
        </text:list-item>
      </text:list>
      <text:p text:style-name="P69">Type<text:tab/>Funktion : STRING</text:p>
      <text:p text:style-name="P66"><text:span text:style-name="T15">Input</text:span><text:span text:style-name="T14"><text:tab/>STR : STRING (Eingabestring)</text:span></text:p>
      <text:p text:style-name="P179"><text:tab/>L : INT (feste Länge des Ausgabestrings)</text:p>
      <text:p text:style-name="P179"><text:tab/>C : BYTE (Füllzeichen beim Auffüllen)</text:p>
      <text:p text:style-name="P179"><text:tab/>M : INT (Mode zum Auffüllen)</text:p>
      <text:p text:style-name="P73"><draw:frame draw:style-name="fr3" draw:name="Grafik536" text:anchor-type="paragraph" svg:x="1.046cm" svg:y="0.658cm" svg:width="2.101cm" svg:height="2.18cm" draw:z-index="523"><draw:image xlink:href="Pictures/100000000000009F000000A512E9F5C6.png" xlink:type="simple" xlink:show="embed" xlink:actuate="onLoad"/></draw:frame><text:soft-page-break/>Output<text:tab/>STRING (Zeichenkette mit fester Länge N)</text:p>
      <text:p text:style-name="P183"><text:line-break/>FIX erzeugt eine Zeichenkette mit fester Länge N. Die Zeichenkette STR am Eingang wird auf die Länge N abgeschnitten beziehungsweise mit dem Füllzeichen C aufgefüllt. Wenn die Zeichenkette STR kürzer ist als die zu erzeugende Länge L wird abhängig von M die Zeichenkette mit dem Füllzeichen C aufgefüllt. Wenn M = 0 werden die Füllzeichen am Ende der Zeichenkette angehängt, ist M = 1 werden die Füllzeichen am Anfang angehängt, und wenn M = 2 wird die Zeichenkette zwischen Füllzeichen zentriert. Falls die Anzahl der nötigen Füllzeichen ungerade ist wird bei M = 2 am Ende ein Füllzeichen mehr als am Anfang angehängt. Die Funktion FIX wertet auch die Globale Setup Konstante STRING_LENGTH aus und begrenzt die maximale Länge L der Zeichenkette auf STRING_LENGTH.</text:p>
      <text:list xml:id="list38452227" text:continue-numbering="true" text:style-name="L1">
        <text:list-item>
          <text:list>
            <text:list-item>
              <text:h text:style-name="P216" text:outline-level="2"><text:alphabetical-index-mark-start text:id="IMark225902392"/>FLOAT_TO_REAL<text:alphabetical-index-mark-end text:id="IMark225902392"/></text:h>
            </text:list-item>
          </text:list>
        </text:list-item>
      </text:list>
      <text:p text:style-name="P69">Type<text:tab/>Funktion : REAL</text:p>
      <text:p text:style-name="P66"><text:span text:style-name="T15">Input</text:span><text:span text:style-name="T14"><text:tab/>FLT : STRING(20) (Gleitkommazahl)</text:span></text:p>
      <text:p text:style-name="P183"><draw:frame draw:style-name="fr3" draw:name="Grafik650" text:anchor-type="paragraph" svg:x="1.046cm" svg:y="0.658cm" svg:width="5.669cm" svg:height="0.99cm" draw:z-index="638"><draw:image xlink:href="Pictures/10000000000001AD0000004BB638D73E.png" xlink:type="simple" xlink:show="embed" xlink:actuate="onLoad"/></draw:frame>Output<text:tab/>REAL (REAL Wert der Gleitkommazahl)</text:p>
      <text:p text:style-name="P183"><text:line-break/>FLOAT_TO_REAL wandelt eine als STRING vorliegende Gleitpunktzahl in einen Datentyp REAL um. Bei Der Umwandlung werden '.' oder ',' als Komma interpretiert und 'E' oder 'e' als Trennzeichen des Exponenten. Die Zeichen '-0123456789' werden Ausgewertet und alle anderen in FLT vorkommenden Zeichen werden ignoriert.</text:p>
      <text:p text:style-name="P183"/>
      <text:list xml:id="list38446413" text:continue-numbering="true" text:style-name="L1">
        <text:list-item>
          <text:list>
            <text:list-item>
              <text:h text:style-name="P216" text:outline-level="2"><text:soft-page-break/><text:alphabetical-index-mark-start text:id="IMark225902392"/>FSTRING_TO_BYTE<text:alphabetical-index-mark-end text:id="IMark225902392"/></text:h>
            </text:list-item>
          </text:list>
        </text:list-item>
      </text:list>
      <text:p text:style-name="P69">Type<text:tab/>Funktion : BYTE</text:p>
      <text:p text:style-name="P66"><text:span text:style-name="T15">Input</text:span><text:span text:style-name="T14"><text:tab/>IN : STRING(12) (Eingabestring)</text:span></text:p>
      <text:p text:style-name="P183"><draw:frame draw:style-name="fr3" draw:name="Grafik638" text:anchor-type="paragraph" svg:x="1.046cm" svg:y="0.665cm" svg:width="6.47cm" svg:height="0.99cm" draw:z-index="632"><draw:image xlink:href="Pictures/10000000000001E90000004BCD8DC171.png" xlink:type="simple" xlink:show="embed" xlink:actuate="onLoad"/></draw:frame>Output<text:tab/>BYTE (Byte Wert)</text:p>
      <text:p text:style-name="P183"><text:line-break/>FSTRING_TO_BYTE konvertiert eine formatierten Zeichenkette in einen Byte Wert. Es werden folgende Eingabeformate unterstützt:</text:p>
      <text:p text:style-name="P183">2#0101 (binär), 8#345 (oktal), 16#2a33 (hexadezimal) und 234 (dezimal).</text:p>
      <text:list xml:id="list38444751" text:continue-numbering="true" text:style-name="L1">
        <text:list-item>
          <text:list>
            <text:list-item>
              <text:h text:style-name="P216" text:outline-level="2"><text:alphabetical-index-mark-start text:id="IMark225902392"/>FSTRING_TO_DT<text:alphabetical-index-mark-end text:id="IMark225902392"/></text:h>
            </text:list-item>
          </text:list>
        </text:list-item>
      </text:list>
      <text:p text:style-name="P69">Type<text:tab/>Funktion : DT</text:p>
      <text:p text:style-name="P173"><text:span text:style-name="T15">Input</text:span><text:span text:style-name="T14"><text:tab/>SDT : STRING(60) (Eingabestring)</text:span></text:p>
      <text:p text:style-name="P179"><text:tab/>FMT : STRING(60) (Formatierung)<text:tab/></text:p>
      <text:p text:style-name="P157"><draw:frame draw:style-name="fr3" draw:name="Grafik690" text:anchor-type="paragraph" svg:x="1.046cm" svg:y="0.667cm" svg:width="5.669cm" svg:height="1.39cm" draw:z-index="687"><draw:image xlink:href="Pictures/10000000000001AD0000006921359A14.png" xlink:type="simple" xlink:show="embed" xlink:actuate="onLoad"/></draw:frame>Output<text:tab/>DT (ermitteltes Datum und Uhrzeit)</text:p>
      <text:p text:style-name="P157"><text:line-break/>FSTRING_TO_DT konvertiert eine formatierte Zeichenkette in einen DATETIME Wert. Mithilfe der Zeichenkette FMT wird eine Formatierung zur Dekodierung vorgegeben. Das Zeichen '#' gefolgt von einem Buchstaben definiert die zu Dekodierende Information. </text:p>
      <table:table table:name="Tabelle45" table:style-name="Tabelle45">
        <table:table-column table:style-name="Tabelle45.A"/>
        <table:table-column table:style-name="Tabelle45.B"/>
        <table:table-row>
          <table:table-cell table:style-name="Tabelle45.A1" office:value-type="string">
            <text:p text:style-name="P103">#Y</text:p>
          </table:table-cell>
          <table:table-cell table:style-name="Tabelle45.B1" office:value-type="string">
            <text:p text:style-name="P103">Jahr in der Schreibweise 08 oder 2008</text:p>
          </table:table-cell>
        </table:table-row>
        <table:table-row>
          <table:table-cell table:style-name="Tabelle45.A2" office:value-type="string">
            <text:p text:style-name="P103">#M</text:p>
          </table:table-cell>
          <table:table-cell table:style-name="Tabelle45.B2" office:value-type="string">
            <text:p text:style-name="P103">Monat in der Schreibweise 01 oder 1</text:p>
          </table:table-cell>
        </table:table-row>
        <table:table-row>
          <table:table-cell table:style-name="Tabelle45.A2" office:value-type="string">
            <text:p text:style-name="P103">#N</text:p>
          </table:table-cell>
          <table:table-cell table:style-name="Tabelle45.B2" office:value-type="string">
            <text:p text:style-name="P103">Monat in der Schreibweise 'JAN' oder 'Januar' (Groß und Kleinschreibung wird ignoriert)</text:p>
          </table:table-cell>
        </table:table-row>
        <table:table-row>
          <table:table-cell table:style-name="Tabelle45.A2" office:value-type="string">
            <text:p text:style-name="P103">#D</text:p>
          </table:table-cell>
          <table:table-cell table:style-name="Tabelle45.B2" office:value-type="string">
            <text:p text:style-name="P103">Tag in der Schreibweise 01 oder 1</text:p>
          </table:table-cell>
        </table:table-row>
        <table:table-row>
          <table:table-cell table:style-name="Tabelle45.A2" office:value-type="string">
            <text:p text:style-name="P103">#h</text:p>
          </table:table-cell>
          <table:table-cell table:style-name="Tabelle45.B2" office:value-type="string">
            <text:p text:style-name="P103">Stunde in der Schreibweise 01 oder 1</text:p>
          </table:table-cell>
        </table:table-row>
        <table:table-row>
          <table:table-cell table:style-name="Tabelle45.A2" office:value-type="string">
            <text:p text:style-name="P103">#m</text:p>
          </table:table-cell>
          <table:table-cell table:style-name="Tabelle45.B2" office:value-type="string">
            <text:p text:style-name="P103">Minute in der Schreibweise 01 oder 1</text:p>
          </table:table-cell>
        </table:table-row>
        <table:table-row>
          <table:table-cell table:style-name="Tabelle45.A2" office:value-type="string">
            <text:p text:style-name="P103">#s</text:p>
          </table:table-cell>
          <table:table-cell table:style-name="Tabelle45.B2" office:value-type="string">
            <text:p text:style-name="P103">Sekunde in der Schreibweise 01 oder 1</text:p>
          </table:table-cell>
        </table:table-row>
      </table:table>
      <text:p text:style-name="P157">Beispiele:</text:p>
      <text:p text:style-name="P157"><text:soft-page-break/>FSTRING_TO_DT('25. September 2008 um 10:01:00', '#D. #N #Y ** #h:#m:#s')</text:p>
      <text:p text:style-name="P157">FSTRING_TO_DT('13:14', '#h:#m')</text:p>
      <text:list xml:id="list38464668" text:continue-numbering="true" text:style-name="L1">
        <text:list-item>
          <text:list>
            <text:list-item>
              <text:h text:style-name="P216" text:outline-level="2"><text:alphabetical-index-mark-start text:id="IMark225902392"/>FSTRING_TO_DWORD<text:alphabetical-index-mark-end text:id="IMark225902392"/></text:h>
            </text:list-item>
          </text:list>
        </text:list-item>
      </text:list>
      <text:p text:style-name="P69">Type<text:tab/>Funktion : DWORD</text:p>
      <text:p text:style-name="P66"><text:span text:style-name="T15">Input</text:span><text:span text:style-name="T14"><text:tab/>IN : STRING(40) (Eingabestring)<text:tab/></text:span></text:p>
      <text:p text:style-name="P183"><draw:frame draw:style-name="fr3" draw:name="Grafik639" text:anchor-type="paragraph" svg:x="1.023cm" svg:y="0.66cm" svg:width="6.47cm" svg:height="0.99cm" draw:z-index="633"><draw:image xlink:href="Pictures/10000000000001E90000004B25B79A21.png" xlink:type="simple" xlink:show="embed" xlink:actuate="onLoad"/></draw:frame>Output<text:tab/>DWORD (32bit Wert)</text:p>
      <text:p text:style-name="P183"><text:line-break/>FSTRING_TO_DWORD konvertiert eine formatierten Zeichenkette in einen 32bit <text:s/>Wert. Es werden folgende Eingabeformate unterstützt:</text:p>
      <text:p text:style-name="P183">2#0101 (binär), 8#345 (oktal), 16#2a33 (hexadezimal) und 234 (dezimal).</text:p>
      <text:list xml:id="list38471171" text:continue-numbering="true" text:style-name="L1">
        <text:list-item>
          <text:list>
            <text:list-item>
              <text:h text:style-name="P222" text:outline-level="2"><text:alphabetical-index-mark-start text:id="IMark225902392"/>FSTRING_TO_MONTH<text:alphabetical-index-mark-end text:id="IMark225902392"/></text:h>
            </text:list-item>
          </text:list>
        </text:list-item>
      </text:list>
      <text:p text:style-name="P69">Type<text:tab/>Funktion : INT</text:p>
      <text:p text:style-name="P173"><text:span text:style-name="T15">Input</text:span><text:span text:style-name="T14"><text:tab/>MTH : STRING(20) (Eingabestring)</text:span></text:p>
      <text:p text:style-name="P179"><text:tab/>LANG : INT (Sprachauswahl)<text:tab/></text:p>
      <text:p text:style-name="P157"><draw:frame draw:style-name="fr3" draw:name="Grafik689" text:anchor-type="paragraph" svg:x="1.046cm" svg:y="0.667cm" svg:width="6.47cm" svg:height="1.39cm" draw:z-index="686"><draw:image xlink:href="Pictures/10000000000001E9000000696DFF8DA7.png" xlink:type="simple" xlink:show="embed" xlink:actuate="onLoad"/></draw:frame>Output<text:tab/>INT (Monatszahl 1..12)</text:p>
      <text:p text:style-name="P157"><text:line-break/>FSTRING_TO_MONTH ermittelt aus einer Zeichenkette mit einem Monatsnamen oder Kürzel den Zahlenwert des Monats. Die Funktion kann als Eingang sowohl die Monatsnamen und Kürzel als auch eine Monatszahl verarbeiten.</text:p>
      <text:p text:style-name="P157">FSTRING_TO_MONTH('Januar',2) = 1</text:p>
      <text:p text:style-name="P157">FSTRING_TO_MONTH('Jan',2) = 1</text:p>
      <text:p text:style-name="P157"><text:soft-page-break/>FSTRING_TO_MONTH('11',0) = 11</text:p>
      <text:p text:style-name="P157">Der Eingang LANG selektiert die zu verwendende Sprache, 0 = die im Setup eingestellte <text:span text:style-name="T2">Default</text:span> Sprache, 1 = Englisch .... nähere Infos zu den Spracheinstellungen finden Sie im Kapitel Datentypen.</text:p>
      <text:list xml:id="list38460782" text:continue-numbering="true" text:style-name="L1">
        <text:list-item>
          <text:list>
            <text:list-item>
              <text:h text:style-name="P220" text:outline-level="2"><text:alphabetical-index-mark-start text:id="IMark225902392"/>FSTRING_TO_WEEK<text:alphabetical-index-mark-end text:id="IMark225902392"/></text:h>
            </text:list-item>
          </text:list>
        </text:list-item>
      </text:list>
      <text:p text:style-name="P69">Type<text:tab/>Funktion : BYTE</text:p>
      <text:p text:style-name="P66"><text:span text:style-name="T15">Input</text:span><text:span text:style-name="T14"><text:tab/>WDAY : STRING(60) (Eingabestring)</text:span></text:p>
      <text:p text:style-name="P179"><text:tab/>LANG : INT (Sprachauswahl)</text:p>
      <text:p text:style-name="P183"><draw:frame draw:style-name="fr3" draw:name="Grafik643" text:anchor-type="paragraph" svg:x="1.067cm" svg:y="0.736cm" svg:width="6.47cm" svg:height="1.39cm" draw:z-index="749"><draw:image xlink:href="Pictures/10000000000001E9000000695080E342.png" xlink:type="simple" xlink:show="embed" xlink:actuate="onLoad"/></draw:frame>Output<text:tab/>BYTE (Bitpattern der Wochentage)</text:p>
      <text:p text:style-name="P183"><text:line-break/>FSTRING_TO_WEEK dekodiert eine Liste von Wochentagen in der Form 'MO,DI,3' in ein Bitpattern (Bit6 = MO...Bit0 = So). Für die Auswertung werden jeweils die ersten beiden Buchstaben der Listenelemente ausgewertet, alle folgenden werden ignoriert. Falls die Zeichenkette Leerzeichen enthält werden diese entfernt. Die Wochentage können sowohl in Groß- oder Klein- Schreibung vorliegen. LANG spezifiziert die zu verwendende Sprache, 1= Englisch, 2= Deutsch, 0 ist die im Setup definierte <text:span text:style-name="T2">Default</text:span> Sprache.</text:p>
      <text:p text:style-name="P183">Mo = 1; Di, Tu = 2; We, Mi = 3; Th, Do = 4; Fr = 5; Sa = 6; So, Su = 7</text:p>
      <text:p text:style-name="P183">Da die Funktion nur die ersten beiden Zeichen auswertet, können die Wochentage auch in ausgeschriebener Form (Montag) vorliegen.</text:p>
      <text:p text:style-name="P183">Als alternative Form kann der Wochentag auch als Zahl 1..7 angegeben werden.</text:p>
      <text:p text:style-name="P183">Die Liste enthält die einzelnen Wochentage unsortiert mit Komma getrennt.</text:p>
      <text:p text:style-name="P183">FSTRING_TO_WEEK('Mo,Di,Sa',2) = 2#01100010.</text:p>
      <text:p text:style-name="P183"/>
      <text:p text:style-name="P183"/>
      <text:list xml:id="list38447512" text:continue-numbering="true" text:style-name="L1">
        <text:list-item>
          <text:list>
            <text:list-item>
              <text:h text:style-name="P216" text:outline-level="2"><text:soft-page-break/><text:alphabetical-index-mark-start text:id="IMark225902392"/>FSTRING_TO_WEEKDAY<text:alphabetical-index-mark-end text:id="IMark225902392"/></text:h>
            </text:list-item>
          </text:list>
        </text:list-item>
      </text:list>
      <text:p text:style-name="P69">Type<text:tab/>Funktion : INT</text:p>
      <text:p text:style-name="P66"><text:span text:style-name="T15">Input</text:span><text:span text:style-name="T14"><text:tab/>WDAY : STRING(20) (Eingabestring)</text:span></text:p>
      <text:p text:style-name="P179"><text:tab/>LANG : INT (Sprachauswahl)<text:tab/></text:p>
      <text:p text:style-name="P183"><draw:frame draw:style-name="fr3" draw:name="Grafik642" text:anchor-type="paragraph" svg:x="1.023cm" svg:y="0.676cm" svg:width="7.26cm" svg:height="1.39cm" draw:z-index="750"><draw:image xlink:href="Pictures/100000000000022500000069CB2DB2F9.png" xlink:type="simple" xlink:show="embed" xlink:actuate="onLoad"/></draw:frame>Output<text:tab/>INT (Wochentag)</text:p>
      <text:p text:style-name="P173"><text:span text:style-name="T21"><text:line-break/>FSTRING_TO_WEEKDAY dekodiert einen Wochentag in der Form 'MO' in einen Integer, 1 = MO...7= So. Für die Auswertung werden die ersten beiden Buchstaben der Zeichenkette WDAY ausgewertet, alle folgenden werden ignoriert. Falls die Zeichenkette Leerzeichen enthält werden diese entfernt. Die Wochentage können sowohl in Groß- oder Klein- Schreibung vor</text:span><text:span text:style-name="T21">liegen. Da die Funktion nur die ersten beiden Zeichen auswertet, können die Wochentage auch in ausgeschriebener Form (Montag) vorliegen.</text:span></text:p>
      <text:p text:style-name="P183">Mo = 1; Di, Tu = 2; We, Mi = 3; Th, Do = 4; Fr = 5; Sa = 6; So, Su = 7</text:p>
      <text:p text:style-name="P183">Als alternative Form kann der Wochentag auch als Zahl 1..7 angegeben werden. LANG spezifiziert die zu verwendende Sprache, 1= Englisch, 2= Deutsch, 0= die im Setup definierte <text:span text:style-name="T2">Default</text:span> Sprache.</text:p>
      <text:list xml:id="list38459248" text:continue-numbering="true" text:style-name="L1">
        <text:list-item>
          <text:list>
            <text:list-item>
              <text:h text:style-name="P216" text:outline-level="2"><text:alphabetical-index-mark-start text:id="IMark225902392"/>HEX_TO_BYTE<text:alphabetical-index-mark-end text:id="IMark225902392"/></text:h>
            </text:list-item>
          </text:list>
        </text:list-item>
      </text:list>
      <text:p text:style-name="P69">Type<text:tab/>Funktion : BYTE</text:p>
      <text:p text:style-name="P66"><text:span text:style-name="T15">Input</text:span><text:span text:style-name="T14"><text:tab/>HEX : STRING(5) (Hexadezimale Zeichenkette)</text:span></text:p>
      <text:p text:style-name="P73"><draw:frame draw:style-name="fr3" draw:name="Grafik633" text:anchor-type="paragraph" svg:x="1.067cm" svg:y="0.69cm" svg:width="4.881cm" svg:height="0.99cm" draw:z-index="627"><draw:image xlink:href="Pictures/10000000000001710000004BF5CC0D7B.png" xlink:type="simple" xlink:show="embed" xlink:actuate="onLoad"/></draw:frame>Output<text:tab/>BYTE (Ausgangswert)</text:p>
      <text:p text:style-name="P73"><text:line-break/>Die Funktion HEX_TO_BYTE konvertiert eine hexadezimale Zeichenkette in einen BYTE Wert. Es werden dabei nur die hexadizimalen Zeichen sind '0'..'9', 'a..f' und 'A' .. 'F' interpretiert, alle anderen in HEX vorkommenden Zeichen werden ignoriert.</text:p>
      <text:p text:style-name="P183">Beispiel:<text:tab/>HEX_TO_BYTE('FF') ergibt 255.</text:p>
      <text:list xml:id="list38452142" text:continue-numbering="true" text:style-name="L1">
        <text:list-item>
          <text:list>
            <text:list-item>
              <text:h text:style-name="P216" text:outline-level="2"><text:soft-page-break/><text:alphabetical-index-mark-start text:id="IMark225902392"/>HEX_TO_DWORD<text:alphabetical-index-mark-end text:id="IMark225902392"/></text:h>
            </text:list-item>
          </text:list>
        </text:list-item>
      </text:list>
      <text:p text:style-name="P69">Type<text:tab/>Funktion : DWORD</text:p>
      <text:p text:style-name="P66"><text:span text:style-name="T15">Input</text:span><text:span text:style-name="T14"><text:tab/>HEX : STRING(20) (Hexadezimale Zeichenkette)</text:span></text:p>
      <text:p text:style-name="P73"><draw:frame draw:style-name="fr3" draw:name="Grafik86" text:anchor-type="paragraph" svg:x="1.09cm" svg:y="0.623cm" svg:width="6.32cm" svg:height="1.12cm" draw:z-index="399"><draw:image xlink:href="Pictures/10000000000001DE00000055E28A6B99.png" xlink:type="simple" xlink:show="embed" xlink:actuate="onLoad"/></draw:frame>Output<text:tab/>DWORD (Ausgangswert)</text:p>
      <text:p text:style-name="P73"><text:line-break/>Die Funktion HEX_TO_DWORD konvertiert eine hexadezimale Zeichenkette in einen DWORD Wert. Es werden dabei nur die hexadizimalen Zeichen sind '0'..'9', 'a..f' und 'A' .. 'F' interpretiert, alle anderen in HEX vorkommenden Zeichen werden ignoriert.</text:p>
      <text:p text:style-name="P183">Beispiel:<text:tab/>HEX_TO_DWORD('FF') ergibt 255.</text:p>
      <text:list xml:id="list38475931" text:continue-numbering="true" text:style-name="L1">
        <text:list-item>
          <text:list>
            <text:list-item>
              <text:h text:style-name="P216" text:outline-level="2"><text:alphabetical-index-mark-start text:id="IMark225902392"/>IS_ALNUM<text:alphabetical-index-mark-end text:id="IMark225902392"/></text:h>
            </text:list-item>
          </text:list>
        </text:list-item>
      </text:list>
      <text:p text:style-name="P69">Type<text:tab/>Funktion : BOOL</text:p>
      <text:p text:style-name="P173"><text:span text:style-name="T15">Input</text:span><text:span text:style-name="T14"><text:tab/>STR : STRING (Eingabestring)</text:span></text:p>
      <text:p text:style-name="P73"><draw:frame draw:style-name="fr3" draw:name="Grafik488" text:anchor-type="paragraph" svg:x="1.09cm" svg:y="0.667cm" svg:width="4.069cm" svg:height="1.12cm" draw:z-index="469"><draw:image xlink:href="Pictures/1000000000000134000000556D05044D.png" xlink:type="simple" xlink:show="embed" xlink:actuate="onLoad"/></draw:frame>Output<text:tab/>BOOL (TRUE wenn STR nur Buchstaben oder Zahlen enthält)</text:p>
      <text:p text:style-name="P183"><text:line-break/>IS_ALNUM testet ob in der Zeichenkette STR nur Buchstaben oder Zahlen enthalten sind. Wird ein falsches, nicht alphanumerisches Zeichen gefunden gibt die Funktion FALSE zurück. Enthält STR nur Buchstaben oder Zahlen ist das Ergebnis TRUE. Buchstaben sind die Zeichen A..Z und a..z, und Zahlen sind die Zeichen 0..9. Bei der Prüfung wird die Globale Setup Konstante EXTENDED_ASCII berücksichtigt. Wenn EXTENDED_ASCII = TRUE ist werden Zeichen des erweiterten ASCII Zeichensatzes nach ISO 8859-1 berücksichtigt. Umlaute wie Ä,Ö,Ü werden nur dann berücksichtigt wenn die Globale Konstante <text:s/>EXTENDED_ASCII = TRUE ist.</text:p>
      <text:list xml:id="list38448419" text:continue-numbering="true" text:style-name="L1">
        <text:list-item>
          <text:list>
            <text:list-item>
              <text:h text:style-name="P216" text:outline-level="2"><text:soft-page-break/><text:alphabetical-index-mark-start text:id="IMark225902392"/>IS_ALPHA<text:alphabetical-index-mark-end text:id="IMark225902392"/></text:h>
            </text:list-item>
          </text:list>
        </text:list-item>
      </text:list>
      <text:p text:style-name="P69">Type<text:tab/>Funktion : BOOL</text:p>
      <text:p text:style-name="P173"><text:span text:style-name="T15">Input</text:span><text:span text:style-name="T14"><text:tab/>STR : STRING (Eingabestring)</text:span></text:p>
      <text:p text:style-name="P73"><draw:frame draw:style-name="fr3" draw:name="Grafik489" text:anchor-type="paragraph" svg:x="1.046cm" svg:y="0.69cm" svg:width="4.069cm" svg:height="1.12cm" draw:z-index="470"><draw:image xlink:href="Pictures/100000000000013400000055619B408E.png" xlink:type="simple" xlink:show="embed" xlink:actuate="onLoad"/></draw:frame>Output<text:tab/>BOOL (TRUE wenn STR nur Buchstaben enthält)</text:p>
      <text:p text:style-name="P183"><text:line-break/>IS_ALPHA testet ob in der Zeichenkette STR nur Buchstaben enthalten sind. Wird ein falsches, nicht alphabetisches Zeichen gefunden gibt die Funktion FALSE zurück. Wenn in STR nur Buchstaben enthalten sind ist das Ergebnis TRUE. Buchstaben sind die Zeichen A..Z und a..z. Bei der Prüfung wird die Globale Setup Konstante EXTENDED_ASCII berücksichtigt. Wenn EXTENDED_ASCII = TRUE ist werden Zeichen des erweiterten ASCII Zeichensatzes nach ISO 8859-1 berücksichtigt. Umlaute wie Ä,Ö,Ü werden nur dann berücksichtigt wenn die Globale Konstante <text:s/>EXTENDED_ASCII = TRUE ist.</text:p>
      <text:list xml:id="list38458903" text:continue-numbering="true" text:style-name="L1">
        <text:list-item>
          <text:list>
            <text:list-item>
              <text:h text:style-name="P216" text:outline-level="2"><text:alphabetical-index-mark-start text:id="IMark225902392"/>IS_CC<text:alphabetical-index-mark-end text:id="IMark225902392"/></text:h>
            </text:list-item>
          </text:list>
        </text:list-item>
      </text:list>
      <text:p text:style-name="P69">Type<text:tab/>Funktion : BOOL</text:p>
      <text:p text:style-name="P173"><text:span text:style-name="T15">Input</text:span><text:span text:style-name="T14"><text:tab/>STR : STRING (Eingabestring)</text:span></text:p>
      <text:p text:style-name="P179"><text:tab/>CMP : STRING (Vergleichszeichen)</text:p>
      <text:p text:style-name="P73">Output<text:tab/>BOOL (TRUE wenn STR nur die im STRING CMP aufgelisteten Zeichen</text:p>
      <text:p text:style-name="P183"><draw:frame draw:style-name="fr3" draw:name="Grafik527" text:anchor-type="paragraph" svg:x="1.002cm" svg:y="0.656cm" svg:width="2.799cm" svg:height="1.39cm" draw:z-index="512"><draw:image xlink:href="Pictures/10000000000000D4000000697912B531.png" xlink:type="simple" xlink:show="embed" xlink:actuate="onLoad"/></draw:frame><text:tab/><text:tab/>enthält)</text:p>
      <text:p text:style-name="P183"><text:line-break/>IS_CC testet ob in der Zeichenkette STR nur die in STR aufgelisteten Zeichen enthalten sind. Wird ein anderes Zeichen gefunden gibt die Funktion FALSE zurück.</text:p>
      <text:p text:style-name="P183">Beipiele:</text:p>
      <text:p text:style-name="P183">IS_CC('3.14', '0123456789.') = TRUE</text:p>
      <text:p text:style-name="P183">IS_CC('-3.14', '0123456789.') = FALSE</text:p>
      <text:list xml:id="list38448972" text:continue-numbering="true" text:style-name="L1">
        <text:list-item>
          <text:list>
            <text:list-item>
              <text:h text:style-name="P216" text:outline-level="2"><text:soft-page-break/><text:alphabetical-index-mark-start text:id="IMark225902392"/>IS_CTRL<text:alphabetical-index-mark-end text:id="IMark225902392"/></text:h>
            </text:list-item>
          </text:list>
        </text:list-item>
      </text:list>
      <text:p text:style-name="P69">Type<text:tab/>Funktion : BOOL</text:p>
      <text:p text:style-name="P173"><text:span text:style-name="T15">Input</text:span><text:span text:style-name="T14"><text:tab/>STR : STRING (Eingabestring)</text:span></text:p>
      <text:p text:style-name="P73"><draw:frame draw:style-name="fr3" draw:name="Grafik490" text:anchor-type="paragraph" svg:x="1.069cm" svg:y="0.688cm" svg:width="3.62cm" svg:height="1.12cm" draw:z-index="471"><draw:image xlink:href="Pictures/100000000000011200000055E8D98E47.png" xlink:type="simple" xlink:show="embed" xlink:actuate="onLoad"/></draw:frame>Output<text:tab/>BOOL (TRUE wenn STR nur Kontrollzeichen enthält)</text:p>
      <text:p text:style-name="P183"><text:line-break/>IS_CTRL testet ob in der Zeichenkette STR nur Kontrollzeichen enthalten sind. Wird ein anderes Zeichen gefunden gibt die Funktion FALSE zurück. Sind in STR nur Kontrollzeichen enthalten gibt die Funktion TRUE zurück. Kontrollzeichen sind die Zeichen mit dem Dezimalcode 0..31 und 127.</text:p>
      <text:list xml:id="list38457717" text:continue-numbering="true" text:style-name="L1">
        <text:list-item>
          <text:list>
            <text:list-item>
              <text:h text:style-name="P216" text:outline-level="2"><text:alphabetical-index-mark-start text:id="IMark225902392"/>IS_HEX<text:alphabetical-index-mark-end text:id="IMark225902392"/></text:h>
            </text:list-item>
          </text:list>
        </text:list-item>
      </text:list>
      <text:p text:style-name="P69">Type<text:tab/>Funktion : BOOL</text:p>
      <text:p text:style-name="P173"><text:span text:style-name="T15">Input</text:span><text:span text:style-name="T14"><text:tab/>STR : STRING (Eingabestring)</text:span></text:p>
      <text:p text:style-name="P73"><draw:frame draw:style-name="fr3" draw:name="Grafik526" text:anchor-type="paragraph" svg:x="1.023cm" svg:y="0.688cm" svg:width="3.18cm" svg:height="1.12cm" draw:z-index="508"><draw:image xlink:href="Pictures/10000000000000F000000055D6C68C48.png" xlink:type="simple" xlink:show="embed" xlink:actuate="onLoad"/></draw:frame>Output<text:tab/>BOOL (TRUE wenn STR nur Hexadezimalzeichen enthält)</text:p>
      <text:p text:style-name="P183"><text:line-break/>IS_HEX testet ob in der Zeichenkette STR nur Hexadezimalzeichen enthalten sind. Wird ein anderes Zeichen gefunden gibt die Funktion FALSE zurück. Sind in STR nur Hexadezimalzeichen enthalten gibt die Funktion TRUE zurück. Hexadezimalzeichen sind die Zeichen mit dem Dezimalcode 0..9, a..f und A..F.</text:p>
      <text:list xml:id="list38446302" text:continue-numbering="true" text:style-name="L1">
        <text:list-item>
          <text:list>
            <text:list-item>
              <text:h text:style-name="P216" text:outline-level="2"><text:alphabetical-index-mark-start text:id="IMark225902392"/>IS_LOWER<text:alphabetical-index-mark-end text:id="IMark225902392"/></text:h>
            </text:list-item>
          </text:list>
        </text:list-item>
      </text:list>
      <text:p text:style-name="P69">Type<text:tab/>Funktion : BOOL</text:p>
      <text:p text:style-name="P173"><text:span text:style-name="T15">Input</text:span><text:span text:style-name="T14"><text:tab/>STR : STRING (Eingabestring)</text:span></text:p>
      <text:p text:style-name="P73"><draw:frame draw:style-name="fr3" draw:name="Grafik491" text:anchor-type="paragraph" svg:x="1.023cm" svg:y="0.667cm" svg:width="4.521cm" svg:height="1.12cm" draw:z-index="472"><draw:image xlink:href="Pictures/100000000000015600000055767DE41F.png" xlink:type="simple" xlink:show="embed" xlink:actuate="onLoad"/></draw:frame>Output<text:tab/>BOOL (TRUE wenn STR nur Kleinbuchstaben enthält)</text:p>
      <text:p text:style-name="P183"><text:soft-page-break/><text:line-break/>IS_LOWER testet ob in der Zeichenkette STR nur Kleinbuchstaben enthalten sind. Wird etwas anderes als ein Kleinbuchstabe gefunden gibt die Funktion FALSE zurück. Sind in STR nur Kleinbuchstaben enthalten gibt die Funktion TRUE zurück. Bei der Prüfung wird die Globale Setup Konstante EXTENDED_ASCII berücksichtigt. Wenn EXTENDED_ASCII = TRUE ist werden Zeichen des erweiterten ASCII Zeichensatzes nach ISO 8859-1 berücksichtigt. Umlaute wie Ä,Ö,Ü werden nur dann berücksichtigt wenn die Globale Konstante <text:s/>EXTENDED_ASCII = TRUE ist.</text:p>
      <text:list xml:id="list38466668" text:continue-numbering="true" text:style-name="L1">
        <text:list-item>
          <text:list>
            <text:list-item>
              <text:h text:style-name="P216" text:outline-level="2"><text:alphabetical-index-mark-start text:id="IMark225902392"/>IS_NCC<text:alphabetical-index-mark-end text:id="IMark225902392"/></text:h>
            </text:list-item>
          </text:list>
        </text:list-item>
      </text:list>
      <text:p text:style-name="P69">Type<text:tab/>Funktion : BOOL</text:p>
      <text:p text:style-name="P173"><text:span text:style-name="T15">Input</text:span><text:span text:style-name="T14"><text:tab/>STR : STRING (Eingabestring)</text:span></text:p>
      <text:p text:style-name="P179"><text:tab/>CMP : STRING (Vergleichszeichen)</text:p>
      <text:p text:style-name="P73">Output<text:tab/>BOOL (TRUE wenn STR keine der im STRING CMP aufgelisteten</text:p>
      <text:p text:style-name="P183"><draw:frame draw:style-name="fr3" draw:name="Grafik528" text:anchor-type="paragraph" svg:x="1.023cm" svg:y="0.864cm" svg:width="3.2cm" svg:height="1.39cm" draw:z-index="513"><draw:image xlink:href="Pictures/10000000000000F2000000697D657483.png" xlink:type="simple" xlink:show="embed" xlink:actuate="onLoad"/></draw:frame><text:tab/><text:tab/>Zeichen enthält)</text:p>
      <text:p text:style-name="P183"><text:line-break/>IS_NCC testet ob in der Zeichenkette STR keine der in STR aufgelisteten Zeichen enthalten sind. Wird ein Zeichen aus CMP in STR gefunden gibt die Funktion FALSE zurück.</text:p>
      <text:p text:style-name="P183">Beipiele:</text:p>
      <text:p text:style-name="P183">IS_NCC('3.14', ',-+()') = TRUE</text:p>
      <text:p text:style-name="P183">IS_NCC('-3.14', ',-+()') = FALSE</text:p>
      <text:p text:style-name="P183"/>
      <text:list xml:id="list38470442" text:continue-numbering="true" text:style-name="L1">
        <text:list-item>
          <text:list>
            <text:list-item>
              <text:h text:style-name="P216" text:outline-level="2"><text:soft-page-break/><text:alphabetical-index-mark-start text:id="IMark225902392"/>IS_NUM<text:alphabetical-index-mark-end text:id="IMark225902392"/></text:h>
            </text:list-item>
          </text:list>
        </text:list-item>
      </text:list>
      <text:p text:style-name="P69">Type<text:tab/>Funktion : BOOL</text:p>
      <text:p text:style-name="P173"><text:span text:style-name="T15">Input</text:span><text:span text:style-name="T14"><text:tab/>STR : STRING (Eingabestring)</text:span></text:p>
      <text:p text:style-name="P73"><draw:frame draw:style-name="fr3" draw:name="Grafik492" text:anchor-type="paragraph" svg:x="1.046cm" svg:y="0.69cm" svg:width="3.62cm" svg:height="1.12cm" draw:z-index="473"><draw:image xlink:href="Pictures/100000000000011200000055D9988034.png" xlink:type="simple" xlink:show="embed" xlink:actuate="onLoad"/></draw:frame>Output<text:tab/>BOOL (TRUE wenn STR keine Großbuchstaben enthält)</text:p>
      <text:p text:style-name="P183"><text:line-break/>IS_NUM testet ob in der Zeichenkette STR nur Zahlen enthalten sind. Wird ein anderes Zeichen gefunden gibt die Funktion FALSE zurück. Sind in STR nur Zahlen enthalten gibt die Funktion TRUE zurück. Zahlen sind die Zeichen 0..9.</text:p>
      <text:list xml:id="list38473650" text:continue-numbering="true" text:style-name="L1">
        <text:list-item>
          <text:list>
            <text:list-item>
              <text:h text:style-name="P216" text:outline-level="2"><text:alphabetical-index-mark-start text:id="IMark225902392"/>IS_UPPER<text:alphabetical-index-mark-end text:id="IMark225902392"/></text:h>
            </text:list-item>
          </text:list>
        </text:list-item>
      </text:list>
      <text:p text:style-name="P69">Type<text:tab/>Funktion : BOOL</text:p>
      <text:p text:style-name="P173"><text:span text:style-name="T15">Input</text:span><text:span text:style-name="T14"><text:tab/>STR : STRING (Eingabestring)</text:span></text:p>
      <text:p text:style-name="P73"><draw:frame draw:style-name="fr3" draw:name="Grafik493" text:anchor-type="paragraph" svg:x="1.025cm" svg:y="0.683cm" svg:width="4.069cm" svg:height="1.12cm" draw:z-index="474"><draw:image xlink:href="Pictures/100000000000013400000055023FDEDA.png" xlink:type="simple" xlink:show="embed" xlink:actuate="onLoad"/></draw:frame>Output<text:tab/>BOOL (TRUE wenn STR nur Großbuchstaben enthält)</text:p>
      <text:p text:style-name="P183"><text:line-break/>IS_UPPER testet ob in der Zeichenkette STR nur Großbuchstaben enthalten sind. Wird etwas anders als ein Großbuchstabe gefunden gibt die Funktion FALSE zurück. Sind in STR nur Großbuchstaben enthalten gibt die Funktion TRUE zurück. Bei der Prüfung wird die Globale Setup Konstante EXTENDED_ASCII berücksichtigt. Wenn EXTENDED_ASCII = TRUE ist werden Zeichen des erweiterten ASCII Zeichensatzes nach ISO 8859-1 berücksichtigt. Umlaute wie Ä,Ö,Ü werden nur dann berücksichtigt wenn die Globale Konstante <text:s/>EXTENDED_ASCII = TRUE ist.</text:p>
      <text:p text:style-name="P183"/>
      <text:list xml:id="list38465031" text:continue-numbering="true" text:style-name="L1">
        <text:list-item>
          <text:list>
            <text:list-item>
              <text:h text:style-name="P216" text:outline-level="2"><text:soft-page-break/><text:alphabetical-index-mark-start text:id="IMark225902392"/>ISC_ALPHA<text:alphabetical-index-mark-end text:id="IMark225902392"/></text:h>
            </text:list-item>
          </text:list>
        </text:list-item>
      </text:list>
      <text:p text:style-name="P69">Type<text:tab/>Funktion : BOOL</text:p>
      <text:p text:style-name="P173"><text:span text:style-name="T15">Input</text:span><text:span text:style-name="T14"><text:tab/>IN : BYTE (Zeichen)</text:span></text:p>
      <text:p text:style-name="P73"><draw:frame draw:style-name="fr3" draw:name="Grafik508" text:anchor-type="paragraph" svg:x="1.002cm" svg:y="0.669cm" svg:width="4.521cm" svg:height="1.12cm" draw:z-index="487"><draw:image xlink:href="Pictures/100000000000015600000055B18242AD.png" xlink:type="simple" xlink:show="embed" xlink:actuate="onLoad"/></draw:frame>Output<text:tab/>BOOL (TRUE IN ein Zeichen a..z, A..Z oder Umlaut ist))</text:p>
      <text:p text:style-name="P183"><text:line-break/>ISC_ALPHA testet ob das Zeichen IN ein alphabetisches Zeichen ist, Ist IN ein Zeichen A..Z, a..z oder ein beliebiger Umlaut gibt die Funktion TRUE zurück, wenn nicht gibt die Funktion FALSE zurück. Bei der Prüfung wird die Globale Setup Konstante EXTENDED_ASCII berücksichtigt. Wenn EXTENDED_ASCII = TRUE ist werden Zeichen des erweiterten ASCII Zeichensatzes nach ISO 8859-1 ausgewertet. Umlaute wie Ä,Ö,Ü werden nur dann berücksichtigt wenn die Globale Konstante <text:s/>EXTENDED_ASCII = TRUE ist.</text:p>
      <text:p text:style-name="P2">Die folgende <text:span text:style-name="T11">Tabelle</text:span> Erläutert die Codes: </text:p>
      <table:table table:name="Tabelle32" table:style-name="Tabelle32">
        <table:table-column table:style-name="Tabelle32.A"/>
        <table:table-column table:style-name="Tabelle32.B"/>
        <table:table-column table:style-name="Tabelle32.C"/>
        <table:table-row table:style-name="Tabelle32.1">
          <table:table-cell table:style-name="Tabelle32.A1" office:value-type="string">
            <text:p text:style-name="P29">Code</text:p>
          </table:table-cell>
          <table:table-cell table:style-name="Tabelle32.A1" office:value-type="string">
            <text:p text:style-name="P29">EXTENDED_ASCII = TRUE</text:p>
          </table:table-cell>
          <table:table-cell table:style-name="Tabelle32.C1" office:value-type="string">
            <text:p text:style-name="P29">EXTENDED_ASCII = FASLE</text:p>
          </table:table-cell>
        </table:table-row>
        <table:table-row table:style-name="Tabelle32.1">
          <table:table-cell table:style-name="Tabelle32.A2" office:value-type="string">
            <text:p text:style-name="P29">0..64 </text:p>
          </table:table-cell>
          <table:table-cell table:style-name="Tabelle32.A2" office:value-type="string">
            <text:p text:style-name="P29">FALSE</text:p>
          </table:table-cell>
          <table:table-cell table:style-name="Tabelle32.C2" office:value-type="string">
            <text:p text:style-name="P29">FALSE</text:p>
          </table:table-cell>
        </table:table-row>
        <table:table-row table:style-name="Tabelle32.1">
          <table:table-cell table:style-name="Tabelle32.A2" office:value-type="string">
            <text:p text:style-name="P29">65..90</text:p>
          </table:table-cell>
          <table:table-cell table:style-name="Tabelle32.A2" office:value-type="string">
            <text:p text:style-name="P29">TRUE</text:p>
          </table:table-cell>
          <table:table-cell table:style-name="Tabelle32.C2" office:value-type="string">
            <text:p text:style-name="P29">TRUE</text:p>
          </table:table-cell>
        </table:table-row>
        <table:table-row table:style-name="Tabelle32.1">
          <table:table-cell table:style-name="Tabelle32.A2" office:value-type="string">
            <text:p text:style-name="P29">91..96</text:p>
          </table:table-cell>
          <table:table-cell table:style-name="Tabelle32.A2" office:value-type="string">
            <text:p text:style-name="P29">FALSE</text:p>
          </table:table-cell>
          <table:table-cell table:style-name="Tabelle32.C2" office:value-type="string">
            <text:p text:style-name="P29">FALSE</text:p>
          </table:table-cell>
        </table:table-row>
        <table:table-row table:style-name="Tabelle32.1">
          <table:table-cell table:style-name="Tabelle32.A2" office:value-type="string">
            <text:p text:style-name="P29">97..122</text:p>
          </table:table-cell>
          <table:table-cell table:style-name="Tabelle32.A2" office:value-type="string">
            <text:p text:style-name="P29">TRUE</text:p>
          </table:table-cell>
          <table:table-cell table:style-name="Tabelle32.C2" office:value-type="string">
            <text:p text:style-name="P29">TRUE</text:p>
          </table:table-cell>
        </table:table-row>
        <table:table-row table:style-name="Tabelle32.1">
          <table:table-cell table:style-name="Tabelle32.A2" office:value-type="string">
            <text:p text:style-name="P29">123..191</text:p>
          </table:table-cell>
          <table:table-cell table:style-name="Tabelle32.A2" office:value-type="string">
            <text:p text:style-name="P29">FALSE</text:p>
          </table:table-cell>
          <table:table-cell table:style-name="Tabelle32.C2" office:value-type="string">
            <text:p text:style-name="P29">FALSE</text:p>
          </table:table-cell>
        </table:table-row>
        <table:table-row table:style-name="Tabelle32.1">
          <table:table-cell table:style-name="Tabelle32.A2" office:value-type="string">
            <text:p text:style-name="P29">192..214</text:p>
          </table:table-cell>
          <table:table-cell table:style-name="Tabelle32.A2" office:value-type="string">
            <text:p text:style-name="P29">TRUE</text:p>
          </table:table-cell>
          <table:table-cell table:style-name="Tabelle32.C2" office:value-type="string">
            <text:p text:style-name="P29">FALSE</text:p>
          </table:table-cell>
        </table:table-row>
        <table:table-row table:style-name="Tabelle32.1">
          <table:table-cell table:style-name="Tabelle32.A2" office:value-type="string">
            <text:p text:style-name="P29">215</text:p>
          </table:table-cell>
          <table:table-cell table:style-name="Tabelle32.A2" office:value-type="string">
            <text:p text:style-name="P29">FALSE</text:p>
          </table:table-cell>
          <table:table-cell table:style-name="Tabelle32.C2" office:value-type="string">
            <text:p text:style-name="P29">FALSE</text:p>
          </table:table-cell>
        </table:table-row>
        <table:table-row table:style-name="Tabelle32.1">
          <table:table-cell table:style-name="Tabelle32.A2" office:value-type="string">
            <text:p text:style-name="P29">216..246</text:p>
          </table:table-cell>
          <table:table-cell table:style-name="Tabelle32.A2" office:value-type="string">
            <text:p text:style-name="P29">TRUE</text:p>
          </table:table-cell>
          <table:table-cell table:style-name="Tabelle32.C2" office:value-type="string">
            <text:p text:style-name="P29">FALSE</text:p>
          </table:table-cell>
        </table:table-row>
        <table:table-row table:style-name="Tabelle32.1">
          <table:table-cell table:style-name="Tabelle32.A2" office:value-type="string">
            <text:p text:style-name="P29">247</text:p>
          </table:table-cell>
          <table:table-cell table:style-name="Tabelle32.A2" office:value-type="string">
            <text:p text:style-name="P29">FALSE</text:p>
          </table:table-cell>
          <table:table-cell table:style-name="Tabelle32.C2" office:value-type="string">
            <text:p text:style-name="P29">FALSE</text:p>
          </table:table-cell>
        </table:table-row>
        <table:table-row table:style-name="Tabelle32.1">
          <table:table-cell table:style-name="Tabelle32.A2" office:value-type="string">
            <text:p text:style-name="P29">248..255</text:p>
          </table:table-cell>
          <table:table-cell table:style-name="Tabelle32.A2" office:value-type="string">
            <text:p text:style-name="P29">TRUE</text:p>
          </table:table-cell>
          <table:table-cell table:style-name="Tabelle32.C2" office:value-type="string">
            <text:p text:style-name="P29">FALSE</text:p>
          </table:table-cell>
        </table:table-row>
      </table:table>
      <text:p text:style-name="P37"/>
      <text:p text:style-name="P184"/>
      <text:p text:style-name="P184"/>
      <text:p text:style-name="P184"/>
      <text:list xml:id="list38469065" text:continue-numbering="true" text:style-name="L1">
        <text:list-item>
          <text:list>
            <text:list-item>
              <text:h text:style-name="P216" text:outline-level="2"><text:soft-page-break/><text:alphabetical-index-mark-start text:id="IMark225902392"/>ISC_CTRL<text:alphabetical-index-mark-end text:id="IMark225902392"/></text:h>
            </text:list-item>
          </text:list>
        </text:list-item>
      </text:list>
      <text:p text:style-name="P69">Type<text:tab/>Funktion : BOOL</text:p>
      <text:p text:style-name="P173"><text:span text:style-name="T15">Input</text:span><text:span text:style-name="T14"><text:tab/>IN : BYTE (Zeichen)</text:span></text:p>
      <text:p text:style-name="P73"><draw:frame draw:style-name="fr3" draw:name="Grafik510" text:anchor-type="paragraph" svg:x="1.046cm" svg:y="0.667cm" svg:width="3.62cm" svg:height="1.12cm" draw:z-index="489"><draw:image xlink:href="Pictures/100000000000011200000055E8D98E47.png" xlink:type="simple" xlink:show="embed" xlink:actuate="onLoad"/></draw:frame>Output<text:tab/>BOOL (TRUE IN ein Zeichen 0..9 ist))</text:p>
      <text:p text:style-name="P183"><text:line-break/>ISC_CTRL testet ob ein Zeichen IN ein Kontrollzeichen ist, Ist IN ein Kontrollzeichen gibt die Funktion TRUE zurück, wenn nicht gibt die Funktion FALSE zurück. Kontrollzeichen sind alle Zeichen mit dem Code &lt; 32 oder 127.</text:p>
      <text:list xml:id="list38464533" text:continue-numbering="true" text:style-name="L1">
        <text:list-item>
          <text:list>
            <text:list-item>
              <text:h text:style-name="P216" text:outline-level="2"><text:alphabetical-index-mark-start text:id="IMark225902392"/>ISC_HEX<text:alphabetical-index-mark-end text:id="IMark225902392"/></text:h>
            </text:list-item>
          </text:list>
        </text:list-item>
      </text:list>
      <text:p text:style-name="P69">Type<text:tab/>Funktion : BOOL</text:p>
      <text:p text:style-name="P173"><text:span text:style-name="T15">Input</text:span><text:span text:style-name="T14"><text:tab/>IN : BYTE (Zeichen)</text:span></text:p>
      <text:p text:style-name="P73"><draw:frame draw:style-name="fr3" draw:name="Grafik511" text:anchor-type="paragraph" svg:x="1.023cm" svg:y="0.688cm" svg:width="3.62cm" svg:height="1.12cm" draw:z-index="490"><draw:image xlink:href="Pictures/1000000000000112000000552E78F20B.png" xlink:type="simple" xlink:show="embed" xlink:actuate="onLoad"/></draw:frame>Output<text:tab/>BOOL (TRUE IN ein Zeichen 0..9 ist))</text:p>
      <text:p text:style-name="P183"><text:line-break/>ISC_HEX testet ob ein Zeichen IN ein Hexadezimales Zeichen ist, Ist IN ein Zeichen 0..9, A..F, a..f gibt die Funktion TRUE zurück, wenn nicht gibt die Funktion FALSE zurück.</text:p>
      <text:p text:style-name="P183">Die Zeichen 0..9 haben die Codes (48..57)</text:p>
      <text:p text:style-name="P183">Die Zeichen A..F haben die Codes (65..70)</text:p>
      <text:p text:style-name="P183">Die Zeichen a..f haben die Codes (97..102)</text:p>
      <text:p text:style-name="P183"/>
      <text:p text:style-name="P183"/>
      <text:p text:style-name="P183"/>
      <text:list xml:id="list38449283" text:continue-numbering="true" text:style-name="L1">
        <text:list-item>
          <text:list>
            <text:list-item>
              <text:h text:style-name="P216" text:outline-level="2"><text:soft-page-break/><text:alphabetical-index-mark-start text:id="IMark225902392"/>ISC_LOWER<text:alphabetical-index-mark-end text:id="IMark225902392"/></text:h>
            </text:list-item>
          </text:list>
        </text:list-item>
      </text:list>
      <text:p text:style-name="P69">Type<text:tab/>Funktion : BOOL</text:p>
      <text:p text:style-name="P173"><text:span text:style-name="T15">Input</text:span><text:span text:style-name="T14"><text:tab/>IN : BYTE (Zeichen)</text:span></text:p>
      <text:p text:style-name="P73"><draw:frame draw:style-name="fr3" draw:name="Grafik512" text:anchor-type="paragraph" svg:x="1.046cm" svg:y="0.667cm" svg:width="4.971cm" svg:height="1.12cm" draw:z-index="491"><draw:image xlink:href="Pictures/10000000000001780000005505F3C4A1.png" xlink:type="simple" xlink:show="embed" xlink:actuate="onLoad"/></draw:frame>Output<text:tab/>BOOL (TRUE IN ein Zeichen 0..9 ist))</text:p>
      <text:p text:style-name="P173"><text:span text:style-name="T21"><text:line-break/>ISC_LOWER testet ob ein Zeichen IN ein Kleinbuchstabe ist, Ist IN ein Klein</text:span><text:span text:style-name="T21">buchstabe gibt die Funktion TRUE zurück, wenn nicht gibt die Funktion </text:span><text:span text:style-name="T21">FALSE zurück. Bei der Prüfung wird die Globale Setup Konstante EXTENDED_ASCII berücksichtigt. Wenn EXTENDED_ASCII = TRUE ist werden Zeichen des erweiterten ASCII Zeichensatzes nach ISO 8859-1 ausgewertet.</text:span></text:p>
      <text:p text:style-name="P6">Die folgende <text:span text:style-name="T11">Tabelle</text:span> Erläutert die Zeichencodes: </text:p>
      <table:table table:name="Tabelle33" table:style-name="Tabelle33">
        <table:table-column table:style-name="Tabelle33.A"/>
        <table:table-column table:style-name="Tabelle33.B"/>
        <table:table-column table:style-name="Tabelle33.C"/>
        <table:table-row table:style-name="Tabelle33.1">
          <table:table-cell table:style-name="Tabelle33.A1" office:value-type="string">
            <text:p text:style-name="P32">Code</text:p>
          </table:table-cell>
          <table:table-cell table:style-name="Tabelle33.A1" office:value-type="string">
            <text:p text:style-name="P32">EXTENDED_ASCII = TRUE</text:p>
          </table:table-cell>
          <table:table-cell table:style-name="Tabelle33.C1" office:value-type="string">
            <text:p text:style-name="P32">EXTENDED_ASCII = FASLE</text:p>
          </table:table-cell>
        </table:table-row>
        <table:table-row table:style-name="Tabelle33.1">
          <table:table-cell table:style-name="Tabelle33.A2" office:value-type="string">
            <text:p text:style-name="P32">0..96, 123..223, 247, 255</text:p>
          </table:table-cell>
          <table:table-cell table:style-name="Tabelle33.A2" office:value-type="string">
            <text:p text:style-name="P32">FALSE</text:p>
          </table:table-cell>
          <table:table-cell table:style-name="Tabelle33.C2" office:value-type="string">
            <text:p text:style-name="P32">FALSE</text:p>
          </table:table-cell>
        </table:table-row>
        <table:table-row table:style-name="Tabelle33.1">
          <table:table-cell table:style-name="Tabelle33.A2" office:value-type="string">
            <text:p text:style-name="P32">97..122</text:p>
          </table:table-cell>
          <table:table-cell table:style-name="Tabelle33.A2" office:value-type="string">
            <text:p text:style-name="P32">TRUE</text:p>
          </table:table-cell>
          <table:table-cell table:style-name="Tabelle33.C2" office:value-type="string">
            <text:p text:style-name="P32">TRUE</text:p>
          </table:table-cell>
        </table:table-row>
        <table:table-row table:style-name="Tabelle33.1">
          <table:table-cell table:style-name="Tabelle33.A2" office:value-type="string">
            <text:p text:style-name="P32">224..246</text:p>
          </table:table-cell>
          <table:table-cell table:style-name="Tabelle33.A2" office:value-type="string">
            <text:p text:style-name="P32">TRUE</text:p>
          </table:table-cell>
          <table:table-cell table:style-name="Tabelle33.C2" office:value-type="string">
            <text:p text:style-name="P32">FALSE</text:p>
          </table:table-cell>
        </table:table-row>
        <table:table-row table:style-name="Tabelle33.1">
          <table:table-cell table:style-name="Tabelle33.A2" office:value-type="string">
            <text:p text:style-name="P32">248..254</text:p>
          </table:table-cell>
          <table:table-cell table:style-name="Tabelle33.A2" office:value-type="string">
            <text:p text:style-name="P32">TRUE</text:p>
          </table:table-cell>
          <table:table-cell table:style-name="Tabelle33.C2" office:value-type="string">
            <text:p text:style-name="P32">FALSE</text:p>
          </table:table-cell>
        </table:table-row>
      </table:table>
      <text:p text:style-name="P37"/>
      <text:list xml:id="list38452823" text:continue-numbering="true" text:style-name="L1">
        <text:list-item>
          <text:list>
            <text:list-item>
              <text:h text:style-name="P216" text:outline-level="2"><text:alphabetical-index-mark-start text:id="IMark225902392"/>ISC_NUM<text:alphabetical-index-mark-end text:id="IMark225902392"/></text:h>
            </text:list-item>
          </text:list>
        </text:list-item>
      </text:list>
      <text:p text:style-name="P69">Type<text:tab/>Funktion : BOOL</text:p>
      <text:p text:style-name="P173"><text:span text:style-name="T15">Input</text:span><text:span text:style-name="T14"><text:tab/>IN : BYTE (Zeichen)</text:span></text:p>
      <text:p text:style-name="P73"><draw:frame draw:style-name="fr3" draw:name="Grafik509" text:anchor-type="paragraph" svg:x="1.046cm" svg:y="0.69cm" svg:width="4.069cm" svg:height="1.12cm" draw:z-index="488"><draw:image xlink:href="Pictures/100000000000013400000055BE44F522.png" xlink:type="simple" xlink:show="embed" xlink:actuate="onLoad"/></draw:frame>Output<text:tab/>BOOL (TRUE IN ein Zeichen 0..9 ist))</text:p>
      <text:p text:style-name="P183"><text:line-break/>ISC_NUM testet ob ein Zeichen IN ein Numerisches Zeichen ist, Ist IN ein Zeichen 0..9 gibt die Funktion TRUE zurück, wenn nicht gibt die Funktion FALSE zurück. Die Zeichen von 0..9 haben die Zeichencodes (48..57).</text:p>
      <text:list xml:id="list38447376" text:continue-numbering="true" text:style-name="L1">
        <text:list-item>
          <text:list>
            <text:list-item>
              <text:h text:style-name="P216" text:outline-level="2"><text:soft-page-break/><text:alphabetical-index-mark-start text:id="IMark225902392"/>ISC_UPPER<text:alphabetical-index-mark-end text:id="IMark225902392"/></text:h>
            </text:list-item>
          </text:list>
        </text:list-item>
      </text:list>
      <text:p text:style-name="P69">Type<text:tab/>Funktion : BOOL</text:p>
      <text:p text:style-name="P173"><text:span text:style-name="T15">Input</text:span><text:span text:style-name="T14"><text:tab/>IN : BYTE (Zeichen)</text:span></text:p>
      <text:p text:style-name="P73"><draw:frame draw:style-name="fr3" draw:name="Grafik513" text:anchor-type="paragraph" svg:x="1.046cm" svg:y="0.684cm" svg:width="4.521cm" svg:height="1.12cm" draw:z-index="492"><draw:image xlink:href="Pictures/100000000000015600000055E57D3FCD.png" xlink:type="simple" xlink:show="embed" xlink:actuate="onLoad"/></draw:frame>Output<text:tab/>BOOL (TRUE IN ein Zeichen 0..9 ist))</text:p>
      <text:p text:style-name="P183"><text:line-break/>ISC_UPPER testet ob ein Zeichen IN ein Großbuchstabe ist, Ist IN ein Großbuchstabe gibt die Funktion TRUE zurück, wenn nicht gibt die Funktion FALSE zurück. Bei der Prüfung wird die Globale Setup Konstante EXTENDED_ASCII berücksichtigt. Wenn EXTENDED_ASCII = TRUE ist werden Zeichen des erweiterten ASCII Zeichensatzes nach ISO 8859-1 ausgewertet.</text:p>
      <text:p text:style-name="P2"><text:span text:style-name="T11">Die</text:span> folgende Tabelle Erläutert die Zeichencodes: </text:p>
      <table:table table:name="Tabelle34" table:style-name="Tabelle34">
        <table:table-column table:style-name="Tabelle34.A"/>
        <table:table-column table:style-name="Tabelle34.B"/>
        <table:table-column table:style-name="Tabelle34.C"/>
        <table:table-row table:style-name="Tabelle34.1">
          <table:table-cell table:style-name="Tabelle34.A1" office:value-type="string">
            <text:p text:style-name="Standard">Code</text:p>
          </table:table-cell>
          <table:table-cell table:style-name="Tabelle34.B1" office:value-type="string">
            <text:p text:style-name="Standard">EXTENDED_ASCII = TRUE</text:p>
          </table:table-cell>
          <table:table-cell table:style-name="Tabelle34.C1" office:value-type="string">
            <text:p text:style-name="Standard">EXTENDED_ASCII = FASLE</text:p>
          </table:table-cell>
        </table:table-row>
        <table:table-row table:style-name="Tabelle34.1">
          <table:table-cell table:style-name="Tabelle34.A2" office:value-type="string">
            <text:p text:style-name="Standard">0..64, 91..191, 215, 223..255</text:p>
          </table:table-cell>
          <table:table-cell table:style-name="Tabelle34.B2" office:value-type="string">
            <text:p text:style-name="Standard">FALSE</text:p>
          </table:table-cell>
          <table:table-cell table:style-name="Tabelle34.C2" office:value-type="string">
            <text:p text:style-name="Standard">FALSE</text:p>
          </table:table-cell>
        </table:table-row>
        <table:table-row table:style-name="Tabelle34.1">
          <table:table-cell table:style-name="Tabelle34.A3" office:value-type="string">
            <text:p text:style-name="Standard">65..90</text:p>
          </table:table-cell>
          <table:table-cell table:style-name="Tabelle34.B2" office:value-type="string">
            <text:p text:style-name="Standard">TRUE</text:p>
          </table:table-cell>
          <table:table-cell table:style-name="Tabelle34.C2" office:value-type="string">
            <text:p text:style-name="Standard">TRUE</text:p>
          </table:table-cell>
        </table:table-row>
        <table:table-row table:style-name="Tabelle34.1">
          <table:table-cell table:style-name="Tabelle34.A3" office:value-type="string">
            <text:p text:style-name="Standard">192..214</text:p>
          </table:table-cell>
          <table:table-cell table:style-name="Tabelle34.B2" office:value-type="string">
            <text:p text:style-name="Standard">TRUE</text:p>
          </table:table-cell>
          <table:table-cell table:style-name="Tabelle34.C2" office:value-type="string">
            <text:p text:style-name="Standard">FALSE</text:p>
          </table:table-cell>
        </table:table-row>
        <table:table-row table:style-name="Tabelle34.1">
          <table:table-cell table:style-name="Tabelle34.A3" office:value-type="string">
            <text:p text:style-name="P147">216..222</text:p>
          </table:table-cell>
          <table:table-cell table:style-name="Tabelle34.B2" office:value-type="string">
            <text:p text:style-name="Standard">TRUE</text:p>
          </table:table-cell>
          <table:table-cell table:style-name="Tabelle34.C2" office:value-type="string">
            <text:p text:style-name="Standard">FALSE</text:p>
          </table:table-cell>
        </table:table-row>
      </table:table>
      <text:p text:style-name="P4"/>
      <text:list xml:id="list38468892" text:continue-numbering="true" text:style-name="L1">
        <text:list-item>
          <text:list>
            <text:list-item>
              <text:h text:style-name="P216" text:outline-level="2"><text:alphabetical-index-mark-start text:id="IMark225902392"/>LOWERCASE<text:alphabetical-index-mark-end text:id="IMark225902392"/></text:h>
            </text:list-item>
          </text:list>
        </text:list-item>
      </text:list>
      <text:p text:style-name="P69">Type<text:tab/>Funktion : STRING</text:p>
      <text:p text:style-name="P173"><text:span text:style-name="T15">Input</text:span><text:span text:style-name="T14"><text:tab/>STR : STRING (Eingabestring)</text:span></text:p>
      <text:p text:style-name="P73"><draw:frame draw:style-name="fr3" draw:name="Grafik49" text:anchor-type="paragraph" svg:x="1.113cm" svg:y="0.681cm" svg:width="4.069cm" svg:height="1.12cm" draw:z-index="34"><draw:image xlink:href="Pictures/10000000000001340000005522E8BA5C.png" xlink:type="simple" xlink:show="embed" xlink:actuate="onLoad"/></draw:frame>Output<text:tab/>STRING (STRING in Kleinbuchstaben)</text:p>
      <text:p text:style-name="P66"><text:span text:style-name="T21"><text:line-break/>Die Funktion LOWERCASE wandelt den </text:span><text:span text:style-name="T16">String</text:span><text:span text:style-name="T21"> STR in Kleinbuchstaben um. Bei der Konvertierung wird die Globale Setup Konstante EXTENDED_ASCII berücksichtigt. Wenn EXTENDED_ASCII = TRUE werden Zeichen des erweiterten ASCII Zeichensatzes nach ISO 8859-1 ausgewertet. Umlaute wie Ä,Ö,Ü werden nur dann berücksichtigt wenn die Globale Konstante <text:s/>EXTEN</text:span><text:soft-page-break/><text:span text:style-name="T21">DED_ASCII = TRUE ist. Eine Detaillierte Beschreibung der Codewandlung ist bei der Funktion TO_LOWER zu finden.</text:span></text:p>
      <text:list xml:id="list38474581" text:continue-numbering="true" text:style-name="L1">
        <text:list-item>
          <text:list>
            <text:list-item>
              <text:h text:style-name="P216" text:outline-level="2"><text:alphabetical-index-mark-start text:id="IMark225902392"/>MESSAGE_4R<text:alphabetical-index-mark-end text:id="IMark225902392"/></text:h>
            </text:list-item>
          </text:list>
        </text:list-item>
      </text:list>
      <text:p text:style-name="P69">Type<text:tab/>Funktionsbaustein</text:p>
      <text:p text:style-name="P173"><text:span text:style-name="T15">Input</text:span><text:span text:style-name="T14"><text:tab/>M0 :. M3 STRING(STRING_LENGTH) (Meldungen)</text:span></text:p>
      <text:p text:style-name="P179"><text:tab/>MM : INT (Meldung die maximal angezeigt wird)</text:p>
      <text:p text:style-name="P179"><text:tab/>ENQ : BOOL (Freigabe Eingang)</text:p>
      <text:p text:style-name="P179"><text:tab/>CLK : BOOL (Eingang zum weiter Schalten)</text:p>
      <text:p text:style-name="P179"><text:tab/>T1 : TIME (Zeit für automatisches Weiterschalten)</text:p>
      <text:p text:style-name="P179">Output<text:tab/>MX : STRING(STRING_LENGTH) (Ausgabestring)</text:p>
      <text:p text:style-name="P179"><text:tab/>MN : INT (derzeit aktive Meldung)</text:p>
      <text:p text:style-name="P173"><draw:frame draw:style-name="fr3" draw:name="Grafik696" text:anchor-type="paragraph" svg:x="1.002cm" svg:y="0.679cm" svg:width="2.9cm" svg:height="3.9cm" draw:z-index="697"><draw:image xlink:href="Pictures/10000000000000DB00000127FA2AC2F8.png" xlink:type="simple" xlink:show="embed" xlink:actuate="onLoad"/></draw:frame><text:span text:style-name="T14"><text:tab/>TR : BOOL (</text:span><text:span text:style-name="T15">Trigger</text:span><text:span text:style-name="T14"> Ausgang)</text:span></text:p>
      <text:p text:style-name="P179"><text:line-break/>MESSAGE_4R stellt am Ausgang MX eine von bis zu 4 Meldungen bereit. Es wird immer nur eine von bis zu 4 Meldungen auf MX bereitgestellt. Die Anzahl der Meldungen kann mit dem Eingang MM begrenzt werden. Wird MM auf 2 gesetzt so werden nur die Meldungen M0 .. M2 hintereinander ausgegeben. Wird MM nicht gesetzt so werden alle Meldungen M0..M3 ausgegeben. Mit jeder steigenden Flanke von CLK wird die nächste Meldung auf MX ausgegeben, bleibt CLK dauerhaft auf TRUE so wird nach Ablauf der Zeit T1 automatisch die nächste Meldung ausgegeben, solange bis CLK wieder FALSE wird. Wird der Freigabeeingang ENQ auf FALSE gesetzt, wird am Ausgang MX '' ausgegeben und der Baustein hat keinerlei Funktion. Der Ausgang MN zeigt an welche Meldung gerade am Ausgang MX ausgegeben wird. Der Ausgang TR wird immer dann für genau einen Zyklus TRUE wenn sich die Meldung am Ausgang MX verändert hat, er dient vor allem Dazu Bausteine zur Weiterverarbeitung der Meldungen anzusteuern.</text:p>
      <text:p text:style-name="P179"/>
      <text:list xml:id="list38464991" text:continue-numbering="true" text:style-name="L1">
        <text:list-item>
          <text:list>
            <text:list-item>
              <text:h text:style-name="P216" text:outline-level="2"><text:soft-page-break/><text:alphabetical-index-mark-start text:id="IMark225902392"/>MESSAGE_8<text:alphabetical-index-mark-end text:id="IMark225902392"/></text:h>
            </text:list-item>
          </text:list>
        </text:list-item>
      </text:list>
      <text:p text:style-name="P69">Type<text:tab/>Funktionsbaustein</text:p>
      <text:p text:style-name="P173"><text:span text:style-name="T15">Input</text:span><text:span text:style-name="T14"><text:tab/>IN1..IN8 : BOOL (Auswahleingänge)</text:span></text:p>
      <text:p text:style-name="P179">Config<text:tab/>S1..S8 : STRING (Nachrichtenvorgabe)</text:p>
      <text:p text:style-name="P73"><draw:frame draw:style-name="fr3" draw:name="Grafik88" text:anchor-type="paragraph" svg:x="1.067cm" svg:y="0.688cm" svg:width="2.499cm" svg:height="3.9cm" draw:z-index="401"><draw:image xlink:href="Pictures/10000000000000BD00000127EE2F0BBF.png" xlink:type="simple" xlink:show="embed" xlink:actuate="onLoad"/></draw:frame>Output<text:tab/>M : STRING (Ausgangsstring)</text:p>
      <text:p text:style-name="P183"><text:line-break/>MESSAGE_8 erzeugt eine von 8 Nachrichten am Ausgang M. wenn keiner der Eingänge IN1..IN8 auf TRUE ist wird an M ein Leere Zeichenkette ausgegeben, ansonsten einer der in S1..S8 gespeicherten Nachrichten. Der Baustein gibt immer die Nachricht mit der höchsten Priorität aus. IN1 hat dabei die höchste Priorität und IN8 die niedrigste. MESSAGE_8 kann zusammen mit dem Baustein STORE_8 benutzt werden um Fehlerereignisse zu speichern und Anzuzeigen.</text:p>
      <text:p text:style-name="P183">Im folgenden Beispiel werden bis zu 8 Fehlerereignisse (E0..E7) gespeichert und jeweils die am höchsten priorisierte am Ausgang M von MESSAGE_8 angezeigt. Mit dem Eingang CLEAR kann man durch Tasten jeweils die letzte Meldung löschen und zur nächsten anstehenden Fehlermeldung Weiterschalten. MIT dem Eingang RESET kann man alle anstehenden Fehlermeldungen löschen.</text:p>
      <text:p text:style-name="P183"><draw:frame draw:style-name="fr3" draw:name="Grafik421" text:anchor-type="paragraph" svg:x="1.51cm" svg:y="0.138cm" svg:width="14.94cm" svg:height="6.1cm" draw:z-index="403"><draw:image xlink:href="Pictures/10000000000003AD000001806D515420.png" xlink:type="simple" xlink:show="embed" xlink:actuate="onLoad"/></draw:frame></text:p>
      <text:list xml:id="list38456102" text:continue-numbering="true" text:style-name="L1">
        <text:list-item>
          <text:list>
            <text:list-item>
              <text:h text:style-name="P225" text:outline-level="2"><text:soft-page-break/><text:alphabetical-index-mark-start text:id="IMark225902392"/>MIRROR<text:alphabetical-index-mark-end text:id="IMark225902392"/></text:h>
            </text:list-item>
          </text:list>
        </text:list-item>
      </text:list>
      <text:p text:style-name="P69">Type<text:tab/>Funktion : STRING</text:p>
      <text:p text:style-name="P173"><text:span text:style-name="T15">Input</text:span><text:span text:style-name="T14"><text:tab/>STR : STRING (Eingangsstring)</text:span></text:p>
      <text:p text:style-name="P183"><draw:frame draw:style-name="fr3" draw:name="Grafik444" text:anchor-type="paragraph" svg:x="1.067cm" svg:y="0.69cm" svg:width="2.731cm" svg:height="1.12cm" draw:z-index="421"><draw:image xlink:href="Pictures/10000000000000CE00000055F16F3122.png" xlink:type="simple" xlink:show="embed" xlink:actuate="onLoad"/></draw:frame>Output<text:tab/>STRING (Eingangsstring Rückwärts gelesen)</text:p>
      <text:p text:style-name="P183"><text:line-break/>MIRROR liest die Zeichenkette an STR Rückwärts und gibt die Zeichen in umgekehrter Reihenfolge wieder aus.</text:p>
      <text:p text:style-name="P183">Beispiel: MIRROR('Das ist ein Test') = 'tseT nie tsi saD'</text:p>
      <text:list xml:id="list38461584" text:continue-numbering="true" text:style-name="L1">
        <text:list-item>
          <text:list>
            <text:list-item>
              <text:h text:style-name="P225" text:outline-level="2"><text:alphabetical-index-mark-start text:id="IMark225902392"/><text:alphabetical-index-mark-start text:id="IMark225773028"/>MONTH_TO_STRING<text:alphabetical-index-mark-end text:id="IMark225773028"/><text:alphabetical-index-mark-end text:id="IMark225902392"/></text:h>
            </text:list-item>
          </text:list>
        </text:list-item>
      </text:list>
      <text:p text:style-name="P69">Type<text:tab/>Funktion : STRING(10)</text:p>
      <text:p text:style-name="P66"><text:span text:style-name="T15">Input</text:span><text:span text:style-name="T14"><text:tab/>MTH : INT (Monat 1..12)</text:span></text:p>
      <text:p text:style-name="P173"><text:span text:style-name="T14"><text:tab/>LANG : INT (Sprachauswahl 0 = </text:span><text:span text:style-name="T15">Default</text:span><text:span text:style-name="T14">)</text:span></text:p>
      <text:p text:style-name="P179"><text:tab/>LX : INT (Länge der Zeichenkette)</text:p>
      <text:p text:style-name="P183"><draw:frame draw:style-name="fr3" draw:name="Grafik682" text:anchor-type="paragraph" svg:x="1.041cm" svg:y="0.693cm" svg:width="6.47cm" svg:height="1.79cm" draw:z-index="675"><draw:image xlink:href="Pictures/10000000000001E900000087F30A52BB.png" xlink:type="simple" xlink:show="embed" xlink:actuate="onLoad"/></draw:frame>Output<text:tab/>STRING(10) (Ausgangswert)</text:p>
      <text:p text:style-name="P173"><text:span text:style-name="T21"><text:line-break/>MONTH_TO_STRING wandelt eine Monatszahl in die entsprechende Zeichenkette. Der Eingang MTH gibt den entsprechenden Monat an: 1 = Januar und 12 = Dezember. Der Eingang LANG wählt die gewünschte Sprache aus: 1 = Englisch und 2 = Deutsch. LANG = 0 benutzt die als </text:span><text:span text:style-name="T16">Default</text:span><text:span text:style-name="T21"> Sprache in der Globalen Setup Variable LANGUAGE_DEFAULT festgelegte Sprache. Der Eingang LX legt die Länge der zu erzeugenden Zeichenkette fest: 0 = Voller Monatsname, 3 = Abkürzung mit 3 Buchstaben, alle anderen Werte am Eingang LX sind nicht definiert.</text:span></text:p>
      <text:p text:style-name="P173"><text:span text:style-name="T21">Die vom Baustein erzeugten Zeichenketten sowie die unterstützten Sprachen sind im Bereich Global </text:span><text:span text:style-name="T16">Constants</text:span><text:span text:style-name="T21"> definiert und können dort erweitert und verändert werden.</text:span></text:p>
      <text:p text:style-name="P173"><text:span text:style-name="T21">MONTH_TO_STRING(1,0,0) = '</text:span><text:span text:style-name="T16">January</text:span><text:span text:style-name="T21">'</text:span></text:p>
      <text:p text:style-name="P183">abhängig von der Globalen Konstante LANGUAGE_DEFAULT</text:p>
      <text:p text:style-name="P173"><text:soft-page-break/><text:span text:style-name="T21">MONTH_TO_STRING(1,2,0) = '</text:span><text:span text:style-name="T19">Januar</text:span><text:span text:style-name="T21">'</text:span></text:p>
      <text:p text:style-name="P173"><text:span text:style-name="T21">MONTH_TO_STRING(1,2,3) = '</text:span><text:span text:style-name="T19">Jan</text:span><text:span text:style-name="T21">'</text:span></text:p>
      <text:list xml:id="list38469309" text:continue-numbering="true" text:style-name="L1">
        <text:list-item>
          <text:list>
            <text:list-item>
              <text:h text:style-name="P216" text:outline-level="2"><text:alphabetical-index-mark-start text:id="IMark225902392"/>OCT_TO_BYTE<text:alphabetical-index-mark-end text:id="IMark225902392"/></text:h>
            </text:list-item>
          </text:list>
        </text:list-item>
      </text:list>
      <text:p text:style-name="P69">Type<text:tab/>Funktion : BYTE</text:p>
      <text:p text:style-name="P66"><text:span text:style-name="T15">Input</text:span><text:span text:style-name="T14"><text:tab/>OCT : STRING(10) (Oktale Zeichenkette)</text:span></text:p>
      <text:p text:style-name="P73"><draw:frame draw:style-name="fr3" draw:name="Grafik634" text:anchor-type="paragraph" svg:x="1.046cm" svg:y="0.688cm" svg:width="4.881cm" svg:height="0.99cm" draw:z-index="628"><draw:image xlink:href="Pictures/10000000000001710000004BB6AEEF76.png" xlink:type="simple" xlink:show="embed" xlink:actuate="onLoad"/></draw:frame>Output<text:tab/>BYTE (Ausgangswert)</text:p>
      <text:p text:style-name="P73"><text:line-break/>Die Funktion OCT_TO_BYTE konvertiert eine oktal kodierte Zeichenkette in einen BYTE Wert. Es werden dabei nur die oktalen Zeichen sind '0'..'7' interpretiert, alle anderen in HEX vorkommenden Zeichen werden ignoriert.</text:p>
      <text:p text:style-name="P183">Beispiel:<text:tab/>OCT_TO_BYTE('11') ergibt 9.</text:p>
      <text:list xml:id="list38475832" text:continue-numbering="true" text:style-name="L1">
        <text:list-item>
          <text:list>
            <text:list-item>
              <text:h text:style-name="P216" text:outline-level="2"><text:alphabetical-index-mark-start text:id="IMark225902392"/>OCT_TO_DWORD<text:alphabetical-index-mark-end text:id="IMark225902392"/></text:h>
            </text:list-item>
          </text:list>
        </text:list-item>
      </text:list>
      <text:p text:style-name="P69">Type<text:tab/>Funktion : DWORD</text:p>
      <text:p text:style-name="P66"><text:span text:style-name="T15">Input</text:span><text:span text:style-name="T14"><text:tab/>OCT : STRING(20) (Oktale Zeichenkette)</text:span></text:p>
      <text:p text:style-name="P73"><draw:frame draw:style-name="fr3" draw:name="Grafik635" text:anchor-type="paragraph" svg:x="1.023cm" svg:y="0.688cm" svg:width="5.279cm" svg:height="0.99cm" draw:z-index="629"><draw:image xlink:href="Pictures/100000000000018F0000004B96DCA2C6.png" xlink:type="simple" xlink:show="embed" xlink:actuate="onLoad"/></draw:frame>Output<text:tab/>DWORD (Ausgangswert)</text:p>
      <text:p text:style-name="P73"><text:line-break/>Die Funktion OCT_TO_DWORD konvertiert eine oktal kodierte Zeichenkette in einen BYTE Wert. Es werden dabei nur die oktalen Zeichen sind '0'..'7' interpretiert, alle anderen in HEX vorkommenden Zeichen werden ignoriert.</text:p>
      <text:p text:style-name="P183">Beispiel:<text:tab/>OCT_TO_DWORD('11') ergibt 9.</text:p>
      <text:list xml:id="list38470473" text:continue-numbering="true" text:style-name="L1">
        <text:list-item>
          <text:list>
            <text:list-item>
              <text:h text:style-name="P216" text:outline-level="2"><text:soft-page-break/><text:alphabetical-index-mark-start text:id="IMark225902392"/>REAL_TO_STRF<text:alphabetical-index-mark-end text:id="IMark225902392"/></text:h>
            </text:list-item>
          </text:list>
        </text:list-item>
      </text:list>
      <text:p text:style-name="P69">Type<text:tab/>Funktion : STRING(20)</text:p>
      <text:p text:style-name="P66"><text:span text:style-name="T15">Input</text:span><text:span text:style-name="T14"><text:tab/>IN : REAL (Eingangswert)</text:span></text:p>
      <text:p text:style-name="P179"><text:tab/>N : INT (Anzahl der Nachkommastellen)</text:p>
      <text:p text:style-name="P73"><draw:frame draw:style-name="fr3" draw:name="Grafik232" text:anchor-type="paragraph" svg:x="1.072cm" svg:y="0.686cm" svg:width="4.971cm" svg:height="1.57cm" draw:z-index="191"><draw:image xlink:href="Pictures/10000000000001780000007774385AB9.png" xlink:type="simple" xlink:show="embed" xlink:actuate="onLoad"/></draw:frame>Output<text:tab/>STRING (Ausgangsstring)</text:p>
      <text:p text:style-name="P173"><text:span text:style-name="T21"><text:line-break/>REAL_TO_STRF konvertiert einen REAL-Wert in einen STRING mit einer festen Anzahl von Nachkommastellen N. Bei der Konvertierung wird ausschließlich in Normales Zahlenformat XXX.NNN umgewandelt. Bei der Umwandlung wird IN auf N Stellen nach dem Komma gerundet und dann in einen </text:span><text:span text:style-name="T16">String</text:span><text:span text:style-name="T21"> mit dem Format XXX.NNN gewandelt. Wenn N = 0 wird die REAL Zahl auf 0 Stellen hinter dem Komma gerundet und das Ergebnis als Integer ohne Punkt und Nachkommastellen ausgegeben. Wenn die Zahl IN kleiner ist als mit N Nachkommastellen erfasst werden können wird eine Null ausgegeben. Die Nachkommastellen werden immer auf N Stellen mit Nullen aufgefüllt. Die maximale Länge der Zeichenkette beträgt 20 Stellen.</text:span></text:p>
      <text:p text:style-name="P183">Beispiel:<text:tab/>REAL_TO_STRF(3.14159,4) = '3.1416'</text:p>
      <text:p text:style-name="P183"><text:tab/>REAL_TO_STRF(3.14159,0) = '3'</text:p>
      <text:p text:style-name="P183"><text:tab/>REAL_TO_STRF(0.04159,3) = '0.042'</text:p>
      <text:p text:style-name="P183"><text:tab/>REAL_TO_STRF(0.001,2) = '0.00'</text:p>
      <text:list xml:id="list38445642" text:continue-numbering="true" text:style-name="L1">
        <text:list-item>
          <text:list>
            <text:list-item>
              <text:h text:style-name="P216" text:outline-level="2"><text:alphabetical-index-mark-start text:id="IMark225902392"/>REPLACE_ALL<text:alphabetical-index-mark-end text:id="IMark225902392"/></text:h>
            </text:list-item>
          </text:list>
        </text:list-item>
      </text:list>
      <text:p text:style-name="P69">Type<text:tab/>Funktion : STRING</text:p>
      <text:p text:style-name="P66"><text:span text:style-name="T16">Input</text:span><text:span text:style-name="T21"><text:tab/>STR : STRING (Eingangs String)</text:span></text:p>
      <text:p text:style-name="P183"><text:tab/>SRC : STRING (Suchstring)</text:p>
      <text:p text:style-name="P183"><text:tab/>REP : STRING (Ersatzstring)</text:p>
      <text:p text:style-name="P183"><draw:frame draw:style-name="fr3" draw:name="Grafik446" text:anchor-type="paragraph" svg:x="1.002cm" svg:y="0.644cm" svg:width="5.42cm" svg:height="2.02cm" draw:z-index="423"><draw:image xlink:href="Pictures/100000000000019A00000099E1D92EC9.png" xlink:type="simple" xlink:show="embed" xlink:actuate="onLoad"/></draw:frame>Output<text:tab/>STRING (Ausgangsstring)</text:p>
      <text:p text:style-name="P173"><text:soft-page-break/><text:span text:style-name="T21"><text:line-break/>REPLACE_ALL ersetzt alle in der Zeichenkette STR vorkommenden </text:span><text:span text:style-name="T16">Strings</text:span><text:span text:style-name="T21"> SRC mit REP. Eine leere Zeichenkette an SRC ergibt keine Suchergebnisse.</text:span></text:p>
      <text:p text:style-name="P183">Beispiel:<text:tab/>REPLACE_ALL('123BB456BB789BB','BB','/') = '123/456/789/'</text:p>
      <text:p text:style-name="P183"><text:tab/>REPLACE_ALL('123BB456BB789BB','BB','') = '123456789'</text:p>
      <text:list xml:id="list38457761" text:continue-numbering="true" text:style-name="L1">
        <text:list-item>
          <text:list>
            <text:list-item>
              <text:h text:style-name="P216" text:outline-level="2"><text:alphabetical-index-mark-start text:id="IMark225902392"/>REPLACE_CHARS<text:alphabetical-index-mark-end text:id="IMark225902392"/></text:h>
            </text:list-item>
          </text:list>
        </text:list-item>
      </text:list>
      <text:p text:style-name="P69">Type<text:tab/>Funktion : STRING</text:p>
      <text:p text:style-name="P173"><text:span text:style-name="T15">Input</text:span><text:span text:style-name="T14"><text:tab/>STR : STRING (Eingangsstring)</text:span></text:p>
      <text:p text:style-name="P179"><text:tab/>SRC : STRING (Suchzeichen)</text:p>
      <text:p text:style-name="P179"><text:tab/>REP : STRING (Ersatzzeichen)</text:p>
      <text:p text:style-name="P183"><draw:frame draw:style-name="fr3" draw:name="Grafik568" text:anchor-type="paragraph" svg:x="1.025cm" svg:y="0.646cm" svg:width="6.77cm" svg:height="2.02cm" draw:z-index="555"><draw:image xlink:href="Pictures/1000000000000200000000993ED656C1.png" xlink:type="simple" xlink:show="embed" xlink:actuate="onLoad"/></draw:frame>Output<text:tab/>STRING (Ausgangsstring)</text:p>
      <text:p text:style-name="P183"><text:line-break/>REPLACE_CHARS ersetzt alle Zeichen <text:s/>in SRC die in STR vorkommen mit den Zeichen an der gleichen Stelle in REP.</text:p>
      <text:p text:style-name="P183">Beispiel: REPLACE_CHARS('abc123', '0123456789', ABCDEFGHIJ') = 'abcABC'</text:p>
      <text:list xml:id="list38459604" text:continue-numbering="true" text:style-name="L1">
        <text:list-item>
          <text:list>
            <text:list-item>
              <text:h text:style-name="P216" text:outline-level="2"><text:alphabetical-index-mark-start text:id="IMark225902392"/>REPLACE_UML<text:alphabetical-index-mark-end text:id="IMark225902392"/></text:h>
            </text:list-item>
          </text:list>
        </text:list-item>
      </text:list>
      <text:p text:style-name="P69">Type<text:tab/>Funktion : STRING</text:p>
      <text:p text:style-name="P173"><text:span text:style-name="T15">Input</text:span><text:span text:style-name="T14"><text:tab/>STR : STRING (Eingangsstring)</text:span></text:p>
      <text:p text:style-name="P183"><draw:frame draw:style-name="fr3" draw:name="Grafik494" text:anchor-type="paragraph" svg:x="1.025cm" svg:y="0.688cm" svg:width="5.87cm" svg:height="1.12cm" draw:z-index="475"><draw:image xlink:href="Pictures/10000000000001BC00000055B49FA3AE.png" xlink:type="simple" xlink:show="embed" xlink:actuate="onLoad"/></draw:frame>Output<text:tab/>STRING (Ausgangsstring)</text:p>
      <text:p text:style-name="P183"><text:line-break/>REPLACE_UML ersetzt Umlaute mit einer Kombination aus 2 Zeichen so <text:soft-page-break/>dass das Ergebnis keine Umlaute mehr enthält. Die Groß und Kleinschreibung wird dabei beachtet. Wenn ein Wort nur aus Großbuchstaben besteht und darin ein Umlaut enthalten ist wird dieser mit einem Großbuchstaben gefolgt von einem Kleinbuchstaben ersetzt, im Falle eines ß welches keine Großschreibung kennt wird es immer mit zwei Kleinbuchstaben ersetzt. Wird die Funktion REPLACE_UML auf ein Wort das nur aus Großbuchstaben besteht angewendet muss anschließend mit der Funktion UPPERCASE() sichergestellt werden dass die Kleinbuchstaben wieder in Großbuchstaben gewandelt werden.</text:p>
      <text:p text:style-name="P183">Ä &gt; Ae, Ö &gt; Oe, Ü &gt; Ue, ä &gt; ae, ö &gt; oe, ü &gt; oe, ß &gt; ss.</text:p>
      <text:list xml:id="list38475298" text:continue-numbering="true" text:style-name="L1">
        <text:list-item>
          <text:list>
            <text:list-item>
              <text:h text:style-name="P216" text:outline-level="2"><text:alphabetical-index-mark-start text:id="IMark225902392"/>TICKER<text:alphabetical-index-mark-end text:id="IMark225902392"/></text:h>
            </text:list-item>
          </text:list>
        </text:list-item>
      </text:list>
      <text:p text:style-name="P69">Type<text:tab/>Funktionsbaustein</text:p>
      <text:p text:style-name="P66"><text:span text:style-name="T15">Input</text:span><text:span text:style-name="T14"><text:tab/>N : INT (Länge des Display </text:span><text:span text:style-name="T15">Strings</text:span><text:span text:style-name="T14">)</text:span></text:p>
      <text:p text:style-name="P173"><text:span text:style-name="T14"><text:tab/>PT : TIME (Schiebedelay, </text:span><text:span text:style-name="T15">Default</text:span><text:span text:style-name="T14"> = T#1s)</text:span></text:p>
      <text:p text:style-name="P179"><text:tab/>TEXT : STRING (Eingangsstring)</text:p>
      <text:p text:style-name="P73"><draw:frame draw:style-name="fr3" draw:name="Grafik390" text:anchor-type="paragraph" svg:x="1.046cm" svg:y="0.69cm" svg:width="3.69cm" svg:height="1.921cm" draw:z-index="364"><draw:image xlink:href="Pictures/100000000000011700000091C54F8002.png" xlink:type="simple" xlink:show="embed" xlink:actuate="onLoad"/></draw:frame>Output<text:tab/>DISPLAY : STRING (Ausgangsstring)</text:p>
      <text:p text:style-name="P173"><text:span text:style-name="T21"><text:line-break/>TICKER erzeugt am Ausgang DISPLAY eine Laufschrift. Am Ausgang DISPLAY wird ein Teilstring von TEXT mit der Länge N ausgegeben. Display wird in einem Zeitraster von PT ausgegeben und beginnt bei jeder Ausgabe eine Stelle weiter von Links des Eingangsstrings TEXT. Die Laufschrift wird nur dann erzeugt wenn N &lt; als die Länge von TEXT ist. Wird N &gt;= Länge von TEXT dann wird der </text:span><text:span text:style-name="T16">String</text:span><text:span text:style-name="T21"> TEXT direkt am Ausgang DISPLAY dargestellt.</text:span></text:p>
      <text:p text:style-name="P173"><text:span text:style-name="T21"/></text:p>
      <text:p text:style-name="P173"><text:span text:style-name="T21"/></text:p>
      <text:list xml:id="list38465345" text:continue-numbering="true" text:style-name="L1">
        <text:list-item>
          <text:list>
            <text:list-item>
              <text:h text:style-name="P216" text:outline-level="2"><text:soft-page-break/><text:alphabetical-index-mark-start text:id="IMark225902392"/>TO_LOWER<text:alphabetical-index-mark-end text:id="IMark225902392"/></text:h>
            </text:list-item>
          </text:list>
        </text:list-item>
      </text:list>
      <text:p text:style-name="P69">Type<text:tab/>Funktion : BYTE</text:p>
      <text:p text:style-name="P66"><text:span text:style-name="T15">Input</text:span><text:span text:style-name="T14"><text:tab/>IN : BYTE (</text:span>Zeichen das konvertiert werden soll<text:span text:style-name="T14">)</text:span></text:p>
      <text:p text:style-name="P183"><draw:frame draw:style-name="fr3" draw:name="Grafik506" text:anchor-type="paragraph" svg:x="1.046cm" svg:y="0.667cm" svg:width="4.521cm" svg:height="1.12cm" draw:z-index="485"><draw:image xlink:href="Pictures/100000000000015600000055F63448A8.png" xlink:type="simple" xlink:show="embed" xlink:actuate="onLoad"/></draw:frame>Output<text:tab/>BYTE (konvertiertes Zeichen)</text:p>
      <text:p text:style-name="P183"><text:line-break/>TO_LOWER wandelt einzelne Zeichen in Kleinbuchstaben um. Bei der Konvertierung wird die Globale Setup Konstante EXTENDED_ASCII berücksichtigt. Wenn EXTENDED_ASCII = TRUE werden Zeichen des erweiterten ASCII Zeichensatzes nach ISO 8859-1 berücksichtigt.</text:p>
      <text:p text:style-name="P2">Die folgende <text:span text:style-name="T11">Tabelle</text:span> Erläutert die Codewandlung: </text:p>
      <table:table table:name="Tabelle30" table:style-name="Tabelle30">
        <table:table-column table:style-name="Tabelle30.A"/>
        <table:table-column table:style-name="Tabelle30.B"/>
        <table:table-column table:style-name="Tabelle30.C"/>
        <table:table-row table:style-name="Tabelle30.1">
          <table:table-cell table:style-name="Tabelle30.A1" office:value-type="string">
            <text:p text:style-name="P33">Code</text:p>
          </table:table-cell>
          <table:table-cell table:style-name="Tabelle30.A1" office:value-type="string">
            <text:p text:style-name="P33">EXTENDED_ASCII = TRUE</text:p>
          </table:table-cell>
          <table:table-cell table:style-name="Tabelle30.C1" office:value-type="string">
            <text:p text:style-name="P33">EXTENDED_ASCII = FASLE</text:p>
          </table:table-cell>
        </table:table-row>
        <table:table-row table:style-name="Tabelle30.1">
          <table:table-cell table:style-name="Tabelle30.A2" office:value-type="string">
            <text:p text:style-name="P33">0..64 </text:p>
          </table:table-cell>
          <table:table-cell table:style-name="Tabelle30.A2" office:value-type="string">
            <text:p text:style-name="P33">0..64</text:p>
          </table:table-cell>
          <table:table-cell table:style-name="Tabelle30.C2" office:value-type="string">
            <text:p text:style-name="P33">0..64</text:p>
          </table:table-cell>
        </table:table-row>
        <table:table-row table:style-name="Tabelle30.1">
          <table:table-cell table:style-name="Tabelle30.A2" office:value-type="string">
            <text:p text:style-name="P33">65..90</text:p>
          </table:table-cell>
          <table:table-cell table:style-name="Tabelle30.A2" office:value-type="string">
            <text:p text:style-name="P33">97..122</text:p>
          </table:table-cell>
          <table:table-cell table:style-name="Tabelle30.C2" office:value-type="string">
            <text:p text:style-name="P33">97..122</text:p>
          </table:table-cell>
        </table:table-row>
        <table:table-row table:style-name="Tabelle30.1">
          <table:table-cell table:style-name="Tabelle30.A2" office:value-type="string">
            <text:p text:style-name="P33">91..191</text:p>
          </table:table-cell>
          <table:table-cell table:style-name="Tabelle30.A2" office:value-type="string">
            <text:p text:style-name="P33">91..191</text:p>
          </table:table-cell>
          <table:table-cell table:style-name="Tabelle30.C2" office:value-type="string">
            <text:p text:style-name="P33">91..191</text:p>
          </table:table-cell>
        </table:table-row>
        <table:table-row table:style-name="Tabelle30.1">
          <table:table-cell table:style-name="Tabelle30.A2" office:value-type="string">
            <text:p text:style-name="P33">192..214</text:p>
          </table:table-cell>
          <table:table-cell table:style-name="Tabelle30.A2" office:value-type="string">
            <text:p text:style-name="P33">224..246</text:p>
          </table:table-cell>
          <table:table-cell table:style-name="Tabelle30.C2" office:value-type="string">
            <text:p text:style-name="P33">192..214</text:p>
          </table:table-cell>
        </table:table-row>
        <table:table-row table:style-name="Tabelle30.1">
          <table:table-cell table:style-name="Tabelle30.A2" office:value-type="string">
            <text:p text:style-name="P33">215</text:p>
          </table:table-cell>
          <table:table-cell table:style-name="Tabelle30.A2" office:value-type="string">
            <text:p text:style-name="P33">215</text:p>
          </table:table-cell>
          <table:table-cell table:style-name="Tabelle30.C2" office:value-type="string">
            <text:p text:style-name="P33">215</text:p>
          </table:table-cell>
        </table:table-row>
        <table:table-row table:style-name="Tabelle30.1">
          <table:table-cell table:style-name="Tabelle30.A2" office:value-type="string">
            <text:p text:style-name="P33">216..222</text:p>
          </table:table-cell>
          <table:table-cell table:style-name="Tabelle30.A2" office:value-type="string">
            <text:p text:style-name="P33">248..254</text:p>
          </table:table-cell>
          <table:table-cell table:style-name="Tabelle30.C2" office:value-type="string">
            <text:p text:style-name="P33">216..254</text:p>
          </table:table-cell>
        </table:table-row>
        <table:table-row table:style-name="Tabelle30.1">
          <table:table-cell table:style-name="Tabelle30.A2" office:value-type="string">
            <text:p text:style-name="P33">223..255</text:p>
          </table:table-cell>
          <table:table-cell table:style-name="Tabelle30.A2" office:value-type="string">
            <text:p text:style-name="P33">223..255</text:p>
          </table:table-cell>
          <table:table-cell table:style-name="Tabelle30.C2" office:value-type="string">
            <text:p text:style-name="P33">223..255</text:p>
          </table:table-cell>
        </table:table-row>
      </table:table>
      <text:p text:style-name="P37"/>
      <text:list xml:id="list38458575" text:continue-numbering="true" text:style-name="L1">
        <text:list-item>
          <text:list>
            <text:list-item>
              <text:h text:style-name="P216" text:outline-level="2"><text:alphabetical-index-mark-start text:id="IMark225902392"/>TO_UML<text:alphabetical-index-mark-end text:id="IMark225902392"/></text:h>
            </text:list-item>
          </text:list>
        </text:list-item>
      </text:list>
      <text:p text:style-name="P69">Type<text:tab/>Funktion : STRING(2)</text:p>
      <text:p text:style-name="P66"><text:span text:style-name="T15">Input</text:span><text:span text:style-name="T14"><text:tab/>IN : BYTE (</text:span>Zeichen das konvertiert werden soll<text:span text:style-name="T14">)</text:span></text:p>
      <text:p text:style-name="P183"><draw:frame draw:style-name="fr3" draw:name="Grafik540" text:anchor-type="paragraph" svg:x="1.023cm" svg:y="0.688cm" svg:width="3.29cm" svg:height="0.99cm" draw:z-index="525"><draw:image xlink:href="Pictures/10000000000000F90000004B9B19E092.png" xlink:type="simple" xlink:show="embed" xlink:actuate="onLoad"/></draw:frame>Output<text:tab/>STRING(2) (konvertiertes Zeichen)</text:p>
      <text:p text:style-name="P183"><text:line-break/>TO_UML wandelt einzelne Sonderzeichen des Zeichensatzes größer 127 in eine Kombination zweier Buchstaben um. Es handelt sich dabei um Zeichen des erweiterten ASCII Zeichensatzes nach ISO 8859-1(Latin1).</text:p>
      <text:p text:style-name="P183"><text:soft-page-break/>Es werden folgende Zeichen umgewandelt:</text:p>
      <text:p text:style-name="P183">Ä &gt;&gt; Ae<text:tab/>ä &gt;&gt; ae<text:tab/>Ö &gt;&gt; Oe<text:tab/>ö &gt;&gt; oe<text:tab/>Ü &gt;&gt; Ue<text:tab/>ü &gt;&gt; ue</text:p>
      <text:p text:style-name="P183">ß &gt;&gt; ss</text:p>
      <text:p text:style-name="P183">Alle andern Zeichen werden als STRING mit dem Zeichen IN zurückgegeben.</text:p>
      <text:list xml:id="list38446784" text:continue-numbering="true" text:style-name="L1">
        <text:list-item>
          <text:list>
            <text:list-item>
              <text:h text:style-name="P216" text:outline-level="2"><text:alphabetical-index-mark-start text:id="IMark225902392"/>TO_UPPER<text:alphabetical-index-mark-end text:id="IMark225902392"/></text:h>
            </text:list-item>
          </text:list>
        </text:list-item>
      </text:list>
      <text:p text:style-name="P69">Type<text:tab/>Funktion : BYTE</text:p>
      <text:p text:style-name="P66"><text:span text:style-name="T15">Input</text:span><text:span text:style-name="T14"><text:tab/>IN : BYTE (</text:span>Zeichen das konvertiert werden soll<text:span text:style-name="T14">)</text:span></text:p>
      <text:p text:style-name="P183">Output<text:tab/>BYTE (konvertiertes Zeichen)</text:p>
      <text:p text:style-name="P183"><draw:frame draw:style-name="fr3" draw:name="Grafik507" text:anchor-type="paragraph" svg:x="1.046cm" svg:y="0.012cm" svg:width="4.521cm" svg:height="1.12cm" draw:z-index="486"><draw:image xlink:href="Pictures/100000000000015600000055549FE359.png" xlink:type="simple" xlink:show="embed" xlink:actuate="onLoad"/></draw:frame><text:line-break/>TO_UPPER wandelt einzelne Zeichen in Großbuchstaben um. Bei der Konvertierung wird die Globale Setup Konstante EXTENDED_ASCII berücksichtigt. Wenn EXTENDED_ASCII = TRUE werden Zeichen des erweiterten ASCII Zeichensatzes nach ISO 8859-1 berücksichtigt.</text:p>
      <text:p text:style-name="P2">Die folgende <text:span text:style-name="T11">Tabelle</text:span> Erläutert die Codewandlung: </text:p>
      <table:table table:name="Tabelle31" table:style-name="Tabelle31">
        <table:table-column table:style-name="Tabelle31.A"/>
        <table:table-column table:style-name="Tabelle31.B"/>
        <table:table-column table:style-name="Tabelle31.C"/>
        <table:table-row table:style-name="Tabelle31.1">
          <table:table-cell table:style-name="Tabelle31.A1" office:value-type="string">
            <text:p text:style-name="P33">Code</text:p>
          </table:table-cell>
          <table:table-cell table:style-name="Tabelle31.A1" office:value-type="string">
            <text:p text:style-name="P33">EXTENDED_ASCII = TRUE</text:p>
          </table:table-cell>
          <table:table-cell table:style-name="Tabelle31.C1" office:value-type="string">
            <text:p text:style-name="P33">EXTENDED_ASCII = FASLE</text:p>
          </table:table-cell>
        </table:table-row>
        <table:table-row table:style-name="Tabelle31.1">
          <table:table-cell table:style-name="Tabelle31.A2" office:value-type="string">
            <text:p text:style-name="P33">0..64 </text:p>
          </table:table-cell>
          <table:table-cell table:style-name="Tabelle31.A2" office:value-type="string">
            <text:p text:style-name="P33">0..64</text:p>
          </table:table-cell>
          <table:table-cell table:style-name="Tabelle31.C2" office:value-type="string">
            <text:p text:style-name="P33">0..64</text:p>
          </table:table-cell>
        </table:table-row>
        <table:table-row table:style-name="Tabelle31.1">
          <table:table-cell table:style-name="Tabelle31.A2" office:value-type="string">
            <text:p text:style-name="P33">65..90</text:p>
          </table:table-cell>
          <table:table-cell table:style-name="Tabelle31.A2" office:value-type="string">
            <text:p text:style-name="P33">97..122</text:p>
          </table:table-cell>
          <table:table-cell table:style-name="Tabelle31.C2" office:value-type="string">
            <text:p text:style-name="P33">97..122</text:p>
          </table:table-cell>
        </table:table-row>
        <table:table-row table:style-name="Tabelle31.1">
          <table:table-cell table:style-name="Tabelle31.A2" office:value-type="string">
            <text:p text:style-name="P33">91..191</text:p>
          </table:table-cell>
          <table:table-cell table:style-name="Tabelle31.A2" office:value-type="string">
            <text:p text:style-name="P33">91..191</text:p>
          </table:table-cell>
          <table:table-cell table:style-name="Tabelle31.C2" office:value-type="string">
            <text:p text:style-name="P33">91..191</text:p>
          </table:table-cell>
        </table:table-row>
        <table:table-row table:style-name="Tabelle31.1">
          <table:table-cell table:style-name="Tabelle31.A2" office:value-type="string">
            <text:p text:style-name="P33">192..214</text:p>
          </table:table-cell>
          <table:table-cell table:style-name="Tabelle31.A2" office:value-type="string">
            <text:p text:style-name="P33">224..246</text:p>
          </table:table-cell>
          <table:table-cell table:style-name="Tabelle31.C2" office:value-type="string">
            <text:p text:style-name="P33">192..214</text:p>
          </table:table-cell>
        </table:table-row>
        <table:table-row table:style-name="Tabelle31.1">
          <table:table-cell table:style-name="Tabelle31.A2" office:value-type="string">
            <text:p text:style-name="P33">215</text:p>
          </table:table-cell>
          <table:table-cell table:style-name="Tabelle31.A2" office:value-type="string">
            <text:p text:style-name="P33">215</text:p>
          </table:table-cell>
          <table:table-cell table:style-name="Tabelle31.C2" office:value-type="string">
            <text:p text:style-name="P33">215</text:p>
          </table:table-cell>
        </table:table-row>
        <table:table-row table:style-name="Tabelle31.1">
          <table:table-cell table:style-name="Tabelle31.A2" office:value-type="string">
            <text:p text:style-name="P33">216..222</text:p>
          </table:table-cell>
          <table:table-cell table:style-name="Tabelle31.A2" office:value-type="string">
            <text:p text:style-name="P33">248..254</text:p>
          </table:table-cell>
          <table:table-cell table:style-name="Tabelle31.C2" office:value-type="string">
            <text:p text:style-name="P33">216..254</text:p>
          </table:table-cell>
        </table:table-row>
        <table:table-row table:style-name="Tabelle31.1">
          <table:table-cell table:style-name="Tabelle31.A2" office:value-type="string">
            <text:p text:style-name="P33">223..255</text:p>
          </table:table-cell>
          <table:table-cell table:style-name="Tabelle31.A2" office:value-type="string">
            <text:p text:style-name="P33">223..255</text:p>
          </table:table-cell>
          <table:table-cell table:style-name="Tabelle31.C2" office:value-type="string">
            <text:p text:style-name="P33">223..255</text:p>
          </table:table-cell>
        </table:table-row>
      </table:table>
      <text:p text:style-name="P69"/>
      <text:list xml:id="list38464188" text:continue-numbering="true" text:style-name="L1">
        <text:list-item>
          <text:list>
            <text:list-item>
              <text:h text:style-name="P216" text:outline-level="2"><text:soft-page-break/><text:alphabetical-index-mark-start text:id="IMark225902392"/>TRIM<text:alphabetical-index-mark-end text:id="IMark225902392"/></text:h>
            </text:list-item>
          </text:list>
        </text:list-item>
      </text:list>
      <text:p text:style-name="P253">Type<text:tab/>Funktion : STRING</text:p>
      <text:p text:style-name="P66"><text:span text:style-name="T15">Input</text:span><text:span text:style-name="T14"><text:tab/>STR : STRING (Eingabestring)</text:span></text:p>
      <text:p text:style-name="P73"><draw:frame draw:style-name="fr3" draw:name="Grafik50" text:anchor-type="paragraph" svg:x="1.09cm" svg:y="0.647cm" svg:width="2.281cm" svg:height="1.12cm" draw:z-index="35"><draw:image xlink:href="Pictures/10000000000000AC00000055C0F872C7.png" xlink:type="simple" xlink:show="embed" xlink:actuate="onLoad"/></draw:frame>Output<text:tab/>STRING (STR ohne Leerzeichen)</text:p>
      <text:p text:style-name="P73"><text:line-break/>Die Funktion TRIM entfernt alle Leerzeichen aus STR.</text:p>
      <text:p text:style-name="P73">Beispiel:<text:tab/>TRIM('find BX12') = 'findBX12'</text:p>
      <text:list xml:id="list38465079" text:continue-numbering="true" text:style-name="L1">
        <text:list-item>
          <text:list>
            <text:list-item>
              <text:h text:style-name="P216" text:outline-level="2"><text:alphabetical-index-mark-start text:id="IMark225902392"/>TRIM1<text:alphabetical-index-mark-end text:id="IMark225902392"/></text:h>
            </text:list-item>
          </text:list>
        </text:list-item>
      </text:list>
      <text:p text:style-name="P69">Type<text:tab/>Funktion : STRING</text:p>
      <text:p text:style-name="P66"><text:span text:style-name="T15">Input</text:span><text:span text:style-name="T14"><text:tab/>STR : STRING (Eingabestring)</text:span></text:p>
      <text:p text:style-name="P73"><draw:frame draw:style-name="fr3" draw:name="Grafik443" text:anchor-type="paragraph" svg:x="1.046cm" svg:y="0.69cm" svg:width="2.731cm" svg:height="1.12cm" draw:z-index="420"><draw:image xlink:href="Pictures/10000000000000CE0000005522485091.png" xlink:type="simple" xlink:show="embed" xlink:actuate="onLoad"/></draw:frame>Output<text:tab/>STRING (STR ohne doppelte Leerzeichen)</text:p>
      <text:p text:style-name="P73"><text:line-break/>Die Funktion TRIM1 ersetzt mehrfache Leerzeichen mit nur einem Leerzeichen. Leerzeichen am Anfang und Am Ende von STR werden dabei komplett gelöscht.</text:p>
      <text:p text:style-name="P73">Beispiel:<text:tab/>TRIM1(' find <text:s text:c="3"/>BX12 ') = 'find BX12'</text:p>
      <text:list xml:id="list38453393" text:continue-numbering="true" text:style-name="L1">
        <text:list-item>
          <text:list>
            <text:list-item>
              <text:h text:style-name="P216" text:outline-level="2"><text:alphabetical-index-mark-start text:id="IMark225902392"/>TRIME<text:alphabetical-index-mark-end text:id="IMark225902392"/></text:h>
            </text:list-item>
          </text:list>
        </text:list-item>
      </text:list>
      <text:p text:style-name="P69">Type<text:tab/>Funktion : STRING</text:p>
      <text:p text:style-name="P66"><text:span text:style-name="T15">Input</text:span><text:span text:style-name="T14"><text:tab/>STR : STRING (Eingabestring)</text:span></text:p>
      <text:p text:style-name="P73"><draw:frame draw:style-name="fr3" draw:name="Grafik539" text:anchor-type="paragraph" svg:x="1.067cm" svg:y="0.69cm" svg:width="3.18cm" svg:height="1.12cm" draw:z-index="524"><draw:image xlink:href="Pictures/10000000000000F0000000552ABEB17E.png" xlink:type="simple" xlink:show="embed" xlink:actuate="onLoad"/></draw:frame>Output<text:tab/>STRING (Ausgabestring)</text:p>
      <text:p text:style-name="P73"><text:soft-page-break/><text:line-break/>Die Funktion TRIME entfernt Leerzeichen am Anfang und Am Ende von STR. Leerzeichen innerhalb des Strings werden ignoriert, auch wenn Sie mehrfach vorkommen.</text:p>
      <text:list xml:id="list38474600" text:continue-numbering="true" text:style-name="L1">
        <text:list-item>
          <text:list>
            <text:list-item>
              <text:h text:style-name="P225" text:outline-level="2"><text:alphabetical-index-mark-start text:id="IMark225902392"/><text:alphabetical-index-mark-start text:id="IMark229621984"/>UPPERCASE<text:alphabetical-index-mark-end text:id="IMark229621984"/><text:alphabetical-index-mark-end text:id="IMark225902392"/></text:h>
            </text:list-item>
          </text:list>
        </text:list-item>
      </text:list>
      <text:p text:style-name="P73">Beispiel:<text:tab/>TRIM1(' find BX12 ') = 'find BX12'</text:p>
      <text:p text:style-name="P69">Type<text:tab/>Funktion : STRING</text:p>
      <text:p text:style-name="P173"><text:span text:style-name="T15">Input</text:span><text:span text:style-name="T14"><text:tab/>STR : STRING (Eingabestring)</text:span></text:p>
      <text:p text:style-name="P73"><draw:frame draw:style-name="fr3" draw:name="Grafik51" text:anchor-type="paragraph" svg:x="1.109cm" svg:y="0.69cm" svg:width="4.069cm" svg:height="1.12cm" draw:z-index="676"><draw:image xlink:href="Pictures/100000000000013400000055C016F1FE.png" xlink:type="simple" xlink:show="embed" xlink:actuate="onLoad"/></draw:frame>Output<text:tab/>STRING (STRING in Großbuchstaben)</text:p>
      <text:p text:style-name="P73"><text:line-break/>Die Funktion UPPERCASE wandelt alle Buchstaben in STR in Großbuchstaben um. Bei der Konvertierung wird die Globale Setup Konstante EXTENDED_ASCII berücksichtigt. Wenn EXTENDED_ASCII = TRUE werden Zeichen des erweiterten ASCII Zeichensatzes nach ISO 8859-1 berücksichtigt. Umlaute wie Ä,Ö,Ü werden nur dann berücksichtigt wenn die Globale Konstante <text:s/>EXTENDED_ASCII = TRUE ist. Eine Detaillierte Beschreibung der Codewandlung ist bei der Funktion TO_UPPER zu finden.</text:p>
      <text:p text:style-name="P183">Beispiel:<text:tab/>UPPERCASE('find BX12') = FIND BX12</text:p>
      <text:list xml:id="list38460869" text:continue-numbering="true" text:style-name="L1">
        <text:list-item>
          <text:list>
            <text:list-item>
              <text:h text:style-name="P225" text:outline-level="2"><text:alphabetical-index-mark-start text:id="IMark225902392"/>WEEKDAY_TO_STRING<text:alphabetical-index-mark-end text:id="IMark225902392"/></text:h>
            </text:list-item>
          </text:list>
        </text:list-item>
      </text:list>
      <text:p text:style-name="P69">Type<text:tab/>Funktion : STRING(10)</text:p>
      <text:p text:style-name="P66"><text:span text:style-name="T15">Input</text:span><text:span text:style-name="T14"><text:tab/>WDAY : INT (Wochentag 1..7)</text:span></text:p>
      <text:p text:style-name="P173"><text:span text:style-name="T14"><text:tab/>LANG : INT (Sprachauswahl 0 = </text:span><text:span text:style-name="T15">Default</text:span><text:span text:style-name="T14">)</text:span></text:p>
      <text:p text:style-name="P179"><text:tab/>LX : INT (Länge der Zeichenkette)</text:p>
      <text:p text:style-name="P183"><draw:frame draw:style-name="fr3" draw:name="Grafik683" text:anchor-type="paragraph" svg:x="1.046cm" svg:y="0.69cm" svg:width="6.87cm" svg:height="1.79cm" draw:z-index="677"><draw:image xlink:href="Pictures/1000000000000207000000870B815ACF.png" xlink:type="simple" xlink:show="embed" xlink:actuate="onLoad"/></draw:frame>Output<text:tab/>STRING(10) (Ausgangswert)</text:p>
      <text:p text:style-name="P173"><text:soft-page-break/><text:span text:style-name="T21"><text:line-break/>WEEKDAY_TO_STRING wandelt einen Wochentag in die entsprechende Zeichenkette. Der Eingang WDAY gibt den entsprechenden Wochentag an: 1 = Montag und 7 = Sonntag. Der Eingang LANG wählt die gewünschte Sprache aus: 1 = Englisch und 2 = Deutsch. LANG = 0 benutzt die als </text:span><text:span text:style-name="T16">Default</text:span><text:span text:style-name="T21"> Sprache in der Globalen Setup Variable LANGUAGE_DEFAULT festgelegte Sprache. Der Eingang LX legt die Länge der zu erzeugenden Zeichenkette fest: 0 = Voller Monatsname, 2 = Abkürzung mit 2 Buchstaben, alle anderen Werte am Eingang LX sind nicht definiert.</text:span></text:p>
      <text:p text:style-name="P173"><text:span text:style-name="T21">Die vom Baustein erzeugten Zeichenketten sowie die unterstützten Sprachen sind im Bereich Global </text:span><text:span text:style-name="T16">Constants</text:span><text:span text:style-name="T21"> definiert und können dort erweitert und verändert werden.</text:span></text:p>
      <text:p text:style-name="P173"><text:span text:style-name="T21">WEEKDAY_TO_STRING(1,0,0) = '</text:span><text:span text:style-name="T16">Monday</text:span><text:span text:style-name="T21">' </text:span></text:p>
      <text:p text:style-name="P183">abhängig von der Globalen Konstante LANGUAGE_DEFAULT</text:p>
      <text:p text:style-name="P173"><text:span text:style-name="T21">WEEKDAY_TO_STRING(1,2,0) = '</text:span><text:span text:style-name="T19">Montag</text:span><text:span text:style-name="T21">'</text:span></text:p>
      <text:p text:style-name="P173"><text:span text:style-name="T21">WEEKDAY_TO_STRING(1,0,2) = '</text:span><text:span text:style-name="T16">Mo</text:span><text:span text:style-name="T21">'</text:span></text:p>
      <text:list xml:id="list38475198" text:continue-numbering="true" text:style-name="L1">
        <text:list-item>
          <text:h text:style-name="P210" text:outline-level="1">Speicherbausteine</text:h>
          <text:list>
            <text:list-item>
              <text:h text:style-name="P216" text:outline-level="2"><text:alphabetical-index-mark-start text:id="IMark225902392"/>FIFO_16<text:alphabetical-index-mark-end text:id="IMark225902392"/></text:h>
            </text:list-item>
          </text:list>
        </text:list-item>
      </text:list>
      <text:p text:style-name="P69">Type<text:tab/>Funktionsbaustein</text:p>
      <text:p text:style-name="P66"><text:span text:style-name="T15">Input</text:span><text:span text:style-name="T14"><text:tab/>DIN : DWORD (Daten Eingang)</text:span></text:p>
      <text:p text:style-name="P69"><text:tab/>WR : BOOL (TRUE = Schreiben und FALSE = Lesen)</text:p>
      <text:p text:style-name="P69"><text:tab/>E : BOOL (Freigabe Eingang)</text:p>
      <text:p text:style-name="P69"><text:tab/>RST : BOOL (Reset Eingang)</text:p>
      <text:p text:style-name="P73">Output<text:tab/>DOUT : DWORD (Daten Ausgang)</text:p>
      <text:p text:style-name="P73"><text:tab/>EMPTY : BOOL (EMPTY <text:s/>= TRUE bedeutet: Speicher ist Leer)</text:p>
      <text:p text:style-name="P73"><draw:frame draw:style-name="fr3" draw:name="Grafik80" text:anchor-type="paragraph" svg:x="1.143cm" svg:y="0.654cm" svg:width="2.731cm" svg:height="2.649cm" draw:z-index="45"><draw:image xlink:href="Pictures/10000000000000CE000000C881C7D07A.png" xlink:type="simple" xlink:show="embed" xlink:actuate="onLoad"/></draw:frame><text:tab/>FULL : BOOL (FULL = TRUE bedeutet: Speicher ist Voll)</text:p>
      <text:p text:style-name="P66"><text:span text:style-name="T21"><text:line-break/>FIFO_16 ist ein First-In First-</text:span><text:span text:style-name="T16">Out</text:span><text:span text:style-name="T21"> Speicher mit 16 Speicherstellen für DWORD-Daten. Die beiden Ausgänge EMPTY <text:s/>und FULL zeigen an, wann der Speicher voll oder leer ist. Der Eingang RST löscht den gesamten Inhalt des Speichers. Der FIFO wird beschrieben, indem ein TRUE auf den Eingang WR, die Daten auf den Eingang DIN und ein TRUE-Puls auf den Eingang E gegeben werden.</text:span></text:p>
      <text:list xml:id="list38455971" text:continue-numbering="true" text:style-name="L1">
        <text:list-item>
          <text:list>
            <text:list-item>
              <text:h text:style-name="P216" text:outline-level="2"><text:soft-page-break/><text:alphabetical-index-mark-start text:id="IMark225902392"/><text:span text:style-name="T27">FIFO_</text:span>32<text:alphabetical-index-mark-end text:id="IMark225902392"/></text:h>
            </text:list-item>
          </text:list>
        </text:list-item>
      </text:list>
      <text:p text:style-name="P36">Type<text:tab/>Funktionsbaustein</text:p>
      <text:p text:style-name="P34"><text:span text:style-name="T15">Input</text:span><text:span text:style-name="T14"><text:tab/>DIN : DWORD (Daten Eingang)</text:span></text:p>
      <text:p text:style-name="P9"><text:tab/>WR : BOOL (TRUE = Schreiben und FALSE = Lesen)</text:p>
      <text:p text:style-name="P36"><text:tab/>E : BOOL (Freigabe Eingang)</text:p>
      <text:p text:style-name="P36"><text:tab/>RST : BOOL (Reset Eingang)</text:p>
      <text:p text:style-name="P73">Output<text:tab/>DOUT : DWORD (Daten Ausgang)</text:p>
      <text:p text:style-name="P73"><text:tab/>EMPTY : BOOL (EMPTY = TRUE bedeutet: Speicher ist Leer)</text:p>
      <text:p text:style-name="P73"><draw:frame draw:style-name="fr3" draw:name="Grafik81" text:anchor-type="paragraph" svg:x="1.115cm" svg:y="0.688cm" svg:width="2.731cm" svg:height="2.649cm" draw:z-index="46"><draw:image xlink:href="Pictures/10000000000000CE000000C80AE798CD.png" xlink:type="simple" xlink:show="embed" xlink:actuate="onLoad"/></draw:frame><text:tab/>FULL : BOOL (FULL = TRUE bedeutet: Speicher ist Voll)</text:p>
      <text:p text:style-name="P66"><text:span text:style-name="T21"><text:line-break/>FIFO_32 ist ein First-In First-</text:span><text:span text:style-name="T16">Out</text:span><text:span text:style-name="T21"> Speicher mit 32 Speicherstellen für DWORD-Daten. Die beiden Ausgänge EMPTY und FULL zeigen an, wann der Speicher voll oder leer ist. Der Eingang RST löscht den gesamten Inhalt des Speichers. Der FIFO wird beschrieben, indem ein TRUE auf den Eingang WR, die Daten auf den Eingang DIN und ein TRUE Puls auf den Eingang E gegeben werden.</text:span></text:p>
      <text:list xml:id="list38465740" text:continue-numbering="true" text:style-name="L1">
        <text:list-item>
          <text:list>
            <text:list-item>
              <text:h text:style-name="P216" text:outline-level="2"><text:alphabetical-index-mark-start text:id="IMark225902392"/>STACK_16<text:alphabetical-index-mark-end text:id="IMark225902392"/></text:h>
            </text:list-item>
          </text:list>
        </text:list-item>
      </text:list>
      <text:p text:style-name="P69">Type<text:tab/>Funktionsbaustein</text:p>
      <text:p text:style-name="P66">Input<text:tab/>DIN : DWORD (Daten Eingang)</text:p>
      <text:p text:style-name="P69"><text:tab/>WR : BOOL (TRUE = Schreiben und FALSE = Lesen)</text:p>
      <text:p text:style-name="P69"><text:tab/>E : BOOL (Freigabe Eingang)</text:p>
      <text:p text:style-name="P69"><text:tab/>RST : BOOL (Reset Eingang)</text:p>
      <text:p text:style-name="P73">Output<text:tab/>DOUT : DWORD (Daten Ausgang)</text:p>
      <text:p text:style-name="P73"><text:tab/>EMPTY : BOOL (EMPTY = TRUE bedeutet: Speicher ist Leer)</text:p>
      <text:p text:style-name="P73"><draw:frame draw:style-name="fr9" draw:name="Grafik82" text:anchor-type="paragraph" svg:x="1.268cm" svg:y="1.034cm" svg:width="2.731cm" svg:height="2.649cm" draw:z-index="63"><draw:image xlink:href="Pictures/10000000000000CE000000C8B953B81E.png" xlink:type="simple" xlink:show="embed" xlink:actuate="onLoad"/></draw:frame><text:tab/>FULL : BOOL (FULL = TRUE bedeutet: Speicher ist Voll)</text:p>
      <text:p text:style-name="P2"><text:soft-page-break/><text:line-break/>STACK_16 ist ein <text:span text:style-name="T11">Last</text:span>-In First-<text:span text:style-name="T2">Out</text:span> Speicher mit 16 Speicherstellen für DWORD-Daten. Die beiden Ausgänge EMPTY und FULL zeigen an, wann der Speicher voll oder leer ist. Der Eingang RST löscht den gesamten Inhalt des Speichers. Der Stack wird beschrieben, indem ein TRUE auf den Eingang WR, die Daten auf den Eingang DIN und ein TRUE Puls auf den Eingang E gegeben werden.</text:p>
      <text:list xml:id="list38461263" text:continue-numbering="true" text:style-name="L1">
        <text:list-item>
          <text:list>
            <text:list-item>
              <text:h text:style-name="P216" text:outline-level="2"><text:alphabetical-index-mark-start text:id="IMark225902392"/>STACK_32<text:alphabetical-index-mark-end text:id="IMark225902392"/></text:h>
            </text:list-item>
          </text:list>
        </text:list-item>
      </text:list>
      <text:p text:style-name="P69">Type<text:tab/>Funktionsbaustein</text:p>
      <text:p text:style-name="P66"><text:span text:style-name="T15">Input</text:span><text:span text:style-name="T14"><text:tab/>DIN : DWORD (Daten Eingang)</text:span></text:p>
      <text:p text:style-name="P69"><text:tab/>RW : BOOL (TRUE = Schreiben und FALSE = Lesen)</text:p>
      <text:p text:style-name="P69"><text:tab/>E : BOOL (Freigabe Eingang)</text:p>
      <text:p text:style-name="P69"><text:tab/>RST : BOOL (Reset Eingang)</text:p>
      <text:p text:style-name="P73">Output<text:tab/>DOUT : DWORD (Daten Ausgang)</text:p>
      <text:p text:style-name="P73"><text:tab/>EMPTY : BOOL (EMPTY = TRUE bedeutet: Speicher ist Leer)</text:p>
      <text:p text:style-name="P73"><draw:frame draw:style-name="fr3" draw:name="Grafik83" text:anchor-type="paragraph" svg:x="1.113cm" svg:y="0.649cm" svg:width="2.731cm" svg:height="2.649cm" draw:z-index="47"><draw:image xlink:href="Pictures/10000000000000CE000000C81F4C5D51.png" xlink:type="simple" xlink:show="embed" xlink:actuate="onLoad"/></draw:frame><text:tab/>FULL : BOOL (FULL = TRUE bedeutet: Speicher ist Voll)</text:p>
      <text:p text:style-name="P73"><text:line-break/>STACK_32 ist ein Last-In First-Out Speicher mit 16 Speicherstellen für DWORD-Daten. Die beiden Ausgänge EMPTY und FULL zeigen an, wann der Speicher voll oder leer ist. Der Eingang RST löscht den gesamten Inhalt des Speichers. Der Stack wird beschrieben, indem ein TRUE auf den Eingang WR, die Daten auf den Eingang DIN und ein TRUE Puls auf den Eingang E gegeben werden.</text:p>
      <text:list xml:id="list38445966" text:continue-numbering="true" text:style-name="L1">
        <text:list-item>
          <text:h text:style-name="P210" text:outline-level="1">Takt Generatoren</text:h>
          <text:list>
            <text:list-item>
              <text:h text:style-name="P216" text:outline-level="2"><text:alphabetical-index-mark-start text:id="IMark225902392"/>A_TRIG<text:alphabetical-index-mark-end text:id="IMark225902392"/></text:h>
            </text:list-item>
          </text:list>
        </text:list-item>
      </text:list>
      <text:p text:style-name="P69">Type<text:tab/>Funktionsbaustein</text:p>
      <text:p text:style-name="P66"><text:span text:style-name="T15">Input</text:span><text:span text:style-name="T14"><text:tab/>IN : BOOL (Eingangssignal)</text:span></text:p>
      <text:p text:style-name="P179"><text:tab/>RES : REAL (Auflösung für Eingangsveränderung)</text:p>
      <text:p text:style-name="P73">Output<text:tab/>Q : BOOL (Ausgangssignal)</text:p>
      <text:p text:style-name="P183"><text:tab/>D : REAL (letzte Veränderung des Eingangssignals)</text:p>
      <text:p text:style-name="P183"><draw:frame draw:style-name="fr3" draw:name="Grafik669" text:anchor-type="paragraph" svg:x="1.025cm" svg:y="0.012cm" svg:width="2.101cm" svg:height="1.52cm" draw:z-index="661"><draw:image xlink:href="Pictures/100000000000009F00000073B58431B1.png" xlink:type="simple" xlink:show="embed" xlink:actuate="onLoad"/></draw:frame><text:line-break/>A_TRIG überwacht einen Eingangswert auf Veränderung und immer wenn der Eingangswert sich um mehr als RES verändert hat erzeugt der Baustein einen Ausgangsimpuls für einen Zyklus damit der neue Wert verarbeitet werden kann. Gleichzeitig merkt sich der Baustein den aktuellen Eingangswert mit denen er dann in den nächsten Zyklen den Eingang IN vergleicht. Am Ausgang D wird die Differenz zwischen dem gespeicherten Wert und IN angezeigt.</text:p>
      <text:list xml:id="list38457470" text:continue-numbering="true" text:style-name="L1">
        <text:list-item>
          <text:list>
            <text:list-item>
              <text:h text:style-name="P216" text:outline-level="2"><text:alphabetical-index-mark-start text:id="IMark225902392"/>B_TRIG<text:alphabetical-index-mark-end text:id="IMark225902392"/></text:h>
            </text:list-item>
          </text:list>
        </text:list-item>
      </text:list>
      <text:p text:style-name="P69">Type<text:tab/>Funktionsbaustein</text:p>
      <text:p text:style-name="P66"><text:span text:style-name="T15">Input</text:span><text:span text:style-name="T14"><text:tab/>CLK : BOOL (Eingangssignal)</text:span></text:p>
      <text:p text:style-name="P73"><draw:frame draw:style-name="fr3" draw:name="Grafik84" text:anchor-type="paragraph" svg:x="1.072cm" svg:y="0.649cm" svg:width="2.281cm" svg:height="1.3cm" draw:z-index="48"><draw:image xlink:href="Pictures/10000000000000AC00000062B81667F0.png" xlink:type="simple" xlink:show="embed" xlink:actuate="onLoad"/></draw:frame>Output<text:tab/>Q : BOOL (Ausgangssignal)</text:p>
      <text:p text:style-name="P66"><text:span text:style-name="T21"><text:line-break/>Der Funktionsbaustein B_TRIG erzeugt nach einem Flankenwechsel am Eingang CLK einen Ausgangsimpuls für exakt einen SPS-Zyklus. Im Gegensatz zu den beiden Standardfunktionsbausteinen R_TRIG und F_TRIG, die </text:span><text:span text:style-name="T21">jeweils </text:span><text:soft-page-break/><text:span text:style-name="T21">nur bei fallender oder steigender Flanke einen Puls erzeugen, erzeugt B_TRIG bei fallender und steigender Flanke einen Ausgangspuls.</text:span></text:p>
      <text:p text:style-name="P183"><draw:g text:anchor-type="paragraph" draw:z-index="49" draw:style-name="gr1"><draw:line draw:style-name="gr2" draw:text-style-name="P257" svg:x1="2.84cm" svg:y1="0.418cm" svg:x2="3.84cm" svg:y2="0.418cm"><text:p/></draw:line><draw:line draw:style-name="gr2" draw:text-style-name="P257" svg:x1="3.84cm" svg:y1="-0.081cm" svg:x2="3.84cm" svg:y2="0.418cm"><text:p/></draw:line><draw:line draw:style-name="gr2" draw:text-style-name="P257" svg:x1="3.84cm" svg:y1="-0.081cm" svg:x2="6.84cm" svg:y2="-0.081cm"><text:p/></draw:line><draw:line draw:style-name="gr2" draw:text-style-name="P257" svg:x1="6.839cm" svg:y1="0.418cm" svg:x2="6.839cm" svg:y2="-0.081cm"><text:p/></draw:line><draw:line draw:style-name="gr2" draw:text-style-name="P257" svg:x1="6.839cm" svg:y1="0.418cm" svg:x2="8.338cm" svg:y2="0.418cm"><text:p/></draw:line><draw:line draw:style-name="gr2" draw:text-style-name="P257" svg:x1="8.34cm" svg:y1="-0.081cm" svg:x2="8.34cm" svg:y2="0.418cm"><text:p/></draw:line><draw:line draw:style-name="gr2" draw:text-style-name="P257" svg:x1="8.34cm" svg:y1="-0.081cm" svg:x2="10.09cm" svg:y2="-0.081cm"><text:p/></draw:line><draw:line draw:style-name="gr3" draw:text-style-name="P257" svg:x1="3.84cm" svg:y1="0.919cm" svg:x2="3.84cm" svg:y2="1.418cm"><text:p/></draw:line><draw:line draw:style-name="gr3" draw:text-style-name="P257" svg:x1="2.84cm" svg:y1="1.418cm" svg:x2="3.84cm" svg:y2="1.418cm"><text:p/></draw:line><draw:line draw:style-name="gr3" draw:text-style-name="P257" svg:x1="3.84cm" svg:y1="0.919cm" svg:x2="4.09cm" svg:y2="0.919cm"><text:p/></draw:line><draw:line draw:style-name="gr3" draw:text-style-name="P257" svg:x1="4.089cm" svg:y1="1.418cm" svg:x2="4.089cm" svg:y2="0.919cm"><text:p/></draw:line><draw:line draw:style-name="gr3" draw:text-style-name="P257" svg:x1="4.089cm" svg:y1="1.418cm" svg:x2="6.839cm" svg:y2="1.418cm"><text:p/></draw:line><draw:line draw:style-name="gr3" draw:text-style-name="P257" svg:x1="6.839cm" svg:y1="0.919cm" svg:x2="6.839cm" svg:y2="1.418cm"><text:p/></draw:line><draw:line draw:style-name="gr3" draw:text-style-name="P257" svg:x1="6.839cm" svg:y1="0.919cm" svg:x2="7.089cm" svg:y2="0.919cm"><text:p/></draw:line><draw:line draw:style-name="gr3" draw:text-style-name="P257" svg:x1="7.091cm" svg:y1="1.418cm" svg:x2="7.091cm" svg:y2="0.919cm"><text:p/></draw:line><draw:line draw:style-name="gr3" draw:text-style-name="P257" svg:x1="7.091cm" svg:y1="1.418cm" svg:x2="8.34cm" svg:y2="1.418cm"><text:p/></draw:line><draw:line draw:style-name="gr3" draw:text-style-name="P257" svg:x1="8.34cm" svg:y1="0.919cm" svg:x2="8.34cm" svg:y2="1.418cm"><text:p/></draw:line><draw:line draw:style-name="gr3" draw:text-style-name="P257" svg:x1="8.34cm" svg:y1="0.919cm" svg:x2="8.59cm" svg:y2="0.919cm"><text:p/></draw:line><draw:line draw:style-name="gr3" draw:text-style-name="P257" svg:x1="8.59cm" svg:y1="1.418cm" svg:x2="8.59cm" svg:y2="0.919cm"><text:p/></draw:line><draw:line draw:style-name="gr3" draw:text-style-name="P257" svg:x1="8.59cm" svg:y1="1.418cm" svg:x2="10.089cm" svg:y2="1.418cm"><text:p/></draw:line><draw:line draw:style-name="gr4" draw:text-style-name="P257" svg:x1="8.34cm" svg:y1="2.418cm" svg:x2="8.34cm" svg:y2="1.919cm"><text:p/></draw:line><draw:line draw:style-name="gr4" draw:text-style-name="P257" svg:x1="8.59cm" svg:y1="1.919cm" svg:x2="8.34cm" svg:y2="1.919cm"><text:p/></draw:line><draw:line draw:style-name="gr4" draw:text-style-name="P257" svg:x1="8.59cm" svg:y1="1.919cm" svg:x2="8.59cm" svg:y2="2.418cm"><text:p/></draw:line><draw:line draw:style-name="gr4" draw:text-style-name="P257" svg:x1="3.84cm" svg:y1="2.418cm" svg:x2="3.84cm" svg:y2="1.919cm"><text:p/></draw:line><draw:line draw:style-name="gr4" draw:text-style-name="P257" svg:x1="4.09cm" svg:y1="1.919cm" svg:x2="3.84cm" svg:y2="1.919cm"><text:p/></draw:line><draw:line draw:style-name="gr4" draw:text-style-name="P257" svg:x1="4.089cm" svg:y1="1.919cm" svg:x2="4.089cm" svg:y2="2.418cm"><text:p/></draw:line><draw:line draw:style-name="gr4" draw:text-style-name="P257" svg:x1="8.338cm" svg:y1="2.417cm" svg:x2="4.089cm" svg:y2="2.417cm"><text:p/></draw:line><draw:line draw:style-name="gr4" draw:text-style-name="P257" svg:x1="2.84cm" svg:y1="2.417cm" svg:x2="3.84cm" svg:y2="2.417cm"><text:p/></draw:line><draw:line draw:style-name="gr4" draw:text-style-name="P257" svg:x1="8.59cm" svg:y1="2.417cm" svg:x2="10.089cm" svg:y2="2.417cm"><text:p/></draw:line><draw:line draw:style-name="gr5" draw:text-style-name="P257" svg:x1="2.84cm" svg:y1="3.42cm" svg:x2="6.841cm" svg:y2="3.42cm"><text:p/></draw:line><draw:line draw:style-name="gr5" draw:text-style-name="P257" svg:x1="7.091cm" svg:y1="2.919cm" svg:x2="7.091cm" svg:y2="3.418cm"><text:p/></draw:line><draw:line draw:style-name="gr5" draw:text-style-name="P257" svg:x1="6.839cm" svg:y1="2.919cm" svg:x2="6.839cm" svg:y2="3.418cm"><text:p/></draw:line><draw:line draw:style-name="gr5" draw:text-style-name="P257" svg:x1="7.089cm" svg:y1="2.919cm" svg:x2="6.839cm" svg:y2="2.919cm"><text:p/></draw:line><draw:line draw:style-name="gr5" draw:text-style-name="P257" svg:x1="7.091cm" svg:y1="3.42cm" svg:x2="10.09cm" svg:y2="3.42cm"><text:p/></draw:line><draw:frame draw:style-name="gr6" draw:text-style-name="P259" svg:width="1.752cm" svg:height="0.65cm" svg:x="1.09cm" svg:y="-0.081cm"><draw:text-box><text:p text:style-name="P258"><text:span text:style-name="T32">CLK</text:span></text:p></draw:text-box></draw:frame><draw:frame draw:style-name="gr6" draw:text-style-name="P259" svg:width="1.752cm" svg:height="0.65cm" svg:x="1.09cm" svg:y="1.919cm"><draw:text-box><text:p text:style-name="P258"><text:span text:style-name="T32">R_TRIG</text:span></text:p></draw:text-box></draw:frame><draw:frame draw:style-name="gr6" draw:text-style-name="P259" svg:width="1.752cm" svg:height="0.65cm" svg:x="1.09cm" svg:y="2.919cm"><draw:text-box><text:p text:style-name="P258"><text:span text:style-name="T32">F_TRIG</text:span></text:p></draw:text-box></draw:frame><draw:frame draw:style-name="gr6" draw:text-style-name="P259" svg:width="1.752cm" svg:height="0.65cm" svg:x="1.09cm" svg:y="0.919cm"><draw:text-box><text:p text:style-name="P258"><text:span text:style-name="T32">B_TRIG</text:span></text:p></draw:text-box></draw:frame></draw:g></text:p>
      <text:list xml:id="list38445814" text:continue-numbering="true" text:style-name="L1">
        <text:list-item>
          <text:list>
            <text:list-item>
              <text:h text:style-name="P216" text:outline-level="2"><text:alphabetical-index-mark-start text:id="IMark225902392"/>CLICK_CNT<text:alphabetical-index-mark-end text:id="IMark225902392"/></text:h>
            </text:list-item>
          </text:list>
        </text:list-item>
      </text:list>
      <text:p text:style-name="P69">Type<text:tab/>Funktionsbaustein</text:p>
      <text:p text:style-name="P66"><text:span text:style-name="T15">Input</text:span><text:span text:style-name="T14"><text:tab/>IN : BOOL (Eingangssignal)</text:span></text:p>
      <text:p text:style-name="P173"><text:span text:style-name="T14"><text:tab/>N : INT (Anzahl der zu dekodierenden </text:span><text:span text:style-name="T15">Clicks</text:span><text:span text:style-name="T14">)</text:span></text:p>
      <text:p text:style-name="P173"><text:span text:style-name="T14"><text:tab/>TC : TIME (Zeit in der die </text:span><text:span text:style-name="T15">Clicks</text:span><text:span text:style-name="T14"> stattfinden müssen)</text:span></text:p>
      <text:p text:style-name="P73"><draw:frame draw:style-name="fr3" draw:name="Grafik670" text:anchor-type="paragraph" svg:x="1.046cm" svg:y="0.688cm" svg:width="2.499cm" svg:height="1.921cm" draw:z-index="662"><draw:image xlink:href="Pictures/10000000000000BD00000091CC3878A4.png" xlink:type="simple" xlink:show="embed" xlink:actuate="onLoad"/></draw:frame>Output<text:tab/>Q : BOOL (Ausgangssignal)</text:p>
      <text:p text:style-name="P173"><text:span text:style-name="T21"><text:line-break/>CLICK_CNT ermittelt die Anzahl </text:span><text:span text:style-name="T16">der Impulse</text:span><text:span text:style-name="T21"> innerhalb der Zeiteinheit TC.am Eingang IN. Eine steigende Flanke an IN startet einen internen </text:span><text:span text:style-name="T16">Timer</text:span><text:span text:style-name="T21"> mit der Zeit TC. Während des Ablaufs des </text:span><text:span text:style-name="T16">Timers</text:span><text:span text:style-name="T21"> zählt der Baustein die fallenden Flanken an IN und überprüft nach Ablauf der Zeit TC ob N Impulse innerhalb der Zeit TC stattgefunden haben. Nur wenn exakt N Impulse innerhalb TC vorkommen wird der Ausgang Q für einen SPS Zyklus TRUE gesetzt. Der Baustein decodiert auch N=0 was einer steigenden Flanke aber keiner fallenden Flanke innerhalb von TC entspricht.</text:span></text:p>
      <text:p text:style-name="P183"><draw:frame draw:style-name="fr3" draw:name="Grafik671" text:anchor-type="paragraph" svg:x="1.199cm" svg:y="0.139cm" svg:width="10.291cm" svg:height="2.611cm" draw:z-index="663"><draw:image xlink:href="Pictures/100000000000030A000000C546DE1D94.png" xlink:type="simple" xlink:show="embed" xlink:actuate="onLoad"/></draw:frame></text:p>
      <text:list xml:id="list38473364" text:continue-numbering="true" text:style-name="L1">
        <text:list-item>
          <text:list>
            <text:list-item>
              <text:h text:style-name="P216" text:outline-level="2"><text:soft-page-break/><text:alphabetical-index-mark-start text:id="IMark225902392"/>CLICK_DEC<text:alphabetical-index-mark-end text:id="IMark225902392"/></text:h>
            </text:list-item>
          </text:list>
        </text:list-item>
      </text:list>
      <text:p text:style-name="P69">Type<text:tab/>Funktionsbaustein</text:p>
      <text:p text:style-name="P66"><text:span text:style-name="T15">Input</text:span><text:span text:style-name="T14"><text:tab/>IN : BOOL (Eingangssignal)</text:span></text:p>
      <text:p text:style-name="P173"><text:span text:style-name="T14"><text:tab/>TC : TIME (Zeit in der die </text:span><text:span text:style-name="T15">Clicks</text:span><text:span text:style-name="T14"> stattfinden müssen)</text:span></text:p>
      <text:p text:style-name="P73">Output<text:tab/>Q0 : BOOL (Ausgangssignal für steigende Flanke </text:p>
      <text:p text:style-name="P183"><text:tab/>ohne fallende Flanke)</text:p>
      <text:p text:style-name="P73"><text:tab/>Q1 : BOOL (Ausgangssignal für einen Impuls innerhalb TC)</text:p>
      <text:p text:style-name="P73"><text:tab/>Q2 : BOOL (Ausgangssignal für 2 Impulse innerhalb TC)</text:p>
      <text:p text:style-name="P73"><draw:frame draw:style-name="fr3" draw:name="Grafik672" text:anchor-type="paragraph" svg:x="1.177cm" svg:y="0.681cm" svg:width="2.671cm" svg:height="2.311cm" draw:z-index="664"><draw:image xlink:href="Pictures/10000000000000CA000000AF4E414A24.png" xlink:type="simple" xlink:show="embed" xlink:actuate="onLoad"/></draw:frame><text:tab/>Q3 : BOOL (Ausgangssignal für 3 Impulse innerhalb TC)</text:p>
      <text:p text:style-name="P183"><text:line-break/>CLICK_DEC dekodiert mehrfach Tastendrücke und signalisiert an verschiedenen Ausgängen die Anzahl der Impulse. Ein Eingangssignal ohne fallende Flanke innerhalb TC wird an Q0 ausgegeben und bleibt solange TRUE bis IN auf FALSE geht. Ein Impuls gefolgt von einem TRUE wird auf Q1 ausgegeben, usw. Wird innerhalb TC ein Impuls registriert, der vom Zustand FALSE gefolgt wird, so erscheint am entsprechenden Ausgang für einen SPS Zyklus ein TRUE.</text:p>
      <text:p text:style-name="P183"><draw:frame draw:style-name="fr3" draw:name="Grafik673" text:anchor-type="paragraph" svg:x="1.111cm" svg:y="0.005cm" svg:width="10.28cm" svg:height="2.739cm" draw:z-index="665"><draw:image xlink:href="Pictures/1000000000000309000000CFA00A0588.png" xlink:type="simple" xlink:show="embed" xlink:actuate="onLoad"/></draw:frame></text:p>
      <text:p text:style-name="P183"/>
      <text:p text:style-name="P183"/>
      <text:p text:style-name="P183"/>
      <text:p text:style-name="P183"/>
      <text:list xml:id="list38476051" text:continue-numbering="true" text:style-name="L1">
        <text:list-item>
          <text:list>
            <text:list-item>
              <text:h text:style-name="P216" text:outline-level="2"><text:soft-page-break/><text:alphabetical-index-mark-start text:id="IMark225902392"/>CLK_DIV<text:alphabetical-index-mark-end text:id="IMark225902392"/></text:h>
            </text:list-item>
          </text:list>
        </text:list-item>
      </text:list>
      <text:p text:style-name="P69">Type<text:tab/>Funktionsbaustein</text:p>
      <text:p text:style-name="P66"><text:span text:style-name="T15">Input</text:span><text:span text:style-name="T14"><text:tab/>CLK : BOOL (</text:span><text:span text:style-name="T15">Clock</text:span><text:span text:style-name="T14"> Eingang)</text:span></text:p>
      <text:p text:style-name="P69"><text:tab/>RST : BOOL (Reset Eingang)</text:p>
      <text:p text:style-name="P73">Output<text:tab/>Q0 : BOOL (Teiler Ausgang CLK / 2)</text:p>
      <text:p text:style-name="P73"><text:tab/>Q1 : BOOL (Teiler Ausgang CLK / 4)</text:p>
      <text:p text:style-name="P73"><text:tab/>Q2 : BOOL (Teiler Ausgang CLK / 8)</text:p>
      <text:p text:style-name="P73"><text:tab/>Q3 : BOOL (Teiler Ausgang CLK / 16)</text:p>
      <text:p text:style-name="P73"><text:tab/>Q4 : BOOL (Teiler Ausgang CLK / 32)</text:p>
      <text:p text:style-name="P73"><text:tab/>Q5 : BOOL (Teiler Ausgang CLK / 64)</text:p>
      <text:p text:style-name="P73"><text:tab/>Q6 : BOOL (Teiler Ausgang CLK / 128)</text:p>
      <text:p text:style-name="P73"><draw:frame draw:style-name="fr3" draw:name="Grafik89" text:anchor-type="paragraph" svg:x="1.138cm" svg:y="0.607cm" svg:width="2.281cm" svg:height="4.44cm" draw:z-index="50"><draw:image xlink:href="Pictures/10000000000000AC00000150E7828D1A.png" xlink:type="simple" xlink:show="embed" xlink:actuate="onLoad"/></draw:frame><text:tab/>Q7 : BOOL (Teiler Ausgang CLK / 256)</text:p>
      <text:p text:style-name="P73"><text:line-break/>Der Funktionsbaustein CLK_DIV ist ein Teilerbaustein, der ein Eingangssignal CLK in 8 Stufen durch jeweils 2 teilt, sodass am Ausgang Q0 die halbe Frequenz des Eingangs CLK mit 50% Tastverhältnis zur Verfügung steht. Der Ausgang Q1 stellt die halbierte Frequenz von Q0 zur Verfügung und so weiter, bis an Q7 die Eingangsfrequenz geteilt durch 256 bereitsteht. Ein Reset Eingang RST setzt asynchron alle Ausgänge auf FALSE. CLK darf jeweils nur einen Zyklus auf TRUE sein, falls CLK dies nicht tut muss CLK über ein TP_R bereitgestellt werden.</text:p>
      <text:p text:style-name="P73"><draw:g text:anchor-type="paragraph" draw:z-index="398" draw:style-name="gr1"><draw:line draw:style-name="gr3" draw:text-style-name="P257" svg:x1="2.548cm" svg:y1="0.116cm" svg:x2="2.548cm" svg:y2="0.615cm"><text:p/></draw:line><draw:line draw:style-name="gr3" draw:text-style-name="P257" svg:x1="2.049cm" svg:y1="0.612cm" svg:x2="2.548cm" svg:y2="0.612cm"><text:p/></draw:line><draw:line draw:style-name="gr3" draw:text-style-name="P257" svg:x1="2.548cm" svg:y1="0.116cm" svg:x2="2.798cm" svg:y2="0.116cm"><text:p/></draw:line><draw:line draw:style-name="gr3" draw:text-style-name="P257" svg:x1="2.802cm" svg:y1="0.615cm" svg:x2="2.802cm" svg:y2="0.116cm"><text:p/></draw:line><draw:line draw:style-name="gr3" draw:text-style-name="P257" svg:x1="2.802cm" svg:y1="0.612cm" svg:x2="3.552cm" svg:y2="0.612cm"><text:p/></draw:line><draw:frame draw:style-name="gr6" draw:text-style-name="P259" svg:width="1.251cm" svg:height="0.65cm" svg:x="1.05cm" svg:y="0.116cm"><draw:text-box><text:p text:style-name="P258"><text:span text:style-name="T32">CLK</text:span></text:p></draw:text-box></draw:frame><draw:line draw:style-name="gr3" draw:text-style-name="P257" svg:x1="3.549cm" svg:y1="0.116cm" svg:x2="3.549cm" svg:y2="0.615cm"><text:p/></draw:line><draw:line draw:style-name="gr3" draw:text-style-name="P257" svg:x1="3.549cm" svg:y1="0.116cm" svg:x2="3.799cm" svg:y2="0.116cm"><text:p/></draw:line><draw:line draw:style-name="gr3" draw:text-style-name="P257" svg:x1="3.803cm" svg:y1="0.615cm" svg:x2="3.803cm" svg:y2="0.116cm"><text:p/></draw:line><draw:line draw:style-name="gr3" draw:text-style-name="P257" svg:x1="3.803cm" svg:y1="0.612cm" svg:x2="4.553cm" svg:y2="0.612cm"><text:p/></draw:line><draw:line draw:style-name="gr3" draw:text-style-name="P257" svg:x1="4.55cm" svg:y1="0.116cm" svg:x2="4.55cm" svg:y2="0.615cm"><text:p/></draw:line><draw:line draw:style-name="gr3" draw:text-style-name="P257" svg:x1="4.55cm" svg:y1="0.116cm" svg:x2="4.8cm" svg:y2="0.116cm"><text:p/></draw:line><draw:line draw:style-name="gr3" draw:text-style-name="P257" svg:x1="4.799cm" svg:y1="0.615cm" svg:x2="4.799cm" svg:y2="0.116cm"><text:p/></draw:line><draw:line draw:style-name="gr3" draw:text-style-name="P257" svg:x1="4.799cm" svg:y1="0.612cm" svg:x2="5.549cm" svg:y2="0.612cm"><text:p/></draw:line><draw:line draw:style-name="gr3" draw:text-style-name="P257" svg:x1="5.551cm" svg:y1="0.116cm" svg:x2="5.551cm" svg:y2="0.615cm"><text:p/></draw:line><draw:line draw:style-name="gr3" draw:text-style-name="P257" svg:x1="5.551cm" svg:y1="0.116cm" svg:x2="5.801cm" svg:y2="0.116cm"><text:p/></draw:line><draw:line draw:style-name="gr3" draw:text-style-name="P257" svg:x1="5.799cm" svg:y1="0.615cm" svg:x2="5.799cm" svg:y2="0.116cm"><text:p/></draw:line><draw:line draw:style-name="gr3" draw:text-style-name="P257" svg:x1="5.799cm" svg:y1="0.612cm" svg:x2="6.549cm" svg:y2="0.612cm"><text:p/></draw:line><draw:line draw:style-name="gr3" draw:text-style-name="P257" svg:x1="6.552cm" svg:y1="0.116cm" svg:x2="6.552cm" svg:y2="0.615cm"><text:p/></draw:line><draw:line draw:style-name="gr3" draw:text-style-name="P257" svg:x1="6.552cm" svg:y1="0.116cm" svg:x2="6.802cm" svg:y2="0.116cm"><text:p/></draw:line><draw:line draw:style-name="gr3" draw:text-style-name="P257" svg:x1="6.799cm" svg:y1="0.615cm" svg:x2="6.799cm" svg:y2="0.116cm"><text:p/></draw:line><draw:line draw:style-name="gr3" draw:text-style-name="P257" svg:x1="6.799cm" svg:y1="0.612cm" svg:x2="7.549cm" svg:y2="0.612cm"><text:p/></draw:line><draw:line draw:style-name="gr3" draw:text-style-name="P257" svg:x1="7.553cm" svg:y1="0.116cm" svg:x2="7.553cm" svg:y2="0.615cm"><text:p/></draw:line><draw:line draw:style-name="gr3" draw:text-style-name="P257" svg:x1="7.553cm" svg:y1="0.116cm" svg:x2="7.803cm" svg:y2="0.116cm"><text:p/></draw:line><draw:line draw:style-name="gr3" draw:text-style-name="P257" svg:x1="7.8cm" svg:y1="0.615cm" svg:x2="7.8cm" svg:y2="0.116cm"><text:p/></draw:line><draw:line draw:style-name="gr3" draw:text-style-name="P257" svg:x1="7.8cm" svg:y1="0.612cm" svg:x2="8.299cm" svg:y2="0.612cm"><text:p/></draw:line><draw:line draw:style-name="gr3" draw:text-style-name="P257" svg:x1="2.548cm" svg:y1="0.12cm" svg:x2="2.548cm" svg:y2="0.619cm"><text:p/></draw:line><draw:line draw:style-name="gr3" draw:text-style-name="P257" svg:x1="2.049cm" svg:y1="0.617cm" svg:x2="2.548cm" svg:y2="0.617cm"><text:p/></draw:line><draw:line draw:style-name="gr3" draw:text-style-name="P257" svg:x1="2.548cm" svg:y1="0.12cm" svg:x2="2.798cm" svg:y2="0.12cm"><text:p/></draw:line><draw:line draw:style-name="gr3" draw:text-style-name="P257" svg:x1="2.802cm" svg:y1="0.619cm" svg:x2="2.802cm" svg:y2="0.12cm"><text:p/></draw:line><draw:line draw:style-name="gr3" draw:text-style-name="P257" svg:x1="2.802cm" svg:y1="0.617cm" svg:x2="3.552cm" svg:y2="0.617cm"><text:p/></draw:line><draw:frame draw:style-name="gr6" draw:text-style-name="P259" svg:width="1.251cm" svg:height="0.65cm" svg:x="1.05cm" svg:y="0.118cm"><draw:text-box><text:p text:style-name="P258"><text:span text:style-name="T32">CLK</text:span></text:p></draw:text-box></draw:frame><draw:line draw:style-name="gr3" draw:text-style-name="P257" svg:x1="3.549cm" svg:y1="0.12cm" svg:x2="3.549cm" svg:y2="0.619cm"><text:p/></draw:line><draw:line draw:style-name="gr3" draw:text-style-name="P257" svg:x1="3.549cm" svg:y1="0.12cm" svg:x2="3.799cm" svg:y2="0.12cm"><text:p/></draw:line><draw:line draw:style-name="gr3" draw:text-style-name="P257" svg:x1="3.803cm" svg:y1="0.619cm" svg:x2="3.803cm" svg:y2="0.12cm"><text:p/></draw:line><draw:line draw:style-name="gr3" draw:text-style-name="P257" svg:x1="3.803cm" svg:y1="0.617cm" svg:x2="4.553cm" svg:y2="0.617cm"><text:p/></draw:line><draw:line draw:style-name="gr3" draw:text-style-name="P257" svg:x1="4.55cm" svg:y1="0.12cm" svg:x2="4.55cm" svg:y2="0.619cm"><text:p/></draw:line><draw:line draw:style-name="gr3" draw:text-style-name="P257" svg:x1="4.55cm" svg:y1="0.12cm" svg:x2="4.8cm" svg:y2="0.12cm"><text:p/></draw:line><draw:line draw:style-name="gr3" draw:text-style-name="P257" svg:x1="4.799cm" svg:y1="0.619cm" svg:x2="4.799cm" svg:y2="0.12cm"><text:p/></draw:line><draw:line draw:style-name="gr3" draw:text-style-name="P257" svg:x1="4.799cm" svg:y1="0.617cm" svg:x2="5.549cm" svg:y2="0.617cm"><text:p/></draw:line><draw:line draw:style-name="gr3" draw:text-style-name="P257" svg:x1="5.551cm" svg:y1="0.12cm" svg:x2="5.551cm" svg:y2="0.619cm"><text:p/></draw:line><draw:line draw:style-name="gr3" draw:text-style-name="P257" svg:x1="5.551cm" svg:y1="0.12cm" svg:x2="5.801cm" svg:y2="0.12cm"><text:p/></draw:line><draw:line draw:style-name="gr3" draw:text-style-name="P257" svg:x1="5.799cm" svg:y1="0.619cm" svg:x2="5.799cm" svg:y2="0.12cm"><text:p/></draw:line><draw:line draw:style-name="gr3" draw:text-style-name="P257" svg:x1="5.799cm" svg:y1="0.617cm" svg:x2="6.549cm" svg:y2="0.617cm"><text:p/></draw:line><draw:line draw:style-name="gr3" draw:text-style-name="P257" svg:x1="6.552cm" svg:y1="0.12cm" svg:x2="6.552cm" svg:y2="0.619cm"><text:p/></draw:line><draw:line draw:style-name="gr3" draw:text-style-name="P257" svg:x1="6.552cm" svg:y1="0.12cm" svg:x2="6.802cm" svg:y2="0.12cm"><text:p/></draw:line><draw:line draw:style-name="gr3" draw:text-style-name="P257" svg:x1="6.799cm" svg:y1="0.619cm" svg:x2="6.799cm" svg:y2="0.12cm"><text:p/></draw:line><draw:line draw:style-name="gr3" draw:text-style-name="P257" svg:x1="6.799cm" svg:y1="0.617cm" svg:x2="7.549cm" svg:y2="0.617cm"><text:p/></draw:line><draw:line draw:style-name="gr3" draw:text-style-name="P257" svg:x1="7.553cm" svg:y1="0.12cm" svg:x2="7.553cm" svg:y2="0.619cm"><text:p/></draw:line><draw:line draw:style-name="gr3" draw:text-style-name="P257" svg:x1="7.553cm" svg:y1="0.12cm" svg:x2="7.803cm" svg:y2="0.12cm"><text:p/></draw:line><draw:line draw:style-name="gr3" draw:text-style-name="P257" svg:x1="7.8cm" svg:y1="0.619cm" svg:x2="7.8cm" svg:y2="0.12cm"><text:p/></draw:line><draw:line draw:style-name="gr3" draw:text-style-name="P257" svg:x1="7.8cm" svg:y1="0.614cm" svg:x2="8.299cm" svg:y2="0.612cm"><text:p/></draw:line><draw:line draw:style-name="gr2" draw:text-style-name="P257" svg:x1="2.049cm" svg:y1="1.367cm" svg:x2="2.548cm" svg:y2="1.367cm"><text:p/></draw:line><draw:line draw:style-name="gr2" draw:text-style-name="P257" svg:x1="2.548cm" svg:y1="0.866cm" svg:x2="2.548cm" svg:y2="1.367cm"><text:p/></draw:line><draw:line draw:style-name="gr2" draw:text-style-name="P257" svg:x1="2.548cm" svg:y1="0.866cm" svg:x2="3.548cm" svg:y2="0.866cm"><text:p/></draw:line><draw:line draw:style-name="gr2" draw:text-style-name="P257" svg:x1="3.549cm" svg:y1="1.367cm" svg:x2="3.549cm" svg:y2="0.866cm"><text:p/></draw:line><draw:line draw:style-name="gr2" draw:text-style-name="P257" svg:x1="3.549cm" svg:y1="1.367cm" svg:x2="4.549cm" svg:y2="1.367cm"><text:p/></draw:line><draw:line draw:style-name="gr2" draw:text-style-name="P257" svg:x1="4.55cm" svg:y1="0.866cm" svg:x2="4.55cm" svg:y2="1.367cm"><text:p/></draw:line><draw:line draw:style-name="gr2" draw:text-style-name="P257" svg:x1="4.55cm" svg:y1="0.866cm" svg:x2="5.55cm" svg:y2="0.866cm"><text:p/></draw:line><draw:line draw:style-name="gr2" draw:text-style-name="P257" svg:x1="5.551cm" svg:y1="1.367cm" svg:x2="5.551cm" svg:y2="0.866cm"><text:p/></draw:line><draw:line draw:style-name="gr2" draw:text-style-name="P257" svg:x1="5.551cm" svg:y1="1.367cm" svg:x2="6.551cm" svg:y2="1.367cm"><text:p/></draw:line><draw:line draw:style-name="gr2" draw:text-style-name="P257" svg:x1="6.552cm" svg:y1="0.866cm" svg:x2="6.552cm" svg:y2="1.367cm"><text:p/></draw:line><draw:line draw:style-name="gr2" draw:text-style-name="P257" svg:x1="6.552cm" svg:y1="0.866cm" svg:x2="7.552cm" svg:y2="0.866cm"><text:p/></draw:line><draw:line draw:style-name="gr2" draw:text-style-name="P257" svg:x1="7.553cm" svg:y1="1.367cm" svg:x2="7.553cm" svg:y2="0.866cm"><text:p/></draw:line><draw:line draw:style-name="gr2" draw:text-style-name="P257" svg:x1="7.553cm" svg:y1="1.367cm" svg:x2="8.303cm" svg:y2="1.367cm"><text:p/></draw:line><draw:line draw:style-name="gr4" draw:text-style-name="P257" svg:x1="7.553cm" svg:y1="2.115cm" svg:x2="7.553cm" svg:y2="1.614cm"><text:p/></draw:line><draw:line draw:style-name="gr4" draw:text-style-name="P257" svg:x1="8.303cm" svg:y1="1.614cm" svg:x2="7.553cm" svg:y2="1.614cm"><text:p/></draw:line><draw:line draw:style-name="gr4" draw:text-style-name="P257" svg:x1="3.549cm" svg:y1="2.115cm" svg:x2="3.549cm" svg:y2="1.614cm"><text:p/></draw:line><draw:line draw:style-name="gr4" draw:text-style-name="P257" svg:x1="5.549cm" svg:y1="1.614cm" svg:x2="3.549cm" svg:y2="1.614cm"><text:p/></draw:line><draw:line draw:style-name="gr4" draw:text-style-name="P257" svg:x1="5.551cm" svg:y1="1.614cm" svg:x2="5.551cm" svg:y2="2.115cm"><text:p/></draw:line><draw:line draw:style-name="gr4" draw:text-style-name="P257" svg:x1="7.551cm" svg:y1="2.114cm" svg:x2="5.551cm" svg:y2="2.114cm"><text:p/></draw:line><draw:line draw:style-name="gr4" draw:text-style-name="P257" svg:x1="2.049cm" svg:y1="2.114cm" svg:x2="3.548cm" svg:y2="2.114cm"><text:p/></draw:line><draw:frame draw:style-name="gr6" draw:text-style-name="P259" svg:width="1.251cm" svg:height="0.65cm" svg:x="1.05cm" svg:y="0.866cm"><draw:text-box><text:p text:style-name="P258"><text:span text:style-name="T32">Q0</text:span></text:p></draw:text-box></draw:frame><draw:frame draw:style-name="gr6" draw:text-style-name="P259" svg:width="1.251cm" svg:height="0.65cm" svg:x="1.05cm" svg:y="1.615cm"><draw:text-box><text:p text:style-name="P258"><text:span text:style-name="T32">Q1</text:span></text:p></draw:text-box></draw:frame><draw:line draw:style-name="gr5" draw:text-style-name="P257" svg:x1="2.049cm" svg:y1="2.866cm" svg:x2="5.549cm" svg:y2="2.866cm"><text:p/></draw:line><draw:line draw:style-name="gr5" draw:text-style-name="P257" svg:x1="5.551cm" svg:y1="2.367cm" svg:x2="5.551cm" svg:y2="2.866cm"><text:p/></draw:line><draw:line draw:style-name="gr5" draw:text-style-name="P257" svg:x1="8.301cm" svg:y1="2.367cm" svg:x2="5.551cm" svg:y2="2.367cm"><text:p/></draw:line><draw:frame draw:style-name="gr6" draw:text-style-name="P259" svg:width="1.251cm" svg:height="0.65cm" svg:x="1.05cm" svg:y="2.367cm"><draw:text-box><text:p text:style-name="P258"><text:span text:style-name="T32">Q2</text:span></text:p></draw:text-box></draw:frame></draw:g></text:p>
      <text:p text:style-name="P173"><draw:frame draw:style-name="fr3" draw:name="Grafik90" text:anchor-type="paragraph" svg:x="1.087cm" svg:y="1.697cm" svg:width="10.28cm" svg:height="4.911cm" draw:z-index="51"><draw:image xlink:href="Pictures/1000000000000309000001730AD7860F.png" xlink:type="simple" xlink:show="embed" xlink:actuate="onLoad"/></draw:frame><text:span text:style-name="T21">Das folgende Beispiel ist eine Testschaltung mit Startsignal über ENI / ENO Funktionalität Realisiert. Bild 2 zeigt eine entsprechende </text:span><text:span text:style-name="T16">Tracea</text:span><text:span text:style-name="T21">ufzeichnung der Schaltung:</text:span></text:p>
      <text:p text:style-name="P183"><draw:frame draw:style-name="fr5" draw:name="Grafik91" text:anchor-type="paragraph" svg:x="0.975cm" svg:y="5.838cm" svg:width="15.998cm" svg:height="7.528cm" draw:z-index="52"><draw:image xlink:href="Pictures/1000000000000321000001799953EB50.png" xlink:type="simple" xlink:show="embed" xlink:actuate="onLoad"/></draw:frame><text:soft-page-break/></text:p>
      <text:p text:style-name="P183"/>
      <text:list xml:id="list38466046" text:continue-numbering="true" text:style-name="L1">
        <text:list-item>
          <text:list>
            <text:list-item>
              <text:h text:style-name="P216" text:outline-level="2"><text:alphabetical-index-mark-start text:id="IMark225902392"/>CLK_N<text:alphabetical-index-mark-end text:id="IMark225902392"/></text:h>
            </text:list-item>
          </text:list>
        </text:list-item>
      </text:list>
      <text:p text:style-name="P69">Type<text:tab/>Funktionsbaustein</text:p>
      <text:p text:style-name="P66"><text:span text:style-name="T15">Input</text:span><text:span text:style-name="T14"><text:tab/>N : INT (</text:span><text:span text:style-name="T15">Clock</text:span><text:span text:style-name="T14"> Teiler)</text:span></text:p>
      <text:p text:style-name="P73"><draw:frame draw:style-name="fr3" draw:name="Grafik419" text:anchor-type="paragraph" svg:x="1.067cm" svg:y="0.688cm" svg:width="2.101cm" svg:height="1.101cm" draw:z-index="392"><draw:image xlink:href="Pictures/100000000000009F000000534F7A6EA5.png" xlink:type="simple" xlink:show="embed" xlink:actuate="onLoad"/></draw:frame>Output<text:tab/>Q : BOOL (Taktausgang)</text:p>
      <text:p text:style-name="P183"><text:line-break/>CLK_N erzeugt einen Impuls alle X Millisekunden basierend auf der SPS internen 1ms Referenz. Die Impulse sind exakt einen SPS Zyklus lang und werden alle 2^N Millisekunden erzeugt.</text:p>
      <text:p text:style-name="P183"><text:soft-page-break/>Die Periodendauer beträgt 1ms für N=0, 2ms für N=1, 4ms für N=2 usw.</text:p>
      <text:p text:style-name="P183">CLK_N ersetzt die Bausteine CLK_1ms, CLK_2ms, CLK_4ms und CLK_8ms aus älteren Bibliotheken.</text:p>
      <text:p text:style-name="P183">Das nachfolgende Bild zeigt das Ausgangssignal für N=0:</text:p>
      <text:p text:style-name="P183"><draw:g text:anchor-type="paragraph" draw:z-index="393" draw:style-name="gr1"><draw:line draw:style-name="gr3" draw:text-style-name="P257" svg:x1="2.849cm" svg:y1="0.755cm" svg:x2="2.849cm" svg:y2="1.256cm"><text:p/></draw:line><draw:line draw:style-name="gr3" draw:text-style-name="P257" svg:x1="1.85cm" svg:y1="1.256cm" svg:x2="2.85cm" svg:y2="1.256cm"><text:p/></draw:line><draw:line draw:style-name="gr3" draw:text-style-name="P257" svg:x1="2.849cm" svg:y1="0.755cm" svg:x2="3.099cm" svg:y2="0.755cm"><text:p/></draw:line><draw:line draw:style-name="gr3" draw:text-style-name="P257" svg:x1="3.099cm" svg:y1="1.256cm" svg:x2="3.099cm" svg:y2="0.755cm"><text:p/></draw:line><draw:line draw:style-name="gr3" draw:text-style-name="P257" svg:x1="3.099cm" svg:y1="1.256cm" svg:x2="4.35cm" svg:y2="1.256cm"><text:p/></draw:line><draw:line draw:style-name="gr3" draw:text-style-name="P257" svg:x1="5.849cm" svg:y1="0.755cm" svg:x2="5.849cm" svg:y2="1.256cm"><text:p/></draw:line><draw:line draw:style-name="gr3" draw:text-style-name="P257" svg:x1="5.849cm" svg:y1="0.755cm" svg:x2="6.099cm" svg:y2="0.755cm"><text:p/></draw:line><draw:line draw:style-name="gr3" draw:text-style-name="P257" svg:x1="6.101cm" svg:y1="1.256cm" svg:x2="6.101cm" svg:y2="0.755cm"><text:p/></draw:line><draw:line draw:style-name="gr3" draw:text-style-name="P257" svg:x1="6.101cm" svg:y1="1.256cm" svg:x2="7.35cm" svg:y2="1.256cm"><text:p/></draw:line><draw:line draw:style-name="gr3" draw:text-style-name="P257" svg:x1="7.348cm" svg:y1="0.755cm" svg:x2="7.348cm" svg:y2="1.256cm"><text:p/></draw:line><draw:line draw:style-name="gr3" draw:text-style-name="P257" svg:x1="7.348cm" svg:y1="0.755cm" svg:x2="7.598cm" svg:y2="0.755cm"><text:p/></draw:line><draw:line draw:style-name="gr3" draw:text-style-name="P257" svg:x1="7.599cm" svg:y1="1.256cm" svg:x2="7.599cm" svg:y2="0.755cm"><text:p/></draw:line><draw:line draw:style-name="gr3" draw:text-style-name="P257" svg:x1="7.599cm" svg:y1="1.256cm" svg:x2="8.1cm" svg:y2="1.256cm"><text:p/></draw:line><draw:frame draw:style-name="gr6" draw:text-style-name="P259" svg:width="1.251cm" svg:height="0.65cm" svg:x="1.099cm" svg:y="0.754cm"><draw:text-box><text:p text:style-name="P258"><text:span text:style-name="T32">Q</text:span></text:p></draw:text-box></draw:frame><draw:line draw:style-name="gr3" draw:text-style-name="P257" svg:x1="4.35cm" svg:y1="0.755cm" svg:x2="4.35cm" svg:y2="1.256cm"><text:p/></draw:line><draw:line draw:style-name="gr3" draw:text-style-name="P257" svg:x1="4.35cm" svg:y1="0.755cm" svg:x2="4.599cm" svg:y2="0.755cm"><text:p/></draw:line><draw:line draw:style-name="gr3" draw:text-style-name="P257" svg:x1="4.6cm" svg:y1="1.256cm" svg:x2="4.6cm" svg:y2="0.755cm"><text:p/></draw:line><draw:line draw:style-name="gr3" draw:text-style-name="P257" svg:x1="4.6cm" svg:y1="1.256cm" svg:x2="5.851cm" svg:y2="1.256cm"><text:p/></draw:line><draw:frame draw:style-name="gr6" draw:text-style-name="P259" svg:width="1.251cm" svg:height="0.65cm" svg:x="4.599cm" svg:y="0.004cm"><draw:text-box><text:p text:style-name="P258"><text:span text:style-name="T32">1 ms</text:span></text:p></draw:text-box></draw:frame><draw:line draw:style-name="gr7" draw:text-style-name="P257" svg:x1="4.35cm" svg:y1="0.254cm" svg:x2="4.849cm" svg:y2="0.254cm"><text:p/></draw:line><draw:line draw:style-name="gr7" draw:text-style-name="P257" svg:x1="5.85cm" svg:y1="0.254cm" svg:x2="5.6cm" svg:y2="0.254cm"><text:p/></draw:line></draw:g></text:p>
      <text:list xml:id="list38445205" text:continue-numbering="true" text:style-name="L1">
        <text:list-item>
          <text:list>
            <text:list-item>
              <text:h text:style-name="P216" text:outline-level="2"><text:alphabetical-index-mark-start text:id="IMark225902392"/>CLK_PRG<text:alphabetical-index-mark-end text:id="IMark225902392"/></text:h>
            </text:list-item>
          </text:list>
        </text:list-item>
      </text:list>
      <text:p text:style-name="P69">Type<text:tab/>Funktionsbaustein</text:p>
      <text:p text:style-name="P66"><text:span text:style-name="T15">Input</text:span><text:span text:style-name="T14"><text:tab/>PT : TIME (Zykluszeit)</text:span></text:p>
      <text:p text:style-name="P73"><draw:frame draw:style-name="fr3" draw:name="Grafik92" text:anchor-type="paragraph" svg:x="1.058cm" svg:y="0.679cm" svg:width="2.281cm" svg:height="1.3cm" draw:z-index="53"><draw:image xlink:href="Pictures/10000000000000AC00000062EF71D149.png" xlink:type="simple" xlink:show="embed" xlink:actuate="onLoad"/></draw:frame>Output<text:tab/>Q : BOOL (Taktausgang)</text:p>
      <text:p text:style-name="P73"><text:line-break/>CLK_PRG erzeugt Taktimpulse mit einer programmierbaren Periodendauer PT. Die Ausgangsimpulse sind jeweils nur einen SPS Zyklus.</text:p>
      <text:p text:style-name="P73"><draw:g text:anchor-type="paragraph" draw:z-index="54" draw:style-name="gr1"><draw:line draw:style-name="gr3" draw:text-style-name="P257" svg:x1="2.847cm" svg:y1="0.718cm" svg:x2="2.847cm" svg:y2="1.219cm"><text:p/></draw:line><draw:line draw:style-name="gr3" draw:text-style-name="P257" svg:x1="1.845cm" svg:y1="1.219cm" svg:x2="2.845cm" svg:y2="1.219cm"><text:p/></draw:line><draw:line draw:style-name="gr3" draw:text-style-name="P257" svg:x1="2.847cm" svg:y1="0.718cm" svg:x2="3.097cm" svg:y2="0.718cm"><text:p/></draw:line><draw:line draw:style-name="gr3" draw:text-style-name="P257" svg:x1="3.094cm" svg:y1="1.219cm" svg:x2="3.094cm" svg:y2="0.718cm"><text:p/></draw:line><draw:line draw:style-name="gr3" draw:text-style-name="P257" svg:x1="3.094cm" svg:y1="1.219cm" svg:x2="4.345cm" svg:y2="1.219cm"><text:p/></draw:line><draw:line draw:style-name="gr3" draw:text-style-name="P257" svg:x1="5.844cm" svg:y1="0.718cm" svg:x2="5.844cm" svg:y2="1.219cm"><text:p/></draw:line><draw:line draw:style-name="gr3" draw:text-style-name="P257" svg:x1="5.844cm" svg:y1="0.718cm" svg:x2="6.094cm" svg:y2="0.718cm"><text:p/></draw:line><draw:line draw:style-name="gr3" draw:text-style-name="P257" svg:x1="6.096cm" svg:y1="1.219cm" svg:x2="6.096cm" svg:y2="0.718cm"><text:p/></draw:line><draw:line draw:style-name="gr3" draw:text-style-name="P257" svg:x1="6.096cm" svg:y1="1.219cm" svg:x2="7.345cm" svg:y2="1.219cm"><text:p/></draw:line><draw:line draw:style-name="gr3" draw:text-style-name="P257" svg:x1="7.343cm" svg:y1="0.718cm" svg:x2="7.343cm" svg:y2="1.219cm"><text:p/></draw:line><draw:line draw:style-name="gr3" draw:text-style-name="P257" svg:x1="7.343cm" svg:y1="0.718cm" svg:x2="7.593cm" svg:y2="0.718cm"><text:p/></draw:line><draw:line draw:style-name="gr3" draw:text-style-name="P257" svg:x1="7.594cm" svg:y1="1.219cm" svg:x2="7.594cm" svg:y2="0.718cm"><text:p/></draw:line><draw:line draw:style-name="gr3" draw:text-style-name="P257" svg:x1="7.594cm" svg:y1="1.219cm" svg:x2="8.095cm" svg:y2="1.219cm"><text:p/></draw:line><draw:frame draw:style-name="gr6" draw:text-style-name="P259" svg:width="1.251cm" svg:height="0.65cm" svg:x="1.094cm" svg:y="0.718cm"><draw:text-box><text:p text:style-name="P258"><text:span text:style-name="T32">Q</text:span></text:p></draw:text-box></draw:frame><draw:line draw:style-name="gr3" draw:text-style-name="P257" svg:x1="4.348cm" svg:y1="0.718cm" svg:x2="4.348cm" svg:y2="1.219cm"><text:p/></draw:line><draw:line draw:style-name="gr3" draw:text-style-name="P257" svg:x1="4.348cm" svg:y1="0.718cm" svg:x2="4.597cm" svg:y2="0.718cm"><text:p/></draw:line><draw:line draw:style-name="gr3" draw:text-style-name="P257" svg:x1="4.595cm" svg:y1="1.219cm" svg:x2="4.595cm" svg:y2="0.718cm"><text:p/></draw:line><draw:line draw:style-name="gr3" draw:text-style-name="P257" svg:x1="4.595cm" svg:y1="1.219cm" svg:x2="5.846cm" svg:y2="1.219cm"><text:p/></draw:line><draw:frame draw:style-name="gr6" draw:text-style-name="P259" svg:width="1.251cm" svg:height="0.65cm" svg:x="4.594cm" svg:y="-0.032cm"><draw:text-box><text:p text:style-name="P258"><text:span text:style-name="T32"><text:s text:c="2"/></text:span><text:span text:style-name="T32">PT</text:span></text:p></draw:text-box></draw:frame><draw:line draw:style-name="gr7" draw:text-style-name="P257" svg:x1="4.348cm" svg:y1="0.217cm" svg:x2="4.847cm" svg:y2="0.217cm"><text:p/></draw:line><draw:line draw:style-name="gr7" draw:text-style-name="P257" svg:x1="5.845cm" svg:y1="0.217cm" svg:x2="5.595cm" svg:y2="0.217cm"><text:p/></draw:line></draw:g></text:p>
      <text:list xml:id="list38455312" text:continue-numbering="true" text:style-name="L1">
        <text:list-item>
          <text:list>
            <text:list-item>
              <text:h text:style-name="P216" text:outline-level="2"><text:alphabetical-index-mark-start text:id="IMark225902392"/>CLK_PULSE<text:alphabetical-index-mark-end text:id="IMark225902392"/></text:h>
            </text:list-item>
          </text:list>
        </text:list-item>
      </text:list>
      <text:p text:style-name="P69">Type<text:tab/>Funktionsbaustein</text:p>
      <text:p text:style-name="P66"><text:span text:style-name="T15">Input</text:span><text:span text:style-name="T14"><text:tab/>PT : TIME (Zykluszeit)</text:span></text:p>
      <text:p text:style-name="P69"><text:tab/>N : INT (Anzahl der zu erzeugenden Impulse)</text:p>
      <text:p text:style-name="P69"><text:tab/>RST : BOOL (Reset)</text:p>
      <text:p text:style-name="P73">Output<text:tab/>Q : BOOL (Taktausgang)</text:p>
      <text:p text:style-name="P73"><text:tab/>CNT : INT (Zähler der Ausgangsimpulse)</text:p>
      <text:p text:style-name="P73"><draw:frame draw:style-name="fr3" draw:name="Grafik93" text:anchor-type="paragraph" svg:x="0.995cm" svg:y="0.679cm" svg:width="2.731cm" svg:height="2.2cm" draw:z-index="55"><draw:image xlink:href="Pictures/10000000000000CE000000A6398FB9DC.png" xlink:type="simple" xlink:show="embed" xlink:actuate="onLoad"/></draw:frame><text:soft-page-break/><text:tab/>RUN : BOOL (TRUE, wenn Pulsgenerator läuft)</text:p>
      <text:p text:style-name="P73"><text:line-break/>CLK_PULSE erzeugt eine definierte Anzahl von Taktimpulsen mit einem programmierbaren Tastverhältnis. PT legt das Tastverhältnis fest und N die Anzahl der zu erzeugenden Impulse. Durch einen Reset Eingang RST kann der Generator jederzeit erneut gestartet werden. Der Ausgang CNT zählt die erzeugten Impulse und RUN = TRUE zeigt an, dass der Generator noch Impulse generiert. Ein Eingangswert N = 0 erzeugt eine unendliche Impulsfolge, Die Maximale Anzahl der Impulse ist auf 32767 begrenzt.</text:p>
      <text:p text:style-name="P183">Das folgende Beispiel zeigt eine Anwendung von CLK_PULSE zur Erzeugung von 7 Impulsen mit einem Tastverhältnis von 100ms.</text:p>
      <text:p text:style-name="P73"><draw:frame draw:style-name="fr10" draw:name="Grafik94" text:anchor-type="paragraph" svg:x="1.152cm" svg:y="0.504cm" svg:width="8.481cm" svg:height="2.21cm" draw:z-index="56"><draw:image xlink:href="Pictures/1000000000000281000000A70DD31D25.png" xlink:type="simple" xlink:show="embed" xlink:actuate="onLoad"/></draw:frame></text:p>
      <text:p text:style-name="P183"><draw:frame draw:style-name="fr10" draw:name="Grafik95" text:anchor-type="paragraph" svg:x="1.004cm" svg:y="0.046cm" svg:width="15.998cm" svg:height="6.101cm" draw:z-index="57"><draw:image xlink:href="Pictures/10000000000003A800000165B33E5B46.png" xlink:type="simple" xlink:show="embed" xlink:actuate="onLoad"/></draw:frame></text:p>
      <text:p text:style-name="P173"><text:span text:style-name="T21">Die </text:span><text:span text:style-name="T16">Tracea</text:span><text:span text:style-name="T21">ufzeichnung zeigt, wie der RESET (Grün) inaktiv wird und dadurch RUN (Rot) aktiv wird. Der Generator erzeugt dann 7 Impulse (Blau), wie am Eingang N spezifiziert. Der Ausgang CNT zählt dabei von 1 beim ersten Puls nach 7 beim letzten Puls. Nach Ablauf der Sequenz wird RUN wieder inaktiv und der Zyklus ist beendet, bis er durch einem neuen Reset wieder gestartet wird.</text:span></text:p>
      <text:list xml:id="list38461722" text:continue-numbering="true" text:style-name="L1">
        <text:list-item>
          <text:list>
            <text:list-item>
              <text:h text:style-name="P216" text:outline-level="2"><text:soft-page-break/><text:alphabetical-index-mark-start text:id="IMark225902392"/>CYCLE_4<text:alphabetical-index-mark-end text:id="IMark225902392"/></text:h>
            </text:list-item>
          </text:list>
        </text:list-item>
      </text:list>
      <text:p text:style-name="P69">Type<text:tab/>Funktionsbaustein</text:p>
      <text:p text:style-name="P66"><text:span text:style-name="T15">Input</text:span><text:span text:style-name="T14"><text:tab/>E : BOOL (</text:span><text:span text:style-name="T15">Enable</text:span><text:span text:style-name="T14"> Eingang)</text:span></text:p>
      <text:p text:style-name="P173"><text:span text:style-name="T14"><text:tab/>T0 .. T3 : TIME (Laufzeit der einzelnen </text:span><text:span text:style-name="T15">States</text:span><text:span text:style-name="T14">)</text:span></text:p>
      <text:p text:style-name="P173"><text:span text:style-name="T14"><text:tab/>S0 : BOOL (kontinuierlicher Zyklus </text:span><text:span text:style-name="T15">Enable</text:span><text:span text:style-name="T14">)</text:span></text:p>
      <text:p text:style-name="P173"><text:span text:style-name="T14"><text:tab/>SX : INT (</text:span><text:span text:style-name="T15">State</text:span><text:span text:style-name="T14"> wenn SL = TRUE)</text:span></text:p>
      <text:p text:style-name="P173"><text:span text:style-name="T14"><text:tab/>SL : BOOL (asynchroner </text:span><text:span text:style-name="T15">Load</text:span><text:span text:style-name="T14"> Eingang)</text:span></text:p>
      <text:p text:style-name="P73"><draw:frame draw:style-name="fr3" draw:name="Grafik739" text:anchor-type="paragraph" svg:x="1.025cm" svg:y="0.69cm" svg:width="2.9cm" svg:height="3.9cm" draw:z-index="782"><draw:image xlink:href="Pictures/10000000000000DB00000127FAC3C91D.png" xlink:type="simple" xlink:show="embed" xlink:actuate="onLoad"/></draw:frame>Output<text:tab/>STATE : INT (Statusausgang)</text:p>
      <text:p text:style-name="P183"><text:line-break/>CYCLE_4 erzeugt wenn E = TRUE die <text:span text:style-name="T2">States</text:span> 0..3. Die Dauer jedes einzelnen <text:span text:style-name="T2">States</text:span> kann durch die Zeitvorgaben T0..T3 festgelegt werden. Der Eingang SL startet wenn TRUE ab einem vorgegebenen STATE SX. Der Eingang E hat den internen <text:span text:style-name="T2">Default</text:span> TRUE, so dass er auch offen gelassen werden kann. Nach einer Steigenden Flanke an E startet der Baustein immer mit STATE = 0, und wenn E = FALSE bleibt der Ausgang STATE auf 0. Mit dem Eingang S0 wird der Zyklische Modus eingeschaltet, Wenn S0 = FALSE stoppt der Baustein bei <text:span text:style-name="T2">State</text:span> = 3, ist S0 = TRUE so beginnt der Baustein nach <text:span text:style-name="T2">State</text:span> 3 wieder mit <text:span text:style-name="T2">State</text:span> 0.</text:p>
      <text:list xml:id="list38448923" text:continue-numbering="true" text:style-name="L1">
        <text:list-item>
          <text:list>
            <text:list-item>
              <text:h text:style-name="P216" text:outline-level="2"><text:alphabetical-index-mark-start text:id="IMark225902392"/>D_TRIG<text:alphabetical-index-mark-end text:id="IMark225902392"/></text:h>
            </text:list-item>
          </text:list>
        </text:list-item>
      </text:list>
      <text:p text:style-name="P69">Type<text:tab/>Funktionsbaustein</text:p>
      <text:p text:style-name="P66"><text:span text:style-name="T15">Input</text:span><text:span text:style-name="T14"><text:tab/>IN : DWORD (Eingangssignal)</text:span></text:p>
      <text:p text:style-name="P73">Output<text:tab/>Q : BOOL (Ausgangssignal)</text:p>
      <text:p text:style-name="P183"><draw:frame draw:style-name="fr3" draw:name="Grafik312" text:anchor-type="paragraph" svg:x="1.09cm" svg:y="0.649cm" svg:width="2.281cm" svg:height="1.75cm" draw:z-index="271"><draw:image xlink:href="Pictures/10000000000000AC00000084B77EE006.png" xlink:type="simple" xlink:show="embed" xlink:actuate="onLoad"/></draw:frame><text:tab/>X : DWORD (Veränderung des Eingangssignals)</text:p>
      <text:p text:style-name="P2"><text:soft-page-break/><text:line-break/>Der Funktionsbaustein <text:span text:style-name="T11">D</text:span><text:span text:style-name="T11">_</text:span>TRIG erzeugt nach einer Veränderung am Eingang IN einen Ausgangsimpuls für exakt einen SPS Zyklus. Der Baustein funktioniert vergleichbar mit den Standardfunktionsbausteinen R_TRIG und F_TRIG und dem in der OSCAT Bibliothek enthaltenen Baustein B_TRIG. Während B_TRIG, R_TRIG und F_TRIG einen Booleschen Eingang überwachen, triggert der Baustein D_TRIG auf jede Veränderung des DWORD-Eingangs IN. Wenn sich der Eingangswert verändert hat, so wird der Ausgang Q für einen SPS Zyklus auf TRUE gesetzt und der Ausgang X gibt an, um welchen Wert sich der Eingang IN verändert hat. Der Eingang, sowie der Ausgang sind von Typ DWORD. Der Eingang kann auch WORD und BYTE Typen verarbeiten. Beim Ausgang X ist zu beachten, dass DWORD kein Vorzeichen hat und deshalb eine Veränderung um -1 am Eingang nicht -1 sondern die Zahl 2^32-2 ausgibt. Mit der Standardfunktion DWORD_TO_INT kann der Ausgang X in einen Integer umgewandelt werden, welcher dann auch negative Veränderungen richtig darstellt.</text:p>
      <text:p text:style-name="P183"><draw:frame draw:style-name="fr3" draw:name="Grafik313" text:anchor-type="paragraph" svg:x="1.141cm" svg:y="1.141cm" svg:width="14.319cm" svg:height="3.56cm" draw:z-index="272"><draw:image xlink:href="Pictures/100000000000043B0000010D214F5071.png" xlink:type="simple" xlink:show="embed" xlink:actuate="onLoad"/></draw:frame>Das nachfolgende Beispiel zeigt die Anwendung von D_TRIG wenn sich der Eingang vom Wert 5 nach 2 verändert:</text:p>
      <text:p text:style-name="P183"/>
      <text:list xml:id="list38463076" text:continue-numbering="true" text:style-name="L1">
        <text:list-item>
          <text:list>
            <text:list-item>
              <text:h text:style-name="P216" text:outline-level="2"><text:alphabetical-index-mark-start text:id="IMark225902392"/>GEN_BIT<text:alphabetical-index-mark-end text:id="IMark225902392"/></text:h>
            </text:list-item>
          </text:list>
        </text:list-item>
      </text:list>
      <text:p text:style-name="P69">Type<text:tab/>Funktionsbaustein</text:p>
      <text:p text:style-name="P66"><text:span text:style-name="T15">Input</text:span><text:span text:style-name="T14"><text:tab/>IN0 : DWORD (Bitsequenz für Q0)</text:span></text:p>
      <text:p text:style-name="P69"><text:tab/>IN1 : DWORD (Bitsequenz für Q1)</text:p>
      <text:p text:style-name="P69"><text:tab/>IN2 : DWORD (Bitsequenz für Q1)</text:p>
      <text:p text:style-name="P69"><text:tab/>IN3 : DWORD (Bitsequenz für Q1)</text:p>
      <text:p text:style-name="P69"><text:tab/>CLK : BOOL (Clock Eingang)</text:p>
      <text:p text:style-name="P69"><text:tab/>STEPS : INT (Anzahl der zu erzeugenden Takte)</text:p>
      <text:p text:style-name="P69"><text:tab/>REP : INT</text:p>
      <text:p text:style-name="P73"><text:tab/>RST : BOOL</text:p>
      <text:p text:style-name="P73"><text:soft-page-break/>Output<text:tab/>Q0 : BOOL (Bitsequenz Q0)</text:p>
      <text:p text:style-name="P73"><text:tab/>Q1 : BOOL (Bitsequenz Q1)</text:p>
      <text:p text:style-name="P73"><text:tab/>Q2 : BOOL (Bitsequenz Q2)</text:p>
      <text:p text:style-name="P73"><text:tab/>Q3 : BOOL (Bitsequenz Q3)</text:p>
      <text:p text:style-name="P73"><text:tab/>CNT : INT (Anzahl der bereits erzeugten Ausgangsbits)</text:p>
      <text:p text:style-name="P73"><draw:frame draw:style-name="fr3" draw:name="Grafik96" text:anchor-type="paragraph" svg:x="1.159cm" svg:y="0.656cm" svg:width="2.731cm" svg:height="4.44cm" draw:z-index="58"><draw:image xlink:href="Pictures/10000000000000CE00000150FC776D7A.png" xlink:type="simple" xlink:show="embed" xlink:actuate="onLoad"/></draw:frame><text:tab/>RUN : BOOL (TRUE, wenn der Sequenzer läuft)</text:p>
      <text:p text:style-name="P73"><text:line-break/>GEN_BIT ist ein frei programmierbarer Bitmustergenerator. An den Eingängen in0 .. in7 liegen die Bitmuster jeweils als DWORD an und werden durch den Eingang CLK je Taktimpuls beginnend von Bit 0 an aufsteigend an die Ausgänge Q0 .. Q3 geschoben. Nach dem ersten Taktimpuls am Eingang CLK liegt am Ausgang Q0 Bit 0 von IN0, an Q1 liegt Bit 0 von In1 ... an Q7 liegt Bit 0 von IN3. Nach dem nächsten Taktimpuls am CLK Eingang wird jeweils das Bit 1 der Eingänge IN an die Ausgänge Q geschoben und so weiter, bis die Sequenz beendet ist. Der Eingang STEPS legt fest, wie viele Bits der Eingangs-DWORDS an die Ausgänge geschoben werden. Der Eingang REP legt fest, wie oft diese Sequenz wiederholt wird. Wird der Eingang <text:s/>auf 0 gesetzt, so wird die Sequenz fortlaufend wiederholt. Ein asynchroner Reset kann jederzeit den Sequenzer zurücksetzen. Die Ausgänge RUN und CNT zeigen an, welches Bit gerade am Ausgang anliegt und ob der Sequenzer läuft, oder die Sequenz (RUN inaktiv) beendet ist. Nachdem die Sequenzen abgelaufen sind bleibt das letzte Bitmuster an den Ausgängen vorhanden, bis ein Reset den Generator neu startet.</text:p>
      <text:p text:style-name="P73"><draw:frame draw:style-name="fr3" draw:name="Grafik101" text:anchor-type="paragraph" svg:x="0.975cm" svg:y="0.813cm" svg:width="15.998cm" svg:height="3.226cm" draw:z-index="60"><draw:image xlink:href="Pictures/1000000000000341000000A857DFB588.png" xlink:type="simple" xlink:show="embed" xlink:actuate="onLoad"/></draw:frame>Beispiel:</text:p>
      <text:p text:style-name="P73"/>
      <text:p text:style-name="P66"><text:span text:style-name="T21">In diesem Beispiel werden die untersten 8 Bits (Bit 0 .. 7 ) an den Eingängen IN auf die Ausgänge Q geschoben. Die Sequenz beginnt jeweils bei Bit 0 </text:span><text:soft-page-break/><text:span text:style-name="T21">und </text:span><text:span text:style-name="T21">endet bei Bit 7 (8 </text:span><text:span text:style-name="T16">Steps</text:span><text:span text:style-name="T21"> sind durch den Eingang 8 definiert). Diese Sequenz wird 2 mal (2 Wiederholungen am Eingang REP) wiederholt und dann gestoppt.</text:span></text:p>
      <text:p text:style-name="P73"><draw:frame draw:style-name="fr3" draw:name="Grafik102" text:anchor-type="paragraph" svg:x="0.857cm" svg:y="0.252cm" svg:width="15.998cm" svg:height="7.13cm" draw:z-index="61"><draw:image xlink:href="Pictures/1000000000000452000001EDF45A922B.png" xlink:type="simple" xlink:show="embed" xlink:actuate="onLoad"/></draw:frame></text:p>
      <text:p text:style-name="P66"><text:span text:style-name="T21">Die </text:span><text:span text:style-name="T16">Trace</text:span><text:span text:style-name="T21"> Aufzeichnung zeigt das inaktiv werdende Reset Signal (Grün), welches den Generator startet und nach dem ersten Taktimpuls Bit 0 an die Ausgänge schiebt.</text:span></text:p>
      <text:list xml:id="list38459731" text:continue-numbering="true" text:style-name="L1">
        <text:list-item>
          <text:list>
            <text:list-item>
              <text:h text:style-name="P216" text:outline-level="2"><text:alphabetical-index-mark-start text:id="IMark225902392"/>GEN_SQ<text:alphabetical-index-mark-end text:id="IMark225902392"/></text:h>
            </text:list-item>
          </text:list>
        </text:list-item>
      </text:list>
      <text:p text:style-name="P69">Type<text:tab/>Funktionsbaustein</text:p>
      <text:p text:style-name="P66"><text:span text:style-name="T15">Input</text:span><text:span text:style-name="T14"><text:tab/>PT : TIME (Periodendauer)</text:span></text:p>
      <text:p text:style-name="P73"><draw:frame draw:style-name="fr3" draw:name="Grafik97" text:anchor-type="paragraph" svg:x="1.051cm" svg:y="0.633cm" svg:width="2.281cm" svg:height="1.3cm" draw:z-index="59"><draw:image xlink:href="Pictures/10000000000000AC00000062C1945279.png" xlink:type="simple" xlink:show="embed" xlink:actuate="onLoad"/></draw:frame>Output<text:tab/>Q : BOOL (Ausgangssignal)</text:p>
      <text:p text:style-name="P73"><text:line-break/>Gen_SQ ist ein Rechteckgenerator mit programmierbarer Periodendauer und einem festen Tastverhältnis von 50%. Der Eingang PT legt die Periodendauer fest und am Ausgang Q steht das Ausgangssignal zur Verfügung.</text:p>
      <text:p text:style-name="P183"><draw:g text:anchor-type="paragraph" draw:z-index="62" draw:style-name="gr1"><draw:g draw:style-name="gr8"><draw:line draw:style-name="gr2" draw:text-style-name="P257" svg:x1="1.695cm" svg:y1="1.54cm" svg:x2="2.196cm" svg:y2="1.54cm"><text:p/></draw:line><draw:line draw:style-name="gr2" draw:text-style-name="P257" svg:x1="2.196cm" svg:y1="1.039cm" svg:x2="2.196cm" svg:y2="1.54cm"><text:p/></draw:line><draw:line draw:style-name="gr2" draw:text-style-name="P257" svg:x1="2.196cm" svg:y1="1.039cm" svg:x2="3.196cm" svg:y2="1.039cm"><text:p/></draw:line><draw:line draw:style-name="gr2" draw:text-style-name="P257" svg:x1="3.196cm" svg:y1="1.54cm" svg:x2="3.196cm" svg:y2="1.039cm"><text:p/></draw:line><draw:line draw:style-name="gr2" draw:text-style-name="P257" svg:x1="3.196cm" svg:y1="1.54cm" svg:x2="4.196cm" svg:y2="1.54cm"><text:p/></draw:line><draw:line draw:style-name="gr2" draw:text-style-name="P257" svg:x1="4.198cm" svg:y1="1.039cm" svg:x2="4.198cm" svg:y2="1.54cm"><text:p/></draw:line><draw:line draw:style-name="gr2" draw:text-style-name="P257" svg:x1="4.198cm" svg:y1="1.039cm" svg:x2="5.196cm" svg:y2="1.039cm"><text:p/></draw:line><draw:line draw:style-name="gr2" draw:text-style-name="P257" svg:x1="5.193cm" svg:y1="1.54cm" svg:x2="5.193cm" svg:y2="1.039cm"><text:p/></draw:line><draw:line draw:style-name="gr2" draw:text-style-name="P257" svg:x1="5.193cm" svg:y1="1.54cm" svg:x2="6.193cm" svg:y2="1.54cm"><text:p/></draw:line><draw:line draw:style-name="gr2" draw:text-style-name="P257" svg:x1="6.193cm" svg:y1="1.039cm" svg:x2="6.193cm" svg:y2="1.54cm"><text:p/></draw:line><draw:line draw:style-name="gr2" draw:text-style-name="P257" svg:x1="6.193cm" svg:y1="1.039cm" svg:x2="7.193cm" svg:y2="1.039cm"><text:p/></draw:line><draw:line draw:style-name="gr2" draw:text-style-name="P257" svg:x1="7.193cm" svg:y1="1.54cm" svg:x2="7.193cm" svg:y2="1.039cm"><text:p/></draw:line><draw:line draw:style-name="gr2" draw:text-style-name="P257" svg:x1="7.193cm" svg:y1="1.54cm" svg:x2="7.944cm" svg:y2="1.54cm"><text:p/></draw:line><draw:line draw:style-name="gr7" draw:text-style-name="P257" svg:x1="3.196cm" svg:y1="0.538cm" svg:x2="3.946cm" svg:y2="0.538cm"><text:p/></draw:line><draw:frame draw:style-name="gr9" draw:text-style-name="P260" svg:width="0.997cm" svg:height="0.749cm" svg:x="3.777cm" svg:y="0.288cm"><draw:text-box><text:p text:style-name="P258"><text:span text:style-name="T33">PT</text:span></text:p></draw:text-box></draw:frame><draw:line draw:style-name="gr7" draw:text-style-name="P257" svg:x1="5.195cm" svg:y1="0.538cm" svg:x2="4.445cm" svg:y2="0.538cm"><text:p/></draw:line></draw:g><draw:frame draw:style-name="gr6" draw:text-style-name="P259" svg:width="0.75cm" svg:height="0.65cm" svg:x="0.944cm" svg:y="1.038cm"><draw:text-box><text:p text:style-name="P258"><text:span text:style-name="T32">Q</text:span></text:p></draw:text-box></draw:frame></draw:g></text:p>
      <text:list xml:id="list38470245" text:continue-numbering="true" text:style-name="L1">
        <text:list-item>
          <text:list>
            <text:list-item>
              <text:h text:style-name="P216" text:outline-level="2"><text:soft-page-break/><text:alphabetical-index-mark-start text:id="IMark225902392"/><text:alphabetical-index-mark-start text:id="IMark133627236"/>SCHEDULER<text:alphabetical-index-mark-end text:id="IMark133627236"/><text:alphabetical-index-mark-end text:id="IMark225902392"/></text:h>
            </text:list-item>
          </text:list>
        </text:list-item>
      </text:list>
      <text:p text:style-name="P69">Type<text:tab/>Funktionsbaustein</text:p>
      <text:p text:style-name="P66"><text:span text:style-name="T15">Input</text:span><text:span text:style-name="T14"><text:tab/>E0..3 : BOOL (Freigabesignale für Q0..3)</text:span></text:p>
      <text:p text:style-name="P179">Setup<text:tab/>T0..3 : TIME (Zykluszeit)</text:p>
      <text:p text:style-name="P179"><draw:frame draw:style-name="fr3" draw:name="Grafik692" text:anchor-type="paragraph" svg:x="1.048cm" svg:y="0.681cm" svg:width="3.18cm" svg:height="2.649cm" draw:z-index="690"><draw:image xlink:href="Pictures/10000000000000F0000000C8E80E7EE5.png" xlink:type="simple" xlink:show="embed" xlink:actuate="onLoad"/></draw:frame>Output<text:tab/>Q0..3 : BOOL (Ausgangssignale)</text:p>
      <text:p text:style-name="P179"><text:line-break/>SCHEDULER wird benutzt um Programmteile Zeitabhängig aufzurufen. Z.B. können aufwendige Berechnungen die nur selten gebraucht werden in bestimmten Zeitabständen aufgerufen werden. Die Ausgänge Q? Des Bausteins werden jeweils nur für einen Zyklus aktiv und schalten dadurch die Abarbeitung des entsprechenden Programmteils frei. Die Setup Zeiten T? Legen fest in welchen Zeitabständen die Ausgänge aktiviert werden. SCHEDULER prüft je CPU Zyklus nur einen Ausgang, so dass maximal ein Ausgang je Zyklus aktiv sein kann. Im Extremfall wenn alle Aufrufzeiten T? T#0s sind wird in jedem Zyklus jeweils ein Ausgang gesetzt sein, so dass erst Q0, dann Q1 usw. bis Q3 gesetzt sind um dann wieder mit Q0 zu beginnen. Die Aufrufzeiten können deshalb um bis zu 3 CPU Zyklen vom vorgegebenen Wert T? Abweichen. </text:p>
      <text:p text:style-name="P179"/>
      <text:p text:style-name="P179"/>
      <text:list xml:id="list38461493" text:continue-numbering="true" text:style-name="L1">
        <text:list-item>
          <text:list>
            <text:list-item>
              <text:h text:style-name="P216" text:outline-level="2"><text:alphabetical-index-mark-start text:id="IMark225902392"/><text:alphabetical-index-mark-start text:id="IMark229388072"/>SCHEDULER_2<text:alphabetical-index-mark-end text:id="IMark229388072"/><text:alphabetical-index-mark-end text:id="IMark225902392"/></text:h>
            </text:list-item>
          </text:list>
        </text:list-item>
      </text:list>
      <text:p text:style-name="P69">Type<text:tab/>Funktionsbaustein</text:p>
      <text:p text:style-name="P66"><text:span text:style-name="T15">Input</text:span><text:span text:style-name="T14"><text:tab/>E0..3 : BOOL (Freigabesignale für Q0..3)</text:span></text:p>
      <text:p text:style-name="P179">Setup<text:tab/>C0..3 : UINT (Der Ausgang Q? Wird alle C? Zyklen aktiviert)</text:p>
      <text:p text:style-name="P179"><text:tab/>O0..3 : UINT (Verzögerung für die Ausgänge)</text:p>
      <text:p text:style-name="P179"><draw:frame draw:style-name="fr3" draw:name="Grafik693" text:anchor-type="paragraph" svg:x="1.023cm" svg:y="0.699cm" svg:width="3.62cm" svg:height="2.649cm" draw:z-index="691"><draw:image xlink:href="Pictures/1000000000000112000000C820785077.png" xlink:type="simple" xlink:show="embed" xlink:actuate="onLoad"/></draw:frame>Output<text:tab/>Q0..3 : BOOL (Ausgangssignale)</text:p>
      <text:p text:style-name="P179"><text:soft-page-break/><text:line-break/>SCHEDULER_2 aktiviert abhängig von den Setup Variablen C? Und O? Die Ausgänge Q?. SCHEDULER_2 kann einen Ausgang Q? Alle C? Zyklen aktivieren um damit Programmteile mit verschiedenen Zykluszeiten zu starten. Ein optionaler Setup Parameter O? Dient dazu einen Zeitversatz von O? Zyklen für den entsprechenden Ausgang zu definieren um ein gleichzeitiges aktivieren der Ausgänge im ersten Zyklus zu verhindern.</text:p>
      <text:list xml:id="list38462260" text:continue-numbering="true" text:style-name="L1">
        <text:list-item>
          <text:list>
            <text:list-item>
              <text:h text:style-name="P216" text:outline-level="2"><text:alphabetical-index-mark-start text:id="IMark225902392"/><text:alphabetical-index-mark-start text:id="IMark229386152"/>SEQUENCE_4<text:alphabetical-index-mark-end text:id="IMark229386152"/><text:alphabetical-index-mark-end text:id="IMark225902392"/></text:h>
            </text:list-item>
          </text:list>
        </text:list-item>
      </text:list>
      <text:p text:style-name="P69">Type<text:tab/>Funktionsbaustein</text:p>
      <text:p text:style-name="P66"><text:span text:style-name="T15">Input</text:span><text:span text:style-name="T14"><text:tab/>IN0..3 : BOOL (Freigabesignal für Q0..3)</text:span></text:p>
      <text:p text:style-name="P66"><text:span text:style-name="T14"><text:tab/></text:span><text:span text:style-name="T21">START : BOOL (Startflanke für den Sequenzer)</text:span></text:p>
      <text:p text:style-name="P73"><text:tab/>RST : BOOL (Asynchroner Reset-Eingang)</text:p>
      <text:p text:style-name="P73"><text:tab/>WAIT 0..3 : TIME (Wartezeit für das Eingangssignal an IN 0..3)</text:p>
      <text:p text:style-name="P73"><text:tab/>DELAY 0..3 : TIME (Verzögerungszeit bis das Eingangssignal <text:tab/>IN0..3 <text:tab/>geprüft wird)</text:p>
      <text:p text:style-name="P73">Output<text:tab/>Q 0..3 : BOOL (Steuerausgänge)</text:p>
      <text:p text:style-name="P73"><text:tab/>ANY : BOOL (ANY ist TRUE, wenn einer der Ausgänge Q0 .. Q3 <text:s text:c="3"/><text:tab/>aktiv ist)</text:p>
      <text:p text:style-name="P73"><text:tab/>RUN : BOOL (RUN ist TRUE, wenn der Sequenzer läuft)</text:p>
      <text:p text:style-name="P73"><text:tab/>STEP : INT (gibt den momentanen Schritt an)</text:p>
      <text:p text:style-name="P73"><draw:frame draw:style-name="fr3" draw:name="Grafik98" text:anchor-type="paragraph" svg:x="1.355cm" svg:y="1.035cm" svg:width="3.18cm" svg:height="7.14cm" draw:z-index="183"><draw:image xlink:href="Pictures/10000000000000F00000021C564077D4.png" xlink:type="simple" xlink:show="embed" xlink:actuate="onLoad"/></draw:frame><text:tab/>STATUS : BYTE (zu ESR kompatibler Status-Ausgang)</text:p>
      <text:p text:style-name="P66"><text:soft-page-break/><text:span text:style-name="T21"><text:line-break/>SEQUENCE_4 ist ein 4 Bit Sequenzer mit Steuereingängen. Nach einer steigenden Flanke an START wird RUN TRUE und der Sequenzer wartet die Zeit Wait0 auf ein TRUE-Signal am Eingang IN0. Nachdem das Signal am IN0 TRUE ist, wird der Ausgang Q0 gesetzt und die Zeit Delay0 abgewartet. Nach Ablauf der Zeit Delay0 wird im nächsten Zyklus für die Zeit wait1 auf ein Eingangssignal an in1 gewartet und Q0 bleibt solange TRUE, bis Q1 gesetzt wird. Das ganze wird solange wiederholt, bis alle 4 Zyklen abgelaufen sind. Falls während den Wartezeiten wait0..3 der entsprechende Eingang nicht TRUE wird, wird ein Fehler gesetzt, indem die entsprechende </text:span><text:span text:style-name="T16">Error-</text:span><text:span text:style-name="T21">Nummer am Ausgang STATUS angezeigt wird und abhängig von der Config-Variable STOP_ON_ERROR wird der Sequenzer angehalten oder nicht. Der STATUS-Ausgang ist 110 für warten auf Startsignal und 111 wenn die Sequenz durchlaufen wird und zeigt mit 1 .. 4 Fehler an. Ein </text:span><text:span text:style-name="T16">Error</text:span><text:span text:style-name="T21"> = 1 bedeutet, dass das Signal am Eingang in0 nicht aktiv wurde eine 2 entspricht in1 usw.<text:line-break/>Die Ausgänge RUN und STEP zeigen an, ob der Sequenzer läuft und in welchem Zyklus er sich gerade befindet. Der Ausgang ANY ist TRUE, wenn einer der Ausgänge Q0..Q3 TRUE ist.</text:span></text:p>
      <text:p text:style-name="P183">Ein asynchroner Reset-Eingang kann den Sequenzer jederzeit zurücksetzen. Dieser Reset-Eingang kann auch mit einem der Ausgänge Q0..Q3 beschaltet werden um den Sequenzer vor dem vollen Ablauf zu stoppen. Der Sequenzer kann auch jederzeit mit einer steigenden Flanke am Eingang START wieder von neuem gestartet werden. Das gilt auch, wenn er eine Sequenz noch nicht beendet hat.</text:p>
      <text:p text:style-name="P183">Sollte eine Flankenprüfung an einem oder mehreren Eingängen IN nicht nötig sein, so können sie einfach offen gelassen werden, denn der Vorgabe-Wert für diese Eingänge ist TRUE.</text:p>
      <text:p text:style-name="P183">Der Ausgang Status ist ESR kompatibel und zeigt durch einen Wert 1- 4 <text:s/>an, dass ein Fehler aufgetreten ist. Ein Fehler tritt dann auf, wenn das entspre<text:soft-page-break/>chende Eingangssignal an IN nicht während der entsprechenden Wartezeit auftritt.</text:p>
      <text:p text:style-name="P173"><text:span text:style-name="T16">Error</text:span><text:span text:style-name="T21"> = 1 bedeutet, dass in0 nicht innerhalb der Wartezeit aktiv geworden ist. </text:span><text:span text:style-name="T16">Error</text:span><text:span text:style-name="T21"> 2 .. 4 entspricht den Eingängen 1 .. 3.</text:span></text:p>
      <text:p text:style-name="P183">Ein Statuswert von 110 bedeutet Wartestellung und 111 bedeutet, dass gerade eine Sequenz durchlaufen wird.</text:p>
      <text:p text:style-name="P73">Beispiel:</text:p>
      <text:p text:style-name="P2">Im Folgenden <text:span text:style-name="T11">Beispiel</text:span> <text:span text:style-name="T11">wird</text:span> mit einer steigenden Flanke an Start der Sequenzer gestartet. Gleichzeitig wird ein Puls-Generator TP mit 2 Sekunden gestartet und damit das Startsignal mit 2 Sekunden Verzögerung auf den Eingang IN0 gelegt. Der Sequenzer setzt unmittelbar nach dem Startimpuls das Ausgangssignal RUN und wartet dann für maximal 5 Sekunden auf ein Signal an IN0. Mit der steigenden Flanke an IN0, dass nach 2 Sekunden von TP generiert wird, wird Q0 gesetzt und ein Delay von 1 Sekunde abgewartet. Damit ist der erste Schritt beendet und die restlichen Schritte werden ohne auf ein Eingangssignal an in1..3 zu warten ausgeführt. Die Vorgabewerte für die Eingänge IN sind TRUE, wenn sie unbeschaltet sind.</text:p>
      <text:p text:style-name="P73"><draw:frame draw:style-name="fr3" draw:name="Grafik99" text:anchor-type="paragraph" svg:x="1.833cm" svg:y="0.579cm" svg:width="13.42cm" svg:height="7.14cm" draw:z-index="65"><draw:image xlink:href="Pictures/10000000000003F70000021C685D3F7C.png" xlink:type="simple" xlink:show="embed" xlink:actuate="onLoad"/></draw:frame></text:p>
      <text:p text:style-name="P73"><draw:frame draw:style-name="fr3" draw:name="Grafik104" text:anchor-type="paragraph" svg:x="0.841cm" svg:y="0.148cm" svg:width="16cm" svg:height="7.221cm" draw:z-index="64"><draw:image xlink:href="Pictures/1000000000000456000001F5E08E162B.png" xlink:type="simple" xlink:show="embed" xlink:actuate="onLoad"/></draw:frame></text:p>
      <text:p text:style-name="P73"><text:soft-page-break/>Die Traceaufzeichnung zeigt das Startsignal (Grün) und das Signal RUN (Rot). Nach 2 Sekunden wird die steigende Flanke am Eingang auf in0 und danach auf die Ausgangssignale Q0..3 und ANY gelegt.</text:p>
      <text:p text:style-name="P73">Das Signal ANY (Blau) ist dann aktiv, wenn eines der Ausgangssignale aktiv ist und das Signal RUN (Rot) ist vom Start bis zum Ende aktiv.</text:p>
      <text:list xml:id="list38457475" text:continue-numbering="true" text:style-name="L1">
        <text:list-item>
          <text:list>
            <text:list-item>
              <text:h text:style-name="P216" text:outline-level="2"><text:alphabetical-index-mark-start text:id="IMark225902392"/><text:alphabetical-index-mark-start text:id="IMark229384712"/>SEQUENCE_64<text:alphabetical-index-mark-end text:id="IMark229384712"/><text:alphabetical-index-mark-end text:id="IMark225902392"/></text:h>
            </text:list-item>
          </text:list>
        </text:list-item>
      </text:list>
      <text:p text:style-name="P69">Type<text:tab/>Funktionsbaustein</text:p>
      <text:p text:style-name="P66"><text:span text:style-name="T15">Input</text:span><text:span text:style-name="T14"><text:tab/>START : BOOL (steigende Flanke startet die Sequenz)</text:span></text:p>
      <text:p text:style-name="P66"><text:span text:style-name="T14"><text:tab/></text:span><text:span text:style-name="T21">SMAX : INT (letzter </text:span><text:span text:style-name="T16">State</text:span><text:span text:style-name="T21"> der Sequenz)</text:span></text:p>
      <text:p text:style-name="P173"><text:span text:style-name="T21"><text:tab/>PROG : ARRAY[0..63] OF TIME (Zeitdauer der einzelnen </text:span><text:span text:style-name="T16">States</text:span><text:span text:style-name="T21">)</text:span></text:p>
      <text:p text:style-name="P73"><text:tab/>RST : BOOL (Asynchroner Reset-Eingang)<text:tab/></text:p>
      <text:p text:style-name="P173"><text:span text:style-name="T21">Output<text:tab/>STATE : INT (</text:span><text:span text:style-name="T16">State</text:span><text:span text:style-name="T21"> Ausgang)</text:span></text:p>
      <text:p text:style-name="P183"><draw:frame draw:style-name="fr3" draw:name="Grafik662" text:anchor-type="paragraph" svg:x="1.046cm" svg:y="0.656cm" svg:width="2.9cm" svg:height="2.29cm" draw:z-index="651"><draw:image xlink:href="Pictures/10000000000000DB000000ADD9AF3A60.png" xlink:type="simple" xlink:show="embed" xlink:actuate="onLoad"/></draw:frame><text:tab/>TRIG : BOOL (Zeigt Zustandsveränderungen mit TRUE an)</text:p>
      <text:p text:style-name="P173"><text:span text:style-name="T21"><text:line-break/>SEQUENCE_64 erzeugt eine Zeitsequenz von bis zu 64 Zuständen. Im Ruhezustand steht der Ausgang STATE auf -1 und zeigt damit an das der Bau</text:span><text:span text:style-name="T21">stein nicht aktiv ist. Eine steigende Flanke an START startet die Sequenz </text:span><text:soft-page-break/><text:span text:style-name="T21">und der Ausgang STATE schaltet auf 0. nach Ablauf der Wartezeit PROG[0] </text:span><text:span text:style-name="T21">schaltet der Baustein weiter auf STATE = 1, Wartet die Zeit PROG[1] ab, </text:span><text:span text:style-name="T21">schaltet auf STATE = 2, usw... bis der Ausgang STATE den Wert von SMAX erreicht hat. Nach Ablauf der Wartezeit PROG[SMAX] geht der Baustein wieder in den Ruhezustand (STATE = -1). Einen Wechsel auf einen neuen Zustand von STATE signalisiert der Ausgang TRIG mit einem TRUE für einen SPS Zyklus. Mit TRIG können bequem nachgeschaltet Bausteine gesteuert werden. Mit dem Eingang RST kann der Baustein jederzeit auch während des Ablaufs einer Sequenz in den Ausgangszustand zurückgesetzt werden.</text:span></text:p>
      <text:p text:style-name="P183"><draw:frame draw:style-name="fr3" draw:name="Grafik663" text:anchor-type="paragraph" svg:x="1.046cm" svg:y="0.69cm" svg:width="13.307cm" svg:height="2.672cm" draw:z-index="652"><draw:image xlink:href="Pictures/10000000000001F70000006505569080.png" xlink:type="simple" xlink:show="embed" xlink:actuate="onLoad"/></draw:frame>Signalverlauf von SEQUENCE_64:</text:p>
      <text:p text:style-name="P183"/>
      <text:list xml:id="list38470891" text:continue-numbering="true" text:style-name="L1">
        <text:list-item>
          <text:list>
            <text:list-item>
              <text:h text:style-name="P216" text:outline-level="2"><text:alphabetical-index-mark-start text:id="IMark225902392"/>SEQUENCE_8<text:alphabetical-index-mark-end text:id="IMark225902392"/></text:h>
            </text:list-item>
          </text:list>
        </text:list-item>
      </text:list>
      <text:p text:style-name="P69">Type<text:tab/>Funktionsbaustein</text:p>
      <text:p text:style-name="P66"><text:span text:style-name="T15">Input</text:span><text:span text:style-name="T14"><text:tab/>IN0..7 : BOOL (Freigabesignal für Q0..7)</text:span></text:p>
      <text:p text:style-name="P66"><text:span text:style-name="T14"><text:tab/></text:span><text:span text:style-name="T21">START : BOOL (Startflanke für den Sequenzer)</text:span></text:p>
      <text:p text:style-name="P73"><text:tab/>RST : BOOL (Asynchroner Reset Eingang)</text:p>
      <text:p text:style-name="P73"><text:tab/>WAIT 0..7 : TIME (Wartezeit für das Eingangssignal an IN 0..7)</text:p>
      <text:p text:style-name="P73"><text:tab/>DELAY 0..7 : TIME (Verzögerungszeit, bis das Eingangssignal <text:tab/>IN0..7 geprüft wird)</text:p>
      <text:p text:style-name="P73">Output<text:tab/>Q 0..7 : BOOL (Steuerausgänge)</text:p>
      <text:p text:style-name="P73"><text:tab/>ANY : BOOL (Der Ausgang ANY ist TRUE, wenn einer der <text:s text:c="14"/><text:tab/>Ausgänge <text:tab/>Q0 .. Q7 aktiv ist)</text:p>
      <text:p text:style-name="P73"><text:tab/>RUN : BOOL (RUN ist TRUE, wenn der Sequenzer läuft)</text:p>
      <text:p text:style-name="P73"><text:tab/>STEP : INT (gibt den momentanen Schritt an)</text:p>
      <text:p text:style-name="P73"><draw:frame draw:style-name="fr10" draw:name="Grafik105" text:anchor-type="paragraph" svg:x="1.245cm" svg:y="0.753cm" svg:width="3.18cm" svg:height="12.539cm" draw:z-index="184"><draw:image xlink:href="Pictures/10000000000000F0000003B453F54230.png" xlink:type="simple" xlink:show="embed" xlink:actuate="onLoad"/></draw:frame><text:tab/>STATUS : BYTE (0 wenn kein Fehler vorliegt, sonst &gt; 0)</text:p>
      <text:p text:style-name="P73"><text:soft-page-break/><text:line-break/>Eine Funktionsbeschreibung von SEQUENCE_8 ist unter SEQUENCE_4 zu finden. SEQUENCE_8 ist Funktionsidentisch mit SEQUENCE_4. Er hat 8 anstelle von 4 Kanälen. <text:s/>SEQUENCE_8 findet Anwendung in der OSCAT Bibliothek im Modul LEGIONELLA.</text:p>
      <text:list xml:id="list38475905" text:continue-numbering="true" text:style-name="L1">
        <text:list-item>
          <text:list>
            <text:list-item>
              <text:h text:style-name="P216" text:outline-level="2"><text:alphabetical-index-mark-start text:id="IMark225902392"/>TMAX<text:alphabetical-index-mark-end text:id="IMark225902392"/></text:h>
            </text:list-item>
          </text:list>
        </text:list-item>
      </text:list>
      <text:p text:style-name="P69">Type<text:tab/>Funktionsbaustein</text:p>
      <text:p text:style-name="P66"><text:span text:style-name="T15">Input</text:span><text:span text:style-name="T14"><text:tab/>IN : BOOL (Eingangssignal)</text:span></text:p>
      <text:p text:style-name="P73"><text:tab/>PT : TIME (Ausschaltverzögerung)<text:tab/></text:p>
      <text:p text:style-name="P183">Output<text:tab/>Q : BOOL (Ausgangssignal)</text:p>
      <text:p text:style-name="P173"><draw:frame draw:style-name="fr3" draw:name="Grafik676" text:anchor-type="paragraph" svg:x="1.046cm" svg:y="0.676cm" svg:width="1.709cm" svg:height="1.52cm" draw:z-index="670"><draw:image xlink:href="Pictures/100000000000008100000073A449C45B.png" xlink:type="simple" xlink:show="embed" xlink:actuate="onLoad"/></draw:frame><text:span text:style-name="T21"><text:tab/>Z : BOOL (</text:span><text:span text:style-name="T16">Trigger</text:span><text:span text:style-name="T21"> Ausgang)</text:span></text:p>
      <text:p text:style-name="P183"><text:soft-page-break/><text:line-break/>TMAX begrenzt die Dauer des Ausgangsimpulses auf die Zeit PT. Der Ausgang Q folgt dem Eingang IN, solange die TRUE Zeit von IN kürzer als PT ist. Ist IN länger als PT auf TRUE so wird der Ausgangsimpuls verkürzt. Immer dann wenn ein Ausgang durch eine Zeitüberschreitung auf FALSE geht wird der Ausgang Z für einen Zyklus auf TRUE gesetzt.</text:p>
      <text:p text:style-name="P183"><draw:frame draw:style-name="fr3" draw:name="Grafik677" text:anchor-type="paragraph" svg:x="1.09cm" svg:y="0.012cm" svg:width="12.12cm" svg:height="4.521cm" draw:z-index="671"><draw:image xlink:href="Pictures/100000000000039400000156EDE2F335.png" xlink:type="simple" xlink:show="embed" xlink:actuate="onLoad"/></draw:frame></text:p>
      <text:list xml:id="list38444486" text:continue-numbering="true" text:style-name="L1">
        <text:list-item>
          <text:list>
            <text:list-item>
              <text:h text:style-name="P216" text:outline-level="2"><text:alphabetical-index-mark-start text:id="IMark225902392"/>TMIN<text:alphabetical-index-mark-end text:id="IMark225902392"/></text:h>
            </text:list-item>
          </text:list>
        </text:list-item>
      </text:list>
      <text:p text:style-name="P69">Type<text:tab/>Funktionsbaustein</text:p>
      <text:p text:style-name="P66"><text:span text:style-name="T15">Input</text:span><text:span text:style-name="T14"><text:tab/>IN : BOOL (Eingangssignal)</text:span></text:p>
      <text:p text:style-name="P73"><text:tab/>PT : TIME (Ausschaltverzögerung)<text:tab/></text:p>
      <text:p text:style-name="P183"><draw:frame draw:style-name="fr3" draw:name="Grafik679" text:anchor-type="paragraph" svg:x="1.067cm" svg:y="0.683cm" svg:width="1.709cm" svg:height="1.52cm" draw:z-index="673"><draw:image xlink:href="Pictures/100000000000008100000073AF750BE2.png" xlink:type="simple" xlink:show="embed" xlink:actuate="onLoad"/></draw:frame>Output<text:tab/>Q : BOOL (Ausgangssignal)</text:p>
      <text:p text:style-name="P183"><text:line-break/>TMIN stellt sicher das der Ausgangsimpuls Q mindestens PT auf TRUE bleibt, auch wenn der Eingangsimpuls an IN kürzer als PT ist. ansonsten folgt der Ausgang Q dem Eingang IN.</text:p>
      <text:p text:style-name="P183"><draw:frame draw:style-name="fr3" draw:name="Grafik680" text:anchor-type="paragraph" svg:x="1.09cm" svg:y="0.012cm" svg:width="9.601cm" svg:height="3.29cm" draw:z-index="674"><draw:image xlink:href="Pictures/10000000000002D6000000F92D745B9A.png" xlink:type="simple" xlink:show="embed" xlink:actuate="onLoad"/></draw:frame></text:p>
      <text:p text:style-name="P183"><text:soft-page-break/></text:p>
      <text:list xml:id="list38475912" text:continue-numbering="true" text:style-name="L1">
        <text:list-item>
          <text:list>
            <text:list-item>
              <text:h text:style-name="P216" text:outline-level="2"><text:alphabetical-index-mark-start text:id="IMark225902392"/>TOF_1<text:alphabetical-index-mark-end text:id="IMark225902392"/></text:h>
            </text:list-item>
          </text:list>
        </text:list-item>
      </text:list>
      <text:p text:style-name="P69">Type<text:tab/>Funktionsbaustein</text:p>
      <text:p text:style-name="P66"><text:span text:style-name="T15">Input</text:span><text:span text:style-name="T14"><text:tab/>IN : BOOL (Eingangssignal)</text:span></text:p>
      <text:p text:style-name="P73"><text:tab/>PT : TIME (Ausschaltverzögerung)</text:p>
      <text:p text:style-name="P183"><text:tab/>RST : BOOL (asynchroner Reset)</text:p>
      <text:p text:style-name="P183"><draw:frame draw:style-name="fr3" draw:name="Grafik674" text:anchor-type="paragraph" svg:x="1.046cm" svg:y="0.667cm" svg:width="2.101cm" svg:height="1.921cm" draw:z-index="666"><draw:image xlink:href="Pictures/100000000000009F00000091B4E53245.png" xlink:type="simple" xlink:show="embed" xlink:actuate="onLoad"/></draw:frame>Output<text:tab/>Q : BOOL (Ausgangssignal)</text:p>
      <text:p text:style-name="P183"><text:line-break/>TOF_1 verlängert einen Eingangsimpuls an IN um die Zeit PT. TOF_1 hat die gleiche Funktionalität wie TOF aus der Standard LIB, jedoch mit einem zusätzlichen asynchronen Reset Eingang.</text:p>
      <text:p text:style-name="P183"><draw:frame draw:style-name="fr3" draw:name="Grafik678" text:anchor-type="paragraph" svg:x="1.067cm" svg:y="0.012cm" svg:width="12.37cm" svg:height="5.001cm" draw:z-index="672"><draw:image xlink:href="Pictures/10000000000003A70000017AF0F3EB7A.png" xlink:type="simple" xlink:show="embed" xlink:actuate="onLoad"/></draw:frame></text:p>
      <text:list xml:id="list38464158" text:continue-numbering="true" text:style-name="L1">
        <text:list-item>
          <text:list>
            <text:list-item>
              <text:h text:style-name="P216" text:outline-level="2"><text:soft-page-break/><text:alphabetical-index-mark-start text:id="IMark225902392"/>TONOF<text:alphabetical-index-mark-end text:id="IMark225902392"/></text:h>
            </text:list-item>
          </text:list>
        </text:list-item>
      </text:list>
      <text:p text:style-name="P69">Type<text:tab/>Funktionsbaustein</text:p>
      <text:p text:style-name="P66"><text:span text:style-name="T15">Input</text:span><text:span text:style-name="T14"><text:tab/>IN : BOOL (Eingangssignal)</text:span></text:p>
      <text:p text:style-name="P73"><text:tab/>T1 : TIME (Einschaltverzögerung)</text:p>
      <text:p text:style-name="P183"><text:tab/>T2 : TIME (Ausschaltverzögerung)</text:p>
      <text:p text:style-name="P73"><draw:frame draw:style-name="fr3" draw:name="Grafik392" text:anchor-type="paragraph" svg:x="1.134cm" svg:y="0.695cm" svg:width="2.101cm" svg:height="1.921cm" draw:z-index="367"><draw:image xlink:href="Pictures/100000000000009F000000912A0A0308.png" xlink:type="simple" xlink:show="embed" xlink:actuate="onLoad"/></draw:frame>Output<text:tab/>Q : BOOL (Ausgangspuls)</text:p>
      <text:p text:style-name="P73"><text:line-break/>TONOF erzeugt eine Einschaltverzögerung T1 und eine Ausschaltverzögerung T2</text:p>
      <text:p text:style-name="P183">Das steigende Flanke des Eingangssignals IN wird um T1 verzögert und die Fallende Flanke von IN wird um T2 verzögert.</text:p>
      <text:p text:style-name="P183"><draw:frame draw:style-name="fr3" draw:name="Grafik393" text:anchor-type="paragraph" svg:x="1.067cm" svg:y="0.422cm" svg:width="8.571cm" svg:height="2.499cm" draw:z-index="368"><draw:image xlink:href="Pictures/100000000000019500000076CB9F8217.png" xlink:type="simple" xlink:show="embed" xlink:actuate="onLoad"/></draw:frame></text:p>
      <text:list xml:id="list38455714" text:continue-numbering="true" text:style-name="L1">
        <text:list-item>
          <text:list>
            <text:list-item>
              <text:h text:style-name="P216" text:outline-level="2"><text:alphabetical-index-mark-start text:id="IMark225902392"/>TP_1<text:alphabetical-index-mark-end text:id="IMark225902392"/></text:h>
            </text:list-item>
          </text:list>
        </text:list-item>
      </text:list>
      <text:p text:style-name="P69">Type<text:tab/>Funktionsbaustein</text:p>
      <text:p text:style-name="P66"><text:span text:style-name="T15">Input</text:span><text:span text:style-name="T14"><text:tab/>IN : BOOL (Eingangssignal)</text:span></text:p>
      <text:p text:style-name="P73"><text:tab/>PT : TIME (Impulsdauer)</text:p>
      <text:p text:style-name="P183"><text:tab/>RST : BOOL (asynchroner Reset)</text:p>
      <text:p text:style-name="P73"><draw:frame draw:style-name="fr3" draw:name="Grafik656" text:anchor-type="paragraph" svg:x="1.069cm" svg:y="0.69cm" svg:width="2.101cm" svg:height="1.921cm" draw:z-index="644"><draw:image xlink:href="Pictures/100000000000009F000000915B016601.png" xlink:type="simple" xlink:show="embed" xlink:actuate="onLoad"/></draw:frame>Output<text:tab/>Q : BOOL (Ausgangspuls)</text:p>
      <text:p text:style-name="P173"><text:span text:style-name="T21"><text:line-break/>TP_1 ist ein flankengetriggerter Pulsgenerator der bei steigender Flanke an </text:span><text:soft-page-break/><text:span text:style-name="T21">IN einen Ausgangsimpuls an Q mit der Dauer PT erzeugt. Wird während des Ausgangsimpulses eine weitere steigende Flanke an IN erzeugt, so verlängert sich der Ausgangsimpuls so dass nach der letzten steigenden Flanke der Ausgang für die Dauer von PT TRUE bleibt. Der Baustein kann jederzeit mit einem TRUE am Eingang RST zurückgesetzt werden.</text:span></text:p>
      <text:p text:style-name="P10"><draw:g text:anchor-type="paragraph" draw:z-index="645" draw:style-name="gr1"><draw:line draw:style-name="gr2" draw:text-style-name="P257" svg:x1="2.083cm" svg:y1="3.101cm" svg:x2="3.083cm" svg:y2="3.101cm"><text:p/></draw:line><draw:line draw:style-name="gr2" draw:text-style-name="P257" svg:x1="3.085cm" svg:y1="2.6cm" svg:x2="3.085cm" svg:y2="3.099cm"><text:p/></draw:line><draw:line draw:style-name="gr2" draw:text-style-name="P257" svg:x1="3.085cm" svg:y1="2.6cm" svg:x2="5.085cm" svg:y2="2.6cm"><text:p/></draw:line><draw:line draw:style-name="gr2" draw:text-style-name="P257" svg:x1="5.081cm" svg:y1="3.099cm" svg:x2="5.081cm" svg:y2="2.6cm"><text:p/></draw:line><draw:line draw:style-name="gr2" draw:text-style-name="P257" svg:x1="5.081cm" svg:y1="3.101cm" svg:x2="6.081cm" svg:y2="3.101cm"><text:p/></draw:line><draw:line draw:style-name="gr2" draw:text-style-name="P257" svg:x1="6.081cm" svg:y1="2.6cm" svg:x2="6.081cm" svg:y2="3.099cm"><text:p/></draw:line><draw:line draw:style-name="gr2" draw:text-style-name="P257" svg:x1="9.583cm" svg:y1="3.101cm" svg:x2="11.084cm" svg:y2="3.101cm"><text:p/></draw:line><draw:line draw:style-name="gr3" draw:text-style-name="P257" svg:x1="3.085cm" svg:y1="1.6cm" svg:x2="3.085cm" svg:y2="2.099cm"><text:p/></draw:line><draw:line draw:style-name="gr3" draw:text-style-name="P257" svg:x1="2.083cm" svg:y1="2.101cm" svg:x2="3.083cm" svg:y2="2.101cm"><text:p/></draw:line><draw:line draw:style-name="gr3" draw:text-style-name="P257" svg:x1="3.085cm" svg:y1="1.6cm" svg:x2="3.335cm" svg:y2="1.6cm"><text:p/></draw:line><draw:line draw:style-name="gr3" draw:text-style-name="P257" svg:x1="3.331cm" svg:y1="2.099cm" svg:x2="3.331cm" svg:y2="1.6cm"><text:p/></draw:line><draw:line draw:style-name="gr3" draw:text-style-name="P257" svg:x1="3.331cm" svg:y1="2.101cm" svg:x2="6.081cm" svg:y2="2.101cm"><text:p/></draw:line><draw:line draw:style-name="gr3" draw:text-style-name="P257" svg:x1="6.081cm" svg:y1="1.6cm" svg:x2="6.081cm" svg:y2="2.099cm"><text:p/></draw:line><draw:line draw:style-name="gr3" draw:text-style-name="P257" svg:x1="6.081cm" svg:y1="1.6cm" svg:x2="6.331cm" svg:y2="1.6cm"><text:p/></draw:line><draw:line draw:style-name="gr3" draw:text-style-name="P257" svg:x1="6.334cm" svg:y1="2.099cm" svg:x2="6.334cm" svg:y2="1.6cm"><text:p/></draw:line><draw:line draw:style-name="gr3" draw:text-style-name="P257" svg:x1="6.334cm" svg:y1="2.101cm" svg:x2="7.583cm" svg:y2="2.101cm"><text:p/></draw:line><draw:line draw:style-name="gr3" draw:text-style-name="P257" svg:x1="7.581cm" svg:y1="1.6cm" svg:x2="7.581cm" svg:y2="2.099cm"><text:p/></draw:line><draw:line draw:style-name="gr3" draw:text-style-name="P257" svg:x1="7.581cm" svg:y1="1.6cm" svg:x2="7.831cm" svg:y2="1.6cm"><text:p/></draw:line><draw:line draw:style-name="gr3" draw:text-style-name="P257" svg:x1="7.835cm" svg:y1="2.099cm" svg:x2="7.835cm" svg:y2="1.6cm"><text:p/></draw:line><draw:line draw:style-name="gr3" draw:text-style-name="P257" svg:x1="7.835cm" svg:y1="2.101cm" svg:x2="11.086cm" svg:y2="2.101cm"><text:p/></draw:line><draw:frame draw:style-name="gr6" draw:text-style-name="P259" svg:width="0.997cm" svg:height="0.65cm" svg:x="1.332cm" svg:y="2.603cm"><draw:text-box><text:p text:style-name="P258"><text:span text:style-name="T32">Q</text:span></text:p></draw:text-box></draw:frame><draw:frame draw:style-name="gr6" draw:text-style-name="P259" svg:width="0.997cm" svg:height="0.65cm" svg:x="1.332cm" svg:y="1.603cm"><draw:text-box><text:p text:style-name="P258"><text:span text:style-name="T32">IN</text:span></text:p></draw:text-box></draw:frame><draw:line draw:style-name="gr2" draw:text-style-name="P257" svg:x1="6.081cm" svg:y1="2.6cm" svg:x2="9.581cm" svg:y2="2.6cm"><text:p/></draw:line><draw:line draw:style-name="gr2" draw:text-style-name="P257" svg:x1="9.583cm" svg:y1="2.6cm" svg:x2="9.583cm" svg:y2="3.099cm"><text:p/></draw:line><draw:line draw:style-name="gr2" draw:text-style-name="P257" svg:x1="5.081cm" svg:y1="3.101cm" svg:x2="6.081cm" svg:y2="3.101cm"><text:p/></draw:line><draw:line draw:style-name="gr2" draw:text-style-name="P257" svg:x1="6.081cm" svg:y1="2.6cm" svg:x2="6.081cm" svg:y2="3.099cm"><text:p/></draw:line><draw:line draw:style-name="gr7" draw:text-style-name="P257" svg:x1="3.085cm" svg:y1="0.852cm" svg:x2="3.835cm" svg:y2="0.852cm"><text:p/></draw:line><draw:frame draw:style-name="gr6" draw:text-style-name="P259" svg:width="1.124cm" svg:height="0.65cm" svg:x="3.653cm" svg:y="0.603cm"><draw:text-box><text:p text:style-name="P258"><text:span text:style-name="T32">PT</text:span></text:p></draw:text-box></draw:frame><draw:line draw:style-name="gr7" draw:text-style-name="P257" svg:x1="5.082cm" svg:y1="0.852cm" svg:x2="4.332cm" svg:y2="0.852cm"><text:p/></draw:line><draw:line draw:style-name="gr7" draw:text-style-name="P257" svg:x1="7.581cm" svg:y1="0.852cm" svg:x2="8.332cm" svg:y2="0.852cm"><text:p/></draw:line><draw:frame draw:style-name="gr6" draw:text-style-name="P259" svg:width="1.124cm" svg:height="0.65cm" svg:x="8.151cm" svg:y="0.603cm"><draw:text-box><text:p text:style-name="P258"><text:span text:style-name="T32">PT</text:span></text:p></draw:text-box></draw:frame><draw:line draw:style-name="gr7" draw:text-style-name="P257" svg:x1="9.581cm" svg:y1="0.852cm" svg:x2="8.831cm" svg:y2="0.852cm"><text:p/></draw:line></draw:g>Zeitverhalten von TP_1:</text:p>
      <text:p text:style-name="P28"/>
      <text:list xml:id="list38476399" text:continue-numbering="true" text:style-name="L1">
        <text:list-item>
          <text:list>
            <text:list-item>
              <text:h text:style-name="P216" text:outline-level="2"><text:alphabetical-index-mark-start text:id="IMark225902392"/>TP_1D<text:alphabetical-index-mark-end text:id="IMark225902392"/></text:h>
            </text:list-item>
          </text:list>
        </text:list-item>
      </text:list>
      <text:p text:style-name="P69">Type<text:tab/>Funktionsbaustein</text:p>
      <text:p text:style-name="P66"><text:span text:style-name="T15">Input</text:span><text:span text:style-name="T14"><text:tab/>IN : BOOL (Eingangssignal)</text:span></text:p>
      <text:p text:style-name="P73"><text:tab/>PT1 : TIME (Impulsdauer)</text:p>
      <text:p text:style-name="P173"><text:span text:style-name="T21"><text:tab/>PTD : TIME (</text:span><text:span text:style-name="T16">Delay</text:span><text:span text:style-name="T21"> bis neuer Impuls erzeugt werden kann)</text:span></text:p>
      <text:p text:style-name="P183"><text:tab/>RST : BOOL (asynchroner Reset)</text:p>
      <text:p text:style-name="P73"><draw:frame draw:style-name="fr3" draw:name="Grafik657" text:anchor-type="paragraph" svg:x="1.046cm" svg:y="0.737cm" svg:width="2.101cm" svg:height="2.311cm" draw:z-index="646"><draw:image xlink:href="Pictures/100000000000009F000000AFE9351DA9.png" xlink:type="simple" xlink:show="embed" xlink:actuate="onLoad"/></draw:frame>Output<text:tab/>Q : BOOL (Ausgangspuls)</text:p>
      <text:p text:style-name="P183"><text:line-break/>TP_1D ist ein flankengetriggerter Pulsgenerator der bei steigender Flanke an IN einen Ausgangsimpuls an Q mit der Dauer PT1 erzeugt. Wird während des Ausgangsimpulses eine weitere steigende Flanke an IN erzeugt, so verlängert sich der Ausgangsimpuls so dass nach der letzten steigenden Flanke der Ausgang für die Dauer von PT TRUE bleibt. Nach Ablauf der Pulsdauer PT1 blockiert der Baustein für die Zeit PTD den Ausgang. ein neuer Impuls kann erst nach Ablauf der Zeit PTD wieder gestartet werden. Der Baustein kann jederzeit mit einem TRUE am Eingang RST zurückgesetzt werden. Der Ausgang W zeigt an das der Baustein im Wartezyklus ist und solange W = TRUE kann kein neuer Impuls gestartet werden.</text:p>
      <text:list xml:id="list38459504" text:continue-numbering="true" text:style-name="L1">
        <text:list-item>
          <text:list>
            <text:list-item>
              <text:h text:style-name="P216" text:outline-level="2"><text:soft-page-break/><text:alphabetical-index-mark-start text:id="IMark225902392"/>TP_X<text:alphabetical-index-mark-end text:id="IMark225902392"/></text:h>
            </text:list-item>
          </text:list>
        </text:list-item>
      </text:list>
      <text:p text:style-name="P69">Type<text:tab/>Funktionsbaustein</text:p>
      <text:p text:style-name="P66"><text:span text:style-name="T15">Input</text:span><text:span text:style-name="T14"><text:tab/>IN : BOOL (Eingangssignal)</text:span></text:p>
      <text:p text:style-name="P73"><text:tab/>PT : TIME (Impulsdauer)</text:p>
      <text:p text:style-name="P73">Output<text:tab/>Q : BOOL (Ausgangspuls)</text:p>
      <text:p text:style-name="P73"><draw:frame draw:style-name="fr3" draw:name="Grafik100" text:anchor-type="paragraph" svg:x="0.958cm" svg:y="0.69cm" svg:width="1.709cm" svg:height="1.52cm" draw:z-index="716"><draw:image xlink:href="Pictures/1000000000000081000000731A89C368.png" xlink:type="simple" xlink:show="embed" xlink:actuate="onLoad"/></draw:frame><text:tab/>ET : TIME (Zähle die Abgelaufene Zeit des Ausgangspulses)</text:p>
      <text:p text:style-name="P66"><text:span text:style-name="T21"><text:line-break/>TP_X ist ein mehrfach triggerbarer Impulsgenerator. Im Gegensatz zum Standardbaustein TP kann dieser Baustein mehrfach getriggert werden und dadurch der Ausgangsimpuls verlängert werden. Der Ausgang Q bleibt nach dem letzten Triggerereignis (steigende Flanke an IN) für die Zeit PT auf ein. Während Q TRUE ist, kann jederzeit durch eine weitere Eingangsflanke an IN der </text:span><text:span text:style-name="T16">Timer</text:span><text:span text:style-name="T21"> wieder getriggert werden und der Ausgangsimpuls dadurch verlängert werden. Im Gegensatz zu TOF wird bei TP_X die Zeit PT ab der letzten steigenden Flanke gemessen, unabhängig wie lange <text:s text:c="2"/>IN auf TRUE bleibt. Das bedeutet das der Ausgang Q nach Ablauf der Zeit PT gemessen von der letzten steigenden Flanke an IN auf FALSE geht, auch wenn der Eingang IN noch TRUE ist.</text:span></text:p>
      <text:p text:style-name="P11">Zeitverhalten von TP_X:</text:p>
      <text:p text:style-name="P38"><draw:g text:anchor-type="paragraph" draw:z-index="66" draw:style-name="gr1"><draw:line draw:style-name="gr2" draw:text-style-name="P257" svg:x1="1.949cm" svg:y1="2.453cm" svg:x2="2.949cm" svg:y2="2.453cm"><text:p/></draw:line><draw:line draw:style-name="gr2" draw:text-style-name="P257" svg:x1="2.951cm" svg:y1="1.953cm" svg:x2="2.951cm" svg:y2="2.452cm"><text:p/></draw:line><draw:line draw:style-name="gr2" draw:text-style-name="P257" svg:x1="2.951cm" svg:y1="1.953cm" svg:x2="4.951cm" svg:y2="1.953cm"><text:p/></draw:line><draw:line draw:style-name="gr2" draw:text-style-name="P257" svg:x1="4.947cm" svg:y1="2.452cm" svg:x2="4.947cm" svg:y2="1.953cm"><text:p/></draw:line><draw:line draw:style-name="gr2" draw:text-style-name="P257" svg:x1="4.947cm" svg:y1="2.453cm" svg:x2="5.947cm" svg:y2="2.453cm"><text:p/></draw:line><draw:line draw:style-name="gr2" draw:text-style-name="P257" svg:x1="5.947cm" svg:y1="1.953cm" svg:x2="5.947cm" svg:y2="2.452cm"><text:p/></draw:line><draw:line draw:style-name="gr2" draw:text-style-name="P257" svg:x1="9.449cm" svg:y1="2.453cm" svg:x2="10.95cm" svg:y2="2.453cm"><text:p/></draw:line><draw:line draw:style-name="gr3" draw:text-style-name="P257" svg:x1="2.951cm" svg:y1="0.952cm" svg:x2="2.951cm" svg:y2="1.451cm"><text:p/></draw:line><draw:line draw:style-name="gr3" draw:text-style-name="P257" svg:x1="1.949cm" svg:y1="1.455cm" svg:x2="2.949cm" svg:y2="1.455cm"><text:p/></draw:line><draw:line draw:style-name="gr3" draw:text-style-name="P257" svg:x1="2.951cm" svg:y1="0.952cm" svg:x2="3.201cm" svg:y2="0.952cm"><text:p/></draw:line><draw:line draw:style-name="gr3" draw:text-style-name="P257" svg:x1="3.197cm" svg:y1="1.451cm" svg:x2="3.197cm" svg:y2="0.952cm"><text:p/></draw:line><draw:line draw:style-name="gr3" draw:text-style-name="P257" svg:x1="3.197cm" svg:y1="1.455cm" svg:x2="5.947cm" svg:y2="1.455cm"><text:p/></draw:line><draw:line draw:style-name="gr3" draw:text-style-name="P257" svg:x1="5.947cm" svg:y1="0.952cm" svg:x2="5.947cm" svg:y2="1.451cm"><text:p/></draw:line><draw:line draw:style-name="gr3" draw:text-style-name="P257" svg:x1="5.947cm" svg:y1="0.952cm" svg:x2="6.197cm" svg:y2="0.952cm"><text:p/></draw:line><draw:line draw:style-name="gr3" draw:text-style-name="P257" svg:x1="6.2cm" svg:y1="1.451cm" svg:x2="6.2cm" svg:y2="0.952cm"><text:p/></draw:line><draw:line draw:style-name="gr3" draw:text-style-name="P257" svg:x1="6.2cm" svg:y1="1.455cm" svg:x2="7.449cm" svg:y2="1.455cm"><text:p/></draw:line><draw:line draw:style-name="gr3" draw:text-style-name="P257" svg:x1="7.447cm" svg:y1="0.952cm" svg:x2="7.447cm" svg:y2="1.451cm"><text:p/></draw:line><draw:line draw:style-name="gr3" draw:text-style-name="P257" svg:x1="7.447cm" svg:y1="0.952cm" svg:x2="7.697cm" svg:y2="0.952cm"><text:p/></draw:line><draw:line draw:style-name="gr3" draw:text-style-name="P257" svg:x1="7.701cm" svg:y1="1.451cm" svg:x2="7.701cm" svg:y2="0.952cm"><text:p/></draw:line><draw:line draw:style-name="gr3" draw:text-style-name="P257" svg:x1="7.701cm" svg:y1="1.455cm" svg:x2="10.952cm" svg:y2="1.455cm"><text:p/></draw:line><draw:frame draw:style-name="gr6" draw:text-style-name="P259" svg:width="0.997cm" svg:height="0.65cm" svg:x="1.198cm" svg:y="1.956cm"><draw:text-box><text:p text:style-name="P258"><text:span text:style-name="T32">Q</text:span></text:p></draw:text-box></draw:frame><draw:frame draw:style-name="gr6" draw:text-style-name="P259" svg:width="0.997cm" svg:height="0.65cm" svg:x="1.198cm" svg:y="0.956cm"><draw:text-box><text:p text:style-name="P258"><text:span text:style-name="T32">IN</text:span></text:p></draw:text-box></draw:frame><draw:line draw:style-name="gr2" draw:text-style-name="P257" svg:x1="5.947cm" svg:y1="1.953cm" svg:x2="9.447cm" svg:y2="1.953cm"><text:p/></draw:line><draw:line draw:style-name="gr2" draw:text-style-name="P257" svg:x1="9.449cm" svg:y1="1.953cm" svg:x2="9.449cm" svg:y2="2.452cm"><text:p/></draw:line><draw:line draw:style-name="gr2" draw:text-style-name="P257" svg:x1="4.947cm" svg:y1="2.453cm" svg:x2="5.947cm" svg:y2="2.453cm"><text:p/></draw:line><draw:line draw:style-name="gr2" draw:text-style-name="P257" svg:x1="5.947cm" svg:y1="1.953cm" svg:x2="5.947cm" svg:y2="2.452cm"><text:p/></draw:line><draw:line draw:style-name="gr7" draw:text-style-name="P257" svg:x1="2.951cm" svg:y1="0.205cm" svg:x2="3.701cm" svg:y2="0.205cm"><text:p/></draw:line><draw:frame draw:style-name="gr6" draw:text-style-name="P259" svg:width="1.124cm" svg:height="0.65cm" svg:x="3.519cm" svg:y="-0.044cm"><draw:text-box><text:p text:style-name="P258"><text:span text:style-name="T32">PT</text:span></text:p></draw:text-box></draw:frame><draw:line draw:style-name="gr7" draw:text-style-name="P257" svg:x1="4.948cm" svg:y1="0.205cm" svg:x2="4.198cm" svg:y2="0.205cm"><text:p/></draw:line><draw:line draw:style-name="gr7" draw:text-style-name="P257" svg:x1="7.447cm" svg:y1="0.205cm" svg:x2="8.198cm" svg:y2="0.205cm"><text:p/></draw:line><draw:frame draw:style-name="gr6" draw:text-style-name="P259" svg:width="1.124cm" svg:height="0.65cm" svg:x="8.017cm" svg:y="-0.044cm"><draw:text-box><text:p text:style-name="P258"><text:span text:style-name="T32">PT</text:span></text:p></draw:text-box></draw:frame><draw:line draw:style-name="gr7" draw:text-style-name="P257" svg:x1="9.447cm" svg:y1="0.205cm" svg:x2="8.697cm" svg:y2="0.205cm"><text:p/></draw:line></draw:g></text:p>
      <text:list xml:id="list38462078" text:continue-numbering="true" text:style-name="L1">
        <text:list-item>
          <text:h text:style-name="P210" text:outline-level="1">Logik Bausteine</text:h>
          <text:list>
            <text:list-item>
              <text:h text:style-name="P216" text:outline-level="2"><text:alphabetical-index-mark-start text:id="IMark225902392"/>BCDC_TO_INT<text:alphabetical-index-mark-end text:id="IMark225902392"/></text:h>
            </text:list-item>
          </text:list>
        </text:list-item>
      </text:list>
      <text:p text:style-name="P69">Type<text:tab/>Funktion : INT</text:p>
      <text:p text:style-name="P66"><text:span text:style-name="T15">Input</text:span><text:span text:style-name="T14"><text:tab/>IN : BYTE (BCD codierter Eingang)</text:span></text:p>
      <text:p text:style-name="P73"><draw:frame draw:style-name="fr3" draw:name="Grafik413" text:anchor-type="paragraph" svg:x="1.067cm" svg:y="0.688cm" svg:width="4.881cm" svg:height="0.99cm" draw:z-index="653"><draw:image xlink:href="Pictures/10000000000001710000004B1DF17AC6.png" xlink:type="simple" xlink:show="embed" xlink:actuate="onLoad"/></draw:frame>Output<text:tab/>INT (Ausgangswert)</text:p>
      <text:p text:style-name="P183"><text:line-break/>BCDC_TO_INT konvertiert ein BCD codiertes Eingangs BYTE in einen Integer Wert.</text:p>
      <text:list xml:id="list38452079" text:continue-numbering="true" text:style-name="L1">
        <text:list-item>
          <text:list>
            <text:list-item>
              <text:h text:style-name="P216" text:outline-level="2"><text:alphabetical-index-mark-start text:id="IMark225902392"/>BIT_COUNT<text:alphabetical-index-mark-end text:id="IMark225902392"/></text:h>
            </text:list-item>
          </text:list>
        </text:list-item>
      </text:list>
      <text:p text:style-name="P69">Type<text:tab/>Funktion : INT</text:p>
      <text:p text:style-name="P66"><text:span text:style-name="T15">Input</text:span><text:span text:style-name="T14"><text:tab/>IN : DWORD (Eingang)</text:span></text:p>
      <text:p text:style-name="P73"><draw:frame draw:style-name="fr3" draw:name="Grafik310" text:anchor-type="paragraph" svg:x="1.12cm" svg:y="0.672cm" svg:width="4.022cm" svg:height="1.141cm" draw:z-index="268"><draw:image xlink:href="Pictures/10000000000001340000005569674502.png" xlink:type="simple" xlink:show="embed" xlink:actuate="onLoad"/></draw:frame>Output<text:tab/>INT (Anzahl der Bits, welche in IN den Wert TRUE (1) besitzen)</text:p>
      <text:p text:style-name="P73"><text:line-break/>BIT_COUNT ermittelt die Anzahl der Bits in IN, welche den Wert TRUE (1) besitzen. Der Eingang IN ist DWORD und Kann auch die Typen Byte und Word verarbeiten.</text:p>
      <text:p text:style-name="P183"/>
      <text:list xml:id="list38454281" text:continue-numbering="true" text:style-name="L1">
        <text:list-item>
          <text:list>
            <text:list-item>
              <text:h text:style-name="P216" text:outline-level="2"><text:soft-page-break/><text:alphabetical-index-mark-start text:id="IMark225902392"/>BIT_LOAD_B<text:alphabetical-index-mark-end text:id="IMark225902392"/></text:h>
            </text:list-item>
          </text:list>
        </text:list-item>
      </text:list>
      <text:p text:style-name="P69">Type<text:tab/>Funktion : BYTE</text:p>
      <text:p text:style-name="P66"><text:span text:style-name="T15">Input</text:span><text:span text:style-name="T14"><text:tab/>IN : BYTE (Eingang)</text:span></text:p>
      <text:p text:style-name="P179"><text:tab/>VAL : BOOL (Wert des zu ladenden Bits)</text:p>
      <text:p text:style-name="P179"><text:tab/>POS : INT (Position des zu ladenden Bits)</text:p>
      <text:p text:style-name="P73"><draw:frame draw:style-name="fr3" draw:name="Grafik482" text:anchor-type="paragraph" svg:x="1.046cm" svg:y="0.69cm" svg:width="4.791cm" svg:height="1.79cm" draw:z-index="509"><draw:image xlink:href="Pictures/100000000000016A000000871EB27646.png" xlink:type="simple" xlink:show="embed" xlink:actuate="onLoad"/></draw:frame>Output<text:tab/>BYTE (Ausgang)</text:p>
      <text:p text:style-name="P183"><text:line-break/>BIT_LOAD_B kopiert das am Eingang VAL anliegende Bit an die Position N im Byte IN. Das niederwertigste Bit B0 wird mit der Position 0 bezeichnet.</text:p>
      <text:list xml:id="list38455411" text:continue-numbering="true" text:style-name="L1">
        <text:list-item>
          <text:list>
            <text:list-item>
              <text:h text:style-name="P216" text:outline-level="2"><text:alphabetical-index-mark-start text:id="IMark225902392"/>BIT_LOAD_B2<text:alphabetical-index-mark-end text:id="IMark225902392"/></text:h>
            </text:list-item>
          </text:list>
        </text:list-item>
      </text:list>
      <text:p text:style-name="P69">Type<text:tab/>Funktion : BYTE</text:p>
      <text:p text:style-name="P66"><text:span text:style-name="T15">Input</text:span><text:span text:style-name="T14"><text:tab/>I : BYTE (Eingangs Wert)</text:span></text:p>
      <text:p text:style-name="P179"><text:tab/>D : BOOL (Wert der zu ladenden Bits)</text:p>
      <text:p text:style-name="P179"><text:tab/>P : INT (Position des zu ladenden Bits)</text:p>
      <text:p text:style-name="P179"><text:tab/>N : INT (Anzahl der Bits die ab Position P geladen werden)</text:p>
      <text:p text:style-name="P73"><draw:frame draw:style-name="fr3" draw:name="Grafik710" text:anchor-type="paragraph" svg:x="1.002cm" svg:y="0.667cm" svg:width="4.881cm" svg:height="2.18cm" draw:z-index="721"><draw:image xlink:href="Pictures/1000000000000171000000A5A0FBD925.png" xlink:type="simple" xlink:show="embed" xlink:actuate="onLoad"/></draw:frame>Output<text:tab/>BYTE (Ausgang)</text:p>
      <text:p text:style-name="P183"><text:line-break/>BIT_LOAD_B2 kann mehrere Bits in einem Byte gleichzeitig setzen oder löschen. Die Position wird mit 0 für Bit0 und 7 für Bit7 angegeben. N gibt an wie viele Bits ab der angegebenen Position verändert werden. Wird N = 0 werden keine Bits verändert. Wird die P und N so spezifiziert das die zu schreibenden Bits über das höchste (Bit 7) hinausreicht so wird wieder bei Bit 0 begonnen.</text:p>
      <text:p text:style-name="P183">BIT_LOAD_B2(2#1111_0000, TRUE, 1, 2) = 2#1111_0110</text:p>
      <text:p text:style-name="P183">BIT_LOAD_B2(2#1111_1111, FALSE, 7, 2) = 2#0111_1110</text:p>
      <text:list xml:id="list38475843" text:continue-numbering="true" text:style-name="L1">
        <text:list-item>
          <text:list>
            <text:list-item>
              <text:h text:style-name="P216" text:outline-level="2"><text:soft-page-break/><text:alphabetical-index-mark-start text:id="IMark225902392"/>BIT_LOAD_DW<text:alphabetical-index-mark-end text:id="IMark225902392"/></text:h>
            </text:list-item>
          </text:list>
        </text:list-item>
      </text:list>
      <text:p text:style-name="P69">Type<text:tab/>Funktion : DWORD</text:p>
      <text:p text:style-name="P66"><text:span text:style-name="T15">Input</text:span><text:span text:style-name="T14"><text:tab/>IN : DWORD (Eingang)</text:span></text:p>
      <text:p text:style-name="P179"><text:tab/>VAL : BOOL (Wert des zu ladenden Bits)</text:p>
      <text:p text:style-name="P179"><text:tab/>POS : INT (Position des zu ladenden Bits)</text:p>
      <text:p text:style-name="P73"><draw:frame draw:style-name="fr3" draw:name="Grafik483" text:anchor-type="paragraph" svg:x="1.023cm" svg:y="0.644cm" svg:width="5.579cm" svg:height="1.79cm" draw:z-index="510"><draw:image xlink:href="Pictures/10000000000001A60000008780FB3AE2.png" xlink:type="simple" xlink:show="embed" xlink:actuate="onLoad"/></draw:frame>Output<text:tab/>DWORD (Ausgang)</text:p>
      <text:p text:style-name="P183"><text:line-break/>BIT_LOAD_DW kopiert das am Eingang VAL anliegende Bit an die Position N im DWORD IN. Das niederwertigste Bit B0 wird mit der Position 0 bezeichnet.</text:p>
      <text:list xml:id="list38448045" text:continue-numbering="true" text:style-name="L1">
        <text:list-item>
          <text:list>
            <text:list-item>
              <text:h text:style-name="P216" text:outline-level="2"><text:alphabetical-index-mark-start text:id="IMark225902392"/>BIT_LOAD_DW2<text:alphabetical-index-mark-end text:id="IMark225902392"/></text:h>
            </text:list-item>
          </text:list>
        </text:list-item>
      </text:list>
      <text:p text:style-name="P69">Type<text:tab/>Funktion : DWORD</text:p>
      <text:p text:style-name="P66"><text:span text:style-name="T15">Input</text:span><text:span text:style-name="T14"><text:tab/>I : DWORD (Eingangs Wert)</text:span></text:p>
      <text:p text:style-name="P179"><text:tab/>D : BOOL (Wert der zu ladenden Bits)</text:p>
      <text:p text:style-name="P179"><text:tab/>P : INT (Position des zu ladenden Bits)</text:p>
      <text:p text:style-name="P179"><text:tab/>N : INT (Anzahl der Bits die ab Position P geladen werden)</text:p>
      <text:p text:style-name="P73"><draw:frame draw:style-name="fr3" draw:name="Grafik711" text:anchor-type="paragraph" svg:x="1.023cm" svg:y="0.667cm" svg:width="5.279cm" svg:height="2.18cm" draw:z-index="722"><draw:image xlink:href="Pictures/100000000000018F000000A528C3C881.png" xlink:type="simple" xlink:show="embed" xlink:actuate="onLoad"/></draw:frame>Output<text:tab/>DWORD (Ausgang)</text:p>
      <text:p text:style-name="P183"><text:line-break/>BIT_LOAD_DW2 kann mehrere Bits in einem DWORD gleichzeitig setzen oder löschen. Die Position wird mit 0 für Bit 0 und 31 für Bit 31 angegeben. N gibt an wie viele Bits ab der angegebenen Position verändert werden. Wird N = 0 werden keine Bits verändert. Wird P und N so spezifiziert, dass die zu schreibenden Bits über das höchste (Bit 31) hinausreicht so wird wieder bei Bit 0 begonnen.</text:p>
      <text:p text:style-name="P183">Beispiele siehe unter BIT_LOAD_B2</text:p>
      <text:list xml:id="list38460470" text:continue-numbering="true" text:style-name="L1">
        <text:list-item>
          <text:list>
            <text:list-item>
              <text:h text:style-name="P216" text:outline-level="2"><text:soft-page-break/><text:alphabetical-index-mark-start text:id="IMark225902392"/>BIT_LOAD_W<text:alphabetical-index-mark-end text:id="IMark225902392"/></text:h>
            </text:list-item>
          </text:list>
        </text:list-item>
      </text:list>
      <text:p text:style-name="P69">Type<text:tab/>Funktion : WORD</text:p>
      <text:p text:style-name="P66"><text:span text:style-name="T15">Input</text:span><text:span text:style-name="T14"><text:tab/>IN : WORD (Eingang)</text:span></text:p>
      <text:p text:style-name="P179"><text:tab/>VAL : BOOL (Wert des zu ladenden Bits)</text:p>
      <text:p text:style-name="P179"><text:tab/>POS : INT (Position des zu ladenden Bits)</text:p>
      <text:p text:style-name="P73"><draw:frame draw:style-name="fr3" draw:name="Grafik484" text:anchor-type="paragraph" svg:x="1.046cm" svg:y="0.69cm" svg:width="4.791cm" svg:height="1.79cm" draw:z-index="511"><draw:image xlink:href="Pictures/100000000000016A000000874176E321.png" xlink:type="simple" xlink:show="embed" xlink:actuate="onLoad"/></draw:frame>Output<text:tab/>WORD (Ausgang)</text:p>
      <text:p text:style-name="P183"><text:line-break/>BIT_LOAD_W kopiert das am Eingang VAL anliegende Bit an die Position N im WORD IN. Das niederwertigste Bit B0 wird mit der Position 0 bezeichnet.</text:p>
      <text:list xml:id="list38465998" text:continue-numbering="true" text:style-name="L1">
        <text:list-item>
          <text:list>
            <text:list-item>
              <text:h text:style-name="P216" text:outline-level="2"><text:alphabetical-index-mark-start text:id="IMark225902392"/>BIT_LOAD_W2<text:alphabetical-index-mark-end text:id="IMark225902392"/></text:h>
            </text:list-item>
          </text:list>
        </text:list-item>
      </text:list>
      <text:p text:style-name="P69">Type<text:tab/>Funktion : WORD</text:p>
      <text:p text:style-name="P66"><text:span text:style-name="T15">Input</text:span><text:span text:style-name="T14"><text:tab/>I : WORD (Eingangs Wert)</text:span></text:p>
      <text:p text:style-name="P179"><text:tab/>D : BOOL (Wert der zu ladenden Bits)</text:p>
      <text:p text:style-name="P179"><text:tab/>P : INT (Position des zu ladenden Bits)</text:p>
      <text:p text:style-name="P179"><text:tab/>N : INT (Anzahl der Bits die ab Position P geladen werden)</text:p>
      <text:p text:style-name="P73">Output<text:tab/>WORD (Ausgang)</text:p>
      <text:p text:style-name="P183"><draw:frame draw:style-name="fr3" draw:name="Grafik712" text:anchor-type="paragraph" svg:x="1.046cm" svg:y="0.012cm" svg:width="4.881cm" svg:height="2.18cm" draw:z-index="723"><draw:image xlink:href="Pictures/1000000000000171000000A5B103AF30.png" xlink:type="simple" xlink:show="embed" xlink:actuate="onLoad"/></draw:frame><text:line-break/>BIT_LOAD_W2 kann mehrere Bits in einem WORD gleichzeitig setzen oder löschen. Die Position wird mit 0 für Bit 0 und 15 für Bit 15 angegeben. N gibt an wie viele Bits ab der angegebenen Position verändert werden. Wird N = 0 werden keine Bits verändert. Wird P und N so spezifiziert, dass die zu schreibenden Bits über das höchste (Bit 15) hinausreicht so wird wieder bei Bit 0 begonnen.</text:p>
      <text:p text:style-name="P183">Beispiele siehe unter BIT_LOAD_B2</text:p>
      <text:list xml:id="list38454826" text:continue-numbering="true" text:style-name="L1">
        <text:list-item>
          <text:list>
            <text:list-item>
              <text:h text:style-name="P216" text:outline-level="2"><text:soft-page-break/><text:alphabetical-index-mark-start text:id="IMark225902392"/>BIT_OF_DWORD<text:alphabetical-index-mark-end text:id="IMark225902392"/></text:h>
            </text:list-item>
          </text:list>
        </text:list-item>
      </text:list>
      <text:p text:style-name="P69">Type<text:tab/>Funktion : BOOL</text:p>
      <text:p text:style-name="P66"><text:span text:style-name="T15">Input</text:span><text:span text:style-name="T14"><text:tab/>IN : DWORD (Eingang)</text:span></text:p>
      <text:p text:style-name="P69"><text:tab/>N : INT (Nummer des Bits 0..31)</text:p>
      <text:p text:style-name="P73"><draw:frame draw:style-name="fr3" draw:name="Grafik106" text:anchor-type="paragraph" svg:x="1.125cm" svg:y="0.66cm" svg:width="4.971cm" svg:height="1.57cm" draw:z-index="67"><draw:image xlink:href="Pictures/100000000000017800000077E24E5BB8.png" xlink:type="simple" xlink:show="embed" xlink:actuate="onLoad"/></draw:frame>Output<text:tab/>BOOL (Ausgangsbit)</text:p>
      <text:p text:style-name="P73"><text:line-break/>BIT_OF_DWORD extrahiert ein Bit aus dem DWORD am Eingang IN.</text:p>
      <text:p text:style-name="P73">Bit0 für N=0, Bit1 für N=1 usw.</text:p>
      <text:list xml:id="list38447789" text:continue-numbering="true" text:style-name="L1">
        <text:list-item>
          <text:list>
            <text:list-item>
              <text:h text:style-name="P216" text:outline-level="2"><text:alphabetical-index-mark-start text:id="IMark225902392"/>BIT_TOGGLE_B<text:alphabetical-index-mark-end text:id="IMark225902392"/></text:h>
            </text:list-item>
          </text:list>
        </text:list-item>
      </text:list>
      <text:p text:style-name="P69">Type<text:tab/>Funktion : BYTE</text:p>
      <text:p text:style-name="P66"><text:span text:style-name="T15">Input</text:span><text:span text:style-name="T14"><text:tab/>IN : BYTE (Eingangs Daten)</text:span></text:p>
      <text:p text:style-name="P179"><text:tab/>POS : INT (Position)</text:p>
      <text:p text:style-name="P73"><draw:frame draw:style-name="fr3" draw:name="Grafik707" text:anchor-type="paragraph" svg:x="1.025cm" svg:y="0.667cm" svg:width="5.279cm" svg:height="1.39cm" draw:z-index="709"><draw:image xlink:href="Pictures/100000000000018F00000069D4213320.png" xlink:type="simple" xlink:show="embed" xlink:actuate="onLoad"/></draw:frame>Output<text:tab/>BYTE (Ausgangsbyte)</text:p>
      <text:p text:style-name="P183"><text:line-break/>BIT_TOGGLE_B invertiert ein mit POS spezifiziertes Bit von IN.</text:p>
      <text:p text:style-name="P183">BIT_TOGGLE_B(2#0000_1111, 2) = 2#0000_1011</text:p>
      <text:p text:style-name="P183">BIT_TOGGLE_B(2#0000_1111, 7) = 2#1000_1111</text:p>
      <text:p text:style-name="P183"/>
      <text:p text:style-name="P183"/>
      <text:p text:style-name="P183"/>
      <text:list xml:id="list38450867" text:continue-numbering="true" text:style-name="L1">
        <text:list-item>
          <text:list>
            <text:list-item>
              <text:h text:style-name="P216" text:outline-level="2"><text:soft-page-break/><text:alphabetical-index-mark-start text:id="IMark225902392"/>BIT_TOGGLE_DW<text:alphabetical-index-mark-end text:id="IMark225902392"/></text:h>
            </text:list-item>
          </text:list>
        </text:list-item>
      </text:list>
      <text:p text:style-name="P69">Type<text:tab/>Funktion : DWORD</text:p>
      <text:p text:style-name="P66"><text:span text:style-name="T15">Input</text:span><text:span text:style-name="T14"><text:tab/>IN : DWORD (Eingangs Daten)</text:span></text:p>
      <text:p text:style-name="P179"><text:tab/>POS : INT (Position)</text:p>
      <text:p text:style-name="P73"><draw:frame draw:style-name="fr3" draw:name="Grafik708" text:anchor-type="paragraph" svg:x="1.046cm" svg:y="0.69cm" svg:width="5.669cm" svg:height="1.39cm" draw:z-index="711"><draw:image xlink:href="Pictures/10000000000001AD00000069CBDAB9E1.png" xlink:type="simple" xlink:show="embed" xlink:actuate="onLoad"/></draw:frame>Output<text:tab/>DWORD (Ausgangsbyte)</text:p>
      <text:p text:style-name="P183"><text:line-break/>BIT_TOGGLE_DW invertiert ein mit POS spezifiziertes Bit von IN.</text:p>
      <text:p text:style-name="P183">BIT_TOGGLE_DW(2#0000_1111, 2) = 2#0000_1011</text:p>
      <text:p text:style-name="P73">BIT_TOGGLE_DW(2#0000_1111, 7) = 2#1000_1111</text:p>
      <text:list xml:id="list38472841" text:continue-numbering="true" text:style-name="L1">
        <text:list-item>
          <text:list>
            <text:list-item>
              <text:h text:style-name="P216" text:outline-level="2"><text:alphabetical-index-mark-start text:id="IMark225902392"/>BIT_TOGGLE_W<text:alphabetical-index-mark-end text:id="IMark225902392"/></text:h>
            </text:list-item>
          </text:list>
        </text:list-item>
      </text:list>
      <text:p text:style-name="P69">Type<text:tab/>Funktion : WORD</text:p>
      <text:p text:style-name="P66"><text:span text:style-name="T15">Input</text:span><text:span text:style-name="T14"><text:tab/>IN : <text:s/>WORD (Eingangs Daten)</text:span></text:p>
      <text:p text:style-name="P179"><text:tab/>POS : INT (Position)</text:p>
      <text:p text:style-name="P73"><draw:frame draw:style-name="fr3" draw:name="Grafik709" text:anchor-type="paragraph" svg:x="1.067cm" svg:y="0.667cm" svg:width="5.279cm" svg:height="1.39cm" draw:z-index="710"><draw:image xlink:href="Pictures/100000000000018F00000069A6810DE8.png" xlink:type="simple" xlink:show="embed" xlink:actuate="onLoad"/></draw:frame>Output<text:tab/>WORD (Ausgangsbyte)</text:p>
      <text:p text:style-name="P183"><text:line-break/>BIT_TOGGLE_W invertiert ein mit POS spezifiziertes Bit von IN.</text:p>
      <text:p text:style-name="P183">BIT_TOGGLE_B(2#0000_1111, 2) = 2#0000_1011</text:p>
      <text:p text:style-name="P73">BIT_TOGGLE_B(2#0000_1111, 7) = 2#1000_1111</text:p>
      <text:p text:style-name="P183"/>
      <text:p text:style-name="P183"/>
      <text:list xml:id="list38464273" text:continue-numbering="true" text:style-name="L1">
        <text:list-item>
          <text:list>
            <text:list-item>
              <text:h text:style-name="P216" text:outline-level="2"><text:soft-page-break/><text:alphabetical-index-mark-start text:id="IMark225902392"/>BYTE_OF_BIT<text:alphabetical-index-mark-end text:id="IMark225902392"/></text:h>
            </text:list-item>
          </text:list>
        </text:list-item>
      </text:list>
      <text:p text:style-name="P69">Type<text:tab/>Funktion : BYTE</text:p>
      <text:p text:style-name="P66"><text:span text:style-name="T15">Input</text:span><text:span text:style-name="T14"><text:tab/>B0 .. B7 : BOOL (Eingangs Bits)</text:span></text:p>
      <text:p text:style-name="P73">Output<text:tab/>BYTE (Ausgangsbyte)</text:p>
      <text:p text:style-name="P73"><draw:frame draw:style-name="fr3" draw:name="Grafik107" text:anchor-type="paragraph" svg:x="1.115cm" svg:y="0.192cm" svg:width="4.521cm" svg:height="4.27cm" draw:z-index="68"><draw:image xlink:href="Pictures/10000000000001560000014324105CD4.png" xlink:type="simple" xlink:show="embed" xlink:actuate="onLoad"/></draw:frame><text:line-break/>BYTE_OF_BIT setzt ein Byte aus 8 einzelnen Bits (B0 .. B7) zusammen.</text:p>
      <text:list xml:id="list38471522" text:continue-numbering="true" text:style-name="L1">
        <text:list-item>
          <text:list>
            <text:list-item>
              <text:h text:style-name="P216" text:outline-level="2"><text:alphabetical-index-mark-start text:id="IMark225902392"/>BYTE_OF_DWORD<text:alphabetical-index-mark-end text:id="IMark225902392"/></text:h>
            </text:list-item>
          </text:list>
        </text:list-item>
      </text:list>
      <text:p text:style-name="P69">Type<text:tab/>Funktion : BYTE</text:p>
      <text:p text:style-name="P66"><text:span text:style-name="T15">Input</text:span><text:span text:style-name="T14"><text:tab/>IN : DWORD (Eingangs-DWORD)</text:span></text:p>
      <text:p text:style-name="P73"><draw:frame draw:style-name="fr3" draw:name="Grafik108" text:anchor-type="paragraph" svg:x="1.078cm" svg:y="0.684cm" svg:width="5.42cm" svg:height="1.57cm" draw:z-index="69"><draw:image xlink:href="Pictures/100000000000019A000000779CD846BB.png" xlink:type="simple" xlink:show="embed" xlink:actuate="onLoad"/></draw:frame>Output<text:tab/>BYTE (Ausgangsbyte)</text:p>
      <text:p text:style-name="P73"><text:line-break/>BYTE_OF_DWORD extrahiert ein Byte (B0 .. B3) aus einem DWORD. Die einzelnen Bytes werden mit 0 - 3 am Eingang IN ausgewählt.</text:p>
      <text:p text:style-name="P183"/>
      <text:p text:style-name="P183"/>
      <text:list xml:id="list38454249" text:continue-numbering="true" text:style-name="L1">
        <text:list-item>
          <text:list>
            <text:list-item>
              <text:h text:style-name="P216" text:outline-level="2"><text:soft-page-break/><text:alphabetical-index-mark-start text:id="IMark225902392"/>BYTE_TO_BIT<text:alphabetical-index-mark-end text:id="IMark225902392"/></text:h>
            </text:list-item>
          </text:list>
        </text:list-item>
      </text:list>
      <text:p text:style-name="P69">Type<text:tab/>Funktionsbaustein</text:p>
      <text:p text:style-name="P66"><text:span text:style-name="T15">Input</text:span><text:span text:style-name="T14"><text:tab/>IN : DWORD (Eingangs Byte)</text:span></text:p>
      <text:p text:style-name="P73">Output<text:tab/>B0 .. B7 : BOOL (Ausgangs Bits)</text:p>
      <text:p text:style-name="P73"><draw:frame draw:style-name="fr3" draw:name="Grafik109" text:anchor-type="paragraph" svg:x="1.185cm" svg:y="0.236cm" svg:width="2.731cm" svg:height="4.44cm" draw:z-index="70"><draw:image xlink:href="Pictures/10000000000000CE00000150854833EC.png" xlink:type="simple" xlink:show="embed" xlink:actuate="onLoad"/></draw:frame><text:line-break/>BYTE_TO_BIT zerlegt ein Byte (IN) in seine einzelnen Bits (B0 .. B7). Der Eingang IN ist als DWORD definiert, um wahlweise Byte, Word oder DWORD am Eingang verarbeiten zu können. Wird ein Word oder DWORD am Eingang verwendet, so werden nur die Bits 0..7 verarbeitet. Ein DWORD kann dann mit dem Standardbefehl SHR <text:s/>um 8 Bits nach Rechts verschoben und so das nächste Byte verarbeitet werden.</text:p>
      <text:list xml:id="list38465387" text:continue-numbering="true" text:style-name="L1">
        <text:list-item>
          <text:list>
            <text:list-item>
              <text:h text:style-name="P216" text:outline-level="2"><text:alphabetical-index-mark-start text:id="IMark225902392"/>CHECK_PARITY<text:alphabetical-index-mark-end text:id="IMark225902392"/></text:h>
            </text:list-item>
          </text:list>
        </text:list-item>
      </text:list>
      <text:p text:style-name="P69">Type<text:tab/>Funktion : BOOL</text:p>
      <text:p text:style-name="P66"><text:span text:style-name="T15">Input</text:span><text:span text:style-name="T14"><text:tab/>IN : BYTE (Eingangsbyte)</text:span></text:p>
      <text:p text:style-name="P173"><text:span text:style-name="T14"><text:tab/>P : BOOL (</text:span><text:span text:style-name="T15">Parity-</text:span><text:span text:style-name="T14">Bit)</text:span></text:p>
      <text:p text:style-name="P66"><draw:frame draw:style-name="fr3" draw:name="Grafik110" text:anchor-type="paragraph" svg:x="1.067cm" svg:y="0.656cm" svg:width="4.521cm" svg:height="1.57cm" draw:z-index="71"><draw:image xlink:href="Pictures/1000000000000156000000777000D7DB.png" xlink:type="simple" xlink:show="embed" xlink:actuate="onLoad"/></draw:frame><text:span text:style-name="T21">Output<text:tab/>BYTE (Ausgang ist bei gerader Parität </text:span><text:span text:style-name="T21">TRUE</text:span><text:span text:style-name="T21">)</text:span></text:p>
      <text:p text:style-name="P66"><text:span text:style-name="T21"><text:line-break/>CHECK_PARITY überprüft ein Eingangsbyte IN und ein zugehöriges </text:span><text:span text:style-name="T16">Parity-</text:span><text:span text:style-name="T21">Bit P auf gerade Parität. Der Ausgang ist TRUE, wenn die Anzahl der Bits im Byte IN die den Wert TRUE besitzen zusammen mit dem </text:span><text:span text:style-name="T16">Parity-</text:span><text:span text:style-name="T21">Bit P eine gerade Anzahl ergeben.</text:span></text:p>
      <text:p text:style-name="P161"><draw:frame draw:style-name="fr3" draw:name="Grafik111" text:anchor-type="paragraph" svg:x="1.062cm" svg:y="0.61cm" svg:width="12.531cm" svg:height="1.589cm" draw:z-index="72"><draw:image xlink:href="Pictures/10000000000003B30000007886A5752B.png" xlink:type="simple" xlink:show="embed" xlink:actuate="onLoad"/></draw:frame><text:soft-page-break/><text:span text:style-name="T22">Beispiel</text:span><text:span text:style-name="T14"> für Ausgang = TRUE:</text:span></text:p>
      <text:p text:style-name="P39">Beispiel für Ausgang = FALSE:</text:p>
      <text:p text:style-name="P39"><draw:frame draw:style-name="fr3" draw:name="Grafik112" text:anchor-type="paragraph" svg:x="1.106cm" svg:y="0.085cm" svg:width="12.531cm" svg:height="1.589cm" draw:z-index="73"><draw:image xlink:href="Pictures/10000000000003B300000078EE2DF6DA.png" xlink:type="simple" xlink:show="embed" xlink:actuate="onLoad"/></draw:frame></text:p>
      <text:list xml:id="list38455903" text:continue-numbering="true" text:style-name="L1">
        <text:list-item>
          <text:list>
            <text:list-item>
              <text:h text:style-name="P216" text:outline-level="2"><text:alphabetical-index-mark-start text:id="IMark225902392"/>CRC_CHECK<text:alphabetical-index-mark-end text:id="IMark225902392"/></text:h>
            </text:list-item>
          </text:list>
        </text:list-item>
      </text:list>
      <text:p text:style-name="P2">Type<text:tab/><text:span text:style-name="T11">Funktion</text:span> : BOOL</text:p>
      <text:p text:style-name="P66"><text:span text:style-name="T15">Input</text:span><text:span text:style-name="T14"><text:tab/>PT : POINTER TO ARRAY OF BYTE (Eingangsbyte)</text:span></text:p>
      <text:p text:style-name="P66"><text:span text:style-name="T14"><text:tab/>SIZE : INT (Größe des </text:span><text:span text:style-name="T15">Arrays</text:span><text:span text:style-name="T14">)</text:span></text:p>
      <text:p text:style-name="P73">Config<text:tab/>POLYNOM_L : DWORD (unterste 32 Bit des Polynoms)</text:p>
      <text:p text:style-name="P73"><text:tab/>POLYNOM_32 : BOOL (Bit 32 des Polynoms)</text:p>
      <text:p text:style-name="P73"><draw:frame draw:style-name="fr3" draw:name="Grafik308" text:anchor-type="paragraph" svg:x="1.041cm" svg:y="0.732cm" svg:width="4.971cm" svg:height="1.57cm" draw:z-index="266"><draw:image xlink:href="Pictures/1000000000000178000000779AD6E6C3.png" xlink:type="simple" xlink:show="embed" xlink:actuate="onLoad"/></draw:frame>Output<text:tab/>BOOL (Ausgang ist TRUE, wenn die CRC-Checksumme = 0)</text:p>
      <text:p text:style-name="P66"><text:span text:style-name="T21"><text:line-break/>CRC_CHECK prüft ein Array </text:span><text:span text:style-name="T16">of</text:span><text:span text:style-name="T21"> Byte auf eine gültige CRC Checksumme und liefert TRUE, wenn die Checksumme 0 ergibt und der Datenblock fehlerfrei vorliegt. Beim Aufruf wird der Funktion ein </text:span><text:span text:style-name="T16">Pointer</text:span><text:span text:style-name="T21"> auf das zu bearbeitende Array und dessen Größe in Bytes übergeben. Unter CoDeSys lautet der Aufruf: CRC_CHECK(ADR(Array), SIZEOF(Array)), wobei Array der Name des zu prüfenden Arrays ist. ADR ist eine Standardfunktion, die den </text:span><text:span text:style-name="T16">Pointer</text:span><text:span text:style-name="T21"> auf das Array ermittelt und SIZEOF ist eine Standardfunktion, die die Größe des Arrays ermittelt. CRC_CKECK benötigt als Eingang das Datenarray mit angehängter CRC-Checksumme. Mit den Config-Variablen POLYNOM_L und POLYNOM_32 wird das CRC Polynom definiert. Das Polynom kann ein beliebiges POLYNOM von maximal 33 Bit Länge sein. Ein Polynom X³ + X² + 1 wird mit 1101 dargestellt. Es können Polynome bis 33 Bit Länge (CRC 32) verarbeitet werden. Das 33te Bit wird dabei in POLYNOM_32 gespeichert. Weitere Infos und Daten zu gebräuchlichen Polynomen können unter CRC_GEN nachgeschlagen werden.</text:span></text:p>
      <text:list xml:id="list38461509" text:continue-numbering="true" text:style-name="L1">
        <text:list-item>
          <text:list>
            <text:list-item>
              <text:h text:style-name="P216" text:outline-level="2"><text:soft-page-break/><text:alphabetical-index-mark-start text:id="IMark225902392"/>CRC_GEN<text:alphabetical-index-mark-end text:id="IMark225902392"/></text:h>
            </text:list-item>
          </text:list>
        </text:list-item>
      </text:list>
      <text:p text:style-name="P2">Type<text:tab/><text:span text:style-name="T12">Funktion</text:span> : DWORD</text:p>
      <text:p text:style-name="P66"><text:span text:style-name="T15">Input</text:span><text:span text:style-name="T14"><text:tab/>PT : POINTER TO ARRAY OF BYTE (Datenpaket)</text:span></text:p>
      <text:p text:style-name="P66"><text:span text:style-name="T14"><text:tab/>SIZE : INT (Größe des </text:span><text:span text:style-name="T15">Arrays</text:span><text:span text:style-name="T14">)</text:span></text:p>
      <text:p text:style-name="P73">Config<text:tab/>POLYNOM_L : DWORD (unterste 32 Bits des Polynoms)</text:p>
      <text:p text:style-name="P73"><text:tab/>POLYNOM_32 : BOOL (Bit 32 des Polynoms)</text:p>
      <text:p text:style-name="P183"><text:tab/>INIT : DWORD (INIT Daten)</text:p>
      <text:p text:style-name="P183"><text:tab/>XOR_OUT : DWORD (Letztes XOR des Ausgangs)</text:p>
      <text:p text:style-name="P183"><text:tab/>REV_IN : BOOL (Eingangsdaten Bytes Umkehren)</text:p>
      <text:p text:style-name="P183"><text:tab/>REV_OUT : (Ausgangsdaten Umkehren)</text:p>
      <text:p text:style-name="P73"><draw:frame draw:style-name="fr3" draw:name="Grafik307" text:anchor-type="paragraph" svg:x="1.122cm" svg:y="0.681cm" svg:width="4.069cm" svg:height="1.57cm" draw:z-index="307"><draw:image xlink:href="Pictures/100000000000013400000077F2AF2F3D.png" xlink:type="simple" xlink:show="embed" xlink:actuate="onLoad"/></draw:frame>Output<text:tab/>DWORD (errechnete CRC-Checksumme)</text:p>
      <text:p text:style-name="P66"><text:span text:style-name="T21"><text:line-break/>CRC_GEN generiert eine CRC-Checksumme aus einen beliebig großen Array </text:span><text:span text:style-name="T16">of</text:span><text:span text:style-name="T21"> Byte. Beim Aufruf wird der Funktion ein </text:span><text:span text:style-name="T16">Pointer</text:span><text:span text:style-name="T21"> auf das zu bearbeitende Array und dessen Größe in Bytes übergeben. Unter CoDeSys lautet der Aufruf: CRC_GEN(ADR(Array), SIZEOF(Array)), wobei Array der Name des zu bearbeitenden Arrays ist. ADR ist eine Standardfunktion, die den </text:span><text:span text:style-name="T16">Pointer</text:span><text:span text:style-name="T21"> auf das Array ermittelt und SIZEOF ist eine Standardfunktion, die die Größe des Arrays ermittelt. Das Polynom kann ein beliebiges POLYNOM bis maximal 33 Bit Länge sein. Ein Polynom X³ + X² + 1 wird mit 1101 dargestellt. Es können Polynome bis 33 Bit Länge (CRC 32) verarbeitet werden. Das 33te Bit wird dabei in POLYNOM_32 gespeichert. Durch den Setup Wert INIT kann dem Datenwort eine beliebige Bitfolge vorangestellt werden, üblich sind hier 0000 und FFFF. Der Setup Parameter XOR_OUT legt fest mit welcher Bitfolge die Checksumme am Ende mit XOR verknüpft wird. Die weiter unten folgende CRC Tabelle gibt nähere Auskunft über die Verwendung von INIT und XOR_OUT. Wenn der Setup Wert REV_IN auf TRUE gesetzt wird so wird jedes Byte im Datenstrom Umgedreht, Bit0 wird zu Bit 7, Bit 1 wird zu Bit 6 und so weiter. mit REV_OUT auf TRUE gesetzt bewirkt dies die Umkehrung der generierten CRC Checksumme.</text:span></text:p>
      <text:p text:style-name="P73">Gebräuchliche Polynome: Die Spalten P32 und POLYNOM_L geben die Werte an, die für das entsprechende Polynom in den Config-Variablen abzuspeichern sind. POLYNOM_L ist alternativ als Dezimalwert angegeben, um die umständliche 32-Bit-Zahl einfacher darzustellen.</text:p>
      <table:table table:name="Tabelle11" table:style-name="Tabelle11">
        <table:table-column table:style-name="Tabelle11.A"/>
        <table:table-column table:style-name="Tabelle11.B"/>
        <table:table-column table:style-name="Tabelle11.C"/>
        <table:table-column table:style-name="Tabelle11.D"/>
        <table:table-column table:style-name="Tabelle11.E"/>
        <table:table-column table:style-name="Tabelle11.F"/>
        <table:table-column table:style-name="Tabelle11.G"/>
        <table:table-column table:style-name="Tabelle11.H"/>
        <table:table-column table:style-name="Tabelle11.I"/>
        <table:table-row table:style-name="Tabelle11.1">
          <table:table-cell table:style-name="Tabelle11.A1" office:value-type="string">
            <text:p text:style-name="P197">CRC</text:p>
          </table:table-cell>
          <table:table-cell table:style-name="Tabelle11.A1" office:value-type="string">
            <text:p text:style-name="P198">Polynom</text:p>
          </table:table-cell>
          <table:table-cell table:style-name="Tabelle11.A1" office:value-type="string">
            <text:p text:style-name="P198">initial HEX</text:p>
          </table:table-cell>
          <table:table-cell table:style-name="Tabelle11.A1" office:value-type="string">
            <text:p text:style-name="P198">XOR_OUT</text:p>
          </table:table-cell>
          <table:table-cell table:style-name="Tabelle11.A1" office:value-type="string">
            <text:p text:style-name="P201">REV<text:line-break/>IN</text:p>
          </table:table-cell>
          <table:table-cell table:style-name="Tabelle11.A1" office:value-type="string">
            <text:p text:style-name="P201">REV<text:line-break/>OUT</text:p>
          </table:table-cell>
          <table:table-cell table:style-name="Tabelle11.A1" office:value-type="string">
            <text:p text:style-name="P201">P32</text:p>
          </table:table-cell>
          <table:table-cell table:style-name="Tabelle11.A1" office:value-type="string">
            <text:p text:style-name="P202">Polynom_L</text:p>
          </table:table-cell>
          <table:table-cell table:style-name="Tabelle11.I1" office:value-type="string">
            <text:p text:style-name="P203">Polynom_L (DEC)</text:p>
          </table:table-cell>
        </table:table-row>
        <text:soft-page-break/>
        <table:table-row table:style-name="Tabelle11.1">
          <table:table-cell table:style-name="Tabelle11.A2" office:value-type="string">
            <text:p text:style-name="P197">CRC-4-ITU<text:line-break/>ITU G.704, <text:line-break/>p. 12 </text:p>
          </table:table-cell>
          <table:table-cell table:style-name="Tabelle11.A2" office:value-type="string">
            <text:p text:style-name="P198">x4 + x + 1 <text:tab/></text:p>
          </table:table-cell>
          <table:table-cell table:style-name="Tabelle11.A2" office:value-type="string">
            <text:p text:style-name="P198"/>
          </table:table-cell>
          <table:table-cell table:style-name="Tabelle11.A2" office:value-type="string">
            <text:p text:style-name="P198"/>
          </table:table-cell>
          <table:table-cell table:style-name="Tabelle11.A2" office:value-type="string">
            <text:p text:style-name="P200"/>
          </table:table-cell>
          <table:table-cell table:style-name="Tabelle11.A2" office:value-type="string">
            <text:p text:style-name="P200"/>
          </table:table-cell>
          <table:table-cell table:style-name="Tabelle11.A2" office:value-type="string">
            <text:p text:style-name="P200">0</text:p>
          </table:table-cell>
          <table:table-cell table:style-name="Tabelle11.A2" office:value-type="string">
            <text:p text:style-name="P202">00000000 00000000 00000000 00010011</text:p>
          </table:table-cell>
          <table:table-cell table:style-name="Tabelle11.I2" office:value-type="string">
            <text:p text:style-name="P203">19</text:p>
          </table:table-cell>
        </table:table-row>
        <table:table-row table:style-name="Tabelle11.1">
          <table:table-cell table:style-name="Tabelle11.A2" office:value-type="string">
            <text:p text:style-name="P197">CRC-5-ITU<text:line-break/>ITU G.704, p. 9<text:line-break/>Bluetooth</text:p>
          </table:table-cell>
          <table:table-cell table:style-name="Tabelle11.A2" office:value-type="string">
            <text:p text:style-name="P198">x5 + x4 + x2 + 1 </text:p>
          </table:table-cell>
          <table:table-cell table:style-name="Tabelle11.A2" office:value-type="string">
            <text:p text:style-name="P198"/>
          </table:table-cell>
          <table:table-cell table:style-name="Tabelle11.A2" office:value-type="string">
            <text:p text:style-name="P198"/>
          </table:table-cell>
          <table:table-cell table:style-name="Tabelle11.A2" office:value-type="string">
            <text:p text:style-name="P200"/>
          </table:table-cell>
          <table:table-cell table:style-name="Tabelle11.A2" office:value-type="string">
            <text:p text:style-name="P200"/>
          </table:table-cell>
          <table:table-cell table:style-name="Tabelle11.A2" office:value-type="string">
            <text:p text:style-name="P200">0</text:p>
          </table:table-cell>
          <table:table-cell table:style-name="Tabelle11.A2" office:value-type="string">
            <text:p text:style-name="P202">00000000 00000000 00000000 00110101</text:p>
          </table:table-cell>
          <table:table-cell table:style-name="Tabelle11.I2" office:value-type="string">
            <text:p text:style-name="P203">53</text:p>
          </table:table-cell>
        </table:table-row>
        <table:table-row table:style-name="Tabelle11.1">
          <table:table-cell table:style-name="Tabelle11.A2" office:value-type="string">
            <text:p text:style-name="P197">CRC-5-USB<text:line-break/>USB token packets</text:p>
          </table:table-cell>
          <table:table-cell table:style-name="Tabelle11.A2" office:value-type="string">
            <text:p text:style-name="P198">x5 + x2 + 1 </text:p>
          </table:table-cell>
          <table:table-cell table:style-name="Tabelle11.A2" office:value-type="string">
            <text:p text:style-name="P198"/>
          </table:table-cell>
          <table:table-cell table:style-name="Tabelle11.A2" office:value-type="string">
            <text:p text:style-name="P198"/>
          </table:table-cell>
          <table:table-cell table:style-name="Tabelle11.A2" office:value-type="string">
            <text:p text:style-name="P200"/>
          </table:table-cell>
          <table:table-cell table:style-name="Tabelle11.A2" office:value-type="string">
            <text:p text:style-name="P200"/>
          </table:table-cell>
          <table:table-cell table:style-name="Tabelle11.A2" office:value-type="string">
            <text:p text:style-name="P200">0</text:p>
          </table:table-cell>
          <table:table-cell table:style-name="Tabelle11.A2" office:value-type="string">
            <text:p text:style-name="P202">00000000 00000000 00000000 00100101</text:p>
          </table:table-cell>
          <table:table-cell table:style-name="Tabelle11.I2" office:value-type="string">
            <text:p text:style-name="P203">37</text:p>
          </table:table-cell>
        </table:table-row>
        <table:table-row table:style-name="Tabelle11.5">
          <table:table-cell table:style-name="Tabelle11.A2" office:value-type="string">
            <text:p text:style-name="P197">CRC-6-ITU<text:line-break/>ITU G.704, p. 3</text:p>
          </table:table-cell>
          <table:table-cell table:style-name="Tabelle11.A2" office:value-type="string">
            <text:p text:style-name="P198">x6 + x + 1 <text:tab/></text:p>
          </table:table-cell>
          <table:table-cell table:style-name="Tabelle11.A2" office:value-type="string">
            <text:p text:style-name="P198"/>
          </table:table-cell>
          <table:table-cell table:style-name="Tabelle11.A2" office:value-type="string">
            <text:p text:style-name="P198"/>
          </table:table-cell>
          <table:table-cell table:style-name="Tabelle11.A2" office:value-type="string">
            <text:p text:style-name="P200"/>
          </table:table-cell>
          <table:table-cell table:style-name="Tabelle11.A2" office:value-type="string">
            <text:p text:style-name="P200"/>
          </table:table-cell>
          <table:table-cell table:style-name="Tabelle11.A2" office:value-type="string">
            <text:p text:style-name="P200">0</text:p>
          </table:table-cell>
          <table:table-cell table:style-name="Tabelle11.A2" office:value-type="string">
            <text:p text:style-name="P202">00000000 00000000 00000000 01000011</text:p>
          </table:table-cell>
          <table:table-cell table:style-name="Tabelle11.I2" office:value-type="string">
            <text:p text:style-name="P203">67</text:p>
          </table:table-cell>
        </table:table-row>
        <table:table-row table:style-name="Tabelle11.1">
          <table:table-cell table:style-name="Tabelle11.A2" office:value-type="string">
            <text:p text:style-name="P197">CRC-7<text:line-break/>telecom, MMC</text:p>
          </table:table-cell>
          <table:table-cell table:style-name="Tabelle11.A2" office:value-type="string">
            <text:p text:style-name="P198">x7 + x3 + 1</text:p>
          </table:table-cell>
          <table:table-cell table:style-name="Tabelle11.A2" office:value-type="string">
            <text:p text:style-name="P198"/>
          </table:table-cell>
          <table:table-cell table:style-name="Tabelle11.A2" office:value-type="string">
            <text:p text:style-name="P198"/>
          </table:table-cell>
          <table:table-cell table:style-name="Tabelle11.A2" office:value-type="string">
            <text:p text:style-name="P200"/>
          </table:table-cell>
          <table:table-cell table:style-name="Tabelle11.A2" office:value-type="string">
            <text:p text:style-name="P200"/>
          </table:table-cell>
          <table:table-cell table:style-name="Tabelle11.A2" office:value-type="string">
            <text:p text:style-name="P200">0</text:p>
          </table:table-cell>
          <table:table-cell table:style-name="Tabelle11.A2" office:value-type="string">
            <text:p text:style-name="P202">00000000 00000000 00000000 10001001</text:p>
          </table:table-cell>
          <table:table-cell table:style-name="Tabelle11.I2" office:value-type="string">
            <text:p text:style-name="P203">137</text:p>
          </table:table-cell>
        </table:table-row>
        <table:table-row table:style-name="Tabelle11.1">
          <table:table-cell table:style-name="Tabelle11.A2" office:value-type="string">
            <text:p text:style-name="P197">CRC-8-ATM<text:line-break/>ATM HEC</text:p>
          </table:table-cell>
          <table:table-cell table:style-name="Tabelle11.A2" office:value-type="string">
            <text:p text:style-name="P198">x8 + x2 + x + 1</text:p>
          </table:table-cell>
          <table:table-cell table:style-name="Tabelle11.A2" office:value-type="string">
            <text:p text:style-name="P198">00</text:p>
          </table:table-cell>
          <table:table-cell table:style-name="Tabelle11.A2" office:value-type="string">
            <text:p text:style-name="P198">00</text:p>
          </table:table-cell>
          <table:table-cell table:style-name="Tabelle11.A2" office:value-type="string">
            <text:p text:style-name="P200">0</text:p>
          </table:table-cell>
          <table:table-cell table:style-name="Tabelle11.A2" office:value-type="string">
            <text:p text:style-name="P200">0</text:p>
          </table:table-cell>
          <table:table-cell table:style-name="Tabelle11.A2" office:value-type="string">
            <text:p text:style-name="P200">0</text:p>
          </table:table-cell>
          <table:table-cell table:style-name="Tabelle11.A2" office:value-type="string">
            <text:p text:style-name="P202">00000000 00000000 00000001 00000111</text:p>
          </table:table-cell>
          <table:table-cell table:style-name="Tabelle11.I2" office:value-type="string">
            <text:p text:style-name="P203">263</text:p>
          </table:table-cell>
        </table:table-row>
        <table:table-row table:style-name="Tabelle11.1">
          <table:table-cell table:style-name="Tabelle11.A2" office:value-type="string">
            <text:p text:style-name="P197">CRC-8-CCITT<text:line-break/>1-Wire bus</text:p>
          </table:table-cell>
          <table:table-cell table:style-name="Tabelle11.A2" office:value-type="string">
            <text:p text:style-name="P198">x8 + x7 + x3 + x2 + 1 </text:p>
          </table:table-cell>
          <table:table-cell table:style-name="Tabelle11.A2" office:value-type="string">
            <text:p text:style-name="P198"/>
          </table:table-cell>
          <table:table-cell table:style-name="Tabelle11.A2" office:value-type="string">
            <text:p text:style-name="P198"/>
          </table:table-cell>
          <table:table-cell table:style-name="Tabelle11.A2" office:value-type="string">
            <text:p text:style-name="P200"/>
          </table:table-cell>
          <table:table-cell table:style-name="Tabelle11.A2" office:value-type="string">
            <text:p text:style-name="P200"/>
          </table:table-cell>
          <table:table-cell table:style-name="Tabelle11.A2" office:value-type="string">
            <text:p text:style-name="P200">0</text:p>
          </table:table-cell>
          <table:table-cell table:style-name="Tabelle11.A2" office:value-type="string">
            <text:p text:style-name="P202">00000000 00000000 00000001 10001101</text:p>
          </table:table-cell>
          <table:table-cell table:style-name="Tabelle11.I2" office:value-type="string">
            <text:p text:style-name="P203">397</text:p>
          </table:table-cell>
        </table:table-row>
        <table:table-row table:style-name="Tabelle11.1">
          <table:table-cell table:style-name="Tabelle11.A2" office:value-type="string">
            <text:p text:style-name="P197">CRC-8<text:line-break/>1-Wire bus<text:line-break/>Dallas/Maxim</text:p>
          </table:table-cell>
          <table:table-cell table:style-name="Tabelle11.A2" office:value-type="string">
            <text:p text:style-name="P198">x8 + x5 + x4 + 1</text:p>
          </table:table-cell>
          <table:table-cell table:style-name="Tabelle11.A2" office:value-type="string">
            <text:p text:style-name="P198"/>
          </table:table-cell>
          <table:table-cell table:style-name="Tabelle11.A2" office:value-type="string">
            <text:p text:style-name="P198"/>
          </table:table-cell>
          <table:table-cell table:style-name="Tabelle11.A2" office:value-type="string">
            <text:p text:style-name="P200"/>
          </table:table-cell>
          <table:table-cell table:style-name="Tabelle11.A2" office:value-type="string">
            <text:p text:style-name="P200"/>
          </table:table-cell>
          <table:table-cell table:style-name="Tabelle11.A2" office:value-type="string">
            <text:p text:style-name="P200">0</text:p>
          </table:table-cell>
          <table:table-cell table:style-name="Tabelle11.A2" office:value-type="string">
            <text:p text:style-name="P202">00000000 00000000 00000001 00110001</text:p>
          </table:table-cell>
          <table:table-cell table:style-name="Tabelle11.I2" office:value-type="string">
            <text:p text:style-name="P203">305</text:p>
            <text:p text:style-name="P204"/>
          </table:table-cell>
        </table:table-row>
        <table:table-row table:style-name="Tabelle11.1">
          <table:table-cell table:style-name="Tabelle11.A2" office:value-type="string">
            <text:p text:style-name="P197">CRC-8 </text:p>
          </table:table-cell>
          <table:table-cell table:style-name="Tabelle11.A2" office:value-type="string">
            <text:p text:style-name="P198">x8 + x7 + x6 + x4 + x2 + 1</text:p>
          </table:table-cell>
          <table:table-cell table:style-name="Tabelle11.A2" office:value-type="string">
            <text:p text:style-name="P198"/>
          </table:table-cell>
          <table:table-cell table:style-name="Tabelle11.A2" office:value-type="string">
            <text:p text:style-name="P198"/>
          </table:table-cell>
          <table:table-cell table:style-name="Tabelle11.A2" office:value-type="string">
            <text:p text:style-name="P200"/>
          </table:table-cell>
          <table:table-cell table:style-name="Tabelle11.A2" office:value-type="string">
            <text:p text:style-name="P200"/>
          </table:table-cell>
          <table:table-cell table:style-name="Tabelle11.A2" office:value-type="string">
            <text:p text:style-name="P200">0</text:p>
          </table:table-cell>
          <table:table-cell table:style-name="Tabelle11.A2" office:value-type="string">
            <text:p text:style-name="P202">00000000 00000000 00000001 11010101</text:p>
          </table:table-cell>
          <table:table-cell table:style-name="Tabelle11.I2" office:value-type="string">
            <text:p text:style-name="P203">469</text:p>
          </table:table-cell>
        </table:table-row>
        <table:table-row table:style-name="Tabelle11.1">
          <table:table-cell table:style-name="Tabelle11.A2" office:value-type="string">
            <text:p text:style-name="P197">CRC-8<text:line-break/>SAE J1850</text:p>
          </table:table-cell>
          <table:table-cell table:style-name="Tabelle11.A2" office:value-type="string">
            <text:p text:style-name="P198">x8 + x4 + x3 + x2 + 1</text:p>
          </table:table-cell>
          <table:table-cell table:style-name="Tabelle11.A2" office:value-type="string">
            <text:p text:style-name="P198"/>
          </table:table-cell>
          <table:table-cell table:style-name="Tabelle11.A2" office:value-type="string">
            <text:p text:style-name="P198"/>
          </table:table-cell>
          <table:table-cell table:style-name="Tabelle11.A2" office:value-type="string">
            <text:p text:style-name="P200"/>
          </table:table-cell>
          <table:table-cell table:style-name="Tabelle11.A2" office:value-type="string">
            <text:p text:style-name="P200"/>
          </table:table-cell>
          <table:table-cell table:style-name="Tabelle11.A2" office:value-type="string">
            <text:p text:style-name="P200">0</text:p>
          </table:table-cell>
          <table:table-cell table:style-name="Tabelle11.A2" office:value-type="string">
            <text:p text:style-name="P202">00000000 00000000 00000001 00011101</text:p>
          </table:table-cell>
          <table:table-cell table:style-name="Tabelle11.I2" office:value-type="string">
            <text:p text:style-name="P203">285</text:p>
          </table:table-cell>
        </table:table-row>
        <table:table-row table:style-name="Tabelle11.1">
          <table:table-cell table:style-name="Tabelle11.A2" office:value-type="string">
            <text:p text:style-name="P197">CRC-10 </text:p>
          </table:table-cell>
          <table:table-cell table:style-name="Tabelle11.A2" office:value-type="string">
            <text:p text:style-name="P198">x10 + x9 + x5 + x4 + x + 1</text:p>
          </table:table-cell>
          <table:table-cell table:style-name="Tabelle11.A2" office:value-type="string">
            <text:p text:style-name="P198"/>
          </table:table-cell>
          <table:table-cell table:style-name="Tabelle11.A2" office:value-type="string">
            <text:p text:style-name="P198"/>
          </table:table-cell>
          <table:table-cell table:style-name="Tabelle11.A2" office:value-type="string">
            <text:p text:style-name="P200"/>
          </table:table-cell>
          <table:table-cell table:style-name="Tabelle11.A2" office:value-type="string">
            <text:p text:style-name="P200"/>
          </table:table-cell>
          <table:table-cell table:style-name="Tabelle11.A2" office:value-type="string">
            <text:p text:style-name="P200">0</text:p>
          </table:table-cell>
          <table:table-cell table:style-name="Tabelle11.A2" office:value-type="string">
            <text:p text:style-name="P202">00000000 00000000 00000110 00110011</text:p>
          </table:table-cell>
          <table:table-cell table:style-name="Tabelle11.I2" office:value-type="string">
            <text:p text:style-name="P203">1587</text:p>
          </table:table-cell>
        </table:table-row>
        <table:table-row table:style-name="Tabelle11.1">
          <table:table-cell table:style-name="Tabelle11.A2" office:value-type="string">
            <text:p text:style-name="P197">CRC-12<text:line-break/>telecom systems</text:p>
          </table:table-cell>
          <table:table-cell table:style-name="Tabelle11.A2" office:value-type="string">
            <text:p text:style-name="P198">x12 + x11 + x3 + x2 + x + 1</text:p>
          </table:table-cell>
          <table:table-cell table:style-name="Tabelle11.A2" office:value-type="string">
            <text:p text:style-name="P198"/>
          </table:table-cell>
          <table:table-cell table:style-name="Tabelle11.A2" office:value-type="string">
            <text:p text:style-name="P198"/>
          </table:table-cell>
          <table:table-cell table:style-name="Tabelle11.A2" office:value-type="string">
            <text:p text:style-name="P200"/>
          </table:table-cell>
          <table:table-cell table:style-name="Tabelle11.A2" office:value-type="string">
            <text:p text:style-name="P200"/>
          </table:table-cell>
          <table:table-cell table:style-name="Tabelle11.A2" office:value-type="string">
            <text:p text:style-name="P200">0</text:p>
          </table:table-cell>
          <table:table-cell table:style-name="Tabelle11.A2" office:value-type="string">
            <text:p text:style-name="P202">00000000 00000000 00011000 00001111</text:p>
          </table:table-cell>
          <table:table-cell table:style-name="Tabelle11.I2" office:value-type="string">
            <text:p text:style-name="P203">6159</text:p>
          </table:table-cell>
        </table:table-row>
        <text:soft-page-break/>
        <table:table-row table:style-name="Tabelle11.1">
          <table:table-cell table:style-name="Tabelle11.A2" office:value-type="string">
            <text:p text:style-name="P197">CRC-15<text:line-break/>CAN</text:p>
          </table:table-cell>
          <table:table-cell table:style-name="Tabelle11.A2" office:value-type="string">
            <text:p text:style-name="P199">x15 + x14 + x10 + x8 + x7 + x4 + x3 + 1 </text:p>
          </table:table-cell>
          <table:table-cell table:style-name="Tabelle11.A2" office:value-type="string">
            <text:p text:style-name="P198"/>
          </table:table-cell>
          <table:table-cell table:style-name="Tabelle11.A2" office:value-type="string">
            <text:p text:style-name="P198"/>
          </table:table-cell>
          <table:table-cell table:style-name="Tabelle11.A2" office:value-type="string">
            <text:p text:style-name="P200"/>
          </table:table-cell>
          <table:table-cell table:style-name="Tabelle11.A2" office:value-type="string">
            <text:p text:style-name="P200"/>
          </table:table-cell>
          <table:table-cell table:style-name="Tabelle11.A2" office:value-type="string">
            <text:p text:style-name="P200">0</text:p>
          </table:table-cell>
          <table:table-cell table:style-name="Tabelle11.A2" office:value-type="string">
            <text:p text:style-name="P202">00000000 00000000 11000101 10011001</text:p>
          </table:table-cell>
          <table:table-cell table:style-name="Tabelle11.I2" office:value-type="string">
            <text:p text:style-name="P203">50585</text:p>
          </table:table-cell>
        </table:table-row>
        <table:table-row table:style-name="Tabelle11.15">
          <table:table-cell table:style-name="Tabelle11.A2" office:value-type="string">
            <text:p text:style-name="P196">CRC-CCITT <text:line-break/>XMODEM, PPP, IRDA,<text:line-break/>Bluetooth, V41</text:p>
          </table:table-cell>
          <table:table-cell table:style-name="Tabelle11.A2" office:value-type="string">
            <text:p text:style-name="P199">x16 + x12 + x5 + 1 </text:p>
          </table:table-cell>
          <table:table-cell table:style-name="Tabelle11.A2" office:value-type="string">
            <text:p text:style-name="P198">FFFF</text:p>
          </table:table-cell>
          <table:table-cell table:style-name="Tabelle11.A2" office:value-type="string">
            <text:p text:style-name="P198">0000</text:p>
          </table:table-cell>
          <table:table-cell table:style-name="Tabelle11.A2" office:value-type="string">
            <text:p text:style-name="P200">0</text:p>
          </table:table-cell>
          <table:table-cell table:style-name="Tabelle11.A2" office:value-type="string">
            <text:p text:style-name="P200">0</text:p>
          </table:table-cell>
          <table:table-cell table:style-name="Tabelle11.A2" office:value-type="string">
            <text:p text:style-name="P200">0</text:p>
          </table:table-cell>
          <table:table-cell table:style-name="Tabelle11.A2" office:value-type="string">
            <text:p text:style-name="P202">00000000 00000001<text:line-break/>00010000 00100001</text:p>
          </table:table-cell>
          <table:table-cell table:style-name="Tabelle11.I2" office:value-type="string">
            <text:p text:style-name="P203">69665</text:p>
          </table:table-cell>
        </table:table-row>
        <table:table-row table:style-name="Tabelle11.15">
          <table:table-cell table:style-name="Tabelle11.A2" office:value-type="string">
            <text:p text:style-name="P196">CRC-16<text:line-break/>X25</text:p>
          </table:table-cell>
          <table:table-cell table:style-name="Tabelle11.A2" office:value-type="string">
            <text:p text:style-name="P199">x16 + x12 + x5 + 1 </text:p>
          </table:table-cell>
          <table:table-cell table:style-name="Tabelle11.A2" office:value-type="string">
            <text:p text:style-name="P198">FFFF</text:p>
          </table:table-cell>
          <table:table-cell table:style-name="Tabelle11.A2" office:value-type="string">
            <text:p text:style-name="P198">FFFF</text:p>
          </table:table-cell>
          <table:table-cell table:style-name="Tabelle11.A2" office:value-type="string">
            <text:p text:style-name="P200">1</text:p>
          </table:table-cell>
          <table:table-cell table:style-name="Tabelle11.A2" office:value-type="string">
            <text:p text:style-name="P200">1</text:p>
          </table:table-cell>
          <table:table-cell table:style-name="Tabelle11.A2" office:value-type="string">
            <text:p text:style-name="P200">0</text:p>
          </table:table-cell>
          <table:table-cell table:style-name="Tabelle11.A2" office:value-type="string">
            <text:p text:style-name="P202">00000000 00000001<text:line-break/>00010000 00100001</text:p>
          </table:table-cell>
          <table:table-cell table:style-name="Tabelle11.I2" office:value-type="string">
            <text:p text:style-name="P203">69665</text:p>
          </table:table-cell>
        </table:table-row>
        <table:table-row table:style-name="Tabelle11.15">
          <table:table-cell table:style-name="Tabelle11.A2" office:value-type="string">
            <text:p text:style-name="P196">CRC-16-CCITT<text:line-break/> KERMIT</text:p>
          </table:table-cell>
          <table:table-cell table:style-name="Tabelle11.A2" office:value-type="string">
            <text:p text:style-name="P199">x16 + x12 + x5 + 1 </text:p>
          </table:table-cell>
          <table:table-cell table:style-name="Tabelle11.A2" office:value-type="string">
            <text:p text:style-name="P198">0000</text:p>
          </table:table-cell>
          <table:table-cell table:style-name="Tabelle11.A2" office:value-type="string">
            <text:p text:style-name="P198">0000</text:p>
          </table:table-cell>
          <table:table-cell table:style-name="Tabelle11.A2" office:value-type="string">
            <text:p text:style-name="P200">1</text:p>
          </table:table-cell>
          <table:table-cell table:style-name="Tabelle11.A2" office:value-type="string">
            <text:p text:style-name="P200">1</text:p>
          </table:table-cell>
          <table:table-cell table:style-name="Tabelle11.A2" office:value-type="string">
            <text:p text:style-name="P200">0</text:p>
          </table:table-cell>
          <table:table-cell table:style-name="Tabelle11.A2" office:value-type="string">
            <text:p text:style-name="P202">00000000 00000001<text:line-break/>00010000 00100001</text:p>
          </table:table-cell>
          <table:table-cell table:style-name="Tabelle11.I2" office:value-type="string">
            <text:p text:style-name="P203">69665</text:p>
          </table:table-cell>
        </table:table-row>
        <table:table-row table:style-name="Tabelle11.1">
          <table:table-cell table:style-name="Tabelle11.A18" office:value-type="string">
            <text:p text:style-name="P197">CRC-16-IBM<text:line-break/>"CRC-16"<text:line-break/>USB, ARC</text:p>
          </table:table-cell>
          <table:table-cell table:style-name="Tabelle11.A18" office:value-type="string">
            <text:p text:style-name="P199">x16 + x15 + x2 + 1</text:p>
          </table:table-cell>
          <table:table-cell table:style-name="Tabelle11.A18" office:value-type="string">
            <text:p text:style-name="P198">0000</text:p>
          </table:table-cell>
          <table:table-cell table:style-name="Tabelle11.A18" office:value-type="string">
            <text:p text:style-name="P198">0000</text:p>
          </table:table-cell>
          <table:table-cell table:style-name="Tabelle11.A18" office:value-type="string">
            <text:p text:style-name="P200">1</text:p>
          </table:table-cell>
          <table:table-cell table:style-name="Tabelle11.A18" office:value-type="string">
            <text:p text:style-name="P200">1</text:p>
          </table:table-cell>
          <table:table-cell table:style-name="Tabelle11.A18" office:value-type="string">
            <text:p text:style-name="P200">0</text:p>
          </table:table-cell>
          <table:table-cell table:style-name="Tabelle11.A18" office:value-type="string">
            <text:p text:style-name="P202">00000000 00000001<text:line-break/>10000000 00000101</text:p>
          </table:table-cell>
          <table:table-cell table:style-name="Tabelle11.I18" office:value-type="string">
            <text:p text:style-name="P203">98309</text:p>
          </table:table-cell>
        </table:table-row>
        <table:table-row table:style-name="Tabelle11.1">
          <table:table-cell table:style-name="Tabelle11.A18" office:value-type="string">
            <text:p text:style-name="P197">CRC-16<text:line-break/>MODBUS</text:p>
          </table:table-cell>
          <table:table-cell table:style-name="Tabelle11.A18" office:value-type="string">
            <text:p text:style-name="P199">x16 + x15 + x2 + 1</text:p>
          </table:table-cell>
          <table:table-cell table:style-name="Tabelle11.A18" office:value-type="string">
            <text:p text:style-name="P198">FFFF</text:p>
          </table:table-cell>
          <table:table-cell table:style-name="Tabelle11.A18" office:value-type="string">
            <text:p text:style-name="P198">0000</text:p>
          </table:table-cell>
          <table:table-cell table:style-name="Tabelle11.A18" office:value-type="string">
            <text:p text:style-name="P200">1</text:p>
          </table:table-cell>
          <table:table-cell table:style-name="Tabelle11.A18" office:value-type="string">
            <text:p text:style-name="P200">1</text:p>
          </table:table-cell>
          <table:table-cell table:style-name="Tabelle11.A18" office:value-type="string">
            <text:p text:style-name="P200">0</text:p>
          </table:table-cell>
          <table:table-cell table:style-name="Tabelle11.A18" office:value-type="string">
            <text:p text:style-name="P202">00000000 00000001<text:line-break/>10000000 00000101</text:p>
          </table:table-cell>
          <table:table-cell table:style-name="Tabelle11.I18" office:value-type="string">
            <text:p text:style-name="P203">98309</text:p>
          </table:table-cell>
        </table:table-row>
        <table:table-row table:style-name="Tabelle11.1">
          <table:table-cell table:style-name="Tabelle11.A18" office:value-type="string">
            <text:p text:style-name="P197">CRC-24<text:line-break/>Radix-64 </text:p>
          </table:table-cell>
          <table:table-cell table:style-name="Tabelle11.A18" office:value-type="string">
            <text:p text:style-name="P199">x24 + x23 + x18 + x17 + x14 + x11 + x10 + x7 + x6 + x5 + x4 + x3 + x + 1 </text:p>
          </table:table-cell>
          <table:table-cell table:style-name="Tabelle11.A18" office:value-type="string">
            <text:p text:style-name="P198"/>
          </table:table-cell>
          <table:table-cell table:style-name="Tabelle11.A18" office:value-type="string">
            <text:p text:style-name="P198"/>
          </table:table-cell>
          <table:table-cell table:style-name="Tabelle11.A18" office:value-type="string">
            <text:p text:style-name="P200"/>
          </table:table-cell>
          <table:table-cell table:style-name="Tabelle11.A18" office:value-type="string">
            <text:p text:style-name="P200"/>
          </table:table-cell>
          <table:table-cell table:style-name="Tabelle11.A18" office:value-type="string">
            <text:p text:style-name="P200">0</text:p>
          </table:table-cell>
          <table:table-cell table:style-name="Tabelle11.A18" office:value-type="string">
            <text:p text:style-name="P202">00000001 10000110 01001100 11111011</text:p>
          </table:table-cell>
          <table:table-cell table:style-name="Tabelle11.I18" office:value-type="string">
            <text:p text:style-name="P203">25578747</text:p>
          </table:table-cell>
        </table:table-row>
        <table:table-row table:style-name="Tabelle11.1">
          <table:table-cell table:style-name="Tabelle11.A18" office:value-type="string">
            <text:p text:style-name="P197">CRC-32<text:line-break/>MPEG2<text:line-break/>IEEE 802.3</text:p>
          </table:table-cell>
          <table:table-cell table:style-name="Tabelle11.A18" office:value-type="string">
            <text:p text:style-name="P199">x32 + x26 + x23 + x22 + x16 + x12 + x11 + x10 + x8 + x7 + x5 + x4 + x2 + x + 1 </text:p>
          </table:table-cell>
          <table:table-cell table:style-name="Tabelle11.A18" office:value-type="string">
            <text:p text:style-name="P198">FFFF<text:line-break/>FFFF</text:p>
          </table:table-cell>
          <table:table-cell table:style-name="Tabelle11.A18" office:value-type="string">
            <text:p text:style-name="P198">FFFF<text:line-break/>FFFF</text:p>
          </table:table-cell>
          <table:table-cell table:style-name="Tabelle11.A18" office:value-type="string">
            <text:p text:style-name="P200">1</text:p>
          </table:table-cell>
          <table:table-cell table:style-name="Tabelle11.A18" office:value-type="string">
            <text:p text:style-name="P200">1</text:p>
          </table:table-cell>
          <table:table-cell table:style-name="Tabelle11.A18" office:value-type="string">
            <text:p text:style-name="P200">1</text:p>
          </table:table-cell>
          <table:table-cell table:style-name="Tabelle11.A18" office:value-type="string">
            <text:p text:style-name="P202">00000100 11000001 00011101 10110111</text:p>
          </table:table-cell>
          <table:table-cell table:style-name="Tabelle11.I18" office:value-type="string">
            <text:p text:style-name="P203">79764919</text:p>
          </table:table-cell>
        </table:table-row>
        <table:table-row table:style-name="Tabelle11.1">
          <table:table-cell table:style-name="Tabelle11.A18" office:value-type="string">
            <text:p text:style-name="P197">CRC-32C<text:line-break/>(Castagnoli) </text:p>
          </table:table-cell>
          <table:table-cell table:style-name="Tabelle11.A18" office:value-type="string">
            <text:p text:style-name="P199">x32 + x28 + x27 + x26 + x25 + x23 + x22 + x20 + x19 + x18 + x14 + x13 + x11 + x10 + x9 + x8 + x6 + 1 </text:p>
          </table:table-cell>
          <table:table-cell table:style-name="Tabelle11.A18" office:value-type="string">
            <text:p text:style-name="P198"/>
          </table:table-cell>
          <table:table-cell table:style-name="Tabelle11.A18" office:value-type="string">
            <text:p text:style-name="P198"/>
          </table:table-cell>
          <table:table-cell table:style-name="Tabelle11.A18" office:value-type="string">
            <text:p text:style-name="P200"/>
          </table:table-cell>
          <table:table-cell table:style-name="Tabelle11.A18" office:value-type="string">
            <text:p text:style-name="P200"/>
          </table:table-cell>
          <table:table-cell table:style-name="Tabelle11.A18" office:value-type="string">
            <text:p text:style-name="P200">1</text:p>
          </table:table-cell>
          <table:table-cell table:style-name="Tabelle11.A18" office:value-type="string">
            <text:p text:style-name="P202">00011110 11011100 01101111 01000001</text:p>
          </table:table-cell>
          <table:table-cell table:style-name="Tabelle11.I18" office:value-type="string">
            <text:p text:style-name="P203">517762881</text:p>
          </table:table-cell>
        </table:table-row>
      </table:table>
      <text:p text:style-name="P73"/>
      <text:p text:style-name="P183"/>
      <text:list xml:id="list38448893" text:continue-numbering="true" text:style-name="L1">
        <text:list-item>
          <text:list>
            <text:list-item>
              <text:h text:style-name="P216" text:outline-level="2"><text:soft-page-break/><text:alphabetical-index-mark-start text:id="IMark225902392"/>DEC_2<text:alphabetical-index-mark-end text:id="IMark225902392"/> </text:h>
            </text:list-item>
          </text:list>
        </text:list-item>
      </text:list>
      <text:p text:style-name="P69">Type<text:tab/>Funktionsbaustein</text:p>
      <text:p text:style-name="P66"><text:span text:style-name="T15">Input</text:span><text:span text:style-name="T14"><text:tab/>D : BOOL (Eingangs Bit)</text:span></text:p>
      <text:p text:style-name="P69"><text:tab/>A : BOOL (Adresse)</text:p>
      <text:p text:style-name="P73">Output<text:tab/>Q0 : BOOL (TRUE bei A=0)</text:p>
      <text:p text:style-name="P73"><draw:frame draw:style-name="fr3" draw:name="Grafik113" text:anchor-type="paragraph" svg:x="1.071cm" svg:y="0.619cm" svg:width="2.281cm" svg:height="1.75cm" draw:z-index="74"><draw:image xlink:href="Pictures/10000000000000AC000000849226E70F.png" xlink:type="simple" xlink:show="embed" xlink:actuate="onLoad"/></draw:frame><text:tab/>Q1 : BOOL (TRUE bei A=1)</text:p>
      <text:p text:style-name="P73"><text:line-break/>DEC_2 ist ein 2-Bit Dekodierbaustein. Ist A=0, so wird der Eingang D auf Ausgang Q0 geschaltet. Ist A=1, so wird D auf Q1 geschaltet. Mit anderen Worten: Q0=1 wenn D=1 und A=0.</text:p>
      <text:p text:style-name="P183">Logische Verknüpfung:<text:tab/><text:tab/>Q0 = D &amp; /A;<text:tab/>Q1 = D &amp; A</text:p>
      <text:p text:style-name="P73"><draw:g text:anchor-type="paragraph" draw:z-index="80" draw:style-name="gr1"><draw:line draw:style-name="gr3" draw:text-style-name="P257" svg:x1="2.501cm" svg:y1="0.157cm" svg:x2="2.501cm" svg:y2="0.656cm"><text:p/></draw:line><draw:line draw:style-name="gr3" draw:text-style-name="P257" svg:x1="2.002cm" svg:y1="0.651cm" svg:x2="2.501cm" svg:y2="0.651cm"><text:p/></draw:line><draw:line draw:style-name="gr3" draw:text-style-name="P257" svg:x1="2.501cm" svg:y1="0.157cm" svg:x2="2.751cm" svg:y2="0.157cm"><text:p/></draw:line><draw:line draw:style-name="gr3" draw:text-style-name="P257" svg:x1="2.752cm" svg:y1="0.656cm" svg:x2="2.752cm" svg:y2="0.157cm"><text:p/></draw:line><draw:line draw:style-name="gr3" draw:text-style-name="P257" svg:x1="2.752cm" svg:y1="0.651cm" svg:x2="3.502cm" svg:y2="0.651cm"><text:p/></draw:line><draw:frame draw:style-name="gr6" draw:text-style-name="P259" svg:width="1.251cm" svg:height="0.65cm" svg:x="1.002cm" svg:y="0.152cm"><draw:text-box><text:p text:style-name="P258"><text:span text:style-name="T32">D</text:span></text:p></draw:text-box></draw:frame><draw:line draw:style-name="gr3" draw:text-style-name="P257" svg:x1="3.501cm" svg:y1="0.157cm" svg:x2="3.501cm" svg:y2="0.656cm"><text:p/></draw:line><draw:line draw:style-name="gr3" draw:text-style-name="P257" svg:x1="3.501cm" svg:y1="0.157cm" svg:x2="3.751cm" svg:y2="0.157cm"><text:p/></draw:line><draw:line draw:style-name="gr3" draw:text-style-name="P257" svg:x1="3.752cm" svg:y1="0.656cm" svg:x2="3.752cm" svg:y2="0.157cm"><text:p/></draw:line><draw:line draw:style-name="gr3" draw:text-style-name="P257" svg:x1="3.752cm" svg:y1="0.651cm" svg:x2="4.502cm" svg:y2="0.651cm"><text:p/></draw:line><draw:line draw:style-name="gr3" draw:text-style-name="P257" svg:x1="4.503cm" svg:y1="0.157cm" svg:x2="4.503cm" svg:y2="0.656cm"><text:p/></draw:line><draw:line draw:style-name="gr3" draw:text-style-name="P257" svg:x1="4.503cm" svg:y1="0.157cm" svg:x2="4.753cm" svg:y2="0.157cm"><text:p/></draw:line><draw:line draw:style-name="gr3" draw:text-style-name="P257" svg:x1="4.752cm" svg:y1="0.656cm" svg:x2="4.752cm" svg:y2="0.157cm"><text:p/></draw:line><draw:line draw:style-name="gr3" draw:text-style-name="P257" svg:x1="4.752cm" svg:y1="0.651cm" svg:x2="5.502cm" svg:y2="0.651cm"><text:p/></draw:line><draw:line draw:style-name="gr3" draw:text-style-name="P257" svg:x1="5.502cm" svg:y1="0.157cm" svg:x2="5.502cm" svg:y2="0.656cm"><text:p/></draw:line><draw:line draw:style-name="gr3" draw:text-style-name="P257" svg:x1="5.502cm" svg:y1="0.157cm" svg:x2="5.752cm" svg:y2="0.157cm"><text:p/></draw:line><draw:line draw:style-name="gr3" draw:text-style-name="P257" svg:x1="5.752cm" svg:y1="0.656cm" svg:x2="5.752cm" svg:y2="0.157cm"><text:p/></draw:line><draw:line draw:style-name="gr3" draw:text-style-name="P257" svg:x1="5.752cm" svg:y1="0.651cm" svg:x2="6.502cm" svg:y2="0.651cm"><text:p/></draw:line><draw:line draw:style-name="gr3" draw:text-style-name="P257" svg:x1="6.502cm" svg:y1="0.157cm" svg:x2="6.502cm" svg:y2="0.656cm"><text:p/></draw:line><draw:line draw:style-name="gr3" draw:text-style-name="P257" svg:x1="6.502cm" svg:y1="0.157cm" svg:x2="6.752cm" svg:y2="0.157cm"><text:p/></draw:line><draw:line draw:style-name="gr3" draw:text-style-name="P257" svg:x1="6.752cm" svg:y1="0.656cm" svg:x2="6.752cm" svg:y2="0.157cm"><text:p/></draw:line><draw:line draw:style-name="gr3" draw:text-style-name="P257" svg:x1="6.752cm" svg:y1="0.651cm" svg:x2="7.502cm" svg:y2="0.651cm"><text:p/></draw:line><draw:line draw:style-name="gr3" draw:text-style-name="P257" svg:x1="2.501cm" svg:y1="0.157cm" svg:x2="2.501cm" svg:y2="0.656cm"><text:p/></draw:line><draw:line draw:style-name="gr3" draw:text-style-name="P257" svg:x1="2.002cm" svg:y1="0.656cm" svg:x2="2.501cm" svg:y2="0.656cm"><text:p/></draw:line><draw:line draw:style-name="gr3" draw:text-style-name="P257" svg:x1="2.501cm" svg:y1="0.157cm" svg:x2="2.751cm" svg:y2="0.157cm"><text:p/></draw:line><draw:line draw:style-name="gr3" draw:text-style-name="P257" svg:x1="2.752cm" svg:y1="0.656cm" svg:x2="2.752cm" svg:y2="0.157cm"><text:p/></draw:line><draw:line draw:style-name="gr3" draw:text-style-name="P257" svg:x1="2.752cm" svg:y1="0.656cm" svg:x2="3.502cm" svg:y2="0.656cm"><text:p/></draw:line><draw:line draw:style-name="gr3" draw:text-style-name="P257" svg:x1="3.501cm" svg:y1="0.157cm" svg:x2="3.501cm" svg:y2="0.656cm"><text:p/></draw:line><draw:line draw:style-name="gr3" draw:text-style-name="P257" svg:x1="3.501cm" svg:y1="0.157cm" svg:x2="3.751cm" svg:y2="0.157cm"><text:p/></draw:line><draw:line draw:style-name="gr3" draw:text-style-name="P257" svg:x1="3.752cm" svg:y1="0.656cm" svg:x2="3.752cm" svg:y2="0.157cm"><text:p/></draw:line><draw:line draw:style-name="gr3" draw:text-style-name="P257" svg:x1="3.752cm" svg:y1="0.656cm" svg:x2="4.502cm" svg:y2="0.656cm"><text:p/></draw:line><draw:line draw:style-name="gr3" draw:text-style-name="P257" svg:x1="4.503cm" svg:y1="0.157cm" svg:x2="4.503cm" svg:y2="0.656cm"><text:p/></draw:line><draw:line draw:style-name="gr3" draw:text-style-name="P257" svg:x1="4.503cm" svg:y1="0.157cm" svg:x2="4.753cm" svg:y2="0.157cm"><text:p/></draw:line><draw:line draw:style-name="gr3" draw:text-style-name="P257" svg:x1="4.752cm" svg:y1="0.656cm" svg:x2="4.752cm" svg:y2="0.157cm"><text:p/></draw:line><draw:line draw:style-name="gr3" draw:text-style-name="P257" svg:x1="4.752cm" svg:y1="0.656cm" svg:x2="5.502cm" svg:y2="0.656cm"><text:p/></draw:line><draw:line draw:style-name="gr3" draw:text-style-name="P257" svg:x1="5.502cm" svg:y1="0.157cm" svg:x2="5.502cm" svg:y2="0.656cm"><text:p/></draw:line><draw:line draw:style-name="gr3" draw:text-style-name="P257" svg:x1="5.502cm" svg:y1="0.157cm" svg:x2="5.752cm" svg:y2="0.157cm"><text:p/></draw:line><draw:line draw:style-name="gr3" draw:text-style-name="P257" svg:x1="5.752cm" svg:y1="0.656cm" svg:x2="5.752cm" svg:y2="0.157cm"><text:p/></draw:line><draw:line draw:style-name="gr3" draw:text-style-name="P257" svg:x1="5.752cm" svg:y1="0.656cm" svg:x2="6.502cm" svg:y2="0.656cm"><text:p/></draw:line><draw:line draw:style-name="gr3" draw:text-style-name="P257" svg:x1="6.502cm" svg:y1="0.157cm" svg:x2="6.502cm" svg:y2="0.656cm"><text:p/></draw:line><draw:line draw:style-name="gr3" draw:text-style-name="P257" svg:x1="6.502cm" svg:y1="0.157cm" svg:x2="6.752cm" svg:y2="0.157cm"><text:p/></draw:line><draw:line draw:style-name="gr3" draw:text-style-name="P257" svg:x1="6.752cm" svg:y1="0.656cm" svg:x2="6.752cm" svg:y2="0.157cm"><text:p/></draw:line><draw:line draw:style-name="gr3" draw:text-style-name="P257" svg:x1="6.752cm" svg:y1="0.656cm" svg:x2="7.502cm" svg:y2="0.656cm"><text:p/></draw:line><draw:line draw:style-name="gr2" draw:text-style-name="P257" svg:x1="2.002cm" svg:y1="1.404cm" svg:x2="4.002cm" svg:y2="1.404cm"><text:p/></draw:line><draw:line draw:style-name="gr2" draw:text-style-name="P257" svg:x1="4.002cm" svg:y1="0.903cm" svg:x2="4.002cm" svg:y2="1.404cm"><text:p/></draw:line><draw:line draw:style-name="gr2" draw:text-style-name="P257" svg:x1="4.002cm" svg:y1="0.903cm" svg:x2="7.502cm" svg:y2="0.903cm"><text:p/></draw:line><draw:line draw:style-name="gr4" draw:text-style-name="P257" svg:x1="2.501cm" svg:y1="2.152cm" svg:x2="2.501cm" svg:y2="1.651cm"><text:p/></draw:line><draw:line draw:style-name="gr4" draw:text-style-name="P257" svg:x1="2.751cm" svg:y1="1.651cm" svg:x2="2.501cm" svg:y2="1.651cm"><text:p/></draw:line><draw:line draw:style-name="gr4" draw:text-style-name="P257" svg:x1="2.752cm" svg:y1="1.651cm" svg:x2="2.752cm" svg:y2="2.152cm"><text:p/></draw:line><draw:line draw:style-name="gr4" draw:text-style-name="P257" svg:x1="7.502cm" svg:y1="2.152cm" svg:x2="3.752cm" svg:y2="2.152cm"><text:p/></draw:line><draw:line draw:style-name="gr4" draw:text-style-name="P257" svg:x1="2.002cm" svg:y1="2.152cm" svg:x2="2.501cm" svg:y2="2.152cm"><text:p/></draw:line><draw:frame draw:style-name="gr6" draw:text-style-name="P259" svg:width="1.251cm" svg:height="0.65cm" svg:x="1.002cm" svg:y="0.902cm"><draw:text-box><text:p text:style-name="P258"><text:span text:style-name="T32">A</text:span></text:p></draw:text-box></draw:frame><draw:frame draw:style-name="gr6" draw:text-style-name="P259" svg:width="1.251cm" svg:height="0.65cm" svg:x="1.002cm" svg:y="1.651cm"><draw:text-box><text:p text:style-name="P258"><text:span text:style-name="T32">Q0</text:span></text:p></draw:text-box></draw:frame><draw:line draw:style-name="gr5" draw:text-style-name="P257" svg:x1="2.002cm" svg:y1="2.905cm" svg:x2="4.501cm" svg:y2="2.905cm"><text:p/></draw:line><draw:line draw:style-name="gr5" draw:text-style-name="P257" svg:x1="4.503cm" svg:y1="2.404cm" svg:x2="4.503cm" svg:y2="2.903cm"><text:p/></draw:line><draw:line draw:style-name="gr5" draw:text-style-name="P257" svg:x1="4.753cm" svg:y1="2.404cm" svg:x2="4.503cm" svg:y2="2.404cm"><text:p/></draw:line><draw:frame draw:style-name="gr6" draw:text-style-name="P259" svg:width="1.251cm" svg:height="0.65cm" svg:x="1.002cm" svg:y="2.403cm"><draw:text-box><text:p text:style-name="P258"><text:span text:style-name="T32">Q1</text:span></text:p></draw:text-box></draw:frame><draw:line draw:style-name="gr4" draw:text-style-name="P257" svg:x1="3.501cm" svg:y1="2.152cm" svg:x2="3.501cm" svg:y2="1.651cm"><text:p/></draw:line><draw:line draw:style-name="gr4" draw:text-style-name="P257" svg:x1="3.751cm" svg:y1="1.651cm" svg:x2="3.501cm" svg:y2="1.651cm"><text:p/></draw:line><draw:line draw:style-name="gr4" draw:text-style-name="P257" svg:x1="3.752cm" svg:y1="1.651cm" svg:x2="3.752cm" svg:y2="2.152cm"><text:p/></draw:line><draw:line draw:style-name="gr4" draw:text-style-name="P257" svg:x1="2.752cm" svg:y1="2.152cm" svg:x2="3.502cm" svg:y2="2.152cm"><text:p/></draw:line><draw:line draw:style-name="gr5" draw:text-style-name="P257" svg:x1="4.752cm" svg:y1="2.404cm" svg:x2="4.752cm" svg:y2="2.903cm"><text:p/></draw:line><draw:line draw:style-name="gr5" draw:text-style-name="P257" svg:x1="5.502cm" svg:y1="2.404cm" svg:x2="5.502cm" svg:y2="2.903cm"><text:p/></draw:line><draw:line draw:style-name="gr5" draw:text-style-name="P257" svg:x1="5.752cm" svg:y1="2.404cm" svg:x2="5.502cm" svg:y2="2.404cm"><text:p/></draw:line><draw:line draw:style-name="gr5" draw:text-style-name="P257" svg:x1="5.752cm" svg:y1="2.404cm" svg:x2="5.752cm" svg:y2="2.903cm"><text:p/></draw:line><draw:line draw:style-name="gr5" draw:text-style-name="P257" svg:x1="6.502cm" svg:y1="2.404cm" svg:x2="6.502cm" svg:y2="2.903cm"><text:p/></draw:line><draw:line draw:style-name="gr5" draw:text-style-name="P257" svg:x1="6.752cm" svg:y1="2.404cm" svg:x2="6.502cm" svg:y2="2.404cm"><text:p/></draw:line><draw:line draw:style-name="gr5" draw:text-style-name="P257" svg:x1="6.752cm" svg:y1="2.404cm" svg:x2="6.752cm" svg:y2="2.903cm"><text:p/></draw:line><draw:line draw:style-name="gr5" draw:text-style-name="P257" svg:x1="5.502cm" svg:y1="2.905cm" svg:x2="4.752cm" svg:y2="2.905cm"><text:p/></draw:line><draw:line draw:style-name="gr5" draw:text-style-name="P257" svg:x1="6.502cm" svg:y1="2.905cm" svg:x2="5.752cm" svg:y2="2.905cm"><text:p/></draw:line><draw:line draw:style-name="gr5" draw:text-style-name="P257" svg:x1="7.502cm" svg:y1="2.905cm" svg:x2="6.752cm" svg:y2="2.905cm"><text:p/></draw:line></draw:g></text:p>
      <text:list xml:id="list38454963" text:continue-numbering="true" text:style-name="L1">
        <text:list-item>
          <text:list>
            <text:list-item>
              <text:h text:style-name="P216" text:outline-level="2"><text:alphabetical-index-mark-start text:id="IMark225902392"/>DEC_4<text:alphabetical-index-mark-end text:id="IMark225902392"/></text:h>
            </text:list-item>
          </text:list>
        </text:list-item>
      </text:list>
      <text:p text:style-name="P69">Type<text:tab/>Funktionsbaustein</text:p>
      <text:p text:style-name="P66"><text:span text:style-name="T15">Input</text:span><text:span text:style-name="T14"><text:tab/>D : BOOL (Eingangs Bit)</text:span></text:p>
      <text:p text:style-name="P69"><text:tab/>A0 : BOOL (Adresse Bit0)</text:p>
      <text:p text:style-name="P69"><text:tab/>A1 : BOOL (Adresse Bit1)</text:p>
      <text:p text:style-name="P73">Output<text:tab/>Q0 : BOOL (TRUE bei A0=0 und A1=0)</text:p>
      <text:p text:style-name="P66"><text:span text:style-name="T21"><text:tab/>Q1 : BOOL (</text:span><text:span text:style-name="T21">TRUE bei</text:span><text:span text:style-name="T21"> A0=1 und A1=0)</text:span></text:p>
      <text:p text:style-name="P66"><text:span text:style-name="T21"><text:tab/>Q2 : BOOL (</text:span><text:span text:style-name="T21">TRUE bei</text:span><text:span text:style-name="T21"> A0=0 und A1=1)</text:span></text:p>
      <text:p text:style-name="P66"><draw:frame draw:style-name="fr3" draw:name="Grafik114" text:anchor-type="paragraph" svg:x="1.136cm" svg:y="0.827cm" svg:width="2.281cm" svg:height="2.649cm" draw:z-index="75"><draw:image xlink:href="Pictures/10000000000000AC000000C8400BC969.png" xlink:type="simple" xlink:show="embed" xlink:actuate="onLoad"/></draw:frame><text:span text:style-name="T21"><text:tab/>Q3 : BOOL (</text:span><text:span text:style-name="T21">TRUE bei</text:span><text:span text:style-name="T21"> A0=1 und A1=1)</text:span></text:p>
      <text:p text:style-name="P73"><text:soft-page-break/><text:line-break/>DEC_4 ist ein 4-Bit Dekodierbaustein. Ist A0=0 und A1=0 wird der Eingang D auf Ausgang Q0 geschaltet. Wenn A0=1 und A1=1 wird D auf Q3 geschaltet. Mit anderen Worten: Q0=1, wenn D=1 und A0=0 und A1=0.</text:p>
      <text:p text:style-name="P183">Logische Verknüpfung:<text:tab/><text:tab/>Q0 = D &amp; /A0 &amp; /A1</text:p>
      <text:p text:style-name="P73"><text:tab/><text:tab/><text:tab/>Q1 = D &amp; A0 &amp; /A1</text:p>
      <text:p text:style-name="P73"><text:tab/><text:tab/><text:tab/>Q2 = D &amp; /A0 &amp; A1</text:p>
      <text:p text:style-name="P73"><text:tab/><text:tab/><text:tab/>Q3 = D &amp; A0 &amp; A1</text:p>
      <text:p text:style-name="P73"><draw:g text:anchor-type="paragraph" draw:z-index="81" draw:style-name="gr1"><draw:line draw:style-name="gr3" draw:text-style-name="P257" svg:x1="2.575cm" svg:y1="0.168cm" svg:x2="2.575cm" svg:y2="0.667cm"><text:p/></draw:line><draw:line draw:style-name="gr3" draw:text-style-name="P257" svg:x1="2.076cm" svg:y1="0.667cm" svg:x2="2.575cm" svg:y2="0.667cm"><text:p/></draw:line><draw:line draw:style-name="gr3" draw:text-style-name="P257" svg:x1="2.575cm" svg:y1="0.168cm" svg:x2="2.825cm" svg:y2="0.168cm"><text:p/></draw:line><draw:line draw:style-name="gr3" draw:text-style-name="P257" svg:x1="2.826cm" svg:y1="0.667cm" svg:x2="2.826cm" svg:y2="0.168cm"><text:p/></draw:line><draw:line draw:style-name="gr3" draw:text-style-name="P257" svg:x1="2.826cm" svg:y1="0.667cm" svg:x2="3.576cm" svg:y2="0.667cm"><text:p/></draw:line><draw:frame draw:style-name="gr6" draw:text-style-name="P259" svg:width="1.251cm" svg:height="0.65cm" svg:x="1.076cm" svg:y="0.168cm"><draw:text-box><text:p text:style-name="P258"><text:span text:style-name="T32">D</text:span></text:p></draw:text-box></draw:frame><draw:line draw:style-name="gr3" draw:text-style-name="P257" svg:x1="3.575cm" svg:y1="0.168cm" svg:x2="3.575cm" svg:y2="0.667cm"><text:p/></draw:line><draw:line draw:style-name="gr3" draw:text-style-name="P257" svg:x1="3.575cm" svg:y1="0.168cm" svg:x2="3.825cm" svg:y2="0.168cm"><text:p/></draw:line><draw:line draw:style-name="gr3" draw:text-style-name="P257" svg:x1="3.826cm" svg:y1="0.667cm" svg:x2="3.826cm" svg:y2="0.168cm"><text:p/></draw:line><draw:line draw:style-name="gr3" draw:text-style-name="P257" svg:x1="3.826cm" svg:y1="0.667cm" svg:x2="4.576cm" svg:y2="0.667cm"><text:p/></draw:line><draw:line draw:style-name="gr3" draw:text-style-name="P257" svg:x1="4.576cm" svg:y1="0.168cm" svg:x2="4.576cm" svg:y2="0.667cm"><text:p/></draw:line><draw:line draw:style-name="gr3" draw:text-style-name="P257" svg:x1="4.576cm" svg:y1="0.168cm" svg:x2="4.826cm" svg:y2="0.168cm"><text:p/></draw:line><draw:line draw:style-name="gr3" draw:text-style-name="P257" svg:x1="4.826cm" svg:y1="0.667cm" svg:x2="4.826cm" svg:y2="0.168cm"><text:p/></draw:line><draw:line draw:style-name="gr3" draw:text-style-name="P257" svg:x1="4.826cm" svg:y1="0.667cm" svg:x2="5.576cm" svg:y2="0.667cm"><text:p/></draw:line><draw:line draw:style-name="gr3" draw:text-style-name="P257" svg:x1="5.576cm" svg:y1="0.168cm" svg:x2="5.576cm" svg:y2="0.667cm"><text:p/></draw:line><draw:line draw:style-name="gr3" draw:text-style-name="P257" svg:x1="5.576cm" svg:y1="0.168cm" svg:x2="5.826cm" svg:y2="0.168cm"><text:p/></draw:line><draw:line draw:style-name="gr3" draw:text-style-name="P257" svg:x1="5.826cm" svg:y1="0.667cm" svg:x2="5.826cm" svg:y2="0.168cm"><text:p/></draw:line><draw:line draw:style-name="gr3" draw:text-style-name="P257" svg:x1="5.826cm" svg:y1="0.667cm" svg:x2="6.576cm" svg:y2="0.667cm"><text:p/></draw:line><draw:line draw:style-name="gr3" draw:text-style-name="P257" svg:x1="6.826cm" svg:y1="0.667cm" svg:x2="7.576cm" svg:y2="0.667cm"><text:p/></draw:line><draw:line draw:style-name="gr3" draw:text-style-name="P257" svg:x1="2.575cm" svg:y1="0.173cm" svg:x2="2.575cm" svg:y2="0.672cm"><text:p/></draw:line><draw:line draw:style-name="gr3" draw:text-style-name="P257" svg:x1="2.076cm" svg:y1="0.669cm" svg:x2="2.575cm" svg:y2="0.669cm"><text:p/></draw:line><draw:line draw:style-name="gr3" draw:text-style-name="P257" svg:x1="2.575cm" svg:y1="0.173cm" svg:x2="2.825cm" svg:y2="0.173cm"><text:p/></draw:line><draw:line draw:style-name="gr3" draw:text-style-name="P257" svg:x1="2.826cm" svg:y1="0.672cm" svg:x2="2.826cm" svg:y2="0.173cm"><text:p/></draw:line><draw:line draw:style-name="gr3" draw:text-style-name="P257" svg:x1="2.826cm" svg:y1="0.669cm" svg:x2="3.576cm" svg:y2="0.669cm"><text:p/></draw:line><draw:line draw:style-name="gr3" draw:text-style-name="P257" svg:x1="3.575cm" svg:y1="0.173cm" svg:x2="3.575cm" svg:y2="0.672cm"><text:p/></draw:line><draw:line draw:style-name="gr3" draw:text-style-name="P257" svg:x1="3.575cm" svg:y1="0.173cm" svg:x2="3.825cm" svg:y2="0.173cm"><text:p/></draw:line><draw:line draw:style-name="gr3" draw:text-style-name="P257" svg:x1="3.826cm" svg:y1="0.672cm" svg:x2="3.826cm" svg:y2="0.173cm"><text:p/></draw:line><draw:line draw:style-name="gr3" draw:text-style-name="P257" svg:x1="3.826cm" svg:y1="0.669cm" svg:x2="4.576cm" svg:y2="0.669cm"><text:p/></draw:line><draw:line draw:style-name="gr3" draw:text-style-name="P257" svg:x1="4.576cm" svg:y1="0.173cm" svg:x2="4.576cm" svg:y2="0.672cm"><text:p/></draw:line><draw:line draw:style-name="gr3" draw:text-style-name="P257" svg:x1="4.576cm" svg:y1="0.173cm" svg:x2="4.826cm" svg:y2="0.173cm"><text:p/></draw:line><draw:line draw:style-name="gr3" draw:text-style-name="P257" svg:x1="4.826cm" svg:y1="0.672cm" svg:x2="4.826cm" svg:y2="0.173cm"><text:p/></draw:line><draw:line draw:style-name="gr3" draw:text-style-name="P257" svg:x1="4.826cm" svg:y1="0.669cm" svg:x2="5.576cm" svg:y2="0.669cm"><text:p/></draw:line><draw:line draw:style-name="gr3" draw:text-style-name="P257" svg:x1="5.576cm" svg:y1="0.173cm" svg:x2="5.576cm" svg:y2="0.672cm"><text:p/></draw:line><draw:line draw:style-name="gr3" draw:text-style-name="P257" svg:x1="5.576cm" svg:y1="0.173cm" svg:x2="5.826cm" svg:y2="0.173cm"><text:p/></draw:line><draw:line draw:style-name="gr3" draw:text-style-name="P257" svg:x1="5.826cm" svg:y1="0.672cm" svg:x2="5.826cm" svg:y2="0.173cm"><text:p/></draw:line><draw:line draw:style-name="gr3" draw:text-style-name="P257" svg:x1="5.826cm" svg:y1="0.669cm" svg:x2="7.576cm" svg:y2="0.667cm"><text:p/></draw:line><draw:line draw:style-name="gr2" draw:text-style-name="P257" svg:x1="2.076cm" svg:y1="1.42cm" svg:x2="3.076cm" svg:y2="1.42cm"><text:p/></draw:line><draw:line draw:style-name="gr2" draw:text-style-name="P257" svg:x1="3.076cm" svg:y1="0.919cm" svg:x2="3.076cm" svg:y2="1.42cm"><text:p/></draw:line><draw:line draw:style-name="gr2" draw:text-style-name="P257" svg:x1="3.076cm" svg:y1="0.919cm" svg:x2="4.076cm" svg:y2="0.919cm"><text:p/></draw:line><draw:line draw:style-name="gr4" draw:text-style-name="P257" svg:x1="2.575cm" svg:y1="2.919cm" svg:x2="2.575cm" svg:y2="2.42cm"><text:p/></draw:line><draw:line draw:style-name="gr4" draw:text-style-name="P257" svg:x1="2.825cm" svg:y1="2.42cm" svg:x2="2.575cm" svg:y2="2.42cm"><text:p/></draw:line><draw:line draw:style-name="gr4" draw:text-style-name="P257" svg:x1="2.826cm" svg:y1="2.42cm" svg:x2="2.826cm" svg:y2="2.919cm"><text:p/></draw:line><draw:line draw:style-name="gr4" draw:text-style-name="P257" svg:x1="7.576cm" svg:y1="2.921cm" svg:x2="2.826cm" svg:y2="2.921cm"><text:p/></draw:line><draw:line draw:style-name="gr4" draw:text-style-name="P257" svg:x1="2.076cm" svg:y1="2.921cm" svg:x2="2.575cm" svg:y2="2.921cm"><text:p/></draw:line><draw:frame draw:style-name="gr6" draw:text-style-name="P259" svg:width="1.251cm" svg:height="0.65cm" svg:x="1.076cm" svg:y="0.918cm"><draw:text-box><text:p text:style-name="P258"><text:span text:style-name="T32">A0</text:span></text:p></draw:text-box></draw:frame><draw:frame draw:style-name="gr6" draw:text-style-name="P259" svg:width="1.251cm" svg:height="0.65cm" svg:x="1.076cm" svg:y="2.419cm"><draw:text-box><text:p text:style-name="P258"><text:span text:style-name="T32">Q0</text:span></text:p></draw:text-box></draw:frame><draw:line draw:style-name="gr5" draw:text-style-name="P257" svg:x1="2.076cm" svg:y1="3.669cm" svg:x2="3.575cm" svg:y2="3.669cm"><text:p/></draw:line><draw:line draw:style-name="gr5" draw:text-style-name="P257" svg:x1="3.575cm" svg:y1="3.168cm" svg:x2="3.575cm" svg:y2="3.667cm"><text:p/></draw:line><draw:line draw:style-name="gr5" draw:text-style-name="P257" svg:x1="3.825cm" svg:y1="3.168cm" svg:x2="3.575cm" svg:y2="3.168cm"><text:p/></draw:line><draw:frame draw:style-name="gr6" draw:text-style-name="P259" svg:width="1.251cm" svg:height="0.65cm" svg:x="1.076cm" svg:y="3.168cm"><draw:text-box><text:p text:style-name="P258"><text:span text:style-name="T32">Q1</text:span></text:p></draw:text-box></draw:frame><draw:line draw:style-name="gr5" draw:text-style-name="P257" svg:x1="3.826cm" svg:y1="3.168cm" svg:x2="3.826cm" svg:y2="3.667cm"><text:p/></draw:line><draw:line draw:style-name="gr5" draw:text-style-name="P257" svg:x1="7.576cm" svg:y1="3.669cm" svg:x2="3.826cm" svg:y2="3.669cm"><text:p/></draw:line><draw:frame draw:style-name="gr6" draw:text-style-name="P259" svg:width="1.251cm" svg:height="0.65cm" svg:x="1.076cm" svg:y="1.667cm"><draw:text-box><text:p text:style-name="P258"><text:span text:style-name="T32">A1</text:span></text:p></draw:text-box></draw:frame><draw:line draw:style-name="gr2" draw:text-style-name="P257" svg:x1="4.076cm" svg:y1="0.919cm" svg:x2="4.076cm" svg:y2="1.42cm"><text:p/></draw:line><draw:line draw:style-name="gr2" draw:text-style-name="P257" svg:x1="4.076cm" svg:y1="1.42cm" svg:x2="5.076cm" svg:y2="1.42cm"><text:p/></draw:line><draw:line draw:style-name="gr2" draw:text-style-name="P257" svg:x1="5.078cm" svg:y1="0.919cm" svg:x2="5.078cm" svg:y2="1.42cm"><text:p/></draw:line><draw:line draw:style-name="gr2" draw:text-style-name="P257" svg:x1="5.078cm" svg:y1="0.919cm" svg:x2="6.078cm" svg:y2="0.919cm"><text:p/></draw:line><draw:line draw:style-name="gr2" draw:text-style-name="P257" svg:x1="6.077cm" svg:y1="0.919cm" svg:x2="6.077cm" svg:y2="1.42cm"><text:p/></draw:line><draw:line draw:style-name="gr2" draw:text-style-name="P257" svg:x1="6.077cm" svg:y1="1.42cm" svg:x2="7.576cm" svg:y2="1.42cm"><text:p/></draw:line><draw:line draw:style-name="gr10" draw:text-style-name="P257" svg:x1="2.076cm" svg:y1="2.168cm" svg:x2="4.076cm" svg:y2="2.168cm"><text:p/></draw:line><draw:line draw:style-name="gr10" draw:text-style-name="P257" svg:x1="4.076cm" svg:y1="2.168cm" svg:x2="4.076cm" svg:y2="1.667cm"><text:p/></draw:line><draw:line draw:style-name="gr10" draw:text-style-name="P257" svg:x1="7.576cm" svg:y1="1.667cm" svg:x2="4.076cm" svg:y2="1.667cm"><text:p/></draw:line><draw:line draw:style-name="gr11" draw:text-style-name="P257" svg:x1="4.576cm" svg:y1="4.417cm" svg:x2="4.576cm" svg:y2="3.918cm"><text:p/></draw:line><draw:line draw:style-name="gr11" draw:text-style-name="P257" svg:x1="4.826cm" svg:y1="3.918cm" svg:x2="4.576cm" svg:y2="3.918cm"><text:p/></draw:line><draw:line draw:style-name="gr11" draw:text-style-name="P257" svg:x1="4.826cm" svg:y1="3.918cm" svg:x2="4.826cm" svg:y2="4.417cm"><text:p/></draw:line><draw:line draw:style-name="gr11" draw:text-style-name="P257" svg:x1="7.576cm" svg:y1="4.417cm" svg:x2="4.826cm" svg:y2="4.417cm"><text:p/></draw:line><draw:line draw:style-name="gr11" draw:text-style-name="P257" svg:x1="2.076cm" svg:y1="4.417cm" svg:x2="4.575cm" svg:y2="4.417cm"><text:p/></draw:line><draw:frame draw:style-name="gr6" draw:text-style-name="P259" svg:width="1.251cm" svg:height="0.65cm" svg:x="1.076cm" svg:y="3.918cm"><draw:text-box><text:p text:style-name="P258"><text:span text:style-name="T32">Q2</text:span></text:p></draw:text-box></draw:frame><draw:line draw:style-name="gr12" draw:text-style-name="P257" svg:x1="2.076cm" svg:y1="5.17cm" svg:x2="5.576cm" svg:y2="5.17cm"><text:p/></draw:line><draw:line draw:style-name="gr12" draw:text-style-name="P257" svg:x1="5.576cm" svg:y1="4.669cm" svg:x2="5.576cm" svg:y2="5.17cm"><text:p/></draw:line><draw:line draw:style-name="gr12" draw:text-style-name="P257" svg:x1="5.826cm" svg:y1="4.669cm" svg:x2="5.576cm" svg:y2="4.669cm"><text:p/></draw:line><draw:frame draw:style-name="gr6" draw:text-style-name="P259" svg:width="1.251cm" svg:height="0.65cm" svg:x="1.076cm" svg:y="4.668cm"><draw:text-box><text:p text:style-name="P258"><text:span text:style-name="T32">Q3</text:span></text:p></draw:text-box></draw:frame><draw:line draw:style-name="gr12" draw:text-style-name="P257" svg:x1="5.826cm" svg:y1="4.669cm" svg:x2="5.826cm" svg:y2="5.17cm"><text:p/></draw:line><draw:line draw:style-name="gr12" draw:text-style-name="P257" svg:x1="7.576cm" svg:y1="5.17cm" svg:x2="5.826cm" svg:y2="5.17cm"><text:p/></draw:line></draw:g></text:p>
      <text:list xml:id="list38476096" text:continue-numbering="true" text:style-name="L1">
        <text:list-item>
          <text:list>
            <text:list-item>
              <text:h text:style-name="P216" text:outline-level="2"><text:alphabetical-index-mark-start text:id="IMark225902392"/>DEC_8<text:alphabetical-index-mark-end text:id="IMark225902392"/></text:h>
            </text:list-item>
          </text:list>
        </text:list-item>
      </text:list>
      <text:p text:style-name="P69">Type<text:tab/>Funktionsbaustein</text:p>
      <text:p text:style-name="P66"><text:span text:style-name="T15">Input</text:span><text:span text:style-name="T14"><text:tab/>D : BOOL (Eingangs Bit)</text:span></text:p>
      <text:p text:style-name="P69"><text:tab/>A0 : BOOL (Adresse Bit0)</text:p>
      <text:p text:style-name="P69"><text:tab/>A1 : BOOL (Adresse Bit1)</text:p>
      <text:p text:style-name="P69"><text:tab/>A2 : BOOL (Adresse Bit2)</text:p>
      <text:p text:style-name="P66"><text:span text:style-name="T21">Output<text:tab/>Q0 : BOOL (</text:span><text:span text:style-name="T21">TRUE bei </text:span><text:span text:style-name="T21">A0=0 und A1=0 und A2=0)</text:span></text:p>
      <text:p text:style-name="P66"><text:span text:style-name="T21"><text:tab/>Q1 : BOOL (</text:span><text:span text:style-name="T21">TRUE bei </text:span><text:span text:style-name="T21">A0=1 und A1=0 und A2=0)</text:span></text:p>
      <text:p text:style-name="P66"><text:span text:style-name="T21"><text:tab/>Q2 : BOOL (</text:span><text:span text:style-name="T21">TRUE bei </text:span><text:span text:style-name="T21">A0=0 und A1=1 und A2=0)</text:span></text:p>
      <text:p text:style-name="P66"><text:soft-page-break/><text:span text:style-name="T21"><text:tab/>Q3 : BOOL (</text:span><text:span text:style-name="T21">TRUE bei </text:span><text:span text:style-name="T21">A0=1 und A1=1 und A2=0)</text:span></text:p>
      <text:p text:style-name="P66"><text:span text:style-name="T21"><text:tab/>Q4 : BOOL (</text:span><text:span text:style-name="T21">TRUE bei </text:span><text:span text:style-name="T21">A0=0 und A1=0 und A2=1)</text:span></text:p>
      <text:p text:style-name="P66"><text:span text:style-name="T21"><text:tab/>Q5 : BOOL (</text:span><text:span text:style-name="T21">TRUE bei </text:span><text:span text:style-name="T21">A0=1 und A1=0 und A2=1)</text:span></text:p>
      <text:p text:style-name="P66"><text:span text:style-name="T21"><text:tab/>Q6 : BOOL (</text:span><text:span text:style-name="T21">TRUE bei </text:span><text:span text:style-name="T21">A0=0 und A1=1 und A2=1)</text:span></text:p>
      <text:p text:style-name="P66"><draw:frame draw:style-name="fr3" draw:name="Grafik115" text:anchor-type="paragraph" svg:x="1.055cm" svg:y="0.69cm" svg:width="2.281cm" svg:height="4.44cm" draw:z-index="76"><draw:image xlink:href="Pictures/10000000000000AC000001501AC14DDF.png" xlink:type="simple" xlink:show="embed" xlink:actuate="onLoad"/></draw:frame><text:span text:style-name="T21"><text:tab/>Q7 : BOOL (</text:span><text:span text:style-name="T21">TRUE bei </text:span><text:span text:style-name="T21">A0=1 und A1=1 und A2=1)</text:span></text:p>
      <text:p text:style-name="P73"><text:line-break/>DEC_8 ist ein 8-Bit Dekodierbaustein. Ist A0=0 und A1=0 und A2=0 wird der Eingang D auf Ausgang Q0 geschaltet, wenn A0=1 und A1=1 und A2=1 wird D auf Q3 geschaltet. Mit anderen Worten: Q0=1 wenn D=1 und A0=0 und A1=0 und A2=0.</text:p>
      <text:p text:style-name="P183"><draw:frame draw:style-name="fr1" draw:name="Rahmen1" text:anchor-type="char" svg:x="1.109cm" svg:y="0.642cm" svg:width="9.555cm" draw:z-index="394"><draw:text-box fo:min-height="6.158cm"><text:p text:style-name="Caption"><draw:frame draw:style-name="fr2" draw:name="Rahmen2" text:anchor-type="paragraph" svg:x="2.424cm" svg:y="0.575cm" svg:width="9.555cm" draw:z-index="395"><draw:text-box fo:min-height="6.158cm"><text:p text:style-name="Drawing"><draw:g text:anchor-type="paragraph" draw:z-index="396" draw:style-name="gr65"><draw:line draw:style-name="gr3" draw:text-style-name="P257" svg:x1="1.524cm" svg:y1="0.101cm" svg:x2="1.524cm" svg:y2="0.351cm"><text:p/></draw:line><draw:line draw:style-name="gr3" draw:text-style-name="P257" svg:x1="1.025cm" svg:y1="0.353cm" svg:x2="1.524cm" svg:y2="0.353cm"><text:p/></draw:line><draw:line draw:style-name="gr3" draw:text-style-name="P257" svg:x1="1.778cm" svg:y1="0.353cm" svg:x2="2.528cm" svg:y2="0.353cm"><text:p/></draw:line><draw:frame draw:style-name="gr66" draw:text-style-name="P260" svg:width="1.251cm" svg:height="0.622cm" svg:x="0.025cm" svg:y="0cm"><draw:text-box><text:p text:style-name="P258"><text:span text:style-name="T33">D</text:span></text:p></draw:text-box></draw:frame><draw:line draw:style-name="gr3" draw:text-style-name="P257" svg:x1="2.775cm" svg:y1="0.351cm" svg:x2="2.775cm" svg:y2="0.101cm"><text:p/></draw:line><draw:line draw:style-name="gr3" draw:text-style-name="P257" svg:x1="2.775cm" svg:y1="0.353cm" svg:x2="3.525cm" svg:y2="0.353cm"><text:p/></draw:line><draw:line draw:style-name="gr3" draw:text-style-name="P257" svg:x1="3.775cm" svg:y1="0.351cm" svg:x2="3.775cm" svg:y2="0.101cm"><text:p/></draw:line><draw:line draw:style-name="gr3" draw:text-style-name="P257" svg:x1="3.775cm" svg:y1="0.353cm" svg:x2="4.525cm" svg:y2="0.353cm"><text:p/></draw:line><draw:line draw:style-name="gr3" draw:text-style-name="P257" svg:x1="4.775cm" svg:y1="0.351cm" svg:x2="4.775cm" svg:y2="0.101cm"><text:p/></draw:line><draw:line draw:style-name="gr3" draw:text-style-name="P257" svg:x1="4.775cm" svg:y1="0.353cm" svg:x2="5.525cm" svg:y2="0.353cm"><text:p/></draw:line><draw:line draw:style-name="gr3" draw:text-style-name="P257" svg:x1="1.025cm" svg:y1="0.355cm" svg:x2="1.524cm" svg:y2="0.355cm"><text:p/></draw:line><draw:line draw:style-name="gr3" draw:text-style-name="P257" svg:x1="1.524cm" svg:y1="0.101cm" svg:x2="1.774cm" svg:y2="0.101cm"><text:p/></draw:line><draw:line draw:style-name="gr3" draw:text-style-name="P257" svg:x1="1.778cm" svg:y1="0.353cm" svg:x2="1.778cm" svg:y2="0.101cm"><text:p/></draw:line><draw:line draw:style-name="gr3" draw:text-style-name="P257" svg:x1="1.778cm" svg:y1="0.355cm" svg:x2="2.528cm" svg:y2="0.355cm"><text:p/></draw:line><draw:line draw:style-name="gr3" draw:text-style-name="P257" svg:x1="2.524cm" svg:y1="0.101cm" svg:x2="2.524cm" svg:y2="0.353cm"><text:p/></draw:line><draw:line draw:style-name="gr3" draw:text-style-name="P257" svg:x1="2.524cm" svg:y1="0.101cm" svg:x2="2.774cm" svg:y2="0.101cm"><text:p/></draw:line><draw:line draw:style-name="gr3" draw:text-style-name="P257" svg:x1="2.775cm" svg:y1="0.355cm" svg:x2="3.525cm" svg:y2="0.355cm"><text:p/></draw:line><draw:line draw:style-name="gr3" draw:text-style-name="P257" svg:x1="3.526cm" svg:y1="0.101cm" svg:x2="3.526cm" svg:y2="0.351cm"><text:p/></draw:line><draw:line draw:style-name="gr3" draw:text-style-name="P257" svg:x1="3.526cm" svg:y1="0.101cm" svg:x2="3.776cm" svg:y2="0.101cm"><text:p/></draw:line><draw:line draw:style-name="gr3" draw:text-style-name="P257" svg:x1="3.775cm" svg:y1="0.355cm" svg:x2="4.525cm" svg:y2="0.355cm"><text:p/></draw:line><draw:line draw:style-name="gr3" draw:text-style-name="P257" svg:x1="4.526cm" svg:y1="0.101cm" svg:x2="4.526cm" svg:y2="0.353cm"><text:p/></draw:line><draw:line draw:style-name="gr3" draw:text-style-name="P257" svg:x1="4.775cm" svg:y1="0.355cm" svg:x2="5.525cm" svg:y2="0.353cm"><text:p/></draw:line><draw:line draw:style-name="gr2" draw:text-style-name="P257" svg:x1="1.025cm" svg:y1="0.854cm" svg:x2="2.025cm" svg:y2="0.854cm"><text:p/></draw:line><draw:line draw:style-name="gr2" draw:text-style-name="P257" svg:x1="2.025cm" svg:y1="0.6cm" svg:x2="2.025cm" svg:y2="0.85cm"><text:p/></draw:line><draw:line draw:style-name="gr2" draw:text-style-name="P257" svg:x1="2.025cm" svg:y1="0.6cm" svg:x2="3.025cm" svg:y2="0.6cm"><text:p/></draw:line><draw:line draw:style-name="gr4" draw:text-style-name="P257" svg:x1="1.524cm" svg:y1="2.353cm" svg:x2="1.524cm" svg:y2="2.103cm"><text:p/></draw:line><draw:line draw:style-name="gr4" draw:text-style-name="P257" svg:x1="1.774cm" svg:y1="2.103cm" svg:x2="1.524cm" svg:y2="2.103cm"><text:p/></draw:line><draw:line draw:style-name="gr4" draw:text-style-name="P257" svg:x1="1.778cm" svg:y1="2.103cm" svg:x2="1.778cm" svg:y2="2.353cm"><text:p/></draw:line><draw:line draw:style-name="gr4" draw:text-style-name="P257" svg:x1="9.529cm" svg:y1="2.353cm" svg:x2="1.778cm" svg:y2="2.353cm"><text:p/></draw:line><draw:line draw:style-name="gr4" draw:text-style-name="P257" svg:x1="1.025cm" svg:y1="2.353cm" svg:x2="1.524cm" svg:y2="2.353cm"><text:p/></draw:line><draw:frame draw:style-name="gr66" draw:text-style-name="P260" svg:width="1.251cm" svg:height="0.622cm" svg:x="0.025cm" svg:y="0.534cm"><draw:text-box><text:p text:style-name="P258"><text:span text:style-name="T33">A0</text:span></text:p></draw:text-box></draw:frame><draw:frame draw:style-name="gr66" draw:text-style-name="P260" svg:width="1.251cm" svg:height="0.622cm" svg:x="0.025cm" svg:y="2.034cm"><draw:text-box><text:p text:style-name="P258"><text:span text:style-name="T33">Q0</text:span></text:p></draw:text-box></draw:frame><draw:line draw:style-name="gr5" draw:text-style-name="P257" svg:x1="1.025cm" svg:y1="2.849cm" svg:x2="2.524cm" svg:y2="2.849cm"><text:p/></draw:line><draw:line draw:style-name="gr5" draw:text-style-name="P257" svg:x1="2.524cm" svg:y1="2.604cm" svg:x2="2.524cm" svg:y2="2.853cm"><text:p/></draw:line><draw:line draw:style-name="gr5" draw:text-style-name="P257" svg:x1="2.774cm" svg:y1="2.604cm" svg:x2="2.524cm" svg:y2="2.604cm"><text:p/></draw:line><draw:frame draw:style-name="gr66" draw:text-style-name="P260" svg:width="1.251cm" svg:height="0.622cm" svg:x="0.025cm" svg:y="2.535cm"><draw:text-box><text:p text:style-name="P258"><text:span text:style-name="T33">Q1</text:span></text:p></draw:text-box></draw:frame><draw:line draw:style-name="gr5" draw:text-style-name="P257" svg:x1="2.775cm" svg:y1="2.604cm" svg:x2="2.775cm" svg:y2="2.853cm"><text:p/></draw:line><draw:line draw:style-name="gr5" draw:text-style-name="P257" svg:x1="9.525cm" svg:y1="2.849cm" svg:x2="2.775cm" svg:y2="2.849cm"><text:p/></draw:line><draw:frame draw:style-name="gr66" draw:text-style-name="P260" svg:width="1.251cm" svg:height="0.622cm" svg:x="0.025cm" svg:y="1.034cm"><draw:text-box><text:p text:style-name="P258"><text:span text:style-name="T33">A1</text:span></text:p></draw:text-box></draw:frame><draw:line draw:style-name="gr2" draw:text-style-name="P257" svg:x1="3.025cm" svg:y1="0.6cm" svg:x2="3.025cm" svg:y2="0.85cm"><text:p/></draw:line><draw:line draw:style-name="gr2" draw:text-style-name="P257" svg:x1="3.025cm" svg:y1="0.854cm" svg:x2="4.025cm" svg:y2="0.854cm"><text:p/></draw:line><draw:line draw:style-name="gr2" draw:text-style-name="P257" svg:x1="4.027cm" svg:y1="0.6cm" svg:x2="4.027cm" svg:y2="0.85cm"><text:p/></draw:line><draw:line draw:style-name="gr2" draw:text-style-name="P257" svg:x1="4.027cm" svg:y1="0.6cm" svg:x2="5.027cm" svg:y2="0.6cm"><text:p/></draw:line><draw:line draw:style-name="gr2" draw:text-style-name="P257" svg:x1="5.027cm" svg:y1="0.6cm" svg:x2="5.027cm" svg:y2="0.85cm"><text:p/></draw:line><draw:line draw:style-name="gr2" draw:text-style-name="P257" svg:x1="9.024cm" svg:y1="0.854cm" svg:x2="9.525cm" svg:y2="0.854cm"><text:p/></draw:line><draw:line draw:style-name="gr10" draw:text-style-name="P257" svg:x1="1.025cm" svg:y1="1.353cm" svg:x2="3.025cm" svg:y2="1.353cm"><text:p/></draw:line><draw:line draw:style-name="gr10" draw:text-style-name="P257" svg:x1="3.025cm" svg:y1="1.351cm" svg:x2="3.025cm" svg:y2="1.101cm"><text:p/></draw:line><draw:line draw:style-name="gr10" draw:text-style-name="P257" svg:x1="5.025cm" svg:y1="1.101cm" svg:x2="3.025cm" svg:y2="1.101cm"><text:p/></draw:line><draw:line draw:style-name="gr11" draw:text-style-name="P257" svg:x1="3.526cm" svg:y1="3.353cm" svg:x2="3.526cm" svg:y2="3.103cm"><text:p/></draw:line><draw:line draw:style-name="gr11" draw:text-style-name="P257" svg:x1="3.776cm" svg:y1="3.103cm" svg:x2="3.526cm" svg:y2="3.103cm"><text:p/></draw:line><draw:line draw:style-name="gr11" draw:text-style-name="P257" svg:x1="3.775cm" svg:y1="3.103cm" svg:x2="3.775cm" svg:y2="3.353cm"><text:p/></draw:line><draw:line draw:style-name="gr11" draw:text-style-name="P257" svg:x1="9.525cm" svg:y1="3.35cm" svg:x2="3.775cm" svg:y2="3.35cm"><text:p/></draw:line><draw:line draw:style-name="gr11" draw:text-style-name="P257" svg:x1="1.025cm" svg:y1="3.35cm" svg:x2="3.524cm" svg:y2="3.35cm"><text:p/></draw:line><draw:frame draw:style-name="gr66" draw:text-style-name="P260" svg:width="1.251cm" svg:height="0.622cm" svg:x="0.025cm" svg:y="3.034cm"><draw:text-box><text:p text:style-name="P258"><text:span text:style-name="T33">Q2</text:span></text:p></draw:text-box></draw:frame><draw:line draw:style-name="gr12" draw:text-style-name="P257" svg:x1="1.025cm" svg:y1="3.851cm" svg:x2="4.525cm" svg:y2="3.851cm"><text:p/></draw:line><draw:line draw:style-name="gr12" draw:text-style-name="P257" svg:x1="4.526cm" svg:y1="3.604cm" svg:x2="4.526cm" svg:y2="3.853cm"><text:p/></draw:line><draw:line draw:style-name="gr12" draw:text-style-name="P257" svg:x1="4.776cm" svg:y1="3.604cm" svg:x2="4.526cm" svg:y2="3.604cm"><text:p/></draw:line><draw:frame draw:style-name="gr66" draw:text-style-name="P260" svg:width="1.251cm" svg:height="0.622cm" svg:x="0.025cm" svg:y="3.535cm"><draw:text-box><text:p text:style-name="P258"><text:span text:style-name="T33">Q3</text:span></text:p></draw:text-box></draw:frame><draw:line draw:style-name="gr12" draw:text-style-name="P257" svg:x1="4.775cm" svg:y1="3.604cm" svg:x2="4.775cm" svg:y2="3.853cm"><text:p/></draw:line><draw:line draw:style-name="gr12" draw:text-style-name="P257" svg:x1="9.525cm" svg:y1="3.851cm" svg:x2="4.775cm" svg:y2="3.851cm"><text:p/></draw:line><draw:line draw:style-name="gr3" draw:text-style-name="P257" svg:x1="4.526cm" svg:y1="0.101cm" svg:x2="4.776cm" svg:y2="0.101cm"><text:p/></draw:line><draw:line draw:style-name="gr3" draw:text-style-name="P257" svg:x1="5.528cm" svg:y1="0.101cm" svg:x2="5.528cm" svg:y2="0.351cm"><text:p/></draw:line><draw:line draw:style-name="gr3" draw:text-style-name="P257" svg:x1="5.775cm" svg:y1="0.353cm" svg:x2="6.525cm" svg:y2="0.353cm"><text:p/></draw:line><draw:line draw:style-name="gr3" draw:text-style-name="P257" svg:x1="6.775cm" svg:y1="0.351cm" svg:x2="6.775cm" svg:y2="0.101cm"><text:p/></draw:line><draw:line draw:style-name="gr3" draw:text-style-name="P257" svg:x1="6.775cm" svg:y1="0.353cm" svg:x2="7.525cm" svg:y2="0.353cm"><text:p/></draw:line><draw:line draw:style-name="gr3" draw:text-style-name="P257" svg:x1="7.777cm" svg:y1="0.351cm" svg:x2="7.777cm" svg:y2="0.101cm"><text:p/></draw:line><draw:line draw:style-name="gr3" draw:text-style-name="P257" svg:x1="7.777cm" svg:y1="0.353cm" svg:x2="8.527cm" svg:y2="0.353cm"><text:p/></draw:line><draw:line draw:style-name="gr3" draw:text-style-name="P257" svg:x1="8.777cm" svg:y1="0.351cm" svg:x2="8.777cm" svg:y2="0.101cm"><text:p/></draw:line><draw:line draw:style-name="gr3" draw:text-style-name="P257" svg:x1="8.777cm" svg:y1="0.353cm" svg:x2="9.527cm" svg:y2="0.353cm"><text:p/></draw:line><draw:line draw:style-name="gr3" draw:text-style-name="P257" svg:x1="5.528cm" svg:y1="0.101cm" svg:x2="5.778cm" svg:y2="0.101cm"><text:p/></draw:line><draw:line draw:style-name="gr3" draw:text-style-name="P257" svg:x1="5.775cm" svg:y1="0.353cm" svg:x2="5.775cm" svg:y2="0.101cm"><text:p/></draw:line><draw:line draw:style-name="gr3" draw:text-style-name="P257" svg:x1="5.775cm" svg:y1="0.355cm" svg:x2="6.525cm" svg:y2="0.355cm"><text:p/></draw:line><draw:line draw:style-name="gr3" draw:text-style-name="P257" svg:x1="6.525cm" svg:y1="0.101cm" svg:x2="6.525cm" svg:y2="0.353cm"><text:p/></draw:line><draw:line draw:style-name="gr3" draw:text-style-name="P257" svg:x1="6.525cm" svg:y1="0.101cm" svg:x2="6.775cm" svg:y2="0.101cm"><text:p/></draw:line><draw:line draw:style-name="gr3" draw:text-style-name="P257" svg:x1="6.775cm" svg:y1="0.355cm" svg:x2="7.525cm" svg:y2="0.355cm"><text:p/></draw:line><draw:line draw:style-name="gr3" draw:text-style-name="P257" svg:x1="7.525cm" svg:y1="0.101cm" svg:x2="7.525cm" svg:y2="0.351cm"><text:p/></draw:line><draw:line draw:style-name="gr3" draw:text-style-name="P257" svg:x1="7.525cm" svg:y1="0.101cm" svg:x2="7.775cm" svg:y2="0.101cm"><text:p/></draw:line><draw:line draw:style-name="gr3" draw:text-style-name="P257" svg:x1="7.777cm" svg:y1="0.355cm" svg:x2="8.527cm" svg:y2="0.355cm"><text:p/></draw:line><draw:line draw:style-name="gr3" draw:text-style-name="P257" svg:x1="8.525cm" svg:y1="0.101cm" svg:x2="8.525cm" svg:y2="0.353cm"><text:p/></draw:line><draw:line draw:style-name="gr3" draw:text-style-name="P257" svg:x1="8.777cm" svg:y1="0.355cm" svg:x2="9.527cm" svg:y2="0.353cm"><text:p/></draw:line><draw:line draw:style-name="gr3" draw:text-style-name="P257" svg:x1="8.525cm" svg:y1="0.101cm" svg:x2="8.775cm" svg:y2="0.101cm"><text:p/></draw:line><draw:line draw:style-name="gr2" draw:text-style-name="P257" svg:x1="5.027cm" svg:y1="0.854cm" svg:x2="6.027cm" svg:y2="0.854cm"><text:p/></draw:line><draw:line draw:style-name="gr2" draw:text-style-name="P257" svg:x1="6.029cm" svg:y1="0.6cm" svg:x2="6.029cm" svg:y2="0.85cm"><text:p/></draw:line><draw:line draw:style-name="gr2" draw:text-style-name="P257" svg:x1="6.029cm" svg:y1="0.6cm" svg:x2="7.029cm" svg:y2="0.6cm"><text:p/></draw:line><draw:line draw:style-name="gr2" draw:text-style-name="P257" svg:x1="7.026cm" svg:y1="0.6cm" svg:x2="7.026cm" svg:y2="0.85cm"><text:p/></draw:line><draw:line draw:style-name="gr2" draw:text-style-name="P257" svg:x1="7.026cm" svg:y1="0.854cm" svg:x2="8.024cm" svg:y2="0.854cm"><text:p/></draw:line><draw:line draw:style-name="gr2" draw:text-style-name="P257" svg:x1="8.024cm" svg:y1="0.6cm" svg:x2="8.024cm" svg:y2="0.85cm"><text:p/></draw:line><draw:line draw:style-name="gr2" draw:text-style-name="P257" svg:x1="8.024cm" svg:y1="0.6cm" svg:x2="9.024cm" svg:y2="0.6cm"><text:p/></draw:line><draw:line draw:style-name="gr2" draw:text-style-name="P257" svg:x1="9.024cm" svg:y1="0.6cm" svg:x2="9.024cm" svg:y2="0.85cm"><text:p/></draw:line><draw:line draw:style-name="gr10" draw:text-style-name="P257" svg:x1="5.027cm" svg:y1="1.353cm" svg:x2="7.027cm" svg:y2="1.353cm"><text:p/></draw:line><draw:line draw:style-name="gr10" draw:text-style-name="P257" svg:x1="7.026cm" svg:y1="1.351cm" svg:x2="7.026cm" svg:y2="1.101cm"><text:p/></draw:line><draw:line draw:style-name="gr10" draw:text-style-name="P257" svg:x1="9.024cm" svg:y1="1.101cm" svg:x2="7.026cm" svg:y2="1.101cm"><text:p/></draw:line><draw:line draw:style-name="gr10" draw:text-style-name="P257" svg:x1="5.027cm" svg:y1="1.351cm" svg:x2="5.027cm" svg:y2="1.101cm"><text:p/></draw:line><draw:line draw:style-name="gr10" draw:text-style-name="P257" svg:x1="9.024cm" svg:y1="1.351cm" svg:x2="9.024cm" svg:y2="1.101cm"><text:p/></draw:line><draw:line draw:style-name="gr10" draw:text-style-name="P257" svg:x1="9.024cm" svg:y1="1.353cm" svg:x2="9.525cm" svg:y2="1.353cm"><text:p/></draw:line><draw:frame draw:style-name="gr66" draw:text-style-name="P260" svg:width="1.251cm" svg:height="0.622cm" svg:x="0.025cm" svg:y="1.535cm"><draw:text-box><text:p text:style-name="P258"><text:span text:style-name="T33">A2</text:span></text:p></draw:text-box></draw:frame><draw:line draw:style-name="gr67" draw:text-style-name="P257" svg:x1="1.025cm" svg:y1="1.854cm" svg:x2="5.026cm" svg:y2="1.854cm"><text:p/></draw:line><draw:line draw:style-name="gr67" draw:text-style-name="P257" svg:x1="5.027cm" svg:y1="1.602cm" svg:x2="9.527cm" svg:y2="1.602cm"><text:p/></draw:line><draw:line draw:style-name="gr67" draw:text-style-name="P257" svg:x1="5.027cm" svg:y1="1.602cm" svg:x2="5.027cm" svg:y2="1.852cm"><text:p/></draw:line><draw:line draw:style-name="gr4" draw:text-style-name="P257" svg:x1="5.528cm" svg:y1="4.353cm" svg:x2="5.528cm" svg:y2="4.103cm"><text:p/></draw:line><draw:line draw:style-name="gr4" draw:text-style-name="P257" svg:x1="5.778cm" svg:y1="4.103cm" svg:x2="5.528cm" svg:y2="4.103cm"><text:p/></draw:line><draw:line draw:style-name="gr4" draw:text-style-name="P257" svg:x1="5.775cm" svg:y1="4.103cm" svg:x2="5.775cm" svg:y2="4.353cm"><text:p/></draw:line><draw:line draw:style-name="gr4" draw:text-style-name="P257" svg:x1="9.525cm" svg:y1="4.352cm" svg:x2="5.775cm" svg:y2="4.352cm"><text:p/></draw:line><draw:line draw:style-name="gr4" draw:text-style-name="P257" svg:x1="1.025cm" svg:y1="4.352cm" svg:x2="5.525cm" svg:y2="4.352cm"><text:p/></draw:line><draw:frame draw:style-name="gr66" draw:text-style-name="P260" svg:width="1.251cm" svg:height="0.622cm" svg:x="0.025cm" svg:y="4.034cm"><draw:text-box><text:p text:style-name="P258"><text:span text:style-name="T33">Q4</text:span></text:p></draw:text-box></draw:frame><draw:line draw:style-name="gr5" draw:text-style-name="P257" svg:x1="1.025cm" svg:y1="4.851cm" svg:x2="6.525cm" svg:y2="4.851cm"><text:p/></draw:line><draw:line draw:style-name="gr5" draw:text-style-name="P257" svg:x1="6.525cm" svg:y1="4.604cm" svg:x2="6.525cm" svg:y2="4.853cm"><text:p/></draw:line><draw:line draw:style-name="gr5" draw:text-style-name="P257" svg:x1="6.775cm" svg:y1="4.604cm" svg:x2="6.525cm" svg:y2="4.604cm"><text:p/></draw:line><draw:frame draw:style-name="gr66" draw:text-style-name="P260" svg:width="1.251cm" svg:height="0.622cm" svg:x="0.025cm" svg:y="4.533cm"><draw:text-box><text:p text:style-name="P258"><text:span text:style-name="T33">Q5</text:span></text:p></draw:text-box></draw:frame><draw:line draw:style-name="gr5" draw:text-style-name="P257" svg:x1="6.775cm" svg:y1="4.604cm" svg:x2="6.775cm" svg:y2="4.853cm"><text:p/></draw:line><draw:line draw:style-name="gr5" draw:text-style-name="P257" svg:x1="9.525cm" svg:y1="4.851cm" svg:x2="6.775cm" svg:y2="4.851cm"><text:p/></draw:line><draw:line draw:style-name="gr11" draw:text-style-name="P257" svg:x1="7.525cm" svg:y1="5.353cm" svg:x2="7.525cm" svg:y2="5.103cm"><text:p/></draw:line><draw:line draw:style-name="gr11" draw:text-style-name="P257" svg:x1="7.775cm" svg:y1="5.103cm" svg:x2="7.525cm" svg:y2="5.103cm"><text:p/></draw:line><draw:line draw:style-name="gr11" draw:text-style-name="P257" svg:x1="7.777cm" svg:y1="5.103cm" svg:x2="7.777cm" svg:y2="5.353cm"><text:p/></draw:line><draw:line draw:style-name="gr11" draw:text-style-name="P257" svg:x1="9.527cm" svg:y1="5.352cm" svg:x2="7.777cm" svg:y2="5.352cm"><text:p/></draw:line><draw:line draw:style-name="gr11" draw:text-style-name="P257" svg:x1="1.025cm" svg:y1="5.352cm" svg:x2="7.525cm" svg:y2="5.352cm"><text:p/></draw:line><draw:frame draw:style-name="gr66" draw:text-style-name="P260" svg:width="1.251cm" svg:height="0.622cm" svg:x="0.025cm" svg:y="5.034cm"><draw:text-box><text:p text:style-name="P258"><text:span text:style-name="T33">Q6</text:span></text:p></draw:text-box></draw:frame><draw:line draw:style-name="gr12" draw:text-style-name="P257" svg:x1="1.025cm" svg:y1="5.853cm" svg:x2="8.525cm" svg:y2="5.853cm"><text:p/></draw:line><draw:line draw:style-name="gr12" draw:text-style-name="P257" svg:x1="8.525cm" svg:y1="5.604cm" svg:x2="8.525cm" svg:y2="5.853cm"><text:p/></draw:line><draw:line draw:style-name="gr12" draw:text-style-name="P257" svg:x1="8.775cm" svg:y1="5.604cm" svg:x2="8.525cm" svg:y2="5.604cm"><text:p/></draw:line><draw:frame draw:style-name="gr66" draw:text-style-name="P260" svg:width="1.251cm" svg:height="0.622cm" svg:x="0.025cm" svg:y="5.533cm"><draw:text-box><text:p text:style-name="P258"><text:span text:style-name="T33">Q7</text:span></text:p></draw:text-box></draw:frame><draw:line draw:style-name="gr12" draw:text-style-name="P257" svg:x1="8.777cm" svg:y1="5.604cm" svg:x2="8.777cm" svg:y2="5.853cm"><text:p/></draw:line><draw:line draw:style-name="gr12" draw:text-style-name="P257" svg:x1="9.527cm" svg:y1="5.853cm" svg:x2="8.777cm" svg:y2="5.853cm"><text:p/></draw:line></draw:g></text:p></draw:text-box></draw:frame></text:p></draw:text-box></draw:frame>Das folgende Schaubild verdeutlicht die Logik des Bausteins:</text:p>
      <text:p text:style-name="P73"><text:line-break/>Logische Verknüpfung:<text:tab/><text:tab/>Q0 = D &amp; /A0 &amp; /A1 &amp; /A2<text:tab/><text:tab/><text:tab/><text:tab/><text:tab/>Q1 = D &amp; A0 &amp; /A1 &amp; /A2<text:tab/><text:tab/><text:tab/><text:tab/><text:tab/>Q2 = D &amp; /A0 &amp; A1 &amp; /A2<text:tab/><text:tab/><text:tab/><text:tab/><text:tab/>Q3 = D &amp; A0 &amp; A1 &amp; /A2<text:tab/><text:tab/><text:tab/><text:tab/><text:tab/>Q4 = D &amp; /A0 &amp; /A1 &amp; A2<text:tab/><text:tab/><text:tab/><text:tab/><text:tab/>Q5 = D &amp; A0 &amp; /A1 &amp; A2<text:tab/><text:tab/><text:tab/><text:tab/><text:tab/>Q6 = D &amp; /A0 &amp; A1 &amp; A2<text:tab/><text:tab/><text:tab/><text:tab/><text:tab/>Q7 = D &amp; A0 &amp; A1 &amp; A2</text:p>
      <text:list xml:id="list38448292" text:continue-numbering="true" text:style-name="L1">
        <text:list-item>
          <text:list>
            <text:list-item>
              <text:h text:style-name="P216" text:outline-level="2"><text:soft-page-break/><text:alphabetical-index-mark-start text:id="IMark225902392"/>DW_TO_REAL<text:alphabetical-index-mark-end text:id="IMark225902392"/></text:h>
            </text:list-item>
          </text:list>
        </text:list-item>
      </text:list>
      <text:p text:style-name="P69">Type<text:tab/>Funktion : REAL</text:p>
      <text:p text:style-name="P66"><text:span text:style-name="T15">Input</text:span><text:span text:style-name="T14"><text:tab/>IN : DWORD (Eingang)</text:span></text:p>
      <text:p text:style-name="P73"><draw:frame draw:style-name="fr3" draw:name="Grafik550" text:anchor-type="paragraph" svg:x="1.046cm" svg:y="0.667cm" svg:width="5.42cm" svg:height="1.12cm" draw:z-index="565"><draw:image xlink:href="Pictures/100000000000019A00000055C3088950.png" xlink:type="simple" xlink:show="embed" xlink:actuate="onLoad"/></draw:frame>Output<text:tab/>REAL (Ausgangswert)</text:p>
      <text:p text:style-name="P183"><text:line-break/>DW_TO_REAL kopiert das Bitmuster eines DWORD (IN) in einen REAL. Es werden dabei die einzelnen Bits kopiert ohne auf deren Bedeutung zu achten. Die Funktion REAL_TO_DW ist die Umkehrfunktion so das die Konvertierung von REAL_TO_DW und anschließend DW_TO_REAL wiederum den Ausgangswert ergeben. Die IEC Standardfunktion DWORD_TO_REAL wandelt den Wert des DWORDS in einen REAL Wert.</text:p>
      <text:list xml:id="list38474487" text:continue-numbering="true" text:style-name="L1">
        <text:list-item>
          <text:list>
            <text:list-item>
              <text:h text:style-name="P216" text:outline-level="2"><text:alphabetical-index-mark-start text:id="IMark225902392"/>DWORD_OF_BYTE<text:alphabetical-index-mark-end text:id="IMark225902392"/></text:h>
            </text:list-item>
          </text:list>
        </text:list-item>
      </text:list>
      <text:p text:style-name="P69">Type<text:tab/>Funktion : DWORD</text:p>
      <text:p text:style-name="P66"><text:span text:style-name="T16">Input</text:span><text:span text:style-name="T21"><text:tab/>B3 : Byte (Eingangs Byte 3)</text:span></text:p>
      <text:p text:style-name="P73"><text:tab/>B2 : Byte (Eingangs Byte 2)</text:p>
      <text:p text:style-name="P73"><text:tab/>B1 : Byte (Eingangs Byte 1)</text:p>
      <text:p text:style-name="P73"><text:tab/>B0 : Byte (Eingangs Byte 0)</text:p>
      <text:p text:style-name="P73"><draw:frame draw:style-name="fr3" draw:name="Grafik215" text:anchor-type="paragraph" svg:x="1.023cm" svg:y="0.667cm" svg:width="6.77cm" svg:height="2.469cm" draw:z-index="539"><draw:image xlink:href="Pictures/1000000000000200000000BBD245CAE7.png" xlink:type="simple" xlink:show="embed" xlink:actuate="onLoad"/></draw:frame>Output<text:tab/>DWORD (Ergebnis-DWORD)</text:p>
      <text:p text:style-name="P73"><text:line-break/>DWORD_OF_BYTE setzt aus 4 separaten Bytes B0 .. B3 ein DWORD zusammen.</text:p>
      <text:p text:style-name="P183">EIN DWORD setzt sich zusammen wie folgt: B3-B2-B1-B0</text:p>
      <text:list xml:id="list38470638" text:continue-numbering="true" text:style-name="L1">
        <text:list-item>
          <text:list>
            <text:list-item>
              <text:h text:style-name="P216" text:outline-level="2"><text:soft-page-break/><text:alphabetical-index-mark-start text:id="IMark225902392"/>INT_TO_BCDC<text:alphabetical-index-mark-end text:id="IMark225902392"/></text:h>
            </text:list-item>
          </text:list>
        </text:list-item>
      </text:list>
      <text:p text:style-name="P69">Type<text:tab/>Funktion : BYTE</text:p>
      <text:p text:style-name="P66"><text:span text:style-name="T15">Input</text:span><text:span text:style-name="T14"><text:tab/>IN : INT (Eingangswert)</text:span></text:p>
      <text:p text:style-name="P73"><draw:frame draw:style-name="fr3" draw:name="Grafik414" text:anchor-type="paragraph" svg:x="1.023cm" svg:y="0.69cm" svg:width="4.881cm" svg:height="0.99cm" draw:z-index="654"><draw:image xlink:href="Pictures/10000000000001710000004B076F9D1D.png" xlink:type="simple" xlink:show="embed" xlink:actuate="onLoad"/></draw:frame>Output<text:tab/>BYTE (BCD codierter Ausgangswert)</text:p>
      <text:p text:style-name="P183"><text:line-break/>INT_TO_BCDC konvertiert den Eingangswert IN in einen BCD codierten Ausgangswert.</text:p>
      <text:list xml:id="list38468608" text:continue-numbering="true" text:style-name="L1">
        <text:list-item>
          <text:list>
            <text:list-item>
              <text:h text:style-name="P216" text:outline-level="2"><text:alphabetical-index-mark-start text:id="IMark225902392"/>MATRIX<text:alphabetical-index-mark-end text:id="IMark225902392"/></text:h>
            </text:list-item>
          </text:list>
        </text:list-item>
      </text:list>
      <text:p text:style-name="P2">Type<text:tab/><text:span text:style-name="T12">Funktionsbaustein</text:span></text:p>
      <text:p text:style-name="P66"><text:span text:style-name="T15">Input</text:span><text:span text:style-name="T14"><text:tab/>X1 .. X5 : BOOL (Zeileneingänge)</text:span></text:p>
      <text:p text:style-name="P66"><text:span text:style-name="T14">Config<text:tab/></text:span><text:span text:style-name="T21">RELEASE : BOOL (Ein Tastencode wird beim Drücken und <text:s text:c="10"/><text:tab/>loslassen einer Taste erzeugt)</text:span></text:p>
      <text:p text:style-name="P73">Output<text:tab/>CODE : Byte (Ausgang für Tastencode)</text:p>
      <text:p text:style-name="P66"><text:span text:style-name="T21"><text:tab/>TP : BOOL (TP ist </text:span><text:span text:style-name="T21">für einen Zyklus </text:span><text:span text:style-name="T21">TRUE, wenn ein neuer <text:s text:c="17"/><text:tab/>Tastencode ansteht)</text:span></text:p>
      <text:p text:style-name="P73"><text:tab/>Y1 .. Y4 : BOOL (Zeilenausgänge)</text:p>
      <text:p text:style-name="P173"><draw:frame draw:style-name="fr3" draw:name="Grafik309" text:anchor-type="paragraph" svg:x="1.27cm" svg:y="0.005cm" svg:width="2.731cm" svg:height="3.54cm" draw:z-index="267"><draw:image xlink:href="Pictures/10000000000000CE0000010C823042AB.png" xlink:type="simple" xlink:show="embed" xlink:actuate="onLoad"/></draw:frame><text:span text:style-name="T21"><text:line-break/>MATRIX ist ein Matrix-Tastatur-Controller für maximal 4 Spalten und 5 Zei</text:span><text:span text:style-name="T21">len. Mit jedem SPS Zyklus schaltet MATRIX den Spaltenausgang um eine Spalte weiter, sodass die Zeilen Y1 bis Y4 nacheinander abgefragt werden. Für jede Spalte werden die Zeileneingänge X1 bis X5 abgefragt und falls eine Taste gedrückt ist, wird der entsprechende Tastencode am Ausgang angezeigt. Der Ausgang TP ist genau dann einen Zyklus TRUE, wenn der Ausgang CODE einen neuen Wert anzeigt. Wenn die Config-Variable RELEASE auf TRUE gesetzt wird, dann wird für das Drücken und das Loslassen einer Taste jeweils ein Tastencode gesendet. Falls RELEASE auf FALSE </text:span><text:span text:style-name="T21">ge</text:span><text:soft-page-break/><text:span text:style-name="T21">setzt </text:span><text:span text:style-name="T21">ist, wird nur beim Betätigen einer Taste ein Tastencode erzeugt. Der Tastencode des Ausgangs setzt sich wie folgt zusammen:</text:span></text:p>
      <text:p text:style-name="P183"/>
      <table:table table:name="Tabelle12" table:style-name="Tabelle12">
        <table:table-column table:style-name="Tabelle12.A"/>
        <table:table-column table:style-name="Tabelle12.B"/>
        <table:table-row>
          <table:table-cell table:style-name="Tabelle12.A1" office:value-type="string">
            <text:p text:style-name="P121">Bit</text:p>
          </table:table-cell>
          <table:table-cell table:style-name="Tabelle12.B1" office:value-type="string">
            <text:p text:style-name="P96">CODE Output</text:p>
          </table:table-cell>
        </table:table-row>
        <table:table-row>
          <table:table-cell table:style-name="Tabelle12.A2" office:value-type="string">
            <text:p text:style-name="P121">7</text:p>
          </table:table-cell>
          <table:table-cell table:style-name="Tabelle12.B2" office:value-type="string">
            <text:p text:style-name="P96">1 when key is pressed, 0 when key is released</text:p>
          </table:table-cell>
        </table:table-row>
        <table:table-row>
          <table:table-cell table:style-name="Tabelle12.A2" office:value-type="string">
            <text:p text:style-name="P121">6</text:p>
          </table:table-cell>
          <table:table-cell table:style-name="Tabelle12.B2" office:value-type="string">
            <text:p text:style-name="P96">Line number Bit 2</text:p>
          </table:table-cell>
        </table:table-row>
        <table:table-row>
          <table:table-cell table:style-name="Tabelle12.A2" office:value-type="string">
            <text:p text:style-name="P121">5</text:p>
          </table:table-cell>
          <table:table-cell table:style-name="Tabelle12.B2" office:value-type="string">
            <text:p text:style-name="P96">Line number Bit 1</text:p>
          </table:table-cell>
        </table:table-row>
        <table:table-row>
          <table:table-cell table:style-name="Tabelle12.A2" office:value-type="string">
            <text:p text:style-name="P121">4</text:p>
          </table:table-cell>
          <table:table-cell table:style-name="Tabelle12.B2" office:value-type="string">
            <text:p text:style-name="P96">Line number Bit 0</text:p>
          </table:table-cell>
        </table:table-row>
        <table:table-row>
          <table:table-cell table:style-name="Tabelle12.A2" office:value-type="string">
            <text:p text:style-name="P121">3</text:p>
          </table:table-cell>
          <table:table-cell table:style-name="Tabelle12.B2" office:value-type="string">
            <text:p text:style-name="P96">Always 0</text:p>
          </table:table-cell>
        </table:table-row>
        <table:table-row>
          <table:table-cell table:style-name="Tabelle12.A2" office:value-type="string">
            <text:p text:style-name="P121">2</text:p>
          </table:table-cell>
          <table:table-cell table:style-name="Tabelle12.B2" office:value-type="string">
            <text:p text:style-name="P96">Row number Bit 2</text:p>
          </table:table-cell>
        </table:table-row>
        <table:table-row>
          <table:table-cell table:style-name="Tabelle12.A2" office:value-type="string">
            <text:p text:style-name="P121">1</text:p>
          </table:table-cell>
          <table:table-cell table:style-name="Tabelle12.B2" office:value-type="string">
            <text:p text:style-name="P96">Row Number Bit 1</text:p>
          </table:table-cell>
        </table:table-row>
        <table:table-row>
          <table:table-cell table:style-name="Tabelle12.A2" office:value-type="string">
            <text:p text:style-name="P121">0</text:p>
          </table:table-cell>
          <table:table-cell table:style-name="Tabelle12.B2" office:value-type="string">
            <text:p text:style-name="P96">Row Number Bit 0</text:p>
          </table:table-cell>
        </table:table-row>
      </table:table>
      <text:p text:style-name="P88"/>
      <text:p text:style-name="P88">Der Matrixcontroller wird wie folgt beschaltet:</text:p>
      <text:p text:style-name="P88"><draw:g text:anchor-type="paragraph" draw:z-index="286" draw:style-name="gr1"><draw:frame draw:style-name="gr57" draw:text-style-name="P272" svg:width="1.422cm" svg:height="0.832cm" svg:x="1.3cm" svg:y="0.083cm"><draw:text-box><text:p text:style-name="P258"><text:span text:style-name="T40">Y1</text:span></text:p></draw:text-box></draw:frame><draw:frame draw:style-name="gr58" draw:text-style-name="P272" svg:width="1.422cm" svg:height="0.83cm" svg:x="1.3cm" svg:y="1.004cm"><draw:text-box><text:p text:style-name="P258"><text:span text:style-name="T40">Y2</text:span></text:p></draw:text-box></draw:frame><draw:frame draw:style-name="gr57" draw:text-style-name="P272" svg:width="1.422cm" svg:height="0.832cm" svg:x="1.3cm" svg:y="1.872cm"><draw:text-box><text:p text:style-name="P258"><text:span text:style-name="T40">Y3</text:span></text:p></draw:text-box></draw:frame><draw:frame draw:style-name="gr58" draw:text-style-name="P272" svg:width="1.422cm" svg:height="0.83cm" svg:x="1.3cm" svg:y="2.741cm"><draw:text-box><text:p text:style-name="P258"><text:span text:style-name="T40">Y4</text:span></text:p></draw:text-box></draw:frame><draw:g draw:style-name="gr8"><draw:line draw:style-name="gr14" draw:text-style-name="P270" svg:x1="2.395cm" svg:y1="0.46cm" svg:x2="8.084cm" svg:y2="0.46cm"><text:p/></draw:line><draw:line draw:style-name="gr14" draw:text-style-name="P270" svg:x1="2.395cm" svg:y1="1.335cm" svg:x2="8.084cm" svg:y2="1.335cm"><text:p/></draw:line><draw:line draw:style-name="gr14" draw:text-style-name="P270" svg:x1="2.395cm" svg:y1="2.201cm" svg:x2="8.084cm" svg:y2="2.201cm"><text:p/></draw:line><draw:line draw:style-name="gr14" draw:text-style-name="P270" svg:x1="2.395cm" svg:y1="3.069cm" svg:x2="8.084cm" svg:y2="3.069cm"><text:p/></draw:line><draw:line draw:style-name="gr14" draw:text-style-name="P270" svg:x1="3.926cm" svg:y1="4.373cm" svg:x2="3.926cm" svg:y2="-0.194cm"><text:p/></draw:line><draw:line draw:style-name="gr14" draw:text-style-name="P270" svg:x1="4.802cm" svg:y1="4.373cm" svg:x2="4.802cm" svg:y2="-0.194cm"><text:p/></draw:line><draw:line draw:style-name="gr14" draw:text-style-name="P270" svg:x1="5.677cm" svg:y1="4.373cm" svg:x2="5.677cm" svg:y2="-0.194cm"><text:p/></draw:line><draw:line draw:style-name="gr14" draw:text-style-name="P270" svg:x1="6.552cm" svg:y1="4.373cm" svg:x2="6.552cm" svg:y2="-0.194cm"><text:p/></draw:line><draw:line draw:style-name="gr14" draw:text-style-name="P270" svg:x1="7.425cm" svg:y1="4.373cm" svg:x2="7.425cm" svg:y2="-0.194cm"><text:p/></draw:line><draw:g draw:style-name="gr8"><draw:line draw:style-name="gr59" draw:text-style-name="P270" svg:x1="3.893cm" svg:y1="0.67cm" svg:x2="4.256cm" svg:y2="0.785cm"><text:p/></draw:line><draw:line draw:style-name="gr59" draw:text-style-name="P270" svg:x1="4.26cm" svg:y1="0.409cm" svg:x2="4.256cm" svg:y2="0.674cm"><text:p/></draw:line></draw:g><draw:g draw:style-name="gr8"><draw:line draw:style-name="gr59" draw:text-style-name="P270" svg:x1="4.764cm" svg:y1="0.67cm" svg:x2="5.127cm" svg:y2="0.785cm"><text:p/></draw:line><draw:line draw:style-name="gr59" draw:text-style-name="P270" svg:x1="5.133cm" svg:y1="0.409cm" svg:x2="5.129cm" svg:y2="0.674cm"><text:p/></draw:line></draw:g><draw:g draw:style-name="gr8"><draw:line draw:style-name="gr59" draw:text-style-name="P270" svg:x1="5.639cm" svg:y1="0.67cm" svg:x2="6.002cm" svg:y2="0.785cm"><text:p/></draw:line><draw:line draw:style-name="gr59" draw:text-style-name="P270" svg:x1="6.008cm" svg:y1="0.409cm" svg:x2="6.004cm" svg:y2="0.674cm"><text:p/></draw:line></draw:g><draw:g draw:style-name="gr8"><draw:line draw:style-name="gr59" draw:text-style-name="P270" svg:x1="6.513cm" svg:y1="0.67cm" svg:x2="6.876cm" svg:y2="0.785cm"><text:p/></draw:line><draw:line draw:style-name="gr59" draw:text-style-name="P270" svg:x1="6.881cm" svg:y1="0.409cm" svg:x2="6.877cm" svg:y2="0.674cm"><text:p/></draw:line></draw:g><draw:g draw:style-name="gr8"><draw:line draw:style-name="gr59" draw:text-style-name="P270" svg:x1="7.401cm" svg:y1="0.674cm" svg:x2="7.764cm" svg:y2="0.789cm"><text:p/></draw:line><draw:line draw:style-name="gr59" draw:text-style-name="P270" svg:x1="7.763cm" svg:y1="0.416cm" svg:x2="7.759cm" svg:y2="0.681cm"><text:p/></draw:line></draw:g><draw:g draw:style-name="gr8"><draw:line draw:style-name="gr59" draw:text-style-name="P270" svg:x1="3.896cm" svg:y1="1.538cm" svg:x2="4.259cm" svg:y2="1.653cm"><text:p/></draw:line><draw:line draw:style-name="gr59" draw:text-style-name="P270" svg:x1="4.262cm" svg:y1="1.279cm" svg:x2="4.258cm" svg:y2="1.544cm"><text:p/></draw:line></draw:g><draw:g draw:style-name="gr8"><draw:line draw:style-name="gr59" draw:text-style-name="P270" svg:x1="4.771cm" svg:y1="1.538cm" svg:x2="5.134cm" svg:y2="1.653cm"><text:p/></draw:line><draw:line draw:style-name="gr59" draw:text-style-name="P270" svg:x1="5.134cm" svg:y1="1.279cm" svg:x2="5.13cm" svg:y2="1.544cm"><text:p/></draw:line></draw:g><draw:g draw:style-name="gr8"><draw:line draw:style-name="gr59" draw:text-style-name="P270" svg:x1="5.645cm" svg:y1="1.538cm" svg:x2="6.008cm" svg:y2="1.653cm"><text:p/></draw:line><draw:line draw:style-name="gr59" draw:text-style-name="P270" svg:x1="6.009cm" svg:y1="1.279cm" svg:x2="6.005cm" svg:y2="1.544cm"><text:p/></draw:line></draw:g><draw:g draw:style-name="gr8"><draw:line draw:style-name="gr59" draw:text-style-name="P270" svg:x1="6.519cm" svg:y1="1.538cm" svg:x2="6.882cm" svg:y2="1.653cm"><text:p/></draw:line><draw:line draw:style-name="gr59" draw:text-style-name="P270" svg:x1="6.883cm" svg:y1="1.279cm" svg:x2="6.879cm" svg:y2="1.544cm"><text:p/></draw:line></draw:g><draw:g draw:style-name="gr8"><draw:line draw:style-name="gr59" draw:text-style-name="P270" svg:x1="7.392cm" svg:y1="1.538cm" svg:x2="7.755cm" svg:y2="1.653cm"><text:p/></draw:line><draw:line draw:style-name="gr59" draw:text-style-name="P270" svg:x1="7.756cm" svg:y1="1.279cm" svg:x2="7.752cm" svg:y2="1.544cm"><text:p/></draw:line></draw:g><draw:g draw:style-name="gr8"><draw:line draw:style-name="gr59" draw:text-style-name="P270" svg:x1="3.889cm" svg:y1="2.432cm" svg:x2="4.252cm" svg:y2="2.547cm"><text:p/></draw:line><draw:line draw:style-name="gr59" draw:text-style-name="P270" svg:x1="4.251cm" svg:y1="2.173cm" svg:x2="4.247cm" svg:y2="2.438cm"><text:p/></draw:line></draw:g><draw:g draw:style-name="gr8"><draw:line draw:style-name="gr59" draw:text-style-name="P270" svg:x1="4.758cm" svg:y1="2.432cm" svg:x2="5.121cm" svg:y2="2.547cm"><text:p/></draw:line><draw:line draw:style-name="gr59" draw:text-style-name="P270" svg:x1="5.126cm" svg:y1="2.173cm" svg:x2="5.122cm" svg:y2="2.438cm"><text:p/></draw:line></draw:g><draw:g draw:style-name="gr8"><draw:line draw:style-name="gr59" draw:text-style-name="P270" svg:x1="5.633cm" svg:y1="2.432cm" svg:x2="5.996cm" svg:y2="2.547cm"><text:p/></draw:line><draw:line draw:style-name="gr59" draw:text-style-name="P270" svg:x1="6cm" svg:y1="2.173cm" svg:x2="5.996cm" svg:y2="2.438cm"><text:p/></draw:line></draw:g><draw:g draw:style-name="gr8"><draw:line draw:style-name="gr59" draw:text-style-name="P270" svg:x1="6.512cm" svg:y1="2.432cm" svg:x2="6.875cm" svg:y2="2.547cm"><text:p/></draw:line><draw:line draw:style-name="gr59" draw:text-style-name="P270" svg:x1="6.874cm" svg:y1="2.173cm" svg:x2="6.87cm" svg:y2="2.438cm"><text:p/></draw:line></draw:g><draw:g draw:style-name="gr8"><draw:line draw:style-name="gr59" draw:text-style-name="P270" svg:x1="7.401cm" svg:y1="2.426cm" svg:x2="7.764cm" svg:y2="2.541cm"><text:p/></draw:line><draw:line draw:style-name="gr59" draw:text-style-name="P270" svg:x1="7.764cm" svg:y1="2.166cm" svg:x2="7.76cm" svg:y2="2.431cm"><text:p/></draw:line></draw:g><draw:g draw:style-name="gr8"><draw:line draw:style-name="gr59" draw:text-style-name="P270" svg:x1="3.889cm" svg:y1="3.3cm" svg:x2="4.252cm" svg:y2="3.415cm"><text:p/></draw:line><draw:line draw:style-name="gr59" draw:text-style-name="P270" svg:x1="4.26cm" svg:y1="3.041cm" svg:x2="4.256cm" svg:y2="3.306cm"><text:p/></draw:line></draw:g><draw:g draw:style-name="gr8"><draw:line draw:style-name="gr59" draw:text-style-name="P270" svg:x1="4.764cm" svg:y1="3.3cm" svg:x2="5.127cm" svg:y2="3.415cm"><text:p/></draw:line><draw:line draw:style-name="gr59" draw:text-style-name="P270" svg:x1="5.127cm" svg:y1="3.041cm" svg:x2="5.123cm" svg:y2="3.306cm"><text:p/></draw:line></draw:g><draw:g draw:style-name="gr8"><draw:line draw:style-name="gr59" draw:text-style-name="P270" svg:x1="5.639cm" svg:y1="3.3cm" svg:x2="6.002cm" svg:y2="3.415cm"><text:p/></draw:line><draw:line draw:style-name="gr59" draw:text-style-name="P270" svg:x1="6.003cm" svg:y1="3.041cm" svg:x2="5.999cm" svg:y2="3.306cm"><text:p/></draw:line></draw:g><draw:g draw:style-name="gr8"><draw:line draw:style-name="gr59" draw:text-style-name="P270" svg:x1="6.513cm" svg:y1="3.3cm" svg:x2="6.876cm" svg:y2="3.415cm"><text:p/></draw:line><draw:line draw:style-name="gr59" draw:text-style-name="P270" svg:x1="6.877cm" svg:y1="3.041cm" svg:x2="6.873cm" svg:y2="3.306cm"><text:p/></draw:line></draw:g><draw:g draw:style-name="gr8"><draw:line draw:style-name="gr59" draw:text-style-name="P270" svg:x1="7.382cm" svg:y1="3.3cm" svg:x2="7.745cm" svg:y2="3.415cm"><text:p/></draw:line><draw:line draw:style-name="gr59" draw:text-style-name="P270" svg:x1="7.749cm" svg:y1="3.041cm" svg:x2="7.745cm" svg:y2="3.306cm"><text:p/></draw:line></draw:g><draw:frame draw:style-name="gr57" draw:text-style-name="P272" svg:width="1.422cm" svg:height="0.832cm" svg:x="3.378cm" svg:y="4.295cm"><draw:text-box><text:p text:style-name="P258"><text:span text:style-name="T40">X1</text:span></text:p></draw:text-box></draw:frame><draw:frame draw:style-name="gr57" draw:text-style-name="P272" svg:width="1.422cm" svg:height="0.832cm" svg:x="4.253cm" svg:y="4.297cm"><draw:text-box><text:p text:style-name="P258"><text:span text:style-name="T40">X2</text:span></text:p></draw:text-box></draw:frame><draw:frame draw:style-name="gr57" draw:text-style-name="P272" svg:width="1.424cm" svg:height="0.832cm" svg:x="5.128cm" svg:y="4.297cm"><draw:text-box><text:p text:style-name="P258"><text:span text:style-name="T40">X3</text:span></text:p></draw:text-box></draw:frame><draw:frame draw:style-name="gr58" draw:text-style-name="P272" svg:width="1.422cm" svg:height="0.83cm" svg:x="6.004cm" svg:y="4.327cm"><draw:text-box><text:p text:style-name="P258"><text:span text:style-name="T40">X4</text:span></text:p></draw:text-box></draw:frame><draw:frame draw:style-name="gr58" draw:text-style-name="P272" svg:width="1.422cm" svg:height="0.83cm" svg:x="6.879cm" svg:y="4.327cm"><draw:text-box><text:p text:style-name="P258"><text:span text:style-name="T40">X5</text:span></text:p></draw:text-box></draw:frame></draw:g></draw:g></text:p>
      <text:p text:style-name="P92"><text:span text:style-name="T20">Bei dieser einfachen Beschaltung können bis zu 20 ( 4 * 5 ) Taster ausgewertet werden. Jedoch ist hierbei zu beachten, dass nur bedingt mehrere Tasten gleichzeitig gedrückt werden können. </text:span><text:span text:style-name="T21">Der Controller kann mit dieser Beschaltung mehrere Tasten in einer Spalte sicher erkennen, jedoch nicht wenn Tasten an verschiedenen Spalten gleichzeitig gedrückt werden. Die Beschaltung kann jedoch erweitert werden, indem jeder einzelne Taster über Dioden entkoppelt wird und damit die Beeinflussung verschiedener <text:line-break/>Spalten untereinander verhindert wird. Bei der Beschaltung mit Dioden können beliebig viele Tasten gleichzeitig gedrückt und sicher Ausgewertet werden. </text:span><text:span text:style-name="T21">Die Ausgänge des Matrixcontrollers scannen kontinuierlich die Zeilen der Tastaturmatrix ab. Je SPS Zyklus wird eine Zeile eingelesen. Sind in einer Zeile mehrere Tasten gedrückt bzw. verändert worden, so werden die Änderungen als Codes über die folgenden Zyklen ausgegeben. </text:span><text:span text:style-name="T21">Der Baustein </text:span><text:soft-page-break/><text:span text:style-name="T21">merkt sich die einzelnen Tastencodes und gibt je Zyklus immer nur einen Code aus, sodass kein Code verloren gehen kann.</text:span></text:p>
      <text:p text:style-name="P88">Das folgende Timing Diagramm zeigt das Abtasten der Tastenreihen: </text:p>
      <text:p text:style-name="P88"><draw:g text:anchor-type="paragraph" draw:z-index="270" draw:style-name="gr1"><draw:line draw:style-name="gr4" draw:text-style-name="P270" svg:x1="2.589cm" svg:y1="0.416cm" svg:x2="2.589cm" svg:y2="-0.083cm"><text:p/></draw:line><draw:line draw:style-name="gr4" draw:text-style-name="P270" svg:x1="3.603cm" svg:y1="-0.083cm" svg:x2="2.589cm" svg:y2="-0.081cm"><text:p/></draw:line><draw:line draw:style-name="gr4" draw:text-style-name="P270" svg:x1="3.605cm" svg:y1="-0.083cm" svg:x2="3.605cm" svg:y2="0.416cm"><text:p/></draw:line><draw:line draw:style-name="gr4" draw:text-style-name="P270" svg:x1="6.605cm" svg:y1="0.414cm" svg:x2="3.605cm" svg:y2="0.414cm"><text:p/></draw:line><draw:line draw:style-name="gr4" draw:text-style-name="P270" svg:x1="2.09cm" svg:y1="0.414cm" svg:x2="2.589cm" svg:y2="0.414cm"><text:p/></draw:line><draw:frame draw:style-name="gr6" draw:text-style-name="P271" svg:width="1.251cm" svg:height="0.65cm" svg:x="1.09cm" svg:y="-0.088cm"><draw:text-box><text:p text:style-name="P258"><text:span text:style-name="T39">Y1</text:span></text:p></draw:text-box></draw:frame><draw:line draw:style-name="gr5" draw:text-style-name="P270" svg:x1="2.09cm" svg:y1="1.164cm" svg:x2="3.589cm" svg:y2="1.164cm"><text:p/></draw:line><draw:line draw:style-name="gr5" draw:text-style-name="P270" svg:x1="3.588cm" svg:y1="0.663cm" svg:x2="3.588cm" svg:y2="1.162cm"><text:p/></draw:line><draw:line draw:style-name="gr5" draw:text-style-name="P270" svg:x1="4.602cm" svg:y1="0.665cm" svg:x2="3.588cm" svg:y2="0.663cm"><text:p/></draw:line><draw:frame draw:style-name="gr6" draw:text-style-name="P271" svg:width="1.251cm" svg:height="0.65cm" svg:x="1.09cm" svg:y="0.662cm"><draw:text-box><text:p text:style-name="P258"><text:span text:style-name="T39">Y2</text:span></text:p></draw:text-box></draw:frame><draw:line draw:style-name="gr5" draw:text-style-name="P270" svg:x1="4.604cm" svg:y1="0.663cm" svg:x2="4.604cm" svg:y2="1.162cm"><text:p/></draw:line><draw:line draw:style-name="gr5" draw:text-style-name="P270" svg:x1="7.59cm" svg:y1="1.164cm" svg:x2="4.604cm" svg:y2="1.164cm"><text:p/></draw:line><draw:line draw:style-name="gr11" draw:text-style-name="P270" svg:x1="4.591cm" svg:y1="1.91cm" svg:x2="4.591cm" svg:y2="1.411cm"><text:p/></draw:line><draw:line draw:style-name="gr11" draw:text-style-name="P270" svg:x1="5.603cm" svg:y1="1.411cm" svg:x2="4.591cm" svg:y2="1.411cm"><text:p/></draw:line><draw:line draw:style-name="gr11" draw:text-style-name="P270" svg:x1="5.604cm" svg:y1="1.411cm" svg:x2="5.604cm" svg:y2="1.91cm"><text:p/></draw:line><draw:line draw:style-name="gr11" draw:text-style-name="P270" svg:x1="8.59cm" svg:y1="1.91cm" svg:x2="5.604cm" svg:y2="1.908cm"><text:p/></draw:line><draw:line draw:style-name="gr11" draw:text-style-name="P270" svg:x1="2.09cm" svg:y1="1.908cm" svg:x2="4.589cm" svg:y2="1.908cm"><text:p/></draw:line><draw:frame draw:style-name="gr6" draw:text-style-name="P271" svg:width="1.251cm" svg:height="0.65cm" svg:x="1.09cm" svg:y="1.411cm"><draw:text-box><text:p text:style-name="P258"><text:span text:style-name="T39">Y3</text:span></text:p></draw:text-box></draw:frame><draw:line draw:style-name="gr12" draw:text-style-name="P270" svg:x1="2.09cm" svg:y1="2.665cm" svg:x2="5.59cm" svg:y2="2.665cm"><text:p/></draw:line><draw:line draw:style-name="gr12" draw:text-style-name="P270" svg:x1="5.59cm" svg:y1="2.162cm" svg:x2="5.59cm" svg:y2="2.663cm"><text:p/></draw:line><draw:line draw:style-name="gr12" draw:text-style-name="P270" svg:x1="6.602cm" svg:y1="2.162cm" svg:x2="5.59cm" svg:y2="2.162cm"><text:p/></draw:line><draw:frame draw:style-name="gr6" draw:text-style-name="P271" svg:width="1.251cm" svg:height="0.65cm" svg:x="1.09cm" svg:y="2.161cm"><draw:text-box><text:p text:style-name="P258"><text:span text:style-name="T39">Y4</text:span></text:p></draw:text-box></draw:frame><draw:line draw:style-name="gr12" draw:text-style-name="P270" svg:x1="6.604cm" svg:y1="2.162cm" svg:x2="6.604cm" svg:y2="2.663cm"><text:p/></draw:line><draw:line draw:style-name="gr12" draw:text-style-name="P270" svg:x1="9.59cm" svg:y1="2.667cm" svg:x2="6.604cm" svg:y2="2.665cm"><text:p/></draw:line><draw:line draw:style-name="gr4" draw:text-style-name="P270" svg:x1="6.59cm" svg:y1="0.416cm" svg:x2="6.59cm" svg:y2="-0.083cm"><text:p/></draw:line><draw:line draw:style-name="gr5" draw:text-style-name="P270" svg:x1="7.592cm" svg:y1="1.162cm" svg:x2="7.604cm" svg:y2="0.633cm"><text:p/></draw:line><draw:line draw:style-name="gr4" draw:text-style-name="P270" svg:x1="7.604cm" svg:y1="-0.083cm" svg:x2="6.59cm" svg:y2="-0.081cm"><text:p/></draw:line><draw:line draw:style-name="gr4" draw:text-style-name="P270" svg:x1="7.602cm" svg:y1="-0.083cm" svg:x2="7.602cm" svg:y2="0.416cm"><text:p/></draw:line><draw:line draw:style-name="gr4" draw:text-style-name="P270" svg:x1="10.602cm" svg:y1="0.414cm" svg:x2="7.602cm" svg:y2="0.414cm"><text:p/></draw:line><draw:line draw:style-name="gr5" draw:text-style-name="P270" svg:x1="8.604cm" svg:y1="0.665cm" svg:x2="7.59cm" svg:y2="0.663cm"><text:p/></draw:line><draw:line draw:style-name="gr5" draw:text-style-name="P270" svg:x1="8.602cm" svg:y1="0.663cm" svg:x2="8.602cm" svg:y2="1.162cm"><text:p/></draw:line><draw:line draw:style-name="gr5" draw:text-style-name="P270" svg:x1="10.602cm" svg:y1="1.164cm" svg:x2="8.602cm" svg:y2="1.164cm"><text:p/></draw:line><draw:line draw:style-name="gr11" draw:text-style-name="P270" svg:x1="8.59cm" svg:y1="1.912cm" svg:x2="8.59cm" svg:y2="1.413cm"><text:p/></draw:line><draw:line draw:style-name="gr11" draw:text-style-name="P270" svg:x1="9.602cm" svg:y1="1.413cm" svg:x2="8.59cm" svg:y2="1.413cm"><text:p/></draw:line><draw:line draw:style-name="gr11" draw:text-style-name="P270" svg:x1="9.604cm" svg:y1="1.413cm" svg:x2="9.604cm" svg:y2="1.912cm"><text:p/></draw:line><draw:line draw:style-name="gr11" draw:text-style-name="P270" svg:x1="10.604cm" svg:y1="1.908cm" svg:x2="9.604cm" svg:y2="1.908cm"><text:p/></draw:line><draw:line draw:style-name="gr12" draw:text-style-name="P270" svg:x1="9.59cm" svg:y1="2.162cm" svg:x2="9.59cm" svg:y2="2.663cm"><text:p/></draw:line><draw:line draw:style-name="gr12" draw:text-style-name="P270" svg:x1="10.602cm" svg:y1="2.162cm" svg:x2="9.59cm" svg:y2="2.162cm"><text:p/></draw:line></draw:g></text:p>
      <text:list xml:id="list38457370" text:continue-numbering="true" text:style-name="L1">
        <text:list-item>
          <text:list>
            <text:list-item>
              <text:h text:style-name="P216" text:outline-level="2"><text:alphabetical-index-mark-start text:id="IMark225902392"/>MUX_2<text:alphabetical-index-mark-end text:id="IMark225902392"/></text:h>
            </text:list-item>
          </text:list>
        </text:list-item>
      </text:list>
      <text:p text:style-name="P69">Type<text:tab/>Funktion : BOOL</text:p>
      <text:p text:style-name="P66"><text:span text:style-name="T15">Input</text:span><text:span text:style-name="T14"><text:tab/>D0 : BOOL (Bit 0)</text:span></text:p>
      <text:p text:style-name="P69"><text:tab/>D1 : BOOL (Bit 1)</text:p>
      <text:p text:style-name="P179"><text:tab/>A0 : BOOL (Adresse)</text:p>
      <text:p text:style-name="P73"><draw:frame draw:style-name="fr3" draw:name="Grafik116" text:anchor-type="paragraph" svg:x="1.05cm" svg:y="0.684cm" svg:width="3.18cm" svg:height="2.02cm" draw:z-index="77"><draw:image xlink:href="Pictures/10000000000000F0000000994894E8DB.png" xlink:type="simple" xlink:show="embed" xlink:actuate="onLoad"/></draw:frame>Output<text:tab/>BOOL (D0, wenn A0=0 und D1, wenn A0=1)</text:p>
      <text:p text:style-name="P66"><text:span text:style-name="T21"><text:line-break/>MUX_2 ist ein 2-Bit </text:span><text:span text:style-name="T16">Multiplexer.</text:span><text:span text:style-name="T21"> Der Ausgang entspricht D0, wenn A0=0 und er entspricht D1, wenn A0=1.</text:span></text:p>
      <text:p text:style-name="P73">Logische Verknüpfung:<text:tab/>MUX_2 = D0 &amp; /A0 + D1 &amp; A0</text:p>
      <text:p text:style-name="P183"><draw:g text:anchor-type="paragraph" draw:z-index="82" draw:style-name="gr1"><draw:line draw:style-name="gr2" draw:text-style-name="P257" svg:x1="1.868cm" svg:y1="1.577cm" svg:x2="2.618cm" svg:y2="1.577cm"><text:p/></draw:line><draw:line draw:style-name="gr2" draw:text-style-name="P257" svg:x1="2.616cm" svg:y1="1.076cm" svg:x2="2.616cm" svg:y2="1.575cm"><text:p/></draw:line><draw:line draw:style-name="gr2" draw:text-style-name="P257" svg:x1="2.616cm" svg:y1="1.076cm" svg:x2="4.867cm" svg:y2="1.076cm"><text:p/></draw:line><draw:line draw:style-name="gr2" draw:text-style-name="P257" svg:x1="4.868cm" svg:y1="1.575cm" svg:x2="4.868cm" svg:y2="1.076cm"><text:p/></draw:line><draw:line draw:style-name="gr2" draw:text-style-name="P257" svg:x1="5.618cm" svg:y1="1.076cm" svg:x2="5.618cm" svg:y2="1.575cm"><text:p/></draw:line><draw:line draw:style-name="gr2" draw:text-style-name="P257" svg:x1="9.368cm" svg:y1="1.577cm" svg:x2="10.869cm" svg:y2="1.577cm"><text:p/></draw:line><draw:line draw:style-name="gr3" draw:text-style-name="P257" svg:x1="2.868cm" svg:y1="0.077cm" svg:x2="2.868cm" svg:y2="0.576cm"><text:p/></draw:line><draw:line draw:style-name="gr3" draw:text-style-name="P257" svg:x1="1.868cm" svg:y1="0.575cm" svg:x2="2.868cm" svg:y2="0.575cm"><text:p/></draw:line><draw:line draw:style-name="gr3" draw:text-style-name="P257" svg:x1="2.868cm" svg:y1="0.077cm" svg:x2="3.118cm" svg:y2="0.077cm"><text:p/></draw:line><draw:line draw:style-name="gr3" draw:text-style-name="P257" svg:x1="3.115cm" svg:y1="0.576cm" svg:x2="3.115cm" svg:y2="0.077cm"><text:p/></draw:line><draw:line draw:style-name="gr3" draw:text-style-name="P257" svg:x1="3.115cm" svg:y1="0.575cm" svg:x2="5.865cm" svg:y2="0.575cm"><text:p/></draw:line><draw:line draw:style-name="gr3" draw:text-style-name="P257" svg:x1="5.868cm" svg:y1="0.077cm" svg:x2="5.868cm" svg:y2="0.576cm"><text:p/></draw:line><draw:line draw:style-name="gr3" draw:text-style-name="P257" svg:x1="5.868cm" svg:y1="0.077cm" svg:x2="6.868cm" svg:y2="0.077cm"><text:p/></draw:line><draw:line draw:style-name="gr3" draw:text-style-name="P257" svg:x1="6.867cm" svg:y1="0.576cm" svg:x2="6.867cm" svg:y2="0.077cm"><text:p/></draw:line><draw:line draw:style-name="gr3" draw:text-style-name="P257" svg:x1="6.867cm" svg:y1="0.575cm" svg:x2="7.366cm" svg:y2="0.575cm"><text:p/></draw:line><draw:line draw:style-name="gr3" draw:text-style-name="P257" svg:x1="7.366cm" svg:y1="0.077cm" svg:x2="7.366cm" svg:y2="0.576cm"><text:p/></draw:line><draw:line draw:style-name="gr3" draw:text-style-name="P257" svg:x1="7.366cm" svg:y1="0.077cm" svg:x2="7.616cm" svg:y2="0.077cm"><text:p/></draw:line><draw:line draw:style-name="gr3" draw:text-style-name="P257" svg:x1="7.618cm" svg:y1="0.576cm" svg:x2="7.618cm" svg:y2="0.077cm"><text:p/></draw:line><draw:line draw:style-name="gr3" draw:text-style-name="P257" svg:x1="7.618cm" svg:y1="0.575cm" svg:x2="10.869cm" svg:y2="0.575cm"><text:p/></draw:line><draw:frame draw:style-name="gr6" draw:text-style-name="P259" svg:width="0.997cm" svg:height="0.65cm" svg:x="1.118cm" svg:y="1.078cm"><draw:text-box><text:p text:style-name="P258"><text:span text:style-name="T32">D1</text:span></text:p></draw:text-box></draw:frame><draw:frame draw:style-name="gr6" draw:text-style-name="P259" svg:width="0.997cm" svg:height="0.65cm" svg:x="1.118cm" svg:y="0.078cm"><draw:text-box><text:p text:style-name="P258"><text:span text:style-name="T32">D0</text:span></text:p></draw:text-box></draw:frame><draw:line draw:style-name="gr2" draw:text-style-name="P257" svg:x1="5.618cm" svg:y1="1.076cm" svg:x2="9.368cm" svg:y2="1.076cm"><text:p/></draw:line><draw:line draw:style-name="gr2" draw:text-style-name="P257" svg:x1="9.368cm" svg:y1="1.076cm" svg:x2="9.368cm" svg:y2="1.575cm"><text:p/></draw:line><draw:line draw:style-name="gr2" draw:text-style-name="P257" svg:x1="4.868cm" svg:y1="1.577cm" svg:x2="5.618cm" svg:y2="1.577cm"><text:p/></draw:line><draw:line draw:style-name="gr2" draw:text-style-name="P257" svg:x1="1.868cm" svg:y1="2.577cm" svg:x2="6.368cm" svg:y2="2.577cm"><text:p/></draw:line><draw:line draw:style-name="gr2" draw:text-style-name="P257" svg:x1="6.366cm" svg:y1="2.076cm" svg:x2="6.366cm" svg:y2="2.575cm"><text:p/></draw:line><draw:line draw:style-name="gr2" draw:text-style-name="P257" svg:x1="6.366cm" svg:y1="2.076cm" svg:x2="10.867cm" svg:y2="2.076cm"><text:p/></draw:line><draw:frame draw:style-name="gr6" draw:text-style-name="P259" svg:width="0.997cm" svg:height="0.65cm" svg:x="1.118cm" svg:y="2.078cm"><draw:text-box><text:p text:style-name="P258"><text:span text:style-name="T32">A0</text:span></text:p></draw:text-box></draw:frame><draw:line draw:style-name="gr4" draw:text-style-name="P257" svg:x1="2.868cm" svg:y1="3.577cm" svg:x2="2.868cm" svg:y2="3.078cm"><text:p/></draw:line><draw:line draw:style-name="gr4" draw:text-style-name="P257" svg:x1="3.118cm" svg:y1="3.078cm" svg:x2="2.868cm" svg:y2="3.078cm"><text:p/></draw:line><draw:line draw:style-name="gr4" draw:text-style-name="P257" svg:x1="3.115cm" svg:y1="3.078cm" svg:x2="3.115cm" svg:y2="3.577cm"><text:p/></draw:line><draw:line draw:style-name="gr4" draw:text-style-name="P257" svg:x1="6.364cm" svg:y1="3.579cm" svg:x2="3.115cm" svg:y2="3.579cm"><text:p/></draw:line><draw:line draw:style-name="gr4" draw:text-style-name="P257" svg:x1="1.868cm" svg:y1="3.579cm" svg:x2="2.868cm" svg:y2="3.579cm"><text:p/></draw:line><draw:frame draw:style-name="gr6" draw:text-style-name="P259" svg:width="0.997cm" svg:height="0.65cm" svg:x="1.118cm" svg:y="3.078cm"><draw:text-box><text:p text:style-name="P258"><text:span text:style-name="T32">Q</text:span></text:p></draw:text-box></draw:frame><draw:line draw:style-name="gr4" draw:text-style-name="P257" svg:x1="6.366cm" svg:y1="3.078cm" svg:x2="6.366cm" svg:y2="3.577cm"><text:p/></draw:line><draw:line draw:style-name="gr4" draw:text-style-name="P257" svg:x1="6.867cm" svg:y1="3.078cm" svg:x2="6.366cm" svg:y2="3.078cm"><text:p/></draw:line><draw:line draw:style-name="gr4" draw:text-style-name="P257" svg:x1="6.867cm" svg:y1="3.078cm" svg:x2="6.867cm" svg:y2="3.577cm"><text:p/></draw:line><draw:line draw:style-name="gr4" draw:text-style-name="P257" svg:x1="7.366cm" svg:y1="3.579cm" svg:x2="6.867cm" svg:y2="3.579cm"><text:p/></draw:line><draw:line draw:style-name="gr4" draw:text-style-name="P257" svg:x1="7.366cm" svg:y1="3.577cm" svg:x2="7.366cm" svg:y2="3.078cm"><text:p/></draw:line><draw:line draw:style-name="gr4" draw:text-style-name="P257" svg:x1="7.616cm" svg:y1="3.078cm" svg:x2="7.366cm" svg:y2="3.078cm"><text:p/></draw:line><draw:line draw:style-name="gr4" draw:text-style-name="P257" svg:x1="7.618cm" svg:y1="3.078cm" svg:x2="7.618cm" svg:y2="3.577cm"><text:p/></draw:line><draw:line draw:style-name="gr4" draw:text-style-name="P257" svg:x1="10.869cm" svg:y1="3.579cm" svg:x2="7.618cm" svg:y2="3.579cm"><text:p/></draw:line></draw:g></text:p>
      <text:list xml:id="list38472246" text:continue-numbering="true" text:style-name="L1">
        <text:list-item>
          <text:list>
            <text:list-item>
              <text:h text:style-name="P216" text:outline-level="2"><text:soft-page-break/><text:alphabetical-index-mark-start text:id="IMark225902392"/>MUX_4<text:alphabetical-index-mark-end text:id="IMark225902392"/></text:h>
            </text:list-item>
          </text:list>
        </text:list-item>
      </text:list>
      <text:p text:style-name="P69">Type<text:tab/>Funktion : BOOL</text:p>
      <text:p text:style-name="P66"><text:span text:style-name="T15">Input</text:span><text:span text:style-name="T14"><text:tab/>D0 : BOOL (Eingang 0)</text:span></text:p>
      <text:p text:style-name="P69"><text:tab/>D1 : BOOL (Eingang 1)</text:p>
      <text:p text:style-name="P69"><text:tab/>D2 : BOOL (Eingang 2)</text:p>
      <text:p text:style-name="P69"><text:tab/>D3 : BOOL (Eingang 3)</text:p>
      <text:p text:style-name="P183"><draw:frame draw:style-name="fr3" draw:name="Grafik117" text:anchor-type="paragraph" svg:x="1.092cm" svg:y="0.64cm" svg:width="3.18cm" svg:height="3.371cm" draw:z-index="78"><draw:image xlink:href="Pictures/10000000000000F0000000FF27105534.png" xlink:type="simple" xlink:show="embed" xlink:actuate="onLoad"/></draw:frame>Output<text:tab/>BOOL (D0, wenn A0=0 und A1 = 0, usw...)</text:p>
      <text:p text:style-name="P66"><text:span text:style-name="T21"><text:line-break/>MUX_4 ist ein 4-Bit </text:span><text:span text:style-name="T16">Multiplexer.</text:span><text:span text:style-name="T21"> Der Ausgang entspricht D0, wenn A0=0 und A1=0. Er entspricht D3, wenn A0=1 und A1=1.</text:span></text:p>
      <text:p text:style-name="P73">Logische Verknüpfung:<text:tab/>MUX_4 <text:s/>= <text:tab/>D0 &amp; /A0 &amp; /A1 + D1 &amp; A0 &amp; /A1</text:p>
      <text:p text:style-name="P183"><text:tab/><text:tab/><text:tab/>+ D2 &amp; /A0 &amp; A1 + D3 &amp; A0 &amp; A1</text:p>
      <text:p text:style-name="P73"/>
      <text:p text:style-name="P73"><draw:g text:anchor-type="paragraph" draw:z-index="83" draw:style-name="gr1"><draw:line draw:style-name="gr13" draw:text-style-name="P257" svg:x1="2.152cm" svg:y1="1.692cm" svg:x2="2.902cm" svg:y2="1.692cm"><text:p/></draw:line><draw:line draw:style-name="gr13" draw:text-style-name="P257" svg:x1="2.9cm" svg:y1="1.193cm" svg:x2="2.9cm" svg:y2="1.692cm"><text:p/></draw:line><draw:line draw:style-name="gr13" draw:text-style-name="P257" svg:x1="2.9cm" svg:y1="1.193cm" svg:x2="5.151cm" svg:y2="1.193cm"><text:p/></draw:line><draw:line draw:style-name="gr13" draw:text-style-name="P257" svg:x1="5.152cm" svg:y1="1.692cm" svg:x2="5.152cm" svg:y2="1.193cm"><text:p/></draw:line><draw:line draw:style-name="gr13" draw:text-style-name="P257" svg:x1="5.902cm" svg:y1="1.193cm" svg:x2="5.902cm" svg:y2="1.692cm"><text:p/></draw:line><draw:line draw:style-name="gr13" draw:text-style-name="P257" svg:x1="9.652cm" svg:y1="1.692cm" svg:x2="11.153cm" svg:y2="1.692cm"><text:p/></draw:line><draw:line draw:style-name="gr3" draw:text-style-name="P257" svg:x1="3.152cm" svg:y1="0.194cm" svg:x2="3.152cm" svg:y2="0.693cm"><text:p/></draw:line><draw:line draw:style-name="gr3" draw:text-style-name="P257" svg:x1="2.152cm" svg:y1="0.692cm" svg:x2="3.152cm" svg:y2="0.692cm"><text:p/></draw:line><draw:line draw:style-name="gr3" draw:text-style-name="P257" svg:x1="3.152cm" svg:y1="0.194cm" svg:x2="3.402cm" svg:y2="0.194cm"><text:p/></draw:line><draw:line draw:style-name="gr3" draw:text-style-name="P257" svg:x1="3.399cm" svg:y1="0.693cm" svg:x2="3.399cm" svg:y2="0.194cm"><text:p/></draw:line><draw:line draw:style-name="gr3" draw:text-style-name="P257" svg:x1="3.399cm" svg:y1="0.692cm" svg:x2="6.149cm" svg:y2="0.692cm"><text:p/></draw:line><draw:line draw:style-name="gr3" draw:text-style-name="P257" svg:x1="6.152cm" svg:y1="0.194cm" svg:x2="6.152cm" svg:y2="0.693cm"><text:p/></draw:line><draw:line draw:style-name="gr3" draw:text-style-name="P257" svg:x1="6.152cm" svg:y1="0.194cm" svg:x2="7.152cm" svg:y2="0.194cm"><text:p/></draw:line><draw:line draw:style-name="gr3" draw:text-style-name="P257" svg:x1="7.151cm" svg:y1="0.693cm" svg:x2="7.151cm" svg:y2="0.194cm"><text:p/></draw:line><draw:line draw:style-name="gr3" draw:text-style-name="P257" svg:x1="7.151cm" svg:y1="0.692cm" svg:x2="7.65cm" svg:y2="0.692cm"><text:p/></draw:line><draw:line draw:style-name="gr3" draw:text-style-name="P257" svg:x1="7.65cm" svg:y1="0.194cm" svg:x2="7.65cm" svg:y2="0.693cm"><text:p/></draw:line><draw:line draw:style-name="gr3" draw:text-style-name="P257" svg:x1="7.65cm" svg:y1="0.194cm" svg:x2="7.9cm" svg:y2="0.194cm"><text:p/></draw:line><draw:line draw:style-name="gr3" draw:text-style-name="P257" svg:x1="7.902cm" svg:y1="0.693cm" svg:x2="7.902cm" svg:y2="0.194cm"><text:p/></draw:line><draw:line draw:style-name="gr3" draw:text-style-name="P257" svg:x1="7.902cm" svg:y1="0.692cm" svg:x2="11.153cm" svg:y2="0.692cm"><text:p/></draw:line><draw:frame draw:style-name="gr6" draw:text-style-name="P259" svg:width="0.997cm" svg:height="0.65cm" svg:x="1.402cm" svg:y="1.194cm"><draw:text-box><text:p text:style-name="P258"><text:span text:style-name="T32">D1</text:span></text:p></draw:text-box></draw:frame><draw:frame draw:style-name="gr6" draw:text-style-name="P259" svg:width="0.997cm" svg:height="0.65cm" svg:x="1.402cm" svg:y="0.194cm"><draw:text-box><text:p text:style-name="P258"><text:span text:style-name="T32">D0</text:span></text:p></draw:text-box></draw:frame><draw:line draw:style-name="gr13" draw:text-style-name="P257" svg:x1="5.902cm" svg:y1="1.193cm" svg:x2="9.652cm" svg:y2="1.193cm"><text:p/></draw:line><draw:line draw:style-name="gr13" draw:text-style-name="P257" svg:x1="9.652cm" svg:y1="1.193cm" svg:x2="9.652cm" svg:y2="1.692cm"><text:p/></draw:line><draw:line draw:style-name="gr13" draw:text-style-name="P257" svg:x1="5.152cm" svg:y1="1.692cm" svg:x2="5.902cm" svg:y2="1.692cm"><text:p/></draw:line><draw:line draw:style-name="gr2" draw:text-style-name="P257" svg:x1="2.152cm" svg:y1="4.59cm" svg:x2="6.652cm" svg:y2="4.59cm"><text:p/></draw:line><draw:line draw:style-name="gr2" draw:text-style-name="P257" svg:x1="6.65cm" svg:y1="4.089cm" svg:x2="6.65cm" svg:y2="4.59cm"><text:p/></draw:line><draw:line draw:style-name="gr2" draw:text-style-name="P257" svg:x1="6.65cm" svg:y1="4.089cm" svg:x2="11.151cm" svg:y2="4.089cm"><text:p/></draw:line><draw:frame draw:style-name="gr6" draw:text-style-name="P259" svg:width="0.997cm" svg:height="0.65cm" svg:x="1.402cm" svg:y="4.09cm"><draw:text-box><text:p text:style-name="P258"><text:span text:style-name="T32">A0</text:span></text:p></draw:text-box></draw:frame><draw:line draw:style-name="gr4" draw:text-style-name="P257" svg:x1="3.152cm" svg:y1="6.442cm" svg:x2="3.152cm" svg:y2="5.943cm"><text:p/></draw:line><draw:line draw:style-name="gr4" draw:text-style-name="P257" svg:x1="3.402cm" svg:y1="5.943cm" svg:x2="3.152cm" svg:y2="5.943cm"><text:p/></draw:line><draw:line draw:style-name="gr4" draw:text-style-name="P257" svg:x1="3.399cm" svg:y1="5.943cm" svg:x2="3.399cm" svg:y2="6.442cm"><text:p/></draw:line><draw:line draw:style-name="gr4" draw:text-style-name="P257" svg:x1="4.65cm" svg:y1="6.442cm" svg:x2="3.399cm" svg:y2="6.442cm"><text:p/></draw:line><draw:line draw:style-name="gr4" draw:text-style-name="P257" svg:x1="2.152cm" svg:y1="6.442cm" svg:x2="3.152cm" svg:y2="6.442cm"><text:p/></draw:line><draw:frame draw:style-name="gr6" draw:text-style-name="P259" svg:width="0.997cm" svg:height="0.65cm" svg:x="1.402cm" svg:y="5.944cm"><draw:text-box><text:p text:style-name="P258"><text:span text:style-name="T32">Q</text:span></text:p></draw:text-box></draw:frame><draw:line draw:style-name="gr4" draw:text-style-name="P257" svg:x1="4.653cm" svg:y1="5.943cm" svg:x2="4.653cm" svg:y2="6.442cm"><text:p/></draw:line><draw:line draw:style-name="gr4" draw:text-style-name="P257" svg:x1="5.902cm" svg:y1="6.442cm" svg:x2="5.152cm" svg:y2="6.442cm"><text:p/></draw:line><draw:line draw:style-name="gr4" draw:text-style-name="P257" svg:x1="5.902cm" svg:y1="5.943cm" svg:x2="5.902cm" svg:y2="6.442cm"><text:p/></draw:line><draw:line draw:style-name="gr4" draw:text-style-name="P257" svg:x1="6.652cm" svg:y1="5.943cm" svg:x2="5.902cm" svg:y2="5.943cm"><text:p/></draw:line><draw:line draw:style-name="gr4" draw:text-style-name="P257" svg:x1="7.65cm" svg:y1="6.442cm" svg:x2="7.65cm" svg:y2="5.943cm"><text:p/></draw:line><draw:line draw:style-name="gr4" draw:text-style-name="P257" svg:x1="8.65cm" svg:y1="5.943cm" svg:x2="7.65cm" svg:y2="5.943cm"><text:p/></draw:line><draw:line draw:style-name="gr4" draw:text-style-name="P257" svg:x1="8.652cm" svg:y1="5.943cm" svg:x2="8.652cm" svg:y2="6.442cm"><text:p/></draw:line><draw:line draw:style-name="gr4" draw:text-style-name="P257" svg:x1="9.153cm" svg:y1="6.442cm" svg:x2="8.652cm" svg:y2="6.442cm"><text:p/></draw:line><draw:line draw:style-name="gr5" draw:text-style-name="P257" svg:x1="2.152cm" svg:y1="2.692cm" svg:x2="7.652cm" svg:y2="2.692cm"><text:p/></draw:line><draw:line draw:style-name="gr5" draw:text-style-name="P257" svg:x1="7.65cm" svg:y1="2.191cm" svg:x2="7.65cm" svg:y2="2.69cm"><text:p/></draw:line><draw:line draw:style-name="gr5" draw:text-style-name="P257" svg:x1="8.65cm" svg:y1="2.191cm" svg:x2="7.65cm" svg:y2="2.191cm"><text:p/></draw:line><draw:line draw:style-name="gr5" draw:text-style-name="P257" svg:x1="8.652cm" svg:y1="2.191cm" svg:x2="8.652cm" svg:y2="2.69cm"><text:p/></draw:line><draw:line draw:style-name="gr5" draw:text-style-name="P257" svg:x1="11.153cm" svg:y1="2.692cm" svg:x2="8.652cm" svg:y2="2.692cm"><text:p/></draw:line><draw:line draw:style-name="gr11" draw:text-style-name="P257" svg:x1="8.403cm" svg:y1="3.692cm" svg:x2="8.403cm" svg:y2="3.193cm"><text:p/></draw:line><draw:line draw:style-name="gr11" draw:text-style-name="P257" svg:x1="11.153cm" svg:y1="3.193cm" svg:x2="8.403cm" svg:y2="3.193cm"><text:p/></draw:line><draw:line draw:style-name="gr11" draw:text-style-name="P257" svg:x1="2.152cm" svg:y1="3.694cm" svg:x2="8.403cm" svg:y2="3.694cm"><text:p/></draw:line><draw:line draw:style-name="gr12" draw:text-style-name="P257" svg:x1="2.152cm" svg:y1="5.442cm" svg:x2="4.653cm" svg:y2="5.442cm"><text:p/></draw:line><draw:line draw:style-name="gr12" draw:text-style-name="P257" svg:x1="4.653cm" svg:y1="4.943cm" svg:x2="4.653cm" svg:y2="5.442cm"><text:p/></draw:line><draw:line draw:style-name="gr12" draw:text-style-name="P257" svg:x1="9.153cm" svg:y1="4.943cm" svg:x2="4.653cm" svg:y2="4.943cm"><text:p/></draw:line><draw:line draw:style-name="gr12" draw:text-style-name="P257" svg:x1="9.153cm" svg:y1="4.943cm" svg:x2="9.153cm" svg:y2="5.442cm"><text:p/></draw:line><draw:line draw:style-name="gr12" draw:text-style-name="P257" svg:x1="11.153cm" svg:y1="5.442cm" svg:x2="9.153cm" svg:y2="5.442cm"><text:p/></draw:line><draw:frame draw:style-name="gr6" draw:text-style-name="P259" svg:width="0.997cm" svg:height="0.65cm" svg:x="1.402cm" svg:y="3.09cm"><draw:text-box><text:p text:style-name="P258"><text:span text:style-name="T32">D3</text:span></text:p></draw:text-box></draw:frame><draw:frame draw:style-name="gr6" draw:text-style-name="P259" svg:width="0.997cm" svg:height="0.65cm" svg:x="1.402cm" svg:y="2.09cm"><draw:text-box><text:p text:style-name="P258"><text:span text:style-name="T32">D2</text:span></text:p></draw:text-box></draw:frame><draw:frame draw:style-name="gr6" draw:text-style-name="P259" svg:width="0.997cm" svg:height="0.65cm" svg:x="1.402cm" svg:y="4.944cm"><draw:text-box><text:p text:style-name="P258"><text:span text:style-name="T32">A1</text:span></text:p></draw:text-box></draw:frame><draw:line draw:style-name="gr4" draw:text-style-name="P257" svg:x1="9.153cm" svg:y1="6.442cm" svg:x2="9.153cm" svg:y2="5.943cm"><text:p/></draw:line><draw:line draw:style-name="gr4" draw:text-style-name="P257" svg:x1="11.153cm" svg:y1="5.943cm" svg:x2="9.153cm" svg:y2="5.943cm"><text:p/></draw:line><draw:line draw:style-name="gr4" draw:text-style-name="P257" svg:x1="5.152cm" svg:y1="5.943cm" svg:x2="5.152cm" svg:y2="6.442cm"><text:p/></draw:line><draw:line draw:style-name="gr4" draw:text-style-name="P257" svg:x1="6.65cm" svg:y1="5.943cm" svg:x2="6.65cm" svg:y2="6.442cm"><text:p/></draw:line><draw:line draw:style-name="gr4" draw:text-style-name="P257" svg:x1="4.653cm" svg:y1="5.943cm" svg:x2="5.152cm" svg:y2="5.943cm"><text:p/></draw:line><draw:line draw:style-name="gr4" draw:text-style-name="P257" svg:x1="6.65cm" svg:y1="6.442cm" svg:x2="7.65cm" svg:y2="6.442cm"><text:p/></draw:line></draw:g></text:p>
      <text:list xml:id="list38452557" text:continue-numbering="true" text:style-name="L1">
        <text:list-item>
          <text:list>
            <text:list-item>
              <text:h text:style-name="P216" text:outline-level="2"><text:soft-page-break/><text:alphabetical-index-mark-start text:id="IMark225902392"/>PARITY<text:alphabetical-index-mark-end text:id="IMark225902392"/></text:h>
            </text:list-item>
          </text:list>
        </text:list-item>
      </text:list>
      <text:p text:style-name="P69">Type<text:tab/>Funktion : BOOL</text:p>
      <text:p text:style-name="P66"><text:span text:style-name="T15">Input</text:span><text:span text:style-name="T14"><text:tab/>IN : BYTE (Eingangs BYTE)</text:span></text:p>
      <text:p text:style-name="P73"><draw:frame draw:style-name="fr3" draw:name="Grafik118" text:anchor-type="paragraph" svg:x="1.071cm" svg:y="0.679cm" svg:width="2.731cm" svg:height="1.12cm" draw:z-index="79"><draw:image xlink:href="Pictures/10000000000000CE00000055FB83BF65.png" xlink:type="simple" xlink:show="embed" xlink:actuate="onLoad"/></draw:frame>Output<text:tab/>BOOL (Ausgang ist TRUE, wenn Parität gerade ist)</text:p>
      <text:p text:style-name="P73"><text:line-break/>PARITY bildet eine gerade Parität über das Eingangsbyte IN. Der Ausgang ist TRUE wenn die Anzahl der TRUE Bits im Byte (In) ungerade ist.</text:p>
      <text:list xml:id="list38451941" text:continue-numbering="true" text:style-name="L1">
        <text:list-item>
          <text:list>
            <text:list-item>
              <text:h text:style-name="P216" text:outline-level="2"><text:alphabetical-index-mark-start text:id="IMark225902392"/>PIN_CODE<text:alphabetical-index-mark-end text:id="IMark225902392"/></text:h>
            </text:list-item>
          </text:list>
        </text:list-item>
      </text:list>
      <text:p text:style-name="P69">Type<text:tab/>Funktionsbaustein</text:p>
      <text:p text:style-name="P66"><text:span text:style-name="T15">Input</text:span><text:span text:style-name="T14"><text:tab/>CB : BYTE (Eingang)</text:span></text:p>
      <text:p text:style-name="P173"><text:span text:style-name="T14"><text:tab/>E : BOOL (</text:span><text:span text:style-name="T15">Enable</text:span><text:span text:style-name="T14"> Eingang)</text:span></text:p>
      <text:p text:style-name="P173"><text:span text:style-name="T14">SETUP<text:tab/>PIN : STRING(8) (zu prüfender </text:span><text:span text:style-name="T15">String</text:span><text:span text:style-name="T14">)</text:span></text:p>
      <text:p text:style-name="P73"><draw:frame draw:style-name="fr3" draw:name="Grafik734" text:anchor-type="paragraph" svg:x="1.025cm" svg:y="0.699cm" svg:width="2.499cm" svg:height="1.49cm" draw:z-index="772"><draw:image xlink:href="Pictures/10000000000000BD00000071BB0F82A3.png" xlink:type="simple" xlink:show="embed" xlink:actuate="onLoad"/></draw:frame>Output<text:tab/>TP (<text:span text:style-name="T2">Trigger</text:span> Ausgang)</text:p>
      <text:p text:style-name="P183"><text:line-break/>PIN_CODE überprüft einen Datenstrom von Bytes auf das Vorkommen einer bestimmten Sequenz. Tritt die Sequenz auf, wird dies mit einem TRUE am Ausgang TP signalisiert.</text:p>
      <text:p text:style-name="P183"><draw:frame draw:style-name="fr3" draw:name="Grafik735" text:anchor-type="paragraph" svg:x="1.09cm" svg:y="1.162cm" svg:width="14.12cm" svg:height="4.009cm" draw:z-index="773"><draw:image xlink:href="Pictures/1000000000000335000000E95443E6C9.png" xlink:type="simple" xlink:show="embed" xlink:actuate="onLoad"/></draw:frame>Im folgenden Beispiel werden 2 Bausteine PIN_CODE verwendet um 2 CODE_SEQUENZEN einer Matrix Tastatur zu dekodieren.</text:p>
      <text:p text:style-name="P183"><text:s/></text:p>
      <text:list xml:id="list38474385" text:continue-numbering="true" text:style-name="L1">
        <text:list-item>
          <text:list>
            <text:list-item>
              <text:h text:style-name="P216" text:outline-level="2"><text:soft-page-break/><text:alphabetical-index-mark-start text:id="IMark225902392"/>REAL_TO_DW<text:alphabetical-index-mark-end text:id="IMark225902392"/></text:h>
            </text:list-item>
          </text:list>
        </text:list-item>
      </text:list>
      <text:p text:style-name="P69">Type<text:tab/>Funktion : DWORD</text:p>
      <text:p text:style-name="P66"><text:span text:style-name="T15">Input</text:span><text:span text:style-name="T14"><text:tab/>IN : REAL (Eingang)</text:span></text:p>
      <text:p text:style-name="P73"><draw:frame draw:style-name="fr3" draw:name="Grafik551" text:anchor-type="paragraph" svg:x="1.046cm" svg:y="0.667cm" svg:width="5.42cm" svg:height="1.12cm" draw:z-index="566"><draw:image xlink:href="Pictures/100000000000019A0000005543E02C22.png" xlink:type="simple" xlink:show="embed" xlink:actuate="onLoad"/></draw:frame>Output<text:tab/>DWORD (Ausgangswert)</text:p>
      <text:p text:style-name="P183"><text:line-break/>REAL_TO_DW kopiert das Bitmuster eines REAL (IN) in ein DWORD. Es werden dabei die einzelnen Bits kopiert ohne auf deren Bedeutung zu achten. Die Funktion DW_TO_REAL ist die Umkehrfunktion so das die Konvertierung von REAL_TO_DW und anschließend DW_TO_REAL wiederum den Ausgangswert ergibt. Die IEC Standardfunktion REAL_TO_DWORD wandelt den REAL Wert in einen Festzahlenwert und Rundet an der kleinsten Stelle des DWORD.</text:p>
      <text:list xml:id="list38444935" text:continue-numbering="true" text:style-name="L1">
        <text:list-item>
          <text:list>
            <text:list-item>
              <text:h text:style-name="P216" text:outline-level="2"><text:alphabetical-index-mark-start text:id="IMark225902392"/>REVERSE<text:alphabetical-index-mark-end text:id="IMark225902392"/></text:h>
            </text:list-item>
          </text:list>
        </text:list-item>
      </text:list>
      <text:p text:style-name="P69">Type<text:tab/>Funktion : BYTE</text:p>
      <text:p text:style-name="P66"><text:span text:style-name="T15">Input</text:span><text:span text:style-name="T14"><text:tab/>IN : BYTE (Eingangs BYTE)</text:span></text:p>
      <text:p text:style-name="P73"><draw:frame draw:style-name="fr3" draw:name="Grafik216" text:anchor-type="paragraph" svg:x="1.023cm" svg:y="0.676cm" svg:width="3.69cm" svg:height="0.99cm" draw:z-index="306"><draw:image xlink:href="Pictures/10000000000001170000004B1522CB51.png" xlink:type="simple" xlink:show="embed" xlink:actuate="onLoad"/></draw:frame>Output<text:tab/>BYTE(Ausgangs Byte)</text:p>
      <text:p text:style-name="P73"><text:line-break/>REVERSE dreht die Reihenfolge der Bits in einem Byte um. Bit7 von IN wird zu Bit 0, Bit 6 wird zu Bit 1 usw.</text:p>
      <text:p text:style-name="P183">Beispiel:<text:tab/>REVERSE(10011110) = 01111001</text:p>
      <text:p text:style-name="P183"/>
      <text:p text:style-name="P183"/>
      <text:p text:style-name="P183"/>
      <text:list xml:id="list38465113" text:continue-numbering="true" text:style-name="L1">
        <text:list-item>
          <text:list>
            <text:list-item>
              <text:h text:style-name="P216" text:outline-level="2"><text:soft-page-break/><text:alphabetical-index-mark-start text:id="IMark225902392"/>SHL1<text:alphabetical-index-mark-end text:id="IMark225902392"/></text:h>
            </text:list-item>
          </text:list>
        </text:list-item>
      </text:list>
      <text:p text:style-name="P69">Type<text:tab/>Funktion : DWORD</text:p>
      <text:p text:style-name="P66"><text:span text:style-name="T15">Input</text:span><text:span text:style-name="T14"><text:tab/>IN : DWORD (Eingangsdaten)</text:span></text:p>
      <text:p text:style-name="P179"><text:tab/>N : INT (Anzahl der zu schiebenden Bits)</text:p>
      <text:p text:style-name="P73">Output<text:tab/>DWORD (Ergebnis)</text:p>
      <text:p text:style-name="P73"><draw:frame draw:style-name="fr3" draw:name="Grafik318" text:anchor-type="paragraph" svg:x="1.037cm" svg:y="0.03cm" svg:width="2.499cm" svg:height="1.39cm" draw:z-index="278"><draw:image xlink:href="Pictures/10000000000000BD0000006950A29B1D.png" xlink:type="simple" xlink:show="embed" xlink:actuate="onLoad"/></draw:frame><text:line-break/>SHL1 schiebt das Eingangs DWORD um N Bits nach Links und füllt die N Rechten Bits mit 1en auf. Im Gegensatz zur IEC Standard Funktion SHL die beim Schieben mit Nullen aufgefüllt wird bei SHL1 mit Einsen Aufgefüllt.</text:p>
      <text:p text:style-name="P183">Beispiel:<text:tab/>SHL1(11110000,2) ergibt 11000011</text:p>
      <text:list xml:id="list38456707" text:continue-numbering="true" text:style-name="L1">
        <text:list-item>
          <text:list>
            <text:list-item>
              <text:h text:style-name="P216" text:outline-level="2"><text:alphabetical-index-mark-start text:id="IMark225902392"/>SHR1<text:alphabetical-index-mark-end text:id="IMark225902392"/></text:h>
            </text:list-item>
          </text:list>
        </text:list-item>
      </text:list>
      <text:p text:style-name="P69">Type<text:tab/>Funktion : DWORD</text:p>
      <text:p text:style-name="P66"><text:span text:style-name="T15">Input</text:span><text:span text:style-name="T14"><text:tab/>IN : DWORD (Eingangsdaten)</text:span></text:p>
      <text:p text:style-name="P179"><text:tab/>N : INT (Anzahl der zu schiebenden Bits)</text:p>
      <text:p text:style-name="P73"><draw:frame draw:style-name="fr3" draw:name="Grafik319" text:anchor-type="paragraph" svg:x="1.09cm" svg:y="0.686cm" svg:width="2.499cm" svg:height="1.39cm" draw:z-index="279"><draw:image xlink:href="Pictures/10000000000000BD0000006989192CEB.png" xlink:type="simple" xlink:show="embed" xlink:actuate="onLoad"/></draw:frame>Output<text:tab/>DWORD (Ergebnis)</text:p>
      <text:p text:style-name="P66"><text:span text:style-name="T21"><text:line-break/>SHR1 schiebt das Eingangs DWORD um N Bits nach Rechts und füllt die N </text:span><text:span text:style-name="T21">linken Bits mit 1en auf. Im Gegensatz zur IEC Standard Funktion SHL die beim Schieben mit Nullen aufgefüllt wird bei SHR1 mit Einsen Aufgefüllt.</text:span></text:p>
      <text:p text:style-name="P183">Beispiel:<text:tab/>SHR1(11110000,2) ergibt 11111100</text:p>
      <text:p text:style-name="P183"/>
      <text:list xml:id="list38471708" text:continue-numbering="true" text:style-name="L1">
        <text:list-item>
          <text:list>
            <text:list-item>
              <text:h text:style-name="P216" text:outline-level="2"><text:soft-page-break/><text:alphabetical-index-mark-start text:id="IMark225902392"/>SWAP_BYTE<text:alphabetical-index-mark-end text:id="IMark225902392"/></text:h>
            </text:list-item>
          </text:list>
        </text:list-item>
      </text:list>
      <text:p text:style-name="P69">Type<text:tab/>Funktion : WORD</text:p>
      <text:p text:style-name="P66"><text:span text:style-name="T15">Input</text:span><text:span text:style-name="T14"><text:tab/>IN : WORD (Eingangsdaten)</text:span></text:p>
      <text:p text:style-name="P183"><draw:frame draw:style-name="fr3" draw:name="Grafik447" text:anchor-type="paragraph" svg:x="1.046cm" svg:y="0.688cm" svg:width="4.521cm" svg:height="1.12cm" draw:z-index="424"><draw:image xlink:href="Pictures/10000000000001560000005500DC9585.png" xlink:type="simple" xlink:show="embed" xlink:actuate="onLoad"/></draw:frame>Output<text:tab/>WORD (Ergebnis)</text:p>
      <text:p text:style-name="P173"><text:span text:style-name="T21"><text:line-break/>SWAP_BYTE tauscht das </text:span><text:span text:style-name="T16">High</text:span><text:span text:style-name="T21"> und </text:span><text:span text:style-name="T16">Low</text:span><text:span text:style-name="T21"> Byte in einem WORD.</text:span></text:p>
      <text:p text:style-name="P183">Beispiel:<text:tab/>SWAP_BYTE(16#33df) = 16#df33.</text:p>
      <text:list xml:id="list38461518" text:continue-numbering="true" text:style-name="L1">
        <text:list-item>
          <text:list>
            <text:list-item>
              <text:h text:style-name="P216" text:outline-level="2"><text:alphabetical-index-mark-start text:id="IMark225902392"/>SWAP_BYTE2<text:alphabetical-index-mark-end text:id="IMark225902392"/></text:h>
            </text:list-item>
          </text:list>
        </text:list-item>
      </text:list>
      <text:p text:style-name="P69">Type<text:tab/>Funktion : DWORD</text:p>
      <text:p text:style-name="P66"><text:span text:style-name="T15">Input</text:span><text:span text:style-name="T14"><text:tab/>IN : DWORD (Eingangsdaten)</text:span></text:p>
      <text:p text:style-name="P183"><draw:frame draw:style-name="fr3" draw:name="Grafik448" text:anchor-type="paragraph" svg:x="1.025cm" svg:y="0.663cm" svg:width="4.521cm" svg:height="1.12cm" draw:z-index="425"><draw:image xlink:href="Pictures/1000000000000156000000552E0061EF.png" xlink:type="simple" xlink:show="embed" xlink:actuate="onLoad"/></draw:frame>Output<text:tab/>DWORD (Ergebnis)</text:p>
      <text:p text:style-name="P183"><text:line-break/>SWAP_BYTE2 kehrt die Reihenfolge der Bytes in einem DWORD um.</text:p>
      <text:p text:style-name="P183">Beispiel:<text:tab/>SWAP_BYTE2(16#33df1122) = 16#2211df33.</text:p>
      <text:list xml:id="list38457419" text:continue-numbering="true" text:style-name="L1">
        <text:list-item>
          <text:list>
            <text:list-item>
              <text:h text:style-name="P216" text:outline-level="2"><text:alphabetical-index-mark-start text:id="IMark225902392"/>WORD_OF_BYTE<text:alphabetical-index-mark-end text:id="IMark225902392"/></text:h>
            </text:list-item>
          </text:list>
        </text:list-item>
      </text:list>
      <text:p text:style-name="P69">Type<text:tab/>Funktion : WORD</text:p>
      <text:p text:style-name="P66"><text:span text:style-name="T16">Input</text:span><text:span text:style-name="T21"><text:tab/>B1 : Byte (Eingangs Byte 1)</text:span></text:p>
      <text:p text:style-name="P73"><text:tab/>B0 : Byte (Eingangs Byte 0)</text:p>
      <text:p text:style-name="P73"><draw:frame draw:style-name="fr3" draw:name="Grafik214" text:anchor-type="paragraph" svg:x="1.046cm" svg:y="0.63cm" svg:width="6.32cm" svg:height="1.57cm" draw:z-index="540"><draw:image xlink:href="Pictures/10000000000001DE0000007777BC1C51.png" xlink:type="simple" xlink:show="embed" xlink:actuate="onLoad"/></draw:frame>Output<text:tab/>Word (Ergebnis Word)</text:p>
      <text:p text:style-name="P73"><text:soft-page-break/><text:line-break/>WORD_OF_BYTE setzt aus 2 separaten Bytes B0 und B1 ein Word zusammen.</text:p>
      <text:list xml:id="list38446688" text:continue-numbering="true" text:style-name="L1">
        <text:list-item>
          <text:list>
            <text:list-item>
              <text:h text:style-name="P216" text:outline-level="2"><text:alphabetical-index-mark-start text:id="IMark225902392"/>WORD_OF_DWORD<text:alphabetical-index-mark-end text:id="IMark225902392"/></text:h>
            </text:list-item>
          </text:list>
        </text:list-item>
      </text:list>
      <text:p text:style-name="P69">Type<text:tab/>Funktion : WORD</text:p>
      <text:p text:style-name="P66"><text:span text:style-name="T15">Input</text:span><text:span text:style-name="T14"><text:tab/>IN : DWORD (Eingangs DWORD)</text:span></text:p>
      <text:p text:style-name="P73"><draw:frame draw:style-name="fr3" draw:name="Grafik213" text:anchor-type="paragraph" svg:x="1.046cm" svg:y="0.619cm" svg:width="5.87cm" svg:height="1.57cm" draw:z-index="174"><draw:image xlink:href="Pictures/10000000000001BC000000779250AF5E.png" xlink:type="simple" xlink:show="embed" xlink:actuate="onLoad"/></draw:frame>Output<text:tab/>WORD (Ausgangs WORD)</text:p>
      <text:p text:style-name="P73"><text:line-break/>WORD_OF_DWORD extrahiert ein Word (W0 .. W1) aus einem DWORD.</text:p>
      <text:list xml:id="list38454264" text:continue-numbering="true" text:style-name="L1">
        <text:list-item>
          <text:h text:style-name="P210" text:outline-level="1"><text:span text:style-name="T6">Latches</text:span><text:span text:style-name="T8">, Flip-Flop</text:span> und Schieberegister</text:h>
          <text:list>
            <text:list-item>
              <text:h text:style-name="P216" text:outline-level="2"><text:alphabetical-index-mark-start text:id="IMark225902392"/>COUNT_BR<text:alphabetical-index-mark-end text:id="IMark225902392"/></text:h>
            </text:list-item>
          </text:list>
        </text:list-item>
      </text:list>
      <text:p text:style-name="P69">Type<text:tab/>Funktionsbaustein</text:p>
      <text:p text:style-name="P66"><text:span text:style-name="T15">Input</text:span><text:span text:style-name="T14"><text:tab/>SET : BOOL (asynchroner Set)</text:span></text:p>
      <text:p text:style-name="P69"><text:tab/>IN : BYTE (Vorgabewert für Set)</text:p>
      <text:p text:style-name="P69"><text:tab/>UP : BOOL (Vorwärts Schalter flankengetriggert)</text:p>
      <text:p text:style-name="P69"><text:tab/>DN : BOOL (Rückwärts Schalter flankengetriggert)</text:p>
      <text:p text:style-name="P173"><text:span text:style-name="T14"><text:tab/>STEP : BYTE (Schrittweite des </text:span><text:span text:style-name="T15">Counters</text:span><text:span text:style-name="T14">)</text:span></text:p>
      <text:p text:style-name="P173"><text:span text:style-name="T14"><text:tab/>MX : BYTE (Maximalwert des </text:span><text:span text:style-name="T15">Counters</text:span><text:span text:style-name="T14">)</text:span></text:p>
      <text:p text:style-name="P69"><text:tab/>RST : BOOL (asynchroner Reset)</text:p>
      <text:p text:style-name="P73"><draw:frame draw:style-name="fr3" draw:name="Grafik437" text:anchor-type="paragraph" svg:x="1.046cm" svg:y="0.667cm" svg:width="2.499cm" svg:height="3.5cm" draw:z-index="416"><draw:image xlink:href="Pictures/10000000000000BD0000010999EB8796.png" xlink:type="simple" xlink:show="embed" xlink:actuate="onLoad"/></draw:frame>Output<text:tab/>CNT : BYTE (Ausgang)</text:p>
      <text:p text:style-name="P183"><text:line-break/>COUNT_BR ist ein Byte Zähler der von 0 bis MX zählt und dann wieder bei 0 beginnt. Der Zähler kann mittels 2 flankengetriggerten Eingängen UP und DN sowohl vorwärts als auch Rückwärts Zählen. beim erreichen eines Endwerts 0 oder MX wird wieder bei 0 beziehungsweise MX weiter gezählt. Der Eingang STEP legt die Schrittweite des Zählers fest. Mit einem TRUE am Eingang SET wird der Zähler auf den an IN anliegenden Wert gesetzt. Ein Reset Eingang RST setzt den Zähler jederzeit auf 0.</text:p>
      <table:table table:name="Tabelle29" table:style-name="Tabelle29">
        <table:table-column table:style-name="Tabelle29.A"/>
        <table:table-column table:style-name="Tabelle29.B"/>
        <table:table-column table:style-name="Tabelle29.C"/>
        <table:table-column table:style-name="Tabelle29.D"/>
        <table:table-column table:style-name="Tabelle29.E"/>
        <table:table-column table:style-name="Tabelle29.F"/>
        <table:table-column table:style-name="Tabelle29.G"/>
        <table:table-column table:style-name="Tabelle29.H"/>
        <table:table-row>
          <table:table-cell table:style-name="Tabelle29.A1" office:value-type="string">
            <text:p text:style-name="P121"/>
          </table:table-cell>
          <table:table-cell table:style-name="Tabelle29.A1" office:value-type="string">
            <text:p text:style-name="P121">SET</text:p>
          </table:table-cell>
          <table:table-cell table:style-name="Tabelle29.A1" office:value-type="string">
            <text:p text:style-name="P121">IN</text:p>
          </table:table-cell>
          <table:table-cell table:style-name="Tabelle29.A1" office:value-type="string">
            <text:p text:style-name="P121">UP</text:p>
          </table:table-cell>
          <table:table-cell table:style-name="Tabelle29.A1" office:value-type="string">
            <text:p text:style-name="P121">DN</text:p>
          </table:table-cell>
          <table:table-cell table:style-name="Tabelle29.A1" office:value-type="string">
            <text:p text:style-name="P121">STEP</text:p>
          </table:table-cell>
          <table:table-cell table:style-name="Tabelle29.A1" office:value-type="string">
            <text:p text:style-name="P121">RST</text:p>
          </table:table-cell>
          <table:table-cell table:style-name="Tabelle29.H1" office:value-type="string">
            <text:p text:style-name="P121">CNT</text:p>
          </table:table-cell>
        </table:table-row>
        <table:table-row>
          <table:table-cell table:style-name="Tabelle29.A2" office:value-type="string">
            <text:p text:style-name="P125">Reset</text:p>
          </table:table-cell>
          <table:table-cell table:style-name="Tabelle29.A2" office:value-type="string">
            <text:p text:style-name="P121">-</text:p>
          </table:table-cell>
          <table:table-cell table:style-name="Tabelle29.A2" office:value-type="string">
            <text:p text:style-name="P121">-</text:p>
          </table:table-cell>
          <table:table-cell table:style-name="Tabelle29.A2" office:value-type="string">
            <text:p text:style-name="P121">-</text:p>
          </table:table-cell>
          <table:table-cell table:style-name="Tabelle29.A2" office:value-type="string">
            <text:p text:style-name="P121">-</text:p>
          </table:table-cell>
          <table:table-cell table:style-name="Tabelle29.A2" office:value-type="string">
            <text:p text:style-name="P121">-</text:p>
          </table:table-cell>
          <table:table-cell table:style-name="Tabelle29.A2" office:value-type="string">
            <text:p text:style-name="P121">1</text:p>
          </table:table-cell>
          <table:table-cell table:style-name="Tabelle29.H2" office:value-type="string">
            <text:p text:style-name="P121">0</text:p>
          </table:table-cell>
        </table:table-row>
        <table:table-row>
          <table:table-cell table:style-name="Tabelle29.A2" office:value-type="string">
            <text:p text:style-name="P121">Set</text:p>
          </table:table-cell>
          <table:table-cell table:style-name="Tabelle29.A2" office:value-type="string">
            <text:p text:style-name="P121">1</text:p>
          </table:table-cell>
          <table:table-cell table:style-name="Tabelle29.A2" office:value-type="string">
            <text:p text:style-name="P121">N</text:p>
          </table:table-cell>
          <table:table-cell table:style-name="Tabelle29.A2" office:value-type="string">
            <text:p text:style-name="P121">-</text:p>
          </table:table-cell>
          <table:table-cell table:style-name="Tabelle29.A2" office:value-type="string">
            <text:p text:style-name="P121">-</text:p>
          </table:table-cell>
          <table:table-cell table:style-name="Tabelle29.A2" office:value-type="string">
            <text:p text:style-name="P121">-</text:p>
          </table:table-cell>
          <table:table-cell table:style-name="Tabelle29.A2" office:value-type="string">
            <text:p text:style-name="P121">0</text:p>
          </table:table-cell>
          <table:table-cell table:style-name="Tabelle29.H2" office:value-type="string">
            <text:p text:style-name="P121">N</text:p>
          </table:table-cell>
        </table:table-row>
        <table:table-row>
          <table:table-cell table:style-name="Tabelle29.A2" office:value-type="string">
            <text:p text:style-name="P121">up</text:p>
          </table:table-cell>
          <table:table-cell table:style-name="Tabelle29.A2" office:value-type="string">
            <text:p text:style-name="P121">0</text:p>
          </table:table-cell>
          <table:table-cell table:style-name="Tabelle29.A2" office:value-type="string">
            <text:p text:style-name="P121">-</text:p>
          </table:table-cell>
          <table:table-cell table:style-name="Tabelle29.A2" office:value-type="string">
            <text:p text:style-name="P121">↑</text:p>
          </table:table-cell>
          <table:table-cell table:style-name="Tabelle29.A2" office:value-type="string">
            <text:p text:style-name="P121">0</text:p>
          </table:table-cell>
          <table:table-cell table:style-name="Tabelle29.A2" office:value-type="string">
            <text:p text:style-name="P121">N</text:p>
          </table:table-cell>
          <table:table-cell table:style-name="Tabelle29.A2" office:value-type="string">
            <text:p text:style-name="P121">0</text:p>
          </table:table-cell>
          <table:table-cell table:style-name="Tabelle29.H2" office:value-type="string">
            <text:p text:style-name="P121">CNT + N</text:p>
          </table:table-cell>
        </table:table-row>
        <table:table-row>
          <table:table-cell table:style-name="Tabelle29.A2" office:value-type="string">
            <text:p text:style-name="P97">down</text:p>
          </table:table-cell>
          <table:table-cell table:style-name="Tabelle29.A2" office:value-type="string">
            <text:p text:style-name="P121">0</text:p>
          </table:table-cell>
          <table:table-cell table:style-name="Tabelle29.A2" office:value-type="string">
            <text:p text:style-name="P121">-</text:p>
          </table:table-cell>
          <table:table-cell table:style-name="Tabelle29.A2" office:value-type="string">
            <text:p text:style-name="P120">0</text:p>
          </table:table-cell>
          <table:table-cell table:style-name="Tabelle29.A2" office:value-type="string">
            <text:p text:style-name="P121">↑</text:p>
          </table:table-cell>
          <table:table-cell table:style-name="Tabelle29.A2" office:value-type="string">
            <text:p text:style-name="P121">N</text:p>
          </table:table-cell>
          <table:table-cell table:style-name="Tabelle29.A2" office:value-type="string">
            <text:p text:style-name="P121">0</text:p>
          </table:table-cell>
          <table:table-cell table:style-name="Tabelle29.H2" office:value-type="string">
            <text:p text:style-name="P121">CNT - N</text:p>
          </table:table-cell>
        </table:table-row>
      </table:table>
      <text:p text:style-name="P183"><text:soft-page-break/></text:p>
      <text:p text:style-name="P183"><draw:frame draw:style-name="fr3" draw:name="Grafik438" text:anchor-type="paragraph" svg:x="2.545cm" svg:y="1.619cm" svg:width="8.789cm" svg:height="3.32cm" draw:z-index="417"><draw:image xlink:href="Pictures/10000000000001FF000000C128F3C1CA.png" xlink:type="simple" xlink:show="embed" xlink:actuate="onLoad"/></draw:frame>Falls die unabhängigen Eingänge UP und DN mit CLK und einen Steuereingang UP/DN ersetzt werden sollen kann dies mittels zwei AND Gattern vor den Eingängen erfolgen:</text:p>
      <text:p text:style-name="P64"/>
      <text:list xml:id="list38475500" text:continue-numbering="true" text:style-name="L1">
        <text:list-item>
          <text:list>
            <text:list-item>
              <text:h text:style-name="P216" text:outline-level="2"><text:alphabetical-index-mark-start text:id="IMark225902392"/>COUNT_DR<text:alphabetical-index-mark-end text:id="IMark225902392"/></text:h>
            </text:list-item>
          </text:list>
        </text:list-item>
      </text:list>
      <text:p text:style-name="P69">Type<text:tab/>Funktionsbaustein</text:p>
      <text:p text:style-name="P66"><text:span text:style-name="T15">Input</text:span><text:span text:style-name="T14"><text:tab/>SET : BOOL (asynchroner Set)</text:span></text:p>
      <text:p text:style-name="P69"><text:tab/>IN : DWORD (Vorgabewert für Set)</text:p>
      <text:p text:style-name="P69"><text:tab/>UP : BOOL (Vorwärts Schalter flankengetriggert)</text:p>
      <text:p text:style-name="P69"><text:tab/>DN : BOOL (Rückwärts Schalter flankengetriggert)</text:p>
      <text:p text:style-name="P173"><text:span text:style-name="T14"><text:tab/>STEP : DWORD (Schrittweite des </text:span><text:span text:style-name="T15">Counters</text:span><text:span text:style-name="T14">)</text:span></text:p>
      <text:p text:style-name="P173"><text:span text:style-name="T14"><text:tab/>MX : DWORD (Maximalwert des </text:span><text:span text:style-name="T15">Counters</text:span><text:span text:style-name="T14">)</text:span></text:p>
      <text:p text:style-name="P69"><text:tab/>RST : BOOL (asynchroner Reset)</text:p>
      <text:p text:style-name="P73"><draw:frame draw:style-name="fr3" draw:name="Grafik613" text:anchor-type="paragraph" svg:x="1.069cm" svg:y="0.667cm" svg:width="2.499cm" svg:height="3.5cm" draw:z-index="609"><draw:image xlink:href="Pictures/10000000000000BD00000109EB30A564.png" xlink:type="simple" xlink:show="embed" xlink:actuate="onLoad"/></draw:frame>Output<text:tab/>CNT : DWORD (Ausgang)</text:p>
      <text:p text:style-name="P173"><text:span text:style-name="T21"><text:line-break/>COUNT_DR ist ein DWORD (32-Bit) Zähler der von 0 bis MX zählt und dann wieder bei 0 beginnt. Der Zähler kann mittels 2 flankengetriggerten Eingängen UP und DN sowohl vorwärts als auch Rückwärts Zählen. beim erreichen eines Endwerts 0 oder MX wird wieder bei 0 beziehungsweise MX weiter gezählt. Der Eingang STEP legt die Schrittweite des Zählers fest. Mit </text:span><text:span text:style-name="T21">einem </text:span><text:soft-page-break/><text:span text:style-name="T21">TRUE am Eingang SET wird der Zähler auf den an IN anliegenden Wert gesetzt. Ein Reset Eingang RST setzt den Zähler jederzeit auf 0.</text:span></text:p>
      <table:table table:name="Tabelle37" table:style-name="Tabelle37">
        <table:table-column table:style-name="Tabelle37.A"/>
        <table:table-column table:style-name="Tabelle37.B"/>
        <table:table-column table:style-name="Tabelle37.C"/>
        <table:table-column table:style-name="Tabelle37.D"/>
        <table:table-column table:style-name="Tabelle37.E"/>
        <table:table-column table:style-name="Tabelle37.F"/>
        <table:table-column table:style-name="Tabelle37.G"/>
        <table:table-column table:style-name="Tabelle37.H"/>
        <table:table-row>
          <table:table-cell table:style-name="Tabelle37.A1" office:value-type="string">
            <text:p text:style-name="P121"/>
          </table:table-cell>
          <table:table-cell table:style-name="Tabelle37.A1" office:value-type="string">
            <text:p text:style-name="P121">SET</text:p>
          </table:table-cell>
          <table:table-cell table:style-name="Tabelle37.A1" office:value-type="string">
            <text:p text:style-name="P121">IN</text:p>
          </table:table-cell>
          <table:table-cell table:style-name="Tabelle37.A1" office:value-type="string">
            <text:p text:style-name="P121">UP</text:p>
          </table:table-cell>
          <table:table-cell table:style-name="Tabelle37.A1" office:value-type="string">
            <text:p text:style-name="P121">DN</text:p>
          </table:table-cell>
          <table:table-cell table:style-name="Tabelle37.A1" office:value-type="string">
            <text:p text:style-name="P121">STEP</text:p>
          </table:table-cell>
          <table:table-cell table:style-name="Tabelle37.A1" office:value-type="string">
            <text:p text:style-name="P121">RST</text:p>
          </table:table-cell>
          <table:table-cell table:style-name="Tabelle37.H1" office:value-type="string">
            <text:p text:style-name="P121">CNT</text:p>
          </table:table-cell>
        </table:table-row>
        <table:table-row>
          <table:table-cell table:style-name="Tabelle37.A2" office:value-type="string">
            <text:p text:style-name="P125">Reset</text:p>
          </table:table-cell>
          <table:table-cell table:style-name="Tabelle37.A2" office:value-type="string">
            <text:p text:style-name="P121">-</text:p>
          </table:table-cell>
          <table:table-cell table:style-name="Tabelle37.A2" office:value-type="string">
            <text:p text:style-name="P121">-</text:p>
          </table:table-cell>
          <table:table-cell table:style-name="Tabelle37.A2" office:value-type="string">
            <text:p text:style-name="P121">-</text:p>
          </table:table-cell>
          <table:table-cell table:style-name="Tabelle37.A2" office:value-type="string">
            <text:p text:style-name="P121">-</text:p>
          </table:table-cell>
          <table:table-cell table:style-name="Tabelle37.A2" office:value-type="string">
            <text:p text:style-name="P121">-</text:p>
          </table:table-cell>
          <table:table-cell table:style-name="Tabelle37.A2" office:value-type="string">
            <text:p text:style-name="P121">1</text:p>
          </table:table-cell>
          <table:table-cell table:style-name="Tabelle37.H2" office:value-type="string">
            <text:p text:style-name="P121">0</text:p>
          </table:table-cell>
        </table:table-row>
        <table:table-row>
          <table:table-cell table:style-name="Tabelle37.A2" office:value-type="string">
            <text:p text:style-name="P121">Set</text:p>
          </table:table-cell>
          <table:table-cell table:style-name="Tabelle37.A2" office:value-type="string">
            <text:p text:style-name="P121">1</text:p>
          </table:table-cell>
          <table:table-cell table:style-name="Tabelle37.A2" office:value-type="string">
            <text:p text:style-name="P121">N</text:p>
          </table:table-cell>
          <table:table-cell table:style-name="Tabelle37.A2" office:value-type="string">
            <text:p text:style-name="P121">-</text:p>
          </table:table-cell>
          <table:table-cell table:style-name="Tabelle37.A2" office:value-type="string">
            <text:p text:style-name="P121">-</text:p>
          </table:table-cell>
          <table:table-cell table:style-name="Tabelle37.A2" office:value-type="string">
            <text:p text:style-name="P121">-</text:p>
          </table:table-cell>
          <table:table-cell table:style-name="Tabelle37.A2" office:value-type="string">
            <text:p text:style-name="P121">0</text:p>
          </table:table-cell>
          <table:table-cell table:style-name="Tabelle37.H2" office:value-type="string">
            <text:p text:style-name="P121">N</text:p>
          </table:table-cell>
        </table:table-row>
        <table:table-row>
          <table:table-cell table:style-name="Tabelle37.A2" office:value-type="string">
            <text:p text:style-name="P121">up</text:p>
          </table:table-cell>
          <table:table-cell table:style-name="Tabelle37.A2" office:value-type="string">
            <text:p text:style-name="P121">0</text:p>
          </table:table-cell>
          <table:table-cell table:style-name="Tabelle37.A2" office:value-type="string">
            <text:p text:style-name="P121">-</text:p>
          </table:table-cell>
          <table:table-cell table:style-name="Tabelle37.A2" office:value-type="string">
            <text:p text:style-name="P121">↑</text:p>
          </table:table-cell>
          <table:table-cell table:style-name="Tabelle37.A2" office:value-type="string">
            <text:p text:style-name="P121">0</text:p>
          </table:table-cell>
          <table:table-cell table:style-name="Tabelle37.A2" office:value-type="string">
            <text:p text:style-name="P121">N</text:p>
          </table:table-cell>
          <table:table-cell table:style-name="Tabelle37.A2" office:value-type="string">
            <text:p text:style-name="P121">0</text:p>
          </table:table-cell>
          <table:table-cell table:style-name="Tabelle37.H2" office:value-type="string">
            <text:p text:style-name="P121">CNT + N</text:p>
          </table:table-cell>
        </table:table-row>
        <table:table-row>
          <table:table-cell table:style-name="Tabelle37.A2" office:value-type="string">
            <text:p text:style-name="P97">down</text:p>
          </table:table-cell>
          <table:table-cell table:style-name="Tabelle37.A2" office:value-type="string">
            <text:p text:style-name="P121">0</text:p>
          </table:table-cell>
          <table:table-cell table:style-name="Tabelle37.A2" office:value-type="string">
            <text:p text:style-name="P121">-</text:p>
          </table:table-cell>
          <table:table-cell table:style-name="Tabelle37.A2" office:value-type="string">
            <text:p text:style-name="P120">0</text:p>
          </table:table-cell>
          <table:table-cell table:style-name="Tabelle37.A2" office:value-type="string">
            <text:p text:style-name="P121">↑</text:p>
          </table:table-cell>
          <table:table-cell table:style-name="Tabelle37.A2" office:value-type="string">
            <text:p text:style-name="P121">N</text:p>
          </table:table-cell>
          <table:table-cell table:style-name="Tabelle37.A2" office:value-type="string">
            <text:p text:style-name="P121">0</text:p>
          </table:table-cell>
          <table:table-cell table:style-name="Tabelle37.H2" office:value-type="string">
            <text:p text:style-name="P121">CNT - N</text:p>
          </table:table-cell>
        </table:table-row>
      </table:table>
      <text:p text:style-name="P183"/>
      <text:p text:style-name="P183"><draw:frame draw:style-name="fr3" draw:name="Grafik614" text:anchor-type="paragraph" svg:x="2.545cm" svg:y="1.619cm" svg:width="8.789cm" svg:height="3.32cm" draw:z-index="608"><draw:image xlink:href="Pictures/10000000000001FF000000C128F3C1CA.png" xlink:type="simple" xlink:show="embed" xlink:actuate="onLoad"/></draw:frame>Falls die unabhängigen Eingänge UP und DN mit CLK und einen Steuereingang UP/DN ersetzt werden sollen kann dies mittels zwei AND Gattern vor den Eingängen erfolgen:</text:p>
      <text:p text:style-name="P183"/>
      <text:list xml:id="list38451871" text:continue-numbering="true" text:style-name="L1">
        <text:list-item>
          <text:list>
            <text:list-item>
              <text:h text:style-name="P216" text:outline-level="2"><text:alphabetical-index-mark-start text:id="IMark225902392"/>FF_D2E<text:alphabetical-index-mark-end text:id="IMark225902392"/></text:h>
            </text:list-item>
          </text:list>
        </text:list-item>
      </text:list>
      <text:p text:style-name="P69">Type<text:tab/>Funktionsbaustein</text:p>
      <text:p text:style-name="P66"><text:span text:style-name="T15">Input</text:span><text:span text:style-name="T14"><text:tab/>D0 : BOOL (Data 0 in)</text:span></text:p>
      <text:p text:style-name="P69"><text:tab/>D1 : BOOL (Data 1 in)</text:p>
      <text:p text:style-name="P69"><text:tab/>CLK : BOOL (Takteingang)</text:p>
      <text:p text:style-name="P69"><text:tab/>RST : BOOL (asynchroner Reset)</text:p>
      <text:p text:style-name="P66"><text:span text:style-name="T21">Output<text:tab/>Q0 : BOOL (Data 0 o</text:span><text:span text:style-name="T16">ut</text:span><text:span text:style-name="T21">)</text:span></text:p>
      <text:p text:style-name="P66"><draw:frame draw:style-name="fr3" draw:name="Grafik119" text:anchor-type="paragraph" svg:x="1.175cm" svg:y="0.612cm" svg:width="2.281cm" svg:height="2.649cm" draw:z-index="84"><draw:image xlink:href="Pictures/10000000000000AC000000C82226B47B.png" xlink:type="simple" xlink:show="embed" xlink:actuate="onLoad"/></draw:frame><text:span text:style-name="T21"><text:tab/>Q1 : BOOL (Data 1 o</text:span><text:span text:style-name="T16">ut</text:span><text:span text:style-name="T21">)</text:span></text:p>
      <text:p text:style-name="P66"><text:soft-page-break/><text:span text:style-name="T21"><text:line-break/>FF_D2E ist ein 2 Bit flankengetriggertes D-</text:span><text:span text:style-name="T16">Flip</text:span><text:span text:style-name="T21">-Flop mit asynchronem Reset-Eingang. Das D-</text:span><text:span text:style-name="T16">Flip</text:span><text:span text:style-name="T21">-Flop speichert die Werte am Eingang D mit einer steigenden Flanke am CLK Eingang.</text:span></text:p>
      <text:p text:style-name="P183"/>
      <text:p text:style-name="P183"><draw:g text:anchor-type="paragraph" draw:z-index="85" draw:style-name="gr1"><draw:line draw:style-name="gr13" draw:text-style-name="P257" svg:x1="2.143cm" svg:y1="1.663cm" svg:x2="2.893cm" svg:y2="1.663cm"><text:p/></draw:line><draw:line draw:style-name="gr13" draw:text-style-name="P257" svg:x1="2.898cm" svg:y1="1.162cm" svg:x2="2.898cm" svg:y2="1.661cm"><text:p/></draw:line><draw:line draw:style-name="gr13" draw:text-style-name="P257" svg:x1="2.898cm" svg:y1="1.162cm" svg:x2="5.149cm" svg:y2="1.162cm"><text:p/></draw:line><draw:line draw:style-name="gr13" draw:text-style-name="P257" svg:x1="5.147cm" svg:y1="1.661cm" svg:x2="5.147cm" svg:y2="1.162cm"><text:p/></draw:line><draw:line draw:style-name="gr13" draw:text-style-name="P257" svg:x1="6.394cm" svg:y1="1.162cm" svg:x2="6.394cm" svg:y2="1.661cm"><text:p/></draw:line><draw:line draw:style-name="gr13" draw:text-style-name="P257" svg:x1="9.643cm" svg:y1="1.663cm" svg:x2="11.142cm" svg:y2="1.663cm"><text:p/></draw:line><draw:line draw:style-name="gr3" draw:text-style-name="P257" svg:x1="2.898cm" svg:y1="0.159cm" svg:x2="2.898cm" svg:y2="0.658cm"><text:p/></draw:line><draw:line draw:style-name="gr3" draw:text-style-name="P257" svg:x1="2.143cm" svg:y1="0.661cm" svg:x2="2.893cm" svg:y2="0.661cm"><text:p/></draw:line><draw:line draw:style-name="gr3" draw:text-style-name="P257" svg:x1="2.898cm" svg:y1="0.159cm" svg:x2="3.648cm" svg:y2="0.159cm"><text:p/></draw:line><draw:line draw:style-name="gr3" draw:text-style-name="P257" svg:x1="3.644cm" svg:y1="0.658cm" svg:x2="3.644cm" svg:y2="0.159cm"><text:p/></draw:line><draw:line draw:style-name="gr3" draw:text-style-name="P257" svg:x1="3.644cm" svg:y1="0.661cm" svg:x2="6.145cm" svg:y2="0.661cm"><text:p/></draw:line><draw:line draw:style-name="gr3" draw:text-style-name="P257" svg:x1="6.147cm" svg:y1="0.159cm" svg:x2="6.147cm" svg:y2="0.658cm"><text:p/></draw:line><draw:line draw:style-name="gr3" draw:text-style-name="P257" svg:x1="6.147cm" svg:y1="0.159cm" svg:x2="7.147cm" svg:y2="0.159cm"><text:p/></draw:line><draw:line draw:style-name="gr3" draw:text-style-name="P257" svg:x1="7.149cm" svg:y1="0.658cm" svg:x2="7.149cm" svg:y2="0.159cm"><text:p/></draw:line><draw:line draw:style-name="gr3" draw:text-style-name="P257" svg:x1="7.149cm" svg:y1="0.661cm" svg:x2="11.148cm" svg:y2="0.661cm"><text:p/></draw:line><draw:frame draw:style-name="gr6" draw:text-style-name="P259" svg:width="0.997cm" svg:height="0.65cm" svg:x="1.145cm" svg:y="1.161cm"><draw:text-box><text:p text:style-name="P258"><text:span text:style-name="T32">D1</text:span></text:p></draw:text-box></draw:frame><draw:frame draw:style-name="gr6" draw:text-style-name="P259" svg:width="0.997cm" svg:height="0.65cm" svg:x="1.145cm" svg:y="0.16cm"><draw:text-box><text:p text:style-name="P258"><text:span text:style-name="T32">D0</text:span></text:p></draw:text-box></draw:frame><draw:line draw:style-name="gr13" draw:text-style-name="P257" svg:x1="6.394cm" svg:y1="1.162cm" svg:x2="9.645cm" svg:y2="1.162cm"><text:p/></draw:line><draw:line draw:style-name="gr13" draw:text-style-name="P257" svg:x1="9.643cm" svg:y1="1.162cm" svg:x2="9.643cm" svg:y2="1.661cm"><text:p/></draw:line><draw:line draw:style-name="gr13" draw:text-style-name="P257" svg:x1="5.147cm" svg:y1="1.663cm" svg:x2="6.396cm" svg:y2="1.663cm"><text:p/></draw:line><draw:line draw:style-name="gr4" draw:text-style-name="P257" svg:x1="3.143cm" svg:y1="2.66cm" svg:x2="3.143cm" svg:y2="2.161cm"><text:p/></draw:line><draw:line draw:style-name="gr4" draw:text-style-name="P257" svg:x1="4.143cm" svg:y1="2.161cm" svg:x2="3.143cm" svg:y2="2.161cm"><text:p/></draw:line><draw:line draw:style-name="gr4" draw:text-style-name="P257" svg:x1="4.145cm" svg:y1="2.161cm" svg:x2="4.145cm" svg:y2="2.66cm"><text:p/></draw:line><draw:line draw:style-name="gr4" draw:text-style-name="P257" svg:x1="4.644cm" svg:y1="2.663cm" svg:x2="4.145cm" svg:y2="2.663cm"><text:p/></draw:line><draw:line draw:style-name="gr4" draw:text-style-name="P257" svg:x1="2.143cm" svg:y1="2.663cm" svg:x2="3.143cm" svg:y2="2.663cm"><text:p/></draw:line><draw:frame draw:style-name="gr6" draw:text-style-name="P259" svg:width="1.251cm" svg:height="0.65cm" svg:x="1.145cm" svg:y="2.161cm"><draw:text-box><text:p text:style-name="P258"><text:span text:style-name="T32">CLK</text:span></text:p></draw:text-box></draw:frame><draw:line draw:style-name="gr4" draw:text-style-name="P257" svg:x1="4.646cm" svg:y1="2.161cm" svg:x2="4.646cm" svg:y2="2.66cm"><text:p/></draw:line><draw:line draw:style-name="gr4" draw:text-style-name="P257" svg:x1="5.893cm" svg:y1="2.663cm" svg:x2="5.392cm" svg:y2="2.663cm"><text:p/></draw:line><draw:line draw:style-name="gr4" draw:text-style-name="P257" svg:x1="5.893cm" svg:y1="2.161cm" svg:x2="5.893cm" svg:y2="2.66cm"><text:p/></draw:line><draw:line draw:style-name="gr4" draw:text-style-name="P257" svg:x1="6.643cm" svg:y1="2.161cm" svg:x2="5.893cm" svg:y2="2.161cm"><text:p/></draw:line><draw:line draw:style-name="gr4" draw:text-style-name="P257" svg:x1="7.644cm" svg:y1="2.66cm" svg:x2="7.644cm" svg:y2="2.161cm"><text:p/></draw:line><draw:line draw:style-name="gr4" draw:text-style-name="P257" svg:x1="8.644cm" svg:y1="2.161cm" svg:x2="7.644cm" svg:y2="2.161cm"><text:p/></draw:line><draw:line draw:style-name="gr4" draw:text-style-name="P257" svg:x1="8.643cm" svg:y1="2.161cm" svg:x2="8.643cm" svg:y2="2.66cm"><text:p/></draw:line><draw:line draw:style-name="gr4" draw:text-style-name="P257" svg:x1="9.142cm" svg:y1="2.663cm" svg:x2="8.643cm" svg:y2="2.663cm"><text:p/></draw:line><draw:line draw:style-name="gr4" draw:text-style-name="P257" svg:x1="9.142cm" svg:y1="2.66cm" svg:x2="9.142cm" svg:y2="2.161cm"><text:p/></draw:line><draw:line draw:style-name="gr4" draw:text-style-name="P257" svg:x1="11.142cm" svg:y1="2.161cm" svg:x2="9.142cm" svg:y2="2.161cm"><text:p/></draw:line><draw:line draw:style-name="gr4" draw:text-style-name="P257" svg:x1="5.392cm" svg:y1="2.161cm" svg:x2="5.392cm" svg:y2="2.66cm"><text:p/></draw:line><draw:line draw:style-name="gr4" draw:text-style-name="P257" svg:x1="6.648cm" svg:y1="2.161cm" svg:x2="6.648cm" svg:y2="2.66cm"><text:p/></draw:line><draw:line draw:style-name="gr4" draw:text-style-name="P257" svg:x1="4.646cm" svg:y1="2.161cm" svg:x2="5.396cm" svg:y2="2.161cm"><text:p/></draw:line><draw:line draw:style-name="gr4" draw:text-style-name="P257" svg:x1="6.648cm" svg:y1="2.663cm" svg:x2="7.648cm" svg:y2="2.663cm"><text:p/></draw:line><draw:line draw:style-name="gr11" draw:text-style-name="P257" svg:x1="9.897cm" svg:y1="3.663cm" svg:x2="9.897cm" svg:y2="3.164cm"><text:p/></draw:line><draw:line draw:style-name="gr11" draw:text-style-name="P257" svg:x1="10.146cm" svg:y1="3.164cm" svg:x2="9.897cm" svg:y2="3.164cm"><text:p/></draw:line><draw:line draw:style-name="gr11" draw:text-style-name="P257" svg:x1="2.143cm" svg:y1="3.661cm" svg:x2="9.894cm" svg:y2="3.661cm"><text:p/></draw:line><draw:frame draw:style-name="gr6" draw:text-style-name="P259" svg:width="1.251cm" svg:height="0.65cm" svg:x="1.145cm" svg:y="3.161cm"><draw:text-box><text:p text:style-name="P258"><text:span text:style-name="T32">RST</text:span></text:p></draw:text-box></draw:frame><draw:line draw:style-name="gr11" draw:text-style-name="P257" svg:x1="11.144cm" svg:y1="3.661cm" svg:x2="10.144cm" svg:y2="3.661cm"><text:p/></draw:line><draw:line draw:style-name="gr11" draw:text-style-name="P257" svg:x1="10.144cm" svg:y1="3.164cm" svg:x2="10.144cm" svg:y2="3.663cm"><text:p/></draw:line><draw:line draw:style-name="gr5" draw:text-style-name="P257" svg:x1="2.143cm" svg:y1="4.66cm" svg:x2="3.143cm" svg:y2="4.66cm"><text:p/></draw:line><draw:line draw:style-name="gr5" draw:text-style-name="P257" svg:x1="3.143cm" svg:y1="4.159cm" svg:x2="3.143cm" svg:y2="4.66cm"><text:p/></draw:line><draw:line draw:style-name="gr5" draw:text-style-name="P257" svg:x1="4.642cm" svg:y1="4.159cm" svg:x2="3.143cm" svg:y2="4.159cm"><text:p/></draw:line><draw:line draw:style-name="gr5" draw:text-style-name="P257" svg:x1="4.646cm" svg:y1="4.159cm" svg:x2="4.646cm" svg:y2="4.66cm"><text:p/></draw:line><draw:line draw:style-name="gr5" draw:text-style-name="P257" svg:x1="11.146cm" svg:y1="4.66cm" svg:x2="4.646cm" svg:y2="4.66cm"><text:p/></draw:line><draw:frame draw:style-name="gr6" draw:text-style-name="P259" svg:width="0.997cm" svg:height="0.65cm" svg:x="1.145cm" svg:y="5.159cm"><draw:text-box><text:p text:style-name="P258"><text:span text:style-name="T32">Q1</text:span></text:p></draw:text-box></draw:frame><draw:frame draw:style-name="gr6" draw:text-style-name="P259" svg:width="0.997cm" svg:height="0.65cm" svg:x="1.145cm" svg:y="4.159cm"><draw:text-box><text:p text:style-name="P258"><text:span text:style-name="T32">Q0</text:span></text:p></draw:text-box></draw:frame><draw:line draw:style-name="gr12" draw:text-style-name="P257" svg:x1="2.143cm" svg:y1="5.66cm" svg:x2="3.143cm" svg:y2="5.66cm"><text:p/></draw:line><draw:line draw:style-name="gr12" draw:text-style-name="P257" svg:x1="3.143cm" svg:y1="5.159cm" svg:x2="3.143cm" svg:y2="5.66cm"><text:p/></draw:line><draw:line draw:style-name="gr12" draw:text-style-name="P257" svg:x1="5.893cm" svg:y1="5.159cm" svg:x2="3.143cm" svg:y2="5.159cm"><text:p/></draw:line><draw:line draw:style-name="gr12" draw:text-style-name="P257" svg:x1="5.893cm" svg:y1="5.159cm" svg:x2="5.893cm" svg:y2="5.66cm"><text:p/></draw:line><draw:line draw:style-name="gr12" draw:text-style-name="P257" svg:x1="7.643cm" svg:y1="5.66cm" svg:x2="5.893cm" svg:y2="5.66cm"><text:p/></draw:line><draw:line draw:style-name="gr12" draw:text-style-name="P257" svg:x1="7.644cm" svg:y1="5.159cm" svg:x2="7.644cm" svg:y2="5.66cm"><text:p/></draw:line><draw:line draw:style-name="gr12" draw:text-style-name="P257" svg:x1="9.895cm" svg:y1="5.159cm" svg:x2="7.644cm" svg:y2="5.159cm"><text:p/></draw:line><draw:line draw:style-name="gr12" draw:text-style-name="P257" svg:x1="9.897cm" svg:y1="5.159cm" svg:x2="9.897cm" svg:y2="5.66cm"><text:p/></draw:line><draw:line draw:style-name="gr12" draw:text-style-name="P257" svg:x1="11.146cm" svg:y1="5.66cm" svg:x2="9.897cm" svg:y2="5.66cm"><text:p/></draw:line><draw:line draw:style-name="gr14" draw:text-style-name="P257" svg:x1="3.143cm" svg:y1="-0.09cm" svg:x2="3.143cm" svg:y2="5.911cm"><text:p/></draw:line><draw:line draw:style-name="gr14" draw:text-style-name="P257" svg:x1="4.646cm" svg:y1="-0.09cm" svg:x2="4.646cm" svg:y2="5.911cm"><text:p/></draw:line><draw:line draw:style-name="gr14" draw:text-style-name="P257" svg:x1="5.893cm" svg:y1="-0.09cm" svg:x2="5.893cm" svg:y2="5.911cm"><text:p/></draw:line><draw:line draw:style-name="gr14" draw:text-style-name="P257" svg:x1="7.644cm" svg:y1="-0.09cm" svg:x2="7.644cm" svg:y2="5.911cm"><text:p/></draw:line><draw:line draw:style-name="gr14" draw:text-style-name="P257" svg:x1="9.142cm" svg:y1="-0.09cm" svg:x2="9.142cm" svg:y2="5.911cm"><text:p/></draw:line></draw:g></text:p>
      <text:list xml:id="list38460724" text:continue-numbering="true" text:style-name="L1">
        <text:list-item>
          <text:list>
            <text:list-item>
              <text:h text:style-name="P216" text:outline-level="2"><text:alphabetical-index-mark-start text:id="IMark225902392"/>FF_D4E<text:alphabetical-index-mark-end text:id="IMark225902392"/></text:h>
            </text:list-item>
          </text:list>
        </text:list-item>
      </text:list>
      <text:p text:style-name="P69">Type<text:tab/>Funktionsbaustein</text:p>
      <text:p text:style-name="P66"><text:span text:style-name="T15">Input</text:span><text:span text:style-name="T14"><text:tab/>D0 : BOOL (Data 0 in)</text:span></text:p>
      <text:p text:style-name="P69"><text:tab/>D1 : BOOL (Data 1 in)</text:p>
      <text:p text:style-name="P69"><text:tab/>D2 : BOOL (Data 2 in)</text:p>
      <text:p text:style-name="P69"><text:tab/>D3 : BOOL (Data 3 in)</text:p>
      <text:p text:style-name="P69"><text:tab/>CLK : BOOL (Takteingang)</text:p>
      <text:p text:style-name="P69"><text:tab/>RST : BOOL (asynchroner Reset)</text:p>
      <text:p text:style-name="P66"><text:span text:style-name="T21">Output<text:tab/>Q0 : BOOL (Data 0 </text:span><text:span text:style-name="T16">Out</text:span><text:span text:style-name="T21">)</text:span></text:p>
      <text:p text:style-name="P66"><text:span text:style-name="T21"><text:tab/>Q1 : BOOL (Data 1 </text:span><text:span text:style-name="T16">Out</text:span><text:span text:style-name="T21">)</text:span></text:p>
      <text:p text:style-name="P66"><text:span text:style-name="T21"><text:tab/>Q2 : BOOL (Data 2 </text:span><text:span text:style-name="T16">Out</text:span><text:span text:style-name="T21">)</text:span></text:p>
      <text:p text:style-name="P66"><draw:frame draw:style-name="fr3" draw:name="Grafik120" text:anchor-type="paragraph" svg:x="1.147cm" svg:y="0.616cm" svg:width="2.281cm" svg:height="3.54cm" draw:z-index="86"><draw:image xlink:href="Pictures/10000000000000AC0000010C6F87760E.png" xlink:type="simple" xlink:show="embed" xlink:actuate="onLoad"/></draw:frame><text:span text:style-name="T21"><text:tab/>Q3 : BOOL (Data 3 </text:span><text:span text:style-name="T16">Out</text:span><text:span text:style-name="T21">)</text:span></text:p>
      <text:p text:style-name="P66"><text:soft-page-break/><text:span text:style-name="T21"><text:line-break/>FF_D2E ist ein 4 Bit flankengetriggertes D-</text:span><text:span text:style-name="T16">Flip</text:span><text:span text:style-name="T21">-Flop mit asynchronem Reset-Eingang. Das D-</text:span><text:span text:style-name="T16">Flip</text:span><text:span text:style-name="T21">-Flop speichert die Werte am Eingang D mit einer steigenden Flanke an CLK. Detaillierte Angaben finden Sie beim Baustein FF_D2E.</text:span></text:p>
      <text:list xml:id="list38463052" text:continue-numbering="true" text:style-name="L1">
        <text:list-item>
          <text:list>
            <text:list-item>
              <text:h text:style-name="P216" text:outline-level="2"><text:alphabetical-index-mark-start text:id="IMark225902392"/>FF_DRE<text:alphabetical-index-mark-end text:id="IMark225902392"/></text:h>
            </text:list-item>
          </text:list>
        </text:list-item>
      </text:list>
      <text:p text:style-name="P69">Type<text:tab/>Funktionsbaustein</text:p>
      <text:p text:style-name="P66"><text:span text:style-name="T15">Input</text:span><text:span text:style-name="T14"><text:tab/>SET : BOOL (asynchroner Set)</text:span></text:p>
      <text:p text:style-name="P69"><text:tab/>D : BOOL (Data in)</text:p>
      <text:p text:style-name="P69"><text:tab/>CLK : BOOL (Takteingang)</text:p>
      <text:p text:style-name="P69"><text:tab/>RST : BOOL (asynchroner Reset)</text:p>
      <text:p text:style-name="P66"><draw:frame draw:style-name="fr3" draw:name="Grafik121" text:anchor-type="paragraph" svg:x="1.076cm" svg:y="0.723cm" svg:width="2.33cm" svg:height="2.649cm" draw:z-index="87"><draw:image xlink:href="Pictures/10000000000000B0000000C8F7201C05.png" xlink:type="simple" xlink:show="embed" xlink:actuate="onLoad"/></draw:frame><text:span text:style-name="T21">Output<text:tab/>Q : BOOL (Data </text:span><text:span text:style-name="T16">Out</text:span><text:span text:style-name="T21">)</text:span></text:p>
      <text:p text:style-name="P66"><text:span text:style-name="T21"><text:line-break/>FF_DRE ist ein flankengetriggertes D-</text:span><text:span text:style-name="T16">Flip</text:span><text:span text:style-name="T21">-Flop mit asynchronem Set und Reset Eingang. Eine steigende Flanke an CLK speichert den Eingang D auf den Ausgang Q. Ein TRUE am SET oder RST-Eingang setzt oder löscht den Ausgang Q zu jeder Zeit unabhängig von CLK. Der Reset Eingang hat Vorrang vor den Set Eingang. Wenn beide aktiv (TRUE) sind wird ein Reset ausgeführt und Set ignoriert.</text:span></text:p>
      <text:p text:style-name="P183"><draw:g text:anchor-type="paragraph" draw:z-index="88" draw:style-name="gr1"><draw:line draw:style-name="gr13" draw:text-style-name="P257" svg:x1="2.108cm" svg:y1="0.612cm" svg:x2="2.858cm" svg:y2="0.612cm"><text:p/></draw:line><draw:line draw:style-name="gr13" draw:text-style-name="P257" svg:x1="2.861cm" svg:y1="0.111cm" svg:x2="2.861cm" svg:y2="0.61cm"><text:p/></draw:line><draw:line draw:style-name="gr13" draw:text-style-name="P257" svg:x1="2.861cm" svg:y1="0.111cm" svg:x2="5.112cm" svg:y2="0.111cm"><text:p/></draw:line><draw:line draw:style-name="gr13" draw:text-style-name="P257" svg:x1="5.112cm" svg:y1="0.61cm" svg:x2="5.112cm" svg:y2="0.111cm"><text:p/></draw:line><draw:line draw:style-name="gr13" draw:text-style-name="P257" svg:x1="6.359cm" svg:y1="0.111cm" svg:x2="6.359cm" svg:y2="0.61cm"><text:p/></draw:line><draw:frame draw:style-name="gr6" draw:text-style-name="P259" svg:width="0.997cm" svg:height="0.65cm" svg:x="1.111cm" svg:y="0.111cm"><draw:text-box><text:p text:style-name="P258"><text:span text:style-name="T32">D</text:span></text:p></draw:text-box></draw:frame><draw:line draw:style-name="gr13" draw:text-style-name="P257" svg:x1="6.359cm" svg:y1="0.111cm" svg:x2="12.109cm" svg:y2="0.111cm"><text:p/></draw:line><draw:line draw:style-name="gr13" draw:text-style-name="P257" svg:x1="5.112cm" svg:y1="0.612cm" svg:x2="6.361cm" svg:y2="0.612cm"><text:p/></draw:line><draw:line draw:style-name="gr4" draw:text-style-name="P257" svg:x1="3.108cm" svg:y1="1.612cm" svg:x2="3.108cm" svg:y2="1.113cm"><text:p/></draw:line><draw:line draw:style-name="gr4" draw:text-style-name="P257" svg:x1="4.108cm" svg:y1="1.113cm" svg:x2="3.108cm" svg:y2="1.113cm"><text:p/></draw:line><draw:line draw:style-name="gr4" draw:text-style-name="P257" svg:x1="4.11cm" svg:y1="1.113cm" svg:x2="4.11cm" svg:y2="1.612cm"><text:p/></draw:line><draw:line draw:style-name="gr4" draw:text-style-name="P257" svg:x1="4.609cm" svg:y1="1.612cm" svg:x2="4.11cm" svg:y2="1.612cm"><text:p/></draw:line><draw:line draw:style-name="gr4" draw:text-style-name="P257" svg:x1="2.108cm" svg:y1="1.612cm" svg:x2="3.108cm" svg:y2="1.612cm"><text:p/></draw:line><draw:frame draw:style-name="gr6" draw:text-style-name="P259" svg:width="1.251cm" svg:height="0.65cm" svg:x="1.111cm" svg:y="1.113cm"><draw:text-box><text:p text:style-name="P258"><text:span text:style-name="T32">CLK</text:span></text:p></draw:text-box></draw:frame><draw:line draw:style-name="gr4" draw:text-style-name="P257" svg:x1="4.611cm" svg:y1="1.113cm" svg:x2="4.611cm" svg:y2="1.612cm"><text:p/></draw:line><draw:line draw:style-name="gr4" draw:text-style-name="P257" svg:x1="5.858cm" svg:y1="1.612cm" svg:x2="5.357cm" svg:y2="1.612cm"><text:p/></draw:line><draw:line draw:style-name="gr4" draw:text-style-name="P257" svg:x1="5.858cm" svg:y1="1.113cm" svg:x2="5.858cm" svg:y2="1.612cm"><text:p/></draw:line><draw:line draw:style-name="gr4" draw:text-style-name="P257" svg:x1="6.608cm" svg:y1="1.113cm" svg:x2="5.858cm" svg:y2="1.113cm"><text:p/></draw:line><draw:line draw:style-name="gr4" draw:text-style-name="P257" svg:x1="7.611cm" svg:y1="1.612cm" svg:x2="7.611cm" svg:y2="1.113cm"><text:p/></draw:line><draw:line draw:style-name="gr4" draw:text-style-name="P257" svg:x1="9.611cm" svg:y1="1.113cm" svg:x2="7.611cm" svg:y2="1.113cm"><text:p/></draw:line><draw:line draw:style-name="gr4" draw:text-style-name="P257" svg:x1="9.608cm" svg:y1="1.113cm" svg:x2="9.608cm" svg:y2="1.612cm"><text:p/></draw:line><draw:line draw:style-name="gr4" draw:text-style-name="P257" svg:x1="11.358cm" svg:y1="1.612cm" svg:x2="9.608cm" svg:y2="1.612cm"><text:p/></draw:line><draw:line draw:style-name="gr4" draw:text-style-name="P257" svg:x1="5.357cm" svg:y1="1.113cm" svg:x2="5.357cm" svg:y2="1.612cm"><text:p/></draw:line><draw:line draw:style-name="gr4" draw:text-style-name="P257" svg:x1="6.611cm" svg:y1="1.113cm" svg:x2="6.611cm" svg:y2="1.612cm"><text:p/></draw:line><draw:line draw:style-name="gr4" draw:text-style-name="P257" svg:x1="4.611cm" svg:y1="1.113cm" svg:x2="5.361cm" svg:y2="1.113cm"><text:p/></draw:line><draw:line draw:style-name="gr4" draw:text-style-name="P257" svg:x1="6.611cm" svg:y1="1.612cm" svg:x2="7.611cm" svg:y2="1.612cm"><text:p/></draw:line><draw:line draw:style-name="gr11" draw:text-style-name="P257" svg:x1="9.862cm" svg:y1="2.612cm" svg:x2="9.862cm" svg:y2="2.113cm"><text:p/></draw:line><draw:line draw:style-name="gr11" draw:text-style-name="P257" svg:x1="10.111cm" svg:y1="2.113cm" svg:x2="9.862cm" svg:y2="2.113cm"><text:p/></draw:line><draw:line draw:style-name="gr11" draw:text-style-name="P257" svg:x1="2.108cm" svg:y1="2.612cm" svg:x2="9.859cm" svg:y2="2.612cm"><text:p/></draw:line><draw:frame draw:style-name="gr6" draw:text-style-name="P259" svg:width="1.251cm" svg:height="0.65cm" svg:x="1.111cm" svg:y="2.113cm"><draw:text-box><text:p text:style-name="P258"><text:span text:style-name="T32">RST</text:span></text:p></draw:text-box></draw:frame><draw:line draw:style-name="gr11" draw:text-style-name="P257" svg:x1="10.86cm" svg:y1="2.612cm" svg:x2="10.109cm" svg:y2="2.612cm"><text:p/></draw:line><draw:line draw:style-name="gr11" draw:text-style-name="P257" svg:x1="10.109cm" svg:y1="2.113cm" svg:x2="10.109cm" svg:y2="2.612cm"><text:p/></draw:line><draw:line draw:style-name="gr5" draw:text-style-name="P257" svg:x1="10.61cm" svg:y1="3.113cm" svg:x2="12.109cm" svg:y2="3.113cm"><text:p/></draw:line><draw:line draw:style-name="gr5" draw:text-style-name="P257" svg:x1="10.608cm" svg:y1="3.612cm" svg:x2="2.108cm" svg:y2="3.612cm"><text:p/></draw:line><draw:frame draw:style-name="gr6" draw:text-style-name="P259" svg:width="0.997cm" svg:height="0.65cm" svg:x="1.111cm" svg:y="4.111cm"><draw:text-box><text:p text:style-name="P258"><text:span text:style-name="T32">Q</text:span></text:p></draw:text-box></draw:frame><draw:frame draw:style-name="gr6" draw:text-style-name="P259" svg:width="1.251cm" svg:height="0.65cm" svg:x="1.111cm" svg:y="3.113cm"><draw:text-box><text:p text:style-name="P258"><text:span text:style-name="T32">SET</text:span></text:p></draw:text-box></draw:frame><draw:line draw:style-name="gr12" draw:text-style-name="P257" svg:x1="2.108cm" svg:y1="4.609cm" svg:x2="3.108cm" svg:y2="4.609cm"><text:p/></draw:line><draw:line draw:style-name="gr12" draw:text-style-name="P257" svg:x1="3.108cm" svg:y1="4.108cm" svg:x2="3.108cm" svg:y2="4.609cm"><text:p/></draw:line><draw:line draw:style-name="gr12" draw:text-style-name="P257" svg:x1="5.858cm" svg:y1="4.108cm" svg:x2="3.108cm" svg:y2="4.108cm"><text:p/></draw:line><draw:line draw:style-name="gr12" draw:text-style-name="P257" svg:x1="5.858cm" svg:y1="4.108cm" svg:x2="5.858cm" svg:y2="4.609cm"><text:p/></draw:line><draw:line draw:style-name="gr12" draw:text-style-name="P257" svg:x1="7.608cm" svg:y1="4.609cm" svg:x2="5.858cm" svg:y2="4.609cm"><text:p/></draw:line><draw:line draw:style-name="gr12" draw:text-style-name="P257" svg:x1="7.611cm" svg:y1="4.108cm" svg:x2="7.611cm" svg:y2="4.609cm"><text:p/></draw:line><draw:line draw:style-name="gr12" draw:text-style-name="P257" svg:x1="9.862cm" svg:y1="4.108cm" svg:x2="7.611cm" svg:y2="4.108cm"><text:p/></draw:line><draw:line draw:style-name="gr12" draw:text-style-name="P257" svg:x1="9.862cm" svg:y1="4.108cm" svg:x2="9.862cm" svg:y2="4.609cm"><text:p/></draw:line><draw:line draw:style-name="gr12" draw:text-style-name="P257" svg:x1="10.612cm" svg:y1="4.609cm" svg:x2="9.862cm" svg:y2="4.609cm"><text:p/></draw:line><draw:line draw:style-name="gr14" draw:text-style-name="P257" svg:x1="3.108cm" svg:y1="-0.138cm" svg:x2="3.108cm" svg:y2="4.863cm"><text:p/></draw:line><draw:line draw:style-name="gr14" draw:text-style-name="P257" svg:x1="4.611cm" svg:y1="-0.138cm" svg:x2="4.611cm" svg:y2="4.863cm"><text:p/></draw:line><draw:line draw:style-name="gr14" draw:text-style-name="P257" svg:x1="5.858cm" svg:y1="-0.138cm" svg:x2="5.858cm" svg:y2="4.863cm"><text:p/></draw:line><draw:line draw:style-name="gr14" draw:text-style-name="P257" svg:x1="7.611cm" svg:y1="-0.138cm" svg:x2="7.611cm" svg:y2="4.863cm"><text:p/></draw:line><draw:line draw:style-name="gr14" draw:text-style-name="P257" svg:x1="11.361cm" svg:y1="-0.138cm" svg:x2="11.361cm" svg:y2="4.863cm"><text:p/></draw:line><draw:line draw:style-name="gr5" draw:text-style-name="P257" svg:x1="10.61cm" svg:y1="3.113cm" svg:x2="10.61cm" svg:y2="3.612cm"><text:p/></draw:line><draw:line draw:style-name="gr11" draw:text-style-name="P257" svg:x1="10.862cm" svg:y1="2.612cm" svg:x2="10.862cm" svg:y2="2.113cm"><text:p/></draw:line><draw:line draw:style-name="gr11" draw:text-style-name="P257" svg:x1="12.111cm" svg:y1="2.113cm" svg:x2="10.862cm" svg:y2="2.113cm"><text:p/></draw:line><draw:line draw:style-name="gr4" draw:text-style-name="P257" svg:x1="11.361cm" svg:y1="1.113cm" svg:x2="11.361cm" svg:y2="1.612cm"><text:p/></draw:line><draw:line draw:style-name="gr4" draw:text-style-name="P257" svg:x1="12.111cm" svg:y1="1.113cm" svg:x2="11.361cm" svg:y2="1.113cm"><text:p/></draw:line><draw:line draw:style-name="gr12" draw:text-style-name="P257" svg:x1="10.862cm" svg:y1="4.108cm" svg:x2="10.862cm" svg:y2="4.609cm"><text:p/></draw:line><draw:line draw:style-name="gr12" draw:text-style-name="P257" svg:x1="10.86cm" svg:y1="4.108cm" svg:x2="10.61cm" svg:y2="4.108cm"><text:p/></draw:line><draw:line draw:style-name="gr12" draw:text-style-name="P257" svg:x1="9.862cm" svg:y1="4.108cm" svg:x2="9.862cm" svg:y2="4.609cm"><text:p/></draw:line><draw:line draw:style-name="gr12" draw:text-style-name="P257" svg:x1="10.612cm" svg:y1="4.609cm" svg:x2="9.862cm" svg:y2="4.609cm"><text:p/></draw:line><draw:line draw:style-name="gr12" draw:text-style-name="P257" svg:x1="10.61cm" svg:y1="4.108cm" svg:x2="10.61cm" svg:y2="4.609cm"><text:p/></draw:line><draw:line draw:style-name="gr12" draw:text-style-name="P257" svg:x1="12.111cm" svg:y1="4.609cm" svg:x2="10.862cm" svg:y2="4.609cm"><text:p/></draw:line></draw:g><text:soft-page-break/></text:p>
      <text:list xml:id="list38465526" text:continue-numbering="true" text:style-name="L1">
        <text:list-item>
          <text:list>
            <text:list-item>
              <text:h text:style-name="P216" text:outline-level="2"><text:alphabetical-index-mark-start text:id="IMark225902392"/>FF_JKE<text:alphabetical-index-mark-end text:id="IMark225902392"/></text:h>
            </text:list-item>
          </text:list>
        </text:list-item>
      </text:list>
      <text:p text:style-name="P69">Type<text:tab/>Funktionsbaustein</text:p>
      <text:p text:style-name="P66"><text:span text:style-name="T15">Input</text:span><text:span text:style-name="T14"><text:tab/>SET : BOOL (asynchroner Set)</text:span></text:p>
      <text:p text:style-name="P69"><text:tab/>J : BOOL (Takt-synchroner Set)</text:p>
      <text:p text:style-name="P69"><text:tab/>CLK : BOOL (Takteingang)</text:p>
      <text:p text:style-name="P69"><text:tab/>K : BOOL (Takt-synchroner Reset)</text:p>
      <text:p text:style-name="P69"><text:tab/>RST : BOOL (asynchroner Reset)</text:p>
      <text:p text:style-name="P73"><draw:frame draw:style-name="fr3" draw:name="Grafik122" text:anchor-type="paragraph" svg:x="1.028cm" svg:y="0.667cm" svg:width="2.33cm" svg:height="3.099cm" draw:z-index="89"><draw:image xlink:href="Pictures/10000000000000B0000000EA09666FDE.png" xlink:type="simple" xlink:show="embed" xlink:actuate="onLoad"/></draw:frame>Output<text:tab/>Q : BOOL (Ausgang)</text:p>
      <text:p text:style-name="P66"><text:span text:style-name="T21"><text:line-break/>FF_JKE ist ein flankengetriggertes JK-Flop-Flop mit asynchronen Set und Reset Eingängen. Das JK-</text:span><text:span text:style-name="T16">Flip</text:span><text:span text:style-name="T21">-Flop setzt den Ausgang Q, wenn bei einer steigenden Flanke von CLK der </text:span><text:span text:style-name="T16">Input</text:span><text:span text:style-name="T21"> J TRUE ist. Q wird FALSE, wenn bei einer steigenden Taktflanke der Eingang K TRUE ist. Sind die beiden Eingänge J und K bei einer Steigenden Taktflanke TRUE, so wird der Ausgang negiert. Er schaltet bei jedem Takt das Ausgangssignal um.</text:span></text:p>
      <text:p text:style-name="P183"><draw:g text:anchor-type="paragraph" draw:z-index="659" draw:style-name="gr1"><draw:line draw:style-name="gr13" draw:text-style-name="P257" svg:x1="2.108cm" svg:y1="0.612cm" svg:x2="2.858cm" svg:y2="0.612cm"><text:p/></draw:line><draw:line draw:style-name="gr13" draw:text-style-name="P257" svg:x1="2.861cm" svg:y1="0.111cm" svg:x2="2.861cm" svg:y2="0.61cm"><text:p/></draw:line><draw:line draw:style-name="gr13" draw:text-style-name="P257" svg:x1="2.861cm" svg:y1="0.111cm" svg:x2="5.112cm" svg:y2="0.111cm"><text:p/></draw:line><draw:line draw:style-name="gr13" draw:text-style-name="P257" svg:x1="5.112cm" svg:y1="0.61cm" svg:x2="5.112cm" svg:y2="0.111cm"><text:p/></draw:line><draw:line draw:style-name="gr13" draw:text-style-name="P257" svg:x1="6.359cm" svg:y1="0.111cm" svg:x2="6.359cm" svg:y2="0.61cm"><text:p/></draw:line><draw:frame draw:style-name="gr6" draw:text-style-name="P259" svg:width="0.997cm" svg:height="0.65cm" svg:x="1.111cm" svg:y="0.111cm"><draw:text-box><text:p text:style-name="P258"><text:span text:style-name="T32">D</text:span></text:p></draw:text-box></draw:frame><draw:line draw:style-name="gr13" draw:text-style-name="P257" svg:x1="6.359cm" svg:y1="0.111cm" svg:x2="12.109cm" svg:y2="0.111cm"><text:p/></draw:line><draw:line draw:style-name="gr13" draw:text-style-name="P257" svg:x1="5.112cm" svg:y1="0.612cm" svg:x2="6.361cm" svg:y2="0.612cm"><text:p/></draw:line><draw:line draw:style-name="gr4" draw:text-style-name="P257" svg:x1="3.108cm" svg:y1="1.612cm" svg:x2="3.108cm" svg:y2="1.113cm"><text:p/></draw:line><draw:line draw:style-name="gr4" draw:text-style-name="P257" svg:x1="4.108cm" svg:y1="1.113cm" svg:x2="3.108cm" svg:y2="1.113cm"><text:p/></draw:line><draw:line draw:style-name="gr4" draw:text-style-name="P257" svg:x1="4.11cm" svg:y1="1.113cm" svg:x2="4.11cm" svg:y2="1.612cm"><text:p/></draw:line><draw:line draw:style-name="gr4" draw:text-style-name="P257" svg:x1="4.609cm" svg:y1="1.612cm" svg:x2="4.11cm" svg:y2="1.612cm"><text:p/></draw:line><draw:line draw:style-name="gr4" draw:text-style-name="P257" svg:x1="2.108cm" svg:y1="1.612cm" svg:x2="3.108cm" svg:y2="1.612cm"><text:p/></draw:line><draw:frame draw:style-name="gr6" draw:text-style-name="P259" svg:width="1.251cm" svg:height="0.65cm" svg:x="1.111cm" svg:y="1.113cm"><draw:text-box><text:p text:style-name="P258"><text:span text:style-name="T32">CLK</text:span></text:p></draw:text-box></draw:frame><draw:line draw:style-name="gr4" draw:text-style-name="P257" svg:x1="4.611cm" svg:y1="1.113cm" svg:x2="4.611cm" svg:y2="1.612cm"><text:p/></draw:line><draw:line draw:style-name="gr4" draw:text-style-name="P257" svg:x1="5.858cm" svg:y1="1.612cm" svg:x2="5.357cm" svg:y2="1.612cm"><text:p/></draw:line><draw:line draw:style-name="gr4" draw:text-style-name="P257" svg:x1="5.858cm" svg:y1="1.113cm" svg:x2="5.858cm" svg:y2="1.612cm"><text:p/></draw:line><draw:line draw:style-name="gr4" draw:text-style-name="P257" svg:x1="6.608cm" svg:y1="1.113cm" svg:x2="5.858cm" svg:y2="1.113cm"><text:p/></draw:line><draw:line draw:style-name="gr4" draw:text-style-name="P257" svg:x1="7.611cm" svg:y1="1.612cm" svg:x2="7.611cm" svg:y2="1.113cm"><text:p/></draw:line><draw:line draw:style-name="gr4" draw:text-style-name="P257" svg:x1="9.611cm" svg:y1="1.113cm" svg:x2="7.611cm" svg:y2="1.113cm"><text:p/></draw:line><draw:line draw:style-name="gr4" draw:text-style-name="P257" svg:x1="9.608cm" svg:y1="1.113cm" svg:x2="9.608cm" svg:y2="1.612cm"><text:p/></draw:line><draw:line draw:style-name="gr4" draw:text-style-name="P257" svg:x1="11.358cm" svg:y1="1.612cm" svg:x2="9.608cm" svg:y2="1.612cm"><text:p/></draw:line><draw:line draw:style-name="gr4" draw:text-style-name="P257" svg:x1="5.357cm" svg:y1="1.113cm" svg:x2="5.357cm" svg:y2="1.612cm"><text:p/></draw:line><draw:line draw:style-name="gr4" draw:text-style-name="P257" svg:x1="6.611cm" svg:y1="1.113cm" svg:x2="6.611cm" svg:y2="1.612cm"><text:p/></draw:line><draw:line draw:style-name="gr4" draw:text-style-name="P257" svg:x1="4.611cm" svg:y1="1.113cm" svg:x2="5.361cm" svg:y2="1.113cm"><text:p/></draw:line><draw:line draw:style-name="gr4" draw:text-style-name="P257" svg:x1="6.611cm" svg:y1="1.612cm" svg:x2="7.611cm" svg:y2="1.612cm"><text:p/></draw:line><draw:line draw:style-name="gr11" draw:text-style-name="P257" svg:x1="9.862cm" svg:y1="2.612cm" svg:x2="9.862cm" svg:y2="2.113cm"><text:p/></draw:line><draw:line draw:style-name="gr11" draw:text-style-name="P257" svg:x1="10.111cm" svg:y1="2.113cm" svg:x2="9.862cm" svg:y2="2.113cm"><text:p/></draw:line><draw:line draw:style-name="gr11" draw:text-style-name="P257" svg:x1="2.108cm" svg:y1="2.612cm" svg:x2="9.859cm" svg:y2="2.612cm"><text:p/></draw:line><draw:frame draw:style-name="gr6" draw:text-style-name="P259" svg:width="1.251cm" svg:height="0.65cm" svg:x="1.111cm" svg:y="2.113cm"><draw:text-box><text:p text:style-name="P258"><text:span text:style-name="T32">RST</text:span></text:p></draw:text-box></draw:frame><draw:line draw:style-name="gr11" draw:text-style-name="P257" svg:x1="10.86cm" svg:y1="2.612cm" svg:x2="10.109cm" svg:y2="2.612cm"><text:p/></draw:line><draw:line draw:style-name="gr11" draw:text-style-name="P257" svg:x1="10.109cm" svg:y1="2.113cm" svg:x2="10.109cm" svg:y2="2.612cm"><text:p/></draw:line><draw:line draw:style-name="gr5" draw:text-style-name="P257" svg:x1="10.61cm" svg:y1="3.113cm" svg:x2="12.109cm" svg:y2="3.113cm"><text:p/></draw:line><draw:line draw:style-name="gr5" draw:text-style-name="P257" svg:x1="10.608cm" svg:y1="3.612cm" svg:x2="2.108cm" svg:y2="3.612cm"><text:p/></draw:line><draw:frame draw:style-name="gr6" draw:text-style-name="P259" svg:width="0.997cm" svg:height="0.65cm" svg:x="1.111cm" svg:y="4.111cm"><draw:text-box><text:p text:style-name="P258"><text:span text:style-name="T32">Q</text:span></text:p></draw:text-box></draw:frame><draw:frame draw:style-name="gr6" draw:text-style-name="P259" svg:width="1.251cm" svg:height="0.65cm" svg:x="1.111cm" svg:y="3.113cm"><draw:text-box><text:p text:style-name="P258"><text:span text:style-name="T32">SET</text:span></text:p></draw:text-box></draw:frame><draw:line draw:style-name="gr12" draw:text-style-name="P257" svg:x1="2.108cm" svg:y1="4.609cm" svg:x2="3.108cm" svg:y2="4.609cm"><text:p/></draw:line><draw:line draw:style-name="gr12" draw:text-style-name="P257" svg:x1="3.108cm" svg:y1="4.108cm" svg:x2="3.108cm" svg:y2="4.609cm"><text:p/></draw:line><draw:line draw:style-name="gr12" draw:text-style-name="P257" svg:x1="5.858cm" svg:y1="4.108cm" svg:x2="3.108cm" svg:y2="4.108cm"><text:p/></draw:line><draw:line draw:style-name="gr12" draw:text-style-name="P257" svg:x1="5.858cm" svg:y1="4.108cm" svg:x2="5.858cm" svg:y2="4.609cm"><text:p/></draw:line><draw:line draw:style-name="gr12" draw:text-style-name="P257" svg:x1="7.608cm" svg:y1="4.609cm" svg:x2="5.858cm" svg:y2="4.609cm"><text:p/></draw:line><draw:line draw:style-name="gr12" draw:text-style-name="P257" svg:x1="7.611cm" svg:y1="4.108cm" svg:x2="7.611cm" svg:y2="4.609cm"><text:p/></draw:line><draw:line draw:style-name="gr12" draw:text-style-name="P257" svg:x1="9.862cm" svg:y1="4.108cm" svg:x2="7.611cm" svg:y2="4.108cm"><text:p/></draw:line><draw:line draw:style-name="gr12" draw:text-style-name="P257" svg:x1="9.862cm" svg:y1="4.108cm" svg:x2="9.862cm" svg:y2="4.609cm"><text:p/></draw:line><draw:line draw:style-name="gr12" draw:text-style-name="P257" svg:x1="10.612cm" svg:y1="4.609cm" svg:x2="9.862cm" svg:y2="4.609cm"><text:p/></draw:line><draw:line draw:style-name="gr14" draw:text-style-name="P257" svg:x1="3.108cm" svg:y1="-0.138cm" svg:x2="3.108cm" svg:y2="4.863cm"><text:p/></draw:line><draw:line draw:style-name="gr14" draw:text-style-name="P257" svg:x1="4.611cm" svg:y1="-0.138cm" svg:x2="4.611cm" svg:y2="4.863cm"><text:p/></draw:line><draw:line draw:style-name="gr14" draw:text-style-name="P257" svg:x1="5.858cm" svg:y1="-0.138cm" svg:x2="5.858cm" svg:y2="4.863cm"><text:p/></draw:line><draw:line draw:style-name="gr14" draw:text-style-name="P257" svg:x1="7.611cm" svg:y1="-0.138cm" svg:x2="7.611cm" svg:y2="4.863cm"><text:p/></draw:line><draw:line draw:style-name="gr14" draw:text-style-name="P257" svg:x1="11.361cm" svg:y1="-0.138cm" svg:x2="11.361cm" svg:y2="4.863cm"><text:p/></draw:line><draw:line draw:style-name="gr5" draw:text-style-name="P257" svg:x1="10.61cm" svg:y1="3.113cm" svg:x2="10.61cm" svg:y2="3.612cm"><text:p/></draw:line><draw:line draw:style-name="gr11" draw:text-style-name="P257" svg:x1="10.862cm" svg:y1="2.612cm" svg:x2="10.862cm" svg:y2="2.113cm"><text:p/></draw:line><draw:line draw:style-name="gr11" draw:text-style-name="P257" svg:x1="12.111cm" svg:y1="2.113cm" svg:x2="10.862cm" svg:y2="2.113cm"><text:p/></draw:line><draw:line draw:style-name="gr4" draw:text-style-name="P257" svg:x1="11.361cm" svg:y1="1.113cm" svg:x2="11.361cm" svg:y2="1.612cm"><text:p/></draw:line><draw:line draw:style-name="gr4" draw:text-style-name="P257" svg:x1="12.111cm" svg:y1="1.113cm" svg:x2="11.361cm" svg:y2="1.113cm"><text:p/></draw:line><draw:line draw:style-name="gr12" draw:text-style-name="P257" svg:x1="10.862cm" svg:y1="4.108cm" svg:x2="10.862cm" svg:y2="4.609cm"><text:p/></draw:line><draw:line draw:style-name="gr12" draw:text-style-name="P257" svg:x1="10.86cm" svg:y1="4.108cm" svg:x2="10.61cm" svg:y2="4.108cm"><text:p/></draw:line><draw:line draw:style-name="gr12" draw:text-style-name="P257" svg:x1="9.862cm" svg:y1="4.108cm" svg:x2="9.862cm" svg:y2="4.609cm"><text:p/></draw:line><draw:line draw:style-name="gr12" draw:text-style-name="P257" svg:x1="10.612cm" svg:y1="4.609cm" svg:x2="9.862cm" svg:y2="4.609cm"><text:p/></draw:line><draw:line draw:style-name="gr12" draw:text-style-name="P257" svg:x1="10.61cm" svg:y1="4.108cm" svg:x2="10.61cm" svg:y2="4.609cm"><text:p/></draw:line><draw:line draw:style-name="gr12" draw:text-style-name="P257" svg:x1="12.111cm" svg:y1="4.609cm" svg:x2="10.862cm" svg:y2="4.609cm"><text:p/></draw:line></draw:g><text:soft-page-break/></text:p>
      <text:list xml:id="list38454109" text:continue-numbering="true" text:style-name="L1">
        <text:list-item>
          <text:list>
            <text:list-item>
              <text:h text:style-name="P216" text:outline-level="2"><text:alphabetical-index-mark-start text:id="IMark225902392"/>FF_RSE<text:alphabetical-index-mark-end text:id="IMark225902392"/></text:h>
            </text:list-item>
          </text:list>
        </text:list-item>
      </text:list>
      <text:p text:style-name="P69">Type<text:tab/>Funktionsbaustein</text:p>
      <text:p text:style-name="P66"><text:span text:style-name="T15">Input</text:span><text:span text:style-name="T14"><text:tab/>CS : BOOL (flankensensitiver Set)</text:span></text:p>
      <text:p text:style-name="P69"><text:tab/>CR : BOOL (flankensensitiver Reset)</text:p>
      <text:p text:style-name="P69"><text:tab/>RST : BOOL (asynchroner Reset)</text:p>
      <text:p text:style-name="P73"><draw:frame draw:style-name="fr3" draw:name="Grafik668" text:anchor-type="paragraph" svg:x="1.046cm" svg:y="0.69cm" svg:width="2.101cm" svg:height="1.921cm" draw:z-index="660"><draw:image xlink:href="Pictures/100000000000009F000000912310C34A.png" xlink:type="simple" xlink:show="embed" xlink:actuate="onLoad"/></draw:frame>Output<text:tab/>Q : BOOL (Ausgang)</text:p>
      <text:p text:style-name="P183"><text:line-break/>FF_RSE ist ein flankengetriggertes RS Flip-Flop. Der Ausgang Q wird durch eine steigende Flanke an CS gesetzt und durch eine steigende Flanke an CR gelöscht. Treten beide Flanken (CS und CR) gleichzeitig auf, so wird der Ausgang auf FALSE gesetzt. Ein Asynchroner Reset Eingang RST setzt den Ausgang jederzeit auf FALSE.</text:p>
      <text:p text:style-name="P183"/>
      <text:p text:style-name="P183"/>
      <text:p text:style-name="P183"/>
      <text:list xml:id="list38444866" text:continue-numbering="true" text:style-name="L1">
        <text:list-item>
          <text:list>
            <text:list-item>
              <text:h text:style-name="P216" text:outline-level="2"><text:soft-page-break/><text:alphabetical-index-mark-start text:id="IMark225902392"/>SELECT_8<text:alphabetical-index-mark-end text:id="IMark225902392"/></text:h>
            </text:list-item>
          </text:list>
        </text:list-item>
      </text:list>
      <text:p text:style-name="P69">Type<text:tab/>Funktionsbaustein</text:p>
      <text:p text:style-name="P66"><text:span text:style-name="T15">Input</text:span><text:span text:style-name="T14"><text:tab/>EN : BOOL (</text:span><text:span text:style-name="T15">Enable</text:span><text:span text:style-name="T14"> für Ausgänge)</text:span></text:p>
      <text:p text:style-name="P69"><text:tab/>SET : BOOL (asynchroner Set)</text:p>
      <text:p text:style-name="P69"><text:tab/>IN : BYTE (Vorgabewert für Set)</text:p>
      <text:p text:style-name="P69"><text:tab/>UP : BOOL (Vorwärts Schalter flankengetriggert)</text:p>
      <text:p text:style-name="P69"><text:tab/>DN : BOOL (Rückwärts Schalter flankengetriggert)</text:p>
      <text:p text:style-name="P69"><text:tab/>RST : BOOL (asynchroner Reset)</text:p>
      <text:p text:style-name="P73">Output<text:tab/>Q0 .. Q7 : BOOL (Ausgänge)</text:p>
      <text:p text:style-name="P183"><draw:frame draw:style-name="fr3" draw:name="Grafik436" text:anchor-type="paragraph" svg:x="1.046cm" svg:y="0.679cm" svg:width="2.937cm" svg:height="4.286cm" draw:z-index="415"><draw:image xlink:href="Pictures/100000000000006F000000A29C7EAB16.png" xlink:type="simple" xlink:show="embed" xlink:actuate="onLoad"/></draw:frame><text:tab/>STATE : BYTE (Status Ausgang)</text:p>
      <text:p text:style-name="P183"><text:line-break/>SELECT_8 setzt immer nur einen Ausgang auf TRUE solange EN auf TRUE ist. Der aktive Ausgang Q0..Q7 kann mittels des SET Eingangs und dem Wert am Eingang IN Selektiert werden. Ein TRUE an SET und ein Wert von 5 am Eingang IN setzen den Ausgang Q5 auf TRUE während alle anderen Ausgänge auf FALSE gesetzt werden. Ein TRUE am Eingang RST setzt Ausgang Q0 auf TRUE. Mit den Eingängen UP wird von einem Ausgang Qn auf Qn+1 weiter geschaltet, während der Eingang DN von einen Ausgang Qn auf Qn-1 schaltet. Der Eingang EN muss TRUE sein damit ein Ausgang TRUE wird, ist EN FALSE werden alle Ausgänge FALSE. Ein FALSE an EN beeinflusst aber nicht die Funktion der anderen Eingänge. So kann auch bei einem FALSE am Eingang EN mit UP oder DN hoch oder runter geschaltet werden. Die Eingänge UP und DN sind flankengetriggert und reagieren nur auf die steigende Flanke. Der Ausgang STATE zeigt immer an welcher Ausgang gerade selektiert ist.</text:p>
      <table:table table:name="Tabelle28" table:style-name="Tabelle28">
        <table:table-column table:style-name="Tabelle28.A"/>
        <table:table-column table:style-name="Tabelle28.B"/>
        <table:table-column table:style-name="Tabelle28.C"/>
        <table:table-column table:style-name="Tabelle28.D"/>
        <table:table-column table:style-name="Tabelle28.E"/>
        <table:table-column table:style-name="Tabelle28.F"/>
        <table:table-column table:style-name="Tabelle28.G"/>
        <table:table-column table:style-name="Tabelle28.H"/>
        <table:table-column table:style-name="Tabelle28.I"/>
        <table:table-row table:style-name="Tabelle28.1">
          <table:table-cell table:style-name="Tabelle28.A1" office:value-type="string">
            <text:p text:style-name="P124"/>
          </table:table-cell>
          <table:table-cell table:style-name="Tabelle28.A1" office:value-type="string">
            <text:p text:style-name="P129">EN</text:p>
          </table:table-cell>
          <table:table-cell table:style-name="Tabelle28.A1" office:value-type="string">
            <text:p text:style-name="P129">SET</text:p>
          </table:table-cell>
          <table:table-cell table:style-name="Tabelle28.A1" office:value-type="string">
            <text:p text:style-name="P129">IN</text:p>
          </table:table-cell>
          <table:table-cell table:style-name="Tabelle28.A1" office:value-type="string">
            <text:p text:style-name="P129">UP</text:p>
          </table:table-cell>
          <table:table-cell table:style-name="Tabelle28.A1" office:value-type="string">
            <text:p text:style-name="P129">DN</text:p>
          </table:table-cell>
          <table:table-cell table:style-name="Tabelle28.A1" office:value-type="string">
            <text:p text:style-name="P129">RST</text:p>
          </table:table-cell>
          <table:table-cell table:style-name="Tabelle28.A1" office:value-type="string">
            <text:p text:style-name="P129">Q</text:p>
          </table:table-cell>
          <table:table-cell table:style-name="Tabelle28.I1" office:value-type="string">
            <text:p text:style-name="P129">STATE</text:p>
          </table:table-cell>
        </table:table-row>
        <table:table-row table:style-name="Tabelle28.1">
          <table:table-cell table:style-name="Tabelle28.A2" office:value-type="string">
            <text:p text:style-name="P131">Reset</text:p>
          </table:table-cell>
          <table:table-cell table:style-name="Tabelle28.A2" office:value-type="string">
            <text:p text:style-name="P129">X</text:p>
          </table:table-cell>
          <table:table-cell table:style-name="Tabelle28.A2" office:value-type="string">
            <text:p text:style-name="P129">-</text:p>
          </table:table-cell>
          <table:table-cell table:style-name="Tabelle28.A2" office:value-type="string">
            <text:p text:style-name="P129">-</text:p>
          </table:table-cell>
          <table:table-cell table:style-name="Tabelle28.A2" office:value-type="string">
            <text:p text:style-name="P129">-</text:p>
          </table:table-cell>
          <table:table-cell table:style-name="Tabelle28.A2" office:value-type="string">
            <text:p text:style-name="P129">-</text:p>
          </table:table-cell>
          <table:table-cell table:style-name="Tabelle28.A2" office:value-type="string">
            <text:p text:style-name="P129">1</text:p>
          </table:table-cell>
          <table:table-cell table:style-name="Tabelle28.A2" office:value-type="string">
            <text:p text:style-name="P129">Q0 <text:span text:style-name="T2">if</text:span> EN=1</text:p>
          </table:table-cell>
          <table:table-cell table:style-name="Tabelle28.I2" office:value-type="string">
            <text:p text:style-name="P129">0</text:p>
          </table:table-cell>
        </table:table-row>
        <table:table-row table:style-name="Tabelle28.1">
          <table:table-cell table:style-name="Tabelle28.A2" office:value-type="string">
            <text:p text:style-name="P129">Set</text:p>
          </table:table-cell>
          <table:table-cell table:style-name="Tabelle28.A2" office:value-type="string">
            <text:p text:style-name="P129">X</text:p>
          </table:table-cell>
          <table:table-cell table:style-name="Tabelle28.A2" office:value-type="string">
            <text:p text:style-name="P129">1</text:p>
          </table:table-cell>
          <table:table-cell table:style-name="Tabelle28.A2" office:value-type="string">
            <text:p text:style-name="P129">N</text:p>
          </table:table-cell>
          <table:table-cell table:style-name="Tabelle28.A2" office:value-type="string">
            <text:p text:style-name="P129">-</text:p>
          </table:table-cell>
          <table:table-cell table:style-name="Tabelle28.A2" office:value-type="string">
            <text:p text:style-name="P129">-</text:p>
          </table:table-cell>
          <table:table-cell table:style-name="Tabelle28.A2" office:value-type="string">
            <text:p text:style-name="P129">0</text:p>
          </table:table-cell>
          <table:table-cell table:style-name="Tabelle28.A2" office:value-type="string">
            <text:p text:style-name="P129">QN <text:span text:style-name="T2">if</text:span> EN=1</text:p>
          </table:table-cell>
          <table:table-cell table:style-name="Tabelle28.I2" office:value-type="string">
            <text:p text:style-name="P129">N</text:p>
          </table:table-cell>
        </table:table-row>
        <table:table-row table:style-name="Tabelle28.1">
          <table:table-cell table:style-name="Tabelle28.A2" office:value-type="string">
            <text:p text:style-name="P129">up</text:p>
          </table:table-cell>
          <table:table-cell table:style-name="Tabelle28.A2" office:value-type="string">
            <text:p text:style-name="P129">X</text:p>
          </table:table-cell>
          <table:table-cell table:style-name="Tabelle28.A2" office:value-type="string">
            <text:p text:style-name="P129">0</text:p>
          </table:table-cell>
          <table:table-cell table:style-name="Tabelle28.A2" office:value-type="string">
            <text:p text:style-name="P129">-</text:p>
          </table:table-cell>
          <table:table-cell table:style-name="Tabelle28.A2" office:value-type="string">
            <text:p text:style-name="P129">↑</text:p>
          </table:table-cell>
          <table:table-cell table:style-name="Tabelle28.A2" office:value-type="string">
            <text:p text:style-name="P129">0</text:p>
          </table:table-cell>
          <table:table-cell table:style-name="Tabelle28.A2" office:value-type="string">
            <text:p text:style-name="P129">0</text:p>
          </table:table-cell>
          <table:table-cell table:style-name="Tabelle28.A2" office:value-type="string">
            <text:p text:style-name="P129">QN+1 <text:span text:style-name="T2">if</text:span> EN=1</text:p>
          </table:table-cell>
          <table:table-cell table:style-name="Tabelle28.I2" office:value-type="string">
            <text:p text:style-name="P129">N + 1</text:p>
          </table:table-cell>
        </table:table-row>
        <table:table-row table:style-name="Tabelle28.5">
          <table:table-cell table:style-name="Tabelle28.A2" office:value-type="string">
            <text:p text:style-name="P135">down</text:p>
          </table:table-cell>
          <table:table-cell table:style-name="Tabelle28.A2" office:value-type="string">
            <text:p text:style-name="P129">X</text:p>
          </table:table-cell>
          <table:table-cell table:style-name="Tabelle28.A2" office:value-type="string">
            <text:p text:style-name="P129">0</text:p>
          </table:table-cell>
          <table:table-cell table:style-name="Tabelle28.A2" office:value-type="string">
            <text:p text:style-name="P129">-</text:p>
          </table:table-cell>
          <table:table-cell table:style-name="Tabelle28.E5" office:value-type="string">
            <text:p text:style-name="P153">0</text:p>
          </table:table-cell>
          <table:table-cell table:style-name="Tabelle28.A2" office:value-type="string">
            <text:p text:style-name="P129">↑</text:p>
          </table:table-cell>
          <table:table-cell table:style-name="Tabelle28.A2" office:value-type="string">
            <text:p text:style-name="P129">0</text:p>
          </table:table-cell>
          <table:table-cell table:style-name="Tabelle28.A2" office:value-type="string">
            <text:p text:style-name="P129">QN-1 <text:span text:style-name="T2">if</text:span> EN=1</text:p>
          </table:table-cell>
          <table:table-cell table:style-name="Tabelle28.I2" office:value-type="string">
            <text:p text:style-name="P129">N - 1</text:p>
          </table:table-cell>
        </table:table-row>
      </table:table>
      <text:p text:style-name="P183"/>
      <text:list xml:id="list38459979" text:continue-numbering="true" text:style-name="L1">
        <text:list-item>
          <text:list>
            <text:list-item>
              <text:h text:style-name="P216" text:outline-level="2"><text:soft-page-break/><text:alphabetical-index-mark-start text:id="IMark225902392"/>LATCH<text:alphabetical-index-mark-end text:id="IMark225902392"/></text:h>
            </text:list-item>
          </text:list>
        </text:list-item>
      </text:list>
      <text:p text:style-name="P69">Type<text:tab/>Funktionsbaustein</text:p>
      <text:p text:style-name="P66"><text:span text:style-name="T15">Input</text:span><text:span text:style-name="T14"><text:tab/>D : BOOL (Data in)</text:span></text:p>
      <text:p text:style-name="P66"><text:span text:style-name="T14"><text:tab/>L : BOOL (</text:span><text:span text:style-name="T15">Latch</text:span><text:span text:style-name="T14"> </text:span><text:span text:style-name="T15">enable</text:span><text:span text:style-name="T14"> Signal)</text:span></text:p>
      <text:p text:style-name="P69"><text:tab/>RST : BOOL (asynchroner Reset)</text:p>
      <text:p text:style-name="P66"><draw:frame draw:style-name="fr3" draw:name="Grafik124" text:anchor-type="paragraph" svg:x="1.109cm" svg:y="0.677cm" svg:width="2.281cm" svg:height="2.2cm" draw:z-index="90"><draw:image xlink:href="Pictures/10000000000000AC000000A6504A3E07.png" xlink:type="simple" xlink:show="embed" xlink:actuate="onLoad"/></draw:frame><text:span text:style-name="T21">Output<text:tab/>Q : BOOL (Data </text:span><text:span text:style-name="T16">Out</text:span><text:span text:style-name="T21">)</text:span></text:p>
      <text:p text:style-name="P66"><text:span text:style-name="T21"><text:line-break/>LTCH ist ein transparentes Speicherelement (</text:span><text:span text:style-name="T16">Latch</text:span><text:span text:style-name="T21">). Solange L TRUE ist, folgt Q dem Eingang D und mit der fallenden Flanke von L speichert der Ausgang Q das aktuelle Eingangssignal an D. Mit dem asynchronen Reset-Eingang kann das </text:span><text:span text:style-name="T16">Latch</text:span><text:span text:style-name="T21"> jederzeit unabhängig von L gelöscht werden.</text:span></text:p>
      <text:p text:style-name="P73"><draw:g text:anchor-type="paragraph" draw:z-index="91" draw:style-name="gr1"><draw:line draw:style-name="gr4" draw:text-style-name="P257" svg:x1="3.152cm" svg:y1="1.656cm" svg:x2="3.152cm" svg:y2="1.157cm"><text:p/></draw:line><draw:line draw:style-name="gr4" draw:text-style-name="P257" svg:x1="4.152cm" svg:y1="1.157cm" svg:x2="3.152cm" svg:y2="1.157cm"><text:p/></draw:line><draw:line draw:style-name="gr4" draw:text-style-name="P257" svg:x1="4.152cm" svg:y1="1.157cm" svg:x2="4.152cm" svg:y2="1.656cm"><text:p/></draw:line><draw:line draw:style-name="gr4" draw:text-style-name="P257" svg:x1="5.152cm" svg:y1="1.656cm" svg:x2="4.152cm" svg:y2="1.656cm"><text:p/></draw:line><draw:line draw:style-name="gr4" draw:text-style-name="P257" svg:x1="2.152cm" svg:y1="1.656cm" svg:x2="3.152cm" svg:y2="1.656cm"><text:p/></draw:line><draw:frame draw:style-name="gr6" draw:text-style-name="P259" svg:width="1.251cm" svg:height="0.65cm" svg:x="1.152cm" svg:y="1.157cm"><draw:text-box><text:p text:style-name="P258"><text:span text:style-name="T32">L</text:span></text:p></draw:text-box></draw:frame><draw:line draw:style-name="gr4" draw:text-style-name="P257" svg:x1="5.154cm" svg:y1="1.157cm" svg:x2="5.154cm" svg:y2="1.656cm"><text:p/></draw:line><draw:line draw:style-name="gr4" draw:text-style-name="P257" svg:x1="5.902cm" svg:y1="1.656cm" svg:x2="5.401cm" svg:y2="1.656cm"><text:p/></draw:line><draw:line draw:style-name="gr4" draw:text-style-name="P257" svg:x1="5.902cm" svg:y1="1.157cm" svg:x2="5.902cm" svg:y2="1.656cm"><text:p/></draw:line><draw:line draw:style-name="gr4" draw:text-style-name="P257" svg:x1="6.652cm" svg:y1="1.157cm" svg:x2="5.902cm" svg:y2="1.157cm"><text:p/></draw:line><draw:line draw:style-name="gr4" draw:text-style-name="P257" svg:x1="7.652cm" svg:y1="1.656cm" svg:x2="7.652cm" svg:y2="1.157cm"><text:p/></draw:line><draw:line draw:style-name="gr4" draw:text-style-name="P257" svg:x1="10.402cm" svg:y1="1.656cm" svg:x2="8.652cm" svg:y2="1.656cm"><text:p/></draw:line><draw:line draw:style-name="gr4" draw:text-style-name="P257" svg:x1="5.401cm" svg:y1="1.157cm" svg:x2="5.401cm" svg:y2="1.656cm"><text:p/></draw:line><draw:line draw:style-name="gr4" draw:text-style-name="P257" svg:x1="6.652cm" svg:y1="1.157cm" svg:x2="6.652cm" svg:y2="1.656cm"><text:p/></draw:line><draw:line draw:style-name="gr4" draw:text-style-name="P257" svg:x1="5.154cm" svg:y1="1.157cm" svg:x2="5.403cm" svg:y2="1.157cm"><text:p/></draw:line><draw:line draw:style-name="gr4" draw:text-style-name="P257" svg:x1="6.652cm" svg:y1="1.656cm" svg:x2="7.652cm" svg:y2="1.656cm"><text:p/></draw:line><draw:line draw:style-name="gr11" draw:text-style-name="P257" svg:x1="9.904cm" svg:y1="3.656cm" svg:x2="9.904cm" svg:y2="3.157cm"><text:p/></draw:line><draw:line draw:style-name="gr11" draw:text-style-name="P257" svg:x1="10.153cm" svg:y1="3.157cm" svg:x2="9.904cm" svg:y2="3.157cm"><text:p/></draw:line><draw:line draw:style-name="gr11" draw:text-style-name="P257" svg:x1="2.152cm" svg:y1="3.658cm" svg:x2="9.903cm" svg:y2="3.658cm"><text:p/></draw:line><draw:frame draw:style-name="gr6" draw:text-style-name="P259" svg:width="1.251cm" svg:height="0.65cm" svg:x="1.152cm" svg:y="3.157cm"><draw:text-box><text:p text:style-name="P258"><text:span text:style-name="T32">RST</text:span></text:p></draw:text-box></draw:frame><draw:line draw:style-name="gr11" draw:text-style-name="P257" svg:x1="10.902cm" svg:y1="3.658cm" svg:x2="10.151cm" svg:y2="3.658cm"><text:p/></draw:line><draw:line draw:style-name="gr11" draw:text-style-name="P257" svg:x1="10.151cm" svg:y1="3.157cm" svg:x2="10.151cm" svg:y2="3.656cm"><text:p/></draw:line><draw:line draw:style-name="gr5" draw:text-style-name="P257" svg:x1="10.652cm" svg:y1="4.159cm" svg:x2="12.151cm" svg:y2="4.159cm"><text:p/></draw:line><draw:line draw:style-name="gr5" draw:text-style-name="P257" svg:x1="10.652cm" svg:y1="4.658cm" svg:x2="2.152cm" svg:y2="4.658cm"><text:p/></draw:line><draw:frame draw:style-name="gr6" draw:text-style-name="P259" svg:width="0.997cm" svg:height="0.65cm" svg:x="1.152cm" svg:y="2.157cm"><draw:text-box><text:p text:style-name="P258"><text:span text:style-name="T32">Q</text:span></text:p></draw:text-box></draw:frame><draw:frame draw:style-name="gr6" draw:text-style-name="P259" svg:width="1.251cm" svg:height="0.65cm" svg:x="1.152cm" svg:y="4.158cm"><draw:text-box><text:p text:style-name="P258"><text:span text:style-name="T32">SET</text:span></text:p></draw:text-box></draw:frame><draw:line draw:style-name="gr12" draw:text-style-name="P257" svg:x1="2.152cm" svg:y1="2.656cm" svg:x2="3.403cm" svg:y2="2.656cm"><text:p/></draw:line><draw:line draw:style-name="gr12" draw:text-style-name="P257" svg:x1="3.403cm" svg:y1="2.157cm" svg:x2="3.403cm" svg:y2="2.656cm"><text:p/></draw:line><draw:line draw:style-name="gr12" draw:text-style-name="P257" svg:x1="3.652cm" svg:y1="2.157cm" svg:x2="3.403cm" svg:y2="2.157cm"><text:p/></draw:line><draw:line draw:style-name="gr12" draw:text-style-name="P257" svg:x1="3.651cm" svg:y1="2.157cm" svg:x2="3.651cm" svg:y2="2.656cm"><text:p/></draw:line><draw:line draw:style-name="gr12" draw:text-style-name="P257" svg:x1="6.154cm" svg:y1="2.656cm" svg:x2="5.154cm" svg:y2="2.656cm"><text:p/></draw:line><draw:line draw:style-name="gr12" draw:text-style-name="P257" svg:x1="6.154cm" svg:y1="2.157cm" svg:x2="6.154cm" svg:y2="2.656cm"><text:p/></draw:line><draw:line draw:style-name="gr12" draw:text-style-name="P257" svg:x1="9.654cm" svg:y1="2.157cm" svg:x2="6.154cm" svg:y2="2.157cm"><text:p/></draw:line><draw:line draw:style-name="gr12" draw:text-style-name="P257" svg:x1="10.654cm" svg:y1="2.656cm" svg:x2="9.904cm" svg:y2="2.656cm"><text:p/></draw:line><draw:line draw:style-name="gr5" draw:text-style-name="P257" svg:x1="10.652cm" svg:y1="4.159cm" svg:x2="10.652cm" svg:y2="4.658cm"><text:p/></draw:line><draw:line draw:style-name="gr11" draw:text-style-name="P257" svg:x1="10.903cm" svg:y1="3.656cm" svg:x2="10.903cm" svg:y2="3.157cm"><text:p/></draw:line><draw:line draw:style-name="gr11" draw:text-style-name="P257" svg:x1="12.152cm" svg:y1="3.157cm" svg:x2="10.903cm" svg:y2="3.157cm"><text:p/></draw:line><draw:line draw:style-name="gr4" draw:text-style-name="P257" svg:x1="10.402cm" svg:y1="1.157cm" svg:x2="10.402cm" svg:y2="1.656cm"><text:p/></draw:line><draw:line draw:style-name="gr4" draw:text-style-name="P257" svg:x1="12.152cm" svg:y1="1.157cm" svg:x2="10.402cm" svg:y2="1.157cm"><text:p/></draw:line><draw:line draw:style-name="gr12" draw:text-style-name="P257" svg:x1="10.903cm" svg:y1="2.157cm" svg:x2="10.903cm" svg:y2="2.656cm"><text:p/></draw:line><draw:line draw:style-name="gr12" draw:text-style-name="P257" svg:x1="10.902cm" svg:y1="2.157cm" svg:x2="10.652cm" svg:y2="2.157cm"><text:p/></draw:line><draw:line draw:style-name="gr12" draw:text-style-name="P257" svg:x1="10.654cm" svg:y1="2.656cm" svg:x2="9.904cm" svg:y2="2.656cm"><text:p/></draw:line><draw:line draw:style-name="gr12" draw:text-style-name="P257" svg:x1="10.652cm" svg:y1="2.157cm" svg:x2="10.652cm" svg:y2="2.656cm"><text:p/></draw:line><draw:line draw:style-name="gr12" draw:text-style-name="P257" svg:x1="12.152cm" svg:y1="2.656cm" svg:x2="10.903cm" svg:y2="2.656cm"><text:p/></draw:line><draw:line draw:style-name="gr2" draw:text-style-name="P257" svg:x1="2.152cm" svg:y1="0.656cm" svg:x2="3.403cm" svg:y2="0.656cm"><text:p/></draw:line><draw:line draw:style-name="gr2" draw:text-style-name="P257" svg:x1="3.403cm" svg:y1="0.157cm" svg:x2="3.403cm" svg:y2="0.656cm"><text:p/></draw:line><draw:line draw:style-name="gr2" draw:text-style-name="P257" svg:x1="3.902cm" svg:y1="0.157cm" svg:x2="4.652cm" svg:y2="0.157cm"><text:p/></draw:line><draw:line draw:style-name="gr2" draw:text-style-name="P257" svg:x1="4.653cm" svg:y1="0.656cm" svg:x2="4.653cm" svg:y2="0.157cm"><text:p/></draw:line><draw:line draw:style-name="gr2" draw:text-style-name="P257" svg:x1="5.154cm" svg:y1="0.656cm" svg:x2="6.154cm" svg:y2="0.656cm"><text:p/></draw:line><draw:line draw:style-name="gr2" draw:text-style-name="P257" svg:x1="6.154cm" svg:y1="0.157cm" svg:x2="6.154cm" svg:y2="0.656cm"><text:p/></draw:line><draw:line draw:style-name="gr2" draw:text-style-name="P257" svg:x1="9.151cm" svg:y1="0.656cm" svg:x2="12.151cm" svg:y2="0.656cm"><text:p/></draw:line><draw:frame draw:style-name="gr6" draw:text-style-name="P259" svg:width="0.997cm" svg:height="0.65cm" svg:x="1.152cm" svg:y="0.157cm"><draw:text-box><text:p text:style-name="P258"><text:span text:style-name="T32">D</text:span></text:p></draw:text-box></draw:frame><draw:line draw:style-name="gr2" draw:text-style-name="P257" svg:x1="6.154cm" svg:y1="0.157cm" svg:x2="9.153cm" svg:y2="0.157cm"><text:p/></draw:line><draw:line draw:style-name="gr2" draw:text-style-name="P257" svg:x1="9.151cm" svg:y1="0.157cm" svg:x2="9.151cm" svg:y2="0.656cm"><text:p/></draw:line><draw:line draw:style-name="gr2" draw:text-style-name="P257" svg:x1="4.653cm" svg:y1="0.656cm" svg:x2="6.154cm" svg:y2="0.656cm"><text:p/></draw:line><draw:line draw:style-name="gr2" draw:text-style-name="P257" svg:x1="6.154cm" svg:y1="0.157cm" svg:x2="6.154cm" svg:y2="0.656cm"><text:p/></draw:line><draw:line draw:style-name="gr4" draw:text-style-name="P257" svg:x1="8.652cm" svg:y1="1.157cm" svg:x2="7.652cm" svg:y2="1.157cm"><text:p/></draw:line><draw:line draw:style-name="gr4" draw:text-style-name="P257" svg:x1="8.652cm" svg:y1="1.157cm" svg:x2="8.652cm" svg:y2="1.656cm"><text:p/></draw:line><draw:line draw:style-name="gr12" draw:text-style-name="P257" svg:x1="9.904cm" svg:y1="2.157cm" svg:x2="8.904cm" svg:y2="2.157cm"><text:p/></draw:line><draw:line draw:style-name="gr12" draw:text-style-name="P257" svg:x1="9.904cm" svg:y1="2.157cm" svg:x2="9.904cm" svg:y2="2.656cm"><text:p/></draw:line><draw:line draw:style-name="gr2" draw:text-style-name="P257" svg:x1="3.902cm" svg:y1="0.157cm" svg:x2="3.902cm" svg:y2="0.656cm"><text:p/></draw:line><draw:line draw:style-name="gr2" draw:text-style-name="P257" svg:x1="3.651cm" svg:y1="0.656cm" svg:x2="3.901cm" svg:y2="0.656cm"><text:p/></draw:line><draw:line draw:style-name="gr2" draw:text-style-name="P257" svg:x1="3.651cm" svg:y1="0.656cm" svg:x2="3.651cm" svg:y2="0.157cm"><text:p/></draw:line><draw:line draw:style-name="gr2" draw:text-style-name="P257" svg:x1="3.403cm" svg:y1="0.157cm" svg:x2="3.652cm" svg:y2="0.157cm"><text:p/></draw:line><draw:line draw:style-name="gr12" draw:text-style-name="P257" svg:x1="3.902cm" svg:y1="2.157cm" svg:x2="3.902cm" svg:y2="2.656cm"><text:p/></draw:line><draw:line draw:style-name="gr12" draw:text-style-name="P257" svg:x1="5.153cm" svg:y1="2.157cm" svg:x2="3.902cm" svg:y2="2.157cm"><text:p/></draw:line><draw:line draw:style-name="gr12" draw:text-style-name="P257" svg:x1="5.154cm" svg:y1="2.157cm" svg:x2="5.154cm" svg:y2="2.656cm"><text:p/></draw:line><draw:line draw:style-name="gr12" draw:text-style-name="P257" svg:x1="3.901cm" svg:y1="2.656cm" svg:x2="3.651cm" svg:y2="2.656cm"><text:p/></draw:line></draw:g></text:p>
      <text:list xml:id="list38473342" text:continue-numbering="true" text:style-name="L1">
        <text:list-item>
          <text:list>
            <text:list-item>
              <text:h text:style-name="P216" text:outline-level="2"><text:alphabetical-index-mark-start text:id="IMark225902392"/>LATCH4<text:alphabetical-index-mark-end text:id="IMark225902392"/></text:h>
            </text:list-item>
          </text:list>
        </text:list-item>
      </text:list>
      <text:p text:style-name="P69">Type<text:tab/>Funktionsbaustein</text:p>
      <text:p text:style-name="P66"><text:span text:style-name="T15">Input</text:span><text:span text:style-name="T14"><text:tab/>D0 .. D3 : BOOL (Data in)</text:span></text:p>
      <text:p text:style-name="P66"><text:span text:style-name="T14"><text:tab/>L : BOOL (</text:span><text:span text:style-name="T15">Latch</text:span><text:span text:style-name="T14"> </text:span><text:span text:style-name="T15">enable</text:span><text:span text:style-name="T14"> Signal)</text:span></text:p>
      <text:p text:style-name="P69"><text:tab/>RST : BOOL (asynchroner Reset)</text:p>
      <text:p text:style-name="P66"><draw:frame draw:style-name="fr3" draw:name="Grafik125" text:anchor-type="paragraph" svg:x="1.162cm" svg:y="0.67cm" svg:width="2.281cm" svg:height="3.54cm" draw:z-index="92"><draw:image xlink:href="Pictures/10000000000000AC0000010C06D23609.png" xlink:type="simple" xlink:show="embed" xlink:actuate="onLoad"/></draw:frame><text:span text:style-name="T21">Output<text:tab/>Q0 .. Q3 : BOOL (Data </text:span><text:span text:style-name="T16">Out</text:span><text:span text:style-name="T21">)</text:span></text:p>
      <text:p text:style-name="P66"><text:soft-page-break/><text:span text:style-name="T21"><text:line-break/>LTCH4 ist ein transparentes Speicherelement (</text:span><text:span text:style-name="T16">Latch</text:span><text:span text:style-name="T21">). Solange L TRUE ist folgen Q0 - Q3 den Eingängen D0 - D3 und mit der fallenden Flanke von L speichern die Ausgänge Q0 - Q3 das aktuelle Eingangssignal von D0 - D3. Mit dem asynchronen Reset-Eingang kann das </text:span><text:span text:style-name="T16">Latch</text:span><text:span text:style-name="T21"> jederzeit unabhängig von L gelöscht werden. Weitere Erläuterungen und Angaben finden Sie beim Baustein LTCH.</text:span></text:p>
      <text:list xml:id="list38473802" text:continue-numbering="true" text:style-name="L1">
        <text:list-item>
          <text:list>
            <text:list-item>
              <text:h text:style-name="P216" text:outline-level="2"><text:alphabetical-index-mark-start text:id="IMark225902392"/>SHR_4E<text:alphabetical-index-mark-end text:id="IMark225902392"/></text:h>
            </text:list-item>
          </text:list>
        </text:list-item>
      </text:list>
      <text:p text:style-name="P69">Type<text:tab/>Funktionsbaustein</text:p>
      <text:p text:style-name="P66"><text:span text:style-name="T15">Input</text:span><text:span text:style-name="T14"><text:tab/>SET : BOOL (asynchroner Set)</text:span></text:p>
      <text:p text:style-name="P69"><text:tab/>D0 : BOOL (Data Input)</text:p>
      <text:p text:style-name="P69"><text:tab/>CLK : BOOL (Takteingang)</text:p>
      <text:p text:style-name="P69"><text:tab/>RST : BOOL (asynchroner Reset)</text:p>
      <text:p text:style-name="P66"><text:span text:style-name="T21">Output<text:tab/>Q0 : BOOL (Data </text:span><text:span text:style-name="T16">Out</text:span><text:span text:style-name="T21"> 0)</text:span></text:p>
      <text:p text:style-name="P66"><text:span text:style-name="T21"><text:tab/>Q1 : BOOL (Data </text:span><text:span text:style-name="T16">Out</text:span><text:span text:style-name="T21"> 1)</text:span></text:p>
      <text:p text:style-name="P66"><text:span text:style-name="T21"><text:tab/>Q2 : BOOL (Data </text:span><text:span text:style-name="T16">Out</text:span><text:span text:style-name="T21"> 2)</text:span></text:p>
      <text:p text:style-name="P66"><text:span text:style-name="T21"><text:tab/>Q3 : BOOL (Data </text:span><text:span text:style-name="T16">Out</text:span><text:span text:style-name="T21"> 3)</text:span></text:p>
      <text:p text:style-name="P66"><draw:frame draw:style-name="fr3" draw:name="Grafik123" text:anchor-type="paragraph" svg:x="1.291cm" svg:y="0.157cm" svg:width="2.281cm" svg:height="2.649cm" draw:z-index="93"><draw:image xlink:href="Pictures/10000000000000AC000000C8F712EA38.png" xlink:type="simple" xlink:show="embed" xlink:actuate="onLoad"/></draw:frame><text:span text:style-name="T21"><text:line-break/>SHR_4E ist ein 4 Bit Shift Register mit asynchronem Set- und Reset-Eingang. Mit einer steigenden Flanke an CLK wird Q2 nach Q3 geschoben, Q1 nach Q2, Q0 nach <text:line-break/>Q1 und D0 nach Q0 gespeichert. Mit einem TRUE am Set-Eingang werden </text:span><text:soft-page-break/><text:span text:style-name="T21">alle Ausgänge (Q0 .. Q3) auf TRUE gesetzt und mit RST werden alle auf FALSE gesetzt.</text:span></text:p>
      <text:p text:style-name="P73"/>
      <text:p text:style-name="P73"><draw:g text:anchor-type="paragraph" draw:z-index="94" draw:style-name="gr1"><draw:line draw:style-name="gr13" draw:text-style-name="P257" svg:x1="2.577cm" svg:y1="0.947cm" svg:x2="3.395cm" svg:y2="0.947cm"><text:p/></draw:line><draw:line draw:style-name="gr13" draw:text-style-name="P257" svg:x1="3.399cm" svg:y1="0.536cm" svg:x2="3.399cm" svg:y2="0.946cm"><text:p/></draw:line><draw:line draw:style-name="gr13" draw:text-style-name="P257" svg:x1="7.215cm" svg:y1="0.536cm" svg:x2="7.215cm" svg:y2="0.946cm"><text:p/></draw:line><draw:frame draw:style-name="gr15" draw:text-style-name="P259" svg:width="1.089cm" svg:height="0.652cm" svg:x="1.49cm" svg:y="0.536cm"><draw:text-box><text:p text:style-name="P258"><text:span text:style-name="T32">D</text:span></text:p></draw:text-box></draw:frame><draw:line draw:style-name="gr13" draw:text-style-name="P257" svg:x1="7.215cm" svg:y1="0.536cm" svg:x2="13.488cm" svg:y2="0.536cm"><text:p/></draw:line><draw:line draw:style-name="gr13" draw:text-style-name="P257" svg:x1="5.855cm" svg:y1="0.947cm" svg:x2="7.218cm" svg:y2="0.947cm"><text:p/></draw:line><draw:line draw:style-name="gr4" draw:text-style-name="P257" svg:x1="3.668cm" svg:y1="1.768cm" svg:x2="3.668cm" svg:y2="1.358cm"><text:p/></draw:line><draw:line draw:style-name="gr4" draw:text-style-name="P257" svg:x1="2.577cm" svg:y1="1.769cm" svg:x2="3.668cm" svg:y2="1.769cm"><text:p/></draw:line><draw:frame draw:style-name="gr16" draw:text-style-name="P259" svg:width="1.364cm" svg:height="1.05cm" svg:x="1.49cm" svg:y="1.357cm"><draw:text-box><text:p text:style-name="P258"><text:span text:style-name="T32">CLK</text:span></text:p></draw:text-box></draw:frame><draw:line draw:style-name="gr4" draw:text-style-name="P257" svg:x1="5.851cm" svg:y1="1.769cm" svg:x2="5.304cm" svg:y2="1.769cm"><text:p/></draw:line><draw:line draw:style-name="gr4" draw:text-style-name="P257" svg:x1="6.671cm" svg:y1="1.358cm" svg:x2="6.671cm" svg:y2="1.768cm"><text:p/></draw:line><draw:line draw:style-name="gr4" draw:text-style-name="P257" svg:x1="7.489cm" svg:y1="1.769cm" svg:x2="6.671cm" svg:y2="1.769cm"><text:p/></draw:line><draw:line draw:style-name="gr4" draw:text-style-name="P257" svg:x1="8.581cm" svg:y1="1.768cm" svg:x2="8.581cm" svg:y2="1.358cm"><text:p/></draw:line><draw:line draw:style-name="gr4" draw:text-style-name="P257" svg:x1="9.128cm" svg:y1="1.358cm" svg:x2="8.581cm" svg:y2="1.358cm"><text:p/></draw:line><draw:line draw:style-name="gr4" draw:text-style-name="P257" svg:x1="10.763cm" svg:y1="1.358cm" svg:x2="10.763cm" svg:y2="1.768cm"><text:p/></draw:line><draw:line draw:style-name="gr4" draw:text-style-name="P257" svg:x1="12.672cm" svg:y1="1.769cm" svg:x2="10.763cm" svg:y2="1.769cm"><text:p/></draw:line><draw:line draw:style-name="gr4" draw:text-style-name="P257" svg:x1="5.855cm" svg:y1="1.358cm" svg:x2="5.855cm" svg:y2="1.768cm"><text:p/></draw:line><draw:line draw:style-name="gr4" draw:text-style-name="P257" svg:x1="7.49cm" svg:y1="1.358cm" svg:x2="7.49cm" svg:y2="1.768cm"><text:p/></draw:line><draw:polyline draw:style-name="gr4" draw:text-style-name="P257" svg:width="0cm" svg:height="0cm" svg:x="5.304cm" svg:y="1.358cm" svg:viewBox="0 0 0 0" draw:points="0,0"><text:p/></draw:polyline><draw:line draw:style-name="gr11" draw:text-style-name="P257" svg:x1="11.034cm" svg:y1="2.59cm" svg:x2="11.034cm" svg:y2="2.18cm"><text:p/></draw:line><draw:line draw:style-name="gr11" draw:text-style-name="P257" svg:x1="11.306cm" svg:y1="2.18cm" svg:x2="11.034cm" svg:y2="2.18cm"><text:p/></draw:line><draw:line draw:style-name="gr11" draw:text-style-name="P257" svg:x1="2.577cm" svg:y1="2.588cm" svg:x2="11.033cm" svg:y2="2.588cm"><text:p/></draw:line><draw:frame draw:style-name="gr16" draw:text-style-name="P259" svg:width="1.364cm" svg:height="1.05cm" svg:x="1.49cm" svg:y="2.179cm"><draw:text-box><text:p text:style-name="P258"><text:span text:style-name="T32">RST</text:span></text:p></draw:text-box></draw:frame><draw:line draw:style-name="gr11" draw:text-style-name="P257" svg:x1="12.122cm" svg:y1="2.588cm" svg:x2="11.303cm" svg:y2="2.588cm"><text:p/></draw:line><draw:line draw:style-name="gr11" draw:text-style-name="P257" svg:x1="11.303cm" svg:y1="2.18cm" svg:x2="11.303cm" svg:y2="2.59cm"><text:p/></draw:line><draw:line draw:style-name="gr5" draw:text-style-name="P257" svg:x1="11.853cm" svg:y1="3.002cm" svg:x2="13.488cm" svg:y2="3.002cm"><text:p/></draw:line><draw:line draw:style-name="gr5" draw:text-style-name="P257" svg:x1="11.85cm" svg:y1="3.409cm" svg:x2="2.577cm" svg:y2="3.409cm"><text:p/></draw:line><draw:frame draw:style-name="gr17" draw:text-style-name="P259" svg:width="1.089cm" svg:height="0.653cm" svg:x="1.49cm" svg:y="3.817cm"><draw:text-box><text:p text:style-name="P258"><text:span text:style-name="T32">Q</text:span></text:p></draw:text-box></draw:frame><draw:frame draw:style-name="gr18" draw:text-style-name="P259" svg:width="1.364cm" svg:height="1.052cm" svg:x="1.49cm" svg:y="2.997cm"><draw:text-box><text:p text:style-name="P258"><text:span text:style-name="T32">SET</text:span></text:p></draw:text-box></draw:frame><draw:line draw:style-name="gr12" draw:text-style-name="P257" svg:x1="2.577cm" svg:y1="4.229cm" svg:x2="3.668cm" svg:y2="4.229cm"><text:p/></draw:line><draw:line draw:style-name="gr12" draw:text-style-name="P257" svg:x1="3.668cm" svg:y1="3.818cm" svg:x2="3.668cm" svg:y2="4.229cm"><text:p/></draw:line><draw:line draw:style-name="gr12" draw:text-style-name="P257" svg:x1="7.49cm" svg:y1="3.818cm" svg:x2="7.49cm" svg:y2="4.229cm"><text:p/></draw:line><draw:line draw:style-name="gr12" draw:text-style-name="P257" svg:x1="8.581cm" svg:y1="3.818cm" svg:x2="7.49cm" svg:y2="3.818cm"><text:p/></draw:line><draw:line draw:style-name="gr12" draw:text-style-name="P257" svg:x1="11.037cm" svg:y1="3.818cm" svg:x2="8.581cm" svg:y2="3.818cm"><text:p/></draw:line><draw:line draw:style-name="gr12" draw:text-style-name="P257" svg:x1="11.034cm" svg:y1="3.818cm" svg:x2="11.034cm" svg:y2="4.229cm"><text:p/></draw:line><draw:line draw:style-name="gr12" draw:text-style-name="P257" svg:x1="11.852cm" svg:y1="4.229cm" svg:x2="11.034cm" svg:y2="4.229cm"><text:p/></draw:line><draw:line draw:style-name="gr14" draw:text-style-name="P257" svg:x1="3.668cm" svg:y1="0.33cm" svg:x2="3.668cm" svg:y2="4.435cm"><text:p/></draw:line><draw:line draw:style-name="gr14" draw:text-style-name="P257" svg:x1="5.855cm" svg:y1="0.33cm" svg:x2="5.855cm" svg:y2="6.896cm"><text:p/></draw:line><draw:line draw:style-name="gr14" draw:text-style-name="P257" svg:x1="8.581cm" svg:y1="0.33cm" svg:x2="8.581cm" svg:y2="6.896cm"><text:p/></draw:line><draw:line draw:style-name="gr14" draw:text-style-name="P257" svg:x1="12.67cm" svg:y1="0.33cm" svg:x2="12.67cm" svg:y2="4.435cm"><text:p/></draw:line><draw:line draw:style-name="gr5" draw:text-style-name="P257" svg:x1="11.853cm" svg:y1="3.002cm" svg:x2="11.853cm" svg:y2="3.412cm"><text:p/></draw:line><draw:line draw:style-name="gr11" draw:text-style-name="P257" svg:x1="12.124cm" svg:y1="2.59cm" svg:x2="12.124cm" svg:y2="2.18cm"><text:p/></draw:line><draw:line draw:style-name="gr11" draw:text-style-name="P257" svg:x1="13.487cm" svg:y1="2.18cm" svg:x2="12.124cm" svg:y2="2.18cm"><text:p/></draw:line><draw:line draw:style-name="gr4" draw:text-style-name="P257" svg:x1="12.67cm" svg:y1="1.358cm" svg:x2="12.67cm" svg:y2="1.768cm"><text:p/></draw:line><draw:line draw:style-name="gr4" draw:text-style-name="P257" svg:x1="13.488cm" svg:y1="1.358cm" svg:x2="12.67cm" svg:y2="1.358cm"><text:p/></draw:line><draw:line draw:style-name="gr12" draw:text-style-name="P257" svg:x1="12.124cm" svg:y1="3.818cm" svg:x2="12.124cm" svg:y2="4.229cm"><text:p/></draw:line><draw:line draw:style-name="gr12" draw:text-style-name="P257" svg:x1="12.126cm" svg:y1="3.818cm" svg:x2="11.853cm" svg:y2="3.818cm"><text:p/></draw:line><draw:line draw:style-name="gr12" draw:text-style-name="P257" svg:x1="11.034cm" svg:y1="3.818cm" svg:x2="11.034cm" svg:y2="4.229cm"><text:p/></draw:line><draw:line draw:style-name="gr12" draw:text-style-name="P257" svg:x1="11.852cm" svg:y1="4.229cm" svg:x2="11.034cm" svg:y2="4.229cm"><text:p/></draw:line><draw:line draw:style-name="gr12" draw:text-style-name="P257" svg:x1="11.853cm" svg:y1="3.818cm" svg:x2="11.853cm" svg:y2="4.229cm"><text:p/></draw:line><draw:line draw:style-name="gr12" draw:text-style-name="P257" svg:x1="13.487cm" svg:y1="4.229cm" svg:x2="12.124cm" svg:y2="4.229cm"><text:p/></draw:line><draw:line draw:style-name="gr13" draw:text-style-name="P257" svg:x1="2.577cm" svg:y1="0.947cm" svg:x2="3.395cm" svg:y2="0.947cm"><text:p/></draw:line><draw:line draw:style-name="gr13" draw:text-style-name="P257" svg:x1="3.399cm" svg:y1="0.536cm" svg:x2="3.399cm" svg:y2="0.946cm"><text:p/></draw:line><draw:line draw:style-name="gr13" draw:text-style-name="P257" svg:x1="3.399cm" svg:y1="0.536cm" svg:x2="5.036cm" svg:y2="0.536cm"><text:p/></draw:line><draw:line draw:style-name="gr13" draw:text-style-name="P257" svg:x1="5.035cm" svg:y1="0.946cm" svg:x2="5.035cm" svg:y2="0.536cm"><text:p/></draw:line><draw:line draw:style-name="gr13" draw:text-style-name="P257" svg:x1="7.215cm" svg:y1="0.536cm" svg:x2="7.215cm" svg:y2="0.946cm"><text:p/></draw:line><draw:frame draw:style-name="gr16" draw:text-style-name="P259" svg:width="1.089cm" svg:height="1.05cm" svg:x="1.49cm" svg:y="0.536cm"><draw:text-box><text:p text:style-name="P258"><text:span text:style-name="T32">D0</text:span></text:p></draw:text-box></draw:frame><draw:line draw:style-name="gr13" draw:text-style-name="P257" svg:x1="7.215cm" svg:y1="0.536cm" svg:x2="13.488cm" svg:y2="0.536cm"><text:p/></draw:line><draw:line draw:style-name="gr13" draw:text-style-name="P257" svg:x1="5.035cm" svg:y1="0.947cm" svg:x2="7.215cm" svg:y2="0.947cm"><text:p/></draw:line><draw:line draw:style-name="gr4" draw:text-style-name="P257" svg:x1="3.668cm" svg:y1="1.768cm" svg:x2="3.668cm" svg:y2="1.358cm"><text:p/></draw:line><draw:line draw:style-name="gr4" draw:text-style-name="P257" svg:x1="4.212cm" svg:y1="1.358cm" svg:x2="3.668cm" svg:y2="1.358cm"><text:p/></draw:line><draw:line draw:style-name="gr4" draw:text-style-name="P257" svg:x1="4.213cm" svg:y1="1.358cm" svg:x2="4.213cm" svg:y2="1.768cm"><text:p/></draw:line><draw:line draw:style-name="gr4" draw:text-style-name="P257" svg:x1="4.76cm" svg:y1="1.769cm" svg:x2="4.213cm" svg:y2="1.769cm"><text:p/></draw:line><draw:line draw:style-name="gr4" draw:text-style-name="P257" svg:x1="2.577cm" svg:y1="1.769cm" svg:x2="3.668cm" svg:y2="1.769cm"><text:p/></draw:line><draw:frame draw:style-name="gr16" draw:text-style-name="P259" svg:width="1.364cm" svg:height="1.05cm" svg:x="1.49cm" svg:y="1.357cm"><draw:text-box><text:p text:style-name="P258"><text:span text:style-name="T32">CLK</text:span></text:p></draw:text-box></draw:frame><draw:line draw:style-name="gr4" draw:text-style-name="P257" svg:x1="4.758cm" svg:y1="1.358cm" svg:x2="4.758cm" svg:y2="1.768cm"><text:p/></draw:line><draw:line draw:style-name="gr4" draw:text-style-name="P257" svg:x1="5.302cm" svg:y1="1.358cm" svg:x2="4.758cm" svg:y2="1.358cm"><text:p/></draw:line><draw:line draw:style-name="gr4" draw:text-style-name="P257" svg:x1="6.671cm" svg:y1="1.358cm" svg:x2="6.671cm" svg:y2="1.768cm"><text:p/></draw:line><draw:line draw:style-name="gr4" draw:text-style-name="P257" svg:x1="6.673cm" svg:y1="1.358cm" svg:x2="5.855cm" svg:y2="1.358cm"><text:p/></draw:line><draw:line draw:style-name="gr4" draw:text-style-name="P257" svg:x1="8.037cm" svg:y1="1.768cm" svg:x2="8.037cm" svg:y2="1.358cm"><text:p/></draw:line><draw:line draw:style-name="gr4" draw:text-style-name="P257" svg:x1="10.217cm" svg:y1="1.769cm" svg:x2="9.128cm" svg:y2="1.769cm"><text:p/></draw:line><draw:line draw:style-name="gr4" draw:text-style-name="P257" svg:x1="9.128cm" svg:y1="1.358cm" svg:x2="9.128cm" svg:y2="1.768cm"><text:p/></draw:line><draw:line draw:style-name="gr4" draw:text-style-name="P257" svg:x1="12.672cm" svg:y1="1.769cm" svg:x2="10.763cm" svg:y2="1.769cm"><text:p/></draw:line><draw:line draw:style-name="gr4" draw:text-style-name="P257" svg:x1="5.304cm" svg:y1="1.358cm" svg:x2="5.304cm" svg:y2="1.768cm"><text:p/></draw:line><draw:line draw:style-name="gr4" draw:text-style-name="P257" svg:x1="7.49cm" svg:y1="1.358cm" svg:x2="7.49cm" svg:y2="1.768cm"><text:p/></draw:line><draw:line draw:style-name="gr4" draw:text-style-name="P257" svg:x1="8.037cm" svg:y1="1.769cm" svg:x2="8.581cm" svg:y2="1.769cm"><text:p/></draw:line><draw:line draw:style-name="gr11" draw:text-style-name="P257" svg:x1="11.034cm" svg:y1="2.59cm" svg:x2="11.034cm" svg:y2="2.18cm"><text:p/></draw:line><draw:line draw:style-name="gr11" draw:text-style-name="P257" svg:x1="11.306cm" svg:y1="2.18cm" svg:x2="11.034cm" svg:y2="2.18cm"><text:p/></draw:line><draw:line draw:style-name="gr11" draw:text-style-name="P257" svg:x1="2.577cm" svg:y1="2.588cm" svg:x2="11.033cm" svg:y2="2.588cm"><text:p/></draw:line><draw:frame draw:style-name="gr16" draw:text-style-name="P259" svg:width="1.364cm" svg:height="1.05cm" svg:x="1.49cm" svg:y="2.179cm"><draw:text-box><text:p text:style-name="P258"><text:span text:style-name="T32">RST</text:span></text:p></draw:text-box></draw:frame><draw:line draw:style-name="gr11" draw:text-style-name="P257" svg:x1="12.122cm" svg:y1="2.588cm" svg:x2="11.303cm" svg:y2="2.588cm"><text:p/></draw:line><draw:line draw:style-name="gr11" draw:text-style-name="P257" svg:x1="11.303cm" svg:y1="2.18cm" svg:x2="11.303cm" svg:y2="2.59cm"><text:p/></draw:line><draw:line draw:style-name="gr5" draw:text-style-name="P257" svg:x1="11.853cm" svg:y1="3.002cm" svg:x2="13.488cm" svg:y2="3.002cm"><text:p/></draw:line><draw:line draw:style-name="gr5" draw:text-style-name="P257" svg:x1="11.85cm" svg:y1="3.409cm" svg:x2="2.577cm" svg:y2="3.409cm"><text:p/></draw:line><draw:frame draw:style-name="gr16" draw:text-style-name="P259" svg:width="1.089cm" svg:height="1.05cm" svg:x="1.49cm" svg:y="3.817cm"><draw:text-box><text:p text:style-name="P258"><text:span text:style-name="T32">Q0</text:span></text:p></draw:text-box></draw:frame><draw:frame draw:style-name="gr18" draw:text-style-name="P259" svg:width="1.364cm" svg:height="1.052cm" svg:x="1.49cm" svg:y="2.997cm"><draw:text-box><text:p text:style-name="P258"><text:span text:style-name="T32">SET</text:span></text:p></draw:text-box></draw:frame><draw:line draw:style-name="gr12" draw:text-style-name="P257" svg:x1="2.577cm" svg:y1="4.229cm" svg:x2="3.668cm" svg:y2="4.229cm"><text:p/></draw:line><draw:line draw:style-name="gr12" draw:text-style-name="P257" svg:x1="3.668cm" svg:y1="3.818cm" svg:x2="3.668cm" svg:y2="4.229cm"><text:p/></draw:line><draw:line draw:style-name="gr12" draw:text-style-name="P257" svg:x1="5.85cm" svg:y1="3.818cm" svg:x2="3.668cm" svg:y2="3.818cm"><text:p/></draw:line><draw:line draw:style-name="gr12" draw:text-style-name="P257" svg:x1="5.855cm" svg:y1="3.818cm" svg:x2="5.855cm" svg:y2="4.229cm"><text:p/></draw:line><draw:line draw:style-name="gr12" draw:text-style-name="P257" svg:x1="7.49cm" svg:y1="4.229cm" svg:x2="5.855cm" svg:y2="4.229cm"><text:p/></draw:line><draw:line draw:style-name="gr12" draw:text-style-name="P257" svg:x1="11.037cm" svg:y1="3.818cm" svg:x2="8.581cm" svg:y2="3.818cm"><text:p/></draw:line><draw:line draw:style-name="gr12" draw:text-style-name="P257" svg:x1="11.034cm" svg:y1="3.818cm" svg:x2="11.034cm" svg:y2="4.229cm"><text:p/></draw:line><draw:line draw:style-name="gr12" draw:text-style-name="P257" svg:x1="11.852cm" svg:y1="4.229cm" svg:x2="11.034cm" svg:y2="4.229cm"><text:p/></draw:line><draw:line draw:style-name="gr14" draw:text-style-name="P257" svg:x1="3.668cm" svg:y1="0.33cm" svg:x2="3.668cm" svg:y2="6.896cm"><text:p/></draw:line><draw:line draw:style-name="gr14" draw:text-style-name="P257" svg:x1="4.758cm" svg:y1="0.33cm" svg:x2="4.758cm" svg:y2="6.896cm"><text:p/></draw:line><draw:line draw:style-name="gr14" draw:text-style-name="P257" svg:x1="7.49cm" svg:y1="0.33cm" svg:x2="7.49cm" svg:y2="6.896cm"><text:p/></draw:line><draw:line draw:style-name="gr14" draw:text-style-name="P257" svg:x1="12.67cm" svg:y1="0.33cm" svg:x2="12.67cm" svg:y2="6.896cm"><text:p/></draw:line><draw:line draw:style-name="gr5" draw:text-style-name="P257" svg:x1="11.853cm" svg:y1="3.002cm" svg:x2="11.853cm" svg:y2="3.412cm"><text:p/></draw:line><draw:line draw:style-name="gr11" draw:text-style-name="P257" svg:x1="12.124cm" svg:y1="2.59cm" svg:x2="12.124cm" svg:y2="2.18cm"><text:p/></draw:line><draw:line draw:style-name="gr11" draw:text-style-name="P257" svg:x1="13.487cm" svg:y1="2.18cm" svg:x2="12.124cm" svg:y2="2.18cm"><text:p/></draw:line><draw:line draw:style-name="gr4" draw:text-style-name="P257" svg:x1="12.67cm" svg:y1="1.358cm" svg:x2="12.67cm" svg:y2="1.768cm"><text:p/></draw:line><draw:line draw:style-name="gr4" draw:text-style-name="P257" svg:x1="13.488cm" svg:y1="1.358cm" svg:x2="12.67cm" svg:y2="1.358cm"><text:p/></draw:line><draw:line draw:style-name="gr12" draw:text-style-name="P257" svg:x1="12.124cm" svg:y1="3.818cm" svg:x2="12.124cm" svg:y2="4.229cm"><text:p/></draw:line><draw:line draw:style-name="gr12" draw:text-style-name="P257" svg:x1="12.126cm" svg:y1="3.818cm" svg:x2="11.853cm" svg:y2="3.818cm"><text:p/></draw:line><draw:line draw:style-name="gr12" draw:text-style-name="P257" svg:x1="11.034cm" svg:y1="3.818cm" svg:x2="11.034cm" svg:y2="4.229cm"><text:p/></draw:line><draw:line draw:style-name="gr12" draw:text-style-name="P257" svg:x1="11.852cm" svg:y1="4.229cm" svg:x2="11.034cm" svg:y2="4.229cm"><text:p/></draw:line><draw:line draw:style-name="gr12" draw:text-style-name="P257" svg:x1="11.853cm" svg:y1="3.818cm" svg:x2="11.853cm" svg:y2="4.229cm"><text:p/></draw:line><draw:line draw:style-name="gr12" draw:text-style-name="P257" svg:x1="13.487cm" svg:y1="4.229cm" svg:x2="12.124cm" svg:y2="4.229cm"><text:p/></draw:line><draw:line draw:style-name="gr4" draw:text-style-name="P257" svg:x1="7.49cm" svg:y1="1.358cm" svg:x2="8.037cm" svg:y2="1.358cm"><text:p/></draw:line><draw:line draw:style-name="gr4" draw:text-style-name="P257" svg:x1="10.764cm" svg:y1="1.358cm" svg:x2="10.217cm" svg:y2="1.358cm"><text:p/></draw:line><draw:line draw:style-name="gr4" draw:text-style-name="P257" svg:x1="10.217cm" svg:y1="1.768cm" svg:x2="10.217cm" svg:y2="1.358cm"><text:p/></draw:line><draw:line draw:style-name="gr14" draw:text-style-name="P257" svg:x1="10.217cm" svg:y1="0.33cm" svg:x2="10.217cm" svg:y2="6.896cm"><text:p/></draw:line><draw:frame draw:style-name="gr17" draw:text-style-name="P259" svg:width="1.089cm" svg:height="0.653cm" svg:x="1.49cm" svg:y="4.639cm"><draw:text-box><text:p text:style-name="P258"><text:span text:style-name="T32">Q</text:span></text:p></draw:text-box></draw:frame><draw:line draw:style-name="gr12" draw:text-style-name="P257" svg:x1="2.577cm" svg:y1="5.05cm" svg:x2="3.668cm" svg:y2="5.05cm"><text:p/></draw:line><draw:line draw:style-name="gr12" draw:text-style-name="P257" svg:x1="7.49cm" svg:y1="4.639cm" svg:x2="7.49cm" svg:y2="5.05cm"><text:p/></draw:line><draw:line draw:style-name="gr12" draw:text-style-name="P257" svg:x1="8.581cm" svg:y1="5.05cm" svg:x2="7.49cm" svg:y2="5.05cm"><text:p/></draw:line><draw:line draw:style-name="gr12" draw:text-style-name="P257" svg:x1="11.037cm" svg:y1="4.639cm" svg:x2="8.581cm" svg:y2="4.639cm"><text:p/></draw:line><draw:line draw:style-name="gr12" draw:text-style-name="P257" svg:x1="11.034cm" svg:y1="4.639cm" svg:x2="11.034cm" svg:y2="5.05cm"><text:p/></draw:line><draw:line draw:style-name="gr12" draw:text-style-name="P257" svg:x1="11.852cm" svg:y1="5.05cm" svg:x2="11.034cm" svg:y2="5.05cm"><text:p/></draw:line><draw:line draw:style-name="gr12" draw:text-style-name="P257" svg:x1="12.124cm" svg:y1="4.639cm" svg:x2="12.124cm" svg:y2="5.05cm"><text:p/></draw:line><draw:line draw:style-name="gr12" draw:text-style-name="P257" svg:x1="12.126cm" svg:y1="4.639cm" svg:x2="11.853cm" svg:y2="4.639cm"><text:p/></draw:line><draw:line draw:style-name="gr12" draw:text-style-name="P257" svg:x1="11.034cm" svg:y1="4.639cm" svg:x2="11.034cm" svg:y2="5.05cm"><text:p/></draw:line><draw:line draw:style-name="gr12" draw:text-style-name="P257" svg:x1="11.852cm" svg:y1="5.05cm" svg:x2="11.034cm" svg:y2="5.05cm"><text:p/></draw:line><draw:line draw:style-name="gr12" draw:text-style-name="P257" svg:x1="11.853cm" svg:y1="4.639cm" svg:x2="11.853cm" svg:y2="5.05cm"><text:p/></draw:line><draw:line draw:style-name="gr12" draw:text-style-name="P257" svg:x1="13.487cm" svg:y1="5.05cm" svg:x2="12.124cm" svg:y2="5.05cm"><text:p/></draw:line><draw:frame draw:style-name="gr16" draw:text-style-name="P259" svg:width="1.089cm" svg:height="1.05cm" svg:x="1.49cm" svg:y="4.639cm"><draw:text-box><text:p text:style-name="P258"><text:span text:style-name="T32">Q1</text:span></text:p></draw:text-box></draw:frame><draw:line draw:style-name="gr12" draw:text-style-name="P257" svg:x1="2.577cm" svg:y1="5.05cm" svg:x2="4.759cm" svg:y2="5.05cm"><text:p/></draw:line><draw:line draw:style-name="gr12" draw:text-style-name="P257" svg:x1="4.758cm" svg:y1="4.639cm" svg:x2="4.758cm" svg:y2="5.05cm"><text:p/></draw:line><draw:line draw:style-name="gr12" draw:text-style-name="P257" svg:x1="7.484cm" svg:y1="4.639cm" svg:x2="4.758cm" svg:y2="4.639cm"><text:p/></draw:line><draw:line draw:style-name="gr12" draw:text-style-name="P257" svg:x1="8.581cm" svg:y1="4.639cm" svg:x2="8.581cm" svg:y2="5.05cm"><text:p/></draw:line><draw:line draw:style-name="gr12" draw:text-style-name="P257" svg:x1="11.034cm" svg:y1="4.639cm" svg:x2="11.034cm" svg:y2="5.05cm"><text:p/></draw:line><draw:line draw:style-name="gr12" draw:text-style-name="P257" svg:x1="11.852cm" svg:y1="5.05cm" svg:x2="11.034cm" svg:y2="5.05cm"><text:p/></draw:line><draw:line draw:style-name="gr12" draw:text-style-name="P257" svg:x1="12.124cm" svg:y1="4.639cm" svg:x2="12.124cm" svg:y2="5.05cm"><text:p/></draw:line><draw:line draw:style-name="gr12" draw:text-style-name="P257" svg:x1="12.126cm" svg:y1="4.639cm" svg:x2="11.853cm" svg:y2="4.639cm"><text:p/></draw:line><draw:line draw:style-name="gr12" draw:text-style-name="P257" svg:x1="11.034cm" svg:y1="4.639cm" svg:x2="11.034cm" svg:y2="5.05cm"><text:p/></draw:line><draw:line draw:style-name="gr12" draw:text-style-name="P257" svg:x1="11.852cm" svg:y1="5.05cm" svg:x2="11.034cm" svg:y2="5.05cm"><text:p/></draw:line><draw:line draw:style-name="gr12" draw:text-style-name="P257" svg:x1="11.853cm" svg:y1="4.639cm" svg:x2="11.853cm" svg:y2="5.05cm"><text:p/></draw:line><draw:line draw:style-name="gr12" draw:text-style-name="P257" svg:x1="13.487cm" svg:y1="5.05cm" svg:x2="12.124cm" svg:y2="5.05cm"><text:p/></draw:line><draw:frame draw:style-name="gr15" draw:text-style-name="P259" svg:width="1.089cm" svg:height="0.652cm" svg:x="1.49cm" svg:y="5.459cm"><draw:text-box><text:p text:style-name="P258"><text:span text:style-name="T32">Q</text:span></text:p></draw:text-box></draw:frame><draw:line draw:style-name="gr12" draw:text-style-name="P257" svg:x1="2.577cm" svg:y1="5.871cm" svg:x2="3.668cm" svg:y2="5.871cm"><text:p/></draw:line><draw:line draw:style-name="gr12" draw:text-style-name="P257" svg:x1="11.853cm" svg:y1="5.46cm" svg:x2="11.853cm" svg:y2="5.871cm"><text:p/></draw:line><draw:line draw:style-name="gr12" draw:text-style-name="P257" svg:x1="8.581cm" svg:y1="5.46cm" svg:x2="5.855cm" svg:y2="5.46cm"><text:p/></draw:line><draw:line draw:style-name="gr12" draw:text-style-name="P257" svg:x1="8.581cm" svg:y1="5.46cm" svg:x2="8.581cm" svg:y2="5.871cm"><text:p/></draw:line><draw:line draw:style-name="gr12" draw:text-style-name="P257" svg:x1="12.124cm" svg:y1="5.46cm" svg:x2="12.124cm" svg:y2="5.871cm"><text:p/></draw:line><draw:line draw:style-name="gr12" draw:text-style-name="P257" svg:x1="12.126cm" svg:y1="5.46cm" svg:x2="11.853cm" svg:y2="5.46cm"><text:p/></draw:line><draw:line draw:style-name="gr12" draw:text-style-name="P257" svg:x1="11.034cm" svg:y1="5.871cm" svg:x2="11.852cm" svg:y2="5.871cm"><text:p/></draw:line><draw:line draw:style-name="gr12" draw:text-style-name="P257" svg:x1="13.487cm" svg:y1="5.871cm" svg:x2="12.124cm" svg:y2="5.871cm"><text:p/></draw:line><draw:frame draw:style-name="gr16" draw:text-style-name="P259" svg:width="1.089cm" svg:height="1.05cm" svg:x="1.49cm" svg:y="5.459cm"><draw:text-box><text:p text:style-name="P258"><text:span text:style-name="T32">Q2</text:span></text:p></draw:text-box></draw:frame><draw:line draw:style-name="gr12" draw:text-style-name="P257" svg:x1="2.577cm" svg:y1="5.871cm" svg:x2="5.85cm" svg:y2="5.871cm"><text:p/></draw:line><draw:line draw:style-name="gr12" draw:text-style-name="P257" svg:x1="5.855cm" svg:y1="5.46cm" svg:x2="5.855cm" svg:y2="5.871cm"><text:p/></draw:line><draw:line draw:style-name="gr12" draw:text-style-name="P257" svg:x1="8.581cm" svg:y1="5.46cm" svg:x2="8.581cm" svg:y2="5.871cm"><text:p/></draw:line><draw:line draw:style-name="gr12" draw:text-style-name="P257" svg:x1="10.216cm" svg:y1="5.871cm" svg:x2="8.581cm" svg:y2="5.871cm"><text:p/></draw:line><draw:line draw:style-name="gr12" draw:text-style-name="P257" svg:x1="10.217cm" svg:y1="5.46cm" svg:x2="10.217cm" svg:y2="5.871cm"><text:p/></draw:line><draw:line draw:style-name="gr12" draw:text-style-name="P257" svg:x1="12.124cm" svg:y1="5.46cm" svg:x2="12.124cm" svg:y2="5.871cm"><text:p/></draw:line><draw:line draw:style-name="gr12" draw:text-style-name="P257" svg:x1="12.126cm" svg:y1="5.46cm" svg:x2="11.853cm" svg:y2="5.46cm"><text:p/></draw:line><draw:line draw:style-name="gr12" draw:text-style-name="P257" svg:x1="11.034cm" svg:y1="5.46cm" svg:x2="11.034cm" svg:y2="5.871cm"><text:p/></draw:line><draw:line draw:style-name="gr12" draw:text-style-name="P257" svg:x1="11.036cm" svg:y1="5.46cm" svg:x2="10.217cm" svg:y2="5.46cm"><text:p/></draw:line><draw:frame draw:style-name="gr15" draw:text-style-name="P259" svg:width="1.089cm" svg:height="0.652cm" svg:x="1.49cm" svg:y="6.281cm"><draw:text-box><text:p text:style-name="P258"><text:span text:style-name="T32">Q</text:span></text:p></draw:text-box></draw:frame><draw:line draw:style-name="gr12" draw:text-style-name="P257" svg:x1="2.577cm" svg:y1="6.694cm" svg:x2="3.668cm" svg:y2="6.694cm"><text:p/></draw:line><draw:line draw:style-name="gr12" draw:text-style-name="P257" svg:x1="11.852cm" svg:y1="6.694cm" svg:x2="11.034cm" svg:y2="6.694cm"><text:p/></draw:line><draw:line draw:style-name="gr12" draw:text-style-name="P257" svg:x1="12.124cm" svg:y1="6.283cm" svg:x2="12.124cm" svg:y2="6.694cm"><text:p/></draw:line><draw:line draw:style-name="gr12" draw:text-style-name="P257" svg:x1="12.126cm" svg:y1="6.283cm" svg:x2="11.853cm" svg:y2="6.283cm"><text:p/></draw:line><draw:line draw:style-name="gr12" draw:text-style-name="P257" svg:x1="11.852cm" svg:y1="6.694cm" svg:x2="11.034cm" svg:y2="6.694cm"><text:p/></draw:line><draw:line draw:style-name="gr12" draw:text-style-name="P257" svg:x1="11.853cm" svg:y1="6.283cm" svg:x2="11.853cm" svg:y2="6.694cm"><text:p/></draw:line><draw:line draw:style-name="gr12" draw:text-style-name="P257" svg:x1="13.487cm" svg:y1="6.694cm" svg:x2="12.124cm" svg:y2="6.694cm"><text:p/></draw:line><draw:frame draw:style-name="gr16" draw:text-style-name="P259" svg:width="1.089cm" svg:height="1.05cm" svg:x="1.49cm" svg:y="6.281cm"><draw:text-box><text:p text:style-name="P258"><text:span text:style-name="T32">Q3</text:span></text:p></draw:text-box></draw:frame><draw:line draw:style-name="gr12" draw:text-style-name="P257" svg:x1="2.577cm" svg:y1="6.694cm" svg:x2="7.486cm" svg:y2="6.694cm"><text:p/></draw:line><draw:line draw:style-name="gr12" draw:text-style-name="P257" svg:x1="7.49cm" svg:y1="6.283cm" svg:x2="7.49cm" svg:y2="6.694cm"><text:p/></draw:line><draw:line draw:style-name="gr12" draw:text-style-name="P257" svg:x1="10.216cm" svg:y1="6.283cm" svg:x2="7.49cm" svg:y2="6.283cm"><text:p/></draw:line><draw:line draw:style-name="gr12" draw:text-style-name="P257" svg:x1="10.217cm" svg:y1="6.283cm" svg:x2="10.217cm" svg:y2="6.694cm"><text:p/></draw:line><draw:line draw:style-name="gr12" draw:text-style-name="P257" svg:x1="11.036cm" svg:y1="6.694cm" svg:x2="10.217cm" svg:y2="6.694cm"><text:p/></draw:line><draw:line draw:style-name="gr12" draw:text-style-name="P257" svg:x1="11.852cm" svg:y1="6.694cm" svg:x2="11.034cm" svg:y2="6.694cm"><text:p/></draw:line><draw:line draw:style-name="gr12" draw:text-style-name="P257" svg:x1="12.124cm" svg:y1="6.283cm" svg:x2="12.124cm" svg:y2="6.694cm"><text:p/></draw:line><draw:line draw:style-name="gr12" draw:text-style-name="P257" svg:x1="12.126cm" svg:y1="6.283cm" svg:x2="11.853cm" svg:y2="6.283cm"><text:p/></draw:line><draw:line draw:style-name="gr12" draw:text-style-name="P257" svg:x1="11.852cm" svg:y1="6.694cm" svg:x2="11.034cm" svg:y2="6.694cm"><text:p/></draw:line><draw:line draw:style-name="gr12" draw:text-style-name="P257" svg:x1="11.853cm" svg:y1="6.283cm" svg:x2="11.853cm" svg:y2="6.694cm"><text:p/></draw:line><draw:line draw:style-name="gr12" draw:text-style-name="P257" svg:x1="13.487cm" svg:y1="6.694cm" svg:x2="12.124cm" svg:y2="6.694cm"><text:p/></draw:line></draw:g></text:p>
      <text:list xml:id="list38472130" text:continue-numbering="true" text:style-name="L1">
        <text:list-item>
          <text:list>
            <text:list-item>
              <text:h text:style-name="P216" text:outline-level="2"><text:alphabetical-index-mark-start text:id="IMark225902392"/>SHR_4UDE<text:alphabetical-index-mark-end text:id="IMark225902392"/></text:h>
            </text:list-item>
          </text:list>
        </text:list-item>
      </text:list>
      <text:p text:style-name="P69">Type<text:tab/>Funktionsbaustein</text:p>
      <text:p text:style-name="P66"><text:span text:style-name="T15">Input</text:span><text:span text:style-name="T14"><text:tab/>SET : BOOL (asynchroner Set)</text:span></text:p>
      <text:p text:style-name="P66"><text:span text:style-name="T14"><text:tab/>D0 : BOOL (Data </text:span><text:span text:style-name="T15">Input</text:span><text:span text:style-name="T14"> Bit 0)</text:span></text:p>
      <text:p text:style-name="P66"><text:span text:style-name="T14"><text:tab/>D3 : BOOL (Data </text:span><text:span text:style-name="T15">Input</text:span><text:span text:style-name="T14"> Bit 3)</text:span></text:p>
      <text:p text:style-name="P69"><text:tab/>CLK : BOOL (Takteingang)</text:p>
      <text:p text:style-name="P66"><text:span text:style-name="T14"><text:tab/>DN : BOOL (Steuereingang </text:span><text:span text:style-name="T15">Up / Down</text:span><text:span text:style-name="T14">, TRUE = D</text:span><text:span text:style-name="T15">own</text:span><text:span text:style-name="T14">)</text:span></text:p>
      <text:p text:style-name="P69"><text:tab/>RST : BOOL (asynchroner Reset)</text:p>
      <text:p text:style-name="P66"><text:span text:style-name="T21">Output<text:tab/>Q0 : BOOL (Data </text:span><text:span text:style-name="T16">Out</text:span><text:span text:style-name="T21"> 0)</text:span></text:p>
      <text:p text:style-name="P66"><text:span text:style-name="T21"><text:tab/>Q1 : BOOL (Data </text:span><text:span text:style-name="T16">Out</text:span><text:span text:style-name="T21"> 1)</text:span></text:p>
      <text:p text:style-name="P66"><text:span text:style-name="T21"><text:tab/>Q2 : BOOL (Data </text:span><text:span text:style-name="T16">Out</text:span><text:span text:style-name="T21"> 2)</text:span></text:p>
      <text:p text:style-name="P66"><draw:frame draw:style-name="fr3" draw:name="Grafik126" text:anchor-type="paragraph" svg:x="1.346cm" svg:y="0.626cm" svg:width="2.731cm" svg:height="3.54cm" draw:z-index="95"><draw:image xlink:href="Pictures/10000000000000CE0000010C09A20770.png" xlink:type="simple" xlink:show="embed" xlink:actuate="onLoad"/></draw:frame><text:span text:style-name="T21"><text:tab/>Q3 : BOOL (Data </text:span><text:span text:style-name="T16">Out</text:span><text:span text:style-name="T21"> 3)</text:span></text:p>
      <text:p text:style-name="P66"><text:soft-page-break/><text:span text:style-name="T21"><text:line-break/>SHR_4UDE ist ein 4 Bit Schieberegister mit U</text:span><text:span text:style-name="T16">p</text:span><text:span text:style-name="T21"> / D</text:span><text:span text:style-name="T16">own</text:span><text:span text:style-name="T21"> Schieberichtungen. Mit einer steigenden Flanke an CLK wird Q2 nach Q3 geschoben, Q1 nach Q2, Q0 nach Q1 und D0 nach Q0 gespeichert. Die Schieberichtung kann mit einem TRUE am Eingang DN umgekehrt werden, dann wird D3 nach Q3 – nach Q2 – nach Q1 – nach Q0 geschoben. Mit einem TRUE am Set-Eingang werden alle Ausgänge (Q0 .. Q3) auf TRUE gesetzt und mit RST werden alle Eingänge auf FALSE gesetzt.</text:span></text:p>
      <text:p text:style-name="P183"/>
      <text:p text:style-name="P183"><draw:g text:anchor-type="paragraph" draw:z-index="96" draw:style-name="gr1"><draw:frame draw:style-name="gr19" draw:text-style-name="P259" svg:width="0.997cm" svg:height="0.618cm" svg:x="1.058cm" svg:y="0.591cm"><draw:text-box><text:p text:style-name="P258"><text:span text:style-name="T32">D3</text:span></text:p></draw:text-box></draw:frame><draw:line draw:style-name="gr13" draw:text-style-name="P257" svg:x1="6.306cm" svg:y1="0.127cm" svg:x2="12.056cm" svg:y2="0.127cm"><text:p/></draw:line><draw:line draw:style-name="gr4" draw:text-style-name="P257" svg:x1="5.059cm" svg:y1="1.758cm" svg:x2="4.558cm" svg:y2="1.758cm"><text:p/></draw:line><draw:line draw:style-name="gr4" draw:text-style-name="P257" svg:x1="6.555cm" svg:y1="1.758cm" svg:x2="5.805cm" svg:y2="1.758cm"><text:p/></draw:line><draw:line draw:style-name="gr4" draw:text-style-name="P257" svg:x1="7.558cm" svg:y1="1.757cm" svg:x2="7.558cm" svg:y2="1.524cm"><text:p/></draw:line><draw:line draw:style-name="gr4" draw:text-style-name="P257" svg:x1="8.059cm" svg:y1="1.524cm" svg:x2="7.558cm" svg:y2="1.524cm"><text:p/></draw:line><draw:line draw:style-name="gr4" draw:text-style-name="P257" svg:x1="9.555cm" svg:y1="1.524cm" svg:x2="9.555cm" svg:y2="1.757cm"><text:p/></draw:line><draw:line draw:style-name="gr4" draw:text-style-name="P257" svg:x1="5.059cm" svg:y1="1.524cm" svg:x2="5.059cm" svg:y2="1.757cm"><text:p/></draw:line><draw:line draw:style-name="gr4" draw:text-style-name="P257" svg:x1="6.558cm" svg:y1="1.524cm" svg:x2="6.558cm" svg:y2="1.757cm"><text:p/></draw:line><draw:polyline draw:style-name="gr4" draw:text-style-name="P257" svg:width="0cm" svg:height="0cm" svg:x="4.558cm" svg:y="1.758cm" svg:viewBox="0 0 0 0" draw:points="0,0"><text:p/></draw:polyline><draw:line draw:style-name="gr11" draw:text-style-name="P257" svg:x1="2.055cm" svg:y1="3.159cm" svg:x2="9.806cm" svg:y2="3.159cm"><text:p/></draw:line><draw:frame draw:style-name="gr19" draw:text-style-name="P259" svg:width="1.251cm" svg:height="0.618cm" svg:x="1.058cm" svg:y="2.692cm"><draw:text-box><text:p text:style-name="P258"><text:span text:style-name="T32">RST</text:span></text:p></draw:text-box></draw:frame><draw:line draw:style-name="gr11" draw:text-style-name="P257" svg:x1="10.807cm" svg:y1="3.159cm" svg:x2="10.056cm" svg:y2="3.159cm"><text:p/></draw:line><draw:line draw:style-name="gr5" draw:text-style-name="P257" svg:x1="10.557cm" svg:y1="3.627cm" svg:x2="12.056cm" svg:y2="3.627cm"><text:p/></draw:line><draw:line draw:style-name="gr12" draw:text-style-name="P257" svg:x1="6.558cm" svg:y1="4.325cm" svg:x2="6.558cm" svg:y2="4.558cm"><text:p/></draw:line><draw:line draw:style-name="gr12" draw:text-style-name="P257" svg:x1="7.558cm" svg:y1="4.325cm" svg:x2="6.558cm" svg:y2="4.325cm"><text:p/></draw:line><draw:line draw:style-name="gr12" draw:text-style-name="P257" svg:x1="9.057cm" svg:y1="4.56cm" svg:x2="7.558cm" svg:y2="4.56cm"><text:p/></draw:line><draw:line draw:style-name="gr12" draw:text-style-name="P257" svg:x1="10.557cm" svg:y1="4.325cm" svg:x2="10.557cm" svg:y2="4.558cm"><text:p/></draw:line><draw:line draw:style-name="gr14" draw:text-style-name="P257" svg:x1="5.059cm" svg:y1="-0.109cm" svg:x2="5.059cm" svg:y2="6.892cm"><text:p/></draw:line><draw:line draw:style-name="gr14" draw:text-style-name="P257" svg:x1="7.558cm" svg:y1="-0.109cm" svg:x2="7.558cm" svg:y2="6.892cm"><text:p/></draw:line><draw:line draw:style-name="gr5" draw:text-style-name="P257" svg:x1="10.557cm" svg:y1="3.627cm" svg:x2="10.557cm" svg:y2="3.859cm"><text:p/></draw:line><draw:line draw:style-name="gr12" draw:text-style-name="P257" svg:x1="10.809cm" svg:y1="4.558cm" svg:x2="10.809cm" svg:y2="4.325cm"><text:p/></draw:line><draw:line draw:style-name="gr13" draw:text-style-name="P257" svg:x1="2.055cm" svg:y1="0.358cm" svg:x2="2.805cm" svg:y2="0.358cm"><text:p/></draw:line><draw:line draw:style-name="gr13" draw:text-style-name="P257" svg:x1="2.808cm" svg:y1="0.127cm" svg:x2="2.808cm" svg:y2="0.359cm"><text:p/></draw:line><draw:line draw:style-name="gr13" draw:text-style-name="P257" svg:x1="2.808cm" svg:y1="0.127cm" svg:x2="4.309cm" svg:y2="0.127cm"><text:p/></draw:line><draw:line draw:style-name="gr13" draw:text-style-name="P257" svg:x1="4.309cm" svg:y1="0.359cm" svg:x2="4.309cm" svg:y2="0.127cm"><text:p/></draw:line><draw:line draw:style-name="gr13" draw:text-style-name="P257" svg:x1="6.306cm" svg:y1="0.127cm" svg:x2="6.306cm" svg:y2="0.359cm"><text:p/></draw:line><draw:frame draw:style-name="gr20" draw:text-style-name="P259" svg:width="0.997cm" svg:height="0.618cm" svg:x="1.058cm" svg:y="-0.109cm"><draw:text-box><text:p text:style-name="P258"><text:span text:style-name="T32">D0</text:span></text:p></draw:text-box></draw:frame><draw:line draw:style-name="gr13" draw:text-style-name="P257" svg:x1="6.306cm" svg:y1="0.127cm" svg:x2="12.056cm" svg:y2="0.127cm"><text:p/></draw:line><draw:line draw:style-name="gr13" draw:text-style-name="P257" svg:x1="4.309cm" svg:y1="0.358cm" svg:x2="6.307cm" svg:y2="0.358cm"><text:p/></draw:line><draw:line draw:style-name="gr4" draw:text-style-name="P257" svg:x1="3.055cm" svg:y1="1.757cm" svg:x2="3.055cm" svg:y2="1.524cm"><text:p/></draw:line><draw:line draw:style-name="gr4" draw:text-style-name="P257" svg:x1="3.554cm" svg:y1="1.524cm" svg:x2="3.055cm" svg:y2="1.524cm"><text:p/></draw:line><draw:line draw:style-name="gr4" draw:text-style-name="P257" svg:x1="3.556cm" svg:y1="1.524cm" svg:x2="3.556cm" svg:y2="1.757cm"><text:p/></draw:line><draw:line draw:style-name="gr4" draw:text-style-name="P257" svg:x1="4.057cm" svg:y1="1.758cm" svg:x2="3.556cm" svg:y2="1.758cm"><text:p/></draw:line><draw:line draw:style-name="gr4" draw:text-style-name="P257" svg:x1="2.055cm" svg:y1="1.758cm" svg:x2="3.055cm" svg:y2="1.758cm"><text:p/></draw:line><draw:frame draw:style-name="gr20" draw:text-style-name="P259" svg:width="1.251cm" svg:height="0.618cm" svg:x="1.058cm" svg:y="1.29cm"><draw:text-box><text:p text:style-name="P258"><text:span text:style-name="T32">CLK</text:span></text:p></draw:text-box></draw:frame><draw:line draw:style-name="gr4" draw:text-style-name="P257" svg:x1="4.057cm" svg:y1="1.524cm" svg:x2="4.057cm" svg:y2="1.757cm"><text:p/></draw:line><draw:line draw:style-name="gr4" draw:text-style-name="P257" svg:x1="4.556cm" svg:y1="1.524cm" svg:x2="4.057cm" svg:y2="1.524cm"><text:p/></draw:line><draw:line draw:style-name="gr4" draw:text-style-name="P257" svg:x1="5.805cm" svg:y1="1.524cm" svg:x2="5.805cm" svg:y2="1.757cm"><text:p/></draw:line><draw:line draw:style-name="gr4" draw:text-style-name="P257" svg:x1="5.809cm" svg:y1="1.524cm" svg:x2="5.059cm" svg:y2="1.524cm"><text:p/></draw:line><draw:line draw:style-name="gr4" draw:text-style-name="P257" svg:x1="7.059cm" svg:y1="1.757cm" svg:x2="7.059cm" svg:y2="1.524cm"><text:p/></draw:line><draw:line draw:style-name="gr4" draw:text-style-name="P257" svg:x1="9.057cm" svg:y1="1.758cm" svg:x2="8.059cm" svg:y2="1.758cm"><text:p/></draw:line><draw:line draw:style-name="gr4" draw:text-style-name="P257" svg:x1="8.059cm" svg:y1="1.524cm" svg:x2="8.059cm" svg:y2="1.757cm"><text:p/></draw:line><draw:line draw:style-name="gr4" draw:text-style-name="P257" svg:x1="11.305cm" svg:y1="1.758cm" svg:x2="9.555cm" svg:y2="1.758cm"><text:p/></draw:line><draw:line draw:style-name="gr4" draw:text-style-name="P257" svg:x1="4.558cm" svg:y1="1.524cm" svg:x2="4.558cm" svg:y2="1.757cm"><text:p/></draw:line><draw:line draw:style-name="gr4" draw:text-style-name="P257" svg:x1="7.059cm" svg:y1="1.758cm" svg:x2="7.558cm" svg:y2="1.758cm"><text:p/></draw:line><draw:line draw:style-name="gr11" draw:text-style-name="P257" svg:x1="9.809cm" svg:y1="3.16cm" svg:x2="9.809cm" svg:y2="2.928cm"><text:p/></draw:line><draw:line draw:style-name="gr11" draw:text-style-name="P257" svg:x1="10.058cm" svg:y1="2.928cm" svg:x2="9.809cm" svg:y2="2.928cm"><text:p/></draw:line><draw:line draw:style-name="gr11" draw:text-style-name="P257" svg:x1="2.055cm" svg:y1="3.159cm" svg:x2="9.806cm" svg:y2="3.159cm"><text:p/></draw:line><draw:frame draw:style-name="gr19" draw:text-style-name="P259" svg:width="1.251cm" svg:height="0.618cm" svg:x="1.058cm" svg:y="2.692cm"><draw:text-box><text:p text:style-name="P258"><text:span text:style-name="T32">RST</text:span></text:p></draw:text-box></draw:frame><draw:line draw:style-name="gr11" draw:text-style-name="P257" svg:x1="10.807cm" svg:y1="3.159cm" svg:x2="10.056cm" svg:y2="3.159cm"><text:p/></draw:line><draw:line draw:style-name="gr11" draw:text-style-name="P257" svg:x1="10.056cm" svg:y1="2.928cm" svg:x2="10.056cm" svg:y2="3.16cm"><text:p/></draw:line><draw:line draw:style-name="gr5" draw:text-style-name="P257" svg:x1="10.557cm" svg:y1="3.627cm" svg:x2="12.056cm" svg:y2="3.627cm"><text:p/></draw:line><draw:line draw:style-name="gr5" draw:text-style-name="P257" svg:x1="10.555cm" svg:y1="3.857cm" svg:x2="2.055cm" svg:y2="3.857cm"><text:p/></draw:line><draw:frame draw:style-name="gr20" draw:text-style-name="P259" svg:width="0.997cm" svg:height="0.618cm" svg:x="1.058cm" svg:y="4.091cm"><draw:text-box><text:p text:style-name="P258"><text:span text:style-name="T32">Q0</text:span></text:p></draw:text-box></draw:frame><draw:frame draw:style-name="gr19" draw:text-style-name="P259" svg:width="1.251cm" svg:height="0.618cm" svg:x="1.058cm" svg:y="3.392cm"><draw:text-box><text:p text:style-name="P258"><text:span text:style-name="T32">SET</text:span></text:p></draw:text-box></draw:frame><draw:line draw:style-name="gr12" draw:text-style-name="P257" svg:x1="2.055cm" svg:y1="4.56cm" svg:x2="3.055cm" svg:y2="4.56cm"><text:p/></draw:line><draw:line draw:style-name="gr12" draw:text-style-name="P257" svg:x1="3.055cm" svg:y1="4.325cm" svg:x2="3.055cm" svg:y2="4.558cm"><text:p/></draw:line><draw:line draw:style-name="gr12" draw:text-style-name="P257" svg:x1="5.055cm" svg:y1="4.325cm" svg:x2="3.055cm" svg:y2="4.325cm"><text:p/></draw:line><draw:line draw:style-name="gr12" draw:text-style-name="P257" svg:x1="5.059cm" svg:y1="4.325cm" svg:x2="5.059cm" svg:y2="4.558cm"><text:p/></draw:line><draw:line draw:style-name="gr12" draw:text-style-name="P257" svg:x1="6.558cm" svg:y1="4.56cm" svg:x2="5.059cm" svg:y2="4.56cm"><text:p/></draw:line><draw:line draw:style-name="gr12" draw:text-style-name="P257" svg:x1="9.057cm" svg:y1="4.56cm" svg:x2="7.558cm" svg:y2="4.56cm"><text:p/></draw:line><draw:line draw:style-name="gr14" draw:text-style-name="P257" svg:x1="3.055cm" svg:y1="-0.109cm" svg:x2="3.055cm" svg:y2="6.892cm"><text:p/></draw:line><draw:line draw:style-name="gr14" draw:text-style-name="P257" svg:x1="4.057cm" svg:y1="-0.109cm" svg:x2="4.057cm" svg:y2="6.892cm"><text:p/></draw:line><draw:line draw:style-name="gr14" draw:text-style-name="P257" svg:x1="6.558cm" svg:y1="-0.109cm" svg:x2="6.558cm" svg:y2="6.892cm"><text:p/></draw:line><draw:line draw:style-name="gr14" draw:text-style-name="P257" svg:x1="11.557cm" svg:y1="-0.109cm" svg:x2="11.557cm" svg:y2="6.892cm"><text:p/></draw:line><draw:line draw:style-name="gr11" draw:text-style-name="P257" svg:x1="10.809cm" svg:y1="3.16cm" svg:x2="10.809cm" svg:y2="2.928cm"><text:p/></draw:line><draw:line draw:style-name="gr11" draw:text-style-name="P257" svg:x1="12.058cm" svg:y1="2.928cm" svg:x2="10.809cm" svg:y2="2.928cm"><text:p/></draw:line><draw:line draw:style-name="gr4" draw:text-style-name="P257" svg:x1="11.308cm" svg:y1="1.524cm" svg:x2="11.308cm" svg:y2="1.757cm"><text:p/></draw:line><draw:line draw:style-name="gr4" draw:text-style-name="P257" svg:x1="12.058cm" svg:y1="1.524cm" svg:x2="11.308cm" svg:y2="1.524cm"><text:p/></draw:line><draw:line draw:style-name="gr12" draw:text-style-name="P257" svg:x1="10.807cm" svg:y1="4.325cm" svg:x2="10.557cm" svg:y2="4.325cm"><text:p/></draw:line><draw:line draw:style-name="gr12" draw:text-style-name="P257" svg:x1="7.558cm" svg:y1="4.325cm" svg:x2="7.558cm" svg:y2="4.558cm"><text:p/></draw:line><draw:line draw:style-name="gr12" draw:text-style-name="P257" svg:x1="11.807cm" svg:y1="4.56cm" svg:x2="10.809cm" svg:y2="4.56cm"><text:p/></draw:line><draw:line draw:style-name="gr4" draw:text-style-name="P257" svg:x1="6.558cm" svg:y1="1.524cm" svg:x2="7.059cm" svg:y2="1.524cm"><text:p/></draw:line><draw:line draw:style-name="gr4" draw:text-style-name="P257" svg:x1="9.555cm" svg:y1="1.524cm" svg:x2="9.054cm" svg:y2="1.524cm"><text:p/></draw:line><draw:line draw:style-name="gr4" draw:text-style-name="P257" svg:x1="9.054cm" svg:y1="1.757cm" svg:x2="9.054cm" svg:y2="1.524cm"><text:p/></draw:line><draw:line draw:style-name="gr14" draw:text-style-name="P257" svg:x1="9.054cm" svg:y1="-0.109cm" svg:x2="9.054cm" svg:y2="6.892cm"><text:p/></draw:line><draw:line draw:style-name="gr12" draw:text-style-name="P257" svg:x1="6.558cm" svg:y1="5.027cm" svg:x2="6.558cm" svg:y2="5.26cm"><text:p/></draw:line><draw:line draw:style-name="gr12" draw:text-style-name="P257" svg:x1="7.558cm" svg:y1="5.26cm" svg:x2="6.558cm" svg:y2="5.26cm"><text:p/></draw:line><draw:line draw:style-name="gr12" draw:text-style-name="P257" svg:x1="9.809cm" svg:y1="5.027cm" svg:x2="7.558cm" svg:y2="5.027cm"><text:p/></draw:line><draw:frame draw:style-name="gr19" draw:text-style-name="P259" svg:width="0.997cm" svg:height="0.618cm" svg:x="1.058cm" svg:y="4.791cm"><draw:text-box><text:p text:style-name="P258"><text:span text:style-name="T32">Q1</text:span></text:p></draw:text-box></draw:frame><draw:line draw:style-name="gr12" draw:text-style-name="P257" svg:x1="2.055cm" svg:y1="5.26cm" svg:x2="4.055cm" svg:y2="5.26cm"><text:p/></draw:line><draw:line draw:style-name="gr12" draw:text-style-name="P257" svg:x1="4.057cm" svg:y1="5.027cm" svg:x2="4.057cm" svg:y2="5.26cm"><text:p/></draw:line><draw:line draw:style-name="gr12" draw:text-style-name="P257" svg:x1="6.556cm" svg:y1="5.027cm" svg:x2="4.057cm" svg:y2="5.027cm"><text:p/></draw:line><draw:line draw:style-name="gr12" draw:text-style-name="P257" svg:x1="7.558cm" svg:y1="5.027cm" svg:x2="7.558cm" svg:y2="5.26cm"><text:p/></draw:line><draw:line draw:style-name="gr12" draw:text-style-name="P257" svg:x1="10.809cm" svg:y1="5.027cm" svg:x2="10.809cm" svg:y2="5.26cm"><text:p/></draw:line><draw:line draw:style-name="gr12" draw:text-style-name="P257" svg:x1="10.807cm" svg:y1="5.027cm" svg:x2="10.557cm" svg:y2="5.027cm"><text:p/></draw:line><draw:line draw:style-name="gr12" draw:text-style-name="P257" svg:x1="9.809cm" svg:y1="5.027cm" svg:x2="9.809cm" svg:y2="5.26cm"><text:p/></draw:line><draw:line draw:style-name="gr12" draw:text-style-name="P257" svg:x1="10.559cm" svg:y1="5.26cm" svg:x2="9.809cm" svg:y2="5.26cm"><text:p/></draw:line><draw:line draw:style-name="gr12" draw:text-style-name="P257" svg:x1="10.557cm" svg:y1="5.027cm" svg:x2="10.557cm" svg:y2="5.26cm"><text:p/></draw:line><draw:line draw:style-name="gr12" draw:text-style-name="P257" svg:x1="12.058cm" svg:y1="5.26cm" svg:x2="10.809cm" svg:y2="5.26cm"><text:p/></draw:line><draw:line draw:style-name="gr12" draw:text-style-name="P257" svg:x1="10.557cm" svg:y1="5.724cm" svg:x2="10.557cm" svg:y2="5.957cm"><text:p/></draw:line><draw:line draw:style-name="gr12" draw:text-style-name="P257" svg:x1="9.058cm" svg:y1="5.724cm" svg:x2="5.059cm" svg:y2="5.724cm"><text:p/></draw:line><draw:line draw:style-name="gr12" draw:text-style-name="P257" svg:x1="9.054cm" svg:y1="4.325cm" svg:x2="9.805cm" svg:y2="4.325cm"><text:p/></draw:line><draw:line draw:style-name="gr12" draw:text-style-name="P257" svg:x1="9.054cm" svg:y1="5.962cm" svg:x2="10.555cm" svg:y2="5.962cm"><text:p/></draw:line><draw:line draw:style-name="gr12" draw:text-style-name="P257" svg:x1="12.058cm" svg:y1="5.962cm" svg:x2="10.809cm" svg:y2="5.962cm"><text:p/></draw:line><draw:frame draw:style-name="gr19" draw:text-style-name="P259" svg:width="0.997cm" svg:height="0.618cm" svg:x="1.058cm" svg:y="5.493cm"><draw:text-box><text:p text:style-name="P258"><text:span text:style-name="T32">Q2</text:span></text:p></draw:text-box></draw:frame><draw:line draw:style-name="gr12" draw:text-style-name="P257" svg:x1="2.055cm" svg:y1="5.962cm" svg:x2="5.055cm" svg:y2="5.962cm"><text:p/></draw:line><draw:line draw:style-name="gr12" draw:text-style-name="P257" svg:x1="5.059cm" svg:y1="5.724cm" svg:x2="5.059cm" svg:y2="5.957cm"><text:p/></draw:line><draw:line draw:style-name="gr12" draw:text-style-name="P257" svg:x1="9.054cm" svg:y1="4.325cm" svg:x2="9.054cm" svg:y2="4.558cm"><text:p/></draw:line><draw:line draw:style-name="gr12" draw:text-style-name="P257" svg:x1="9.054cm" svg:y1="5.724cm" svg:x2="9.054cm" svg:y2="5.957cm"><text:p/></draw:line><draw:line draw:style-name="gr12" draw:text-style-name="P257" svg:x1="10.809cm" svg:y1="5.724cm" svg:x2="10.809cm" svg:y2="5.957cm"><text:p/></draw:line><draw:line draw:style-name="gr12" draw:text-style-name="P257" svg:x1="10.807cm" svg:y1="5.724cm" svg:x2="10.557cm" svg:y2="5.724cm"><text:p/></draw:line><draw:frame draw:style-name="gr20" draw:text-style-name="P259" svg:width="0.997cm" svg:height="0.618cm" svg:x="1.058cm" svg:y="6.192cm"><draw:text-box><text:p text:style-name="P258"><text:span text:style-name="T32">Q3</text:span></text:p></draw:text-box></draw:frame><draw:line draw:style-name="gr12" draw:text-style-name="P257" svg:x1="2.055cm" svg:y1="6.664cm" svg:x2="6.555cm" svg:y2="6.664cm"><text:p/></draw:line><draw:line draw:style-name="gr12" draw:text-style-name="P257" svg:x1="6.558cm" svg:y1="6.425cm" svg:x2="6.558cm" svg:y2="6.657cm"><text:p/></draw:line><draw:line draw:style-name="gr12" draw:text-style-name="P257" svg:x1="7.558cm" svg:y1="6.425cm" svg:x2="6.558cm" svg:y2="6.425cm"><text:p/></draw:line><draw:line draw:style-name="gr12" draw:text-style-name="P257" svg:x1="9.054cm" svg:y1="6.425cm" svg:x2="9.054cm" svg:y2="6.657cm"><text:p/></draw:line><draw:line draw:style-name="gr12" draw:text-style-name="P257" svg:x1="9.805cm" svg:y1="6.425cm" svg:x2="9.054cm" svg:y2="6.425cm"><text:p/></draw:line><draw:line draw:style-name="gr12" draw:text-style-name="P257" svg:x1="10.809cm" svg:y1="6.425cm" svg:x2="10.809cm" svg:y2="6.657cm"><text:p/></draw:line><draw:line draw:style-name="gr12" draw:text-style-name="P257" svg:x1="10.807cm" svg:y1="6.425cm" svg:x2="10.557cm" svg:y2="6.425cm"><text:p/></draw:line><draw:line draw:style-name="gr12" draw:text-style-name="P257" svg:x1="10.559cm" svg:y1="6.664cm" svg:x2="9.809cm" svg:y2="6.664cm"><text:p/></draw:line><draw:line draw:style-name="gr12" draw:text-style-name="P257" svg:x1="10.557cm" svg:y1="6.425cm" svg:x2="10.557cm" svg:y2="6.657cm"><text:p/></draw:line><draw:line draw:style-name="gr12" draw:text-style-name="P257" svg:x1="12.058cm" svg:y1="6.664cm" svg:x2="10.809cm" svg:y2="6.664cm"><text:p/></draw:line><draw:line draw:style-name="gr2" draw:text-style-name="P257" svg:x1="2.055cm" svg:y1="2.457cm" svg:x2="6.805cm" svg:y2="2.457cm"><text:p/></draw:line><draw:line draw:style-name="gr2" draw:text-style-name="P257" svg:x1="6.807cm" svg:y1="2.226cm" svg:x2="6.807cm" svg:y2="2.459cm"><text:p/></draw:line><draw:line draw:style-name="gr2" draw:text-style-name="P257" svg:x1="6.807cm" svg:y1="2.226cm" svg:x2="12.056cm" svg:y2="2.226cm"><text:p/></draw:line><draw:frame draw:style-name="gr20" draw:text-style-name="P259" svg:width="0.997cm" svg:height="0.618cm" svg:x="1.058cm" svg:y="1.992cm"><draw:text-box><text:p text:style-name="P258"><text:span text:style-name="T32">DN</text:span></text:p></draw:text-box></draw:frame><draw:line draw:style-name="gr12" draw:text-style-name="P257" svg:x1="2.055cm" svg:y1="1.06cm" svg:x2="7.805cm" svg:y2="1.06cm"><text:p/></draw:line><draw:line draw:style-name="gr12" draw:text-style-name="P257" svg:x1="7.807cm" svg:y1="0.825cm" svg:x2="7.807cm" svg:y2="1.058cm"><text:p/></draw:line><draw:line draw:style-name="gr12" draw:text-style-name="P257" svg:x1="9.807cm" svg:y1="0.825cm" svg:x2="7.807cm" svg:y2="0.825cm"><text:p/></draw:line><draw:line draw:style-name="gr12" draw:text-style-name="P257" svg:x1="9.809cm" svg:y1="0.825cm" svg:x2="9.809cm" svg:y2="1.058cm"><text:p/></draw:line><draw:line draw:style-name="gr12" draw:text-style-name="P257" svg:x1="12.058cm" svg:y1="1.06cm" svg:x2="9.809cm" svg:y2="1.06cm"><text:p/></draw:line><draw:line draw:style-name="gr12" draw:text-style-name="P257" svg:x1="7.558cm" svg:y1="6.425cm" svg:x2="7.558cm" svg:y2="6.657cm"><text:p/></draw:line><draw:line draw:style-name="gr12" draw:text-style-name="P257" svg:x1="9.057cm" svg:y1="6.664cm" svg:x2="7.558cm" svg:y2="6.664cm"><text:p/></draw:line><draw:line draw:style-name="gr12" draw:text-style-name="P257" svg:x1="9.809cm" svg:y1="6.425cm" svg:x2="9.809cm" svg:y2="6.657cm"><text:p/></draw:line><draw:line draw:style-name="gr12" draw:text-style-name="P257" svg:x1="9.809cm" svg:y1="4.558cm" svg:x2="9.809cm" svg:y2="4.325cm"><text:p/></draw:line><draw:line draw:style-name="gr12" draw:text-style-name="P257" svg:x1="9.809cm" svg:y1="4.56cm" svg:x2="10.559cm" svg:y2="4.56cm"><text:p/></draw:line></draw:g></text:p>
      <text:list xml:id="list38459842" text:continue-numbering="true" text:style-name="L1">
        <text:list-item>
          <text:list>
            <text:list-item>
              <text:h text:style-name="P216" text:outline-level="2"><text:alphabetical-index-mark-start text:id="IMark225902392"/>SHR_8PLE<text:alphabetical-index-mark-end text:id="IMark225902392"/></text:h>
            </text:list-item>
          </text:list>
        </text:list-item>
      </text:list>
      <text:p text:style-name="P69">Type<text:tab/>Funktionsbaustein</text:p>
      <text:p text:style-name="P66"><text:span text:style-name="T15">Input</text:span><text:span text:style-name="T14"><text:tab/>DIN : BOOL (Shift Data </text:span><text:span text:style-name="T15">Input</text:span><text:span text:style-name="T14">)</text:span></text:p>
      <text:p text:style-name="P66"><text:span text:style-name="T14"><text:tab/>DLOAD : Byte (Datenwort zum Parallel </text:span><text:span text:style-name="T15">Load</text:span><text:span text:style-name="T14">)</text:span></text:p>
      <text:p text:style-name="P69"><text:tab/>CLK : BOOL (Takteingang)</text:p>
      <text:p text:style-name="P66"><text:span text:style-name="T14"><text:tab/>UP : BOOL (Steuereingang </text:span>Up<text:span text:style-name="T14"> / </text:span><text:span text:style-name="T15">Down,</text:span><text:span text:style-name="T14"> TRUE = </text:span><text:span text:style-name="T15">Up</text:span><text:span text:style-name="T14">)</text:span></text:p>
      <text:p text:style-name="P69"><text:soft-page-break/><text:tab/>LOAD : BOOL (Steuereingang zum Laden des Registers)</text:p>
      <text:p text:style-name="P69"><text:tab/>RST : BOOL (asynchroner Reset)</text:p>
      <text:p text:style-name="P66"><draw:frame draw:style-name="fr3" draw:name="Grafik127" text:anchor-type="paragraph" svg:x="1.099cm" svg:y="0.628cm" svg:width="2.731cm" svg:height="3.54cm" draw:z-index="97"><draw:image xlink:href="Pictures/10000000000000CE0000010C48456A00.png" xlink:type="simple" xlink:show="embed" xlink:actuate="onLoad"/></draw:frame><text:span text:style-name="T21">Output<text:tab/>DOUT : BOOL (Data </text:span><text:span text:style-name="T16">Out</text:span><text:span text:style-name="T21">)</text:span></text:p>
      <text:p text:style-name="P66"><text:span text:style-name="T21"><text:line-break/>SHR_8PLE ist ein 8 Bit Schieberegister mit Parallel </text:span><text:span text:style-name="T16">Load</text:span><text:span text:style-name="T21"> und asynchronem Reset. Die Schieberichtung kann mit dem Eingang UP umgekehrt werden. Wenn UP=1, wird Bit 7 zuerst auf DOUT geschoben und wenn UP=0, wird Bit0 zuerst an DOUT geschoben. Für U</text:span><text:span text:style-name="T16">p-</text:span><text:span text:style-name="T21">Shift wird Bit 0 mit DIN geladen und bei D</text:span><text:span text:style-name="T16">own-</text:span><text:span text:style-name="T21">Shift wird Bit 7 mit DIN geladen. Am Eingang DLOAD liegt ein Byte Daten an, das bei Parallel </text:span><text:span text:style-name="T16">Load</text:span><text:span text:style-name="T21"> (</text:span><text:span text:style-name="T16">LOAD</text:span><text:span text:style-name="T21">=1 und steigende Flanke an </text:span><text:span text:style-name="T16">CLK</text:span><text:span text:style-name="T21">) ins interne Register geladen wird. Im Falle von Parallel </text:span><text:span text:style-name="T16">Load</text:span><text:span text:style-name="T21"> wird zuerst ein Shift durchgeführt und anschließend das Register geladen. Ein RST kann jederzeit asynchron das Register löschen. Eine eingehende Beschreibung eines Schieberegisters finden Sie beim Modul SHR_4E.</text:span></text:p>
      <text:list xml:id="list38458573" text:continue-numbering="true" text:style-name="L1">
        <text:list-item>
          <text:list>
            <text:list-item>
              <text:h text:style-name="P216" text:outline-level="2"><text:alphabetical-index-mark-start text:id="IMark225902392"/>SHR_8UDE<text:alphabetical-index-mark-end text:id="IMark225902392"/></text:h>
            </text:list-item>
          </text:list>
        </text:list-item>
      </text:list>
      <text:p text:style-name="P69">Type<text:tab/>Funktionsbaustein</text:p>
      <text:p text:style-name="P66"><text:span text:style-name="T15">Input</text:span><text:span text:style-name="T14"><text:tab/>SET : BOOL (asynchroner Set)</text:span></text:p>
      <text:p text:style-name="P66"><text:span text:style-name="T14"><text:tab/>D0 : BOOL (Data </text:span><text:span text:style-name="T15">Input</text:span><text:span text:style-name="T14"> Bit 0)</text:span></text:p>
      <text:p text:style-name="P66"><text:span text:style-name="T14"><text:tab/>D3 : BOOL (Data </text:span><text:span text:style-name="T15">Input</text:span><text:span text:style-name="T14"> Bit 3)</text:span></text:p>
      <text:p text:style-name="P69"><text:tab/>CLK : BOOL (Takteingang)</text:p>
      <text:p text:style-name="P66"><text:span text:style-name="T14"><text:tab/>DN : BOOL (Steuereingang </text:span><text:span text:style-name="T15">Up</text:span><text:span text:style-name="T14"> / </text:span><text:span text:style-name="T15">Down,</text:span><text:span text:style-name="T14"> TRUE = </text:span><text:span text:style-name="T15">Down</text:span><text:span text:style-name="T14">)</text:span></text:p>
      <text:p text:style-name="P69"><text:tab/>RST : BOOL (asynchroner Reset)</text:p>
      <text:p text:style-name="P66"><draw:frame draw:style-name="fr3" draw:name="Grafik128" text:anchor-type="paragraph" svg:x="1.129cm" svg:y="0.679cm" svg:width="2.731cm" svg:height="4.44cm" draw:z-index="98"><draw:image xlink:href="Pictures/10000000000000CE000001505EE5F723.png" xlink:type="simple" xlink:show="embed" xlink:actuate="onLoad"/></draw:frame><text:span text:style-name="T21">Output<text:tab/>Q0 .. Q7 : BOOL (Data </text:span><text:span text:style-name="T16">Out</text:span><text:span text:style-name="T21">)</text:span></text:p>
      <text:p text:style-name="P66"><text:soft-page-break/><text:span text:style-name="T21"><text:line-break/>SHR_8UDE ist ein 8 Bit Schieberegister mit U</text:span><text:span text:style-name="T16">p</text:span><text:span text:style-name="T21"> / D</text:span><text:span text:style-name="T16">own</text:span><text:span text:style-name="T21"> Schieberichtung. Mit einer steigenden Flanke an CLK werden die Daten Q0 nach Q7 um jeweils einen Schritt geschoben. Q0 wird anschließend mit D0 geladen. Die Schieberichtung kann mit einem TRUE am Eingang DN umgekehrt werden. Dann wird D7 nach Q6, Q5, Q4, Q3, Q2, Q1, Q0 geschoben und Q7 mit D7 geladen. Mit einem TRUE am Set-Eingang werden alle Ausgänge (Q0 .. Q3) auf TRUE gesetzt und mit RST werden alle Ausgänge auf FALSE gesetzt. Weitergehende Erläuterungen zu Schieberegistern finden Sie unter SHR_4E und speziell beim Modul SHR_4UDE, welches die gleiche Funktion für 4 Bits <text:s/>wie SHR_8UDE für 8 Bits erfüllt.</text:span></text:p>
      <text:list xml:id="list38473997" text:continue-numbering="true" text:style-name="L1">
        <text:list-item>
          <text:list>
            <text:list-item>
              <text:h text:style-name="P216" text:outline-level="2"><text:alphabetical-index-mark-start text:id="IMark225902392"/>STORE_8<text:alphabetical-index-mark-end text:id="IMark225902392"/></text:h>
            </text:list-item>
          </text:list>
        </text:list-item>
      </text:list>
      <text:p text:style-name="P69">Type<text:tab/>Funktionsbaustein</text:p>
      <text:p text:style-name="P66"><text:span text:style-name="T15">Input</text:span><text:span text:style-name="T14"><text:tab/>SET : BOOL (asynchroner Set)</text:span></text:p>
      <text:p text:style-name="P66"><text:span text:style-name="T14"><text:tab/>D0..D7 : BOOL (Data </text:span><text:span text:style-name="T15">Input</text:span><text:span text:style-name="T14"> Bit 0..7)</text:span></text:p>
      <text:p text:style-name="P66"><text:span text:style-name="T14"><text:tab/></text:span><text:span text:style-name="T21">CLR : BOOL (Schrittweise Rücksetzen Eingang)</text:span></text:p>
      <text:p text:style-name="P183"><text:tab/>RST : BOOL (Asynchroner Set Eingang)</text:p>
      <text:p text:style-name="P183"><draw:frame draw:style-name="fr3" draw:name="Grafik420" text:anchor-type="paragraph" svg:x="1.044cm" svg:y="0.663cm" svg:width="2.499cm" svg:height="5.091cm" draw:z-index="402"><draw:image xlink:href="Pictures/10000000000000BD00000181789B3A92.png" xlink:type="simple" xlink:show="embed" xlink:actuate="onLoad"/></draw:frame>Output<text:tab/>Q0..Q7 : BOOL (Ereignis Ausgänge)</text:p>
      <text:p text:style-name="P183"><text:soft-page-break/>STOTRE_8 ist ein 8-fach Ereignisspeicher. ein TRUE an einem der Eingänge D0..D7 setzt den entsprechenden Ausgang Q0..Q7. Die Asynchronen Set und Reset Eingänge (SET, RST) setzen alle Ausgänge gleichzeitig auf TRUE oder FALSE. ist während eines Resets einer der Eingänge TRUE wird nach dem Reset der entsprechende Ausgang sofort wieder auf TRUE gesetzt. Falls flankengetriggerte Eingänge gewünscht werden, so sind vor dem Baustein STRORE_8 TP_R Bausteine einzusetzen. Dies erlaubt es dem Anwender sowohl flanken- wie auch zustands- getriggerte Eingänge gleichzeitig zu verwenden. Der Eingang CLR löscht mit einer steigenden Flanke an CLR immer nur ein Ereignis, beginnend mit dem am höchsten priorisierten Ausgang der gerade TRUE ist. <text:s/>Wird mit CLR ein Ausgang Q gelöscht dessen Eingang D noch TRUE ist so wird der Ausgang D mit dem nächsten Zyklus wieder auf TRUE gesetzt.</text:p>
      <text:list xml:id="list38457342" text:continue-numbering="true" text:style-name="L1">
        <text:list-item>
          <text:list>
            <text:list-item>
              <text:h text:style-name="P216" text:outline-level="2"><text:alphabetical-index-mark-start text:id="IMark225902392"/>TOGGLE<text:alphabetical-index-mark-end text:id="IMark225902392"/></text:h>
            </text:list-item>
          </text:list>
        </text:list-item>
      </text:list>
      <text:p text:style-name="P69">Type<text:tab/>Funktionsbaustein</text:p>
      <text:p text:style-name="P66"><text:span text:style-name="T15">Input</text:span><text:span text:style-name="T14"><text:tab/>CLK: BOOL (Takteingang)</text:span></text:p>
      <text:p text:style-name="P69"><text:tab/>RST : BOOL (asynchroner Reset)</text:p>
      <text:p text:style-name="P73"><draw:frame draw:style-name="fr3" draw:name="Grafik315" text:anchor-type="paragraph" svg:x="1.062cm" svg:y="1.037cm" svg:width="2.731cm" svg:height="1.79cm" draw:z-index="274"><draw:image xlink:href="Pictures/10000000000000AC00000071DA8A4843.png" xlink:type="simple" xlink:show="embed" xlink:actuate="onLoad"/></draw:frame>Output<text:tab/>Q : BOOL (Ausgang)</text:p>
      <text:p text:style-name="P2"><text:line-break/>TOGGLE ist ein <text:span text:style-name="T11">flankengetriggertes</text:span> Toggle <text:span text:style-name="T12">Flop</text:span>-Flop mit asynchronem Reset-Eingang. Das TOGGLE <text:span text:style-name="T2">Flip</text:span>-Flop invertiert den Ausgang Q bei einer steigenden Flanke von CLK. Der Ausgang ändert bei jeder steigenden Flanke von CLK seinen Zustand.</text:p>
      <text:list xml:id="list38471204" text:continue-numbering="true" text:style-name="L1">
        <text:list-item>
          <text:h text:style-name="P210" text:outline-level="1">Signalgeneratoren</text:h>
          <text:list>
            <text:list-item>
              <text:h text:style-name="P216" text:outline-level="2"><text:alphabetical-index-mark-start text:id="IMark225902392"/>_RMP_B<text:alphabetical-index-mark-end text:id="IMark225902392"/></text:h>
            </text:list-item>
          </text:list>
        </text:list-item>
      </text:list>
      <text:p text:style-name="P69">Type<text:tab/>Funktionsbaustein</text:p>
      <text:p text:style-name="P66"><text:span text:style-name="T15">Input</text:span><text:span text:style-name="T14"><text:tab/>DIR : BOOL (</text:span>Richtung, TRUE bedeutet Aufwärts<text:span text:style-name="T14">)</text:span></text:p>
      <text:p text:style-name="P66"><text:span text:style-name="T14"><text:tab/>E : BOOL (</text:span><text:span text:style-name="T15">Enable</text:span><text:span text:style-name="T14"> Eingang)</text:span></text:p>
      <text:p text:style-name="P69"><text:tab/>TR : TIME (Zeit zum Durchlauf einer vollen Rampe)</text:p>
      <text:p text:style-name="P73"><draw:frame draw:style-name="fr3" draw:name="Grafik716" text:anchor-type="paragraph" svg:x="1.046cm" svg:y="0.688cm" svg:width="2.9cm" svg:height="2.311cm" draw:z-index="805"><draw:image xlink:href="Pictures/10000000000000DB000000AFF2800E17.png" xlink:type="simple" xlink:show="embed" xlink:actuate="onLoad"/></draw:frame>I/O<text:tab/>RMP : BYTE (Ausgangssignal)</text:p>
      <text:p text:style-name="P182"><text:line-break/>_RMP_B ist ein 8-Bit Rampen-Generator. Die Rampe wird in einer extern deklarierten Variable erzeugt. Die Rampe ist steigend wenn DIR = TRUE und fallend wenn DIR = FALSE. Erreicht die Rampe einen Endwert so bleibt der Generator auf diesem Wert stehen. Mit dem Eingang E kann die Rampe jederzeit angehalten werden, wenn E=TRUE läuft die Rampe. Der Eingang TR gibt an welche Zeit benötigt wird um die Rampe von 0 - 255 oder umgekehrt zu durchlaufen.</text:p>
      <text:list xml:id="list38461947" text:continue-numbering="true" text:style-name="L1">
        <text:list-item>
          <text:list>
            <text:list-item>
              <text:h text:style-name="P216" text:outline-level="2"><text:alphabetical-index-mark-start text:id="IMark225902392"/>_RMP_NEXT<text:alphabetical-index-mark-end text:id="IMark225902392"/></text:h>
            </text:list-item>
          </text:list>
        </text:list-item>
      </text:list>
      <text:p text:style-name="P69">Type<text:tab/>Funktionsbaustein</text:p>
      <text:p text:style-name="P66"><text:span text:style-name="T15">Input</text:span><text:span text:style-name="T14"><text:tab/>E : BOOL (</text:span><text:span text:style-name="T15">Enable</text:span><text:span text:style-name="T14"> Eingang)</text:span></text:p>
      <text:p text:style-name="P179"><text:tab/>IN : BOOL (Eingang)</text:p>
      <text:p text:style-name="P69"><text:tab/>TR : TIME (Anstiegszeit für Rampe 0..255)</text:p>
      <text:p text:style-name="P179"><text:tab/>TF : TIME (Abfallzeit für Rampe 255..0)</text:p>
      <text:p text:style-name="P73">I/O<text:tab/>OUT : Byte (Ausgangssignal)</text:p>
      <text:p text:style-name="P183">OUTPUT<text:tab/>DIR : BOOL (Richtung der Änderung an IN)</text:p>
      <text:p text:style-name="P183"><text:soft-page-break/><text:tab/>UP : BOOL (signalisiert eine steigende Rampe)</text:p>
      <text:p text:style-name="P183"><draw:frame draw:style-name="fr3" draw:name="Grafik752" text:anchor-type="paragraph" svg:x="0.935cm" svg:y="0.667cm" svg:width="2.9cm" svg:height="2.709cm" draw:z-index="806"><draw:image xlink:href="Pictures/10000000000000DB000000CD7953B47C.png" xlink:type="simple" xlink:show="embed" xlink:actuate="onLoad"/></draw:frame><text:tab/>DN : BOOL (signalisiert eine fallende Rampe)</text:p>
      <text:p text:style-name="P183"><text:line-break/>RMP_NEXT folgt am Ausgang OUT dem Eingangssignal IN mit mit durch TR und TF definierten steigenden- oder fallenden- Flanken. Im Gegensatz zu RMP_SOFT läuft die Flanke von RMP_NEXT solange bis sie den Endpunkt über- oder unter-schritten hat und ist deshalb auch für Regelungsaufgaben geeignet. Verändert sich der Wert von IN so wird eine steigende Rampe mit TR oder eine fallende Flanke mit TF am Ausgang OUT gestartet bis der Wert an OUT den Eingangswert von IN über- beziehungsweise unter-schritten hat. Der Ausgang bleibt dann auf diesen Wert stehen. Die Ausgänge UP und DN zeigen an ob gerade eine steigende oder eine fallende Flanke erzeugt wird. Der Ausgang DIR gibt die Richtung der Veränderung an IN an, verändert sich IN nicht bleibt dieser Ausgang auf dem letzten Zustand.</text:p>
      <text:p text:style-name="P183"><draw:frame draw:style-name="fr3" draw:name="Grafik753" text:anchor-type="paragraph" svg:x="1.069cm" svg:y="1.171cm" svg:width="10.7cm" svg:height="7.19cm" draw:z-index="804"><draw:image xlink:href="Pictures/10000000000001DC000001405B38A5F2.png" xlink:type="simple" xlink:show="embed" xlink:actuate="onLoad"/></draw:frame>Die folgende Graphik zeigt den Signalverlauf an OUT bei Änderung des Eingangsignals an IN: </text:p>
      <text:p text:style-name="P183"/>
      <text:p text:style-name="P183"/>
      <text:list xml:id="list38473505" text:continue-numbering="true" text:style-name="L1">
        <text:list-item>
          <text:list>
            <text:list-item>
              <text:h text:style-name="P216" text:outline-level="2"><text:soft-page-break/><text:alphabetical-index-mark-start text:id="IMark225902392"/>_RMP_W<text:alphabetical-index-mark-end text:id="IMark225902392"/></text:h>
            </text:list-item>
          </text:list>
        </text:list-item>
      </text:list>
      <text:p text:style-name="P69">Type<text:tab/>Funktionsbaustein</text:p>
      <text:p text:style-name="P66"><text:span text:style-name="T15">Input</text:span><text:span text:style-name="T14"><text:tab/>DIR : BOOL (</text:span>Richtung, TRUE bedeutet Aufwärts<text:span text:style-name="T14">)</text:span></text:p>
      <text:p text:style-name="P66"><text:span text:style-name="T14"><text:tab/>E : BOOL (</text:span><text:span text:style-name="T15">Enable</text:span><text:span text:style-name="T14"> Eingang)</text:span></text:p>
      <text:p text:style-name="P69"><text:tab/>TR : TIME (Zeit zum Durchlauf einer vollen Rampe)</text:p>
      <text:p text:style-name="P73"><draw:frame draw:style-name="fr3" draw:name="Grafik717" text:anchor-type="paragraph" svg:x="1.046cm" svg:y="0.623cm" svg:width="2.9cm" svg:height="2.311cm" draw:z-index="734"><draw:image xlink:href="Pictures/10000000000000DB000000AFA2E8CE14.png" xlink:type="simple" xlink:show="embed" xlink:actuate="onLoad"/></draw:frame>I/O<text:tab/>RMP : WORD (Ausgangssignal)</text:p>
      <text:p text:style-name="P183"><text:line-break/>_RMP_B ist ein 16-Bit Rampen-Generator. Die Rampe wird in einer extern deklarierten Variable erzeugt. Die Rampe ist steigend wenn DIR = TRUE und fallend wenn DIR = FALSE. Erreicht die Rampe einen Endwert so bleibt der Generator auf diesem Wert stehen. Mit dem Eingang E kann die Rampe jederzeit angehalten werden, wenn E=TRUE läuft die Rampe. Der Eingang TR gibt an welche Zeit benötigt wird um die Rampe von 0 - 65535 oder umgekehrt zu durchlaufen.</text:p>
      <text:list xml:id="list38458513" text:continue-numbering="true" text:style-name="L1">
        <text:list-item>
          <text:list>
            <text:list-item>
              <text:h text:style-name="P216" text:outline-level="2"><text:alphabetical-index-mark-start text:id="IMark225902392"/>GEN_PULSE<text:alphabetical-index-mark-end text:id="IMark225902392"/></text:h>
            </text:list-item>
          </text:list>
        </text:list-item>
      </text:list>
      <text:p text:style-name="P69">Type<text:tab/>Funktionsbaustein</text:p>
      <text:p text:style-name="P66"><text:span text:style-name="T15">Input</text:span><text:span text:style-name="T14"><text:tab/>ENQ : BOOL (</text:span><text:span text:style-name="T15">Enable</text:span><text:span text:style-name="T14"> Eingang)</text:span></text:p>
      <text:p text:style-name="P69"><text:tab/>PTH : TIME (Impulsdauer HIGH)</text:p>
      <text:p text:style-name="P69"><text:tab/>PTL : TIME (Impulsdauer LOW)</text:p>
      <text:p text:style-name="P73"><draw:frame draw:style-name="fr3" draw:name="Grafik660" text:anchor-type="paragraph" svg:x="1.002cm" svg:y="0.69cm" svg:width="2.499cm" svg:height="1.891cm" draw:z-index="649"><draw:image xlink:href="Pictures/10000000000000BD0000008FFFDF8E1C.png" xlink:type="simple" xlink:show="embed" xlink:actuate="onLoad"/></draw:frame>Output<text:tab/>Q : BOOL (Ausgangssignal)</text:p>
      <text:p text:style-name="P183"><text:line-break/>GEM_PULSE erzeugt am Ausgang Q ein Ausgangssignal das für die Zeit PTH auf TRUE ist und anschließend für PTL LOW bleibt. Der Generator startet nach ENQ = TRUE immer mit einer steigenden Flanke an Q und bleibt für die Zeit PTH TURE. Solange ENQ = TRUE werden kontinuierliche Impulse am Ausgang Q erzeugt. Ist eine der Zeiten (PTH, PTL) oder beide gleich 0 so <text:soft-page-break/>wird die Zeit auf einen SPS Zyklus begrenzt. GEN_PULSE(ENQ := TRUE, PTH := T#0s, PTL := T#0s) erzeugt ein Ausgangssignal das einen Zyklus TRUE ist und einen Zyklus FALSE . Der <text:span text:style-name="T2">Default</text:span> Wert für ENQ ist TRUE.</text:p>
      <text:list xml:id="list38449867" text:continue-numbering="true" text:style-name="L1">
        <text:list-item>
          <text:list>
            <text:list-item>
              <text:h text:style-name="P216" text:outline-level="2"><text:alphabetical-index-mark-start text:id="IMark225902392"/>GEN_PW2<text:alphabetical-index-mark-end text:id="IMark225902392"/></text:h>
            </text:list-item>
          </text:list>
        </text:list-item>
      </text:list>
      <text:p text:style-name="P69">Type<text:tab/>Funktionsbaustein</text:p>
      <text:p text:style-name="P66"><text:span text:style-name="T15">Input</text:span><text:span text:style-name="T14"><text:tab/>ENQ : BOOL (</text:span><text:span text:style-name="T15">Enable</text:span><text:span text:style-name="T14"> Eingang)</text:span></text:p>
      <text:p text:style-name="P179"><text:tab/>TH1 : TIME (Vorgabezeit HIGH wenn TS = LOW)</text:p>
      <text:p text:style-name="P70"><text:tab/>TL1 : TIME (Vorgabezeit LOW wenn TS = LOW)</text:p>
      <text:p text:style-name="P179"><text:tab/>TH2 : TIME (Vorgabezeit HIGH wenn TS = HIGH)</text:p>
      <text:p text:style-name="P70"><text:tab/>TL2 : TIME (Vorgabezeit LOW wenn TS = HIGH)</text:p>
      <text:p text:style-name="P74"><text:tab/>TS : BOOL (Auswahl für Ablaufzeiten)</text:p>
      <text:p text:style-name="P73">Output<text:tab/>Q : BOOL (Binäres Ausgangssignal)</text:p>
      <text:p text:style-name="P183"><text:tab/>TL : TIME (Ablaufzeit wenn Q = FALSE)</text:p>
      <text:p text:style-name="P183"><draw:frame draw:style-name="fr3" draw:name="Grafik691" text:anchor-type="paragraph" svg:x="1.069cm" svg:y="0.669cm" svg:width="2.499cm" svg:height="3.11cm" draw:z-index="688"><draw:image xlink:href="Pictures/10000000000000BD000000EB796DA5A3.png" xlink:type="simple" xlink:show="embed" xlink:actuate="onLoad"/></draw:frame><text:tab/>TH : TIME (Ablaufzeit wenn Q = TRUE)</text:p>
      <text:p text:style-name="P179"><text:line-break/>GEN_PW2 erzeugt ein Ausgangssignal mit einer definierbaren Zeit TH? für HIGH und TL für LOW. Mithilfe des Eingangs TS wird zwischen 2 Parametersätzen (TL1, TH1 und TL2, TH2) umgeschaltet. Beim Start oder nach einem ENQ = TRUE beginnt der Baustein mit der LOW Phase am Ausgang.</text:p>
      <text:p text:style-name="P179"/>
      <text:p text:style-name="P179"/>
      <text:list xml:id="list38473400" text:continue-numbering="true" text:style-name="L1">
        <text:list-item>
          <text:list>
            <text:list-item>
              <text:h text:style-name="P216" text:outline-level="2"><text:soft-page-break/><text:alphabetical-index-mark-start text:id="IMark225902392"/>GEN_RDM<text:alphabetical-index-mark-end text:id="IMark225902392"/></text:h>
            </text:list-item>
          </text:list>
        </text:list-item>
      </text:list>
      <text:p text:style-name="P69">Type<text:tab/>Funktionsbaustein</text:p>
      <text:p text:style-name="P66"><text:span text:style-name="T15">Input</text:span><text:span text:style-name="T14"><text:tab/>PT : TIME (Periodendauer)</text:span></text:p>
      <text:p text:style-name="P69"><text:tab/>AM : REAL (Signal Amplitude)</text:p>
      <text:p text:style-name="P69"><text:tab/>OS : REAL (Signal Offset)</text:p>
      <text:p text:style-name="P73">Output<text:tab/>Q : BOOL (Binäres Ausgangssignal)</text:p>
      <text:p text:style-name="P73"><draw:frame draw:style-name="fr3" draw:name="Grafik290" text:anchor-type="paragraph" svg:x="1.064cm" svg:y="0.6cm" svg:width="2.281cm" svg:height="2.2cm" draw:z-index="246"><draw:image xlink:href="Pictures/10000000000000AC000000A63F7C5BE8.png" xlink:type="simple" xlink:show="embed" xlink:actuate="onLoad"/></draw:frame><text:tab/>OUT: REAL (Analoges Ausgangssignal)</text:p>
      <text:p text:style-name="P16"><text:line-break/>GEN_RDM ist ein Zufalls-Signalgenerator. Er erzeugt am Ausgang OUT einen neuen Wert in PT Zeitabständen. Der Ausgang Q wird für genau einen Zyklus TRUE, wenn sich der Ausgang OUT verändert hat. Der Eingang AM und OS legen die Amplitude und den Offset für den Ausgang OUT fest. Wenn die Eingänge OS und AM nicht beschaltet werden sind die Vorgabewerte 0 und 1.</text:p>
      <text:p text:style-name="P173"><draw:frame draw:style-name="fr3" draw:name="Grafik291" text:anchor-type="paragraph" svg:x="1.032cm" svg:y="1.626cm" svg:width="15.711cm" svg:height="5.726cm" draw:z-index="419"><draw:image xlink:href="Pictures/200000070000526700001E098CD105CE.svm" xlink:type="simple" xlink:show="embed" xlink:actuate="onLoad"/></draw:frame>Das folgende Beispiel zeigt eine Traceaufzeichnung für die Eingangswerte PT=100ms, AM=10 und OS=5. Der Ausgang erzeugt Werte alle 100ms im Bereich von 0 .. 10.</text:p>
      <text:p text:style-name="P173"/>
      <text:p text:style-name="P173"/>
      <text:list xml:id="list38457770" text:continue-numbering="true" text:style-name="L1">
        <text:list-item>
          <text:list>
            <text:list-item>
              <text:h text:style-name="P216" text:outline-level="2"><text:soft-page-break/><text:alphabetical-index-mark-start text:id="IMark225902392"/>GEN_RDT<text:alphabetical-index-mark-end text:id="IMark225902392"/></text:h>
            </text:list-item>
          </text:list>
        </text:list-item>
      </text:list>
      <text:p text:style-name="P69">Type<text:tab/>Funktionsbaustein</text:p>
      <text:p text:style-name="P66"><text:span text:style-name="T15">Input</text:span><text:span text:style-name="T14"><text:tab/>ENABLE : BOOL (Freigabeeingang)</text:span></text:p>
      <text:p text:style-name="P69"><text:tab/>MIN_TIME_MS : TIME (Minimale Periodendauer)</text:p>
      <text:p text:style-name="P69"><text:tab/>MAX_TIME_MS : TIME (Maximale Periodendauer)</text:p>
      <text:p text:style-name="P179"><text:tab/>TP_Q : TIME (Pulsbreite des Ausgangspulses an XQ)</text:p>
      <text:p text:style-name="P73"><draw:frame draw:style-name="fr3" draw:name="Grafik388" text:anchor-type="paragraph" svg:x="1.09cm" svg:y="0.695cm" svg:width="5.42cm" svg:height="2.649cm" draw:z-index="362"><draw:image xlink:href="Pictures/100000000000019A000000C81DD19F14.png" xlink:type="simple" xlink:show="embed" xlink:actuate="onLoad"/></draw:frame>Output<text:tab/>XQ : BOOL (Binäres Ausgangssignal)</text:p>
      <text:p text:style-name="P73"><text:line-break/>GEN_RDT erzeugt Impulse mit definierter Pulsbreite und Zufälligen Abstand. Die Ausgangsimpulse mit der Pulsbreite TP_Q werden in Zufälligen Zeitabständen TX erzeugt. TX schwankt zufällig zwischen der Zeit MIN_TIME_MS und MAX_TIME_MS. Der Baustein erzeugt nur Impulse an Ausgang XQ wenn der Eingang ENABLE auf TRUE ist.</text:p>
      <text:list xml:id="list38475461" text:continue-numbering="true" text:style-name="L1">
        <text:list-item>
          <text:list>
            <text:list-item>
              <text:h text:style-name="P216" text:outline-level="2"><text:alphabetical-index-mark-start text:id="IMark225902392"/>GEN_RMP<text:alphabetical-index-mark-end text:id="IMark225902392"/></text:h>
            </text:list-item>
          </text:list>
        </text:list-item>
      </text:list>
      <text:p text:style-name="P69">Type<text:tab/>Funktionsbaustein</text:p>
      <text:p text:style-name="P66"><text:span text:style-name="T15">Input</text:span><text:span text:style-name="T14"><text:tab/>PT : TIME (Periodendauer)</text:span></text:p>
      <text:p text:style-name="P69"><text:tab/>AM : REAL (Signal Amplitude)</text:p>
      <text:p text:style-name="P69"><text:tab/>OS : REAL (Signal Offset)</text:p>
      <text:p text:style-name="P179"><text:tab/>DL : REAL (Signal Verzögerung 0..1 * PT)</text:p>
      <text:p text:style-name="P73">Output<text:tab/>Q : BOOL (Binäres Ausgangssignal)</text:p>
      <text:p text:style-name="P73"><draw:frame draw:style-name="fr3" draw:name="Grafik264" text:anchor-type="paragraph" svg:x="1.224cm" svg:y="0.878cm" svg:width="2.281cm" svg:height="2.649cm" draw:z-index="247"><draw:image xlink:href="Pictures/10000000000000AC000000C869322E02.png" xlink:type="simple" xlink:show="embed" xlink:actuate="onLoad"/></draw:frame><text:tab/>OUT : REAL (Analoges Ausgangssignal)</text:p>
      <text:p text:style-name="Standard"><text:soft-page-break/><text:span text:style-name="T14"><text:line-break/>GEN_RMP ist ein </text:span><text:span text:style-name="T22">Sägezahngenerator. </text:span><text:span text:style-name="T14">Er erzeugt am Ausgang OUT eine Rampe mit der Dauer PT und wiederholt diese fortlaufend. Der Ausgang Q wird für genau einen Zyklus TRUE, wenn die Rampe am Ausgang OUT beginnt. Der Eingang AM und OS legen die Amplitude und den Offset für den Ausgang OUT fest. Wenn die Eingänge OS und AM nicht beschaltet </text:span><text:span text:style-name="T14">werden sind die Vorgabewerte 0 und 1. Der Ausgang OUT erzeugt dann ein Sägezahnsignal von 0 .. 1. Der Eingang DL kann das Ausgangssignal um bis zu eine Periode (PT) verschieben und dient dazu, mehrere zueinander </text:span><text:span text:style-name="T14">verschobene Signale, zu erzeugen. Eine 0 am Eingang DL bedeutet keine Verschiebung. Ein Wert zwischen 0 und 1 verschiebt das Signal um bis zu einer Periode.</text:span></text:p>
      <text:p text:style-name="P66"><text:span text:style-name="T21">Das folgende Beispiel zeigt eine Traceaufzeichnung</text:span><text:span text:style-name="T21"> für die Eingangswerte PT = 10s, AM = 1 und OS = 0.</text:span></text:p>
      <text:p text:style-name="P183"><draw:frame draw:style-name="fr3" draw:name="Grafik265" text:anchor-type="paragraph" svg:x="1.154cm" svg:y="0.515cm" svg:width="15.863cm" svg:height="5.66cm" draw:z-index="245"><draw:image xlink:href="Pictures/10000000000002A9000000F3E79E9B74.png" xlink:type="simple" xlink:show="embed" xlink:actuate="onLoad"/></draw:frame></text:p>
      <text:list xml:id="list38447662" text:continue-numbering="true" text:style-name="L1">
        <text:list-item>
          <text:list>
            <text:list-item>
              <text:h text:style-name="P216" text:outline-level="2"><text:alphabetical-index-mark-start text:id="IMark225902392"/>GEN_SIN<text:alphabetical-index-mark-end text:id="IMark225902392"/></text:h>
            </text:list-item>
          </text:list>
        </text:list-item>
      </text:list>
      <text:p text:style-name="P69">Type<text:tab/>Funktionsbaustein</text:p>
      <text:p text:style-name="P66"><text:span text:style-name="T15">Input</text:span><text:span text:style-name="T14"><text:tab/>PT : TIME (Periodendauer)</text:span></text:p>
      <text:p text:style-name="P69"><text:tab/>AM : REAL (Signal Amplitude)</text:p>
      <text:p text:style-name="P69"><text:tab/>OS : REAL (Signal Offset)</text:p>
      <text:p text:style-name="P69"><text:tab/>DL : REAL (Signal Verzögerung 0..1 * PT)</text:p>
      <text:p text:style-name="P73">Output<text:tab/>Q : BOOL (Binäres Ausgangssignal)</text:p>
      <text:p text:style-name="P73"><draw:frame draw:style-name="fr3" draw:name="Grafik206" text:anchor-type="paragraph" svg:x="1.39cm" svg:y="0.739cm" svg:width="2.281cm" svg:height="2.649cm" draw:z-index="157"><draw:image xlink:href="Pictures/10000000000000AC000000C89112D8DC.png" xlink:type="simple" xlink:show="embed" xlink:actuate="onLoad"/></draw:frame><text:tab/>OUT : REAL (Analoges Ausgangssignal)</text:p>
      <text:p text:style-name="P66"><text:soft-page-break/><text:span text:style-name="T21"><text:line-break/>GEN_SIN ist ein Sinusgenerator mit programmierbarer Periodendauer, einstellbarer Amplitude und Signal Offset. Als Besonderheit kann auch noch ein Delay eingestellt werden, damit mit mehreren Generatoren überlappende </text:span><text:span text:style-name="T21">Signale erzeugt werden können. Ein Binärer Ausgang Q stellt ein Logisches Signal zur Verfügung das Phasengleich mit dem Sinussignal erzeugt wird. Der Eingang DL gibt ein Delay für das Ausgangssignal vor. Das </text:span><text:span text:style-name="T16">Delay</text:span><text:span text:style-name="T21"> wird </text:span><text:span text:style-name="T21">spezifiziert mit DL * PT. Ein DL von 0.5 verzögert das Signal um eine halbe Periode.</text:span></text:p>
      <text:p text:style-name="P73"><draw:frame draw:style-name="fr10" draw:name="Grafik207" text:anchor-type="paragraph" svg:x="1.769cm" svg:y="1.499cm" svg:width="6.68cm" svg:height="2.66cm" draw:z-index="158"><draw:image xlink:href="Pictures/10000000000001F9000000C9E803F6DF.png" xlink:type="simple" xlink:show="embed" xlink:actuate="onLoad"/></draw:frame>Das folgende Beispiel zeigt GEN_SIN mit einer Traceaufzeichnung des Sinussignals und des binären Ausgangs Q.</text:p>
      <text:p text:style-name="P73"/>
      <text:p text:style-name="P73">Obiges Beispiel Erzeugt ein Sinussignal mit 0.1 HZ (PT = 10 s) und einen unteren Spitzenwert von 0 und oberen Spitzenwert von 10.</text:p>
      <text:p text:style-name="P73"><draw:frame draw:style-name="fr3" draw:name="Grafik208" text:anchor-type="paragraph" svg:x="1.118cm" svg:y="0.473cm" svg:width="15.889cm" svg:height="6.883cm" draw:z-index="159"><draw:image xlink:href="Pictures/10000000000002D000000138926B238E.png" xlink:type="simple" xlink:show="embed" xlink:actuate="onLoad"/></draw:frame></text:p>
      <text:list xml:id="list38462765" text:continue-numbering="true" text:style-name="L1">
        <text:list-item>
          <text:list>
            <text:list-item>
              <text:h text:style-name="P216" text:outline-level="2"><text:soft-page-break/><text:alphabetical-index-mark-start text:id="IMark225902392"/>GEN_SQR<text:alphabetical-index-mark-end text:id="IMark225902392"/></text:h>
            </text:list-item>
          </text:list>
        </text:list-item>
      </text:list>
      <text:p text:style-name="P69">Type<text:tab/>Funktionsbaustein</text:p>
      <text:p text:style-name="P66"><text:span text:style-name="T15">Input</text:span><text:span text:style-name="T14"><text:tab/>PT : TIME (Periodendauer)</text:span></text:p>
      <text:p text:style-name="P69"><text:tab/>AM : REAL (Signal Amplitude)</text:p>
      <text:p text:style-name="P69"><text:tab/>OS : REAL (Signal Offset)</text:p>
      <text:p text:style-name="P69"><text:tab/>DC : REAL (Tastverhältnis 0..1)</text:p>
      <text:p text:style-name="P69"><text:tab/>DL : REAL (Signal Verzögerung 0..1 * PT)</text:p>
      <text:p text:style-name="P73">Output<text:tab/>Q : BOOL (Binäres Ausgangssignal)</text:p>
      <text:p text:style-name="P73"><draw:frame draw:style-name="fr3" draw:name="Grafik190" text:anchor-type="paragraph" svg:x="1.388cm" svg:y="0.642cm" svg:width="2.281cm" svg:height="3.099cm" draw:z-index="144"><draw:image xlink:href="Pictures/10000000000000AC000000EAA0684FB4.png" xlink:type="simple" xlink:show="embed" xlink:actuate="onLoad"/></draw:frame><text:tab/>OUT : REAL (Analoges Ausgangssignal)</text:p>
      <text:p text:style-name="P66"><text:span text:style-name="T21"><text:line-break/>GEN_SQR ist ein Rechteckgenerator mit programmierbarer Periodendauer, einstellbarer Amplitude und Signal Offset sowie Tastverhältnis DC (</text:span><text:span text:style-name="T16">Duty</text:span><text:span text:style-name="T21"> </text:span><text:span text:style-name="T16">Cycle</text:span><text:span text:style-name="T21">). Als Besonderheit kann auch noch ein </text:span><text:span text:style-name="T16">Delay</text:span><text:span text:style-name="T21"> eingestellt werden, damit mit mehreren Generatoren überlappende Signale erzeugt werden können.</text:span></text:p>
      <text:p text:style-name="P2">Das folgende <text:span text:style-name="T11">Beispiel</text:span> zeigt 2 GEN_SQR, wobei einer davon mit einem Delay von 0.25 ( ¼ Periode) läuft. In der Traceaufzeichnung ist deutlich das Signal des ersten Generators und das verzögerte Signal des zweiten Generators zu sehen.</text:p>
      <text:p text:style-name="P73"><draw:frame draw:style-name="fr10" draw:name="Grafik191" text:anchor-type="paragraph" svg:x="1.037cm" svg:y="0.164cm" svg:width="9.83cm" svg:height="6.71cm" draw:z-index="145"><draw:image xlink:href="Pictures/10000000000002E7000001FB0EDD17E6.png" xlink:type="simple" xlink:show="embed" xlink:actuate="onLoad"/></draw:frame></text:p>
      <text:p text:style-name="P183"><draw:frame draw:style-name="fr3" draw:name="Grafik192" text:anchor-type="paragraph" svg:x="1.021cm" svg:y="0.152cm" svg:width="15.924cm" svg:height="6.297cm" draw:z-index="146"><draw:image xlink:href="Pictures/10000000000002C700000119A48C9101.png" xlink:type="simple" xlink:show="embed" xlink:actuate="onLoad"/></draw:frame></text:p>
      <text:p text:style-name="P183"><text:soft-page-break/></text:p>
      <text:list xml:id="list38452869" text:continue-numbering="true" text:style-name="L1">
        <text:list-item>
          <text:list>
            <text:list-item>
              <text:h text:style-name="P216" text:outline-level="2"><text:alphabetical-index-mark-start text:id="IMark225902392"/>PWM_DC<text:alphabetical-index-mark-end text:id="IMark225902392"/></text:h>
            </text:list-item>
          </text:list>
        </text:list-item>
      </text:list>
      <text:p text:style-name="P69">Type<text:tab/>Funktionsbaustein</text:p>
      <text:p text:style-name="P66"><text:span text:style-name="T15">Input</text:span><text:span text:style-name="T14"><text:tab/>F : REAL (Ausgangsfrequenz)</text:span></text:p>
      <text:p text:style-name="P69"><text:tab/>DC : REAL (Tastverhältnis 0..1) </text:p>
      <text:p text:style-name="P73"><draw:frame draw:style-name="fr3" draw:name="Grafik129" text:anchor-type="paragraph" svg:x="1.092cm" svg:y="0.681cm" svg:width="2.281cm" svg:height="1.75cm" draw:z-index="99"><draw:image xlink:href="Pictures/10000000000000AC0000008464C2606D.png" xlink:type="simple" xlink:show="embed" xlink:actuate="onLoad"/></draw:frame>Output<text:tab/>Q : BOOL (Ausgangssignal)</text:p>
      <text:p text:style-name="P66"><text:span text:style-name="T21"><text:line-break/>PWM_DC ist ein </text:span><text:span text:style-name="T16">Duty</text:span><text:span text:style-name="T21">-</text:span><text:span text:style-name="T16">Cycle</text:span><text:span text:style-name="T21"> modulierter Frequenzgenerator. Der Generator erzeugt eine feste Frequenz F mit einem Tastverhältnis (TON / TOFF), welche über den Eingang DC moduliert (Eingestellt) werden kann. Ein Wert von 0.5 am Eingang DC erzeugt ein Tastverhältnis von 50%.</text:span></text:p>
      <text:p text:style-name="P66"><draw:g text:anchor-type="paragraph" draw:z-index="100" draw:style-name="gr1"><draw:line draw:style-name="gr2" draw:text-style-name="P257" svg:x1="1.877cm" svg:y1="2.935cm" svg:x2="2.877cm" svg:y2="2.935cm"><text:p/></draw:line><draw:line draw:style-name="gr2" draw:text-style-name="P257" svg:x1="2.877cm" svg:y1="2.434cm" svg:x2="2.877cm" svg:y2="2.933cm"><text:p/></draw:line><draw:line draw:style-name="gr2" draw:text-style-name="P257" svg:x1="2.877cm" svg:y1="2.434cm" svg:x2="4.877cm" svg:y2="2.434cm"><text:p/></draw:line><draw:line draw:style-name="gr2" draw:text-style-name="P257" svg:x1="4.877cm" svg:y1="2.933cm" svg:x2="4.877cm" svg:y2="2.434cm"><text:p/></draw:line><draw:frame draw:style-name="gr6" draw:text-style-name="P259" svg:width="0.997cm" svg:height="0.65cm" svg:x="1.127cm" svg:y="2.433cm"><draw:text-box><text:p text:style-name="P258"><text:span text:style-name="T32">Q</text:span></text:p></draw:text-box></draw:frame><draw:line draw:style-name="gr2" draw:text-style-name="P257" svg:x1="4.877cm" svg:y1="2.935cm" svg:x2="5.877cm" svg:y2="2.935cm"><text:p/></draw:line><draw:line draw:style-name="gr7" draw:text-style-name="P257" svg:x1="2.877cm" svg:y1="1.933cm" svg:x2="3.378cm" svg:y2="1.933cm"><text:p/></draw:line><draw:frame draw:style-name="gr6" draw:text-style-name="P259" svg:width="1.124cm" svg:height="0.65cm" svg:x="3.378cm" svg:y="1.579cm"><draw:text-box><text:p text:style-name="P258"><text:span text:style-name="T32">Ton</text:span></text:p></draw:text-box></draw:frame><draw:line draw:style-name="gr7" draw:text-style-name="P257" svg:x1="4.877cm" svg:y1="1.933cm" svg:x2="4.378cm" svg:y2="1.933cm"><text:p/></draw:line><draw:line draw:style-name="gr2" draw:text-style-name="P257" svg:x1="5.877cm" svg:y1="2.434cm" svg:x2="5.877cm" svg:y2="2.933cm"><text:p/></draw:line><draw:line draw:style-name="gr2" draw:text-style-name="P257" svg:x1="5.877cm" svg:y1="2.434cm" svg:x2="7.877cm" svg:y2="2.434cm"><text:p/></draw:line><draw:line draw:style-name="gr2" draw:text-style-name="P257" svg:x1="7.876cm" svg:y1="2.933cm" svg:x2="7.876cm" svg:y2="2.434cm"><text:p/></draw:line><draw:line draw:style-name="gr2" draw:text-style-name="P257" svg:x1="7.876cm" svg:y1="2.935cm" svg:x2="8.876cm" svg:y2="2.935cm"><text:p/></draw:line><draw:line draw:style-name="gr2" draw:text-style-name="P257" svg:x1="7.876cm" svg:y1="2.935cm" svg:x2="8.876cm" svg:y2="2.935cm"><text:p/></draw:line><draw:line draw:style-name="gr2" draw:text-style-name="P257" svg:x1="8.879cm" svg:y1="2.434cm" svg:x2="8.879cm" svg:y2="2.933cm"><text:p/></draw:line><draw:line draw:style-name="gr2" draw:text-style-name="P257" svg:x1="8.879cm" svg:y1="2.434cm" svg:x2="10.879cm" svg:y2="2.434cm"><text:p/></draw:line><draw:line draw:style-name="gr2" draw:text-style-name="P257" svg:x1="10.878cm" svg:y1="2.933cm" svg:x2="10.878cm" svg:y2="2.434cm"><text:p/></draw:line><draw:line draw:style-name="gr2" draw:text-style-name="P257" svg:x1="10.878cm" svg:y1="2.935cm" svg:x2="11.876cm" svg:y2="2.935cm"><text:p/></draw:line><draw:line draw:style-name="gr2" draw:text-style-name="P257" svg:x1="10.878cm" svg:y1="2.935cm" svg:x2="11.876cm" svg:y2="2.935cm"><text:p/></draw:line><draw:line draw:style-name="gr21" draw:text-style-name="P257" svg:x1="7.876cm" svg:y1="1.933cm" svg:x2="8.876cm" svg:y2="1.933cm"><text:p/></draw:line><draw:frame draw:style-name="gr6" draw:text-style-name="P259" svg:width="1.124cm" svg:height="0.65cm" svg:x="7.877cm" svg:y="1.182cm"><draw:text-box><text:p text:style-name="P258"><text:span text:style-name="T32">Toff</text:span></text:p></draw:text-box></draw:frame><draw:line draw:style-name="gr7" draw:text-style-name="P257" svg:x1="2.877cm" svg:y1="3.434cm" svg:x2="3.877cm" svg:y2="3.434cm"><text:p/></draw:line><draw:frame draw:style-name="gr6" draw:text-style-name="P259" svg:width="1.251cm" svg:height="0.65cm" svg:x="3.877cm" svg:y="3.078cm"><draw:text-box><text:p text:style-name="P258"><text:span text:style-name="T32">1 / F</text:span></text:p></draw:text-box></draw:frame><draw:line draw:style-name="gr7" draw:text-style-name="P257" svg:x1="5.877cm" svg:y1="3.434cm" svg:x2="4.877cm" svg:y2="3.434cm"><text:p/></draw:line></draw:g><text:span text:style-name="T21">Das Folgende Signalbild zeigt ein Ausgangssignal mit einem </text:span><text:span text:style-name="T16">Duty</text:span><text:span text:style-name="T21">-</text:span><text:span text:style-name="T16">Cycle</text:span><text:span text:style-name="T21"> von 2 / 1, was einem DC (Tastverhältnis) von 0.67 entspricht.</text:span></text:p>
      <text:p text:style-name="P183"/>
      <text:list xml:id="list38476011" text:continue-numbering="true" text:style-name="L1">
        <text:list-item>
          <text:list>
            <text:list-item>
              <text:h text:style-name="P216" text:outline-level="2"><text:soft-page-break/><text:alphabetical-index-mark-start text:id="IMark225902392"/>PWM_PW<text:alphabetical-index-mark-end text:id="IMark225902392"/></text:h>
            </text:list-item>
          </text:list>
        </text:list-item>
      </text:list>
      <text:p text:style-name="P69">Type<text:tab/>Funktionsbaustein</text:p>
      <text:p text:style-name="P66"><text:span text:style-name="T15">Input</text:span><text:span text:style-name="T14"><text:tab/>F : REAL (Ausgangsfrequenz)</text:span></text:p>
      <text:p text:style-name="P66"><text:span text:style-name="T14"><text:tab/>PW : TIME (Impulsdauer </text:span><text:span text:style-name="T15">High</text:span><text:span text:style-name="T14">) </text:span></text:p>
      <text:p text:style-name="P73"><draw:frame draw:style-name="fr3" draw:name="Grafik130" text:anchor-type="paragraph" svg:x="1.102cm" svg:y="0.684cm" svg:width="2.281cm" svg:height="1.75cm" draw:z-index="101"><draw:image xlink:href="Pictures/10000000000000AC0000008475A5B37A.png" xlink:type="simple" xlink:show="embed" xlink:actuate="onLoad"/></draw:frame>Output<text:tab/>Q : BOOL (Ausgangssignal)</text:p>
      <text:p text:style-name="P73"><text:line-break/>PWM_PW ist ein Puls breiten modulierter Frequenzgenerator. Der Generator erzeugt eine feste Frequenz F mit einem Tastverhältnis (TON / TOFF) das über den Eingang PW moduliert (eingestellt) werden kann. Der Eingang gibt die Zeit vor die das Signal auf TRUE bleibt.</text:p>
      <text:p text:style-name="P73"><draw:g text:anchor-type="paragraph" draw:z-index="102" draw:style-name="gr1"><draw:line draw:style-name="gr2" draw:text-style-name="P257" svg:x1="1.93cm" svg:y1="1.519cm" svg:x2="2.93cm" svg:y2="1.519cm"><text:p/></draw:line><draw:line draw:style-name="gr2" draw:text-style-name="P257" svg:x1="2.93cm" svg:y1="1.02cm" svg:x2="2.93cm" svg:y2="1.519cm"><text:p/></draw:line><draw:line draw:style-name="gr2" draw:text-style-name="P257" svg:x1="2.93cm" svg:y1="1.02cm" svg:x2="4.93cm" svg:y2="1.02cm"><text:p/></draw:line><draw:line draw:style-name="gr2" draw:text-style-name="P257" svg:x1="4.93cm" svg:y1="1.519cm" svg:x2="4.93cm" svg:y2="1.02cm"><text:p/></draw:line><draw:frame draw:style-name="gr6" draw:text-style-name="P259" svg:width="0.997cm" svg:height="0.65cm" svg:x="1.18cm" svg:y="1.02cm"><draw:text-box><text:p text:style-name="P258"><text:span text:style-name="T32">Q</text:span></text:p></draw:text-box></draw:frame><draw:line draw:style-name="gr2" draw:text-style-name="P257" svg:x1="4.93cm" svg:y1="1.519cm" svg:x2="5.93cm" svg:y2="1.519cm"><text:p/></draw:line><draw:line draw:style-name="gr7" draw:text-style-name="P257" svg:x1="2.93cm" svg:y1="0.519cm" svg:x2="3.431cm" svg:y2="0.519cm"><text:p/></draw:line><draw:frame draw:style-name="gr6" draw:text-style-name="P259" svg:width="1.124cm" svg:height="0.65cm" svg:x="3.431cm" svg:y="0.166cm"><draw:text-box><text:p text:style-name="P258"><text:span text:style-name="T32">PW</text:span></text:p></draw:text-box></draw:frame><draw:line draw:style-name="gr7" draw:text-style-name="P257" svg:x1="4.93cm" svg:y1="0.519cm" svg:x2="4.431cm" svg:y2="0.519cm"><text:p/></draw:line><draw:line draw:style-name="gr2" draw:text-style-name="P257" svg:x1="5.93cm" svg:y1="1.02cm" svg:x2="5.93cm" svg:y2="1.519cm"><text:p/></draw:line><draw:line draw:style-name="gr2" draw:text-style-name="P257" svg:x1="5.93cm" svg:y1="1.02cm" svg:x2="7.93cm" svg:y2="1.02cm"><text:p/></draw:line><draw:line draw:style-name="gr2" draw:text-style-name="P257" svg:x1="7.93cm" svg:y1="1.519cm" svg:x2="7.93cm" svg:y2="1.02cm"><text:p/></draw:line><draw:line draw:style-name="gr2" draw:text-style-name="P257" svg:x1="7.93cm" svg:y1="1.519cm" svg:x2="8.93cm" svg:y2="1.519cm"><text:p/></draw:line><draw:line draw:style-name="gr2" draw:text-style-name="P257" svg:x1="7.93cm" svg:y1="1.519cm" svg:x2="8.93cm" svg:y2="1.519cm"><text:p/></draw:line><draw:line draw:style-name="gr7" draw:text-style-name="P257" svg:x1="2.93cm" svg:y1="2.02cm" svg:x2="3.93cm" svg:y2="2.02cm"><text:p/></draw:line><draw:frame draw:style-name="gr6" draw:text-style-name="P259" svg:width="1.251cm" svg:height="0.65cm" svg:x="3.93cm" svg:y="1.665cm"><draw:text-box><text:p text:style-name="P258"><text:span text:style-name="T32">1 / F</text:span></text:p></draw:text-box></draw:frame><draw:line draw:style-name="gr7" draw:text-style-name="P257" svg:x1="5.93cm" svg:y1="2.02cm" svg:x2="4.93cm" svg:y2="2.02cm"><text:p/></draw:line></draw:g></text:p>
      <text:list xml:id="list38472224" text:continue-numbering="true" text:style-name="L1">
        <text:list-item>
          <text:list>
            <text:list-item>
              <text:h text:style-name="P216" text:outline-level="2"><text:alphabetical-index-mark-start text:id="IMark225902392"/>RMP_B<text:alphabetical-index-mark-end text:id="IMark225902392"/></text:h>
            </text:list-item>
          </text:list>
        </text:list-item>
      </text:list>
      <text:p text:style-name="P69">Type<text:tab/>Funktionsbaustein</text:p>
      <text:p text:style-name="P66"><text:span text:style-name="T15">Input</text:span><text:span text:style-name="T14"><text:tab/>SET : BOOL (Set-Eingang)</text:span></text:p>
      <text:p text:style-name="P69"><text:tab/>PT : TIME (Dauer einer Rampe 0..255)</text:p>
      <text:p text:style-name="P69"><text:tab/>E : BOOL (Freigabeeingang)</text:p>
      <text:p text:style-name="P69"><text:tab/>UP : BOOL (Richtung UP=TRUE bedeutet Up)</text:p>
      <text:p text:style-name="P69"><text:tab/>RST : BOOL (Reset-Eingang)</text:p>
      <text:p text:style-name="P73">Output<text:tab/>OUT : Byte (Ausgangssignal)</text:p>
      <text:p text:style-name="P73"><text:tab/>BUSY : BOOL (TRUE, wenn Rampe läuft)</text:p>
      <text:p text:style-name="P183"><text:tab/>HIGH : BOOL (Maximaler Ausgangswert ist erreicht)</text:p>
      <text:p text:style-name="P183"><draw:frame draw:style-name="fr3" draw:name="Grafik131" text:anchor-type="paragraph" svg:x="0.937cm" svg:y="0.623cm" svg:width="2.499cm" svg:height="2.709cm" draw:z-index="712"><draw:image xlink:href="Pictures/10000000000000BD000000CD5AAF35CA.png" xlink:type="simple" xlink:show="embed" xlink:actuate="onLoad"/></draw:frame><text:tab/>LOW : BOOL (Minimaler Ausgangswert ist erreicht)</text:p>
      <text:p text:style-name="P73"><text:soft-page-break/><text:line-break/>RMP_B ist ein Rampengenerator mit 8 Bit (1 Byte) Auflösung. Die Rampe von 0..255 wird in maximal 255 Schritte unterteilt und in einer Zeit von PT einmal komplett durchlaufen. Ein Freigabesignal E schaltet den Rampengenerator an oder aus. Ein asynchroner Reset setzt jederzeit den Ausgang auf 0 und ein Impuls am Set-Eingang setzt den Ausgang auf 255. Mit einem UD-Eingang kann die Richtung AUF (UD = TRUE) oder Ab (UD = FALSE) vorgegeben werden. Der Ausgang BUSY = TRUE zeigt an, dass eine Rampe aktiv ist. BUSY = FALSE bedeutet der Ausgang ist stabil. Die Ausgänge HIGH und LOW werden TRUE wenn der Ausgang OUT das untere oder obere Limit (0 bzw. 255) erreicht hat.</text:p>
      <text:p text:style-name="P183">Beim festlegen von PT ist zu beachten, dass eine SPS mit 5ms Zykluszeit 256*5 =1275 Millisekunden für eine Rampe benötigt. Wird die Zeit PT kürzer als die Zykluszeit mal 256 gewählt, wird die Flanke in entsprechend größere Sprünge übersetzt. Die Rampe wird in diesen Fall aus weniger als 256 Schritten je Zyklus zusammengesetzt. PT darf T#0s sein, dann schaltet der Ausgang zwischen Minimal- und Maximal-Wert hin und her.</text:p>
      <text:p text:style-name="P173"><draw:frame draw:style-name="fr3" draw:name="Grafik134" text:anchor-type="paragraph" svg:x="1.048cm" svg:y="3.764cm" svg:width="13.78cm" svg:height="4.521cm" draw:z-index="294"><draw:image xlink:href="Pictures/1000000000000265000000C90089EFE7.png" xlink:type="simple" xlink:show="embed" xlink:actuate="onLoad"/></draw:frame><text:span text:style-name="T21">Das folgende Beispiel zeigt eine Anwendung von RMP_B. Die Ausgänge HIGH und LOW Triggern die beiden TON (X4, X5) jeweils 1 Sekunde verzögert und schalten über das RS </text:span><text:span text:style-name="T16">Flip</text:span><text:span text:style-name="T21">-Flop (X6) den UP-Eingang des Rampengenerators um. Das Ergebnis ist eine Rampe von 5 Sekunden, gefolgt von einer Pause von 1 Sekunde und dann die umgekehrte Rampe von 5 Sekunden und wieder eine Pause von 1 Sekunde. In der Traceaufzeichnung ist der Verlauf der Signale zu erkennen.</text:span></text:p>
      <text:p text:style-name="P183"/>
      <text:p text:style-name="P73"><draw:frame draw:style-name="fr10" draw:name="Grafik135" text:anchor-type="paragraph" svg:x="0.993cm" svg:y="0.684cm" svg:width="15.845cm" svg:height="7.167cm" draw:z-index="104"><draw:image xlink:href="Pictures/10000000000003E5000001C3B8829BB6.png" xlink:type="simple" xlink:show="embed" xlink:actuate="onLoad"/></draw:frame>Timing Diagramm für <text:span text:style-name="T2">Up</text:span> / <text:span text:style-name="T2">Down</text:span> Rampe:</text:p>
      <text:p text:style-name="P183"><text:soft-page-break/></text:p>
      <text:p text:style-name="P73"><draw:frame draw:style-name="fr3" draw:name="Grafik136" text:anchor-type="paragraph" svg:x="1.129cm" svg:y="0.66cm" svg:width="12.301cm" svg:height="2.937cm" draw:z-index="292"><draw:image xlink:href="Pictures/10000000000001D10000006F6E8142FB.png" xlink:type="simple" xlink:show="embed" xlink:actuate="onLoad"/></draw:frame>Ein weiteres Beispiel zeigt den Einsatz von RMP_B als Sägezahngenerator.</text:p>
      <text:p text:style-name="P183"/>
      <text:p text:style-name="P183"><draw:frame draw:style-name="fr3" draw:name="Grafik137" text:anchor-type="paragraph" svg:x="1.041cm" svg:y="0.683cm" svg:width="15.944cm" svg:height="6.498cm" draw:z-index="105"><draw:image xlink:href="Pictures/10000000000002DD0000012B0E252388.png" xlink:type="simple" xlink:show="embed" xlink:actuate="onLoad"/></draw:frame>Timing Diagramm für Sägezahngenerator:</text:p>
      <text:p text:style-name="P183"/>
      <text:list xml:id="list38460975" text:continue-numbering="true" text:style-name="L1">
        <text:list-item>
          <text:list>
            <text:list-item>
              <text:h text:style-name="P216" text:outline-level="2"><text:soft-page-break/><text:alphabetical-index-mark-start text:id="IMark225902392"/>RMP_SOFT<text:alphabetical-index-mark-end text:id="IMark225902392"/></text:h>
            </text:list-item>
          </text:list>
        </text:list-item>
      </text:list>
      <text:p text:style-name="P69">Type<text:tab/>Funktionsbaustein</text:p>
      <text:p text:style-name="P66"><text:span text:style-name="T15">Input</text:span><text:span text:style-name="T14"><text:tab/>IN : BOOL (Freigabeeingang)</text:span></text:p>
      <text:p text:style-name="P69"><text:tab/>VAL : Byte (Maximaler Ausgangswert)</text:p>
      <text:p text:style-name="P66"><text:span text:style-name="T14">Config<text:tab/>PT_ON : TIME (Anstiegszeit, </text:span><text:span text:style-name="T15">Default</text:span><text:span text:style-name="T14"> ist 100 ms)</text:span></text:p>
      <text:p text:style-name="P66"><text:span text:style-name="T14"><text:tab/>PT_OFF : TIME (Abfallzeit, </text:span><text:span text:style-name="T15">Default</text:span><text:span text:style-name="T14"> ist 100 ms)</text:span></text:p>
      <text:p text:style-name="P73"><draw:frame draw:style-name="fr3" draw:name="Grafik132" text:anchor-type="paragraph" svg:x="1.139cm" svg:y="0.684cm" svg:width="2.281cm" svg:height="1.75cm" draw:z-index="103"><draw:image xlink:href="Pictures/10000000000000AC00000084EFADF0FA.png" xlink:type="simple" xlink:show="embed" xlink:actuate="onLoad"/></draw:frame>Output<text:tab/>OUT : Byte (Ausgangssignal)</text:p>
      <text:p text:style-name="P66"><text:span text:style-name="T21"><text:line-break/>RMP_SOFT glättet die Rampen eines Eingangssignals VAL. Das Signal </text:span><text:span text:style-name="T16">Out</text:span><text:span text:style-name="T21"> folgt dem Eingangssignal VAL, wobei sowohl Anstiegszeit wie auch Abfallzeit durch PT_ON und PT_OFF begrenzt werden können</text:span><text:span text:style-name="T19">.</text:span><text:span text:style-name="T21"> Die </text:span><text:span text:style-name="T19">Anstiegszeit</text:span><text:span text:style-name="T21"> und Abfallzeit der Rampen sind durch Setup-Parameter im Modul RMP_SOFT definiert. Die Setup-Zeit PT_ON Gibt an, wie lange die Rampe von 0..255 dauert. Eine Rampe die durch VAL begrenzt ist, ist entsprechend kürzer. PT_OFF definiert entsprechend die fallende Rampe. Wird der Eingang IN auf FALSE gesetzt entspricht dies einem VAL Wert von 0, somit kann durch schalten des Eingangs IN zwischen 0 und VAL umgeschaltet werden.</text:span></text:p>
      <text:p text:style-name="P183"><draw:frame draw:style-name="fr3" draw:name="Grafik138" text:anchor-type="paragraph" svg:x="1.171cm" svg:y="0.691cm" svg:width="10.73cm" svg:height="3.39cm" draw:z-index="288"><draw:image xlink:href="Pictures/100000000000032B00000100EADD0B42.png" xlink:type="simple" xlink:show="embed" xlink:actuate="onLoad"/></draw:frame>Beispiel:</text:p>
      <text:p text:style-name="P183"><draw:frame draw:style-name="fr3" draw:name="Grafik139" text:anchor-type="paragraph" svg:x="1.05cm" svg:y="3.84cm" svg:width="15.896cm" svg:height="5.851cm" draw:z-index="287"><draw:image xlink:href="Pictures/10000000000002C80000012BC57AB450.png" xlink:type="simple" xlink:show="embed" xlink:actuate="onLoad"/></draw:frame></text:p>
      <text:list xml:id="list38450223" text:continue-numbering="true" text:style-name="L1">
        <text:list-item>
          <text:list>
            <text:list-item>
              <text:h text:style-name="P216" text:outline-level="2"><text:soft-page-break/><text:alphabetical-index-mark-start text:id="IMark225902392"/>RMP_W<text:alphabetical-index-mark-end text:id="IMark225902392"/></text:h>
            </text:list-item>
          </text:list>
        </text:list-item>
      </text:list>
      <text:p text:style-name="P69">Type<text:tab/>Funktionsbaustein</text:p>
      <text:p text:style-name="P66"><text:span text:style-name="T15">Input</text:span><text:span text:style-name="T14"><text:tab/>SET : BOOL (Set Eingang)</text:span></text:p>
      <text:p text:style-name="P69"><text:tab/>PT : TIME (Dauer einer Rampe 0..65535)</text:p>
      <text:p text:style-name="P69"><text:tab/>E : BOOL (Freigabeeingang)</text:p>
      <text:p text:style-name="P66"><text:span text:style-name="T14"><text:tab/>UP : BOOL (Richtung UP=TRUE bedeutet U</text:span><text:span text:style-name="T15">p</text:span><text:span text:style-name="T14">)</text:span></text:p>
      <text:p text:style-name="P69"><text:tab/>RST : BOOL (Reset Eingang)</text:p>
      <text:p text:style-name="P73">Output<text:tab/>OUT : Byte (Ausgangssignal)</text:p>
      <text:p text:style-name="P183"><text:tab/>BUSY : BOOL (TRUE, wenn Rampe läuft)</text:p>
      <text:p text:style-name="P183"><text:tab/>HIGH : BOOL (Maximaler Ausgangswert ist erreicht)</text:p>
      <text:p text:style-name="P73"><draw:frame draw:style-name="fr3" draw:name="Grafik133" text:anchor-type="paragraph" svg:x="0.979cm" svg:y="0.644cm" svg:width="2.499cm" svg:height="2.709cm" draw:z-index="713"><draw:image xlink:href="Pictures/10000000000000BD000000CDEA97752F.png" xlink:type="simple" xlink:show="embed" xlink:actuate="onLoad"/></draw:frame><text:tab/>LOW : BOOL (Minimaler Ausgangswert ist erreicht)</text:p>
      <text:p text:style-name="P73"><text:line-break/>RMP_W ist ein Rampengenerator mit 16 Bit (2 Byte) Auflösung. Die Rampe von 0.. 65535 wird in maximal 65536 Schritte unterteilt und in einer Zeit von PT einmal komplett durchlaufen. Ein Freigabesignal E schaltet den Rampengenerator an oder aus. Ein asynchroner Reset setzt jederzeit den Ausgang auf 0 und ein Impuls am Set-Eingang setzt den Ausgang auf 65535. Mit einem UD-Eingang kann die Richtung AUF (UD = TRUE) oder Ab (UD = FALSE) vorgegeben werden. Der Ausgang BUSY = TRUE zeigt an, dass eine Rampe aktiv ist. BUSY = FALSE bedeutet der Ausgang ist stabil. Die Ausgänge HIGH und LOW werden TRUE wenn der Ausgang OUT das untere oder obere Limit (0 bzw. 65535) erreicht hat.</text:p>
      <text:p text:style-name="P183">Beim festlegen von PT ist zu beachten, dass eine SPS mit 5ms Zykluszeit 65536*5 = 327 Sekunden für eine Rampe benötigt. Wird die Zeit PT kürzer als die Zykluszeit mal 65536 gewählt, wird die Flanke in entsprechend größere Sprünge übersetzt. Die Rampe wird in diesen Fall aus weniger als 65536 Schritten je Zyklus zusammengesetzt. <text:s/>PT darf T#0s sein, dann schaltet der Ausgang zwischen Minimal- und Maximal-Wert hin und her.</text:p>
      <text:p text:style-name="P183">Eine detaillierte Beschreibung finden Sie beim Modul RMP_B. Die Funktion ist absolut identisch mit der Ausnahme, dass der Ausgang OUT 8 Bit anstelle von 16 Bit weit ist.</text:p>
      <text:list xml:id="list38446174" text:continue-numbering="true" text:style-name="L1">
        <text:list-item>
          <text:h text:style-name="P210" text:outline-level="1">Signalverarbeitung</text:h>
          <text:list>
            <text:list-item>
              <text:h text:style-name="P216" text:outline-level="2"><text:alphabetical-index-mark-start text:id="IMark225902392"/>AIN<text:alphabetical-index-mark-end text:id="IMark225902392"/></text:h>
            </text:list-item>
          </text:list>
        </text:list-item>
      </text:list>
      <text:p text:style-name="P69">Type<text:tab/>Funktion</text:p>
      <text:p text:style-name="P66"><text:span text:style-name="T15">Input</text:span><text:span text:style-name="T14"><text:tab/>IN : DWORD (Eingang vom A/D Wandler)</text:span></text:p>
      <text:p text:style-name="P73">Output<text:tab/>REAL (Ausgangswert)</text:p>
      <text:p text:style-name="P73">Config<text:tab/>BITS : Byte (Anzahl der Bits, 16 für ein komplettes Wort)</text:p>
      <text:p text:style-name="P66"><text:span text:style-name="T21"><text:tab/>SIGN : Byte (</text:span><text:span text:style-name="T16">Sign</text:span><text:span text:style-name="T21"> Bit, 15 für Bit 15)</text:span></text:p>
      <text:p text:style-name="P73"><text:tab/>LOW : REAL (kleinster Wert des Ausgangs)</text:p>
      <text:p text:style-name="P73"><draw:frame draw:style-name="fr3" draw:name="Grafik140" text:anchor-type="paragraph" svg:x="0.894cm" svg:y="0.637cm" svg:width="2.281cm" svg:height="1.12cm" draw:z-index="106"><draw:image xlink:href="Pictures/10000000000000AC00000055C71FE237.png" xlink:type="simple" xlink:show="embed" xlink:actuate="onLoad"/></draw:frame><text:tab/>HIGH : REAL (größter Wert des Ausgangs)</text:p>
      <text:p text:style-name="P66"><text:span text:style-name="T21"><text:line-break/>Analoge Eingänge von A/D Wandlern liefern in der Regel ein WORD (16 Bit) oder DWORD (32 Bit), wobei sie selbst meist nicht 16 Bit oder 32 Bit Auflösung besitzen. Weiterhin digitalisieren A/D Wandler einen festen Eingangsbereich (z B. -10 .. + 10 V), was zum Beispiel mit den digitalen Werten 0 .. 65535 (Bei 16 Bit) repräsentiert wird. Die Funktion AIN wird durch Setup-Parameter Konfiguriert und rechnet die Ausgangswerte des A/D Wandlers entsprechend um, sodass nach dem Modul AIN ein REAL-Wert zur Verfügung steht, der mit dem echten gemessenen Wert übereinstimmt. Weiterhin kann das Modul ein </text:span><text:span text:style-name="T16">Sign-</text:span><text:span text:style-name="T21">Bit an beliebiger Stelle extrahieren und umrechnen. Durch einen Doppelklick auf den Baustein können mehrere Setup-Variablen gesetzt werden. Bits definiert wie viele Bits des Eingangs-DWORD verarbeitet werden sollen. Für einen 12 Bit Wandler ist dieser Wert 12. Es werden dann nur die Bits 0 – 11 ausgewertet. </text:span><text:span text:style-name="T16">Sign</text:span><text:span text:style-name="T21"> definiert, ob ein Vorzeichenbit vorhanden ist und wo im Eingangswort es zu finden ist. </text:span><text:span text:style-name="T16">Sign</text:span><text:span text:style-name="T21">=255 bedeutet, dass kein Vorzeichenbit vorhanden ist und 15 bedeutet, dass Bit 15 im DWORD das Vorzeichen enthält. Der Vorgabewert für SIGN ist 255. LOW und HIGH definieren den kleinsten und höchsten Ausgangswert. Ist ein </text:span><text:span text:style-name="T16">Sign-</text:span><text:span text:style-name="T21">Bit definiert (SIGN &lt; 255), dann müssen LOW und HIGH positiv sein. Ohne </text:span><text:span text:style-name="T16">Sign-</text:span><text:span text:style-name="T21">Bit können Sie sowohl positiv als auch negativ sein.</text:span></text:p>
      <text:p text:style-name="P73">Beispiel:</text:p>
      <text:p text:style-name="P173"><text:span text:style-name="T21">Ein 12 Bit A/D Wandler ohne Vorzeichen und Eingangsbereich 0 – 10 wird wie folgt definiert: Bits=12, </text:span><text:span text:style-name="T16">Sign</text:span><text:span text:style-name="T21">=255, LOW=0, HIGH=10.</text:span></text:p>
      <text:p text:style-name="P173"><text:soft-page-break/><text:span text:style-name="T21">Ein 14 Bit A/D Wandler mit Vorzeichen in Bit 14 und Eingangsbereich -10 - +10 wird folgendermaßen definiert: Bits=14, </text:span><text:span text:style-name="T16">Sign</text:span><text:span text:style-name="T21">=14, LOW=0, HIGH=+10.</text:span></text:p>
      <text:p text:style-name="P173"><text:span text:style-name="T21">Ein 24 Bit A/D Wandler ohne Vorzeichen und Eingangsbereich -10 - +10 wird folgendermaßen definiert: Bits=24, </text:span><text:span text:style-name="T16">Sign</text:span><text:span text:style-name="T21">=255, LOW=-10, HIGH=+10.</text:span></text:p>
      <text:list xml:id="list38471602" text:continue-numbering="true" text:style-name="L1">
        <text:list-item>
          <text:list>
            <text:list-item>
              <text:h text:style-name="P216" text:outline-level="2"><text:alphabetical-index-mark-start text:id="IMark225902392"/>AIN1<text:alphabetical-index-mark-end text:id="IMark225902392"/></text:h>
            </text:list-item>
          </text:list>
        </text:list-item>
      </text:list>
      <text:p text:style-name="P69">Type<text:tab/>Funktionsbaustein</text:p>
      <text:p text:style-name="P173"><text:span text:style-name="T15">Input</text:span><text:span text:style-name="T14"><text:tab/>IN : DWORD (Eingang vom A/D Wandler)</text:span></text:p>
      <text:p text:style-name="P73">Output<text:tab/>OUT :REAL (Ausgangswert)</text:p>
      <text:p text:style-name="P73">Config<text:tab/>SIGN_BIT : INT (Bitnummer des Vorzeichens)</text:p>
      <text:p text:style-name="P73"><text:tab/>ERROR_BIT : INT (Bitnummer des Fehlerbits)</text:p>
      <text:p text:style-name="P173"><text:span text:style-name="T21"><text:tab/>ERROR_CODE_EN : BOOL (Auswertung des </text:span><text:span text:style-name="T16">Error</text:span><text:span text:style-name="T21"> Codes Ein)</text:span></text:p>
      <text:p text:style-name="P183"><text:tab/>ERROR_CODE : DWORD (Fehlercode des Eingangs IN)</text:p>
      <text:p text:style-name="P173"><text:span text:style-name="T21"><text:tab/>OVERFLOW_BIT : INT (Bitnummer des </text:span><text:span text:style-name="T16">Overflow</text:span><text:span text:style-name="T21"> Bits)</text:span></text:p>
      <text:p text:style-name="P173"><text:span text:style-name="T21"><text:tab/>OVERFLOW_CODE_EN : BOOL (</text:span><text:span text:style-name="T16">Overflow</text:span><text:span text:style-name="T21"> Codes Auswertung Ein)</text:span></text:p>
      <text:p text:style-name="P173"><text:span text:style-name="T21"><text:tab/>OVERFLOW_CODE : DWORD (</text:span><text:span text:style-name="T16">Overflow</text:span><text:span text:style-name="T21"> Code des Eingangs IN)</text:span></text:p>
      <text:p text:style-name="P183"><text:tab/>BIT_0 : INT (Bitnummer des niederwertigsten Datenbits)</text:p>
      <text:p text:style-name="P183"><text:tab/>BIT_N : INT (Bitnummer des höchstwertigsten Datenbits)</text:p>
      <text:p text:style-name="P183"><text:tab/>OUT_MIN : REAL (Ausgangswert bei CODE_MIN)</text:p>
      <text:p text:style-name="P183"><text:tab/>OUT_MAX : REAL (Ausgangswert bei CODE_MAX)</text:p>
      <text:p text:style-name="P183"><text:tab/>CODE_MIN : DWORD (Minimaler Eingangswert)</text:p>
      <text:p text:style-name="P183"><text:tab/>CODE_MAX : DWORD (Maximaler Eingangswert)</text:p>
      <text:p text:style-name="P183"><text:tab/>ERROR_OUTPUT : REAL (Ausgangswert der bei ERROR)</text:p>
      <text:p text:style-name="P183"><draw:frame draw:style-name="fr3" draw:name="Grafik477" text:anchor-type="paragraph" svg:x="1.094cm" svg:y="0.661cm" svg:width="3.69cm" svg:height="2.311cm" draw:z-index="459"><draw:image xlink:href="Pictures/1000000000000117000000AF85604DC6.png" xlink:type="simple" xlink:show="embed" xlink:actuate="onLoad"/></draw:frame><text:tab/>OVERFLOW_OUTPUT: REAL <text:s/>(Ausgangswert der Bei OVERFLOW)</text:p>
      <text:p text:style-name="P183"><text:line-break/>AIN1 setzt den Digitalen Ausgangswert eines A/D Wandlers in einen dem <text:soft-page-break/>Messwert entsprechenden REAL Wert um. Der Baustein kann mittels Config Variablen auf die unterschiedlichsten Digitalwandler angepasst werden.</text:p>
      <text:p text:style-name="P173"><draw:frame draw:style-name="fr11" draw:name="Grafik478" text:anchor-type="paragraph" svg:x="9.245cm" svg:y="0.326cm" svg:width="7.699cm" svg:height="7.121cm" draw:z-index="460"><draw:image xlink:href="Pictures/10000000000001840000016747CDA32D.png" xlink:type="simple" xlink:show="embed" xlink:actuate="onLoad"/></draw:frame><text:span text:style-name="T21">Ein SIGN_BIT legt fest an welchen Bit der D/A Wandler das Vorzeichen übermittelt. Wird diese Variable nicht definiert oder auf einen Wert größer 31 gesetzt so wird kein Vorzeichen ausgewertet. Der Inhalt des SIGN_BIT wird am Ausgang SIGN angezeigt. Wird ein ERROR_BIT spezifiziert, wird der Inhalt des </text:span><text:span text:style-name="T16">Error</text:span><text:span text:style-name="T21"> Bits am Ausgang ERROR angezeigt. Manche A/D Wandler liefern anstatt eines </text:span><text:span text:style-name="T16">Error</text:span><text:span text:style-name="T21"> Bits einen festgelegten Ausgangswert der außerhalb des spezifizierten Messbereichs liegt und Signalisieren dadurch einen Fehler. Mit der Setup Variablen ERROR_CODE wird der entsprechende </text:span><text:span text:style-name="T16">Error</text:span><text:span text:style-name="T21"> Code spezifiziert und mit ERROR_CODE_EN wird die Auswertung des ERROR_CODE Festgelegt. Wenn ERROR = TRUE wird am Ausgang OUT der Wert <text:s/>ERROR_OUTPUT ausgegeben. Mithilfe des OVERFLOW_BITS wird eine Bereichsüberschreitung des D/A Wandlers signalisiert und am Ausgang OVERFLOW ausgegeben. Mithilfe der Setup Variablen OVERFLOW_CODE_EN und OVERFLOW_CODE kann ein bestimmter Code am Eingang IN abgefragt werden und bei Auftreten dieses Codes das </text:span><text:span text:style-name="T16">Overflow</text:span><text:span text:style-name="T21"> Bit gesetzt werden. Zusätzlich zum OVERFLOW_BIT kann mittels CODE_MIN und CODE_MAX ein zulässiger Bereich für die Eingangsdaten spezifiziert werden. Wird dieser Bereich über- beziehungsweise unter-schritten wird ebenfalls der OVERFLOW Ausgang gesetzt. Bei einem Überlauf wird am Ausgang OUT der Wert OVERFLOW_OUTPUT ausgegeben. Die Setup Variablen BIT_0 und BIT_N legen fest wie der D/A Wandler den Messwert <text:s text:c="2"/>Bereitstellt. Mit Bit_0 wird festgelegt bei welchem Bit das Datenwort beginnt und mit BIT_N an welchem Bit das Datenwort endet. Im obigen Beispiel wird das Datenwort von Bit 3 bis Bit 14 übertragen (Bit 3 = Bit 0 des Datenwortes und Bit 14 = Bit 12 des Datenwortes). Das empfangene Datenwort wird entsprechend den Config Variablen CODE_MIN, CODE_MAX und OUT_MIN, OUT_MAX umgerechnet und falls ein Vorzeichen vorhanden ist wird wenn SIGN = TRUE der Ausgangswert an OUT invertiert.</text:span></text:p>
      <text:p text:style-name="P183"/>
      <text:p text:style-name="P183"/>
      <text:list xml:id="list38462819" text:continue-numbering="true" text:style-name="L1">
        <text:list-item>
          <text:list>
            <text:list-item>
              <text:h text:style-name="P216" text:outline-level="2"><text:soft-page-break/><text:alphabetical-index-mark-start text:id="IMark225902392"/>AOUT<text:alphabetical-index-mark-end text:id="IMark225902392"/></text:h>
            </text:list-item>
          </text:list>
        </text:list-item>
      </text:list>
      <text:p text:style-name="P69">Type<text:tab/>Funktion</text:p>
      <text:p text:style-name="P66"><text:span text:style-name="T15">Input</text:span><text:span text:style-name="T14"><text:tab/>IN : REAL (Eingangswert)</text:span></text:p>
      <text:p text:style-name="P73">Output<text:tab/>DWORD (Ausgangswort zum A/D Wandler)</text:p>
      <text:p text:style-name="P73">Config<text:tab/>BITS : Byte (Anzahl der Bits, 16 für ein komplettes Wort)</text:p>
      <text:p text:style-name="P66"><text:span text:style-name="T21"><text:tab/>SIGN : Byte (</text:span><text:span text:style-name="T16">Sign</text:span><text:span text:style-name="T21"> Bit, 15 für Bit 15)</text:span></text:p>
      <text:p text:style-name="P73"><text:tab/>LOW : REAL (kleinster Wert des Eingangs)</text:p>
      <text:p text:style-name="P73"><draw:frame draw:style-name="fr3" draw:name="Grafik141" text:anchor-type="paragraph" svg:x="1.221cm" svg:y="0.649cm" svg:width="2.281cm" svg:height="1.12cm" draw:z-index="107"><draw:image xlink:href="Pictures/10000000000000AC000000559A97C158.png" xlink:type="simple" xlink:show="embed" xlink:actuate="onLoad"/></draw:frame><text:tab/>HIGH : REAL (größter Wert des Eingangs)</text:p>
      <text:p text:style-name="P66"><text:span text:style-name="T21"><text:line-break/>Eingänge von D/A Wandlern benötigen in der Regel ein WORD (16 Bit) oder DWORD (32 Bit), wobei Sie selbst meist nicht 16 Bit oder 32 Bit Auflösung haben. Weiterhin erzeugen D/A Wandler einen festen Ausgangsbereich (z B. -10 .. + 10 V) was zum Beispiel mit den digitalen Werten 0 .. 65535 (Bei 16 Bit) repräsentiert wird. Die Funktion AOUT wird durch Setup-Parameter konfiguriert und rechnet die Eingangswerte (IN) entsprechend um, sodass nach dem Modul AOUT ein digitaler Wert zur Verfügung steht, der am Ausgang des D/A Wandlers einen Wert erzeugt, der mit dem REAL-Wert IN übereinstimmt. Weiterhin kann das Modul ein </text:span><text:span text:style-name="T16">Sign-</text:span><text:span text:style-name="T21">Bit an beliebiger Stelle einfügen falls der D/A Wandler ein </text:span><text:span text:style-name="T16">Sign-</text:span><text:span text:style-name="T21">Bit benötigt. Durch einen Doppelklick auf den Baustein können mehrere Setup-Variablen gesetzt werden. Bits definiert wie viele Bits der D/A Wandler verarbeiten kann. Für einen 12 Bit Wandler ist dieser Wert 12. Es werden dann nur die Bits 0 – 11 belegt. </text:span><text:span text:style-name="T16">Sign</text:span><text:span text:style-name="T21"> definiert, ob ein Vorzeichenbit benötigt wird und wo im Ausgangs-DWORD es zu platzieren ist. </text:span><text:span text:style-name="T16">Sign</text:span><text:span text:style-name="T21">=255 bedeutet, dass kein Vorzeichenbit benötigt wird, und 15 bedeutet das Bit 15 im DWORD das Vorzeichen enthält. LOW und HIGH definieren den kleinsten und höchsten Eingangswert. Ist ein </text:span><text:span text:style-name="T16">Sign-</text:span><text:span text:style-name="T21">Bit definiert, so müssen LOW und HIGH positiv sein. Ohne </text:span><text:span text:style-name="T16">Sign-</text:span><text:span text:style-name="T21">Bit können Sie sowohl positiv als auch negativ sein.</text:span></text:p>
      <text:p text:style-name="P2"><text:span text:style-name="T11">Beispiele</text:span>:</text:p>
      <text:p text:style-name="P173"><text:span text:style-name="T21">Ein 12 Bit D/A Wandler ohne Vorzeichen und Ausgangsbereich 0 – 10 wird wie folgt definiert: Bits=12, </text:span><text:span text:style-name="T16">Sign</text:span><text:span text:style-name="T21">=255, LOW=0, HIGH=10.</text:span></text:p>
      <text:p text:style-name="P173"><text:span text:style-name="T21">Ein 14 Bit D/A Wandler mit Vorzeichen in Bit 14 und Ausgangsbereich -10 - +10 wird folgendermaßen definiert: Bits=14, </text:span><text:span text:style-name="T16">Sign</text:span><text:span text:style-name="T21">=14, LOW=0, HIGH=+10.</text:span></text:p>
      <text:p text:style-name="P173"><text:span text:style-name="T21">Ein 24 Bit D/A Wandler ohne Vorzeichen und Ausgangsbereich -10 - +10 wird folgendermaßen definiert: Bits=24, </text:span><text:span text:style-name="T16">Sign</text:span><text:span text:style-name="T21">=255, LOW=-10, HIGH=+10.</text:span></text:p>
      <text:list xml:id="list38472970" text:continue-numbering="true" text:style-name="L1">
        <text:list-item>
          <text:list>
            <text:list-item>
              <text:h text:style-name="P216" text:outline-level="2"><text:soft-page-break/><text:alphabetical-index-mark-start text:id="IMark225902392"/>AOUT1<text:alphabetical-index-mark-end text:id="IMark225902392"/></text:h>
            </text:list-item>
          </text:list>
        </text:list-item>
      </text:list>
      <text:p text:style-name="P69">Type<text:tab/>Funktion</text:p>
      <text:p text:style-name="P66"><text:span text:style-name="T15">Input</text:span><text:span text:style-name="T14"><text:tab/>IN : REAL (Eingangswert)</text:span></text:p>
      <text:p text:style-name="P73">Output<text:tab/>DWORD (Ausgangswort zum A/D Wandler)</text:p>
      <text:p text:style-name="P73">Config<text:tab/>BIT_0 : INT (Stelle des niederwertigesten Bits des Datenwortes)</text:p>
      <text:p text:style-name="P73"><text:tab/>BIT_N : INT (Stelle des höchstwertigsten Bits des Datenwortes)</text:p>
      <text:p text:style-name="P66"><text:span text:style-name="T21"><text:tab/>SIGN : INT (</text:span><text:span text:style-name="T16">Sign</text:span><text:span text:style-name="T21"> Bit, 15 für Bit 15)</text:span></text:p>
      <text:p text:style-name="P73"><text:tab/>LOW : REAL (kleinster Wert des Eingangs)</text:p>
      <text:p text:style-name="P73"><draw:frame draw:style-name="fr3" draw:name="Grafik479" text:anchor-type="paragraph" svg:x="1.085cm" svg:y="0.672cm" svg:width="2.9cm" svg:height="0.99cm" draw:z-index="461"><draw:image xlink:href="Pictures/10000000000000DB0000004BBACCFD16.png" xlink:type="simple" xlink:show="embed" xlink:actuate="onLoad"/></draw:frame><text:tab/>HIGH : REAL (größter Wert des Eingangs)</text:p>
      <text:p text:style-name="P183"/>
      <text:p text:style-name="P183"><draw:frame draw:style-name="fr12" draw:name="Grafik480" text:anchor-type="paragraph" svg:x="9.269cm" svg:y="0.542cm" svg:width="7.721cm" svg:height="7.14cm" draw:z-index="462"><draw:image xlink:href="Pictures/10000000000001850000016812774F4D.png" xlink:type="simple" xlink:show="embed" xlink:actuate="onLoad"/></draw:frame>AOUT1 erzeugt aus dem REAL Eingangswert IN einen digitalen Ausgangswert für D/A Wandler oder andere Ausgangsbausteine die Digitale Daten verarbeiten. Mittels Config Variablen kann der digitale Ausgangswert an verschiedenste Bedürfnisse angepasst werden. Der Eingangswert IN wird mittels den Angaben in LOW und HIGH sowie der mit BIT_0 und BIT_N spezifizierten Länge Des Datenwortes umgewandelt und am Ausgang bereitgestellt. BIT_0 spezifiziert die Position des niderwertigsten (Bit0) Datenbits in den Ausgangsdaten und BIT_N spezifiziert die Position des höchstwertigen Datenbits in den Ausgangsdaten. Die Länge des Datenbereichs wird durch BIT_N - BIT_0 + 1 automatisch errechnet. Wenn mit SIGN die Position eines Vorzeichen Bits angegeben wird so wird das Vorzeichen aus dem Eingangswert auf die spezifizierte Position von SIGN in den Ausgangsdaten kopiert.</text:p>
      <text:p text:style-name="P183"/>
      <text:list xml:id="list38473470" text:continue-numbering="true" text:style-name="L1">
        <text:list-item>
          <text:list>
            <text:list-item>
              <text:h text:style-name="P216" text:outline-level="2"><text:soft-page-break/><text:alphabetical-index-mark-start text:id="IMark225902392"/>BYTE_TO_RANGE<text:alphabetical-index-mark-end text:id="IMark225902392"/></text:h>
            </text:list-item>
          </text:list>
        </text:list-item>
      </text:list>
      <text:p text:style-name="P69">Type<text:tab/>Funktion</text:p>
      <text:p text:style-name="P66"><text:span text:style-name="T15">Input</text:span><text:span text:style-name="T14"><text:tab/>IN : BYTE (Eingangswert)</text:span></text:p>
      <text:p text:style-name="P179"><text:tab/>LOW : REAL (Ausgangswert bei X = 0)</text:p>
      <text:p text:style-name="P179"><text:tab/>HIGH : REAL (Ausgangswert bei X = 255)</text:p>
      <text:p text:style-name="P73"><draw:frame draw:style-name="fr3" draw:name="Grafik432" text:anchor-type="paragraph" svg:x="1.069cm" svg:y="0.667cm" svg:width="5.669cm" svg:height="1.79cm" draw:z-index="411"><draw:image xlink:href="Pictures/10000000000001AD00000087E5252AB9.png" xlink:type="simple" xlink:show="embed" xlink:actuate="onLoad"/></draw:frame>Output<text:tab/>REAL (Ausgangswert)</text:p>
      <text:p text:style-name="P183"><text:line-break/>BYTE_TO_RANGE wandelt einen BYTE Wert in einen REAL. Ein Eingangswert von 0 entspricht dabei dem REAL Wert von LOW und eine Eingangswert von 255 entspricht dem Eingangswert von HIGH.</text:p>
      <text:p text:style-name="P183">Um einen BYTE Wert von 0..255 in einen Prozentwert von 0..100 zu Wandeln wird der Baustein wie folgt aufgerufen:</text:p>
      <text:p text:style-name="P183">BYTE_TO_RANGE(X,0,100)</text:p>
      <text:list xml:id="list38449041" text:continue-numbering="true" text:style-name="L1">
        <text:list-item>
          <text:list>
            <text:list-item>
              <text:h text:style-name="P216" text:outline-level="2"><text:alphabetical-index-mark-start text:id="IMark225902392"/>DELAY<text:alphabetical-index-mark-end text:id="IMark225902392"/></text:h>
            </text:list-item>
          </text:list>
        </text:list-item>
      </text:list>
      <text:p text:style-name="P69">Type<text:tab/>Funktionsbaustein</text:p>
      <text:p text:style-name="P66"><text:span text:style-name="T15">Input</text:span><text:span text:style-name="T14"><text:tab/>IN : REAL (Eingangswert)</text:span></text:p>
      <text:p text:style-name="P66"><text:span text:style-name="T14"><text:tab/>N : INT (Anzahl der </text:span>Verzögerungs<text:span text:style-name="T14"> Zyklen)</text:span></text:p>
      <text:p text:style-name="P69"><text:tab/>RST : BOOL (asynchroner Reset)</text:p>
      <text:p text:style-name="P73"><draw:frame draw:style-name="fr3" draw:name="Grafik142" text:anchor-type="paragraph" svg:x="1.097cm" svg:y="0.647cm" svg:width="2.281cm" svg:height="2.2cm" draw:z-index="108"><draw:image xlink:href="Pictures/10000000000000AC000000A645DC3564.png" xlink:type="simple" xlink:show="embed" xlink:actuate="onLoad"/></draw:frame>Output<text:tab/>OUT : REAL (verzögerter Ausgangswert)</text:p>
      <text:p text:style-name="P66"><text:span text:style-name="T21"><text:line-break/>DELAY verzögert ein Eingangssignal (in) um N Zyklen. Der Eingang Reset ist asynchron und kann jederzeit den </text:span><text:span text:style-name="T16">Delay</text:span><text:span text:style-name="T21"> Puffer löschen.</text:span></text:p>
      <text:p text:style-name="P2"><draw:frame draw:style-name="fr3" draw:name="Grafik143" text:anchor-type="paragraph" svg:x="1.044cm" svg:y="1.136cm" svg:width="14.33cm" svg:height="5.851cm" draw:z-index="109"><draw:image xlink:href="Pictures/100000000000043B000001BAF6D56643.png" xlink:type="simple" xlink:show="embed" xlink:actuate="onLoad"/></draw:frame>Das <text:span text:style-name="T11">Beispiel</text:span> zeigt einen Generator, der Impulse von 5 nach 10 erzeugt und ein <text:span text:style-name="T2">Delay,</text:span> das 10 Zyklen Verzögerung erzeugt.</text:p>
      <text:p text:style-name="P37"><text:soft-page-break/></text:p>
      <text:p text:style-name="P37"><draw:frame draw:style-name="fr3" draw:name="Grafik144" text:anchor-type="paragraph" svg:x="1.113cm" svg:y="0.056cm" svg:width="15.371cm" svg:height="3.859cm" draw:z-index="559"><draw:image xlink:href="Pictures/10000000000003C8000000F3E6D7164C.png" xlink:type="simple" xlink:show="embed" xlink:actuate="onLoad"/></draw:frame></text:p>
      <text:list xml:id="list38463747" text:continue-numbering="true" text:style-name="L1">
        <text:list-item>
          <text:list>
            <text:list-item>
              <text:h text:style-name="P216" text:outline-level="2"><text:alphabetical-index-mark-start text:id="IMark225902392"/>DELAY_4<text:alphabetical-index-mark-end text:id="IMark225902392"/></text:h>
            </text:list-item>
          </text:list>
        </text:list-item>
      </text:list>
      <text:p text:style-name="P69">Type<text:tab/>Funktionsbaustein</text:p>
      <text:p text:style-name="P66"><text:span text:style-name="T15">Input</text:span><text:span text:style-name="T14"><text:tab/>IN : REAL (Eingangswert)</text:span></text:p>
      <text:p text:style-name="P73">Output<text:tab/>OUT1 : REAL (um 1 Zyklus verzögerter Ausgangswert)</text:p>
      <text:p text:style-name="P73"><text:tab/>OUT2 : REAL (um 2 Zyklen verzögerter Ausgangswert)</text:p>
      <text:p text:style-name="P73"><text:tab/>OUT3 : REAL (um 3 Zyklen verzögerter Ausgangswert)</text:p>
      <text:p text:style-name="P73"><draw:frame draw:style-name="fr3" draw:name="Grafik145" text:anchor-type="paragraph" svg:x="1.117cm" svg:y="0.67cm" svg:width="2.281cm" svg:height="2.649cm" draw:z-index="110"><draw:image xlink:href="Pictures/10000000000000AC000000C8FB82DB55.png" xlink:type="simple" xlink:show="embed" xlink:actuate="onLoad"/></draw:frame><text:tab/>OUT4 : REAL (um 4 Zyklen verzögerter Ausgangswert)</text:p>
      <text:p text:style-name="P66"><text:span text:style-name="T21"><text:line-break/>DELAY_4 verzögert eine Eingangssignal um maximal 4 Zyklen. An den Ausgängen Out1..4 stehen die letzten 4 Werte zur Verfügung. Out1 ist um </text:span><text:soft-page-break/><text:span text:style-name="T21">einen Zyklus verzögert, Qut2 um 2 Zyklen, Out3 um 3 Zyklen und Out4 um 4 Zyklen.</text:span></text:p>
      <text:p text:style-name="P2"><draw:frame draw:style-name="fr3" draw:name="Grafik146" text:anchor-type="paragraph" svg:x="1.048cm" svg:y="0.596cm" svg:width="13.88cm" svg:height="6.309cm" draw:z-index="176"><draw:image xlink:href="Pictures/1000000000000419000001DD17B7B257.png" xlink:type="simple" xlink:show="embed" xlink:actuate="onLoad"/></draw:frame><text:span text:style-name="T11">Beispiel</text:span>:</text:p>
      <text:p text:style-name="P184"/>
      <text:p text:style-name="P184"><draw:frame draw:style-name="fr3" draw:name="Grafik147" text:anchor-type="paragraph" svg:x="0.875cm" svg:y="0.132cm" svg:width="16.108cm" svg:height="6.152cm" draw:z-index="111"><draw:image xlink:href="Pictures/10000000000003C600000171A1B13335.png" xlink:type="simple" xlink:show="embed" xlink:actuate="onLoad"/></draw:frame></text:p>
      <text:p text:style-name="P184"/>
      <text:p text:style-name="P184"/>
      <text:p text:style-name="P184"/>
      <text:p text:style-name="P184"/>
      <text:p text:style-name="P184"/>
      <text:list xml:id="list38470124" text:continue-numbering="true" text:style-name="L1">
        <text:list-item>
          <text:list>
            <text:list-item>
              <text:h text:style-name="P216" text:outline-level="2"><text:soft-page-break/><text:alphabetical-index-mark-start text:id="IMark225902392"/><text:alphabetical-index-mark-start text:id="IMark229906200"/>FADE<text:alphabetical-index-mark-end text:id="IMark229906200"/><text:alphabetical-index-mark-end text:id="IMark225902392"/></text:h>
            </text:list-item>
          </text:list>
        </text:list-item>
      </text:list>
      <text:p text:style-name="P69">Type<text:tab/>Funktionsbaustein</text:p>
      <text:p text:style-name="P173"><text:span text:style-name="T15">Input</text:span><text:span text:style-name="T14"><text:tab/>IN1 : REAL (Eingangswert 1)</text:span></text:p>
      <text:p text:style-name="P179"><text:tab/>IN2 : REAL (Eingangswert 2)</text:p>
      <text:p text:style-name="P179"><text:tab/>F : BOOL (Auswahl Eingang TRUE = IN2)</text:p>
      <text:p text:style-name="P179"><text:tab/>TF : TIME (Überblendzeit)</text:p>
      <text:p text:style-name="P179"><text:tab/>RST : BOOL (Asynchroner Reset)</text:p>
      <text:p text:style-name="P73"><draw:frame draw:style-name="fr3" draw:name="Grafik87" text:anchor-type="paragraph" svg:x="1.113cm" svg:y="0.667cm" svg:width="2.101cm" svg:height="2.709cm" draw:z-index="400"><draw:image xlink:href="Pictures/100000000000009F000000CDDD347162.png" xlink:type="simple" xlink:show="embed" xlink:actuate="onLoad"/></draw:frame>Output<text:tab/>Y : REAL (Ausgangswert)</text:p>
      <text:p text:style-name="P183"><text:line-break/>FADE wird benutzt um zwischen 2 Eingängen IN1 und IN2 mit einem weichen Übergang umzuschalten. Die Umschaltzeit wird dabei mit TF angegeben. Ein asynchroner Reset (RST) setzt den Baustein ohne Verzögerung auf IN1 wenn F = FALSE oder auf IN2 wenn F = TRUE. Ein Umschaltvorgang wird durch eine Wertänderung an F ausgelöst. Anschließend wird innerhalb der Zeit TF zwischen den beiden Eingängen Umgeschaltet. Die Umschaltung erfolgt indem während der Umschaltzeit die beiden Eingänge gemischt werden. Am Anfang der Umschaltzeit stehen am Ausgang 0% des neuen Wertes und 100% des alten Wertes an. nach der halben Umschaltzeit (TF/2) ist der Ausgang jeweils 50% der beiden Eingangswerte ( Y = in1*0.5 + in2*0.5). nach Ablauf der Zeit TF liegt dann am Ausgang der neue Wert zu 100% an.</text:p>
      <text:p text:style-name="P183">Während der Umschaltzeit beträgt der Ausgang Y:</text:p>
      <text:p text:style-name="P183">Y = TU/TF * IN1 + (1 - TU/TF) * IN2.</text:p>
      <text:p text:style-name="P183">TU ist dabei die seit Beginn der Umschaltung vergangene Zeit.</text:p>
      <text:p text:style-name="P183">Da der Ausgang von FADE dynamisch berechnet wird kann der Baustein auch zur Umschaltung von dynamischen Signalen verwendet werden. Die Umschaltung wird in bis zu 65535 Stufen eingeteilt, die jedoch durch die Zykluszeit der SPS begrenzt werden können. Eine SPS mit einer Zykluszeit von 10ms und einer TF von einer Sekunde wird lediglich in 1s/10ms = 100 Stufen Umschalten.</text:p>
      <text:list xml:id="list38462934" text:continue-numbering="true" text:style-name="L1">
        <text:list-item>
          <text:list>
            <text:list-item>
              <text:h text:style-name="P216" text:outline-level="2"><text:soft-page-break/><text:alphabetical-index-mark-start text:id="IMark225902392"/>FILTER_DW<text:alphabetical-index-mark-end text:id="IMark225902392"/></text:h>
            </text:list-item>
          </text:list>
        </text:list-item>
      </text:list>
      <text:p text:style-name="P69">Type<text:tab/>Funktion : DWORD</text:p>
      <text:p text:style-name="P173"><text:span text:style-name="T15">Input</text:span><text:span text:style-name="T14"><text:tab/>X : DWORD (Eingangswert)</text:span></text:p>
      <text:p text:style-name="P179"><text:tab/>T : TIME (Zeitkonstante des Filters)</text:p>
      <text:p text:style-name="P73"><draw:frame draw:style-name="fr3" draw:name="Grafik698" text:anchor-type="paragraph" svg:x="1.046cm" svg:y="0.672cm" svg:width="2.731cm" svg:height="1.75cm" draw:z-index="699"><draw:image xlink:href="Pictures/10000000000000CE000000847B8082B2.png" xlink:type="simple" xlink:show="embed" xlink:actuate="onLoad"/></draw:frame>Output<text:tab/>Y : DWORD (gefilterter Wert)</text:p>
      <text:p text:style-name="P69"><text:line-break/>FILTER_DW ist ein Filter ersten Grades für 32 Bit DWORD Daten. Die Hauptanwendung ist das Filtern von Sensorsignalen zur Rauschunterdrückung. Die grundlegende Funktionalität eines Filters ersten Grades kann beim Baustein FT_PT1 nachgelesen werden.</text:p>
      <text:list xml:id="list38467219" text:continue-numbering="true" text:style-name="L1">
        <text:list-item>
          <text:list>
            <text:list-item>
              <text:h text:style-name="P216" text:outline-level="2"><text:alphabetical-index-mark-start text:id="IMark225902392"/>FILTER_I<text:alphabetical-index-mark-end text:id="IMark225902392"/></text:h>
            </text:list-item>
          </text:list>
        </text:list-item>
      </text:list>
      <text:p text:style-name="P69">Type<text:tab/>Funktion : INT</text:p>
      <text:p text:style-name="P173"><text:span text:style-name="T15">Input</text:span><text:span text:style-name="T14"><text:tab/>X : DWORD (Eingangswert)</text:span></text:p>
      <text:p text:style-name="P179"><text:tab/>T : TIME (Zeitkonstante des Filters)</text:p>
      <text:p text:style-name="P73"><draw:frame draw:style-name="fr3" draw:name="Grafik736" text:anchor-type="paragraph" svg:x="1.025cm" svg:y="0.676cm" svg:width="2.499cm" svg:height="1.52cm" draw:z-index="779"><draw:image xlink:href="Pictures/10000000000000BD00000073409BB70D.png" xlink:type="simple" xlink:show="embed" xlink:actuate="onLoad"/></draw:frame>Output<text:tab/>Y : DWORD (gefilterter Wert)</text:p>
      <text:p text:style-name="P69"><text:line-break/>FILTER_I ist ein Filter ersten Grades für 16 Bit INT Daten. Die Hauptanwendung ist das Filtern von Sensorsignalen zur Rauschunterdrückung. Die grundlegende Funktionalität eines Filters ersten Grades kann beim Baustein FT_PT1 nachgelesen werden.</text:p>
      <text:p text:style-name="P179"/>
      <text:list xml:id="list38467633" text:continue-numbering="true" text:style-name="L1">
        <text:list-item>
          <text:list>
            <text:list-item>
              <text:h text:style-name="P216" text:outline-level="2"><text:soft-page-break/><text:alphabetical-index-mark-start text:id="IMark225902392"/>FILTER_MAV_DW<text:alphabetical-index-mark-end text:id="IMark225902392"/></text:h>
            </text:list-item>
          </text:list>
        </text:list-item>
      </text:list>
      <text:p text:style-name="P66">Type<text:tab/>Funktion : DWORD</text:p>
      <text:p text:style-name="P173"><text:span text:style-name="T15">Input</text:span><text:tab/>X : DWORD (Eingangswert)</text:p>
      <text:p text:style-name="P173"><text:tab/>N : UINT (Anzahl der ermittelten Werte)</text:p>
      <text:p text:style-name="P173"><text:tab/>RST : BOOL (asynchroner Reset Eingang)</text:p>
      <text:p text:style-name="P77"><draw:frame draw:style-name="fr3" draw:name="Grafik700" text:anchor-type="paragraph" svg:x="1.023cm" svg:y="0.699cm" svg:width="3.62cm" svg:height="2.2cm" draw:z-index="702"><draw:image xlink:href="Pictures/1000000000000112000000A61160D7F2.png" xlink:type="simple" xlink:show="embed" xlink:actuate="onLoad"/></draw:frame>Output<text:tab/>Y : DWORD (gefilterter Wert)</text:p>
      <text:p text:style-name="P173"><text:span text:style-name="T19"><text:line-break/>FILTER_MAV_DW ist ein Filter mit gleitendem Mittelwert. Beim Filter mit gleitendem Mittelwert (auch </text:span><text:span text:style-name="T16">Moving</text:span><text:span text:style-name="T19"> </text:span><text:span text:style-name="T16">Average</text:span><text:span text:style-name="T19"> Filter genannt) wird der Mittelwert von N aufeinander folgenden Messwerten als Mittelwert ausgegeben.</text:span></text:p>
      <text:p text:style-name="P173"><text:span text:style-name="T19">Y:= (X</text:span>0<text:span text:style-name="T19"> + X</text:span>1<text:span text:style-name="T19"> + … + X</text:span>n-1) / N</text:p>
      <text:p text:style-name="P188">X0 ist der Wert X im momentanen Zyklus, X1 ist der Wert im Zyklus davor usw. Die Anzahl der Werte über die der Mittelwert gebildet werden soll wird am Eingang N spezifiziert, der Wertebereich von N liegt zwischen 1 und 32.</text:p>
      <text:list xml:id="list38460768" text:continue-numbering="true" text:style-name="L1">
        <text:list-item>
          <text:list>
            <text:list-item>
              <text:h text:style-name="P216" text:outline-level="2"><text:alphabetical-index-mark-start text:id="IMark225902392"/>FILTER_MAV_W<text:alphabetical-index-mark-end text:id="IMark225902392"/></text:h>
            </text:list-item>
          </text:list>
        </text:list-item>
      </text:list>
      <text:p text:style-name="P66">Type<text:tab/>Funktion : WORD</text:p>
      <text:p text:style-name="P173"><text:span text:style-name="T15">Input</text:span><text:tab/>X : WORD (Eingangswert)</text:p>
      <text:p text:style-name="P173"><text:tab/>N : UINT (Anzahl der ermittelten Werte)</text:p>
      <text:p text:style-name="P173"><text:tab/>RST : BOOL (asynchroner Reset Eingang)</text:p>
      <text:p text:style-name="P77"><draw:frame draw:style-name="fr3" draw:name="Grafik701" text:anchor-type="paragraph" svg:x="1.046cm" svg:y="0.676cm" svg:width="3.62cm" svg:height="2.2cm" draw:z-index="703"><draw:image xlink:href="Pictures/1000000000000112000000A693B15969.png" xlink:type="simple" xlink:show="embed" xlink:actuate="onLoad"/></draw:frame>Output<text:tab/>Y : WORD (gefilterter Wert)</text:p>
      <text:p text:style-name="P173"><text:span text:style-name="T19"><text:line-break/>FILTER_MAV_W ist ein Filter mit gleitendem Mittelwert. Beim Filter mit glei</text:span><text:span text:style-name="T19">tendem Mittelwert (auch </text:span><text:span text:style-name="T16">Moving</text:span><text:span text:style-name="T19"> </text:span><text:span text:style-name="T16">Average</text:span><text:span text:style-name="T19"> Filter genannt) wird der Mittelwert von N aufeinander folgenden Messwerten als Mittelwert ausgegeben.</text:span></text:p>
      <text:p text:style-name="P173"><text:soft-page-break/><text:span text:style-name="T19">Y:= (X</text:span>0<text:span text:style-name="T19"> + X</text:span>1<text:span text:style-name="T19"> + … + X</text:span>n-1) / N</text:p>
      <text:p text:style-name="P188">X0 ist der Wert X im momentanen Zyklus, X1 ist der Wert im Zyklus davor usw. Die Anzahl der Werte über die der Mittelwert gebildet werden soll wird am Eingang N spezifiziert, der Wertebereich von N liegt zwischen 1 und 32.</text:p>
      <text:list xml:id="list38445188" text:continue-numbering="true" text:style-name="L1">
        <text:list-item>
          <text:list>
            <text:list-item>
              <text:h text:style-name="P216" text:outline-level="2"><text:alphabetical-index-mark-start text:id="IMark225902392"/>FILTER_W<text:alphabetical-index-mark-end text:id="IMark225902392"/></text:h>
            </text:list-item>
          </text:list>
        </text:list-item>
      </text:list>
      <text:p text:style-name="P66">Type<text:tab/>Funktion : WORD</text:p>
      <text:p text:style-name="P173"><text:span text:style-name="T15">Input</text:span><text:tab/>X : WORD (Eingangswert)</text:p>
      <text:p text:style-name="P173"><text:tab/>T : TIME (Zeitkonstante des Filters)</text:p>
      <text:p text:style-name="P77"><draw:frame draw:style-name="fr3" draw:name="Grafik697" text:anchor-type="paragraph" svg:x="1.046cm" svg:y="0.654cm" svg:width="2.731cm" svg:height="1.75cm" draw:z-index="698"><draw:image xlink:href="Pictures/10000000000000CE00000084640D4D8C.png" xlink:type="simple" xlink:show="embed" xlink:actuate="onLoad"/></draw:frame>Output<text:tab/>Y : WORD (gefilterter Wert)</text:p>
      <text:p text:style-name="P177"><text:line-break/>FILTER_W ist ein Filter ersten Grades für 16 Bit WORD Daten. Die Hauptanwendung ist das Filtern von Sensorsignalen zur Rauschunterdrückung. Die grundlegende Funktionalität eines Filters ersten Grades kann beim Baustein FT_PT1 nachgelesen werden.</text:p>
      <text:list xml:id="list38448654" text:continue-numbering="true" text:style-name="L1">
        <text:list-item>
          <text:list>
            <text:list-item>
              <text:h text:style-name="P216" text:outline-level="2"><text:alphabetical-index-mark-start text:id="IMark225902392"/>FILTER_WAV<text:alphabetical-index-mark-end text:id="IMark225902392"/></text:h>
            </text:list-item>
          </text:list>
        </text:list-item>
      </text:list>
      <text:p text:style-name="P66">Type<text:tab/>Funktion : REAL</text:p>
      <text:p text:style-name="P173"><text:span text:style-name="T15">Input</text:span><text:tab/>X : DWORD (Eingangswert)</text:p>
      <text:p text:style-name="P173"><text:tab/>W : ARRAY[0..15] of REAL (Gewichtungsfaktoren)</text:p>
      <text:p text:style-name="P173"><text:tab/>RST : BOOL (asynchroner Reset Eingang)</text:p>
      <text:p text:style-name="P77"><draw:frame draw:style-name="fr3" draw:name="Grafik699" text:anchor-type="paragraph" svg:x="1.067cm" svg:y="0.653cm" svg:width="3.18cm" svg:height="2.2cm" draw:z-index="701"><draw:image xlink:href="Pictures/10000000000000F0000000A6812CBE1D.png" xlink:type="simple" xlink:show="embed" xlink:actuate="onLoad"/></draw:frame>Output<text:tab/>Y : REAL (gefilterter Wert)</text:p>
      <text:p text:style-name="P188"><text:soft-page-break/><text:line-break/>FILTER_WAV ist ein Filter mit gewichtetem Mittelwert. Beim Filter mit gewichteten Mittelwert (auch FIR Filter genannt) werden die einzelnen Werte im Puffer mit unterschiedlicher Gewichtung bewertet.</text:p>
      <text:p text:style-name="P188">Y:= X0 * W0 + X1 * W1 + ….+ X15 * W15</text:p>
      <text:p text:style-name="P188">X0 ist der Wert X im momentanen Zyklus, X1 ist der Wert im Zyklus davor usw. Die Faktoren W werden als Array dem Eingang W übergeben. Bei der Anwendung des FIR Filters ist darauf zu achten, dass geeignete Faktoren für die Gewichtung eingesetzt werden. Die Anwendung macht nur dann Sinn wenn diese Faktoren mit geeigneten Methoden oder Entwurfssoftware ermittelt werden.</text:p>
      <text:list xml:id="list38450401" text:continue-numbering="true" text:style-name="L1">
        <text:list-item>
          <text:list>
            <text:list-item>
              <text:h text:style-name="P216" text:outline-level="2"><text:alphabetical-index-mark-start text:id="IMark225902392"/>MIX<text:alphabetical-index-mark-end text:id="IMark225902392"/></text:h>
            </text:list-item>
          </text:list>
        </text:list-item>
      </text:list>
      <text:p text:style-name="P69">Type<text:tab/>Funktion : REAL</text:p>
      <text:p text:style-name="P173"><text:span text:style-name="T15">Input</text:span><text:span text:style-name="T14"><text:tab/>A : REAL (Eingangswert 1)</text:span></text:p>
      <text:p text:style-name="P179"><text:tab/>B : REAL (Eingangswert 2)</text:p>
      <text:p text:style-name="P179"><text:tab/>M : REAL (Mischungsverhältnis)</text:p>
      <text:p text:style-name="P73"><draw:frame draw:style-name="fr3" draw:name="Grafik387" text:anchor-type="paragraph" svg:x="1.046cm" svg:y="0.667cm" svg:width="2.281cm" svg:height="2.02cm" draw:z-index="361"><draw:image xlink:href="Pictures/10000000000000AC000000995328F442.png" xlink:type="simple" xlink:show="embed" xlink:actuate="onLoad"/></draw:frame>Output<text:tab/>REAL (Wert aus dem Mischungsverhältnis M zwischen A und B)</text:p>
      <text:p text:style-name="P173"><text:span text:style-name="T21"><text:line-break/>MIX stellt am Ausgang einen mit dem Mischungsverhältnis M gemischten </text:span><text:span text:style-name="T21">Wert aus A und B zur Verfügung. Der Eingang M gibt den Anteil vom B in Bereich 0..1 an.</text:span></text:p>
      <text:p text:style-name="P183">MIX = (M-1)*A + M*B</text:p>
      <text:list xml:id="list38450843" text:continue-numbering="true" text:style-name="L1">
        <text:list-item>
          <text:list>
            <text:list-item>
              <text:h text:style-name="P216" text:outline-level="2"><text:alphabetical-index-mark-start text:id="IMark225902392"/>MUX_R2<text:alphabetical-index-mark-end text:id="IMark225902392"/></text:h>
            </text:list-item>
          </text:list>
        </text:list-item>
      </text:list>
      <text:p text:style-name="P69">Type<text:tab/>Funktion</text:p>
      <text:p text:style-name="P66"><text:span text:style-name="T15">Input</text:span><text:span text:style-name="T14"><text:tab/>IN0 : REAL (Eingangswert 0)</text:span></text:p>
      <text:p text:style-name="P69"><text:soft-page-break/><text:tab/>IN1 : REAL (Eingangswert 1)</text:p>
      <text:p text:style-name="P69"><text:tab/>A : BOOL (Adresseingang)</text:p>
      <text:p text:style-name="P73"><draw:frame draw:style-name="fr3" draw:name="Grafik148" text:anchor-type="paragraph" svg:x="1.115cm" svg:y="0.616cm" svg:width="3.62cm" svg:height="2.02cm" draw:z-index="112"><draw:image xlink:href="Pictures/1000000000000112000000990BA29508.png" xlink:type="simple" xlink:show="embed" xlink:actuate="onLoad"/></draw:frame>Output<text:tab/>REAL (IN0 wenn A=0, IN1 wenn A=1)</text:p>
      <text:p text:style-name="P73"><text:line-break/>MUX_R2 wählt einen von 2 Eingangswerten aus. Die Funktion liefert den Wert von IN0 zurück, wenn A=0 und den Wert von IN1, wenn A=1.</text:p>
      <text:list xml:id="list38453907" text:continue-numbering="true" text:style-name="L1">
        <text:list-item>
          <text:list>
            <text:list-item>
              <text:h text:style-name="P216" text:outline-level="2"><text:alphabetical-index-mark-start text:id="IMark225902392"/>MUX_R4<text:alphabetical-index-mark-end text:id="IMark225902392"/></text:h>
            </text:list-item>
          </text:list>
        </text:list-item>
      </text:list>
      <text:p text:style-name="P69">Type<text:tab/>Funktion</text:p>
      <text:p text:style-name="P66"><text:span text:style-name="T15">Input</text:span><text:span text:style-name="T14"><text:tab/>IN0 : REAL (Eingangswert 0)</text:span></text:p>
      <text:p text:style-name="P69"><text:tab/>IN1 : REAL (Eingangswert 1)</text:p>
      <text:p text:style-name="P69"><text:tab/>IN2 : REAL (Eingangswert 0)</text:p>
      <text:p text:style-name="P69"><text:tab/>IN3 : REAL (Eingangswert 1)</text:p>
      <text:p text:style-name="P69"><text:tab/>A0 : BOOL (Adresseingang Bit 0)</text:p>
      <text:p text:style-name="P69"><text:tab/>A1 : BOOL (Adresseingang Bit 1)</text:p>
      <text:p text:style-name="P73"><draw:frame draw:style-name="fr3" draw:name="Grafik149" text:anchor-type="paragraph" svg:x="1.05cm" svg:y="0.688cm" svg:width="3.62cm" svg:height="3.371cm" draw:z-index="113"><draw:image xlink:href="Pictures/1000000000000112000000FFEB6E2121.png" xlink:type="simple" xlink:show="embed" xlink:actuate="onLoad"/></draw:frame>Output<text:tab/>REAL (IN0 wenn A0=0 und A1=0, IN3 wenn A0=1 und A3=1)</text:p>
      <text:p text:style-name="P73"><text:line-break/>MUX_R4 wählt einen von 4 Eingangswerten aus.</text:p>
      <text:p text:style-name="P73">Logische Verknüpfung:<text:tab/>IN0 wenn A0=0 &amp; A1=0,</text:p>
      <text:p text:style-name="P73"><text:tab/><text:tab/><text:tab/>IN1 wenn A0=1 &amp; A1=0;</text:p>
      <text:p text:style-name="P73"><text:tab/><text:tab/><text:tab/>IN2 wenn A0=0 &amp; A1=1;</text:p>
      <text:p text:style-name="P73"><text:tab/><text:tab/><text:tab/>IN3 wenn A0=1 &amp; A1=1;</text:p>
      <text:list xml:id="list38449454" text:continue-numbering="true" text:style-name="L1">
        <text:list-item>
          <text:list>
            <text:list-item>
              <text:h text:style-name="P216" text:outline-level="2"><text:soft-page-break/><text:alphabetical-index-mark-start text:id="IMark225902392"/>OFFSET<text:alphabetical-index-mark-end text:id="IMark225902392"/></text:h>
            </text:list-item>
          </text:list>
        </text:list-item>
      </text:list>
      <text:p text:style-name="P2">Type<text:tab/><text:span text:style-name="T12">Funktion</text:span></text:p>
      <text:p text:style-name="P66"><text:span text:style-name="T15">Input</text:span><text:span text:style-name="T14"><text:tab/>X : REAL (Eingangssignal)</text:span></text:p>
      <text:p text:style-name="P66"><text:span text:style-name="T14"><text:tab/>O1 : BOOL (</text:span><text:span text:style-name="T15">Enable</text:span><text:span text:style-name="T14"> Offset 1)</text:span></text:p>
      <text:p text:style-name="P66"><text:span text:style-name="T14"><text:tab/>O2 : BOOL (</text:span><text:span text:style-name="T15">Enable</text:span><text:span text:style-name="T14"> Offset 2)</text:span></text:p>
      <text:p text:style-name="P66"><text:span text:style-name="T14"><text:tab/>O3 : BOOL (</text:span><text:span text:style-name="T15">Enable</text:span><text:span text:style-name="T14"> Offset 3)</text:span></text:p>
      <text:p text:style-name="P66"><text:span text:style-name="T14"><text:tab/>D : BOOL (</text:span><text:span text:style-name="T15">Enable</text:span><text:span text:style-name="T14"> </text:span><text:span text:style-name="T15">Default</text:span><text:span text:style-name="T14">)</text:span></text:p>
      <text:p text:style-name="P73">Output<text:tab/>REAL (Ausgangswert mit Offset)</text:p>
      <text:p text:style-name="P73">Config<text:tab/>Offset_1 : REAL (Offset der addiert wird, wenn O1=TRUE)</text:p>
      <text:p text:style-name="P73"><text:tab/>Offset_2 : REAL (Offset der addiert wird, wenn O2=TRUE)</text:p>
      <text:p text:style-name="P73"><text:tab/>Offset_3 : REAL (Offset der addiert wird, wenn O3=TRUE)</text:p>
      <text:p text:style-name="P73"><text:tab/>Offset_4 : REAL (Offset der addiert wird, wenn O4=TRUE)</text:p>
      <text:p text:style-name="P66"><draw:frame draw:style-name="fr3" draw:name="Grafik249" text:anchor-type="paragraph" svg:x="1.265cm" svg:y="0.667cm" svg:width="2.731cm" svg:height="3.371cm" draw:z-index="206"><draw:image xlink:href="Pictures/10000000000000CE000000FF31BB6902.png" xlink:type="simple" xlink:show="embed" xlink:actuate="onLoad"/></draw:frame><text:span text:style-name="T21"><text:tab/></text:span><text:span text:style-name="T16">Default</text:span><text:span text:style-name="T21"> : REAL (Wird anstelle von X verwendet, wenn D=TRUE)</text:span></text:p>
      <text:p text:style-name="P2"><text:line-break/>Die <text:span text:style-name="T11">Funktion</text:span> Offset <text:span text:style-name="T11">addiert</text:span> verschiedene Offsets zu einem Eingangssignal abhängig vom Binären Wert an O1 .. O4. <text:s/>Die Offsets können einzeln oder <text:s/>gleichzeitig addiert werden. Mit dem Eingang D kann ein <text:span text:style-name="T2">Default-</text:span>Wert anstelle des Eingangs X auf den Addierer geschaltet werden. Die Offsets und der <text:span text:style-name="T2">Default-Wert </text:span>werden über Config-Variablen definiert.</text:p>
      <text:p text:style-name="P183"><draw:frame draw:style-name="fr3" draw:name="Grafik250" text:anchor-type="paragraph" svg:x="1.088cm" svg:y="0.647cm" svg:width="11.18cm" svg:height="4.009cm" draw:z-index="207"><draw:image xlink:href="Pictures/100000000000034D0000012F68684C42.png" xlink:type="simple" xlink:show="embed" xlink:actuate="onLoad"/></draw:frame>Das folgende Beispiel verdeutlicht die Funktionsweise von Offset:</text:p>
      <text:p text:style-name="P183"/>
      <text:p text:style-name="P183"><draw:frame draw:style-name="fr3" draw:name="Grafik251" text:anchor-type="paragraph" svg:x="1.529cm" svg:y="0.139cm" svg:width="14.61cm" svg:height="7.211cm" draw:z-index="208"><draw:image xlink:href="Pictures/1000000000000398000001C64C19A4EE.png" xlink:type="simple" xlink:show="embed" xlink:actuate="onLoad"/></draw:frame></text:p>
      <text:p text:style-name="P183"><text:soft-page-break/></text:p>
      <text:list xml:id="list38477093" text:continue-numbering="true" text:style-name="L1">
        <text:list-item>
          <text:list>
            <text:list-item>
              <text:h text:style-name="P216" text:outline-level="2"><text:alphabetical-index-mark-start text:id="IMark225902392"/>OFFSET2<text:alphabetical-index-mark-end text:id="IMark225902392"/></text:h>
            </text:list-item>
          </text:list>
        </text:list-item>
      </text:list>
      <text:p text:style-name="P69">Type<text:tab/>Funktion</text:p>
      <text:p text:style-name="P66"><text:span text:style-name="T15">Input</text:span><text:span text:style-name="T14"><text:tab/>X : REAL (Eingangssignal)</text:span></text:p>
      <text:p text:style-name="P173"><text:span text:style-name="T14"><text:tab/>O1 : </text:span>REAL<text:span text:style-name="T14"> (</text:span><text:span text:style-name="T15">Enable</text:span><text:span text:style-name="T14"> Offset 1)</text:span></text:p>
      <text:p text:style-name="P66"><text:span text:style-name="T14"><text:tab/>O2 : REAL (</text:span><text:span text:style-name="T15">Enable</text:span><text:span text:style-name="T14"> Offset 2)</text:span></text:p>
      <text:p text:style-name="P66"><text:span text:style-name="T14"><text:tab/>O3 : REAL (</text:span><text:span text:style-name="T15">Enable</text:span><text:span text:style-name="T14"> Offset 3)</text:span></text:p>
      <text:p text:style-name="P66"><text:span text:style-name="T14"><text:tab/>D : BOOL (</text:span><text:span text:style-name="T15">Enable</text:span><text:span text:style-name="T14"> </text:span><text:span text:style-name="T15">Default</text:span><text:span text:style-name="T14">)</text:span></text:p>
      <text:p text:style-name="P73">Output<text:tab/>REAL (Ausgangswert mit Offset)</text:p>
      <text:p text:style-name="P73">Config<text:tab/>Offset_1 : REAL (Offset der addiert wird, wenn O1=TRUE)</text:p>
      <text:p text:style-name="P73"><text:tab/>Offset_2 : REAL (Offset der addiert wird, wenn O2=TRUE)</text:p>
      <text:p text:style-name="P73"><text:tab/>Offset_3 : REAL (Offset der addiert wird, wenn O3=TRUE)</text:p>
      <text:p text:style-name="P73"><text:tab/>Offset_4 : REAL (Offset der addiert wird, wenn O4=TRUE)</text:p>
      <text:p text:style-name="P73"><text:tab/>DEFAULT : REAL (Wird anstelle von X verwendet, wenn D=TRUE)</text:p>
      <text:p text:style-name="P66"><draw:frame draw:style-name="fr3" draw:name="Grafik252" text:anchor-type="paragraph" svg:x="1.088cm" svg:y="0.076cm" svg:width="3.18cm" svg:height="3.371cm" draw:z-index="209"><draw:image xlink:href="Pictures/10000000000000F0000000FF71B4F401.png" xlink:type="simple" xlink:show="embed" xlink:actuate="onLoad"/></draw:frame><text:soft-page-break/><text:span text:style-name="T21"> <text:line-break/>Die Funktion OFFSET2 addiert einen Offset zu einem Eingangssignal abhängig vom Binären Wert an O1 .. O4. <text:s/>Werden mehrere Offsets gleichzeitig selektiert, so wird der Offset mit der höchsten Nummer addiert und die anderen ignoriert. Werden O1 und O3 gleichzeitig TRUE, so wird nur Offset_3 addiert und nicht Offset_1. Mit dem Eingang D kann ein </text:span><text:span text:style-name="T16">Default-</text:span><text:span text:style-name="T21">Wert </text:span><text:span text:style-name="T21">anstelle </text:span><text:span text:style-name="T21">des Eingangs X auf den Addierer geschaltet werden. Die Offsets und der </text:span><text:span text:style-name="T16">Defaultwert</text:span><text:span text:style-name="T21"> werden über Config-Variablen definiert.</text:span></text:p>
      <text:p text:style-name="P183">Weitere Erläuterungen und ein Beispiel finden Sie unter Offset, welches sehr ähnliche Funktion aufweist. Offset2 addiert nur jeweils einen (den mit der höchsten Nummer) Offset, während Offset alle selektierten gleichzeitig addiert.</text:p>
      <text:list xml:id="list38446530" text:continue-numbering="true" text:style-name="L1">
        <text:list-item>
          <text:list>
            <text:list-item>
              <text:h text:style-name="P216" text:outline-level="2"><text:alphabetical-index-mark-start text:id="IMark225902392"/>OVERRIDE<text:alphabetical-index-mark-end text:id="IMark225902392"/></text:h>
            </text:list-item>
          </text:list>
        </text:list-item>
      </text:list>
      <text:p text:style-name="P69">Type<text:tab/>Funktion</text:p>
      <text:p text:style-name="P66"><text:span text:style-name="T15">Input</text:span><text:span text:style-name="T14"><text:tab/>X1 : REAL (Eingangssignal 1)</text:span></text:p>
      <text:p text:style-name="P2"><text:tab/>X2 : <text:span text:style-name="T12">REAL</text:span> (Eingangssignal 2)</text:p>
      <text:p text:style-name="P69"><text:tab/>X3 : REAL (Eingangssignal 3)</text:p>
      <text:p text:style-name="P66"><text:span text:style-name="T14"><text:tab/>E1 : BOOL (</text:span><text:span text:style-name="T15">Enable</text:span><text:span text:style-name="T14"> Signal 1)</text:span></text:p>
      <text:p text:style-name="P66"><text:span text:style-name="T14"><text:tab/>E2 : BOOL (</text:span><text:span text:style-name="T15">Enable</text:span><text:span text:style-name="T14"> Signal 2)</text:span></text:p>
      <text:p text:style-name="P173"><text:span text:style-name="T14"><text:tab/>E2 : BOOL (</text:span><text:span text:style-name="T15">Enable</text:span><text:span text:style-name="T14"> Signal 3)</text:span></text:p>
      <text:p text:style-name="P73"><draw:frame draw:style-name="fr3" draw:name="Grafik381" text:anchor-type="paragraph" svg:x="1.09cm" svg:y="0.674cm" svg:width="3.69cm" svg:height="2.979cm" draw:z-index="356"><draw:image xlink:href="Pictures/1000000000000117000000E1144D7E07.png" xlink:type="simple" xlink:show="embed" xlink:actuate="onLoad"/></draw:frame>Output<text:tab/>REAL (Ausgangswert</text:p>
      <text:p text:style-name="P73"><text:line-break/>OVERRIDE liefert am Ausgang Y den Eingangswert (X1, X2, X3) dessen Ab<text:soft-page-break/>soluter Wert der größere von allen ist. Die Eingänge X1, X2 und X3 können jeder individuell mit den Eingängen E1, E2 und E3 freigeschaltet werden. wenn eines der Eingangssignale E1, E2 oder E3 auf FALSE steht wird der zugehörige Eingang X1, X2 oder X3 nicht berücksichtigt. Eine von vielen Anwendungsmöglichkeiten von OVERRIDE ist zum Beispiel die Abfrage von 3 Sensoren wobei der mit dem Höchsten Wert die anderen überschreibt. Mit den Eingängen E kann im Diagnosefall jeder Sensor einzeln abgefragt werden, oder ein defekter Sensor abgeschaltet werden.</text:p>
      <text:p text:style-name="P183">Beispiel:</text:p>
      <text:p text:style-name="P183">OVERRIDE(10,-12,11, TRUE, TRUE, TRUE) = -12</text:p>
      <text:p text:style-name="P183">OVERRIDE(10,-12,11, TRUE, FALSE, TRUE) = 11</text:p>
      <text:p text:style-name="P183">OVERRIDE(10,-12,11, FALSE, FALSE, FALSE) = 0</text:p>
      <text:list xml:id="list38473116" text:continue-numbering="true" text:style-name="L1">
        <text:list-item>
          <text:list>
            <text:list-item>
              <text:h text:style-name="P216" text:outline-level="2"><text:alphabetical-index-mark-start text:id="IMark225902392"/>RANGE_TO_BYTE<text:alphabetical-index-mark-end text:id="IMark225902392"/></text:h>
            </text:list-item>
          </text:list>
        </text:list-item>
      </text:list>
      <text:p text:style-name="P69">Type<text:tab/>Funktion</text:p>
      <text:p text:style-name="P66"><text:span text:style-name="T15">Input</text:span><text:span text:style-name="T14"><text:tab/>X : REAL (Eingangswert)</text:span></text:p>
      <text:p text:style-name="P173"><text:tab/>LOW<text:span text:style-name="T14"> : </text:span>REAL<text:span text:style-name="T14"> (untere </text:span>Bereichsgrenze<text:span text:style-name="T14">)</text:span></text:p>
      <text:p text:style-name="P179"><text:tab/>HIGH : REAL (Obere Bereichsgrenze)<text:tab/></text:p>
      <text:p text:style-name="P73"><draw:frame draw:style-name="fr3" draw:name="Grafik433" text:anchor-type="paragraph" svg:x="1.025cm" svg:y="0.667cm" svg:width="5.669cm" svg:height="1.79cm" draw:z-index="412"><draw:image xlink:href="Pictures/10000000000001AD00000087CB38209E.png" xlink:type="simple" xlink:show="embed" xlink:actuate="onLoad"/></draw:frame>Output<text:tab/>BYTE (Ausgangswert)</text:p>
      <text:p text:style-name="P173"><text:span text:style-name="T21"><text:line-break/>RANGE_TO_BYTE wandelt einen REAL Wert in einen BYTE Wert. Ein Ein</text:span><text:span text:style-name="T21">gangswert X der dem Wert LOW entspricht wird dabei in einen Ausgangswert von 0 gewandelt und ein Eingangswert X der dem Eingangswert HIGH entspricht wird in einen Ausgangswert von 255 gewandelt. Der Eingang X wird auf den Bereich von LOW bis HIGH begrenzt, ein Überlauf des BYTE Ausgangs kann <text:s/>deshalb nicht stattfinden.</text:span></text:p>
      <text:list xml:id="list38460926" text:continue-numbering="true" text:style-name="L1">
        <text:list-item>
          <text:list>
            <text:list-item>
              <text:h text:style-name="P216" text:outline-level="2"><text:soft-page-break/><text:alphabetical-index-mark-start text:id="IMark225902392"/>RANGE_TO_WORD<text:alphabetical-index-mark-end text:id="IMark225902392"/></text:h>
            </text:list-item>
          </text:list>
        </text:list-item>
      </text:list>
      <text:p text:style-name="P69">Type<text:tab/>Funktion</text:p>
      <text:p text:style-name="P66"><text:span text:style-name="T15">Input</text:span><text:span text:style-name="T14"><text:tab/>X : REAL (Eingangswert)</text:span></text:p>
      <text:p text:style-name="P173"><text:tab/>LOW<text:span text:style-name="T14"> : </text:span>REAL<text:span text:style-name="T14"> (untere Bereichsgrenze)</text:span></text:p>
      <text:p text:style-name="P179"><text:tab/>HIGH : REAL (Obere Bereichsgrenze)<text:tab/></text:p>
      <text:p text:style-name="P73"><draw:frame draw:style-name="fr3" draw:name="Grafik434" text:anchor-type="paragraph" svg:x="1.025cm" svg:y="0.69cm" svg:width="5.669cm" svg:height="1.79cm" draw:z-index="413"><draw:image xlink:href="Pictures/10000000000001AD00000087E1A21209.png" xlink:type="simple" xlink:show="embed" xlink:actuate="onLoad"/></draw:frame>Output<text:tab/>WORD (Ausgangswert)</text:p>
      <text:p text:style-name="P183"><text:line-break/>RANGE_TO_WORD wandelt einen REAL Wert in einen WORD Wert. Ein Eingangswert X der dem Wert LOW entspricht wird dabei in einen Ausgangswert von 0 gewandelt und ein Eingangswert X der dem Eingangswert HIGH entspricht wird in einen Ausgangswert von 65535 gewandelt. Der Eingang X wird auf den Bereich von LOW bis HIGH begrenzt, ein Überlauf des WORD Ausgangs kann <text:s/>deshalb nicht stattfinden.</text:p>
      <text:list xml:id="list38465354" text:continue-numbering="true" text:style-name="L1">
        <text:list-item>
          <text:list>
            <text:list-item>
              <text:h text:style-name="P216" text:outline-level="2"><text:alphabetical-index-mark-start text:id="IMark225902392"/>SCALE<text:alphabetical-index-mark-end text:id="IMark225902392"/></text:h>
            </text:list-item>
          </text:list>
        </text:list-item>
      </text:list>
      <text:p text:style-name="P69">Type<text:tab/>Funktion : REAL</text:p>
      <text:p text:style-name="P66"><text:span text:style-name="T15">Input</text:span><text:span text:style-name="T14"><text:tab/>X : Byte (Eingangswert)</text:span></text:p>
      <text:p text:style-name="P73"><text:tab/>K : Byte (Multiplikator)</text:p>
      <text:p text:style-name="P73"><text:tab/>O : REAL (Offset)</text:p>
      <text:p text:style-name="P73"><text:tab/>MX : REAL (maximaler Ausgangswert)</text:p>
      <text:p text:style-name="P183"><text:tab/>MN : REAL (minimaler Ausgangswert)</text:p>
      <text:p text:style-name="P73"><draw:frame draw:style-name="fr3" draw:name="Grafik569" text:anchor-type="paragraph" svg:x="1.025cm" svg:y="0.69cm" svg:width="3.18cm" svg:height="2.919cm" draw:z-index="556"><draw:image xlink:href="Pictures/10000000000000F0000000DDF8D79628.png" xlink:type="simple" xlink:show="embed" xlink:actuate="onLoad"/></draw:frame>Output<text:tab/>REAL (Ausgangswert)</text:p>
      <text:p text:style-name="P73"><text:line-break/>SCALE Multipliziert den Eingang X mit K und addiert den Offset O. Der so er<text:soft-page-break/>rechnete <text:s/>Wert wird dann auf die Werte MN und MX begrenzt und das Ergebnis am Ausgang zur Verfügung gestellt.</text:p>
      <text:p text:style-name="P183">SCALE = LIMIT(MN, X * K + O, MX)</text:p>
      <text:list xml:id="list38446756" text:continue-numbering="true" text:style-name="L1">
        <text:list-item>
          <text:list>
            <text:list-item>
              <text:h text:style-name="P216" text:outline-level="2"><text:alphabetical-index-mark-start text:id="IMark225902392"/>SCALE_B<text:alphabetical-index-mark-end text:id="IMark225902392"/></text:h>
            </text:list-item>
          </text:list>
        </text:list-item>
      </text:list>
      <text:p text:style-name="P69">Type<text:tab/>Funktion : REAL</text:p>
      <text:p text:style-name="P66"><text:span text:style-name="T15">Input</text:span><text:span text:style-name="T14"><text:tab/>X : DWORD (Eingangswert)</text:span></text:p>
      <text:p text:style-name="P73"><text:tab/>I_LO : DWORD (Eingangswert min)</text:p>
      <text:p text:style-name="P73"><text:tab/>I_HI : DWORD (Eingangswert max)</text:p>
      <text:p text:style-name="P73"><text:tab/>O_LO : REAL (Ausgangswert min)</text:p>
      <text:p text:style-name="P183"><text:tab/>O_HI : REAL (Ausgangswert max)</text:p>
      <text:p text:style-name="P183"><draw:frame draw:style-name="fr3" draw:name="Grafik570" text:anchor-type="paragraph" svg:x="1.046cm" svg:y="0.695cm" svg:width="4.069cm" svg:height="2.919cm" draw:z-index="557"><draw:image xlink:href="Pictures/1000000000000134000000DD6FD45040.png" xlink:type="simple" xlink:show="embed" xlink:actuate="onLoad"/></draw:frame>Output<text:tab/>REAL (Ausgangswert)</text:p>
      <text:p text:style-name="P73"><text:line-break/>SCALE_B skaliert einen Eingangswert BYTE und errechnet einen Ausgangswert in REAL. Der Eingangswert X wird dabei auf I_LO und I_HI begrenzt. SCALE_D(IN, 0, 255, 0, 100) skaliert einen Eingang mit 8 Bit Auflösung auf den Ausgang 0..100.</text:p>
      <text:list xml:id="list38447260" text:continue-numbering="true" text:style-name="L1">
        <text:list-item>
          <text:list>
            <text:list-item>
              <text:h text:style-name="P216" text:outline-level="2"><text:alphabetical-index-mark-start text:id="IMark225902392"/>SCALE_B2<text:alphabetical-index-mark-end text:id="IMark225902392"/></text:h>
            </text:list-item>
          </text:list>
        </text:list-item>
      </text:list>
      <text:p text:style-name="P69">Type<text:tab/>Funktion : REAL</text:p>
      <text:p text:style-name="P66"><text:span text:style-name="T15">Input</text:span><text:span text:style-name="T14"><text:tab/>IN1 : Byte (Eingangswert 1)</text:span></text:p>
      <text:p text:style-name="P73"><text:tab/>IN2 : Byte (Eingangswert 2)</text:p>
      <text:p text:style-name="P73"><text:tab/>K : REAL (Multiplikator)</text:p>
      <text:p text:style-name="P73"><text:tab/>O : REAL (Offset)</text:p>
      <text:p text:style-name="P73"><text:soft-page-break/>Output<text:tab/>REAL (Ausgangswert)</text:p>
      <text:p text:style-name="P73">Config<text:tab/>IN1_MIN : REAL (kleinster Wert für IN1)</text:p>
      <text:p text:style-name="P73"><text:tab/>IN1_MAX : REAL (größter Wert für IN1)</text:p>
      <text:p text:style-name="P73"><text:tab/>IN2_MIN : REAL (kleinster Wert für IN2)</text:p>
      <text:p text:style-name="P73"><draw:frame draw:style-name="fr3" draw:name="Grafik150" text:anchor-type="paragraph" svg:x="1.314cm" svg:y="0.676cm" svg:width="3.62cm" svg:height="2.469cm" draw:z-index="117"><draw:image xlink:href="Pictures/1000000000000112000000BBB7D20AFB.png" xlink:type="simple" xlink:show="embed" xlink:actuate="onLoad"/></draw:frame><text:tab/>IN2_MAX : REAL (größter Wert für IN2)</text:p>
      <text:p text:style-name="P73"><text:line-break/>SCALE_B2 berechnet aus dem Eingangswert IN und den Setup-Werten IN_MIN und IN_MAX einen internen Wert, addiert alle internen Werte, multipliziert die Summe mit K und addiert den Offset O. Ein Eingangswert IN1=0 bedeutet IN1_MIN wird berücksichtigt, IN1=255 bedeutet IN1_MAX wird berücksichtigt. Wird K nicht beschaltet so ist der Multiplikator 1.</text:p>
      <text:p text:style-name="P66"><text:span text:style-name="T16">Out </text:span><text:span text:style-name="T21">= <text:tab/>(in1 * (IN1_MAX – IN1_MIN) / 255 + IN1_MIN <text:tab/>+ in2 * (IN2_MAX – <text:tab/>IN2_MIN) / 255 + IN2_MIN) * K + O</text:span></text:p>
      <text:p text:style-name="P183">SCALE_B2 kann zum Beispiel verwendet werden um Gesamtluftmengen in Lüftungsanlagen zu berechnen. Auch überall dort wo gesteuerte Mischer eingesetzt werden und die resultierende Gesamtmenge berechnet werden muss.</text:p>
      <text:p text:style-name="P73"><draw:frame draw:style-name="fr10" draw:name="Grafik153" text:anchor-type="paragraph" svg:x="1.057cm" svg:y="0.677cm" svg:width="11.18cm" svg:height="2.66cm" draw:z-index="114"><draw:image xlink:href="Pictures/100000000000034D000000C912382ADB.png" xlink:type="simple" xlink:show="embed" xlink:actuate="onLoad"/></draw:frame>Beispiel:</text:p>
      <text:p text:style-name="P183"/>
      <text:p text:style-name="P183">IN0 ist eine Luftklappe, die die Luftmenge zwischen 100m³/h und 600m³/h für die Stellwerte in0 (0 – 255) regelt.</text:p>
      <text:p text:style-name="P183">IN1 ist eine Abluftgerät, das die Abluftmenge von 0 m³/h bis 400 m³/h für die Stellwerte in1 von 0 – 255 regelt.</text:p>
      <text:p text:style-name="P183">Die Setup-Werte für diese Anwendung sind: IN0_MIN = 100, IN0_MAX = 600, IN1_MIN = 0, IN1_MAX = -400.</text:p>
      <text:p text:style-name="P183">Die resultierende Gesamtluftmenge bei K=1 und O=0 (kein Multiplikator und kein Offset) variiert dann von -300 (in0=0 und in1=255) bis +600 (in=255 und in1=0).</text:p>
      <text:p text:style-name="P73"><text:line-break/>Für einen Eingangswert in0=128 (Klappe 50%) und IN1=128 (Lüfter auf 50%) ist der Ausgangswert 250 m³ – 200 m³ = 50 m³.</text:p>
      <text:p text:style-name="P183"><draw:frame draw:style-name="fr10" draw:name="Grafik154" text:anchor-type="paragraph" svg:x="1.127cm" svg:y="1.346cm" svg:width="11.629cm" svg:height="4.89cm" draw:z-index="115"><draw:image xlink:href="Pictures/100000000000036F0000017221319F31.png" xlink:type="simple" xlink:show="embed" xlink:actuate="onLoad"/></draw:frame><text:soft-page-break/>Der Eingang Offset kann auch dazu benutzt werden um Bausteine zu kaskadieren.</text:p>
      <text:p text:style-name="P37"/>
      <text:list xml:id="list38448825" text:continue-numbering="true" text:style-name="L1">
        <text:list-item>
          <text:list>
            <text:list-item>
              <text:h text:style-name="P226" text:outline-level="2"><text:alphabetical-index-mark-start text:id="IMark225902392"/>SCALE<text:span text:style-name="T27">_</text:span>B4<text:alphabetical-index-mark-end text:id="IMark225902392"/></text:h>
            </text:list-item>
          </text:list>
        </text:list-item>
      </text:list>
      <text:p text:style-name="P69">Type<text:tab/>Funktion : REAL</text:p>
      <text:p text:style-name="P66"><text:span text:style-name="T15">Input</text:span><text:span text:style-name="T14"><text:tab/>IN1.. IN4 <text:s/>: Byte (Eingangswerte)</text:span></text:p>
      <text:p text:style-name="P73"><text:tab/>K : REAL (Multiplikator)</text:p>
      <text:p text:style-name="P73"><text:tab/>O : REAL (Offset)</text:p>
      <text:p text:style-name="P73">Output<text:tab/>REAL (Ausgangswert)</text:p>
      <text:p text:style-name="P73">Config<text:tab/>IN1_MIN : REAL (kleinster Wert für IN1)</text:p>
      <text:p text:style-name="P73"><text:tab/>IN1_MAX : REAL (größter Wert für IN1)</text:p>
      <text:p text:style-name="P73"><text:tab/>IN2_MIN : REAL (kleinster Wert für IN2)</text:p>
      <text:p text:style-name="P73"><text:tab/>IN2_MAX : REAL (größter Wert für IN2)</text:p>
      <text:p text:style-name="P73"><text:tab/>IN3_MIN : REAL (kleinster Wert für IN3)</text:p>
      <text:p text:style-name="P73"><text:tab/>IN3_MAX : REAL (größter Wert für IN3)</text:p>
      <text:p text:style-name="P73"><text:tab/>IN4_MIN : REAL (kleinster Wert für IN4)</text:p>
      <text:p text:style-name="P73"><draw:frame draw:style-name="fr3" draw:name="Grafik151" text:anchor-type="paragraph" svg:x="0.753cm" svg:y="0.693cm" svg:width="3.62cm" svg:height="3.371cm" draw:z-index="118"><draw:image xlink:href="Pictures/1000000000000112000000FFD19834AD.png" xlink:type="simple" xlink:show="embed" xlink:actuate="onLoad"/></draw:frame><text:tab/>IN4_MAX : REAL (größter Wert für IN4)</text:p>
      <text:p text:style-name="P73"><text:soft-page-break/><text:line-break/>SCALE_B4 berechnet aus den Eingangswerten IN und den Setup-Werten IN_MIN und IN_MAX interne Werte, addiert alle internen Werte, multipliziert die Summe mit K und addiert den Offset O. Ein Eingangswert IN=0 bedeutet IN_MIN wird berücksichtigt, IN=255 bedeutet IN_MAX wird berücksichtigt. Wird K nicht beschaltet, so ist der Multiplikator 1.</text:p>
      <text:p text:style-name="P73">OUT <text:tab/>= (in1 * (IN1_MAX – IN1_MIN) / 255 + IN1_MIN</text:p>
      <text:p text:style-name="P183"><text:tab/>+ in2 * (IN2_MAX – IN2_MIN) / 255 + IN2_MIN</text:p>
      <text:p text:style-name="P73"><text:tab/>+ in3 * (IN3_MAX – IN3_MIN) / 255 + IN3_MIN</text:p>
      <text:p text:style-name="P73"><text:tab/>+ in4 * (IN4_MAX – IN4_MIN) / 255 + IN4_MIN) * K + O</text:p>
      <text:p text:style-name="P2">SCALE_B4 <text:span text:style-name="T11">kann</text:span> zum <text:span text:style-name="T11">Beispiel</text:span> verwendet werden um Gesamtluftmengen in Lüftungsanlagen zu berechnen, oder überall dort, wo gesteuerte Mischer eingesetzt werden und die resultierende Gesamtmenge berechnet werden muss. Weitergehende Erläuterungen zur Funktionsweise finden Sie auch unter SCALE_B2.</text:p>
      <text:list xml:id="list38448597" text:continue-numbering="true" text:style-name="L1">
        <text:list-item>
          <text:list>
            <text:list-item>
              <text:h text:style-name="P216" text:outline-level="2"><text:alphabetical-index-mark-start text:id="IMark225902392"/>SCALE_B8<text:alphabetical-index-mark-end text:id="IMark225902392"/></text:h>
            </text:list-item>
          </text:list>
        </text:list-item>
      </text:list>
      <text:p text:style-name="P69">Type<text:tab/>Funktion : REAL</text:p>
      <text:p text:style-name="P66"><text:span text:style-name="T15">Input</text:span><text:span text:style-name="T14"><text:tab/>IN1 .. 8 : Byte (Eingangswerte)</text:span></text:p>
      <text:p text:style-name="P73"><text:tab/>K : REAL (Multiplikator)</text:p>
      <text:p text:style-name="P73"><text:tab/>O : REAL (Offset)</text:p>
      <text:p text:style-name="P73">Output<text:tab/>REAL (Ausgangswert)</text:p>
      <text:p text:style-name="P73">Config<text:tab/>IN_MIN : REAL (kleinster Wert für IN)</text:p>
      <text:p text:style-name="P73"><draw:frame draw:style-name="fr3" draw:name="Grafik152" text:anchor-type="paragraph" svg:x="1.065cm" svg:y="0.653cm" svg:width="3.62cm" svg:height="5.17cm" draw:z-index="119"><draw:image xlink:href="Pictures/1000000000000112000001875AEEC002.png" xlink:type="simple" xlink:show="embed" xlink:actuate="onLoad"/></draw:frame><text:tab/>IN_MAX : REAL (größter Wert für IN)</text:p>
      <text:p text:style-name="P73"><text:line-break/>SCALE_B8 berechnet aus den Eingangswerten IN und den Setup-Werten <text:soft-page-break/>IN_MIN und IN_MAX interne Werte, addiert alle internen Werte, multipliziert die Summe mit K und addiert den Offset O. Ein Eingangswert IN=0 bedeutet IN_MIN wird berücksichtigt, IN=255 bedeutet IN_MAX wird berücksichtigt. Wird K nicht beschaltet so ist der Multiplikator 1.</text:p>
      <text:p text:style-name="P66"><text:span text:style-name="T16">OUT</text:span><text:span text:style-name="T21"> <text:tab/>= (in1 * (IN1_MAX – IN1_MIN) / 255 + IN1_MIN</text:span></text:p>
      <text:p text:style-name="P183"><text:tab/>+ in2 * (IN2_MAX – IN2_MIN) / 255 + IN2_MIN</text:p>
      <text:p text:style-name="P183"><text:tab/>+ in3 * (IN3_MAX – IN3_MIN) / 255 + IN3_MIN</text:p>
      <text:p text:style-name="P183"><text:tab/>+ in4 * (IN4_MAX – IN4_MIN) / 255 + IN4_MIN</text:p>
      <text:p text:style-name="P183"><text:tab/>+ in5 * (IN5_MAX – IN5_MIN) / 255 + IN5_MIN</text:p>
      <text:p text:style-name="P183"><text:tab/>+ in6 * (IN6_MAX – IN6_MIN) / 255 + IN6_MIN</text:p>
      <text:p text:style-name="P183"><text:tab/>+ in7 * (IN7_MAX – IN7_MIN) / 255 + IN7_MIN</text:p>
      <text:p text:style-name="P183"><text:tab/>+ in8 * (IN8_MAX – IN8_MIN) / 255 + IN8_MIN) * K + O</text:p>
      <text:p text:style-name="P73">SCALE_B8 kann zum Beispiel verwendet werden um Gesamtluftmengen in Lüftungsanlagen zu berechnen, oder überall dort, wo gesteuerte Mischer eingesetzt werden und die resultierende Gesamtmenge berechnet werden muss. Weitergehende Erläuterungen zur Funktionsweise finden Sie auch unter SCALE_B2.</text:p>
      <text:list xml:id="list38477350" text:continue-numbering="true" text:style-name="L1">
        <text:list-item>
          <text:list>
            <text:list-item>
              <text:h text:style-name="P216" text:outline-level="2"><text:alphabetical-index-mark-start text:id="IMark225902392"/>SCALE_D<text:alphabetical-index-mark-end text:id="IMark225902392"/></text:h>
            </text:list-item>
          </text:list>
        </text:list-item>
      </text:list>
      <text:p text:style-name="P69">Type<text:tab/>Funktion : REAL</text:p>
      <text:p text:style-name="P66"><text:span text:style-name="T15">Input</text:span><text:span text:style-name="T14"><text:tab/>X : DWORD (Eingangswert)</text:span></text:p>
      <text:p text:style-name="P73"><text:tab/>I_LO : DWORD (Eingangswert min)</text:p>
      <text:p text:style-name="P73"><text:tab/>I_HI : DWORD (Eingangswert max)</text:p>
      <text:p text:style-name="P73"><text:tab/>O_LO : REAL (Ausgangswert min)</text:p>
      <text:p text:style-name="P183"><text:tab/>O_HI : REAL (Ausgangswert max)</text:p>
      <text:p text:style-name="P183"><draw:frame draw:style-name="fr3" draw:name="Grafik572" text:anchor-type="paragraph" svg:x="1.025cm" svg:y="0.69cm" svg:width="4.069cm" svg:height="2.919cm" draw:z-index="560"><draw:image xlink:href="Pictures/1000000000000134000000DD5915C787.png" xlink:type="simple" xlink:show="embed" xlink:actuate="onLoad"/></draw:frame>Output<text:tab/>REAL (Ausgangswert)</text:p>
      <text:p text:style-name="P183"><text:line-break/>SCALE_D skaliert einen Eingangswert DWORD und errechnet einen Aus<text:soft-page-break/>gangswert in REAL. Der Eingangswert X wird dabei auf I_LO und I_HI begrenzt. SCALE_D(IN, 0, 8191, 0, 100) skaliert einen Eingang mit 14 Bit Auflösung auf den Ausgang 0..100. SCALE_D kann auch mit negativen Ausgangswerten und negativer Steigung arbeiten, die Werte I_LO und I_HI müssen aber immer so spezifiziert werden, dass ILO &lt; I_HI ist.</text:p>
      <text:list xml:id="list38461718" text:continue-numbering="true" text:style-name="L1">
        <text:list-item>
          <text:list>
            <text:list-item>
              <text:h text:style-name="P216" text:outline-level="2"><text:alphabetical-index-mark-start text:id="IMark225902392"/>SCALE_R<text:alphabetical-index-mark-end text:id="IMark225902392"/></text:h>
            </text:list-item>
          </text:list>
        </text:list-item>
      </text:list>
      <text:p text:style-name="P69">Type<text:tab/>Funktion : REAL</text:p>
      <text:p text:style-name="P66"><text:span text:style-name="T15">Input</text:span><text:span text:style-name="T14"><text:tab/>X : REAL (Eingangswert)</text:span></text:p>
      <text:p text:style-name="P73"><text:tab/>I_LO : REAL (Eingangswert min)</text:p>
      <text:p text:style-name="P73"><text:tab/>I_HI : REAL (Eingangswert max)</text:p>
      <text:p text:style-name="P73"><text:tab/>O_LO : REAL (Ausgangswert min)</text:p>
      <text:p text:style-name="P183"><text:tab/>O_HI : REAL (Ausgangswert max)</text:p>
      <text:p text:style-name="P183"><draw:frame draw:style-name="fr3" draw:name="Grafik571" text:anchor-type="paragraph" svg:x="1.025cm" svg:y="0.69cm" svg:width="4.069cm" svg:height="2.919cm" draw:z-index="558"><draw:image xlink:href="Pictures/1000000000000134000000DD5915C787.png" xlink:type="simple" xlink:show="embed" xlink:actuate="onLoad"/></draw:frame>Output<text:tab/>REAL (Ausgangswert)</text:p>
      <text:p text:style-name="P183"><text:line-break/>SCALE_R skaliert einen Eingangswert REAL und errechnet einen Ausgangswert in REAL. Der Eingangswert X wird dabei auf I_LO und I_HI begrenzt. SCALE_D(IN, 4, 20, 0, 100) skaliert einen Eingang mit 4 .. 20 mA auf den Ausgang 0..100. SCALE_R kann auch mit negativen Ausgangswerten und negativer Steigung arbeiten, die Werte I_LO und I_HI müssen aber immer so spezifiziert werden, dass ILO &lt; I_HI ist.</text:p>
      <text:p text:style-name="P183"/>
      <text:p text:style-name="P183"/>
      <text:p text:style-name="P183"/>
      <text:list xml:id="list384715901" text:continue-numbering="true" text:style-name="L1">
        <text:list-item>
          <text:list>
            <text:list-item>
              <text:h text:style-name="P216" text:outline-level="2"><text:soft-page-break/><text:alphabetical-index-mark-start text:id="IMark225902392"/>SCALE_X2<text:alphabetical-index-mark-end text:id="IMark225902392"/></text:h>
            </text:list-item>
          </text:list>
        </text:list-item>
      </text:list>
      <text:p text:style-name="P69">Type<text:tab/>Funktion</text:p>
      <text:p text:style-name="P66"><text:span text:style-name="T15">Input</text:span><text:span text:style-name="T14"><text:tab/>IN1 .. 2 : BOOL (Eingangswerte)</text:span></text:p>
      <text:p text:style-name="P73"><text:tab/>K : REAL (Multiplikator)</text:p>
      <text:p text:style-name="P73"><text:tab/>O : REAL (Offset)</text:p>
      <text:p text:style-name="P73">Output<text:tab/>REAL (Ausgangswert)</text:p>
      <text:p text:style-name="P73">Config<text:tab/>IN_MIN : REAL (kleinster Wert für IN)</text:p>
      <text:p text:style-name="P73"><text:tab/>IN_MAX : REAL (größter Wert für IN)</text:p>
      <text:p text:style-name="P73"><draw:frame draw:style-name="fr3" draw:name="Grafik155" text:anchor-type="paragraph" svg:x="1.189cm" svg:y="0.016cm" svg:width="3.62cm" svg:height="2.469cm" draw:z-index="120"><draw:image xlink:href="Pictures/1000000000000112000000BB28E67594.png" xlink:type="simple" xlink:show="embed" xlink:actuate="onLoad"/></draw:frame><text:line-break/>SCALE_X2 berechnet aus den Eingangswerten IN und den Setup-Werten IN_MIN und IN_MAX interne Werte, addiert alle internen Werte, multipliziert die Summe mit K und addiert den Offset O. Ein Eingangswert IN=FALSE bedeutet IN_MIN wird berücksichtigt, in=TRUE bedeutet IN_MAX wird berücksichtigt. Die Summe wird Mit K Multipliziert und Offset O addiert. Wird K nicht beschaltet so ist der Multiplikator 1.</text:p>
      <text:p text:style-name="P183">SCALE_X2 kann zum Beispiel verwendet werden um Gesamtluftmengen in Lüftungsanlagen zu berechnen, oder überall dort wo gesteuerte Klappen eingesetzt werden und die resultierende Gesamtmenge berechnet werden muss. Durch den Eingang Offset kann SCALE_X2 einfach mit den anderen SCALE Bausteinen kaskadiert werden.</text:p>
      <text:p text:style-name="P2"><draw:frame draw:style-name="fr3" draw:name="Grafik156" text:anchor-type="paragraph" svg:x="1.065cm" svg:y="1.75cm" svg:width="10.73cm" svg:height="4.44cm" draw:z-index="116"><draw:image xlink:href="Pictures/100000000000032B0000015047C7D90E.png" xlink:type="simple" xlink:show="embed" xlink:actuate="onLoad"/></draw:frame>Im <text:span text:style-name="T11">folgenden</text:span> Beispiel werden zwei motorische Klappen KM1 und km² mit 2 Ein/Aus Klappen KL1 und KL2 verknüpft und die resultierende Luftmenge berechnet.</text:p>
      <text:p text:style-name="P3"/>
      <text:list xml:id="list38471173" text:continue-numbering="true" text:style-name="L1">
        <text:list-item>
          <text:list>
            <text:list-item>
              <text:h text:style-name="P216" text:outline-level="2"><text:soft-page-break/><text:alphabetical-index-mark-start text:id="IMark225902392"/>SCALE_X4<text:alphabetical-index-mark-end text:id="IMark225902392"/></text:h>
            </text:list-item>
          </text:list>
        </text:list-item>
      </text:list>
      <text:p text:style-name="P69">Type<text:tab/>Funktion : REAL</text:p>
      <text:p text:style-name="P66"><text:span text:style-name="T15">Input</text:span><text:span text:style-name="T14"><text:tab/>IN1 .. 4 : BOOL (Eingangswerte)</text:span></text:p>
      <text:p text:style-name="P73"><text:tab/>K : REAL (Multiplikator)</text:p>
      <text:p text:style-name="P73"><text:tab/>O : REAL (Offset)</text:p>
      <text:p text:style-name="P73">Output<text:tab/>REAL (Ausgangswert)</text:p>
      <text:p text:style-name="P73">Config<text:tab/>IN_MIN : REAL (kleinster Wert für IN)</text:p>
      <text:p text:style-name="P73"><draw:frame draw:style-name="fr3" draw:name="Grafik157" text:anchor-type="paragraph" svg:x="1.102cm" svg:y="0.762cm" svg:width="3.62cm" svg:height="3.371cm" draw:z-index="121"><draw:image xlink:href="Pictures/1000000000000112000000FF68E8671D.png" xlink:type="simple" xlink:show="embed" xlink:actuate="onLoad"/></draw:frame><text:tab/>IN_MAX : REAL (größter Wert für IN)</text:p>
      <text:p text:style-name="P73"><text:line-break/>SCALE_X4 berechnet aus den Eingangswerten IN und den Setup-Werten IN_MIN und IN_MAX interne Werte, addiert alle internen Werte, multipliziert die Summe mit K und addiert den Offset O. Ein Eingangswert IN=FALSE bedeutet IN_MIN wird berücksichtigt, in=TRUE bedeutet IN_MAX wird berücksichtigt. Die Summe wird Mit K Multipliziert und Offset O addiert. Wird K nicht beschaltet so ist der Multiplikator 1.</text:p>
      <text:p text:style-name="P183">SCALE_X4 kann zum Beispiel verwendet werden um Gesamtluftmengen in Lüftungsanlagen zu berechnen, oder überall dort wo gesteuerte Klappen eingesetzt werden und die resultierende Gesamtmenge berechnet werden muss. Durch den Eingang Offset kann SCALE_X2 einfach mit den anderen SCALE Bausteinen kaskadiert werden. Weitere Erläuterungen und Beispiele finden Sie unter SCAE_X2.</text:p>
      <text:list xml:id="list38450483" text:continue-numbering="true" text:style-name="L1">
        <text:list-item>
          <text:list>
            <text:list-item>
              <text:h text:style-name="P216" text:outline-level="2"><text:alphabetical-index-mark-start text:id="IMark225902392"/>SCALE_X8<text:alphabetical-index-mark-end text:id="IMark225902392"/></text:h>
            </text:list-item>
          </text:list>
        </text:list-item>
      </text:list>
      <text:p text:style-name="P69">Type<text:tab/>Funktion : REAL</text:p>
      <text:p text:style-name="P66"><text:span text:style-name="T15">Input</text:span><text:span text:style-name="T14"><text:tab/>IN1 .. 8 : BOOL (Eingangswerte)</text:span></text:p>
      <text:p text:style-name="P73"><text:tab/>K : REAL (Multiplikator)</text:p>
      <text:p text:style-name="P73"><text:tab/>O : REAL (Offset)</text:p>
      <text:p text:style-name="P73">Output<text:tab/>REAL (Ausgangswert)</text:p>
      <text:p text:style-name="P73"><text:soft-page-break/>Config<text:tab/>IN_MIN : REAL (kleinster Wert für IN)</text:p>
      <text:p text:style-name="P73"><draw:frame draw:style-name="fr3" draw:name="Grafik158" text:anchor-type="paragraph" svg:x="0.998cm" svg:y="0.695cm" svg:width="3.62cm" svg:height="5.17cm" draw:z-index="122"><draw:image xlink:href="Pictures/100000000000011200000187B42CD32D.png" xlink:type="simple" xlink:show="embed" xlink:actuate="onLoad"/></draw:frame><text:tab/>IN_MAX : REAL (größter Wert für IN)</text:p>
      <text:p text:style-name="P73"><text:line-break/>SCALE_X8 berechnet aus den Eingangswerten IN und den Setup-Werten IN_MIN und IN_MAX interne Werte, addiert alle internen Werte, multipliziert die Summe mit K und addiert den Offset O. Ein Eingangswert IN=FALSE bedeutet IN_MIN wird berücksichtigt, in=TRUE bedeutet IN_MAX wird berücksichtigt. Die Summe wird Mit K Multipliziert und Offset O addiert. Wird K nicht beschaltet so ist der Multiplikator 1.</text:p>
      <text:p text:style-name="P183">SCALE_X8 kann zum Beispiel verwendet werden um Gesamtluftmengen in Lüftungsanlagen zu berechnen, oder überall dort wo gesteuerte Klappen eingesetzt werden und die resultierende Gesamtmenge berechnet werden muss. Durch den Eingang Offset kann SCALE_X2 einfach mit den anderen SCALE Bausteinen kaskadiert werden. Weitere Erläuterungen und Beispiele finden Sie unter SCAE_X2.</text:p>
      <text:list xml:id="list38463663" text:continue-numbering="true" text:style-name="L1">
        <text:list-item>
          <text:list>
            <text:list-item>
              <text:h text:style-name="P216" text:outline-level="2"><text:alphabetical-index-mark-start text:id="IMark225902392"/>SEL2_OF_3<text:alphabetical-index-mark-end text:id="IMark225902392"/></text:h>
            </text:list-item>
          </text:list>
        </text:list-item>
      </text:list>
      <text:p text:style-name="P69">Type<text:tab/>Funktion : REAL</text:p>
      <text:p text:style-name="P66"><text:span text:style-name="T15">Input</text:span><text:span text:style-name="T14"><text:tab/>IN1 <text:s/>: REAL (Eingangswert 1)</text:span></text:p>
      <text:p text:style-name="P73"><text:tab/>IN1 <text:s/>: REAL (Eingangswert 2)</text:p>
      <text:p text:style-name="P73"><text:tab/>IN1 <text:s/>: REAL (Eingangswert 3)</text:p>
      <text:p text:style-name="P183"><text:tab/>D : REAL (Toleranzgrenze)</text:p>
      <text:p text:style-name="P73">Output<text:tab/>Y : REAL (Ausgangswert)</text:p>
      <text:p text:style-name="P183"><text:tab/>W : INT (Warnung)</text:p>
      <text:p text:style-name="P173"><draw:frame draw:style-name="fr3" draw:name="Grafik573" text:anchor-type="paragraph" svg:x="0.935cm" svg:y="0.677cm" svg:width="2.731cm" svg:height="2.649cm" draw:z-index="561"><draw:image xlink:href="Pictures/10000000000000CE000000C86D7C4A9A.png" xlink:type="simple" xlink:show="embed" xlink:actuate="onLoad"/></draw:frame><text:span text:style-name="T21"><text:tab/>E : BOOL (</text:span><text:span text:style-name="T16">Error</text:span><text:span text:style-name="T21"> Ausgang)</text:span></text:p>
      <text:p text:style-name="P183"><text:soft-page-break/><text:line-break/>SEL2_OF_3 wertet 3 Eingänge (IN1 .. IN3) aus und prüft ob die Abweichung der Eingangswert kleiner oder gleich D ist. Der Mittelwert aus den 3 Eingängen wird am Ausgang Y ausgegeben. Die einzelnen Eingänge werden nur dann berücksichtigt wenn Sie nicht weiter als D von einem anderen Eingang entfernt liegen. Wird der Mittelwert nur von 2 Eingängen gebildet, so wird die Nummer des nicht berücksichtigten Eingangs am Ausgang W ausgegeben. Ist W = 0 werden alle 3 Eingänge berücksichtigt. Falls alle 3 Eingänge mehr als D voneinander abweichen wird der Ausgang W = 4 gesetzt und der Ausgang E = TRUE gesetzt. Der Ausgang Y wird in diesem Falle nicht verändert und bleibt auf dem letzten gültigen Wert stehen.</text:p>
      <text:p text:style-name="P183">Eine typische Anwendung für den Baustein ist die Erfassung von 3 Sensoren die dieselbe Prozessgröße Messen um zum Beispiel Messfehler durch unterschiedliche Erfassung oder Drahtbruch zu verringern.</text:p>
      <text:list xml:id="list38472998" text:continue-numbering="true" text:style-name="L1">
        <text:list-item>
          <text:list>
            <text:list-item>
              <text:h text:style-name="P216" text:outline-level="2"><text:alphabetical-index-mark-start text:id="IMark225902392"/>SEL2_OF_3B<text:alphabetical-index-mark-end text:id="IMark225902392"/></text:h>
            </text:list-item>
          </text:list>
        </text:list-item>
      </text:list>
      <text:p text:style-name="P69">Type<text:tab/>Funktion : BOOL</text:p>
      <text:p text:style-name="P66"><text:span text:style-name="T15">Input</text:span><text:span text:style-name="T14"><text:tab/>IN1 : BOOL (Eingang 1)</text:span></text:p>
      <text:p text:style-name="P183"><text:tab/>IN1 : BOOL (Eingang 2)</text:p>
      <text:p text:style-name="P183"><text:tab/>IN3 : BOOL (Eingang 3)</text:p>
      <text:p text:style-name="P173"><text:span text:style-name="T21"><text:tab/>TD : TIME (</text:span><text:span text:style-name="T16">Delay</text:span><text:span text:style-name="T21"> für Ausgang W)</text:span></text:p>
      <text:p text:style-name="P183">Output<text:tab/>Q : BOOL (Ausgang)</text:p>
      <text:p text:style-name="P183"><draw:frame draw:style-name="fr3" draw:name="Grafik575" text:anchor-type="paragraph" svg:x="1.025cm" svg:y="0.863cm" svg:width="3.18cm" svg:height="2.649cm" draw:z-index="563"><draw:image xlink:href="Pictures/10000000000000F0000000C8FA3A299F.png" xlink:type="simple" xlink:show="embed" xlink:actuate="onLoad"/></draw:frame><text:tab/>W : BOOL (Warnmeldung)</text:p>
      <text:p text:style-name="P173"><text:span text:style-name="T21"><text:line-break/>SEL2_OF_3B wertet 3 redundante Binäre Eingänge aus und liefert am Ausgang Q den Wert den mindestens 2 der 3 Eingänge anliegen haben. Falls einer der 3 Eingänge einen anderen Wert als die beiden anderen hat wird </text:span><text:span text:style-name="T21">der </text:span><text:soft-page-break/><text:span text:style-name="T21">Ausgang W als Warnung gesetzt. Damit bei nicht exakt Zeitgleichen Umschalten der Eingänge der Ausgang W nicht anspricht kann für diesen eine Ansprechverzögerung TD festgelegt werden.</text:span></text:p>
      <text:list xml:id="list38477392" text:continue-numbering="true" text:style-name="L1">
        <text:list-item>
          <text:list>
            <text:list-item>
              <text:h text:style-name="P216" text:outline-level="2"><text:alphabetical-index-mark-start text:id="IMark225902392"/>SH<text:alphabetical-index-mark-end text:id="IMark225902392"/></text:h>
            </text:list-item>
          </text:list>
        </text:list-item>
      </text:list>
      <text:p text:style-name="P73">Type<text:tab/>Funktionsbaustein</text:p>
      <text:p text:style-name="P66"><text:span text:style-name="T16">Input</text:span><text:span text:style-name="T21"><text:tab/>IN : REAL (Eingangssignal)</text:span></text:p>
      <text:p text:style-name="P73"><text:tab/>CLK : BOOL (Takteingang)</text:p>
      <text:p text:style-name="P73">Output<text:tab/>OUT : REAL (Ausgangssignal)</text:p>
      <text:p text:style-name="P66"><draw:frame draw:style-name="fr3" draw:name="Grafik159" text:anchor-type="paragraph" svg:x="1.087cm" svg:y="0.663cm" svg:width="2.281cm" svg:height="1.75cm" draw:z-index="123"><draw:image xlink:href="Pictures/10000000000000AC000000849852D7E5.png" xlink:type="simple" xlink:show="embed" xlink:actuate="onLoad"/></draw:frame><text:span text:style-name="T21"><text:tab/>TRIG : BOOL (</text:span><text:span text:style-name="T16">Trigger</text:span><text:span text:style-name="T21"> Output)</text:span></text:p>
      <text:p text:style-name="P66"><text:span text:style-name="T21"><text:line-break/>SH ist ein </text:span><text:span text:style-name="T16">Sample</text:span><text:span text:style-name="T21"> </text:span><text:span text:style-name="T16">and</text:span><text:span text:style-name="T21"> Hold Baustein. Er speichert bei jeder steigenden Flan</text:span><text:span text:style-name="T21">ke von CLK das Eingangssignal IN am Ausgang OUT. Nach jedem update von OUT bleibt TRIG für einen Zyklus TRUE.</text:span></text:p>
      <text:p text:style-name="P2"><draw:frame draw:style-name="fr3" draw:name="Grafik160" text:anchor-type="paragraph" svg:x="1.143cm" svg:y="0.658cm" svg:width="15.221cm" svg:height="4.461cm" draw:z-index="124"><draw:image xlink:href="Pictures/100000000000047F0000015104187800.png" xlink:type="simple" xlink:show="embed" xlink:actuate="onLoad"/></draw:frame>Das Folgende <text:span text:style-name="T11">Beispiel</text:span> erläutert die Funktionsweise von SH:</text:p>
      <text:p text:style-name="P3"/>
      <text:p text:style-name="P3"><draw:frame draw:style-name="fr3" draw:name="Grafik161" text:anchor-type="paragraph" svg:x="1.081cm" svg:y="0.005cm" svg:width="15.697cm" svg:height="4.36cm" draw:z-index="125"><draw:image xlink:href="Pictures/100000000000049B00000147BEEECF7B.png" xlink:type="simple" xlink:show="embed" xlink:actuate="onLoad"/></draw:frame></text:p>
      <text:list xml:id="list38469304" text:continue-numbering="true" text:style-name="L1">
        <text:list-item>
          <text:list>
            <text:list-item>
              <text:h text:style-name="P216" text:outline-level="2"><text:soft-page-break/><text:alphabetical-index-mark-start text:id="IMark225902392"/>SH_1<text:alphabetical-index-mark-end text:id="IMark225902392"/></text:h>
            </text:list-item>
          </text:list>
        </text:list-item>
      </text:list>
      <text:p text:style-name="P73">Type<text:tab/>Funktionsbaustein</text:p>
      <text:p text:style-name="P66"><text:span text:style-name="T16">Input</text:span><text:span text:style-name="T21"><text:tab/>IN : REAL (Eingangssignal)</text:span></text:p>
      <text:p text:style-name="P73"><text:tab/>PT : TIME (Abtastzeit)</text:p>
      <text:p text:style-name="P73">Output<text:tab/>OUT : REAL (Ausgangssignal)</text:p>
      <text:p text:style-name="P66"><draw:frame draw:style-name="fr3" draw:name="Grafik162" text:anchor-type="paragraph" svg:x="1.296cm" svg:y="0.647cm" svg:width="2.281cm" svg:height="1.75cm" draw:z-index="126"><draw:image xlink:href="Pictures/10000000000000AC00000084E4420A3B.png" xlink:type="simple" xlink:show="embed" xlink:actuate="onLoad"/></draw:frame><text:span text:style-name="T21"><text:tab/>TRIG: BOOL (</text:span><text:span text:style-name="T16">Trigger</text:span><text:span text:style-name="T21"> Output)</text:span></text:p>
      <text:p text:style-name="P66"><text:span text:style-name="T21"><text:line-break/>SH_1 ist ein </text:span><text:span text:style-name="T16">Sample</text:span><text:span text:style-name="T21"> </text:span><text:span text:style-name="T19">und</text:span><text:span text:style-name="T21"> Hold Baustein mit einstellbarer Abtastzeit. Er speichert alle PT das Eingangssignal IN am Ausgang OUT. Nach jedem update von OUT bleibt TRIG für einen Zyklus TRUE.</text:span></text:p>
      <text:p text:style-name="P2"><draw:frame draw:style-name="fr3" draw:name="Grafik163" text:anchor-type="paragraph" svg:x="1.037cm" svg:y="0.713cm" svg:width="15.221cm" svg:height="4.009cm" draw:z-index="127"><draw:image xlink:href="Pictures/100000000000047F0000012FDCBC6BE4.png" xlink:type="simple" xlink:show="embed" xlink:actuate="onLoad"/></draw:frame>Das Folgende <text:span text:style-name="T11">Beispiel</text:span> erläutert die Funktionsweise von SH_1:</text:p>
      <text:p text:style-name="P2"/>
      <text:p text:style-name="P3"><draw:frame draw:style-name="fr3" draw:name="Grafik164" text:anchor-type="paragraph" svg:x="1.009cm" svg:y="0.101cm" svg:width="15.956cm" svg:height="6.493cm" draw:z-index="128"><draw:image xlink:href="Pictures/10000000000002BD0000011D15AE5DF7.png" xlink:type="simple" xlink:show="embed" xlink:actuate="onLoad"/></draw:frame></text:p>
      <text:list xml:id="list38450407" text:continue-numbering="true" text:style-name="L1">
        <text:list-item>
          <text:list>
            <text:list-item>
              <text:h text:style-name="P216" text:outline-level="2"><text:soft-page-break/><text:alphabetical-index-mark-start text:id="IMark225902392"/>SH_2<text:alphabetical-index-mark-end text:id="IMark225902392"/></text:h>
            </text:list-item>
          </text:list>
        </text:list-item>
      </text:list>
      <text:p text:style-name="P73">Type<text:tab/>Funktionsbaustein</text:p>
      <text:p text:style-name="P66"><text:span text:style-name="T16">Input</text:span><text:span text:style-name="T21"><text:tab/>IN : REAL (Eingangssignal)</text:span></text:p>
      <text:p text:style-name="P73"><text:tab/>PT : TIME (Abtastzeit)</text:p>
      <text:p text:style-name="P66"><text:span text:style-name="T21"><text:tab/>N : INT (Anzahl der </text:span><text:span text:style-name="T16">Samples</text:span><text:span text:style-name="T21"> für Statistik)</text:span></text:p>
      <text:p text:style-name="P73">Output<text:tab/>OUT : REAL (Ausgangssignal)</text:p>
      <text:p text:style-name="P66"><draw:frame draw:style-name="fr3" draw:name="Grafik165" text:anchor-type="paragraph" svg:x="1.067cm" svg:y="0.642cm" svg:width="2.281cm" svg:height="3.099cm" draw:z-index="129"><draw:image xlink:href="Pictures/10000000000000AC000000EA5438B0E7.png" xlink:type="simple" xlink:show="embed" xlink:actuate="onLoad"/></draw:frame><text:span text:style-name="T21"><text:tab/>TRIG : BOOL (</text:span><text:span text:style-name="T16">Trigger</text:span><text:span text:style-name="T21"> Output)</text:span></text:p>
      <text:p text:style-name="P66"><text:span text:style-name="T21"><text:line-break/>SH_2 ist ein </text:span><text:span text:style-name="T16">Sample</text:span><text:span text:style-name="T21"> </text:span><text:span text:style-name="T16">and</text:span><text:span text:style-name="T21"> Hold Baustein mit einstellbarer Abtastzeit. Er speichert alle PT das Eingangssignal IN am Ausgang OUT. Nach jedem update von OUT bleibt TRIG für einen Zyklus TRUE. Zusätzlich zur Funktion eines </text:span><text:span text:style-name="T16">Sample</text:span><text:span text:style-name="T21"> </text:span><text:span text:style-name="T16">and</text:span><text:span text:style-name="T21"> Hold Bausteins bietet SH_2 bereits integrierte Funktionalität bezüglich der Statistik. Mit dem Eingang N kann spezifiziert werden, über wie viele </text:span><text:span text:style-name="T16">Samples</text:span><text:span text:style-name="T21"> (maximal 16) ein Mittelwert, Minimalwert und Maximalwert gebildet werden. Als weitere Eigenschaft können aus den N </text:span><text:span text:style-name="T16">Samples</text:span><text:span text:style-name="T21"> für die Statistik auch kleinste und größte Werte ignoriert werden, was sehr sinnvoll sein kann um Extremwerte zu ignorieren. Der Eingangswert DISC=0 bedeutet alle </text:span><text:span text:style-name="T16">Samples</text:span><text:span text:style-name="T21"> benutzen, eine 1 bedeutet den niedrigsten Wert ignorieren, 2 bedeutet den niedrigsten und den höchsten Wert ignorieren usw. Wenn zum Beispiel N=5 und DISC=2, dann werden 5 </text:span><text:span text:style-name="T16">Samples</text:span><text:span text:style-name="T21"> gesammelt, der niedrigste und der höchste Wert werden verworfen und über die 3 verbleibenden </text:span><text:span text:style-name="T16">Samples</text:span><text:span text:style-name="T21"> wird der Mittelwert, Minimalwert und Maximalwert gebildet.</text:span></text:p>
      <text:p text:style-name="P73">Das Folgende Beispiel erläutert die Funktionsweise von SH_2:</text:p>
      <text:p text:style-name="P73"><draw:frame draw:style-name="fr3" draw:name="Grafik166" text:anchor-type="paragraph" svg:x="1.099cm" svg:y="0.102cm" svg:width="15.767cm" svg:height="4.359cm" draw:z-index="289"><draw:image xlink:href="Pictures/10000000000004C30000015126E2283D.png" xlink:type="simple" xlink:show="embed" xlink:actuate="onLoad"/></draw:frame><draw:frame draw:style-name="fr3" draw:name="Grafik167" text:anchor-type="paragraph" svg:x="0.94cm" svg:y="5.036cm" svg:width="15.903cm" svg:height="9.442cm" draw:z-index="130"><draw:image xlink:href="Pictures/10000000000002B30000019AA02676B9.png" xlink:type="simple" xlink:show="embed" xlink:actuate="onLoad"/></draw:frame></text:p>
      <text:p text:style-name="P183"><text:soft-page-break/></text:p>
      <text:list xml:id="list38475211" text:continue-numbering="true" text:style-name="L1">
        <text:list-item>
          <text:list>
            <text:list-item>
              <text:h text:style-name="P216" text:outline-level="2"><text:alphabetical-index-mark-start text:id="IMark226227396"/>SH_T<text:alphabetical-index-mark-end text:id="IMark226227396"/></text:h>
            </text:list-item>
          </text:list>
        </text:list-item>
      </text:list>
      <text:p text:style-name="P73">Type<text:tab/>Funktionsbaustein</text:p>
      <text:p text:style-name="P66"><text:span text:style-name="T16">Input</text:span><text:span text:style-name="T21"><text:tab/>IN : REAL (Eingangssignal)</text:span></text:p>
      <text:p text:style-name="P66"><text:span text:style-name="T21"><text:tab/>E : BOOL (</text:span><text:span text:style-name="T16">enable</text:span><text:span text:style-name="T21"> Signal)</text:span></text:p>
      <text:p text:style-name="P73"><draw:frame draw:style-name="fr3" draw:name="Grafik168" text:anchor-type="paragraph" svg:x="1.002cm" svg:y="0.667cm" svg:width="2.101cm" svg:height="1.52cm" draw:z-index="714"><draw:image xlink:href="Pictures/100000000000009F000000736416F08A.png" xlink:type="simple" xlink:show="embed" xlink:actuate="onLoad"/></draw:frame>Output<text:tab/>OUT : REAL (Ausgangssignal)</text:p>
      <text:p text:style-name="P66"><text:span text:style-name="T21"><text:line-break/>SH_T ist ein transparenter </text:span><text:span text:style-name="T16">Sample</text:span><text:span text:style-name="T21"> </text:span><text:span text:style-name="T16">and</text:span><text:span text:style-name="T21"> Hold Baustein. Das Eingangssignal in ist solange am Ausgang verfügbar, wie E gleich TRUE ist. Mit einer fallenden Flanke von E wird der Wert von in am Ausgang OUT gespeichert und bleibt solange bestehen bis E wieder TRUE wird und dadurch wieder in auf OUT geschaltet wird.</text:span></text:p>
      <text:p text:style-name="P2"><draw:frame draw:style-name="fr3" draw:name="Grafik169" text:anchor-type="paragraph" svg:x="0.99cm" svg:y="0.677cm" svg:width="15.517cm" svg:height="4.417cm" draw:z-index="131"><draw:image xlink:href="Pictures/10000000000004A100000151223436B5.png" xlink:type="simple" xlink:show="embed" xlink:actuate="onLoad"/></draw:frame>Das folgende Beispiel verdeutlicht die Arbeitsweise von SH_T:</text:p>
      <text:p text:style-name="P38"><text:soft-page-break/></text:p>
      <text:p text:style-name="P183"><draw:frame draw:style-name="fr3" draw:name="Grafik170" text:anchor-type="paragraph" svg:x="1.117cm" svg:y="0.22cm" svg:width="15.621cm" svg:height="6.05cm" draw:z-index="132"><draw:image xlink:href="Pictures/10000000000002DE0000011C4614FC8E.png" xlink:type="simple" xlink:show="embed" xlink:actuate="onLoad"/></draw:frame></text:p>
      <text:list xml:id="list38473664" text:continue-numbering="true" text:style-name="L1">
        <text:list-item>
          <text:list>
            <text:list-item>
              <text:h text:style-name="P216" text:outline-level="2"><text:alphabetical-index-mark-start text:id="IMark226227396"/>STAIR<text:alphabetical-index-mark-end text:id="IMark226227396"/></text:h>
            </text:list-item>
          </text:list>
        </text:list-item>
      </text:list>
      <text:p text:style-name="P73">Type<text:tab/>Funktion</text:p>
      <text:p text:style-name="P66"><text:span text:style-name="T16">Input</text:span><text:span text:style-name="T21"><text:tab/>X : REAL (Eingangssignal)</text:span></text:p>
      <text:p text:style-name="P73"><text:tab/>D : REAL (Schrittweite des Ausgangssignals)</text:p>
      <text:p text:style-name="P73"><draw:frame draw:style-name="fr3" draw:name="Grafik243" text:anchor-type="paragraph" svg:x="1.051cm" svg:y="0.91cm" svg:width="2.281cm" svg:height="1.57cm" draw:z-index="205"><draw:image xlink:href="Pictures/10000000000000AC000000772AFE0408.png" xlink:type="simple" xlink:show="embed" xlink:actuate="onLoad"/></draw:frame>Output<text:tab/>REAL (Ausgangssignal)</text:p>
      <text:p text:style-name="P2"><text:line-break/>Das <text:span text:style-name="T11">Ausgangssignal</text:span> von <text:span text:style-name="T11">STAIR</text:span> folgt dem Eingangssignal X mit einer Treppenfunktion. Die Höhe der Stufen ist vorgegeben durch D. Wird X = 0, so folgt das Ausgangssignal direkt dem Eingangssignal. STAIR ist jedoch nicht zum filtern von Eingangssignalen geeignet, denn wenn der Eingang <text:soft-page-break/>um eine <text:span text:style-name="T7">Treppenschwelle</text:span> schwankt, schaltet der Ausgang zwischen zwei benachbarten Werten hin und her. Für diesen Zweck empfehlen wir den Einsatz von Stair2, der mit einer <text:span text:style-name="T7">Hysterese</text:span> arbeitet und instabile Zustände vermeidet.</text:p>
      <text:p text:style-name="P183"><draw:frame draw:style-name="fr3" draw:name="Grafik244" text:anchor-type="paragraph" svg:x="0.981cm" svg:y="0.695cm" svg:width="15.998cm" svg:height="3.378cm" draw:z-index="427"><draw:image xlink:href="Pictures/10000000000002B800000093AB32EBA1.png" xlink:type="simple" xlink:show="embed" xlink:actuate="onLoad"/></draw:frame>Das folgende Beispiel verdeutlicht die Arbeitsweise von STAIR:</text:p>
      <text:p text:style-name="P183"/>
      <text:p text:style-name="P183"><draw:frame draw:style-name="fr3" draw:name="Grafik245" text:anchor-type="paragraph" svg:x="1.485cm" svg:y="0.385cm" svg:width="13.483cm" svg:height="7.258cm" draw:z-index="202"><draw:image xlink:href="Pictures/10000000000001EE0000010A72ED4C35.png" xlink:type="simple" xlink:show="embed" xlink:actuate="onLoad"/></draw:frame></text:p>
      <text:list xml:id="list38476599" text:continue-numbering="true" text:style-name="L1">
        <text:list-item>
          <text:list>
            <text:list-item>
              <text:h text:style-name="P216" text:outline-level="2"><text:alphabetical-index-mark-start text:id="IMark226227396"/>STAIR2<text:alphabetical-index-mark-end text:id="IMark226227396"/></text:h>
            </text:list-item>
          </text:list>
        </text:list-item>
      </text:list>
      <text:p text:style-name="P73">Type<text:tab/>Funktionsbaustein</text:p>
      <text:p text:style-name="P66"><text:span text:style-name="T16">Input</text:span><text:span text:style-name="T21"><text:tab/>X : REAL (Eingangssignal)</text:span></text:p>
      <text:p text:style-name="P73"><text:tab/>D : REAL (Schrittweite des Ausgangssignals)</text:p>
      <text:p text:style-name="P73"><draw:frame draw:style-name="fr3" draw:name="Grafik246" text:anchor-type="paragraph" svg:x="1.023cm" svg:y="0.644cm" svg:width="1.829cm" svg:height="1.75cm" draw:z-index="203"><draw:image xlink:href="Pictures/100000000000008A000000848734B085.png" xlink:type="simple" xlink:show="embed" xlink:actuate="onLoad"/></draw:frame>Output<text:tab/>Y : REAL (Ausgangssignal)</text:p>
      <text:p text:style-name="P173"><text:soft-page-break/><text:span text:style-name="T21"><text:line-break/>Das Ausgangssignal von STAIR2 folgt dem Eingangssignal X mit einer Treppenfunktion. Die Höhe der Stufen ist vorgegeben durch D. Wird D = 0, so folgt das Ausgangssignal direkt dem Eingangssignal. Das Signal folgt der Treppe aber mit einer </text:span><text:span text:style-name="T19">Hysterese</text:span><text:span text:style-name="T21"> von D so dass ein verrauschtes Eingangssignal keine Sprünge zwischen Treppenwerten auslösen kann. STAIR2 ist auch als Eingangsfilter geeignet.</text:span></text:p>
      <text:p text:style-name="P183">Das folgende Beispiel verdeutlicht die Arbeitsweise von STAIR2:</text:p>
      <text:p text:style-name="P183"><draw:frame draw:style-name="fr3" draw:name="Grafik247" text:anchor-type="paragraph" svg:x="1.046cm" svg:y="0.522cm" svg:width="13.411cm" svg:height="3.18cm" draw:z-index="204"><draw:image xlink:href="Pictures/100000000000034D000000C82A8402A6.png" xlink:type="simple" xlink:show="embed" xlink:actuate="onLoad"/></draw:frame><draw:frame draw:style-name="fr3" draw:name="Grafik248" text:anchor-type="paragraph" svg:x="1.087cm" svg:y="4.517cm" svg:width="13.464cm" svg:height="6.652cm" draw:z-index="290"><draw:image xlink:href="Pictures/10000000000001EE000000F4E9192F7C.png" xlink:type="simple" xlink:show="embed" xlink:actuate="onLoad"/></draw:frame></text:p>
      <text:p text:style-name="P183"/>
      <text:p text:style-name="P183"/>
      <text:p text:style-name="P183"/>
      <text:list xml:id="list38462264" text:continue-numbering="true" text:style-name="L1">
        <text:list-item>
          <text:list>
            <text:list-item>
              <text:h text:style-name="P216" text:outline-level="2"><text:soft-page-break/><text:alphabetical-index-mark-start text:id="IMark229756400"/>TREND_DW<text:alphabetical-index-mark-end text:id="IMark229756400"/></text:h>
            </text:list-item>
          </text:list>
        </text:list-item>
      </text:list>
      <text:p text:style-name="P73">Type<text:tab/>Funktionsbaustein</text:p>
      <text:p text:style-name="P66"><text:span text:style-name="T16">Input</text:span><text:span text:style-name="T21"><text:tab/>X : DWORD (Eingangssignal)<text:tab/></text:span></text:p>
      <text:p text:style-name="P73"><draw:frame draw:style-name="fr3" draw:name="Grafik747" text:anchor-type="paragraph" svg:x="1.025cm" svg:y="0.697cm" svg:width="2.499cm" svg:height="1.12cm" draw:z-index="798"><draw:image xlink:href="Pictures/10000000000000BD000000558E93D841.png" xlink:type="simple" xlink:show="embed" xlink:actuate="onLoad"/></draw:frame>Output<text:tab/>Q : BOOL (X steigend = TRUE)</text:p>
      <text:p text:style-name="P183"><text:line-break/>TREND_DW überwacht den Eingang X und zeit am Ausgang Q an ob X steigt (Q = TRUE) oder X fällt (Q = FALSE). wenn sich X nicht verändert bleibt Q auf seinen letzten Wert stehen.</text:p>
      <text:list xml:id="list38472848" text:continue-numbering="true" text:style-name="L1">
        <text:list-item>
          <text:list>
            <text:list-item>
              <text:h text:style-name="P216" text:outline-level="2"><text:alphabetical-index-mark-start text:id="IMark229756400"/>WORD_TO_RANGE<text:alphabetical-index-mark-end text:id="IMark229756400"/></text:h>
            </text:list-item>
          </text:list>
        </text:list-item>
      </text:list>
      <text:p text:style-name="P69">Type<text:tab/>Funktion</text:p>
      <text:p text:style-name="P66"><text:span text:style-name="T15">Input</text:span><text:span text:style-name="T14"><text:tab/>X : WORD (Eingangswert)</text:span></text:p>
      <text:p text:style-name="P179"><text:tab/>LOW : REAL (Ausgangswert bei X = 0)</text:p>
      <text:p text:style-name="P179"><text:tab/>HIGH : REAL (Ausgangswert bei X = 65535)</text:p>
      <text:p text:style-name="P73"><draw:frame draw:style-name="fr3" draw:name="Grafik435" text:anchor-type="paragraph" svg:x="1.067cm" svg:y="0.688cm" svg:width="5.669cm" svg:height="1.79cm" draw:z-index="414"><draw:image xlink:href="Pictures/10000000000001AD00000087C18C3A39.png" xlink:type="simple" xlink:show="embed" xlink:actuate="onLoad"/></draw:frame>Output<text:tab/>REAL (Ausgangswert)</text:p>
      <text:p text:style-name="P183"><text:line-break/>WORD_TO_RANGE wandelt einen WORD Wert in einen REAL Wert. Ein Eingangswert von 0 entspricht dabei dem REAL Wert von LOW und eine Eingangswert von 65535 entspricht dem Eingangswert von HIGH.</text:p>
      <text:p text:style-name="P183">Um einen WORD Wert von 0..65535 in einen Prozentwert von 0..100 zu Wandeln wird der Baustein wie folgt aufgerufen:</text:p>
      <text:p text:style-name="P183">WORD_TO_RANGE(X,100,0)</text:p>
      <text:list xml:id="list38473226" text:continue-numbering="true" text:style-name="L1">
        <text:list-item>
          <text:h text:style-name="P210" text:outline-level="1">Sensorik</text:h>
          <text:list>
            <text:list-item>
              <text:h text:style-name="P216" text:outline-level="2"><text:alphabetical-index-mark-start text:id="IMark229756400"/>MULTI_IN<text:alphabetical-index-mark-end text:id="IMark229756400"/></text:h>
            </text:list-item>
          </text:list>
        </text:list-item>
      </text:list>
      <text:p text:style-name="P69">Type<text:tab/>Funktion : REAL</text:p>
      <text:p text:style-name="P66"><text:span text:style-name="T15">Input</text:span><text:span text:style-name="T14"><text:tab/>IN_1 : REAL (Eingang 1)</text:span></text:p>
      <text:p text:style-name="P69"><text:tab/>IN_2 : REAL (Eingang 2)</text:p>
      <text:p text:style-name="P69"><text:tab/>IN_3 : REAL (Eingang 3)</text:p>
      <text:p text:style-name="P69"><text:tab/>DEFAULT : REAL (Vorgabewert)</text:p>
      <text:p text:style-name="P69"><text:tab/>IN_MIN : REAL (unterer Grenzwert für Eingänge)</text:p>
      <text:p text:style-name="P69"><text:tab/>IN_MAX : REAL (oberer Grenzwert für Eingänge)</text:p>
      <text:p text:style-name="P69"><text:tab/>MODE : Byte (Auswahl des Betriebsmodus)</text:p>
      <text:p text:style-name="P73"><draw:frame draw:style-name="fr3" draw:name="Grafik172" text:anchor-type="paragraph" svg:x="1.21cm" svg:y="0.656cm" svg:width="3.18cm" svg:height="3.821cm" draw:z-index="134"><draw:image xlink:href="Pictures/10000000000000F0000001212C694CD3.png" xlink:type="simple" xlink:show="embed" xlink:actuate="onLoad"/></draw:frame>Output<text:tab/>REAL (Ausgangssignal)</text:p>
      <text:p text:style-name="P73"><text:line-break/>MULTI_IN ist ein Sensorinterface, das bis zu 3 Sensoren einliest, auf Fehler überprüft und abhängig vom Eingangsmodus einen Ausgangswert berechnet.</text:p>
      <table:table table:name="Tabelle1" table:style-name="Tabelle1">
        <table:table-column table:style-name="Tabelle1.A"/>
        <table:table-column table:style-name="Tabelle1.B"/>
        <table:table-row>
          <table:table-cell table:style-name="Tabelle1.A1" office:value-type="string">
            <text:p text:style-name="P56">Mode</text:p>
          </table:table-cell>
          <table:table-cell table:style-name="Tabelle1.B1" office:value-type="string">
            <text:p text:style-name="P57"><text:s/>Funktion</text:p>
          </table:table-cell>
        </table:table-row>
        <table:table-row>
          <table:table-cell table:style-name="Tabelle1.A2" office:value-type="string">
            <text:p text:style-name="P56">0</text:p>
          </table:table-cell>
          <table:table-cell table:style-name="Tabelle1.B2" office:value-type="string">
            <text:p text:style-name="P57">MULTI_in = Durchschnitt der Eingänge in_1 .. 3</text:p>
          </table:table-cell>
        </table:table-row>
        <table:table-row>
          <table:table-cell table:style-name="Tabelle1.A2" office:value-type="string">
            <text:p text:style-name="P56">1</text:p>
          </table:table-cell>
          <table:table-cell table:style-name="Tabelle1.B2" office:value-type="string">
            <text:p text:style-name="P57">MULTI_in = Eingang in_1</text:p>
          </table:table-cell>
        </table:table-row>
        <table:table-row>
          <table:table-cell table:style-name="Tabelle1.A2" office:value-type="string">
            <text:p text:style-name="P56">2</text:p>
          </table:table-cell>
          <table:table-cell table:style-name="Tabelle1.B2" office:value-type="string">
            <text:p text:style-name="P57">MULTI_in = Eingang in_2</text:p>
          </table:table-cell>
        </table:table-row>
        <table:table-row>
          <table:table-cell table:style-name="Tabelle1.A2" office:value-type="string">
            <text:p text:style-name="P56">3</text:p>
          </table:table-cell>
          <table:table-cell table:style-name="Tabelle1.B2" office:value-type="string">
            <text:p text:style-name="P57">MULTI_in = Eingang in_3</text:p>
          </table:table-cell>
        </table:table-row>
        <table:table-row>
          <table:table-cell table:style-name="Tabelle1.A2" office:value-type="string">
            <text:p text:style-name="P56">4</text:p>
          </table:table-cell>
          <table:table-cell table:style-name="Tabelle1.B2" office:value-type="string">
            <text:p text:style-name="P58"><text:span text:style-name="T28">MULTI_in = </text:span><text:span text:style-name="T29">Default</text:span><text:span text:style-name="T28"> Eingang</text:span></text:p>
          </table:table-cell>
        </table:table-row>
        <table:table-row>
          <table:table-cell table:style-name="Tabelle1.A2" office:value-type="string">
            <text:p text:style-name="P56">5</text:p>
          </table:table-cell>
          <table:table-cell table:style-name="Tabelle1.B2" office:value-type="string">
            <text:p text:style-name="P57">MULTI_in = kleinster Wert der Eingänge in_1 .. 3</text:p>
          </table:table-cell>
        </table:table-row>
        <table:table-row>
          <table:table-cell table:style-name="Tabelle1.A2" office:value-type="string">
            <text:p text:style-name="P56">6</text:p>
          </table:table-cell>
          <table:table-cell table:style-name="Tabelle1.B2" office:value-type="string">
            <text:p text:style-name="P57">MULTI_in = größter Wert der Eingänge in_1 .. 3</text:p>
          </table:table-cell>
        </table:table-row>
        <text:soft-page-break/>
        <table:table-row>
          <table:table-cell table:style-name="Tabelle1.A2" office:value-type="string">
            <text:p text:style-name="P56">7</text:p>
          </table:table-cell>
          <table:table-cell table:style-name="Tabelle1.B2" office:value-type="string">
            <text:p text:style-name="P57">MULTI_in = mittlerer Wert der Eingänge in_1..3</text:p>
          </table:table-cell>
        </table:table-row>
        <table:table-row>
          <table:table-cell table:style-name="Tabelle1.A2" office:value-type="string">
            <text:p text:style-name="P56">&gt;7</text:p>
          </table:table-cell>
          <table:table-cell table:style-name="Tabelle1.B2" office:value-type="string">
            <text:p text:style-name="P57">MULTI_in = 0</text:p>
          </table:table-cell>
        </table:table-row>
      </table:table>
      <text:p text:style-name="P66"/>
      <text:p text:style-name="P73">Unabhängig vom eingestellten Mode werden Eingangswerte, die größer als IN_MAX oder kleiner als IN_MIN sind ignoriert. Ist keine Berechnung wie durch Mode vorgegeben mehr möglich, wird der Eingang <text:span text:style-name="T2">Default</text:span> als Ausgangswert benutzt. Multi_in wird eingesetzt, wenn verschiedene Sensoren den gleichen Wert messen und hohe Sicherheit und Zuverlässigkeit gefragt ist. Eine mögliche Anwendung ist die Messung der Außentemperatur an verschiedenen Stellen und die Überwachung auf Kabel oder Sensorbruch.</text:p>
      <text:list xml:id="list38456983" text:continue-numbering="true" text:style-name="L1">
        <text:list-item>
          <text:list>
            <text:list-item>
              <text:h text:style-name="P216" text:outline-level="2"><text:alphabetical-index-mark-start text:id="IMark229756400"/>RES_NI<text:alphabetical-index-mark-end text:id="IMark229756400"/></text:h>
            </text:list-item>
          </text:list>
        </text:list-item>
      </text:list>
      <text:p text:style-name="P69">Type<text:tab/>Funktion : REAL</text:p>
      <text:p text:style-name="P66"><text:span text:style-name="T15">Input</text:span><text:span text:style-name="T14"><text:tab/>T : REAL (Temperatur in °C)</text:span></text:p>
      <text:p text:style-name="P69"><text:tab/>R0 : REAL (Widerstand bei 0 °C)</text:p>
      <text:p text:style-name="P73">Output<text:tab/>REAL (Widerstandswert)</text:p>
      <text:p text:style-name="P73"><draw:frame draw:style-name="fr3" draw:name="Grafik173" text:anchor-type="paragraph" svg:x="1.039cm" svg:y="0.282cm" svg:width="3.18cm" svg:height="1.57cm" draw:z-index="809"><draw:image xlink:href="Pictures/10000000000000F000000077B5E2B094.png" xlink:type="simple" xlink:show="embed" xlink:actuate="onLoad"/></draw:frame><text:line-break/>RES_NI berechnet den Widerstand eines NI-Widerstandsfühlers aus den Eingangswerten T (Temperatur in °C) und R0 (Widerstand bei 0°C).</text:p>
      <text:p text:style-name="P183">Die Berechnung erfolgt nach der Formel:</text:p>
      <text:p text:style-name="P173"><text:span text:style-name="T21"><text:tab/>RES_NI = R0 + A*T + B*T²+C*T</text:span>4</text:p>
      <text:p text:style-name="P183"><text:tab/>A = 0.5485</text:p>
      <text:p text:style-name="P183"><text:tab/>B = 0.665E-3</text:p>
      <text:p text:style-name="P183"><text:tab/>C = 2.805E-9</text:p>
      <text:p text:style-name="P183">Die Berechnung ist geeignet für einen Temperaturbereich von -60 .. +180 °C.</text:p>
      <text:p text:style-name="P73"><draw:frame draw:style-name="fr13" draw:name="Grafik174" text:anchor-type="paragraph" svg:x="1.233cm" svg:y="0.215cm" svg:width="9.788cm" svg:height="6.059cm" draw:z-index="810"><draw:image xlink:href="Pictures/1000000000000172000000E5A1C18477.png" xlink:type="simple" xlink:show="embed" xlink:actuate="onLoad"/></draw:frame></text:p>
      <text:p text:style-name="P183"><text:soft-page-break/><text:alphabetical-index-mark text:string-value=" "/></text:p>
      <text:list xml:id="list38454987" text:continue-numbering="true" text:style-name="L1">
        <text:list-item>
          <text:list>
            <text:list-item>
              <text:h text:style-name="P216" text:outline-level="2"><text:alphabetical-index-mark-start text:id="IMark229756400"/>RES_NTC<text:alphabetical-index-mark-end text:id="IMark229756400"/></text:h>
            </text:list-item>
          </text:list>
        </text:list-item>
      </text:list>
      <text:p text:style-name="P69">Type<text:tab/>Funktion : REAL</text:p>
      <text:p text:style-name="P66"><text:span text:style-name="T15">Input</text:span><text:span text:style-name="T14"><text:tab/>T : REAL (Temperatur in °C)</text:span></text:p>
      <text:p text:style-name="P69"><text:tab/>RN : REAL (Widerstand bei 25 °C)</text:p>
      <text:p text:style-name="P179"><text:tab/>B : REAL (Charakteristischer wert des Sensors)</text:p>
      <text:p text:style-name="P73">Output<text:tab/>REAL (Widerstandswert)</text:p>
      <text:p text:style-name="P73"><text:line-break/>RES_NTC berechnet den Widerstand eines NTC-Widerstandsfühlers aus den Eingangswerten T (Temperatur in °C) und RN (Widerstand bei 25°C). Der Eingangswert B ist eine Konstate die aus den Sensor Datenblättern entnommen werden muss. Typische Werte für NTC Senosren liegen bei 2000 – 4000 Kelvin.</text:p>
      <text:p text:style-name="P183"><draw:frame draw:style-name="fr3" draw:name="Grafik754" text:anchor-type="paragraph" svg:x="1.117cm" svg:y="0.624cm" svg:width="4.419cm" svg:height="0.794cm" draw:z-index="811"><draw:image xlink:href="Pictures/10000000000000A70000001E24F60B74.png" xlink:type="simple" xlink:show="embed" xlink:actuate="onLoad"/></draw:frame>Die Berechnung erfolgt nach der Formel:</text:p>
      <text:p text:style-name="P183"/>
      <text:p text:style-name="P183">Die Formel liefert eine hinreichende Genauigkeit für kleine Temperaturbereiche wie z.B. 0-100 °C. Für weite Temperaturbereiche ist die Formal nach Steinhart besser geeignet.</text:p>
      <text:list xml:id="list38459350" text:continue-numbering="true" text:style-name="L1">
        <text:list-item>
          <text:list>
            <text:list-item>
              <text:h text:style-name="P216" text:outline-level="2"><text:soft-page-break/><text:alphabetical-index-mark-start text:id="IMark229756400"/>RES_PT<text:alphabetical-index-mark-end text:id="IMark229756400"/></text:h>
            </text:list-item>
          </text:list>
        </text:list-item>
      </text:list>
      <text:p text:style-name="P69">Type<text:tab/>Funktion : REAL</text:p>
      <text:p text:style-name="P66"><text:span text:style-name="T15">Input</text:span><text:span text:style-name="T14"><text:tab/>T : REAL (Temperatur in °C)</text:span></text:p>
      <text:p text:style-name="P69"><text:tab/>R0 : REAL (Widerstand bei 0 °C)</text:p>
      <text:p text:style-name="P73"><draw:frame draw:style-name="fr14" draw:name="Grafik175" text:anchor-type="paragraph" svg:x="1.035cm" svg:y="0.656cm" svg:width="3.62cm" svg:height="1.57cm" draw:z-index="135"><draw:image xlink:href="Pictures/100000000000011200000077785DFB56.png" xlink:type="simple" xlink:show="embed" xlink:actuate="onLoad"/></draw:frame>Output<text:tab/>REAL (Widerstandswert)</text:p>
      <text:p text:style-name="P73"><text:line-break/>RES_PT berechnet den Widerstand eines PT-Widerstandsfühlers aus den Eingangswerten T (Temperatur in °C) und R0 (Widerstand bei 0°C).</text:p>
      <text:p text:style-name="P183">Die Berechnung erfolgt nach der Formel:</text:p>
      <text:p text:style-name="P183">für Temperaturen &gt; 0 °C</text:p>
      <text:p text:style-name="P183"><text:tab/>RES_PT = R0 * (1 + A*T + B*T²)</text:p>
      <text:p text:style-name="P183">und für Temperaturen &lt; 0°C</text:p>
      <text:p text:style-name="P183"><text:tab/>RES_PT = R0 * (1 + A*T + B*T² + C*(T-100)*T³</text:p>
      <text:p text:style-name="P183"><text:tab/>A = 3.90802E-3</text:p>
      <text:p text:style-name="P183"><text:tab/>B = -5.80195E-7</text:p>
      <text:p text:style-name="P183"><text:tab/>C = -427350E-12</text:p>
      <text:p text:style-name="P73"><draw:frame draw:style-name="fr13" draw:name="Grafik176" text:anchor-type="paragraph" svg:x="1.053cm" svg:y="0.635cm" svg:width="10.94cm" svg:height="8.02cm" draw:z-index="136"><draw:image xlink:href="Pictures/10000000000002050000017BDBB8942C.png" xlink:type="simple" xlink:show="embed" xlink:actuate="onLoad"/></draw:frame>Die Berechnung ist geeignet für Temperaturen von -200 .. +850 °C.</text:p>
      <text:p text:style-name="P73"/>
      <text:list xml:id="list38470714" text:continue-numbering="true" text:style-name="L1">
        <text:list-item>
          <text:list>
            <text:list-item>
              <text:h text:style-name="P216" text:outline-level="2"><text:soft-page-break/><text:alphabetical-index-mark-start text:id="IMark229756400"/>RES_SI<text:alphabetical-index-mark-end text:id="IMark229756400"/></text:h>
            </text:list-item>
          </text:list>
        </text:list-item>
      </text:list>
      <text:p text:style-name="P69">Type<text:tab/>Funktion : REAL</text:p>
      <text:p text:style-name="P66"><text:span text:style-name="T15">Input</text:span><text:span text:style-name="T14"><text:tab/>T : REAL (Temperatur in °C)</text:span></text:p>
      <text:p text:style-name="P69"><text:tab/>R0 : REAL (Widerstand bei 0 °C)</text:p>
      <text:p text:style-name="P73"><draw:frame draw:style-name="fr3" draw:name="Grafik177" text:anchor-type="paragraph" svg:x="1.148cm" svg:y="0.617cm" svg:width="3.18cm" svg:height="2.02cm" draw:z-index="218"><draw:image xlink:href="Pictures/10000000000000F000000099D6100F29.png" xlink:type="simple" xlink:show="embed" xlink:actuate="onLoad"/></draw:frame>Output<text:tab/>REAL (Widerstandswert)</text:p>
      <text:p text:style-name="P73"><text:line-break/>RES_SI berechnet den Widerstand eines SI-Widerstandsfühlers aus den Eingangswerten T (Temperatur in °C) und RS, Widerstand bei TS in °C. Im Gegensatz zu den Bausteinen RES_NI und RES_PT deren R0 bei 0°C angegeben wird ist die Widerstandsangabe RS bei SI Fühler bei unterschiedlichen Temperaturen (z.B. 25°C bei KTY10). Deshalb hat der Baustein einen Eingang für RS und einen weiteren für TS.</text:p>
      <text:p text:style-name="P183">Die Berechnung erfolgt nach der Formel:</text:p>
      <text:p text:style-name="P183"><text:tab/>RES_SI = RS + A*(T-TS) + B*(T-TS)²</text:p>
      <text:p text:style-name="P183"><text:tab/>A = 7.64E-3</text:p>
      <text:p text:style-name="P183"><text:tab/>B = 1.66E-5</text:p>
      <text:p text:style-name="P183">Die Berechnung ist geeignet für einen Temperaturbereich von -50..+150°C.</text:p>
      <text:list xml:id="list38452520" text:continue-numbering="true" text:style-name="L1">
        <text:list-item>
          <text:list>
            <text:list-item>
              <text:h text:style-name="P216" text:outline-level="2"><text:alphabetical-index-mark-start text:id="IMark229756400"/>SENSOR_INT<text:alphabetical-index-mark-end text:id="IMark229756400"/></text:h>
            </text:list-item>
          </text:list>
        </text:list-item>
      </text:list>
      <text:p text:style-name="P69">Type<text:tab/>Funktion : REAL</text:p>
      <text:p text:style-name="P66"><text:span text:style-name="T15">Input</text:span><text:span text:style-name="T14"><text:tab/></text:span><text:span text:style-name="T15">VOLTAGE</text:span><text:span text:style-name="T14"> : REAL (gemessen Spannung in Volt)</text:span></text:p>
      <text:p text:style-name="P66"><text:span text:style-name="T14"><text:tab/></text:span><text:span text:style-name="T15">CURRENT</text:span><text:span text:style-name="T14"> : REAL (gemessener Strom in Ampere)</text:span></text:p>
      <text:p text:style-name="P69"><text:tab/>RP : REAL (paralleler parasitärer Widerstand in Ohm)</text:p>
      <text:p text:style-name="P69"><text:tab/>RS : REAL (serieller parasitärer Widerstand in Ohm) </text:p>
      <text:p text:style-name="P73"><draw:frame draw:style-name="fr3" draw:name="Grafik178" text:anchor-type="paragraph" svg:x="1.062cm" svg:y="0.619cm" svg:width="4.069cm" svg:height="2.469cm" draw:z-index="137"><draw:image xlink:href="Pictures/1000000000000134000000BB80D8F132.png" xlink:type="simple" xlink:show="embed" xlink:actuate="onLoad"/></draw:frame>Output<text:tab/>REAL (Widerstandswert des Sensors)</text:p>
      <text:p text:style-name="P73"><text:soft-page-break/><text:line-break/>SENSOR_INT berechnet den Sensorwiderstand unter Berücksichtigung der Parasitären Widerstände, die die Messung normalerweise verfälschen. Der A/D Wandler misst entweder Strom bei fester Spannung oder Spannung bei festem Strom. Der daraus resultierende Widerstand ist aber nicht nur der Widerstand des Sensors, sondern setzt sich zusammen aus dem Widerstand des Sensors und 2 parasitären Widerständen RP und RS. Da die parasitären Widerstände konstant bleiben, können Sie wieder kompensiert werden und der wirkliche Widerstand des Sensors errechnet werden.</text:p>
      <text:p text:style-name="P66"><draw:g text:anchor-type="paragraph" draw:z-index="138" draw:style-name="gr1"><draw:g draw:style-name="gr8"><draw:rect draw:style-name="gr22" draw:text-style-name="P257" svg:width="1.417cm" svg:height="0.331cm" svg:x="3.544cm" svg:y="0.534cm"><text:p/></draw:rect><draw:line draw:style-name="gr23" draw:text-style-name="P257" svg:x1="3.543cm" svg:y1="0.723cm" svg:x2="2.132cm" svg:y2="0.723cm"><text:p/></draw:line><draw:line draw:style-name="gr23" draw:text-style-name="P257" svg:x1="6.843cm" svg:y1="0.702cm" svg:x2="4.96cm" svg:y2="0.702cm"><text:p/></draw:line><draw:line draw:style-name="gr23" draw:text-style-name="P257" svg:x1="3.547cm" svg:y1="1.702cm" svg:x2="2.841cm" svg:y2="1.702cm"><text:p/></draw:line><draw:rect draw:style-name="gr22" draw:text-style-name="P257" svg:width="1.417cm" svg:height="0.332cm" svg:x="3.544cm" svg:y="1.534cm"><text:p/></draw:rect><draw:rect draw:style-name="gr22" draw:text-style-name="P257" svg:width="1.41cm" svg:height="0.331cm" svg:x="6.841cm" svg:y="0.534cm"><text:p/></draw:rect><draw:line draw:style-name="gr24" draw:text-style-name="P257" svg:x1="2.841cm" svg:y1="0.702cm" svg:x2="2.841cm" svg:y2="1.7cm"><text:p/></draw:line><draw:line draw:style-name="gr24" draw:text-style-name="P257" svg:x1="5.663cm" svg:y1="0.702cm" svg:x2="5.663cm" svg:y2="1.7cm"><text:p/></draw:line><draw:line draw:style-name="gr23" draw:text-style-name="P257" svg:x1="5.666cm" svg:y1="1.702cm" svg:x2="4.96cm" svg:y2="1.702cm"><text:p/></draw:line><draw:line draw:style-name="gr23" draw:text-style-name="P257" svg:x1="9.666cm" svg:y1="0.702cm" svg:x2="8.255cm" svg:y2="0.702cm"><text:p/></draw:line><draw:line draw:style-name="gr23" draw:text-style-name="P257" svg:x1="4.721cm" svg:y1="0.201cm" svg:x2="3.78cm" svg:y2="1.2cm"><text:p/></draw:line><draw:line draw:style-name="gr23" draw:text-style-name="P257" svg:x1="3.781cm" svg:y1="1.199cm" svg:x2="3.311cm" svg:y2="1.199cm"><text:p/></draw:line><draw:line draw:style-name="gr23" draw:text-style-name="P257" svg:x1="5.192cm" svg:y1="0.201cm" svg:x2="4.722cm" svg:y2="0.201cm"><text:p/></draw:line><draw:frame draw:style-name="gr25" draw:text-style-name="P261" svg:width="1.417cm" svg:height="0.983cm" svg:x="3.544cm" svg:y="2.033cm"><draw:text-box><text:p text:style-name="P258"><text:span text:style-name="T34">RP</text:span></text:p></draw:text-box></draw:frame><draw:frame draw:style-name="gr25" draw:text-style-name="P261" svg:width="1.41cm" svg:height="0.983cm" svg:x="6.841cm" svg:y="1.033cm"><draw:text-box><text:p text:style-name="P258"><text:span text:style-name="T34">RS</text:span></text:p></draw:text-box></draw:frame><draw:frame draw:style-name="gr25" draw:text-style-name="P261" svg:width="1.41cm" svg:height="0.983cm" svg:x="3.075cm" svg:y="-0.131cm"><draw:text-box><text:p text:style-name="P258"><text:span text:style-name="T34">RX</text:span></text:p></draw:text-box></draw:frame></draw:g><draw:frame draw:style-name="gr26" draw:text-style-name="P261" svg:width="0.939cm" svg:height="1.001cm" svg:x="1.191cm" svg:y="0.365cm"><draw:text-box><text:p text:style-name="P258"><text:span text:style-name="T34">A</text:span></text:p></draw:text-box></draw:frame><draw:frame draw:style-name="gr27" draw:text-style-name="P261" svg:width="0.939cm" svg:height="0.983cm" svg:x="9.663cm" svg:y="0.365cm"><draw:text-box><text:p text:style-name="P258"><text:span text:style-name="T34">B</text:span></text:p></draw:text-box></draw:frame></draw:g><text:span text:style-name="T21">Der zwischen den Anschlüssen A und B gemessene Widerstand (gemessen durch Strom und Spannung ist ein Gesamtwiderstand aus dem Sensorwiderstand parallel mit dem parasitären Widerstand RP und dem Leitungswiderstand RS. RS und RP werden kompensiert und der wirkliche Widerstand </text:span><text:span text:style-name="T21">RX berechnet. Mit den Modulen TEMP_ kann dann zum Beispiel die exakte Temperatur berechnet werden.</text:span></text:p>
      <text:list xml:id="list38470673" text:continue-numbering="true" text:style-name="L1">
        <text:list-item>
          <text:list>
            <text:list-item>
              <text:h text:style-name="P216" text:outline-level="2"><text:alphabetical-index-mark-start text:id="IMark229756400"/>TEMP_NI<text:alphabetical-index-mark-end text:id="IMark229756400"/></text:h>
            </text:list-item>
          </text:list>
        </text:list-item>
      </text:list>
      <text:p text:style-name="P69">Type<text:tab/>Funktion : REAL</text:p>
      <text:p text:style-name="P66"><text:span text:style-name="T15">Input</text:span><text:span text:style-name="T14"><text:tab/>RES : REAL (Widerstandswert in Ohm)</text:span></text:p>
      <text:p text:style-name="P69"><text:tab/>R0 : REAL (Widerstand bei 0 °C)</text:p>
      <text:p text:style-name="P73"><draw:frame draw:style-name="fr3" draw:name="Grafik179" text:anchor-type="paragraph" svg:x="1.007cm" svg:y="0.686cm" svg:width="3.62cm" svg:height="1.57cm" draw:z-index="139"><draw:image xlink:href="Pictures/100000000000011200000077CC793EAF.png" xlink:type="simple" xlink:show="embed" xlink:actuate="onLoad"/></draw:frame>Output<text:tab/>REAL (gemessene Temperatur)</text:p>
      <text:p text:style-name="P73"><text:line-break/>RES_NI berechnet die Temperatur eines NI-Widerstandsfühlers aus den Eingangswerten RES (gemessener Widerstandswert) und R0 (Widerstand bei 0°C).</text:p>
      <text:p text:style-name="P183">Die Berechnung ist geeignet für einen Temperaturbereich von -60 .. +180 °C und erfolgt nach folgender Formal:</text:p>
      <text:p text:style-name="P173"><text:span text:style-name="T21"><text:tab/>RES_NI = R0 + A*T + B*T²+C*T</text:span>4</text:p>
      <text:p text:style-name="P183"><text:soft-page-break/><text:tab/>A = 0.5485; B = 0.665E-3; C = 2.805E-9</text:p>
      <text:p text:style-name="P73"><draw:frame draw:style-name="fr13" draw:name="Grafik180" text:anchor-type="paragraph" svg:x="1.131cm" svg:y="0.582cm" svg:width="9.788cm" svg:height="6.059cm" draw:z-index="140"><draw:image xlink:href="Pictures/1000000000000172000000E5A1C18477.png" xlink:type="simple" xlink:show="embed" xlink:actuate="onLoad"/></draw:frame></text:p>
      <text:list xml:id="list38475898" text:continue-numbering="true" text:style-name="L1">
        <text:list-item>
          <text:list>
            <text:list-item>
              <text:h text:style-name="P216" text:outline-level="2"><text:alphabetical-index-mark-start text:id="IMark229756400"/>TEMP_NTC<text:alphabetical-index-mark-end text:id="IMark229756400"/></text:h>
            </text:list-item>
          </text:list>
        </text:list-item>
      </text:list>
      <text:p text:style-name="P177">Type<text:tab/>FUNKTION : REAL</text:p>
      <text:p text:style-name="P177"><text:span text:style-name="T2">Input</text:span><text:tab/>RES : REAL (gemessener Widerstandswert in Ohm)</text:p>
      <text:p text:style-name="P177"><text:tab/>RN : REAL (Widerstandswert des Sensors bei 25 °C)</text:p>
      <text:p text:style-name="P177"><text:tab/>B : REAL (Spezifikation des Sensors)</text:p>
      <text:p text:style-name="P177"><draw:frame draw:style-name="fr3" draw:name="Grafik755" text:anchor-type="paragraph" svg:x="1.09cm" svg:y="0.684cm" svg:width="4.521cm" svg:height="2.02cm" draw:z-index="812"><draw:image xlink:href="Pictures/10000000000001560000009932C99115.png" xlink:type="simple" xlink:show="embed" xlink:actuate="onLoad"/></draw:frame>Output<text:tab/>REAL (gemessene Temperatur)</text:p>
      <text:p text:style-name="P177"><text:line-break/>TEMP_NTC errechnet aus dem gemessenen Widerstand und den Parametern des Sensors die gemessene Temperatur. RN ist der Widerstandswert des Sensors bei 25 °C und B ist Abhängig vom Sensor und der Spezifikation des Sensors zu entnehmen.</text:p>
      <text:p text:style-name="P177"><draw:frame draw:style-name="fr3" draw:name="Grafik756" text:anchor-type="paragraph" svg:x="1.064cm" svg:y="0.672cm" svg:width="4.763cm" svg:height="1.614cm" draw:z-index="813"><draw:image xlink:href="Pictures/10000000000000B40000003D0C47F220.png" xlink:type="simple" xlink:show="embed" xlink:actuate="onLoad"/></draw:frame>Der Baustein errechnet die Temperatur nach folgender Formel:</text:p>
      <text:p text:style-name="P177"/>
      <text:list xml:id="list38446955" text:continue-numbering="true" text:style-name="L1">
        <text:list-item>
          <text:list>
            <text:list-item>
              <text:h text:style-name="P216" text:outline-level="2"><text:soft-page-break/><text:alphabetical-index-mark-start text:id="IMark229756400"/>TEMP_PT<text:alphabetical-index-mark-end text:id="IMark229756400"/></text:h>
            </text:list-item>
          </text:list>
        </text:list-item>
      </text:list>
      <text:p text:style-name="P69">Type<text:tab/>Funktion : REAL</text:p>
      <text:p text:style-name="P66"><text:span text:style-name="T15">Input</text:span><text:span text:style-name="T14"><text:tab/>RES : REAL (gemessener Widerstandswert in Ohm)</text:span></text:p>
      <text:p text:style-name="P69"><text:tab/>R0 : REAL (Widerstand bei 0 °C)</text:p>
      <text:p text:style-name="P73"><draw:frame draw:style-name="fr3" draw:name="Grafik181" text:anchor-type="paragraph" svg:x="1.041cm" svg:y="0.649cm" svg:width="4.069cm" svg:height="1.57cm" draw:z-index="141"><draw:image xlink:href="Pictures/100000000000013400000077B4EDA888.png" xlink:type="simple" xlink:show="embed" xlink:actuate="onLoad"/></draw:frame>Output<text:tab/>REAL (gemessene Temperatur)</text:p>
      <text:p text:style-name="P73"><text:line-break/>TEMP_PT berechnet die Temperatur eines PT-Widerstandsfühlers aus den Eingangswerten RES (gemessener Widerstandswert) und R0 (Widerstand bei 0°C). Wenn die Eingänge eine Temperatur außerhalb des Wertebereichs von -200 .. + 850°C ergeben wird am Ausgang die Temperatur +10000.0 °C ausgegeben. </text:p>
      <text:p text:style-name="P183">Die Berechnung erfolgt nach der Formel:</text:p>
      <text:p text:style-name="P183">für Temperaturen &gt; 0 °C</text:p>
      <text:p text:style-name="P183"><text:tab/>RES_PT = R0 * (1 + A*T + B*T²)</text:p>
      <text:p text:style-name="P183">und für Temperaturen &lt; 0°C</text:p>
      <text:p text:style-name="P183"><text:tab/>RES_PT = R0 * (1 + A*T + B*T² + C*(T-100)*T³</text:p>
      <text:p text:style-name="P183"><draw:frame draw:style-name="fr13" draw:name="Grafik182" text:anchor-type="paragraph" svg:x="1.042cm" svg:y="0.69cm" svg:width="13.677cm" svg:height="10.026cm" draw:z-index="175"><draw:image xlink:href="Pictures/10000000000002050000017BDBB8942C.png" xlink:type="simple" xlink:show="embed" xlink:actuate="onLoad"/></draw:frame><text:tab/>A = 3.90802E-3; B = -5.80195E-7; C = -427350E-12</text:p>
      <text:p text:style-name="P73"/>
      <text:list xml:id="list38453683" text:continue-numbering="true" text:style-name="L1">
        <text:list-item>
          <text:list>
            <text:list-item>
              <text:h text:style-name="P216" text:outline-level="2"><text:soft-page-break/><text:alphabetical-index-mark-start text:id="IMark229756400"/>TEMP_SI<text:alphabetical-index-mark-end text:id="IMark229756400"/></text:h>
            </text:list-item>
          </text:list>
        </text:list-item>
      </text:list>
      <text:p text:style-name="P69">Type<text:tab/>Funktion : REAL</text:p>
      <text:p text:style-name="P66"><text:span text:style-name="T15">Input</text:span><text:span text:style-name="T14"><text:tab/>RES : REAL (gemessener Widerstand in Ohm)</text:span></text:p>
      <text:p text:style-name="P69"><text:tab/>RS : REAL (Widerstand bei 0 °C)</text:p>
      <text:p text:style-name="P69"><text:tab/>TS : REAL (Temperatur bei der RS definiert ist)</text:p>
      <text:p text:style-name="P73"><draw:frame draw:style-name="fr3" draw:name="Grafik183" text:anchor-type="paragraph" svg:x="1.058cm" svg:y="0.686cm" svg:width="3.62cm" svg:height="2.02cm" draw:z-index="142"><draw:image xlink:href="Pictures/1000000000000112000000995D826A97.png" xlink:type="simple" xlink:show="embed" xlink:actuate="onLoad"/></draw:frame>Output<text:tab/>REAL (gemessene Temperatur)</text:p>
      <text:p text:style-name="P73"><text:line-break/>TEMP_SI berechnet die Temperatur eines SI-Widerstandsfühlers aus den Eingangswerten RES (Widerstand in Ohm) und RS, Widerstand bei TS in °C. Im Gegensatz zu den Bausteinen TEMP_NI und TEMP_PT deren R0 bei 0°C angegeben wird, ist die Widerstandsangabe RS bei SI Fühler bei unterschiedlichen Temperaturen (z.B. 25°C bei KTY10) angegeben. Deshalb hat der Baustein einen Eingang für RS und einen weiteren für TS.</text:p>
      <text:p text:style-name="P183">Die Berechnung erfolgt nach der Formel:</text:p>
      <text:p text:style-name="P183"><text:tab/>RES_SI = RS + A*(T-TS) + B*(T-TS)²</text:p>
      <text:p text:style-name="P183"><text:tab/>A = 7.64E-3; B = 1.66E-5</text:p>
      <text:p text:style-name="P183">Die Berechnung ist geeignet für einen Temperaturbereich von -50 .. +150 °C.</text:p>
      <text:list xml:id="list38460521" text:continue-numbering="true" text:style-name="L1">
        <text:list-item>
          <text:h text:style-name="P210" text:outline-level="1">Messbausteine</text:h>
          <text:list>
            <text:list-item>
              <text:h text:style-name="P216" text:outline-level="2"><text:alphabetical-index-mark-start text:id="IMark229756400"/><text:alphabetical-index-mark-start text:id="IMark225800016"/>ALARM_2<text:alphabetical-index-mark-end text:id="IMark225800016"/><text:alphabetical-index-mark-end text:id="IMark229756400"/></text:h>
            </text:list-item>
          </text:list>
        </text:list-item>
      </text:list>
      <text:p text:style-name="P2">Type<text:tab/><text:span text:style-name="T12">Funktionsbaustein</text:span></text:p>
      <text:p text:style-name="P66"><text:span text:style-name="T15">Input</text:span><text:span text:style-name="T14"><text:tab/>X : REAL (Eingangswert)</text:span></text:p>
      <text:p text:style-name="P69"><text:tab/>RST : BOOL (Reset Eingang für Alarm Ausgang)</text:p>
      <text:p text:style-name="P73"><draw:frame draw:style-name="fr3" draw:name="Grafik574" text:anchor-type="paragraph" svg:x="1.025cm" svg:y="0.644cm" svg:width="3.18cm" svg:height="3.54cm" draw:z-index="562"><draw:image xlink:href="Pictures/10000000000000F00000010C320ECBAA.png" xlink:type="simple" xlink:show="embed" xlink:actuate="onLoad"/></draw:frame>Output<text:tab/>LOW : BOOL (TRUE, wenn X &lt; TRIGGER_LOW)</text:p>
      <text:p text:style-name="P173"><text:span text:style-name="T21"><text:line-break/>ALARM_2 prüft ob X die Grenzen HI_1 oder HI_2 nach oben übersteigt und setzt dabei die Ausgänge Q1_HI oder Q2_HI auf TRUE. Falls die Grenzen LO_1 oder LO_2 unterschritten werden wird entsprechend Q1_LO oder Q2_LO auf TRUE gesetzt. Die Ausgänge bleiben solange TRUE wie die entsprechende Grenze über- beziehungsweise unter-schritten wird. Um ein Flattern der Ausgänge zu unterbinden kann alternativ auch eine </text:span><text:span text:style-name="T19">Hysterese</text:span><text:span text:style-name="T21"> HYS eingestellt werden. Wird HYS auf einen Wert &gt; 0 gesetzt, so wird der entsprechende Ausgang erst dann gesetzt wenn die Grenze um mehr als HYS / 2 überschritten beziehungsweise unterschritten wird. Entsprechend muss der Eingang X die Grenze um mehr als HYS / 2 unter beziehungsweise überschreiten bevor die entsprechenden Ausgänge wieder gelöscht werden.</text:span></text:p>
      <text:p text:style-name="P183">ALARM_2 kann zum Beispiel mit HI_1 und LO_1 den Pegel eines Flüssigkeitsbehälters steuern und mit HI_2 und LO_2 einen Alarm auslösen wenn ein kritischer Pegel unterschritten beziehungsweise überschritten wird.</text:p>
      <text:p text:style-name="P183"/>
      <text:list xml:id="list38458533" text:continue-numbering="true" text:style-name="L1">
        <text:list-item>
          <text:list>
            <text:list-item>
              <text:h text:style-name="P216" text:outline-level="2"><text:soft-page-break/><text:alphabetical-index-mark-start text:id="IMark229756400"/><text:alphabetical-index-mark-start text:id="IMark225798896"/>BAR_GRAPH<text:alphabetical-index-mark-end text:id="IMark225798896"/><text:alphabetical-index-mark-end text:id="IMark229756400"/></text:h>
            </text:list-item>
          </text:list>
        </text:list-item>
      </text:list>
      <text:p text:style-name="P2">Type<text:tab/><text:span text:style-name="T12">Funktionsbaustein</text:span></text:p>
      <text:p text:style-name="P66"><text:span text:style-name="T15">Input</text:span><text:span text:style-name="T14"><text:tab/>X : REAL (Eingangswert)</text:span></text:p>
      <text:p text:style-name="P69"><text:tab/>RST : BOOL (Reset Eingang für Alarm Ausgang)</text:p>
      <text:p text:style-name="P73">Output<text:tab/>LOW : BOOL (TRUE, wenn X &lt; TRIGGER_LOW)</text:p>
      <text:p text:style-name="P73"><text:tab/>Q1 .. Q6 : BOOL (Triggerausgänge)</text:p>
      <text:p text:style-name="P73"><text:tab/>HIGH : BOOL (TRUE, wenn X &gt;= TRIGGER_HIGH)</text:p>
      <text:p text:style-name="P73"><text:tab/>ALARM : BOOL (Alarmausgang)</text:p>
      <text:p text:style-name="P73"><text:tab/>STATUS : Byte (ESR Status Ausgang)</text:p>
      <text:p text:style-name="P73">Config<text:tab/>TRIGGER_LOW : REAL (Triggerschwelle für LOW Output)</text:p>
      <text:p text:style-name="P73"><text:tab/>TRIGGER_HIGH : REAL (Triggerschwelle für HIGH Output)</text:p>
      <text:p text:style-name="P66"><text:span text:style-name="T21"><text:tab/>ALARM_LOW : BOOL (</text:span><text:span text:style-name="T16">Enable</text:span><text:span text:style-name="T21"> Alarm für </text:span><text:span text:style-name="T16">Low</text:span><text:span text:style-name="T21"> Output)</text:span></text:p>
      <text:p text:style-name="P66"><text:span text:style-name="T21"><text:tab/>ALARM_HIGH : BOOL (</text:span><text:span text:style-name="T16">Enable</text:span><text:span text:style-name="T21"> Alarm für </text:span><text:span text:style-name="T16">High</text:span><text:span text:style-name="T21"> Output)</text:span></text:p>
      <text:p text:style-name="P66"><text:span text:style-name="T21"><text:tab/>LOG_S</text:span><text:span text:style-name="T16">CALE</text:span><text:span text:style-name="T21"> : BOOL (Ausgang ist Logarithmisch wenn TRUE)</text:span></text:p>
      <text:p text:style-name="P66"><draw:frame draw:style-name="fr3" draw:name="Grafik277" text:anchor-type="paragraph" svg:x="1.171cm" svg:y="0.007cm" svg:width="3.18cm" svg:height="5.339cm" draw:z-index="230"><draw:image xlink:href="Pictures/10000000000000F0000001948F49393B.png" xlink:type="simple" xlink:show="embed" xlink:actuate="onLoad"/></draw:frame><text:span text:style-name="T21"><text:line-break/>BAR_GRAPH ist ein Level </text:span><text:span text:style-name="T16">Detector,</text:span><text:span text:style-name="T21"> der abhängig vom Eingangswert einen Ausgang aktiviert. Der Ansprechwert für die </text:span><text:span text:style-name="T16">LOW</text:span><text:span text:style-name="T21"> und </text:span><text:span text:style-name="T16">HIGH</text:span><text:span text:style-name="T21"> Ausgänge ist durch die Setup-Variablen TRIGGER_LOW und TRIGGER_HIGH einstellbar. LOW wird TRUE, wenn X kleiner als TRIGGER_LOW ist und HIGH wird TRUE, wenn X größer gleich TRIGGER_HIGH ist. Sind die Setup-Variablen ALARM_LOW und / oder ALARM_HIGH auf TRUE gesetzt, so wird bei unterschreiten von TRIGGER_LOW oder überschreiten von TRIGGER_HIGH der Ausgang ALARM auf TRUE gesetzt und der Ausgang LOW oder HIGH und ALARM bleibt solange auf TRUE, bis der Eingang RST TRUE wird und den Alarm zurücksetzt. Die Ausgänge Q1 bis Q6 unterteilen den Bereich zwischen TRIGGER_LOW und TRIGGER_HIGH in 7 gleiche Bereiche. Ist die Setup Variable LOG_SCALE gesetzt, so wird der Bereich zwischen TRIGGER_LOW und TRIGGER_HIGH logarithmisch aufgeteilt.</text:span></text:p>
      <text:p text:style-name="P73"><text:soft-page-break/>Der Ausgang Status ist ein ESR kompatibler Ausgang, der Zustände und Alarme an ESR Bausteine weiterreicht.</text:p>
      <table:table table:name="Tabelle8" table:style-name="Tabelle8">
        <table:table-column table:style-name="Tabelle8.A"/>
        <table:table-column table:style-name="Tabelle8.B"/>
        <table:table-row>
          <table:table-cell table:style-name="Tabelle8.A1" office:value-type="string">
            <text:p text:style-name="P60">Status</text:p>
          </table:table-cell>
          <table:table-cell table:style-name="Tabelle8.B1" office:value-type="string">
            <text:p text:style-name="P55"/>
          </table:table-cell>
        </table:table-row>
        <table:table-row>
          <table:table-cell table:style-name="Tabelle8.A2" office:value-type="string">
            <text:p text:style-name="P60">110</text:p>
          </table:table-cell>
          <table:table-cell table:style-name="Tabelle8.B2" office:value-type="string">
            <text:p text:style-name="P59">Eingang liegt zwischen <text:span text:style-name="T2">Trigger</text:span>_<text:span text:style-name="T2">Low</text:span> und <text:span text:style-name="T2">Trigger</text:span>_<text:span text:style-name="T2">High</text:span></text:p>
          </table:table-cell>
        </table:table-row>
        <table:table-row>
          <table:table-cell table:style-name="Tabelle8.A2" office:value-type="string">
            <text:p text:style-name="P60">111</text:p>
          </table:table-cell>
          <table:table-cell table:style-name="Tabelle8.B2" office:value-type="string">
            <text:p text:style-name="P59">Eingang kleiner <text:span text:style-name="T2">Trigger</text:span>_<text:span text:style-name="T2">Low</text:span>, Ausgang LOW ist TRUE</text:p>
          </table:table-cell>
        </table:table-row>
        <table:table-row>
          <table:table-cell table:style-name="Tabelle8.A2" office:value-type="string">
            <text:p text:style-name="P60">112</text:p>
          </table:table-cell>
          <table:table-cell table:style-name="Tabelle8.B2" office:value-type="string">
            <text:p text:style-name="P59">Eingang größer <text:span text:style-name="T2">Trigger</text:span>_<text:span text:style-name="T2">High</text:span>, Ausgang HIGH ist TRUE</text:p>
          </table:table-cell>
        </table:table-row>
        <table:table-row>
          <table:table-cell table:style-name="Tabelle8.A2" office:value-type="string">
            <text:p text:style-name="P60">1</text:p>
          </table:table-cell>
          <table:table-cell table:style-name="Tabelle8.B2" office:value-type="string">
            <text:p text:style-name="P59">Eingang kleiner als <text:span text:style-name="T2">Trigger</text:span>_<text:span text:style-name="T2">low</text:span> und Alarm_<text:span text:style-name="T2">Low</text:span> ist TRUE</text:p>
          </table:table-cell>
        </table:table-row>
        <table:table-row>
          <table:table-cell table:style-name="Tabelle8.A2" office:value-type="string">
            <text:p text:style-name="P60">2</text:p>
          </table:table-cell>
          <table:table-cell table:style-name="Tabelle8.B2" office:value-type="string">
            <text:p text:style-name="P59">Eingang größer als <text:span text:style-name="T2">Trigger</text:span>_<text:span text:style-name="T2">high</text:span> und Alarm_<text:span text:style-name="T2">High</text:span> ist TRUE</text:p>
          </table:table-cell>
        </table:table-row>
      </table:table>
      <text:p text:style-name="P73"/>
      <text:p text:style-name="P73"><draw:frame draw:style-name="fr3" draw:name="Grafik278" text:anchor-type="paragraph" svg:x="1.002cm" svg:y="0.884cm" svg:width="13.25cm" svg:height="4.009cm" draw:z-index="231"><draw:image xlink:href="Pictures/100000000000029C000000CA6F72BE09.png" xlink:type="simple" xlink:show="embed" xlink:actuate="onLoad"/></draw:frame><draw:frame draw:style-name="fr3" draw:name="Grafik279" text:anchor-type="paragraph" svg:x="1.007cm" svg:y="5.764cm" svg:width="15.983cm" svg:height="9.876cm" draw:z-index="232"><draw:image xlink:href="Pictures/10000000000002DF000001C6186C3F17.png" xlink:type="simple" xlink:show="embed" xlink:actuate="onLoad"/></draw:frame>Das folgende Beispiel zeigt eine n Signalverlauf an Bar_Graph:</text:p>
      <text:p text:style-name="P183"/>
      <text:p text:style-name="P183"/>
      <text:list xml:id="list38454587" text:continue-numbering="true" text:style-name="L1">
        <text:list-item>
          <text:list>
            <text:list-item>
              <text:h text:style-name="P216" text:outline-level="2"><text:soft-page-break/><text:alphabetical-index-mark-start text:id="IMark225798256"/>CALIBRATE<text:alphabetical-index-mark-end text:id="IMark225798256"/></text:h>
            </text:list-item>
          </text:list>
        </text:list-item>
      </text:list>
      <text:p text:style-name="P2"><text:span text:style-name="T12">Type</text:span><text:tab/><text:span text:style-name="T11">Funktionsbaustein</text:span></text:p>
      <text:p text:style-name="P66"><text:span text:style-name="T15">Input</text:span><text:span text:style-name="T14"><text:tab/>X : REAL (Eingangswert)</text:span></text:p>
      <text:p text:style-name="P69"><text:tab/>CO : BOOL (Puls zum Speichern des Offsets)</text:p>
      <text:p text:style-name="P69"><text:tab/>CS : BOOL (Puls zum Speichern des Verstärkungsfaktors)</text:p>
      <text:p text:style-name="P2">Output<text:tab/>Y : <text:span text:style-name="T11">REAL</text:span> (kalibriertes Ausgangssignal)</text:p>
      <text:p text:style-name="P73">Config<text:tab/>Y_OFFSET : REAL (Y Wert bei dem der Offset gesetzt wird)</text:p>
      <text:p text:style-name="P73"><draw:frame draw:style-name="fr3" draw:name="Grafik253" text:anchor-type="paragraph" svg:x="1.106cm" svg:y="1.184cm" svg:width="2.281cm" svg:height="2.2cm" draw:z-index="210"><draw:image xlink:href="Pictures/10000000000000AC000000A6B840952F.png" xlink:type="simple" xlink:show="embed" xlink:actuate="onLoad"/></draw:frame><text:tab/>Y_SCALE : REAL (Y Wert bei dem der Verstärkungsfaktor gesetzt <text:tab/>wird)</text:p>
      <text:p text:style-name="P66"><text:span text:style-name="T14"><text:line-break/>CALIBRATE </text:span><text:span text:style-name="T22">dient</text:span><text:span text:style-name="T14"> zum Kalibrieren eines Analogen Signals. Um ein Kalibrieren zu ermöglichen müssen 2 Referenzwerte (Y_OFFSET und Y_SCALE) durch einen Doppelklick auf das Symbol des Bausteins gesetzt werden. Y_OFFSET ist der Ausgangswert, bei dem der Offset durch einen Puls an CO gesetzt wird und Y_SCALE ist der Wert, bei dem der Verstärkungsfaktor ermittelt wird. Eine Kalibrierung ist nur dann erfolgreich, wenn zuerst Offset und danach Verstärkung kalibriert werden.</text:span></text:p>
      <text:p text:style-name="P2"><text:span text:style-name="T11">Beispiel</text:span>:</text:p>
      <text:p text:style-name="P183">Ein Eingangssignal von 4..20 mA soll auf die Temperaturwerte von 0 .. 70 °C kalibriert werden. Hierzu werden die Config- Variablen Y_OFFSET = 0 und Y_SCALE = 70 gesetzt. Dann wird der Sensor in Eiswasser gelegt und nach der Ansprechzeit des Sensors ein Puls am Eingang C0 ausgelöst, der den Baustein veranlasst einen Korrekturwert für Offset zu errechnen und intern abzuspeichern. Als nächstes wird dann der Sensor mit 70 °C beaufschlagt und nach der Ansprechzeit ein Puls am Eingang CS ausgelöst, wodurch im Baustein ein Verstärkungsfaktor berechnet wird, der intern gespeichert wird. Die Kalibrationswerte werden permanent gespeichert. Das heißt, sie gehen auch dann nicht verloren, wenn ein Reset ausgeführt wird oder die Stromversorgung an der SPS ausgeschaltet wird.</text:p>
      <text:p text:style-name="P183"/>
      <text:list xml:id="list38474358" text:continue-numbering="true" text:style-name="L1">
        <text:list-item>
          <text:list>
            <text:list-item>
              <text:h text:style-name="P216" text:outline-level="2"><text:soft-page-break/><text:alphabetical-index-mark-start text:id="IMark225798256"/>CYCLE_TIME<text:alphabetical-index-mark-end text:id="IMark225798256"/></text:h>
            </text:list-item>
          </text:list>
        </text:list-item>
      </text:list>
      <text:p text:style-name="P69">Type<text:tab/>Funktionsbaustein</text:p>
      <text:p text:style-name="P66"><text:span text:style-name="T15">Input</text:span><text:span text:style-name="T14"><text:tab/>RES : BOOL (Reset)</text:span></text:p>
      <text:p text:style-name="P73">Output<text:tab/>CT_MIN : TIME (minimale gemessene Zykluszeit)</text:p>
      <text:p text:style-name="P73"><text:tab/>CT_MAX : TIME (maximale gemessene Zykluszeit)</text:p>
      <text:p text:style-name="P73"><text:tab/>CT_LAST : TIME (zuletzt gemessene Zykluszeit)</text:p>
      <text:p text:style-name="P73"><text:tab/>SYSTIME : TIME (gesamte Laufzeit des Systems seit dem letzten <text:tab/>Start)</text:p>
      <text:p text:style-name="P73"><text:tab/>SYSDAYS : INT (Anzahl der Tage seit dem letzten Start)</text:p>
      <text:p text:style-name="P73"><draw:frame draw:style-name="fr3" draw:name="Grafik184" text:anchor-type="paragraph" svg:x="1.221cm" svg:y="0.693cm" svg:width="3.62cm" svg:height="3.54cm" draw:z-index="143"><draw:image xlink:href="Pictures/10000000000001120000010C9BAB4D79.png" xlink:type="simple" xlink:show="embed" xlink:actuate="onLoad"/></draw:frame><text:tab/>CYCLES : DWORD (Anzahl der Zyklen seit dem letzten Start)</text:p>
      <text:p text:style-name="P73"><text:line-break/>CYCLE_TIME überwacht die Zykluszeiten einer SPS und stellt dem Anwender eine Reihe von Informationen über Zykluszeiten und Laufzeiten zur Verfügung. Die Gesamtzahl der Zyklen wird ebenfalls gemessen. Hiermit kann der Anwender zum Beispiel. sicherstellen, dass eine Funktion alle 100 Zyklen aufgerufen wird. Regelbausteine können Fehler melden, wenn die Zykluszeit zu lange wird und deshalb die Regelparameter nicht mehr garantiert werden können.</text:p>
      <text:list xml:id="list38473734" text:continue-numbering="true" text:style-name="L1">
        <text:list-item>
          <text:list>
            <text:list-item>
              <text:h text:style-name="P216" text:outline-level="2"><text:alphabetical-index-mark-start text:id="IMark225798256"/>DT_SIMU<text:alphabetical-index-mark-end text:id="IMark225798256"/></text:h>
            </text:list-item>
          </text:list>
        </text:list-item>
      </text:list>
      <text:p text:style-name="P69">Type<text:tab/>Funktionsbaustein</text:p>
      <text:p text:style-name="P66"><text:span text:style-name="T15">Input</text:span><text:span text:style-name="T14"><text:tab/>START : DT (Anfangs DATETIME)</text:span></text:p>
      <text:p text:style-name="P179"><text:tab/>SPEED : REAL (Geschwindigkeit für Ausgang DTS)</text:p>
      <text:p text:style-name="P73"><draw:frame draw:style-name="fr15" draw:name="Grafik681" text:anchor-type="paragraph" svg:x="1.041cm" svg:y="0.679cm" svg:width="3.18cm" svg:height="1.75cm" draw:z-index="678"><draw:image xlink:href="Pictures/10000000000000F0000000847719227B.png" xlink:type="simple" xlink:show="embed" xlink:actuate="onLoad"/></draw:frame>Output<text:tab/>DTS : DT (Simulierte DATETIME)</text:p>
      <text:p text:style-name="P183"><text:soft-page-break/><text:line-break/>DT_SIMU simuliert am Ausgang DTS einen Zeit Datumswert der mit dem Anfangswert START beginnt und mit der Geschwindigkeit SPEED weiter läuft. Wird der Eingangswert SPEED nicht belegt arbeitet der Baustein mit dem internen Vorgabewert 1.0 und der Ausgang DTS läuft mit 1 Sekunde / Sekunde vorwärts. Mit dem Eingang SPEED kann am Ausgang DTS eine beliebig schnelle oder langsame Uhr simuliert werden. Der Baustein kann in der Simulationsumgebung eingesetzt werden um eine RTC zu simulieren und zusätzlich die Geschwindigkeit der RTC zum Testen angepasst werden.</text:p>
      <text:list xml:id="list38462359" text:continue-numbering="true" text:style-name="L1">
        <text:list-item>
          <text:list>
            <text:list-item>
              <text:h text:style-name="P216" text:outline-level="2"><text:alphabetical-index-mark-start text:id="IMark225798256"/>METER<text:alphabetical-index-mark-end text:id="IMark225798256"/></text:h>
            </text:list-item>
          </text:list>
        </text:list-item>
      </text:list>
      <text:p text:style-name="P69">Type<text:tab/>Funktionsbaustein</text:p>
      <text:p text:style-name="P66"><text:span text:style-name="T15">Input</text:span><text:span text:style-name="T14"><text:tab/>M1 : REAL (Verbrauchswert 1)</text:span></text:p>
      <text:p text:style-name="P179"><text:tab/>M2 : REAL (Verbrauchswert 2)</text:p>
      <text:p text:style-name="P179"><text:tab/>I1 : BOOL (Freigabeeingang 1)</text:p>
      <text:p text:style-name="P179"><text:tab/>I2 : BOOL (Freigabeeingang 2)</text:p>
      <text:p text:style-name="P179"><text:tab/>D : REAL (Teiler für den Ausgang)</text:p>
      <text:p text:style-name="P179"><text:tab/>RST : BOOL (Reset Eingang)</text:p>
      <text:p text:style-name="P73"><draw:frame draw:style-name="fr3" draw:name="Grafik321" text:anchor-type="paragraph" svg:x="1.046cm" svg:y="0.661cm" svg:width="2.281cm" svg:height="3.11cm" draw:z-index="281"><draw:image xlink:href="Pictures/10000000000000AC000000EBF5072A8E.png" xlink:type="simple" xlink:show="embed" xlink:actuate="onLoad"/></draw:frame>Output<text:tab/>MX : REAL (Verbrauchswert)</text:p>
      <text:p text:style-name="P25"><text:span text:style-name="T21"><text:line-break/>METER ist ein Verbrauchszähler, der 2 unabhängige Eingänge (M1 und M2) über die Zeit aufaddiert. Die Verbrauchszählung wird durch die Eingänge I1 und I2 gesteuert. Mit einem Reset-Eingang RST kann der Zähler jederzeit zurückgesetzt werden. Der Wert M1 wird je Sekunde zum Ausgangswert addiert solange I1 auf TRUE steht und analog wird der Wert M2 je Sekunde zum Ausgang addiert wenn I2 TRUE ist. Sind I1 und I2 TRUE, so wird der Wert M1 + M2 je Sekunde einmal zum Ausgang hinzu addiert. Der Eingang D Teilt den Ausgang MX. Damit können z B. Wattstunden anstatt Wattsekunden gezählt werden. Der Baustein benutzt intern den OSCAT spezifischen Datentyp REAL2 der eine Auflösung von 15 Dezimalstellen erlaubt. Dadurch ist es dem Baustein möglich kleinste Verbrauchswerte an </text:span><text:span text:style-name="T21">den Eingängen M1 und m² mit kurzen Zykluszeiten zu erfassen und zu hohen Ge</text:span><text:soft-page-break/><text:span text:style-name="T21">samtwerten am Ausgang MX addieren. Die Auflösung des Bausteins kann wie folgt ermittelt werden.</text:span></text:p>
      <text:p text:style-name="P183">MX / 10^15 entspricht der minimalen Auflösung an den Eingängen M1 und M2.</text:p>
      <text:p text:style-name="P2"><text:span text:style-name="T11">Beispiel</text:span>: </text:p>
      <text:p text:style-name="P38">MX = 10E6<text:tab/>der Verbrauchszähler steht bei 10 MWh</text:p>
      <text:p text:style-name="P183">M1 = 0.09 Watt<text:tab/>Momentanverbrauch liegt bei 0.1 Watt</text:p>
      <text:p text:style-name="P183">D = 3600<text:tab/><text:tab/>Ausgang arbeitet in Wh (Wattstunden)</text:p>
      <text:p text:style-name="P183">Zykluszeit beträgt 10ms</text:p>
      <text:p text:style-name="P183">In diesem Beispiel wird je Zyklus ein Wert von 0.09[W] * 0.01 [S] / 3600 = 2.5E-7[Wh] zum Ausgang MX addiert. Dies entspricht einer Veränderung an der 14 Dezimalstelle des Ausgangs.</text:p>
      <text:p text:style-name="P183"><draw:frame draw:style-name="fr3" draw:name="Grafik322" text:anchor-type="paragraph" svg:x="1.113cm" svg:y="0.744cm" svg:width="11.76cm" svg:height="4.009cm" draw:z-index="282"><draw:image xlink:href="Pictures/10000000000002AC000000E98805CF64.png" xlink:type="simple" xlink:show="embed" xlink:actuate="onLoad"/></draw:frame>Beispiel 1 Stromverbrauchszähler:</text:p>
      <text:p text:style-name="P41"><text:line-break/>Der Stromverbrauchszähler zählt die Kilowattsekunden am Eingang M1. Durch den Eingang D wird der Ausgang durch 3600 geteilt, sodass der Ausgang Kilowattstunden anzeigt.</text:p>
      <text:p text:style-name="P183">Beispiel 2 <text:s/>Verbrauchsberechnung für einen 2 Stufen Brenner:</text:p>
      <text:p text:style-name="P183"><draw:frame draw:style-name="fr3" draw:name="Grafik323" text:anchor-type="paragraph" svg:x="1.067cm" svg:y="0.723cm" svg:width="11.76cm" svg:height="4.009cm" draw:z-index="283"><draw:image xlink:href="Pictures/10000000000002AC000000E9CBCDDC16.png" xlink:type="simple" xlink:show="embed" xlink:actuate="onLoad"/></draw:frame></text:p>
      <text:p text:style-name="P173"><text:span text:style-name="T21"><text:line-break/>In diesem Beispiel ist die Leistung von Stufe 1 (M1) 85KW und Stufe 2 (M2) 60KW. Die Eingänge S1 und S1 (I1 und I2) werden TRUE, wenn die ent</text:span><text:span text:style-name="T21">sprechende Stufe läuft. Durch die Konstante 3600 an D wird der Ausgang durch 3600 geteilt, sodass Kilowattstunden angezeigt werden.</text:span></text:p>
      <text:list xml:id="list38457707" text:continue-numbering="true" text:style-name="L1">
        <text:list-item>
          <text:list>
            <text:list-item>
              <text:h text:style-name="P216" text:outline-level="2"><text:soft-page-break/><text:alphabetical-index-mark-start text:id="IMark225798256"/>METER_STAT<text:alphabetical-index-mark-end text:id="IMark225798256"/></text:h>
            </text:list-item>
          </text:list>
        </text:list-item>
      </text:list>
      <text:p text:style-name="P69">Type<text:tab/>Funktionsbaustein</text:p>
      <text:p text:style-name="P66"><text:span text:style-name="T15">Input</text:span><text:span text:style-name="T14"><text:tab/>IN : REAL (Eingangssignal)</text:span></text:p>
      <text:p text:style-name="P179"><text:tab/>DI : DATE (Datumseingang)</text:p>
      <text:p text:style-name="P179"><text:tab/>RST : BOOL (Reset Eingang)</text:p>
      <text:p text:style-name="P73">Output<text:tab/>LAST_DAY : REAL (Verbrauchswert des vergangenen Tages)</text:p>
      <text:p text:style-name="P183"><text:tab/>CURRENT_DAY : REAL (Verbrauchswert des aktuellen Tages)</text:p>
      <text:p text:style-name="P173"><text:span text:style-name="T21"><text:tab/></text:span><text:span text:style-name="T21">LAST_WEEK : REAL (Verbrauchswert der vergangenen Woche)</text:span></text:p>
      <text:p text:style-name="P183"><text:tab/>CURRENT_WEEK : REAL (Verbrauchswert der aktuellen Woche)</text:p>
      <text:p text:style-name="P183"><text:tab/>LAST_MONTH : REAL (Verbrauchswert des vergangenen Monats)</text:p>
      <text:p text:style-name="P183"><text:tab/>CURRENT_MONTH : REAL (Verbrauchswert des aktuellen Monats)</text:p>
      <text:p text:style-name="P183"><text:tab/>LAST_YEAR : REAL (Verbrauchswert des vergangenen Jahres)</text:p>
      <text:p text:style-name="P183"><draw:frame draw:style-name="fr3" draw:name="Grafik324" text:anchor-type="paragraph" svg:x="1.201cm" svg:y="0.631cm" svg:width="5.669cm" svg:height="3.9cm" draw:z-index="284"><draw:image xlink:href="Pictures/10000000000001AD000001277E21852A.png" xlink:type="simple" xlink:show="embed" xlink:actuate="onLoad"/></draw:frame><text:tab/>CURRENT_YEAR : REAL (Verbrauchswert des aktuellen Jahres)</text:p>
      <text:p text:style-name="P183"><text:line-break/>METER_STAT errechnet den Verbrauch des aktuellen Tages, Woche, Monat und Jahr und zeigt den Wert des letzten Vergleichszeitraumes. Der aufaddierte Verbrauchswert liegt am Eingang IN, während am Eingang DI das aktuelle Datum anliegt. Mit dem Eingang RST kann der Zähler jederzeit zurückgesetzt werden.</text:p>
      <text:p text:style-name="P183"><draw:frame draw:style-name="fr3" draw:name="Grafik325" text:anchor-type="paragraph" svg:x="1.025cm" svg:y="1.131cm" svg:width="15.998cm" svg:height="3.882cm" draw:z-index="285"><draw:image xlink:href="Pictures/10000000000004BB00000126EA3F2B28.png" xlink:type="simple" xlink:show="embed" xlink:actuate="onLoad"/></draw:frame>Das folgende Beispiel zeigt die Anwendung von METER_STAT mit dem Baustein METER:</text:p>
      <text:p text:style-name="P183"/>
      <text:list xml:id="list38447149" text:continue-numbering="true" text:style-name="L1">
        <text:list-item>
          <text:list>
            <text:list-item>
              <text:h text:style-name="P216" text:outline-level="2"><text:soft-page-break/><text:alphabetical-index-mark-start text:id="IMark225798256"/>M_D<text:alphabetical-index-mark-end text:id="IMark225798256"/></text:h>
            </text:list-item>
          </text:list>
        </text:list-item>
      </text:list>
      <text:p text:style-name="P69">Type<text:tab/>Funktionsbaustein</text:p>
      <text:p text:style-name="P66"><text:span text:style-name="T15">Input</text:span><text:span text:style-name="T14"><text:tab/>START : BOOL (Eingangssignal)</text:span></text:p>
      <text:p text:style-name="P179"><text:tab/>STOP : BOOL (Eingangssignal)</text:p>
      <text:p text:style-name="P173"><text:span text:style-name="T14"><text:tab/>TMAX : TIME (</text:span><text:span text:style-name="T15">Timeout</text:span><text:span text:style-name="T14"> für ET)</text:span></text:p>
      <text:p text:style-name="P179"><text:tab/>RST : BOOL (Reset Eingang)</text:p>
      <text:p text:style-name="P73">Output<text:tab/>PT : TIME (gemessene Zeit)</text:p>
      <text:p text:style-name="P183"><draw:frame draw:style-name="fr3" draw:name="Grafik300" text:anchor-type="paragraph" svg:x="1.053cm" svg:y="0.706cm" svg:width="2.731cm" svg:height="2.649cm" draw:z-index="259"><draw:image xlink:href="Pictures/10000000000000CE000000C8AE2D2EA1.png" xlink:type="simple" xlink:show="embed" xlink:actuate="onLoad"/></draw:frame><text:tab/>ET : TIME (Abgelaufene Zeit seit letzter steigender Flanke)</text:p>
      <text:p text:style-name="P2"><text:line-break/>M_D misst die Zeit <text:span text:style-name="T11">zwischen</text:span> einer steigenden Flanke an START und einer steigenden Flanke an STOP. PT ist das Ergebnis der letzten Messung. Der Ausgang ET ist die abgelaufene Zeit seit der letzten steigenden Flanke an START. M_D benötigt eine steigende Flanke, um die Messung zu starten. Falls beim ersten Aufruf START bereits TRUE ist, wird dies nicht als steigende Flanke gewertet. Auch wenn STOP TRUE ist, wird eine steigende Flanke an START nicht gewertet. Nur wenn alle Startbedingungen (STOP = FALSE, RST := FALSE und steigende Flanke an START) vorliegen geht der Ausgang RUN auf TRUE und eine Messung wird gestartet. Mit TRUE am Eingang RST können die Ausgänge jederzeit auf 0 zurückgesetzt werden. Erreicht ET den Wert TMAX wird automatisch im Baustein ein Reset erzeugt und alle Ausgänge auf 0 zurückgesetzt. TMAX ist intern mit einem Vorgabewert von T#10d belegt und kann im Normalfall unbeschaltet bleiben. TMAX dient dazu einen maximalen Wertebereich für PT vorzugeben.</text:p>
      <text:list xml:id="list38467705" text:continue-numbering="true" text:style-name="L1">
        <text:list-item>
          <text:list>
            <text:list-item>
              <text:h text:style-name="P216" text:outline-level="2"><text:alphabetical-index-mark-start text:id="IMark225798256"/>M_T<text:alphabetical-index-mark-end text:id="IMark225798256"/></text:h>
            </text:list-item>
          </text:list>
        </text:list-item>
      </text:list>
      <text:p text:style-name="P69">Type<text:tab/>Funktionsbaustein</text:p>
      <text:p text:style-name="P66"><text:span text:style-name="T15">Input</text:span><text:span text:style-name="T14"><text:tab/>IN : BOOL (Eingangssignal)</text:span></text:p>
      <text:p text:style-name="P173"><text:span text:style-name="T14"><text:tab/>TMAX : TIME (</text:span><text:span text:style-name="T15">Timeout</text:span><text:span text:style-name="T14"> für ET)</text:span></text:p>
      <text:p text:style-name="P179"><text:tab/>RST : BOOL (Reset Eingang)</text:p>
      <text:p text:style-name="P66"><text:soft-page-break/><text:span text:style-name="T21">Output<text:tab/>PT : TIME</text:span><text:span text:style-name="T21"> (gemessene Impulsdauer von der steigenden bis zur <text:s text:c="10"/><text:tab/>fallenden Flanke)</text:span></text:p>
      <text:p text:style-name="P183"><draw:frame draw:style-name="fr3" draw:name="Grafik195" text:anchor-type="paragraph" svg:x="1.074cm" svg:y="0.683cm" svg:width="2.731cm" svg:height="2.2cm" draw:z-index="257"><draw:image xlink:href="Pictures/10000000000000CE000000A6C56D4649.png" xlink:type="simple" xlink:show="embed" xlink:actuate="onLoad"/></draw:frame><text:tab/>ET : TIME (Abgelaufene Zeit seit letzter Steigender Flanke)</text:p>
      <text:p text:style-name="P2"><text:line-break/>M_T misst die Zeit <text:span text:style-name="T11">wie</text:span> lange IN TRUE war. PT ist die Zeit von der steigenden Flanke des <text:s/>IN Signals bis zur fallenden Flanke des IN Signals. Der Ausgang ET ist die abgelaufene Zeit seit der letzten steigenden Flanke bis zur fallenden Flanke. Solange das Eingangssignal FALSE ist, ist ET = 0. M_T benötigt eine steigende Flanke um die Messung zu triggern. Falls beim ersten Aufruf in bereits TRUE ist, wird dies nicht als steigende Flanke gewertet. Weitere Beispiele sind in der Beschreibung von M_TX zu finden. Mit TRUE am Eingang RST können die Ausgänge jederzeit auf 0 zurückgesetzt werden. Erreicht ET den Wert TMAX wird automatisch im Baustein ein Reset erzeugt und alle Ausgänge auf 0 zurückgesetzt. TMAX ist intern mit einem Vorgabewert von T#10d belegt und kann im Normalfall unbeschaltet bleiben. </text:p>
      <text:p text:style-name="P183"><draw:g text:anchor-type="paragraph" draw:z-index="147" draw:style-name="gr1"><draw:line draw:style-name="gr2" draw:text-style-name="P257" svg:x1="1.928cm" svg:y1="1.334cm" svg:x2="2.928cm" svg:y2="1.334cm"><text:p/></draw:line><draw:line draw:style-name="gr2" draw:text-style-name="P257" svg:x1="2.928cm" svg:y1="0.836cm" svg:x2="2.928cm" svg:y2="1.335cm"><text:p/></draw:line><draw:line draw:style-name="gr2" draw:text-style-name="P257" svg:x1="2.928cm" svg:y1="0.836cm" svg:x2="4.928cm" svg:y2="0.836cm"><text:p/></draw:line><draw:line draw:style-name="gr2" draw:text-style-name="P257" svg:x1="4.928cm" svg:y1="1.335cm" svg:x2="4.928cm" svg:y2="0.836cm"><text:p/></draw:line><draw:frame draw:style-name="gr6" draw:text-style-name="P259" svg:width="0.997cm" svg:height="0.65cm" svg:x="1.178cm" svg:y="0.835cm"><draw:text-box><text:p text:style-name="P258"><text:span text:style-name="T32">IN</text:span></text:p></draw:text-box></draw:frame><draw:line draw:style-name="gr2" draw:text-style-name="P257" svg:x1="4.928cm" svg:y1="1.334cm" svg:x2="5.928cm" svg:y2="1.334cm"><text:p/></draw:line><draw:line draw:style-name="gr7" draw:text-style-name="P257" svg:x1="2.928cm" svg:y1="0.337cm" svg:x2="3.429cm" svg:y2="0.337cm"><text:p/></draw:line><draw:frame draw:style-name="gr6" draw:text-style-name="P259" svg:width="1.124cm" svg:height="0.65cm" svg:x="3.429cm" svg:y="-0.019cm"><draw:text-box><text:p text:style-name="P258"><text:span text:style-name="T32">PT</text:span></text:p></draw:text-box></draw:frame><draw:line draw:style-name="gr7" draw:text-style-name="P257" svg:x1="4.928cm" svg:y1="0.337cm" svg:x2="4.429cm" svg:y2="0.337cm"><text:p/></draw:line><draw:line draw:style-name="gr2" draw:text-style-name="P257" svg:x1="5.928cm" svg:y1="0.836cm" svg:x2="5.928cm" svg:y2="1.335cm"><text:p/></draw:line><draw:line draw:style-name="gr2" draw:text-style-name="P257" svg:x1="5.928cm" svg:y1="0.836cm" svg:x2="7.928cm" svg:y2="0.836cm"><text:p/></draw:line><draw:line draw:style-name="gr2" draw:text-style-name="P257" svg:x1="7.927cm" svg:y1="1.335cm" svg:x2="7.927cm" svg:y2="0.836cm"><text:p/></draw:line><draw:line draw:style-name="gr2" draw:text-style-name="P257" svg:x1="7.927cm" svg:y1="1.334cm" svg:x2="8.927cm" svg:y2="1.334cm"><text:p/></draw:line><draw:line draw:style-name="gr2" draw:text-style-name="P257" svg:x1="7.927cm" svg:y1="1.334cm" svg:x2="8.927cm" svg:y2="1.334cm"><text:p/></draw:line></draw:g></text:p>
      <text:list xml:id="list38448423" text:continue-numbering="true" text:style-name="L1">
        <text:list-item>
          <text:list>
            <text:list-item>
              <text:h text:style-name="P216" text:outline-level="2"><text:alphabetical-index-mark-start text:id="IMark225798256"/>M_TX<text:alphabetical-index-mark-end text:id="IMark225798256"/></text:h>
            </text:list-item>
          </text:list>
        </text:list-item>
      </text:list>
      <text:p text:style-name="P69">Type<text:tab/>Funktionsbaustein</text:p>
      <text:p text:style-name="P66"><text:span text:style-name="T15">Input</text:span><text:span text:style-name="T14"><text:tab/>IN : BOOL (Eingangssignal)</text:span></text:p>
      <text:p text:style-name="P173"><text:span text:style-name="T14"><text:tab/>TMAX : TIME (</text:span><text:span text:style-name="T15">Timeout</text:span><text:span text:style-name="T14"> für ET)</text:span></text:p>
      <text:p text:style-name="P179"><text:tab/>RST : BOOL (Reset Eingang)</text:p>
      <text:p text:style-name="P73">Output<text:tab/>TH : TIME (Ontime des Eingangssignals)</text:p>
      <text:p text:style-name="P73"><text:tab/>TL : TIME (Offtime des Eingangssignals)</text:p>
      <text:p text:style-name="P66"><text:span text:style-name="T21"><text:tab/>DC : REAL (Tastverhältnis / </text:span><text:span text:style-name="T16">Duty</text:span><text:span text:style-name="T21"> </text:span><text:span text:style-name="T16">Cycle</text:span><text:span text:style-name="T21"> des Eingangssignals)</text:span></text:p>
      <text:p text:style-name="P73"><draw:frame draw:style-name="fr3" draw:name="Grafik196" text:anchor-type="paragraph" svg:x="1.129cm" svg:y="0.667cm" svg:width="2.731cm" svg:height="3.099cm" draw:z-index="258"><draw:image xlink:href="Pictures/10000000000000CE000000EABA770F72.png" xlink:type="simple" xlink:show="embed" xlink:actuate="onLoad"/></draw:frame><text:tab/>F : REAL (Frequenz des Eingangssignals)</text:p>
      <text:p text:style-name="P66"><text:soft-page-break/><text:span text:style-name="T21"><text:line-break/>M_TX ermittelt aus dem Eingangssignal IN die Zeit, welche das Signal IN auf TRUE war (TH) und die Zeit die das Signal auf FALSE war (TL). Die Zeiten TH und TL werden nur nach einer steigenden beziehungsweise fallenden Flanke gemessenen. Ist IN beim ersten Aufruf des Bausteins bereits </text:span><text:span text:style-name="T16">high</text:span><text:span text:style-name="T21"> wird dies nicht als steigende Flanke gewertet. Aus den <text:s/>gemessenen Werten TH und TL werden der </text:span><text:span text:style-name="T16">Duty</text:span><text:span text:style-name="T21"> </text:span><text:span text:style-name="T16">Cycle</text:span><text:span text:style-name="T21"> und die Frequenz in Hz errechnet. Ein </text:span><text:span text:style-name="T16">Duty</text:span><text:span text:style-name="T21"> </text:span><text:span text:style-name="T16">Cycle</text:span><text:span text:style-name="T21"> von 0,4 bedeutet das Signal war 40% <text:s/>TRUE und 60% FALSE. Der Ausgang ET vom Typ TIME wird mit jeder steigenden Flanke bei 0 gestartet und läuft aufwärts, bis die nächste steigende Flanke ihn wieder bei 0 startet. Mit einem TRUE am Eingang RST können die Ausgänge zu jederzeit auf 0 zurückgesetzt werden. Der Eingang TMAX legt fest, nach welcher abgelaufenen Zeit an ET automatisch die Ausgänge zurückgesetzt werden. <text:s/>TMAX ist intern mit einem Vorgabewert von T#10d belegt und kann im Normalfall offen bleiben. Der Eingang TMAX dient vor allem dazu, bei fehlendem Eingangssignal nach einer definierten Zeit die Ausgänge zurückzusetzen. Ein Beispiel für eine mögliche Anwendung ist die Messung der Drehzahl einer Welle, die nach Ausbleiben der Sensorsignale die Drehzahl (Frequenz) 0 anzeigt. TMAX ist aber mit Vorsicht anzuwenden, da zum Beispiel ein TMAX von 10 Sekunden gleichzeitig die kleinste Messbare Frequenz auf 0,1 HZ begrenzt.</text:span></text:p>
      <text:list xml:id="list38467284" text:continue-numbering="true" text:style-name="L1">
        <text:list-item>
          <text:list>
            <text:list-item>
              <text:h text:style-name="P216" text:outline-level="2"><text:alphabetical-index-mark-start text:id="IMark225798256"/>ONTIME<text:alphabetical-index-mark-end text:id="IMark225798256"/></text:h>
            </text:list-item>
          </text:list>
        </text:list-item>
      </text:list>
      <text:p text:style-name="P69">Type<text:tab/>Funktionsbaustein</text:p>
      <text:p text:style-name="P66"><text:span text:style-name="T15">Input</text:span><text:span text:style-name="T14"><text:tab/>IN : BOOL (Eingangssignal)</text:span></text:p>
      <text:p text:style-name="P69"><text:tab/>RST : BOOL (Reset Eingang)</text:p>
      <text:p text:style-name="P73">Output<text:tab/>ONTIME : UDINT (Betriebszeit in Sekunden)</text:p>
      <text:p text:style-name="P73"><draw:frame draw:style-name="fr3" draw:name="Grafik197" text:anchor-type="paragraph" svg:x="1.025cm" svg:y="1.161cm" svg:width="4.09cm" svg:height="2.311cm" draw:z-index="726"><draw:image xlink:href="Pictures/1000000000000135000000AF1F420FD4.png" xlink:type="simple" xlink:show="embed" xlink:actuate="onLoad"/></draw:frame><text:tab/>CYCLES : UDINT (Einschaltzyklen des Eingangs IN)</text:p>
      <text:p text:style-name="P73"><text:soft-page-break/><text:line-break/>ONTIME ist ein Betriebsstundenzähler. Es wird die gesamte Zeit aufsummiert, die das Signal IN seit dem letzten Reset auf TRUE war. Zusätzlich wird die Anzahl der gesamten Ein / Aus Zyklen ermittelt. Die Ausgabewerte sind vom Typ UDINT. Mit dem Eingang RST können die Ausgangswerte jederzeit zurückgesetzt werden. Die Ausgangswerte sind nicht in Variablen des Bausteins gespeichert, sondern werden extern angelegt und über IO (POINTER) angebunden. Dies hat den entscheidenden Vorteil das je nach Wunsch des Anwenders die Variablen als RETAIN und / oder PERSISTENT festgelegt werden können. Es ist damit auch möglich alte Betriebsstunden abzuspeichern und später wieder herzustellen, zum Beispiel bei CPU Wechsel.</text:p>
      <text:p text:style-name="P183">Die Deklaration der Variablen an den Eingängen SECONDS und CYCLES müssen vom Typ UDINT sein und können wahlweise als VAR, VAR RETAIN oder VAR RETAIN PERSISTENT angelegt werden.</text:p>
      <text:p text:style-name="P183">Die DEKLARATION Der Variablen für die Betriebszeit und die Zyklen muss vom Typ UDINT sein und kann alternativ RETAIN und oder PERSISTENT erfolgen.</text:p>
      <text:p text:style-name="P183">VAR RETAIN PERSISTENT</text:p>
      <text:p text:style-name="P183"><text:tab/>Betriebszeit_in_Sekunden : UDINT;</text:p>
      <text:p text:style-name="P183"><text:tab/>Zyklen : UDINT;</text:p>
      <text:p text:style-name="P183">END_VAR</text:p>
      <text:p text:style-name="P183"><draw:frame draw:style-name="fr3" draw:name="Grafik385" text:anchor-type="paragraph" svg:x="1.025cm" svg:y="0.66cm" svg:width="15.344cm" svg:height="4.789cm" draw:z-index="727"><draw:image xlink:href="Pictures/1000000000000244000000B5787DDD96.png" xlink:type="simple" xlink:show="embed" xlink:actuate="onLoad"/></draw:frame>Die folgende Tabelle erläutert die Bedeutung von RETAIN und PERSISTENT:</text:p>
      <text:p text:style-name="P183"/>
      <text:p text:style-name="P173"><text:span text:style-name="T21">Variablen vom Typ </text:span><text:span text:style-name="T16">Retain</text:span><text:span text:style-name="T21"> und Persistent behalten ihren Wert bei Download, Online </text:span><text:span text:style-name="T16">Change</text:span><text:span text:style-name="T21"> und Reset. Bei einem Reset-Kalt oder Reset-Ursprung jedoch verlieren auch diese Variablen Ihre Werte. Der Anwender kann jedoch die Werte im File-System oder in Netzwerk abspeichern und sie selbst z.B. nach einem Wechsel der CPU wiederherstellen .</text:span></text:p>
      <text:list xml:id="list38476649" text:continue-numbering="true" text:style-name="L1">
        <text:list-item>
          <text:list>
            <text:list-item>
              <text:h text:style-name="P216" text:outline-level="2"><text:soft-page-break/><text:alphabetical-index-mark-start text:id="IMark225798256"/>T_PLC_MS<text:alphabetical-index-mark-end text:id="IMark225798256"/></text:h>
            </text:list-item>
          </text:list>
        </text:list-item>
      </text:list>
      <text:p text:style-name="P69">Type<text:tab/>Funktion : DWORD</text:p>
      <text:p text:style-name="P66"><draw:frame draw:style-name="fr3" draw:name="Grafik316" text:anchor-type="paragraph" svg:x="1.138cm" svg:y="0.681cm" svg:width="3.66cm" svg:height="0.99cm" draw:z-index="276"><draw:image xlink:href="Pictures/10000000000001150000004B547EEC88.png" xlink:type="simple" xlink:show="embed" xlink:actuate="onLoad"/></draw:frame><text:span text:style-name="T21">Output<text:tab/>DWORD (SPS </text:span><text:span text:style-name="T16">Timer</text:span><text:span text:style-name="T21"> in Millisekunden)</text:span></text:p>
      <text:p text:style-name="P66"><text:span text:style-name="T21"><text:line-break/></text:span><text:span text:style-name="T21">T_PLC_MS liefert die aktuelle interne SPS Zeit in Millisekunden. Dies hat nichts mit einer eventuell vorhandenen Uhr (Real </text:span><text:span text:style-name="T16">Time</text:span><text:span text:style-name="T21"> Baustein) zu tun, sondern ist der interne </text:span><text:span text:style-name="T16">Timer</text:span><text:span text:style-name="T21"> einer SPS, der als Zeitreferenz benutzt wird.</text:span></text:p>
      <text:p text:style-name="P183">Der Quelltext des Bausteins hat folgende Eigenschaften:</text:p>
      <text:p text:style-name="P191">FUNCTION T_PLC_MS : DWORD</text:p>
      <text:p text:style-name="P191">VAR CONSTANT</text:p>
      <text:p text:style-name="P191"><text:tab/>DEBUG : BOOL := FALSE;</text:p>
      <text:p text:style-name="P191"><text:tab/>N : INT := 0;</text:p>
      <text:p text:style-name="P191"><text:tab/>OFFSET := 0;</text:p>
      <text:p text:style-name="P191">END_VAR</text:p>
      <text:p text:style-name="P191">VAR</text:p>
      <text:p text:style-name="P191"><text:tab/>TEMP : DWORD := 1;</text:p>
      <text:p text:style-name="P191">END_VAR</text:p>
      <text:p text:style-name="P191">T_PLC_MS := TIME_TO_DWORD(TIME());</text:p>
      <text:p text:style-name="P191">IF DEBUG THEN</text:p>
      <text:p text:style-name="P191"><text:tab/>T_PLC_MS := SHL(T_PLC_US,N) OR SHL(TEMP,N)-1 + OFFSET;</text:p>
      <text:p text:style-name="P191">END_IF;</text:p>
      <text:p text:style-name="P173"><text:span text:style-name="T21">Im Normalbetrieb liest der Baustein mit der Funktion TIME() den internen </text:span><text:span text:style-name="T16">Timer</text:span><text:span text:style-name="T21"> der SPS aus und liefert diesen zurück. Der Interne </text:span><text:span text:style-name="T16">Timer</text:span><text:span text:style-name="T21"> der SPS nach IEC Norm hat 1 Millisekunde Auflösung.</text:span></text:p>
      <text:p text:style-name="P173"><text:span text:style-name="T21">Eine weitere Eigenschaft von T_PLC_MS ist ein </text:span><text:span text:style-name="T16">Debug-</text:span><text:span text:style-name="T21">Modus, der es erlaubt den Überlauf des SPS internen </text:span><text:span text:style-name="T16">Timers</text:span><text:span text:style-name="T21"> zu testen und die erstellte Software entsprechend sicher zu verifizieren. Der interne </text:span><text:span text:style-name="T16">Timer</text:span><text:span text:style-name="T21"> jeder SPS hat unabhängig von Hersteller und Art der Implementierung nach einer festen Zeit einen Überlauf. Das heißt, er läuft gegen FF..FFFF (höchster Wert der im entsprechenden Typ gespeichert werden kann) und beginnt dann wieder bei 000..0000. bei Standard SPS </text:span><text:span text:style-name="T19">Timern</text:span><text:span text:style-name="T21"> beträgt diese Überlaufzeit 2^32 -1 Millisekunden, was in etwa 49,71 Tagen entspricht. Da es sich bei diesem </text:span><text:span text:style-name="T16">Timer</text:span><text:span text:style-name="T21"> um einen in Hardware implementierten </text:span><text:span text:style-name="T16">Timer</text:span><text:span text:style-name="T21"> handelt kann auch sein Anfangswert nicht gesetzt werden, sodass er nach dem Einschalten der SPS immer bei 0 anfängt und bis zum Maximalwert hoch läuft. Nach erreichen des Maximalwertes entsteht dann der berüchtigte </text:span><text:span text:style-name="T16">Timer</text:span><text:span text:style-name="T21">-Überlauf, der fata</text:span><text:span text:style-name="T21">le Auswirkungen in der Anwendungssoftware hervor ruft, aber nur extrem schwer getestet werden kann.</text:span></text:p>
      <text:p text:style-name="P173"><text:soft-page-break/><text:span text:style-name="T21">T_PLC_MS bietet mehrere Möglichkeiten zum Testen des Überlaufs und zeitabhängiger Software. Mit der Konstante DEBUG kann der Test-Modus eingeschaltet werden und dann mittels der Konstanten N und Offset der </text:span><text:span text:style-name="T16">Timer</text:span><text:span text:style-name="T21"> ab einem bestimmten Wert beginnen, damit gezielt der Überlauf getestet werden kann ohne die 49 Tage abzuwarten. Offset legt hierbei den Wert fest, der zum internen </text:span><text:span text:style-name="T16">Timer</text:span><text:span text:style-name="T21"> addiert wird. Mit der Konstanten N wird festgelegt, um wie viele Bits der interne </text:span><text:span text:style-name="T16">Timer</text:span><text:span text:style-name="T21"> Wert nach </text:span><text:span text:style-name="T21">links verschoben wird und dabei die unteren N Bits mit 1 gefüllt werden. Mit N kann dadurch die Geschwindigkeit des internen </text:span><text:span text:style-name="T16">Timers</text:span><text:span text:style-name="T21"> um die Faktoren 2,4,8,16 usw. erhöht werden.</text:span></text:p>
      <text:p text:style-name="P183">T_PLC_US bietet also alle Möglichkeiten zum Test zeitabhängiger Software, sowohl für die Problematik des Überlaufs, als auch für sehr langsame zeitabhängige Funktionen.</text:p>
      <text:p text:style-name="P183">Die Konstanten DEBUG, N und OFFSET wurden absichtlich nicht als Eingänge der Funktion implementiert um eine versehentliche Fehlbedienung zu vermeiden.</text:p>
      <text:list xml:id="list38453441" text:continue-numbering="true" text:style-name="L1">
        <text:list-item>
          <text:list>
            <text:list-item>
              <text:h text:style-name="P216" text:outline-level="2"><text:alphabetical-index-mark-start text:id="IMark225798256"/>T_PLC_US<text:alphabetical-index-mark-end text:id="IMark225798256"/></text:h>
            </text:list-item>
          </text:list>
        </text:list-item>
      </text:list>
      <text:p text:style-name="P69">Type<text:tab/>Funktion : DWORD</text:p>
      <text:p text:style-name="P66"><draw:frame draw:style-name="fr3" draw:name="Grafik317" text:anchor-type="paragraph" svg:x="1.069cm" svg:y="0.676cm" svg:width="3.491cm" svg:height="0.99cm" draw:z-index="277"><draw:image xlink:href="Pictures/10000000000001080000004B882B2D61.png" xlink:type="simple" xlink:show="embed" xlink:actuate="onLoad"/></draw:frame><text:span text:style-name="T21">Output<text:tab/>DWORD (SPS </text:span><text:span text:style-name="T16">Timer</text:span><text:span text:style-name="T21"> in Mikrosekunden)</text:span></text:p>
      <text:p text:style-name="P66"><text:span text:style-name="T21"><text:line-break/>T_PLC_US liefert die aktuelle interne SPS Zeit in Mikrosekunden. Dies hat nichts mit </text:span><text:span text:style-name="T21">einer eventuell vorhandenen Uhr (Real </text:span><text:span text:style-name="T16">Time</text:span><text:span text:style-name="T21"> Baustein) zu tun, sondern ist der interne </text:span><text:span text:style-name="T16">Timer</text:span><text:span text:style-name="T21"> einer SPS der als Zeitreferenz benutzt wird.</text:span></text:p>
      <text:p text:style-name="P183">Der Quelltext des Bausteins hat folgende Eigenschaften:</text:p>
      <text:p text:style-name="P191">FUNCTION T_PLC_US : DWORD</text:p>
      <text:p text:style-name="P191">VAR CONSTANT</text:p>
      <text:p text:style-name="P191"><text:tab/>DEBUG : BOOL := FALSE;</text:p>
      <text:p text:style-name="P191"><text:tab/>N : INT := 0;</text:p>
      <text:p text:style-name="P191"><text:tab/>OFFSET := 0;</text:p>
      <text:p text:style-name="P191">END_VAR</text:p>
      <text:p text:style-name="P191">VAR</text:p>
      <text:p text:style-name="P191"><text:tab/>TEMP : DWORD := 1;</text:p>
      <text:p text:style-name="P191">END_VAR</text:p>
      <text:p text:style-name="P191"><text:soft-page-break/>T_PLC_US := TIME_TO_DWORD(TIME())*1000;</text:p>
      <text:p text:style-name="P191">IF DEBUG THEN</text:p>
      <text:p text:style-name="P191"><text:tab/>T_PLC_US := SHL(T_PLC_US,N) OR SHL(TEMP,N)-1 + OFFSET;</text:p>
      <text:p text:style-name="P191">END_IF;</text:p>
      <text:p text:style-name="P173"><text:span text:style-name="T21">Im Normalbetrieb liest der Baustein mit der Funktion TIME() den internen </text:span><text:span text:style-name="T16">Timer</text:span><text:span text:style-name="T21"> der SPS aus. Da der interne </text:span><text:span text:style-name="T16">Timer</text:span><text:span text:style-name="T21"> der SPS nach IEC Norm nur mit 1 Millisekunde Auflösung bietet wird der gelesene Wert mit 1000 multipliziert um den Wert in Mikrosekunden zurück zu liefern. Diese Funktion wurde aus Kompatibilitätsgründen so erstellt, damit sie auch auf Steuerungen die keine bessere Auflösung als Millisekunden bieten ein Mikrosekunden </text:span><text:span text:style-name="T16">Timer</text:span><text:span text:style-name="T21"> zur Verfügung stellt, der dann in anderen Bausteinen verwendet werden kann. Falls die vorhandene SPS Mikrosekunden unterstützt, kann diese Funktion ganz einfach nur an dieser einen Stelle entsprechend angepasst werden und die Genauigkeit ändert sich durch diesen simplen Eingriff in allen Modulen die diese Funktion aufrufen. Die Software bleibt so portierbar und zukunftssicher. Bereits heute unterstützen praktisch alle SPS Controller eine Auflösung in Mikrosekunden. Diese wird allerdings nicht über standardisierte Routinen ausgelesen, sondern herstellerspezifisch und nicht standardisiert zur Verfügung gestellt. Der Baustein </text:span><text:span text:style-name="T21">T_PLC_US stellt also ein geeignetes Interface zu diesen herstellerspezifischen Timern her.</text:span></text:p>
      <text:p text:style-name="P173"><text:span text:style-name="T21">Eine weitere Eigenschaft von T_PLC_US ist ein </text:span><text:span text:style-name="T16">Debug-</text:span><text:span text:style-name="T21">Modus, der es erlaubt den Überlauf des SPS internen </text:span><text:span text:style-name="T16">Timers</text:span><text:span text:style-name="T21"> zu erzeugen und die erstellte Software entsprechend sicher zu testen. Der interne </text:span><text:span text:style-name="T16">Timer</text:span><text:span text:style-name="T21"> jeder SPS hat unabhängig von Hersteller und Art der Implementierung nach einer festen Zeit einen Überlauf. Das heißt er läuft gegen FF..FFFF (höchster Wert der im entsprechenden Typ gespeichert werden kann und beginnt dann wieder bei 000..0000. bei Standard SPS </text:span><text:span text:style-name="T19">Timern</text:span><text:span text:style-name="T21"> beträgt diese Überlaufzeit 2^32 -1 Millisekunden, was etwa 49,71 Tagen entspricht. Da es sich bei diesem </text:span><text:span text:style-name="T16">Timer</text:span><text:span text:style-name="T21"> um einen in Hardware implementierten </text:span><text:span text:style-name="T16">Timer</text:span><text:span text:style-name="T21"> handelt kann auch sein Anfangswert nicht gesetzt werden, sodass er nach dem Einschalten der SPS immer bei 0 anfängt und bis zum Maximalwert hoch läuft. Nach erreichen des Maximalwertes entsteht dann der berüchtigte </text:span><text:span text:style-name="T16">Timer</text:span><text:span text:style-name="T21">-Überlauf, der fatale Auswirkungen in der Anwendungssoftware hervor ruft, aber nur extrem schwer getestet werden kann.</text:span></text:p>
      <text:p text:style-name="P173"><text:span text:style-name="T21">T_PLC_US bietet mehrere Möglichkeiten zum testen des Überlaufs und zeitabhängiger Software. Mit der Konstante DEBUG kann der Test Modus eingeschaltet werden und dann mittels der Konstanten N und Offset <text:s/>der </text:span><text:span text:style-name="T16">Timer</text:span><text:span text:style-name="T21"> ab einem bestimmten Wert beginnen, damit gezielt der Überlauf getestet werden kann ohne die 49 Tage abzuwarten. Off</text:span><text:span text:style-name="T21">set legt hierbei den Wert fest der zum internen </text:span><text:span text:style-name="T16">Timer</text:span><text:span text:style-name="T21"> addiert wird. Mit der Konstanten N wird festge</text:span><text:span text:style-name="T21">legt, um wie viele Bits der interne </text:span><text:span text:style-name="T16">Timer</text:span><text:span text:style-name="T21"> Wert nach links verschoben wird und dabei die unteren N Bits mit 1 gefüllt werden. Mit N kann dadurch die Geschwindigkeit des internen </text:span><text:span text:style-name="T16">Timers</text:span><text:span text:style-name="T21"> um die Faktoren 2,4,8,16 usw. erhöht werden.</text:span></text:p>
      <text:p text:style-name="P173"><text:soft-page-break/><text:span text:style-name="T21">T_PLC_US bietet also alle Möglichkeiten zum Test zeitabhängiger Software, sowohl für die Problematik des Überlaufs, als auch für sehr langsame zeitabhängige Funktionen. </text:span><text:span text:style-name="T21">Die Konstanten DEBUG, N und OFFSET wurden absichtlich nicht als Eingänge der Funktion implementiert, um eine versehentliche Fehlbedienung zu vermeiden.</text:span></text:p>
      <text:list xml:id="list38474155" text:continue-numbering="true" text:style-name="L1">
        <text:list-item>
          <text:list>
            <text:list-item>
              <text:h text:style-name="P216" text:outline-level="2"><text:alphabetical-index-mark-start text:id="IMark225798256"/>TC_MS<text:alphabetical-index-mark-end text:id="IMark225798256"/></text:h>
            </text:list-item>
          </text:list>
        </text:list-item>
      </text:list>
      <text:p text:style-name="P69">Type<text:tab/>Funktionsbaustein</text:p>
      <text:p text:style-name="P73"><draw:frame draw:style-name="fr3" draw:name="Grafik519" text:anchor-type="paragraph" svg:x="1.046cm" svg:y="0.647cm" svg:width="2.05cm" svg:height="1.3cm" draw:z-index="500"><draw:image xlink:href="Pictures/100000000000009B000000625F2C3B19.png" xlink:type="simple" xlink:show="embed" xlink:actuate="onLoad"/></draw:frame>Output<text:tab/>TC : DWORD (letzte Zykluszeit in Millisekunden)</text:p>
      <text:p text:style-name="P183"><text:line-break/>TC_MS ermittelt die letzte Zykluszeit, das ist die Zeit die seit dem letzten Aufruf des Bausteins vergangen ist. Die Zeit wird in Millisekunden geliefert.</text:p>
      <text:list xml:id="list38449010" text:continue-numbering="true" text:style-name="L1">
        <text:list-item>
          <text:list>
            <text:list-item>
              <text:h text:style-name="P216" text:outline-level="2"><text:alphabetical-index-mark-start text:id="IMark225798256"/>TC_S<text:alphabetical-index-mark-end text:id="IMark225798256"/></text:h>
            </text:list-item>
          </text:list>
        </text:list-item>
      </text:list>
      <text:p text:style-name="P69">Type<text:tab/>Funktionsbaustein</text:p>
      <text:p text:style-name="P73"><draw:frame draw:style-name="fr3" draw:name="Grafik521" text:anchor-type="paragraph" svg:x="1.046cm" svg:y="0.677cm" svg:width="1.679cm" svg:height="1.27cm" draw:z-index="502"><draw:image xlink:href="Pictures/100000000000007F00000060C077AB05.png" xlink:type="simple" xlink:show="embed" xlink:actuate="onLoad"/></draw:frame>Output<text:tab/>TC : REAL (letzte Zykluszeit in Sekunden)</text:p>
      <text:p text:style-name="P173"><text:span text:style-name="T21"><text:line-break/>TC_S ermittelt die letzte Zykluszeit, das ist die Zeit die seit dem letzten Aufruf des Bausteins vergangen ist. Die Zeit wird in Sekunden geliefert, hat aber eine Genauigkeit in Mikrosekunden. Der Baustein ruft die Funktion T_PLC_US() auf. T_PLC_US() liefert den SPS internen </text:span><text:span text:style-name="T16">Timer</text:span><text:span text:style-name="T21"> in Mikrosekunden mit einer Schrittweite von 1000 Mikrosekunden. Wird eine höhere Auflösung gewünscht muss die Funktion T_PLC_US() dem entsprechenden System angepasst werden.</text:span></text:p>
      <text:list xml:id="list38464552" text:continue-numbering="true" text:style-name="L1">
        <text:list-item>
          <text:list>
            <text:list-item>
              <text:h text:style-name="P216" text:outline-level="2"><text:soft-page-break/><text:alphabetical-index-mark-start text:id="IMark225798256"/>TC_US<text:alphabetical-index-mark-end text:id="IMark225798256"/></text:h>
            </text:list-item>
          </text:list>
        </text:list-item>
      </text:list>
      <text:p text:style-name="P69">Type<text:tab/>Funktionsbaustein</text:p>
      <text:p text:style-name="P73"><draw:frame draw:style-name="fr3" draw:name="Grafik520" text:anchor-type="paragraph" svg:x="1.046cm" svg:y="0.647cm" svg:width="2.05cm" svg:height="1.3cm" draw:z-index="501"><draw:image xlink:href="Pictures/100000000000009B000000625F2C3B19.png" xlink:type="simple" xlink:show="embed" xlink:actuate="onLoad"/></draw:frame>Output<text:tab/>TC : DWORD (letzte Zykluszeit in Mikrosekunden)</text:p>
      <text:p text:style-name="P173"><text:span text:style-name="T21"><text:line-break/>TC_US ermittelt die letzte Zykluszeit, das ist die Zeit die seit dem letzten Aufruf des Bausteins vergangen ist. Die Zeit wird in Mikrosekunden geliefert. Der Baustein ruft die Funktion T_PLC_US() auf. T_PLC_US() liefert den SPS internen </text:span><text:span text:style-name="T16">Timer</text:span><text:span text:style-name="T21"> in Mikrosekunden mit einer Schrittweite von 1000 Mikrosekunden. Wird eine höhere Auflösung gewünscht muss die Funktion T_PLC_US() dem entsprechenden System angepasst werden.</text:span></text:p>
      <text:list xml:id="list38461083" text:continue-numbering="true" text:style-name="L1">
        <text:list-item>
          <text:h text:style-name="P210" text:outline-level="1">Umrechnungen</text:h>
          <text:list>
            <text:list-item>
              <text:h text:style-name="P216" text:outline-level="2"><text:alphabetical-index-mark-start text:id="IMark225798256"/>ASTRO<text:alphabetical-index-mark-end text:id="IMark225798256"/></text:h>
            </text:list-item>
          </text:list>
        </text:list-item>
      </text:list>
      <text:p text:style-name="P2"><text:span text:style-name="T12">Type</text:span><text:tab/><text:span text:style-name="T12">Funktionsbaustein</text:span></text:p>
      <text:p text:style-name="P66"><text:span text:style-name="T15">Input</text:span><text:span text:style-name="T14"><text:tab/>M : REAL (Entfernung in Meter)</text:span></text:p>
      <text:p text:style-name="P69"><text:tab/>AE : REAL (Entfernung in Astronomischen Einheiten)</text:p>
      <text:p text:style-name="P69"><text:tab/>PC : REAL (Entfernung in Parsec)</text:p>
      <text:p text:style-name="P69"><text:tab/>LJ : REAL (Entfernung in Lichtjahren)</text:p>
      <text:p text:style-name="P73">Output<text:tab/>YM : REAL (Entfernung in Meter)</text:p>
      <text:p text:style-name="P69"><text:tab/>YAE : REAL (Entfernung in Astronomischen Einheiten)</text:p>
      <text:p text:style-name="P69"><text:tab/>YPC : REAL (Entfernung in Parsec)</text:p>
      <text:p text:style-name="P73"><draw:frame draw:style-name="fr3" draw:name="Grafik292" text:anchor-type="paragraph" svg:x="1.169cm" svg:y="0.693cm" svg:width="2.281cm" svg:height="2.649cm" draw:z-index="250"><draw:image xlink:href="Pictures/10000000000000AC000000C87059FC2E.png" xlink:type="simple" xlink:show="embed" xlink:actuate="onLoad"/></draw:frame><text:tab/>YLJ : REAL (Entfernung in Lichtjahren)</text:p>
      <text:p text:style-name="P2"><text:line-break/>Der Baustein <text:span text:style-name="T12">ASTRO</text:span> <text:span text:style-name="T11">rechnet</text:span> verschiedene in der Astronomie gebräuchliche Entfernungseinheiten um. Normalerweise wird nur der zu konvertierende Eingang belegt und die restlichen Eingänge bleiben frei. Werden jedoch mehrere Eingänge gleichzeitig mit Werten beaufschlagt, so werden die Werte aller Eingänge entsprechend umgewandelt und dann aufsummiert.</text:p>
      <text:p text:style-name="P66"><text:span text:style-name="T21">1 AE = 149,597870 * 10</text:span>9<text:span text:style-name="T21"> m</text:span></text:p>
      <text:p text:style-name="P73">1 PC = 206265 AE</text:p>
      <text:p text:style-name="P66"><text:span text:style-name="T21">1 LJ = 9,460530 * 10</text:span>15<text:span text:style-name="T21"> m = 63240 AE = 0,30659 PC</text:span></text:p>
      <text:p text:style-name="P183"/>
      <text:list xml:id="list38473312" text:continue-numbering="true" text:style-name="L1">
        <text:list-item>
          <text:list>
            <text:list-item>
              <text:h text:style-name="P216" text:outline-level="2"><text:soft-page-break/><text:alphabetical-index-mark-start text:id="IMark225798256"/>BFT_TO_MS<text:alphabetical-index-mark-end text:id="IMark225798256"/></text:h>
            </text:list-item>
          </text:list>
        </text:list-item>
      </text:list>
      <text:p text:style-name="P2"><text:span text:style-name="T12">Type</text:span><text:tab/><text:span text:style-name="T12">Funktion</text:span></text:p>
      <text:p text:style-name="P66"><text:span text:style-name="T15">Input</text:span><text:span text:style-name="T14"><text:tab/>BFT : INT (Windstärke nach der Beaufort Skala)</text:span></text:p>
      <text:p text:style-name="P73"><draw:frame draw:style-name="fr3" draw:name="Grafik615" text:anchor-type="paragraph" svg:x="1.067cm" svg:y="0.688cm" svg:width="4.09cm" svg:height="0.99cm" draw:z-index="610"><draw:image xlink:href="Pictures/10000000000001350000004B4F9BBB0A.png" xlink:type="simple" xlink:show="embed" xlink:actuate="onLoad"/></draw:frame>Output<text:tab/>MS : REAL (Windstärke in Meter / Sekunde)</text:p>
      <text:p text:style-name="P183"><text:line-break/>BFT_TO_MS rechnet Windgeschwindigkeiten nach der Beaufort Skala in Meter Pro Sekunde um.</text:p>
      <text:p text:style-name="P183">Die Berechnung erfolgt nach der Formel:</text:p>
      <text:p text:style-name="P183">BFT_TO_MS = 0.836m/s * B^3/2 </text:p>
      <text:list xml:id="list38447063" text:continue-numbering="true" text:style-name="L1">
        <text:list-item>
          <text:list>
            <text:list-item>
              <text:h text:style-name="P216" text:outline-level="2"><text:alphabetical-index-mark-start text:id="IMark225798256"/>C_TO_F<text:alphabetical-index-mark-end text:id="IMark225798256"/></text:h>
            </text:list-item>
          </text:list>
        </text:list-item>
      </text:list>
      <text:p text:style-name="P69">Type<text:tab/>Funktion : REAL</text:p>
      <text:p text:style-name="P66"><text:span text:style-name="T15">Input</text:span><text:span text:style-name="T14"><text:tab/>CELSIUS : REAL (Temperaturwert in °C)</text:span></text:p>
      <text:p text:style-name="P73"><draw:frame draw:style-name="fr3" draw:name="Grafik198" text:anchor-type="paragraph" svg:x="1.088cm" svg:y="0.651cm" svg:width="3.18cm" svg:height="1.12cm" draw:z-index="148"><draw:image xlink:href="Pictures/10000000000000F00000005504D66E8C.png" xlink:type="simple" xlink:show="embed" xlink:actuate="onLoad"/></draw:frame>Output<text:tab/>REAL (Temperaturwert in Fahrenheit)</text:p>
      <text:p text:style-name="P73">C_TO_F rechnet einen Temperaturwert von Celsius in Fahrenheit um.</text:p>
      <text:list xml:id="list38463409" text:continue-numbering="true" text:style-name="L1">
        <text:list-item>
          <text:list>
            <text:list-item>
              <text:h text:style-name="P222" text:outline-level="2"><text:alphabetical-index-mark-start text:id="IMark225798256"/>C_TO_K<text:alphabetical-index-mark-end text:id="IMark225798256"/></text:h>
            </text:list-item>
          </text:list>
        </text:list-item>
      </text:list>
      <text:p text:style-name="P69">Type<text:tab/>Funktion : REAL</text:p>
      <text:p text:style-name="P66"><text:span text:style-name="T15">Input</text:span><text:span text:style-name="T14"><text:tab/>CELSIUS : REAL (Temperaturwert in °C)</text:span></text:p>
      <text:p text:style-name="P73">Output<text:tab/>REAL (Temperaturwert in Kelvin)</text:p>
      <text:p text:style-name="P73"><draw:frame draw:style-name="fr3" draw:name="Grafik199" text:anchor-type="paragraph" svg:x="1.263cm" svg:y="0.215cm" svg:width="3.18cm" svg:height="1.12cm" draw:z-index="149"><draw:image xlink:href="Pictures/10000000000000F0000000558F75C738.png" xlink:type="simple" xlink:show="embed" xlink:actuate="onLoad"/></draw:frame><text:line-break/>C_TO_K rechnet einen Temperaturwert von Celsius in Kelvin um.</text:p>
      <text:list xml:id="list38449441" text:continue-numbering="true" text:style-name="L1">
        <text:list-item>
          <text:list>
            <text:list-item>
              <text:h text:style-name="P220" text:outline-level="2"><text:soft-page-break/><text:alphabetical-index-mark-start text:id="IMark225798256"/>DEG_TO_DIR<text:alphabetical-index-mark-end text:id="IMark225798256"/></text:h>
            </text:list-item>
          </text:list>
        </text:list-item>
      </text:list>
      <text:p text:style-name="P69">Type<text:tab/>Funktion : STRING(3)</text:p>
      <text:p text:style-name="P66"><text:span text:style-name="T15">Input</text:span><text:span text:style-name="T14"><text:tab/>DEG : INT (Himmelsrichtung in Grad)</text:span></text:p>
      <text:p text:style-name="P179"><text:tab/>N : INT (Maximale Länge der Zeichenkette)</text:p>
      <text:p text:style-name="P179"><text:tab/>L : INT (Spracheinstellung: siehe Sprachdefnitionen)</text:p>
      <text:p text:style-name="P183"><draw:frame draw:style-name="fr3" draw:name="Grafik611" text:anchor-type="paragraph" svg:x="1.067cm" svg:y="0.688cm" svg:width="4.48cm" svg:height="1.79cm" draw:z-index="607"><draw:image xlink:href="Pictures/1000000000000153000000879BEBA3BC.png" xlink:type="simple" xlink:show="embed" xlink:actuate="onLoad"/></draw:frame>Output<text:tab/>STRING(3) (Kompassangaben)</text:p>
      <text:p text:style-name="P173"><text:span text:style-name="T21"><text:line-break/>DEG_TO_DIR rechnet eine Himmelsrichtung (0..360 Grad) in Kompass Angaben um. Am Eingang DEG liegt die Himmelsrichtung in Grad an (0 = Nord, 90 = Ost, 180 = Süd und 270 = </text:span><text:span text:style-name="T19">Westen</text:span><text:span text:style-name="T21"> ). Der Ausgang stellt die Himmelsrichtung als </text:span><text:span text:style-name="T16">String</text:span><text:span text:style-name="T21"> in der Form NNO zur Verfügung. Mit dem Eingang N wird die Maximale Länge der Richtungsangabe begrenzt. Wenn N=1 werden nur in die 4 Himmelsrichtungen N, E, S, W aufgelöst. Ist N = 2 wird zwischen jede Himmelsrichtung eine weitere eingefügt: NE, SE, SW, NW. Bei N=3 werden auch Richtungen wie NNO ... aufgelöst, Mit N = 3 werden insgesamt 16 Richtungen Ausgewertet. Der Eingang L erlaubt das Umschalten der im Sprachen Setup definierten Sprachen. 0L=0 bedeutet </text:span><text:span text:style-name="T16">Default</text:span><text:span text:style-name="T21"> Sprache, eine Zahl &gt; 0 ist eine der Vordefinierten Sprachen. nähere Infos zu den Vordefinierten Sprachen finden sie unter Datentypen CONSTANTS_LANGUAGE.</text:span></text:p>
      <text:list xml:id="list38466007" text:continue-numbering="true" text:style-name="L1">
        <text:list-item>
          <text:list>
            <text:list-item>
              <text:h text:style-name="P220" text:outline-level="2"><text:alphabetical-index-mark-start text:id="IMark225798256"/>DIR_TO_DEG<text:alphabetical-index-mark-end text:id="IMark225798256"/></text:h>
            </text:list-item>
          </text:list>
        </text:list-item>
      </text:list>
      <text:p text:style-name="P69">Type<text:tab/>Funktion : INT</text:p>
      <text:p text:style-name="P173"><text:span text:style-name="T15">Input</text:span><text:span text:style-name="T14"><text:tab/>DIR : STRING(3) (Himmelsrichtung in Kompassangaben)</text:span></text:p>
      <text:p text:style-name="P179"><text:tab/>L : INT (Sprachauswahl)</text:p>
      <text:p text:style-name="P183"><draw:frame draw:style-name="fr3" draw:name="Grafik612" text:anchor-type="paragraph" svg:x="1.046cm" svg:y="0.663cm" svg:width="4.48cm" svg:height="1.39cm" draw:z-index="735"><draw:image xlink:href="Pictures/1000000000000153000000694D849B84.png" xlink:type="simple" xlink:show="embed" xlink:actuate="onLoad"/></draw:frame>Output<text:tab/>INT (Himmelsrichtung in Grad)</text:p>
      <text:p text:style-name="P183"><text:line-break/>DIR_TO_DEG wandelt eine Himmelsrichtung in der Form NNO in Grad um. Es werden dabei bis zu 3 Stellen ausgewertet, was einer Auflösung von <text:soft-page-break/>22.5° entspricht. Der Ausgang ist vom Typ Integer. Der Eingang muss in Großbuchstaben vorliegen und Osten darf mit O oder E bezeichnet werden. Die Zeichenkette NO wird in 45° gewandelt. L spezifiziert die zu verwendende Sprache, für detaillierte Informationen siehe Datentyp CONSTANTS_LANGUAGE. </text:p>
      <text:p text:style-name="P183">Die Himmelsrichtungen sind: 0° = Nord, 90° = Ost, 180° = Süd und 270° = Westen. Die Umwandlung erfolgt nach folgender Tabelle:</text:p>
      <table:table table:name="Tabelle36" table:style-name="Tabelle36">
        <table:table-column table:style-name="Tabelle36.A"/>
        <table:table-column table:style-name="Tabelle36.B"/>
        <table:table-column table:style-name="Tabelle36.C"/>
        <table:table-column table:style-name="Tabelle36.B"/>
        <table:table-column table:style-name="Tabelle36.E"/>
        <table:table-column table:style-name="Tabelle36.F"/>
        <table:table-column table:style-name="Tabelle36.C"/>
        <table:table-column table:style-name="Tabelle36.H"/>
        <table:table-row>
          <table:table-cell table:style-name="Tabelle36.A1" office:value-type="string">
            <text:p text:style-name="P130">N</text:p>
          </table:table-cell>
          <table:table-cell table:style-name="Tabelle36.A1" office:value-type="string">
            <text:p text:style-name="P130">0°</text:p>
          </table:table-cell>
          <table:table-cell table:style-name="Tabelle36.A1" office:value-type="string">
            <text:p text:style-name="P130">NNO, NNE</text:p>
          </table:table-cell>
          <table:table-cell table:style-name="Tabelle36.A1" office:value-type="string">
            <text:p text:style-name="P130">23°</text:p>
          </table:table-cell>
          <table:table-cell table:style-name="Tabelle36.A1" office:value-type="string">
            <text:p text:style-name="P130">NO</text:p>
          </table:table-cell>
          <table:table-cell table:style-name="Tabelle36.A1" office:value-type="string">
            <text:p text:style-name="P130">45°</text:p>
          </table:table-cell>
          <table:table-cell table:style-name="Tabelle36.A1" office:value-type="string">
            <text:p text:style-name="P130">ONO, ENE</text:p>
          </table:table-cell>
          <table:table-cell table:style-name="Tabelle36.H1" office:value-type="string">
            <text:p text:style-name="P121">68°</text:p>
          </table:table-cell>
        </table:table-row>
        <table:table-row>
          <table:table-cell table:style-name="Tabelle36.A2" office:value-type="string">
            <text:p text:style-name="P130">O</text:p>
          </table:table-cell>
          <table:table-cell table:style-name="Tabelle36.A2" office:value-type="string">
            <text:p text:style-name="P130">90°</text:p>
          </table:table-cell>
          <table:table-cell table:style-name="Tabelle36.A2" office:value-type="string">
            <text:p text:style-name="P130">OSO, ESE</text:p>
          </table:table-cell>
          <table:table-cell table:style-name="Tabelle36.A2" office:value-type="string">
            <text:p text:style-name="P130">113°</text:p>
          </table:table-cell>
          <table:table-cell table:style-name="Tabelle36.A2" office:value-type="string">
            <text:p text:style-name="P130">SO, SE</text:p>
          </table:table-cell>
          <table:table-cell table:style-name="Tabelle36.A2" office:value-type="string">
            <text:p text:style-name="P130">135°</text:p>
          </table:table-cell>
          <table:table-cell table:style-name="Tabelle36.A2" office:value-type="string">
            <text:p text:style-name="P130">SSO, SSE</text:p>
          </table:table-cell>
          <table:table-cell table:style-name="Tabelle36.H2" office:value-type="string">
            <text:p text:style-name="P130">158°</text:p>
          </table:table-cell>
        </table:table-row>
        <table:table-row>
          <table:table-cell table:style-name="Tabelle36.A2" office:value-type="string">
            <text:p text:style-name="P130">S</text:p>
          </table:table-cell>
          <table:table-cell table:style-name="Tabelle36.A2" office:value-type="string">
            <text:p text:style-name="P130">180°</text:p>
          </table:table-cell>
          <table:table-cell table:style-name="Tabelle36.A2" office:value-type="string">
            <text:p text:style-name="P130">SSW</text:p>
          </table:table-cell>
          <table:table-cell table:style-name="Tabelle36.A2" office:value-type="string">
            <text:p text:style-name="P130">203°</text:p>
          </table:table-cell>
          <table:table-cell table:style-name="Tabelle36.A2" office:value-type="string">
            <text:p text:style-name="P130">SW</text:p>
          </table:table-cell>
          <table:table-cell table:style-name="Tabelle36.A2" office:value-type="string">
            <text:p text:style-name="P130">225°</text:p>
          </table:table-cell>
          <table:table-cell table:style-name="Tabelle36.A2" office:value-type="string">
            <text:p text:style-name="P130">WSW</text:p>
          </table:table-cell>
          <table:table-cell table:style-name="Tabelle36.H2" office:value-type="string">
            <text:p text:style-name="P130">248°</text:p>
          </table:table-cell>
        </table:table-row>
        <table:table-row>
          <table:table-cell table:style-name="Tabelle36.A2" office:value-type="string">
            <text:p text:style-name="P130">W</text:p>
          </table:table-cell>
          <table:table-cell table:style-name="Tabelle36.A2" office:value-type="string">
            <text:p text:style-name="P130">270°</text:p>
          </table:table-cell>
          <table:table-cell table:style-name="Tabelle36.A2" office:value-type="string">
            <text:p text:style-name="P130">WNW</text:p>
          </table:table-cell>
          <table:table-cell table:style-name="Tabelle36.A2" office:value-type="string">
            <text:p text:style-name="P130">293°</text:p>
          </table:table-cell>
          <table:table-cell table:style-name="Tabelle36.A2" office:value-type="string">
            <text:p text:style-name="P130">NW</text:p>
          </table:table-cell>
          <table:table-cell table:style-name="Tabelle36.A2" office:value-type="string">
            <text:p text:style-name="P130">315°</text:p>
          </table:table-cell>
          <table:table-cell table:style-name="Tabelle36.A2" office:value-type="string">
            <text:p text:style-name="P130">NNW</text:p>
          </table:table-cell>
          <table:table-cell table:style-name="Tabelle36.H2" office:value-type="string">
            <text:p text:style-name="P130">338°</text:p>
          </table:table-cell>
        </table:table-row>
      </table:table>
      <text:p text:style-name="P183"/>
      <text:list xml:id="list38466027" text:continue-numbering="true" text:style-name="L1">
        <text:list-item>
          <text:list>
            <text:list-item>
              <text:h text:style-name="P216" text:outline-level="2"><text:alphabetical-index-mark-start text:id="IMark225798256"/>ENERGY<text:alphabetical-index-mark-end text:id="IMark225798256"/></text:h>
            </text:list-item>
          </text:list>
        </text:list-item>
      </text:list>
      <text:p text:style-name="P2">Type<text:tab/><text:span text:style-name="T12">Funktionsbaustein</text:span></text:p>
      <text:p text:style-name="P66"><text:span text:style-name="T15">Input</text:span><text:span text:style-name="T14"><text:tab/>J : REAL (Joule)</text:span></text:p>
      <text:p text:style-name="P69"><text:tab/>C : REAL (Kalorie)</text:p>
      <text:p text:style-name="P73"><text:tab/>WH : REAL (Wattstunden)</text:p>
      <text:p text:style-name="P66"><text:span text:style-name="T21">Output<text:tab/></text:span><text:span text:style-name="T14">YJ : REAL (Joule)</text:span></text:p>
      <text:p text:style-name="P69"><text:tab/>YC : REAL (Kalorie)</text:p>
      <text:p text:style-name="P73"><draw:frame draw:style-name="fr3" draw:name="Grafik293" text:anchor-type="paragraph" svg:x="1.182cm" svg:y="0.64cm" svg:width="2.731cm" svg:height="2.2cm" draw:z-index="251"><draw:image xlink:href="Pictures/10000000000000CE000000A6D5B6F9FD.png" xlink:type="simple" xlink:show="embed" xlink:actuate="onLoad"/></draw:frame><text:tab/>YWH : REAL (Wattstunden)</text:p>
      <text:p text:style-name="P66"><text:span text:style-name="T21">Der Baustein ENERGY konvertiert verschiedene in der Praxis gebräuchliche Einheiten für Energie. Normalerweise wird nur der zu konvertierende Eingang belegt und die restlichen Eingänge bleiben frei. Werden jedoch mehrere Eingänge gleichzeitig mit Werten beaufschlagt, so werden die Werte aller Eingänge entsprechend umgewandelt und dann aufsummiert.</text:span></text:p>
      <text:p text:style-name="P183">1 J = 1 Ws (Watt * Sekunden) = 1 Nm (Newton * Meter)</text:p>
      <text:p text:style-name="P173"><text:span text:style-name="T21">1 C = 4,1868 J = 1,163 * 10</text:span>-3 <text:span text:style-name="T21">Wh (Watt * Stunden)</text:span></text:p>
      <text:p text:style-name="P173"><text:span text:style-name="T21">1 Wh = 3,6 * 10</text:span>3<text:span text:style-name="T21"> J = 860 C</text:span></text:p>
      <text:list xml:id="list38477994" text:continue-numbering="true" text:style-name="L1">
        <text:list-item>
          <text:list>
            <text:list-item>
              <text:h text:style-name="P216" text:outline-level="2"><text:soft-page-break/><text:alphabetical-index-mark-start text:id="IMark225798256"/>F_TO_C<text:alphabetical-index-mark-end text:id="IMark225798256"/></text:h>
            </text:list-item>
          </text:list>
        </text:list-item>
      </text:list>
      <text:p text:style-name="P69">Type<text:tab/>Funktion : REAL</text:p>
      <text:p text:style-name="P66"><text:span text:style-name="T15">Input</text:span><text:span text:style-name="T14"><text:tab/>FAHRENHEIT : REAL (Temperaturwert in Fahrenheit)</text:span></text:p>
      <text:p text:style-name="P73"><draw:frame draw:style-name="fr3" draw:name="Grafik200" text:anchor-type="paragraph" svg:x="1.071cm" svg:y="0.695cm" svg:width="4.069cm" svg:height="1.12cm" draw:z-index="150"><draw:image xlink:href="Pictures/10000000000001340000005559DDD380.png" xlink:type="simple" xlink:show="embed" xlink:actuate="onLoad"/></draw:frame>Output<text:tab/>REAL (Temperaturwert in °C)</text:p>
      <text:p text:style-name="P73"><text:line-break/>F_TO_C rechnet einen Temperaturwert von Fahrenheit in °C um.</text:p>
      <text:list xml:id="list38463579" text:continue-numbering="true" text:style-name="L1">
        <text:list-item>
          <text:list>
            <text:list-item>
              <text:h text:style-name="P216" text:outline-level="2"><text:alphabetical-index-mark-start text:id="IMark225798256"/>F_TO_OM<text:alphabetical-index-mark-end text:id="IMark225798256"/></text:h>
            </text:list-item>
          </text:list>
        </text:list-item>
      </text:list>
      <text:p text:style-name="P69">Type<text:tab/>Funktion : REAL</text:p>
      <text:p text:style-name="P66"><text:span text:style-name="T15">Input</text:span><text:span text:style-name="T14"><text:tab/>F : REAL (Frequenz in Hz)</text:span></text:p>
      <text:p text:style-name="P73"><draw:frame draw:style-name="fr3" draw:name="Grafik205" text:anchor-type="paragraph" svg:x="1.099cm" svg:y="0.674cm" svg:width="3.62cm" svg:height="1.12cm" draw:z-index="156"><draw:image xlink:href="Pictures/1000000000000112000000551E6829FB.png" xlink:type="simple" xlink:show="embed" xlink:actuate="onLoad"/></draw:frame>Output<text:tab/>REAL (Frequenz in Hz)</text:p>
      <text:p text:style-name="P73"><text:line-break/>F_TO_OM berechnet die Kreisfrequenz Omega aus der Frequenz in Hz.</text:p>
      <text:list xml:id="list38450308" text:continue-numbering="true" text:style-name="L1">
        <text:list-item>
          <text:list>
            <text:list-item>
              <text:h text:style-name="P216" text:outline-level="2"><text:alphabetical-index-mark-start text:id="IMark225798256"/>F_TO_PT<text:alphabetical-index-mark-end text:id="IMark225798256"/></text:h>
            </text:list-item>
          </text:list>
        </text:list-item>
      </text:list>
      <text:p text:style-name="P69">Type<text:tab/>Funktion : REAL</text:p>
      <text:p text:style-name="P66"><text:span text:style-name="T15">Input</text:span><text:span text:style-name="T14"><text:tab/>F : REAL (Frequenz)</text:span></text:p>
      <text:p text:style-name="P73"><draw:frame draw:style-name="fr3" draw:name="Grafik201" text:anchor-type="paragraph" svg:x="1.078cm" svg:y="0.695cm" svg:width="3.62cm" svg:height="1.12cm" draw:z-index="151"><draw:image xlink:href="Pictures/100000000000011200000055790D84B5.png" xlink:type="simple" xlink:show="embed" xlink:actuate="onLoad"/></draw:frame>Output<text:tab/>TIME (Periodendauer)</text:p>
      <text:p text:style-name="P73"><text:line-break/>F_TO_PT rechnet einen Frequenzwert von Hz in die entsprechende Periodendauer um.</text:p>
      <text:list xml:id="list38455954" text:continue-numbering="true" text:style-name="L1">
        <text:list-item>
          <text:list>
            <text:list-item>
              <text:h text:style-name="P216" text:outline-level="2"><text:soft-page-break/><text:alphabetical-index-mark-start text:id="IMark225798256"/>KMH_TO_MS<text:alphabetical-index-mark-end text:id="IMark225798256"/></text:h>
            </text:list-item>
          </text:list>
        </text:list-item>
      </text:list>
      <text:p text:style-name="P2">Type<text:tab/><text:span text:style-name="T11">Funktion</text:span> : REAL</text:p>
      <text:p text:style-name="P66"><text:span text:style-name="T15">Input</text:span><text:span text:style-name="T14"><text:tab/>KMH : REAL (Geschwindigkeit in m/s)</text:span></text:p>
      <text:p text:style-name="P73"><draw:frame draw:style-name="fr3" draw:name="Grafik269" text:anchor-type="paragraph" svg:x="1.044cm" svg:y="0.674cm" svg:width="4.971cm" svg:height="1.12cm" draw:z-index="222"><draw:image xlink:href="Pictures/100000000000017800000055F595ABF9.png" xlink:type="simple" xlink:show="embed" xlink:actuate="onLoad"/></draw:frame>Output<text:tab/>TIME (Geschwindigkeit in km/h)</text:p>
      <text:p text:style-name="P73"><text:line-break/>KMH_TO_MS rechnet einem Geschwindigkeitswert von Kilometer / Stunde in Meter / Sekunde um.<text:tab/>KMH_TO_MS := KMH / 3.6</text:p>
      <text:p text:style-name="P183"/>
      <text:list xml:id="list38448454" text:continue-numbering="true" text:style-name="L1">
        <text:list-item>
          <text:list>
            <text:list-item>
              <text:h text:style-name="P216" text:outline-level="2"><text:alphabetical-index-mark-start text:id="IMark225798256"/><text:alphabetical-index-mark-start text:id="IMark229353284"/>LENGTH<text:alphabetical-index-mark-end text:id="IMark229353284"/><text:alphabetical-index-mark-end text:id="IMark225798256"/></text:h>
            </text:list-item>
          </text:list>
        </text:list-item>
      </text:list>
      <text:p text:style-name="P2"><text:span text:style-name="T12">Type</text:span><text:tab/><text:span text:style-name="T11">Funktionsbaustein</text:span></text:p>
      <text:p text:style-name="P66"><text:span text:style-name="T15">Input</text:span><text:span text:style-name="T14"><text:tab/>M : REAL (Meter)</text:span></text:p>
      <text:p text:style-name="P69"><text:tab/>P : REAL (Typographischer Punkt)</text:p>
      <text:p text:style-name="P66"><text:span text:style-name="T21"><text:tab/>IN : REAL (</text:span><text:span text:style-name="T16">Inch</text:span><text:span text:style-name="T21">)</text:span></text:p>
      <text:p text:style-name="P66"><text:span text:style-name="T21"><text:tab/>FT : REAL (</text:span><text:span text:style-name="T16">Foot</text:span><text:span text:style-name="T21">)</text:span></text:p>
      <text:p text:style-name="P66"><text:span text:style-name="T21"><text:tab/>YD : REAL (</text:span><text:span text:style-name="T16">Yard</text:span><text:span text:style-name="T21">)</text:span></text:p>
      <text:p text:style-name="P66"><text:span text:style-name="T21"><text:tab/>MILE : REAL (</text:span><text:span text:style-name="T16">Mile</text:span><text:span text:style-name="T21">)</text:span></text:p>
      <text:p text:style-name="P73"><text:tab/>SM : REAL (Internationale Seemeile)</text:p>
      <text:p text:style-name="P66"><text:span text:style-name="T21"><text:tab/>FM : REAL (</text:span><text:span text:style-name="T16">Fathom</text:span><text:span text:style-name="T21">)</text:span></text:p>
      <text:p text:style-name="P73">Output<text:tab/>YM : REAL (Meter)</text:p>
      <text:p text:style-name="P69"><text:tab/>YP : REAL (Typographischer Punkt)</text:p>
      <text:p text:style-name="P66"><text:span text:style-name="T21"><text:tab/>YIN : REAL (</text:span><text:span text:style-name="T16">Inch</text:span><text:span text:style-name="T21">)</text:span></text:p>
      <text:p text:style-name="P66"><text:span text:style-name="T21"><text:tab/>YFT : REAL (</text:span><text:span text:style-name="T16">Foot</text:span><text:span text:style-name="T21">)</text:span></text:p>
      <text:p text:style-name="P66"><text:span text:style-name="T21"><text:tab/>YYD : REAL (</text:span><text:span text:style-name="T16">Yard</text:span><text:span text:style-name="T21">)</text:span></text:p>
      <text:p text:style-name="P66"><text:span text:style-name="T21"><text:tab/>YMILE : REAL (</text:span><text:span text:style-name="T16">Mile</text:span><text:span text:style-name="T21">)</text:span></text:p>
      <text:p text:style-name="P73"><text:tab/>YSM : REAL (Internationale Seemeile)</text:p>
      <text:p text:style-name="P66"><draw:frame draw:style-name="fr3" draw:name="Grafik294" text:anchor-type="paragraph" svg:x="1.12cm" svg:y="0.661cm" svg:width="2.731cm" svg:height="4.44cm" draw:z-index="252"><draw:image xlink:href="Pictures/10000000000000CE00000150113EA753.png" xlink:type="simple" xlink:show="embed" xlink:actuate="onLoad"/></draw:frame><text:span text:style-name="T21"><text:tab/>YFM : REAL (</text:span><text:span text:style-name="T16">Fathom</text:span><text:span text:style-name="T21">)</text:span></text:p>
      <text:p text:style-name="P73"><text:soft-page-break/><text:line-break/>Der Baustein LENGTH konvertiert verschiedene in der Praxis gebräuchliche Einheiten für Längeneinheiten. Normalerweise wird nur der zu konvertierende Eingang belegt und die restlichen Eingänge bleiben frei. Werden jedoch mehrere Eingänge gleichzeitig mit Werten beaufschlagt, so werden die Werte aller Eingänge entsprechend umgewandelt und dann aufsummiert.</text:p>
      <text:p text:style-name="P183">1 P = 0,376065 mm (Einheit aus dem Druckereigewerbe)</text:p>
      <text:p text:style-name="P183">1 IN = 25,4 mm</text:p>
      <text:p text:style-name="P183">1 FT = 0,3048 m</text:p>
      <text:p text:style-name="P183">1 YD = 0,9144 m</text:p>
      <text:p text:style-name="P183">1 MILE = 1609,344 m</text:p>
      <text:p text:style-name="P183">1 SM = 1852 m</text:p>
      <text:p text:style-name="P183">1 FM = 1,829 m</text:p>
      <text:list xml:id="list38476371" text:continue-numbering="true" text:style-name="L1">
        <text:list-item>
          <text:list>
            <text:list-item>
              <text:h text:style-name="P216" text:outline-level="2"><text:alphabetical-index-mark-start text:id="IMark225798256"/>MS_TO_BFT<text:alphabetical-index-mark-end text:id="IMark225798256"/></text:h>
            </text:list-item>
          </text:list>
        </text:list-item>
      </text:list>
      <text:p text:style-name="P2"><text:span text:style-name="T12">Type</text:span><text:tab/><text:span text:style-name="T12">Funktion</text:span></text:p>
      <text:p text:style-name="P66"><text:span text:style-name="T15">Input</text:span><text:span text:style-name="T14"><text:tab/>MS : INT (Windstärke nach der Beaufort Skala)</text:span></text:p>
      <text:p text:style-name="P73"><draw:frame draw:style-name="fr3" draw:name="Grafik616" text:anchor-type="paragraph" svg:x="1.046cm" svg:y="0.725cm" svg:width="4.09cm" svg:height="0.99cm" draw:z-index="611"><draw:image xlink:href="Pictures/10000000000001350000004B88F853C2.png" xlink:type="simple" xlink:show="embed" xlink:actuate="onLoad"/></draw:frame>Output<text:tab/>MS : REAL (Windstärke in Meter / Sekunde)</text:p>
      <text:p text:style-name="P183"><text:line-break/>MS_TO_BFT rechnet Windgeschwindigkeiten von Meter / Sekunde in die Beaufort Skala um.</text:p>
      <text:p text:style-name="P183">Die Berechnung erfolgt nach der Formel:</text:p>
      <text:p text:style-name="P183">MS_TO_BFT = (MS * 1.196172)^2/3</text:p>
      <text:list xml:id="list38455746" text:continue-numbering="true" text:style-name="L1">
        <text:list-item>
          <text:list>
            <text:list-item>
              <text:h text:style-name="P216" text:outline-level="2"><text:soft-page-break/><text:alphabetical-index-mark-start text:id="IMark225798256"/>MS_TO_KMH<text:alphabetical-index-mark-end text:id="IMark225798256"/></text:h>
            </text:list-item>
          </text:list>
        </text:list-item>
      </text:list>
      <text:p text:style-name="P69">Type<text:tab/>Funktion : REAL</text:p>
      <text:p text:style-name="P66"><text:span text:style-name="T15">Input</text:span><text:span text:style-name="T14"><text:tab/>KMH : REAL (Geschwindigkeit in km/h)</text:span></text:p>
      <text:p text:style-name="P73"><draw:frame draw:style-name="fr3" draw:name="Grafik270" text:anchor-type="paragraph" svg:x="1.053cm" svg:y="0.654cm" svg:width="4.971cm" svg:height="1.12cm" draw:z-index="223"><draw:image xlink:href="Pictures/1000000000000178000000550124726F.png" xlink:type="simple" xlink:show="embed" xlink:actuate="onLoad"/></draw:frame>Output<text:tab/>REAL (Geschwindigkeit in m/s)</text:p>
      <text:p text:style-name="P2"><text:line-break/>MS_TO_KMH <text:span text:style-name="T11">rechnet</text:span> einem Geschwindigkeitswert von Meter / Sekunde in Kilometer / Stunde um.</text:p>
      <text:p text:style-name="P73">MS_TO_KMH := MS * 3.6</text:p>
      <text:list xml:id="list38467331" text:continue-numbering="true" text:style-name="L1">
        <text:list-item>
          <text:list>
            <text:list-item>
              <text:h text:style-name="P216" text:outline-level="2"><text:alphabetical-index-mark-start text:id="IMark225798256"/>K_TO_C<text:alphabetical-index-mark-end text:id="IMark225798256"/></text:h>
            </text:list-item>
          </text:list>
        </text:list-item>
      </text:list>
      <text:p text:style-name="P69">Type<text:tab/>Funktion : REAL</text:p>
      <text:p text:style-name="P66"><text:span text:style-name="T15">Input</text:span><text:span text:style-name="T14"><text:tab/>KELVIN : REAL (Temperaturwert in Kelvin)</text:span></text:p>
      <text:p text:style-name="P73"><draw:frame draw:style-name="fr3" draw:name="Grafik202" text:anchor-type="paragraph" svg:x="1.005cm" svg:y="0.67cm" svg:width="3.18cm" svg:height="1.12cm" draw:z-index="152"><draw:image xlink:href="Pictures/10000000000000F00000005515398EAF.png" xlink:type="simple" xlink:show="embed" xlink:actuate="onLoad"/></draw:frame>Output<text:tab/>REAL (Temperaturwert in °C)</text:p>
      <text:p text:style-name="P73"><text:line-break/>K_TO_C rechnet einen Temperaturwert von Kelvin in °C um.</text:p>
      <text:list xml:id="list38477832" text:continue-numbering="true" text:style-name="L1">
        <text:list-item>
          <text:list>
            <text:list-item>
              <text:h text:style-name="P216" text:outline-level="2"><text:alphabetical-index-mark-start text:id="IMark225798256"/>OM_TO_F<text:alphabetical-index-mark-end text:id="IMark225798256"/></text:h>
            </text:list-item>
          </text:list>
        </text:list-item>
      </text:list>
      <text:p text:style-name="P69">Type<text:tab/>Funktion : REAL</text:p>
      <text:p text:style-name="P66"><text:span text:style-name="T15">Input</text:span><text:span text:style-name="T14"><text:tab/>OM : REAL (Kreisfrequenz Omega)</text:span></text:p>
      <text:p text:style-name="P73"><draw:frame draw:style-name="fr3" draw:name="Grafik77" text:anchor-type="paragraph" svg:x="1.028cm" svg:y="0.771cm" svg:width="3.62cm" svg:height="1.12cm" draw:z-index="155"><draw:image xlink:href="Pictures/100000000000011200000055E2002E5E.png" xlink:type="simple" xlink:show="embed" xlink:actuate="onLoad"/></draw:frame>Output<text:tab/>REAL (Frequenz in Hz)</text:p>
      <text:p text:style-name="P73"><text:line-break/>OM_TO_F berechnet die Frequenz in Hz aus der Kreisfrequenz Omega.</text:p>
      <text:list xml:id="list38447458" text:continue-numbering="true" text:style-name="L1">
        <text:list-item>
          <text:list>
            <text:list-item>
              <text:h text:style-name="P216" text:outline-level="2"><text:soft-page-break/><text:alphabetical-index-mark-start text:id="IMark225798256"/>PRESSURE<text:alphabetical-index-mark-end text:id="IMark225798256"/></text:h>
            </text:list-item>
          </text:list>
        </text:list-item>
      </text:list>
      <text:p text:style-name="P2">Type<text:tab/><text:span text:style-name="T12">Funktionsbaustein</text:span></text:p>
      <text:p text:style-name="P66"><text:span text:style-name="T15">Input</text:span><text:span text:style-name="T14"><text:tab/>MWS : REAL (Wassersäule in Meter)</text:span></text:p>
      <text:p text:style-name="P18"><text:tab/>TORR : REAL (Torr Bzw. Quecksilbersäule in mm)</text:p>
      <text:p text:style-name="P73"><text:tab/>ATT : REAL (Atmosphäre technisch)</text:p>
      <text:p text:style-name="P73"><text:tab/>ATM : REAL (Atmosphäre physikalisch)</text:p>
      <text:p text:style-name="P73"><text:tab/>PA : REAL (Pascal)</text:p>
      <text:p text:style-name="P73"><text:tab/>BAR : REAL (Bar)</text:p>
      <text:p text:style-name="P73">Output<text:tab/>YMWS : REAL (Wassersäule in Meter)</text:p>
      <text:p text:style-name="P173"><text:span text:style-name="T22"><text:tab/></text:span><text:span text:style-name="T22">YTORR</text:span><text:span text:style-name="T14"> : </text:span>REAL<text:span text:style-name="T14"> (Torr Bzw. Quecksilbersäule in mm)</text:span></text:p>
      <text:p text:style-name="P73"><text:tab/>YATT : REAL (Atmosphäre technisch)</text:p>
      <text:p text:style-name="P73"><text:tab/>YATM : REAL (Atmosphäre physikalisch)</text:p>
      <text:p text:style-name="P73"><text:tab/>YPA : REAL (Pascal)</text:p>
      <text:p text:style-name="P73"><draw:frame draw:style-name="fr3" draw:name="Grafik295" text:anchor-type="paragraph" svg:x="1.602cm" svg:y="0.859cm" svg:width="2.731cm" svg:height="3.54cm" draw:z-index="253"><draw:image xlink:href="Pictures/10000000000000CE0000010C1A9B4687.png" xlink:type="simple" xlink:show="embed" xlink:actuate="onLoad"/></draw:frame><text:tab/>YBAR : REAL (Bar)</text:p>
      <text:p text:style-name="P73"><text:line-break/>Der Baustein PRESSURE konvertiert verschiedene in der Praxis gebräuchliche Einheiten für Druck. Normalerweise wird nur der zu konvertierende Eingang belegt und die restlichen Eingänge bleiben frei. Werden jedoch mehrere Eingänge gleichzeitig mit Werten beaufschlagt, so werden die Werte aller Eingänge entsprechend umgewandelt und dann aufsummiert.</text:p>
      <text:p text:style-name="P183"><text:line-break/>1 MWS = 1 Meter Wassersäule = 0,0980665 Bar</text:p>
      <text:p text:style-name="P183">1 TORR = 1 mm Quecksilbersäule = 0,133322 Bar = 101325 / 760 Pa</text:p>
      <text:p text:style-name="P183">1 ATT = 1 kp / cm² = 0,980665 Bar</text:p>
      <text:p text:style-name="P183">1 ATM = 1,01325 Bar</text:p>
      <text:p text:style-name="P183">1 PA = 1 N / m²</text:p>
      <text:p text:style-name="P173"><text:span text:style-name="T21">1 BAR = 10</text:span>5<text:span text:style-name="T21"> Pa</text:span></text:p>
      <text:list xml:id="list38468881" text:continue-numbering="true" text:style-name="L1">
        <text:list-item>
          <text:list>
            <text:list-item>
              <text:h text:style-name="P216" text:outline-level="2"><text:soft-page-break/><text:alphabetical-index-mark-start text:id="IMark225798256"/>PT_TO_F<text:alphabetical-index-mark-end text:id="IMark225798256"/></text:h>
            </text:list-item>
          </text:list>
        </text:list-item>
      </text:list>
      <text:p text:style-name="P69">Type<text:tab/>Funktion : REAL</text:p>
      <text:p text:style-name="P66"><text:span text:style-name="T15">Input</text:span><text:span text:style-name="T14"><text:tab/>PT : TIME (Periodendauer in Sekunden)</text:span></text:p>
      <text:p text:style-name="P73"><draw:frame draw:style-name="fr3" draw:name="Grafik203" text:anchor-type="paragraph" svg:x="0.984cm" svg:y="0.693cm" svg:width="3.62cm" svg:height="1.12cm" draw:z-index="153"><draw:image xlink:href="Pictures/1000000000000112000000554F2ADE3A.png" xlink:type="simple" xlink:show="embed" xlink:actuate="onLoad"/></draw:frame>Output<text:tab/>REAL (Frequenz in Hz)</text:p>
      <text:p text:style-name="P73"><text:line-break/>PT_TO_F rechnet eine Periodendauer in Sekunden in die entsprechende Frequenz in Hz um.</text:p>
      <text:list xml:id="list384688811" text:continue-numbering="true" text:style-name="L1">
        <text:list-item>
          <text:list>
            <text:list-item>
              <text:h text:style-name="P216" text:outline-level="2"><text:alphabetical-index-mark-start text:id="IMark225798256"/>SPEED<text:alphabetical-index-mark-end text:id="IMark225798256"/></text:h>
            </text:list-item>
          </text:list>
        </text:list-item>
      </text:list>
      <text:p text:style-name="P2"><text:span text:style-name="T12">Type</text:span><text:tab/><text:span text:style-name="T11">Funktionsbaustein</text:span></text:p>
      <text:p text:style-name="P66"><text:span text:style-name="T15">Input</text:span><text:span text:style-name="T14"><text:tab/>MS : REAL (Meter / Sekunde)</text:span></text:p>
      <text:p text:style-name="P69"><text:tab/>KMH : REAL (Kilometer / Stunde)</text:p>
      <text:p text:style-name="P73"><text:tab/>KN : REAL (Knoten = Seemeilen / Stunde)</text:p>
      <text:p text:style-name="P73"><text:tab/>MH : REAL (Meilen / Stunde)</text:p>
      <text:p text:style-name="P73">Output<text:tab/>YMS : REAL (Meter / Sekunde)</text:p>
      <text:p text:style-name="P173"><text:span text:style-name="T22"><text:tab/></text:span><text:span text:style-name="T22">YKMH</text:span><text:span text:style-name="T14"> : </text:span><text:span text:style-name="T22">REAL</text:span><text:span text:style-name="T14"> (Kilometer / Stunde)</text:span></text:p>
      <text:p text:style-name="P73"><text:tab/>YKN : REAL (Knoten = Seemeilen / Stunde)</text:p>
      <text:p text:style-name="P73"><draw:frame draw:style-name="fr3" draw:name="Grafik296" text:anchor-type="paragraph" svg:x="1.048cm" svg:y="0.679cm" svg:width="2.731cm" svg:height="2.649cm" draw:z-index="275"><draw:image xlink:href="Pictures/10000000000000CE000000C86287EEDC.png" xlink:type="simple" xlink:show="embed" xlink:actuate="onLoad"/></draw:frame><text:tab/>YMH : REAL (Meilen / Stunde)</text:p>
      <text:p text:style-name="P73"><text:line-break/>Der Baustein SPEED konvertiert verschiedene in der Praxis gebräuchliche Einheiten für Geschwindigkeiten. Normalerweise wird nur der zu konvertierende Eingang belegt und die restlichen Eingänge bleiben frei. Werden jedoch mehrere Eingänge gleichzeitig mit Werten beaufschlagt, so werden die Werte aller Eingänge entsprechend umgewandelt und dann aufsummiert.</text:p>
      <text:p text:style-name="P183">1 ms = Meter / Sekunde = 3,6 km/h</text:p>
      <text:p text:style-name="P183"><text:soft-page-break/>1 kmh = Kilometer / Stunde = 1/3,6 m/s</text:p>
      <text:p text:style-name="P183">1 kn = Knoten = 1 Seemeile / Stunde = 0,5144 m/s</text:p>
      <text:p text:style-name="P183">1 mh = Meilen / Stunde = 0,44704 m/s</text:p>
      <text:list xml:id="list38465147" text:continue-numbering="true" text:style-name="L1">
        <text:list-item>
          <text:list>
            <text:list-item>
              <text:h text:style-name="P216" text:outline-level="2"><text:alphabetical-index-mark-start text:id="IMark225798256"/>TEMPERATURE<text:alphabetical-index-mark-end text:id="IMark225798256"/></text:h>
            </text:list-item>
          </text:list>
        </text:list-item>
      </text:list>
      <text:p text:style-name="P2">Type<text:tab/><text:span text:style-name="T12">Funktionsbaustein</text:span></text:p>
      <text:p text:style-name="P66"><text:span text:style-name="T15">Input</text:span><text:span text:style-name="T14"><text:tab/>K : REAL (</text:span><text:span text:style-name="T21">Temperatur nach Kelvin Skala</text:span><text:span text:style-name="T14">)</text:span></text:p>
      <text:p text:style-name="P173"><text:span text:style-name="T14"><text:tab/>C : REAL (</text:span><text:span text:style-name="T21">Temperatur nach Celsius Skala</text:span><text:span text:style-name="T14">)</text:span></text:p>
      <text:p text:style-name="P73"><text:tab/>F : REAL (Temperatur nach Fahrenheit Skala)</text:p>
      <text:p text:style-name="P73"><text:tab/>RE : REAL (Temperatur nach Reaumur Skala)</text:p>
      <text:p text:style-name="P183"><text:tab/>RA : Real (Temperatur nach Rankine Skala)</text:p>
      <text:p text:style-name="P73">Output<text:tab/>YK : REAL (Temperatur nach Kelvin Skala)</text:p>
      <text:p text:style-name="P173"><text:span text:style-name="T14"><text:tab/>YC : REAL (</text:span><text:span text:style-name="T21">Temperatur nach Celsius Skala</text:span><text:span text:style-name="T14">)</text:span></text:p>
      <text:p text:style-name="P73"><text:tab/>YF : REAL (Temperatur nach Fahrenheit Skala)</text:p>
      <text:p text:style-name="P73"><text:tab/>YRE : REAL (Temperatur nach Reaumur Skala)</text:p>
      <text:p text:style-name="P183"><draw:frame draw:style-name="fr3" draw:name="Grafik449" text:anchor-type="paragraph" svg:x="1.155cm" svg:y="0.667cm" svg:width="3.069cm" svg:height="2.709cm" draw:z-index="431"><draw:image xlink:href="Pictures/10000000000000E8000000CD5DF53F39.png" xlink:type="simple" xlink:show="embed" xlink:actuate="onLoad"/></draw:frame><text:tab/>YRA : Real (Temperatur nach Rankine Skala)</text:p>
      <text:p text:style-name="P73"><text:line-break/>Der Baustein TEMP konvertiert verschiedene in der Praxis gebräuchliche Einheiten für Temperatur. Normalerweise wird nur der zu konvertierende Eingang belegt und die restlichen Eingänge bleiben frei. Werden jedoch mehrere Eingänge gleichzeitig mit Werten beaufschlagt, so werden die Werte aller Eingänge entsprechend umgewandelt und dann aufsummiert.</text:p>
      <text:p text:style-name="P183">1 K = 273.15 °C</text:p>
      <text:p text:style-name="P183">1 °C = 273.15 K</text:p>
      <text:p text:style-name="P173"><text:span text:style-name="T21">1 °F = °C *</text:span><text:span text:style-name="T14"> 1.8 + 32</text:span></text:p>
      <text:p text:style-name="P179">1 Re = °C * 0.8</text:p>
      <text:p text:style-name="P179">1 Ra = K * 1.8</text:p>
      <text:list xml:id="list38461375" text:continue-numbering="true" text:style-name="L1">
        <text:list-item>
          <text:h text:style-name="P210" text:outline-level="1">Regelungstechnik</text:h>
          <text:list>
            <text:list-item>
              <text:h text:style-name="P216" text:outline-level="2">Einleitung</text:h>
            </text:list-item>
          </text:list>
        </text:list-item>
      </text:list>
      <text:p text:style-name="P67"><text:span text:style-name="T21">Im Bereich der Regelungstechnik werden Bausteine zum Aufbau von Reglern und Regelstrecken zur Verfügung gestellt. Soweit möglich messen die Bausteine selbst die Zykluszeit und errechnen mit der jeweils aktuellen Zykluszeit die Ausgangsveränderung. Dieses Verfahren hat gegenüber einer fest eingestellten Zykluszeit den Vorteil das Regelstrecken verschiedenster Geschwindigkeit innerhalb derselben Task verarbeitet werden können. Ein weiterer Vorteil ist die Tatsache das bei niedrig priorisierten </text:span><text:span text:style-name="T16">Tasks</text:span><text:span text:style-name="T21"> die Zykluszeit schwanken kann und ein Regler mit fixer Zykluszeit ungenaue Ausgangswerte erzeugt. Der Anwender hat beim Einsatz sicherzustellen das die Zykluszeit der Task entsprechend den Anforderungen der Regelstrecke eingestellt ist.</text:span></text:p>
      <text:p text:style-name="P185">Übersicht über die Regelkreiselemente:</text:p>
      <table:table table:name="Tabelle35" table:style-name="Tabelle35">
        <table:table-column table:style-name="Tabelle35.A"/>
        <table:table-column table:style-name="Tabelle35.B"/>
        <table:table-column table:style-name="Tabelle35.C"/>
        <table:table-column table:style-name="Tabelle35.D"/>
        <table:table-column table:style-name="Tabelle35.E"/>
        <table:table-row>
          <table:table-cell table:style-name="Tabelle35.A1" office:value-type="string">
            <text:p text:style-name="P136">TYP</text:p>
          </table:table-cell>
          <table:table-cell table:style-name="Tabelle35.A1" office:value-type="string">
            <text:p text:style-name="P136">Name</text:p>
          </table:table-cell>
          <table:table-cell table:style-name="Tabelle35.A1" office:value-type="string">
            <text:p text:style-name="P136">Parameter</text:p>
          </table:table-cell>
          <table:table-cell table:style-name="Tabelle35.A1" office:value-type="string">
            <text:p text:style-name="P136">Übertragungsfunktion</text:p>
          </table:table-cell>
          <table:table-cell table:style-name="Tabelle35.E1" office:value-type="string">
            <text:p text:style-name="P136">Berechnung</text:p>
          </table:table-cell>
        </table:table-row>
        <table:table-row>
          <table:table-cell table:style-name="Tabelle35.A2" office:value-type="string">
            <text:p text:style-name="P136">P</text:p>
          </table:table-cell>
          <table:table-cell table:style-name="Tabelle35.A2" office:value-type="string">
            <text:p text:style-name="P136">Proportionalglied</text:p>
          </table:table-cell>
          <table:table-cell table:style-name="Tabelle35.A2" office:value-type="string">
            <text:p text:style-name="P136">KP</text:p>
          </table:table-cell>
          <table:table-cell table:style-name="Tabelle35.A2" office:value-type="string">
            <text:p text:style-name="P136">KP</text:p>
          </table:table-cell>
          <table:table-cell table:style-name="Tabelle35.E2" office:value-type="string">
            <text:p text:style-name="P136">Y = X * KP</text:p>
          </table:table-cell>
        </table:table-row>
        <table:table-row>
          <table:table-cell table:style-name="Tabelle35.A2" office:value-type="string">
            <text:p text:style-name="P136">I</text:p>
          </table:table-cell>
          <table:table-cell table:style-name="Tabelle35.A2" office:value-type="string">
            <text:p text:style-name="P136">Integrator</text:p>
          </table:table-cell>
          <table:table-cell table:style-name="Tabelle35.A2" office:value-type="string">
            <text:p text:style-name="P136">KI</text:p>
          </table:table-cell>
          <table:table-cell table:style-name="Tabelle35.A2" office:value-type="string">
            <text:p text:style-name="P136"/>
          </table:table-cell>
          <table:table-cell table:style-name="Tabelle35.E2" office:value-type="string">
            <text:p text:style-name="P136">Y = Ya + X * KI * <text:s/>ΔT</text:p>
          </table:table-cell>
        </table:table-row>
        <table:table-row>
          <table:table-cell table:style-name="Tabelle35.A2" office:value-type="string">
            <text:p text:style-name="P136">D</text:p>
          </table:table-cell>
          <table:table-cell table:style-name="Tabelle35.A2" office:value-type="string">
            <text:p text:style-name="P136">Differentiator</text:p>
          </table:table-cell>
          <table:table-cell table:style-name="Tabelle35.A2" office:value-type="string">
            <text:p text:style-name="P136">KD</text:p>
          </table:table-cell>
          <table:table-cell table:style-name="Tabelle35.A2" office:value-type="string">
            <text:p text:style-name="P136"/>
          </table:table-cell>
          <table:table-cell table:style-name="Tabelle35.E2" office:value-type="string">
            <text:p text:style-name="P136">Y = KD * ΔX / ΔT</text:p>
          </table:table-cell>
        </table:table-row>
        <table:table-row>
          <table:table-cell table:style-name="Tabelle35.A2" office:value-type="string">
            <text:p text:style-name="P136">PT1</text:p>
          </table:table-cell>
          <table:table-cell table:style-name="Tabelle35.A2" office:value-type="string">
            <text:p text:style-name="P136">Tiefpaß 1.Ordnung</text:p>
          </table:table-cell>
          <table:table-cell table:style-name="Tabelle35.A2" office:value-type="string">
            <text:p text:style-name="P136">T1</text:p>
          </table:table-cell>
          <table:table-cell table:style-name="Tabelle35.A2" office:value-type="string">
            <text:p text:style-name="P136">KP / ( 1 + T1s)</text:p>
          </table:table-cell>
          <table:table-cell table:style-name="Tabelle35.E2" office:value-type="string">
            <text:p text:style-name="P136"/>
          </table:table-cell>
        </table:table-row>
        <table:table-row>
          <table:table-cell table:style-name="Tabelle35.A2" office:value-type="string">
            <text:p text:style-name="P136">PT2</text:p>
          </table:table-cell>
          <table:table-cell table:style-name="Tabelle35.A2" office:value-type="string">
            <text:p text:style-name="P136">Tiefpaß 2.Ordnung</text:p>
          </table:table-cell>
          <table:table-cell table:style-name="Tabelle35.A2" office:value-type="string">
            <text:p text:style-name="P136">T1, T2</text:p>
          </table:table-cell>
          <table:table-cell table:style-name="Tabelle35.A2" office:value-type="string">
            <text:p text:style-name="P136"/>
          </table:table-cell>
          <table:table-cell table:style-name="Tabelle35.E2" office:value-type="string">
            <text:p text:style-name="P136"/>
          </table:table-cell>
        </table:table-row>
        <table:table-row>
          <table:table-cell table:style-name="Tabelle35.A2" office:value-type="string">
            <text:p text:style-name="P136">PI</text:p>
          </table:table-cell>
          <table:table-cell table:style-name="Tabelle35.A2" office:value-type="string">
            <text:p text:style-name="P136">PI-Glied</text:p>
          </table:table-cell>
          <table:table-cell table:style-name="Tabelle35.A2" office:value-type="string">
            <text:p text:style-name="P136">KP, KI</text:p>
          </table:table-cell>
          <table:table-cell table:style-name="Tabelle35.A2" office:value-type="string">
            <text:p text:style-name="P136">KP (1 + 1/TNs) </text:p>
          </table:table-cell>
          <table:table-cell table:style-name="Tabelle35.E2" office:value-type="string">
            <text:p text:style-name="P136">Y = Ya + KP ((1 + ΔT/TN)X - Xa)</text:p>
          </table:table-cell>
        </table:table-row>
        <table:table-row>
          <table:table-cell table:style-name="Tabelle35.A2" office:value-type="string">
            <text:p text:style-name="P136">PD</text:p>
          </table:table-cell>
          <table:table-cell table:style-name="Tabelle35.A2" office:value-type="string">
            <text:p text:style-name="P136">PD-Glied</text:p>
          </table:table-cell>
          <table:table-cell table:style-name="Tabelle35.A2" office:value-type="string">
            <text:p text:style-name="P136">KP, KD</text:p>
          </table:table-cell>
          <table:table-cell table:style-name="Tabelle35.A2" office:value-type="string">
            <text:p text:style-name="P136">KP (1 + TDs)</text:p>
          </table:table-cell>
          <table:table-cell table:style-name="Tabelle35.E2" office:value-type="string">
            <text:p text:style-name="P136"/>
          </table:table-cell>
        </table:table-row>
        <table:table-row>
          <table:table-cell table:style-name="Tabelle35.A2" office:value-type="string">
            <text:p text:style-name="P136">PDT1</text:p>
          </table:table-cell>
          <table:table-cell table:style-name="Tabelle35.A2" office:value-type="string">
            <text:p text:style-name="P136">PD-Glied, Verzögert</text:p>
          </table:table-cell>
          <table:table-cell table:style-name="Tabelle35.A2" office:value-type="string">
            <text:p text:style-name="P136">KP, TV, T1</text:p>
          </table:table-cell>
          <table:table-cell table:style-name="Tabelle35.A2" office:value-type="string">
            <text:p text:style-name="P136">KP (1 + TVs/(1+T1s))</text:p>
          </table:table-cell>
          <table:table-cell table:style-name="Tabelle35.E2" office:value-type="string">
            <text:p text:style-name="P136"/>
          </table:table-cell>
        </table:table-row>
        <table:table-row>
          <table:table-cell table:style-name="Tabelle35.A2" office:value-type="string">
            <text:p text:style-name="P136">PID</text:p>
          </table:table-cell>
          <table:table-cell table:style-name="Tabelle35.A2" office:value-type="string">
            <text:p text:style-name="P136">PID-Glied</text:p>
          </table:table-cell>
          <table:table-cell table:style-name="Tabelle35.A2" office:value-type="string">
            <text:p text:style-name="P136">KP, TN, TV</text:p>
          </table:table-cell>
          <table:table-cell table:style-name="Tabelle35.A2" office:value-type="string">
            <text:p text:style-name="P136">KP (1 + 1/TNs + TVs</text:p>
          </table:table-cell>
          <table:table-cell table:style-name="Tabelle35.E2" office:value-type="string">
            <text:p text:style-name="P136"/>
          </table:table-cell>
        </table:table-row>
        <table:table-row>
          <table:table-cell table:style-name="Tabelle35.A2" office:value-type="string">
            <text:p text:style-name="P136">PIDT1</text:p>
          </table:table-cell>
          <table:table-cell table:style-name="Tabelle35.A2" office:value-type="string">
            <text:p text:style-name="P136">PID-Glied, Verzögert</text:p>
          </table:table-cell>
          <table:table-cell table:style-name="Tabelle35.A2" office:value-type="string">
            <text:p text:style-name="P136">KP, TN, TV, T1</text:p>
          </table:table-cell>
          <table:table-cell table:style-name="Tabelle35.A2" office:value-type="string">
            <text:p text:style-name="P136">KP (1 + 1/TNs + TVs/(1+T1s))</text:p>
          </table:table-cell>
          <table:table-cell table:style-name="Tabelle35.E2" office:value-type="string">
            <text:p text:style-name="P136"/>
          </table:table-cell>
        </table:table-row>
      </table:table>
      <text:p text:style-name="P185"/>
      <text:p text:style-name="P172"><text:span text:style-name="T21">Wind-</text:span><text:span text:style-name="T16">Up</text:span><text:span text:style-name="T21">:<text:line-break/>Der Wind-</text:span><text:span text:style-name="T16">Up</text:span><text:span text:style-name="T21"> Effekt betrifft alle Regler mit I-Anteil. Da reale Regler einen eingeschränkten Stellbereich haben würde der </text:span><text:span text:style-name="T16">Integrator</text:span><text:span text:style-name="T21"> bei großen <text:s/>Regelabweichungen und erreichen eines Ausgangslimits stets weiter anwach</text:span><text:span text:style-name="T21">sen. Würde nach einiger Zeit der Prozesswert den Sollwert übersteigen so müss</text:span><text:soft-page-break/><text:span text:style-name="T21">te abgewartet werden bis der </text:span><text:span text:style-name="T16">In</text:span><text:span text:style-name="T16">te</text:span><text:span text:style-name="T16">grator</text:span><text:span text:style-name="T21"> seinen hohen Wert wieder abgebaut hat. Dies führt zu einem unerwünschten und ungünstigen Verhalten des Reglers. Der Regler würde für die Zeit aussetzen die der </text:span><text:span text:style-name="T16">Integrator</text:span><text:span text:style-name="T21"> benötigt seinen hohen Wert wieder abzubauen, was um so länger wäre je länger der Regler in der Begrenzung war. Deshalb sind bei Reglern mit I-Anteil Anti </text:span><text:span text:style-name="T16">Wind-Up</text:span><text:span text:style-name="T21"> Maßnahmen notwendig.</text:span></text:p>
      <text:p text:style-name="P172"><text:span text:style-name="T21">Die einfachste Maßnahme zur Verhinderung des Wind-</text:span><text:span text:style-name="T16">Up</text:span><text:span text:style-name="T21"> ist den Integrator bei erreichen eines </text:span><text:span text:style-name="T16">Limits</text:span><text:span text:style-name="T21"> anzuhalten und erst bei Rückkehr in den Arbeitsbereich mit dem letzten Wert des </text:span><text:span text:style-name="T16">Integrators</text:span><text:span text:style-name="T21"> weiterzuarbeiten. Dieses Verfahren hat allerdings den Nachteil das Veränderungen der Regelabweichung während der Ausgang an einem Limit ansteht weiterhin zu unnötig erhöhten Werten des Integrators führen können. Bausteine der Bibliothek die mit diesem Verfahren arbeiten sind mit einen W am Ende gekennzeichnet. </text:span></text:p>
      <text:p text:style-name="P172"><text:span text:style-name="T21">Eine verfeinerte Anti </text:span><text:span text:style-name="T16">Wind-Up</text:span><text:span text:style-name="T21"> Maßnahme ist ein Verfahren das den Ausgangswert des Integrators auf einen Wert begrenzt der zusammen mit den anderen Regelanteilen exakt zu dem Ausgangslimit führt. Dieses Verfahren hat den Vorteil das bei eintritt in den Arbeitsbereich der Regler ohne Zeitverzug sofort Einsatzfähig ist und reagieren kann. Bausteine der Bibliothek die mit diesem verbesserten Verfahren arbeiten sind mit einen WL am Ende gekennzeichnet.</text:span></text:p>
      <text:list xml:id="list38449026" text:continue-numbering="true" text:style-name="L1">
        <text:list-item>
          <text:list>
            <text:list-item>
              <text:h text:style-name="P216" text:outline-level="2"><text:alphabetical-index-mark-start text:id="IMark225798256"/>BAND_B<text:alphabetical-index-mark-end text:id="IMark225798256"/></text:h>
            </text:list-item>
          </text:list>
        </text:list-item>
      </text:list>
      <text:p text:style-name="P69">Type<text:tab/>Funktion : BYTE</text:p>
      <text:p text:style-name="P66"><text:span text:style-name="T15">Input</text:span><text:span text:style-name="T14"><text:tab/>X : BYTE (Eingangswert)</text:span></text:p>
      <text:p text:style-name="P69"><text:tab/>B : BYTE (Begrenzungsbereich)</text:p>
      <text:p text:style-name="P69"><draw:frame draw:style-name="fr3" draw:name="Grafik748" text:anchor-type="paragraph" svg:x="1.025cm" svg:y="0.697cm" svg:width="3.29cm" svg:height="1.39cm" draw:z-index="799"><draw:image xlink:href="Pictures/10000000000000F900000069C812BC35.png" xlink:type="simple" xlink:show="embed" xlink:actuate="onLoad"/></draw:frame><draw:frame draw:style-name="fr16" draw:name="Grafik749" text:anchor-type="paragraph" svg:x="10.042cm" svg:y="0.436cm" svg:width="6.8cm" svg:height="5.8cm" draw:z-index="800"><draw:image xlink:href="Pictures/10000000000002DE00000272E5B6659F.png" xlink:type="simple" xlink:show="embed" xlink:actuate="onLoad"/></draw:frame>Output<text:tab/>BYTE<text:span text:style-name="T10"> (Ausgangswert)</text:span></text:p>
      <text:p text:style-name="P183"><text:line-break/>BAND_B blendet von Eingangsbereich 0..255 die Bereiche 0..B und 255-B..255 aus, in diesen Bereichen wird der Ausgang 0 beziehungsweise 255.</text:p>
      <text:p text:style-name="P183"/>
      <text:p text:style-name="P183"/>
      <text:list xml:id="list38451944" text:continue-numbering="true" text:style-name="L1">
        <text:list-item>
          <text:list>
            <text:list-item>
              <text:h text:style-name="P216" text:outline-level="2"><text:soft-page-break/><text:alphabetical-index-mark-start text:id="IMark211656492"/>CONTROL_SET1<text:alphabetical-index-mark-end text:id="IMark211656492"/></text:h>
            </text:list-item>
          </text:list>
        </text:list-item>
      </text:list>
      <text:p text:style-name="P154">Type<text:span text:style-name="T14"><text:tab/></text:span>Funktionsbaustein</text:p>
      <text:p text:style-name="P66"><text:span text:style-name="T15">Input</text:span><text:span text:style-name="T14"><text:tab/>KT : REAL (Kritische Verstärkung)</text:span></text:p>
      <text:p text:style-name="P66"><text:span text:style-name="T14"><text:tab/>TT : REAL (</text:span>Periodendauer<text:span text:style-name="T15"> </text:span>der<text:span text:style-name="T15"> </text:span>kritischen<text:span text:style-name="T15"> </text:span>Schwingung<text:span text:style-name="T14">)</text:span></text:p>
      <text:p text:style-name="P179"><text:tab/>PI : BOOL (TRUE wenn Parameter für PI Regler bestimmt sind)</text:p>
      <text:p text:style-name="P179"><text:tab/>PID : BOOL (TRUE wenn Parameter für PID Regler bestimmt sind)</text:p>
      <text:p text:style-name="P173"><text:span text:style-name="T15">Config</text:span><text:span text:style-name="T14"><text:tab/>P_K : REAL := 0.5 (Vorgabewert KP für P Regler)</text:span></text:p>
      <text:p text:style-name="P179"><text:tab/>PI_K : REAL := 0.45 ( Vorgabewert KP für PI Regler</text:p>
      <text:p text:style-name="P179"><text:tab/>PI_TN : REAL := 0.83 (Vorgabewert TN für PI Regler)</text:p>
      <text:p text:style-name="P179"><text:tab/>PID_K : REAL := 0.6 (Vorgabewert KP für PID Regler)</text:p>
      <text:p text:style-name="P179"><text:tab/>PID_TN : REAL := 0.5 (Vorgabewert TN für PID Regler)</text:p>
      <text:p text:style-name="P179"><text:tab/>PID_TV : REAL := 0.125 (Vorgabewert TV für PID Regler)</text:p>
      <text:p text:style-name="P66"><text:span text:style-name="T14">Output<text:tab/>KP : </text:span><text:span text:style-name="T21">REAL (Regelverstärkung KP)</text:span></text:p>
      <text:p text:style-name="P183"><text:tab/>TN : REAL (Nachstellzeit des Integrators)</text:p>
      <text:p text:style-name="P183"><text:tab/>TV : REAL (Vorhaltezeit des Differenzierers)</text:p>
      <text:p text:style-name="P173"><text:span text:style-name="T21"><text:tab/>KI : REAL ( </text:span><text:span text:style-name="T19">Verstärkungsfaktor</text:span><text:span text:style-name="T21"> des Integrators)</text:span></text:p>
      <text:p text:style-name="P173"><draw:frame draw:style-name="fr3" draw:name="Grafik382" text:anchor-type="paragraph" svg:x="1.245cm" svg:y="0.623cm" svg:width="3.29cm" svg:height="2.709cm" draw:z-index="357"><draw:image xlink:href="Pictures/10000000000000F9000000CDD2E30EEF.png" xlink:type="simple" xlink:show="embed" xlink:actuate="onLoad"/></draw:frame><text:span text:style-name="T21"><text:tab/>KD : REAL (</text:span><text:span text:style-name="T19">Verstärkungsfaktor</text:span><text:span text:style-name="T21"> des </text:span><text:span text:style-name="T19">Differenzierers</text:span><text:span text:style-name="T21">)</text:span></text:p>
      <text:p text:style-name="P173"><text:span text:style-name="T21"><text:line-break/>CONTROL_SET1 berechnet Einstellparameter für P, PI und PID Controller nach den Ziegler-Nichols Verfahren. Hierbei wird die kritische Verstärkung KT, und die Periodendauer der kritischen Schwingung TT angegeben. Die Parameter werden ermittelt indem der Regler als reiner P-Regler <text:s/>betrieben wird und die Verstärkung solange hochgefahren wird bis eine Dauerschwingung konstanter Amplitude einsetzt. Die ent</text:span><text:span text:style-name="T21">sprechenden Werte KT und TT werden dann ermittelt. Nachteil dieses Verfahrens ist das nicht jeder reale Regelkreis an die Stabilitätsgrenze gefahren werden kann, und <text:s/>das diese verfahren für langsame Regelkreise wie Raumregelungen sehr viel Zeit in Anspruch nimmt.</text:span></text:p>
      <table:table table:name="Tabelle25" table:style-name="Tabelle25">
        <table:table-column table:style-name="Tabelle25.A"/>
        <table:table-column table:style-name="Tabelle25.B"/>
        <table:table-column table:style-name="Tabelle25.C"/>
        <table:table-column table:style-name="Tabelle25.D"/>
        <table:table-column table:style-name="Tabelle25.E"/>
        <table:table-column table:style-name="Tabelle25.F"/>
        <table:table-row>
          <table:table-cell table:style-name="Tabelle25.A1" office:value-type="string">
            <text:p text:style-name="P108">Reglertyp</text:p>
          </table:table-cell>
          <table:table-cell table:style-name="Tabelle25.A1" office:value-type="string">
            <text:p text:style-name="P112">PI</text:p>
          </table:table-cell>
          <table:table-cell table:style-name="Tabelle25.A1" office:value-type="string">
            <text:p text:style-name="P112">PID</text:p>
          </table:table-cell>
          <table:table-cell table:style-name="Tabelle25.A1" office:value-type="string">
            <text:p text:style-name="P112">KP</text:p>
          </table:table-cell>
          <table:table-cell table:style-name="Tabelle25.A1" office:value-type="string">
            <text:p text:style-name="P112">TN</text:p>
          </table:table-cell>
          <table:table-cell table:style-name="Tabelle25.F1" office:value-type="string">
            <text:p text:style-name="P112">TV</text:p>
          </table:table-cell>
        </table:table-row>
        <table:table-row>
          <table:table-cell table:style-name="Tabelle25.A2" office:value-type="string">
            <text:p text:style-name="P112">P-<text:span text:style-name="T7">Regler</text:span></text:p>
          </table:table-cell>
          <table:table-cell table:style-name="Tabelle25.A2" office:value-type="string">
            <text:p text:style-name="P112">0</text:p>
          </table:table-cell>
          <table:table-cell table:style-name="Tabelle25.A2" office:value-type="string">
            <text:p text:style-name="P112">0</text:p>
          </table:table-cell>
          <table:table-cell table:style-name="Tabelle25.A2" office:value-type="string">
            <text:p text:style-name="P112">P_K * KT</text:p>
          </table:table-cell>
          <table:table-cell table:style-name="Tabelle25.A2" office:value-type="string">
            <text:p text:style-name="P112"/>
          </table:table-cell>
          <table:table-cell table:style-name="Tabelle25.F2" office:value-type="string">
            <text:p text:style-name="P112"/>
          </table:table-cell>
        </table:table-row>
        <table:table-row>
          <table:table-cell table:style-name="Tabelle25.A2" office:value-type="string">
            <text:p text:style-name="P112">PI-<text:span text:style-name="T7">Regler</text:span></text:p>
          </table:table-cell>
          <table:table-cell table:style-name="Tabelle25.A2" office:value-type="string">
            <text:p text:style-name="P112">1</text:p>
          </table:table-cell>
          <table:table-cell table:style-name="Tabelle25.A2" office:value-type="string">
            <text:p text:style-name="P112">0</text:p>
          </table:table-cell>
          <table:table-cell table:style-name="Tabelle25.A2" office:value-type="string">
            <text:p text:style-name="P112">PI_K * KT</text:p>
          </table:table-cell>
          <table:table-cell table:style-name="Tabelle25.A2" office:value-type="string">
            <text:p text:style-name="P112">PI_TN * TT</text:p>
          </table:table-cell>
          <table:table-cell table:style-name="Tabelle25.F2" office:value-type="string">
            <text:p text:style-name="P112"/>
          </table:table-cell>
        </table:table-row>
        <text:soft-page-break/>
        <table:table-row>
          <table:table-cell table:style-name="Tabelle25.A2" office:value-type="string">
            <text:p text:style-name="P112">PID-<text:span text:style-name="T7">Regler</text:span></text:p>
          </table:table-cell>
          <table:table-cell table:style-name="Tabelle25.A2" office:value-type="string">
            <text:p text:style-name="P112">0</text:p>
          </table:table-cell>
          <table:table-cell table:style-name="Tabelle25.A2" office:value-type="string">
            <text:p text:style-name="P112">1</text:p>
          </table:table-cell>
          <table:table-cell table:style-name="Tabelle25.A2" office:value-type="string">
            <text:p text:style-name="P112">PID_K * KT</text:p>
          </table:table-cell>
          <table:table-cell table:style-name="Tabelle25.A2" office:value-type="string">
            <text:p text:style-name="P112">PID_TN * TT</text:p>
          </table:table-cell>
          <table:table-cell table:style-name="Tabelle25.F2" office:value-type="string">
            <text:p text:style-name="P112">PID_TV * TT</text:p>
          </table:table-cell>
        </table:table-row>
      </table:table>
      <text:p text:style-name="P184"/>
      <text:p text:style-name="P184">Die Vorgabewerte der Einstellregeln sind in Config Variablen definiert und können vom Anwender verändert werden. Die folgende Tabelle zeigt die Default Werte</text:p>
      <table:table table:name="Tabelle26" table:style-name="Tabelle26">
        <table:table-column table:style-name="Tabelle26.A"/>
        <table:table-column table:style-name="Tabelle26.B"/>
        <table:table-column table:style-name="Tabelle26.C"/>
        <table:table-column table:style-name="Tabelle26.D"/>
        <table:table-column table:style-name="Tabelle26.E"/>
        <table:table-column table:style-name="Tabelle26.F"/>
        <table:table-row>
          <table:table-cell table:style-name="Tabelle26.A1" office:value-type="string">
            <text:p text:style-name="P108">Reglertyp</text:p>
          </table:table-cell>
          <table:table-cell table:style-name="Tabelle26.A1" office:value-type="string">
            <text:p text:style-name="P112">PI</text:p>
          </table:table-cell>
          <table:table-cell table:style-name="Tabelle26.A1" office:value-type="string">
            <text:p text:style-name="P112">PID</text:p>
          </table:table-cell>
          <table:table-cell table:style-name="Tabelle26.A1" office:value-type="string">
            <text:p text:style-name="P112">KP</text:p>
          </table:table-cell>
          <table:table-cell table:style-name="Tabelle26.A1" office:value-type="string">
            <text:p text:style-name="P112">TN</text:p>
          </table:table-cell>
          <table:table-cell table:style-name="Tabelle26.F1" office:value-type="string">
            <text:p text:style-name="P112">TV</text:p>
          </table:table-cell>
        </table:table-row>
        <table:table-row>
          <table:table-cell table:style-name="Tabelle26.A2" office:value-type="string">
            <text:p text:style-name="P112">P-<text:span text:style-name="T7">Regler</text:span></text:p>
          </table:table-cell>
          <table:table-cell table:style-name="Tabelle26.A2" office:value-type="string">
            <text:p text:style-name="P112">0</text:p>
          </table:table-cell>
          <table:table-cell table:style-name="Tabelle26.A2" office:value-type="string">
            <text:p text:style-name="P112">0</text:p>
          </table:table-cell>
          <table:table-cell table:style-name="Tabelle26.A2" office:value-type="string">
            <text:p text:style-name="P112">P_K = 0.5</text:p>
          </table:table-cell>
          <table:table-cell table:style-name="Tabelle26.A2" office:value-type="string">
            <text:p text:style-name="P112"/>
          </table:table-cell>
          <table:table-cell table:style-name="Tabelle26.F2" office:value-type="string">
            <text:p text:style-name="P112"/>
          </table:table-cell>
        </table:table-row>
        <table:table-row>
          <table:table-cell table:style-name="Tabelle26.A2" office:value-type="string">
            <text:p text:style-name="P112">PI-<text:span text:style-name="T7">Regler</text:span></text:p>
          </table:table-cell>
          <table:table-cell table:style-name="Tabelle26.A2" office:value-type="string">
            <text:p text:style-name="P112">1</text:p>
          </table:table-cell>
          <table:table-cell table:style-name="Tabelle26.A2" office:value-type="string">
            <text:p text:style-name="P112">0</text:p>
          </table:table-cell>
          <table:table-cell table:style-name="Tabelle26.A2" office:value-type="string">
            <text:p text:style-name="P112">PI_K = 0.45</text:p>
          </table:table-cell>
          <table:table-cell table:style-name="Tabelle26.A2" office:value-type="string">
            <text:p text:style-name="P112">PI_TN = 0.83</text:p>
          </table:table-cell>
          <table:table-cell table:style-name="Tabelle26.F2" office:value-type="string">
            <text:p text:style-name="P112"/>
          </table:table-cell>
        </table:table-row>
        <table:table-row>
          <table:table-cell table:style-name="Tabelle26.A2" office:value-type="string">
            <text:p text:style-name="P112">PID-<text:span text:style-name="T7">Regler</text:span></text:p>
          </table:table-cell>
          <table:table-cell table:style-name="Tabelle26.A2" office:value-type="string">
            <text:p text:style-name="P112">0</text:p>
          </table:table-cell>
          <table:table-cell table:style-name="Tabelle26.A2" office:value-type="string">
            <text:p text:style-name="P112">1</text:p>
          </table:table-cell>
          <table:table-cell table:style-name="Tabelle26.A2" office:value-type="string">
            <text:p text:style-name="P112">PID_K = 0.6</text:p>
          </table:table-cell>
          <table:table-cell table:style-name="Tabelle26.A2" office:value-type="string">
            <text:p text:style-name="P112">PID_TN = 0.5</text:p>
          </table:table-cell>
          <table:table-cell table:style-name="Tabelle26.F2" office:value-type="string">
            <text:p text:style-name="P112">PID_TV = 0.125</text:p>
          </table:table-cell>
        </table:table-row>
      </table:table>
      <text:p text:style-name="P4"/>
      <text:list xml:id="list38451806" text:continue-numbering="true" text:style-name="L1">
        <text:list-item>
          <text:list>
            <text:list-item>
              <text:h text:style-name="P216" text:outline-level="2"><text:alphabetical-index-mark-start text:id="IMark211656492"/>CONTROL_SET2<text:alphabetical-index-mark-end text:id="IMark211656492"/></text:h>
            </text:list-item>
          </text:list>
        </text:list-item>
      </text:list>
      <text:p text:style-name="P2">Type<text:tab/><text:span text:style-name="T12">Funktionsbaustein</text:span></text:p>
      <text:p text:style-name="P66"><text:span text:style-name="T15">Input</text:span><text:span text:style-name="T14"><text:tab/>KT : REAL (Kritische Verstärkung)</text:span></text:p>
      <text:p text:style-name="P66"><text:span text:style-name="T14"><text:tab/>TT : REAL (</text:span>Periodendauer<text:span text:style-name="T15"> </text:span>der<text:span text:style-name="T15"> </text:span>kritischen<text:span text:style-name="T15"> </text:span>Schwingung<text:span text:style-name="T14">)</text:span></text:p>
      <text:p text:style-name="P179"><text:tab/>PI : BOOL (TRUE wenn Parameter für PI Regler bestimmt sind)</text:p>
      <text:p text:style-name="P179"><text:tab/>PID : BOOL (TRUE wenn Parameter für PID Regler bestimmt sind)</text:p>
      <text:p text:style-name="P179">Config<text:tab/>P_K : REAL := 0.5 (Vorgabewert KP für P Regler)</text:p>
      <text:p text:style-name="P179"><text:tab/>PI_K : REAL := 0.45 ( Vorgabewert KP für PI Regler</text:p>
      <text:p text:style-name="P179"><text:tab/>PI_TN : REAL := 0.83 (Vorgabewert TN für PI Regler)</text:p>
      <text:p text:style-name="P179"><text:tab/>PID_K : REAL := 0.6 (Vorgabewert KP für PID Regler)</text:p>
      <text:p text:style-name="P179"><text:tab/>PID_TN : REAL := 0.5 (Vorgabewert TN für PID Regler)</text:p>
      <text:p text:style-name="P179"><text:tab/>PID_TV : REAL := 0.125 (Vorgabewert TV für PID Regler)</text:p>
      <text:p text:style-name="P66"><text:span text:style-name="T14">Output<text:tab/>KP : </text:span><text:span text:style-name="T21">REAL (Regelverstärkung KP)</text:span></text:p>
      <text:p text:style-name="P183"><text:tab/>TN : REAL (Nachstellzeit des Integrators)</text:p>
      <text:p text:style-name="P183"><text:tab/>TV : REAL (Vorhaltezeit des Differenzierers)</text:p>
      <text:p text:style-name="P173"><text:span text:style-name="T21"><text:tab/>KI : REAL ( </text:span><text:span text:style-name="T19">Verstärkungsfaktor</text:span><text:span text:style-name="T21"> des Integrators)</text:span></text:p>
      <text:p text:style-name="P173"><draw:frame draw:style-name="fr3" draw:name="Grafik383" text:anchor-type="paragraph" svg:x="1.111cm" svg:y="0.667cm" svg:width="3.29cm" svg:height="2.709cm" draw:z-index="358"><draw:image xlink:href="Pictures/10000000000000F9000000CD83EBEDA9.png" xlink:type="simple" xlink:show="embed" xlink:actuate="onLoad"/></draw:frame><text:span text:style-name="T21"><text:tab/>KD : REAL (</text:span><text:span text:style-name="T19">Verstärkungsfaktor</text:span><text:span text:style-name="T21"> des </text:span><text:span text:style-name="T19">Differenzierers</text:span><text:span text:style-name="T21">)</text:span></text:p>
      <text:p text:style-name="P73"><draw:frame draw:style-name="fr3" draw:name="Grafik384" text:anchor-type="paragraph" svg:x="1.75cm" svg:y="1.175cm" svg:width="5.609cm" svg:height="3.69cm" draw:z-index="359"><draw:image xlink:href="Pictures/10000000000001D700000136CDB24F69.png" xlink:type="simple" xlink:show="embed" xlink:actuate="onLoad"/></draw:frame><text:soft-page-break/><text:line-break/>CONTROL_SET2 berechnet Einstellparameter für P, PI und PID Controller nach den Ziegler-Nichols Verfahren. Hierbei wird die Verzugszeit TU und die Ausgleichszeit TG angegeben. Die Parameter werden ermittelt indem die Sprungantwort der Regelstrecke gemessen wird. TU entspricht der Zeit nach der der Ausgang der Regelstrecke 5% seines Maximalwertes erreicht hat. TG ist die Zeit die Zeit der Wendetangente der Regelstrecke. KS ist Istwertänderung der Regelstrecke / Stellgrößenveränderung.</text:p>
      <text:p text:style-name="P183">Die folgende Grafik zeigt die Ermittlung von TU und TG mit dem Wendetangentenverfahren:</text:p>
      <text:p text:style-name="P40"/>
      <table:table table:name="Tabelle23" table:style-name="Tabelle23">
        <table:table-column table:style-name="Tabelle23.A"/>
        <table:table-column table:style-name="Tabelle23.B"/>
        <table:table-column table:style-name="Tabelle23.C"/>
        <table:table-column table:style-name="Tabelle23.D"/>
        <table:table-column table:style-name="Tabelle23.E"/>
        <table:table-column table:style-name="Tabelle23.F"/>
        <table:table-row>
          <table:table-cell table:style-name="Tabelle23.A1" office:value-type="string">
            <text:p text:style-name="P108">Reglertyp</text:p>
          </table:table-cell>
          <table:table-cell table:style-name="Tabelle23.A1" office:value-type="string">
            <text:p text:style-name="P112">PI</text:p>
          </table:table-cell>
          <table:table-cell table:style-name="Tabelle23.A1" office:value-type="string">
            <text:p text:style-name="P112">PID</text:p>
          </table:table-cell>
          <table:table-cell table:style-name="Tabelle23.A1" office:value-type="string">
            <text:p text:style-name="P112">KP</text:p>
          </table:table-cell>
          <table:table-cell table:style-name="Tabelle23.A1" office:value-type="string">
            <text:p text:style-name="P112">TN</text:p>
          </table:table-cell>
          <table:table-cell table:style-name="Tabelle23.F1" office:value-type="string">
            <text:p text:style-name="P112">TV</text:p>
          </table:table-cell>
        </table:table-row>
        <table:table-row>
          <table:table-cell table:style-name="Tabelle23.A2" office:value-type="string">
            <text:p text:style-name="P112">P-<text:span text:style-name="T7">Regler</text:span></text:p>
          </table:table-cell>
          <table:table-cell table:style-name="Tabelle23.A2" office:value-type="string">
            <text:p text:style-name="P112">0</text:p>
          </table:table-cell>
          <table:table-cell table:style-name="Tabelle23.A2" office:value-type="string">
            <text:p text:style-name="P112">0</text:p>
          </table:table-cell>
          <table:table-cell table:style-name="Tabelle23.A2" office:value-type="string">
            <text:p text:style-name="P112">P_K * TG / TU / KS</text:p>
          </table:table-cell>
          <table:table-cell table:style-name="Tabelle23.A2" office:value-type="string">
            <text:p text:style-name="P112"/>
          </table:table-cell>
          <table:table-cell table:style-name="Tabelle23.F2" office:value-type="string">
            <text:p text:style-name="P112"/>
          </table:table-cell>
        </table:table-row>
        <table:table-row>
          <table:table-cell table:style-name="Tabelle23.A2" office:value-type="string">
            <text:p text:style-name="P112">PI-<text:span text:style-name="T7">Regler</text:span></text:p>
          </table:table-cell>
          <table:table-cell table:style-name="Tabelle23.A2" office:value-type="string">
            <text:p text:style-name="P112">1</text:p>
          </table:table-cell>
          <table:table-cell table:style-name="Tabelle23.A2" office:value-type="string">
            <text:p text:style-name="P112">0</text:p>
          </table:table-cell>
          <table:table-cell table:style-name="Tabelle23.A2" office:value-type="string">
            <text:p text:style-name="P112">PI_K * TG / TU / KS</text:p>
          </table:table-cell>
          <table:table-cell table:style-name="Tabelle23.A2" office:value-type="string">
            <text:p text:style-name="P112">PI_TN * TU</text:p>
          </table:table-cell>
          <table:table-cell table:style-name="Tabelle23.F2" office:value-type="string">
            <text:p text:style-name="P112"/>
          </table:table-cell>
        </table:table-row>
        <table:table-row>
          <table:table-cell table:style-name="Tabelle23.A2" office:value-type="string">
            <text:p text:style-name="P112">PID-<text:span text:style-name="T7">Regler</text:span></text:p>
          </table:table-cell>
          <table:table-cell table:style-name="Tabelle23.A2" office:value-type="string">
            <text:p text:style-name="P112">0</text:p>
          </table:table-cell>
          <table:table-cell table:style-name="Tabelle23.A2" office:value-type="string">
            <text:p text:style-name="P112">1</text:p>
          </table:table-cell>
          <table:table-cell table:style-name="Tabelle23.A2" office:value-type="string">
            <text:p text:style-name="P112">PID_K * TG / TU / KS</text:p>
          </table:table-cell>
          <table:table-cell table:style-name="Tabelle23.A2" office:value-type="string">
            <text:p text:style-name="P112">PID_TN * TU</text:p>
          </table:table-cell>
          <table:table-cell table:style-name="Tabelle23.F2" office:value-type="string">
            <text:p text:style-name="P112">PID_TV * TU</text:p>
          </table:table-cell>
        </table:table-row>
      </table:table>
      <text:p text:style-name="P184"/>
      <text:p text:style-name="P174"><text:span text:style-name="T21">Die Vorgabewerte der Einstellregeln sind in Config Variablen definiert und können vom Anwender verändert werden. Die folgende Tabelle zeigt die </text:span><text:span text:style-name="T16">Default</text:span><text:span text:style-name="T21"> Werte:</text:span></text:p>
      <table:table table:name="Tabelle24" table:style-name="Tabelle24">
        <table:table-column table:style-name="Tabelle24.A"/>
        <table:table-column table:style-name="Tabelle24.B"/>
        <table:table-column table:style-name="Tabelle24.C"/>
        <table:table-column table:style-name="Tabelle24.D"/>
        <table:table-column table:style-name="Tabelle24.E"/>
        <table:table-column table:style-name="Tabelle24.F"/>
        <table:table-row>
          <table:table-cell table:style-name="Tabelle24.A1" office:value-type="string">
            <text:p text:style-name="P108">Reglertyp</text:p>
          </table:table-cell>
          <table:table-cell table:style-name="Tabelle24.A1" office:value-type="string">
            <text:p text:style-name="P112">PI</text:p>
          </table:table-cell>
          <table:table-cell table:style-name="Tabelle24.A1" office:value-type="string">
            <text:p text:style-name="P112">PID</text:p>
          </table:table-cell>
          <table:table-cell table:style-name="Tabelle24.A1" office:value-type="string">
            <text:p text:style-name="P112">KP</text:p>
          </table:table-cell>
          <table:table-cell table:style-name="Tabelle24.A1" office:value-type="string">
            <text:p text:style-name="P112">TN</text:p>
          </table:table-cell>
          <table:table-cell table:style-name="Tabelle24.F1" office:value-type="string">
            <text:p text:style-name="P112">TV</text:p>
          </table:table-cell>
        </table:table-row>
        <table:table-row>
          <table:table-cell table:style-name="Tabelle24.A2" office:value-type="string">
            <text:p text:style-name="P112">P-<text:span text:style-name="T7">Regler</text:span></text:p>
          </table:table-cell>
          <table:table-cell table:style-name="Tabelle24.A2" office:value-type="string">
            <text:p text:style-name="P112">0</text:p>
          </table:table-cell>
          <table:table-cell table:style-name="Tabelle24.A2" office:value-type="string">
            <text:p text:style-name="P112">0</text:p>
          </table:table-cell>
          <table:table-cell table:style-name="Tabelle24.A2" office:value-type="string">
            <text:p text:style-name="P112">P_K = 1.0</text:p>
          </table:table-cell>
          <table:table-cell table:style-name="Tabelle24.A2" office:value-type="string">
            <text:p text:style-name="P112"/>
          </table:table-cell>
          <table:table-cell table:style-name="Tabelle24.F2" office:value-type="string">
            <text:p text:style-name="P112"/>
          </table:table-cell>
        </table:table-row>
        <table:table-row>
          <table:table-cell table:style-name="Tabelle24.A2" office:value-type="string">
            <text:p text:style-name="P112">PI-<text:span text:style-name="T7">Regler</text:span></text:p>
          </table:table-cell>
          <table:table-cell table:style-name="Tabelle24.A2" office:value-type="string">
            <text:p text:style-name="P112">1</text:p>
          </table:table-cell>
          <table:table-cell table:style-name="Tabelle24.A2" office:value-type="string">
            <text:p text:style-name="P112">0</text:p>
          </table:table-cell>
          <table:table-cell table:style-name="Tabelle24.A2" office:value-type="string">
            <text:p text:style-name="P112">PI_K = 0.9</text:p>
          </table:table-cell>
          <table:table-cell table:style-name="Tabelle24.A2" office:value-type="string">
            <text:p text:style-name="P112">PI_TN = 3.33</text:p>
          </table:table-cell>
          <table:table-cell table:style-name="Tabelle24.F2" office:value-type="string">
            <text:p text:style-name="P112"/>
          </table:table-cell>
        </table:table-row>
        <table:table-row>
          <table:table-cell table:style-name="Tabelle24.A2" office:value-type="string">
            <text:p text:style-name="P112">PID-<text:span text:style-name="T7">Regler</text:span></text:p>
          </table:table-cell>
          <table:table-cell table:style-name="Tabelle24.A2" office:value-type="string">
            <text:p text:style-name="P112">0</text:p>
          </table:table-cell>
          <table:table-cell table:style-name="Tabelle24.A2" office:value-type="string">
            <text:p text:style-name="P112">1</text:p>
          </table:table-cell>
          <table:table-cell table:style-name="Tabelle24.A2" office:value-type="string">
            <text:p text:style-name="P112">PID_K = 1.2</text:p>
          </table:table-cell>
          <table:table-cell table:style-name="Tabelle24.A2" office:value-type="string">
            <text:p text:style-name="P112">PID_TN = 2</text:p>
          </table:table-cell>
          <table:table-cell table:style-name="Tabelle24.F2" office:value-type="string">
            <text:p text:style-name="P112">PID_TV = 0.5</text:p>
          </table:table-cell>
        </table:table-row>
      </table:table>
      <text:p text:style-name="P183"/>
      <text:list xml:id="list38462517" text:continue-numbering="true" text:style-name="L1">
        <text:list-item>
          <text:list>
            <text:list-item>
              <text:h text:style-name="P216" text:outline-level="2"><text:soft-page-break/><text:alphabetical-index-mark-start text:id="IMark211656492"/>CTRL_IN<text:alphabetical-index-mark-end text:id="IMark211656492"/></text:h>
            </text:list-item>
          </text:list>
        </text:list-item>
      </text:list>
      <text:p text:style-name="P69">Type<text:tab/>Funktion : REAL</text:p>
      <text:p text:style-name="P66"><text:span text:style-name="T15">Input</text:span><text:span text:style-name="T14"><text:tab/>SET_POINT : REAL (Vorgabewert)</text:span></text:p>
      <text:p text:style-name="P69"><text:tab/>ACTUAL : REAL (Prozesswert)</text:p>
      <text:p text:style-name="P179"><text:tab/>NOISE : REAL (Ansprechschwelle)</text:p>
      <text:p text:style-name="P66"><draw:frame draw:style-name="fr3" draw:name="Grafik582" text:anchor-type="paragraph" svg:x="0.981cm" svg:y="0.681cm" svg:width="4.521cm" svg:height="2.02cm" draw:z-index="576"><draw:image xlink:href="Pictures/1000000000000156000000996B8E93AB.png" xlink:type="simple" xlink:show="embed" xlink:actuate="onLoad"/></draw:frame><text:span text:style-name="T14">Output<text:tab/>DIFF</text:span><text:span text:style-name="T21"> (Prozessabweichung)</text:span></text:p>
      <text:p text:style-name="P183"><text:line-break/>CTRL_IN berechnet die Prozessabweichung (SET_POINT _ ACTUAL) und gibt diese am Ausgang aus. Ist die Abweichung kleiner als der Wert am Eingang NOISE bleibt der Ausgang auf 0. CTRL_IN kann benutzt werden um eigene Regelbausteine Aufzubauen.</text:p>
      <text:p text:style-name="P183"><draw:frame draw:style-name="fr3" draw:name="Grafik584" text:anchor-type="paragraph" svg:x="1.044cm" svg:y="0.688cm" svg:width="8.22cm" svg:height="2.09cm" draw:z-index="578"><draw:image xlink:href="Pictures/10000000000001BC000000714BBFF89E.png" xlink:type="simple" xlink:show="embed" xlink:actuate="onLoad"/></draw:frame>Blockschaltbild von CTRL_IN:</text:p>
      <text:p text:style-name="P183"/>
      <text:list xml:id="list38472068" text:continue-numbering="true" text:style-name="L1">
        <text:list-item>
          <text:list>
            <text:list-item>
              <text:h text:style-name="P216" text:outline-level="2"><text:alphabetical-index-mark-start text:id="IMark211656492"/>CTRL_OUT<text:alphabetical-index-mark-end text:id="IMark211656492"/></text:h>
            </text:list-item>
          </text:list>
        </text:list-item>
      </text:list>
      <text:p text:style-name="P69">Type<text:tab/>Funktionsbaustein</text:p>
      <text:p text:style-name="P66"><text:span text:style-name="T15">Input</text:span><text:span text:style-name="T14"><text:tab/>CI : REAL (Eingang vom Controller)</text:span></text:p>
      <text:p text:style-name="P69"><text:tab/>OFFSET : REAL (Ausgangsoffset)</text:p>
      <text:p text:style-name="P179"><text:tab/>MAN_IN : REAL (Manueller Eingangswert)</text:p>
      <text:p text:style-name="P179"><text:tab/>LIM_L : REAL (untere Ausgangsbegrenzung)</text:p>
      <text:p text:style-name="P179"><text:tab/>LIM_H : REAL (obere Ausgangsbegrenzung)</text:p>
      <text:p text:style-name="P179"><text:tab/>MANUAL : BOOL (Umschalter für Handbetrieb)</text:p>
      <text:p text:style-name="P66"><text:span text:style-name="T14">Output<text:tab/>Y : REAL </text:span><text:span text:style-name="T21">(Steuersignal)</text:span></text:p>
      <text:p text:style-name="P183"><draw:frame draw:style-name="fr3" draw:name="Grafik583" text:anchor-type="paragraph" svg:x="1.046cm" svg:y="0.69cm" svg:width="3.62cm" svg:height="3.54cm" draw:z-index="577"><draw:image xlink:href="Pictures/10000000000001120000010C778BB549.png" xlink:type="simple" xlink:show="embed" xlink:actuate="onLoad"/></draw:frame><text:tab/>LIM : BOOL (TRUE wenn Steuersignal ein Limit erreicht)</text:p>
      <text:p text:style-name="P173"><text:soft-page-break/><text:span text:style-name="T21"><text:line-break/>CTRL_OUT addiert zum Eingang CI den Wert von OFFSET und gibt das Ergebnis auf Y aus wenn MANUAL = FALSE. Wenn MANUAL = TRUE wird am </text:span><text:span text:style-name="T21">Ausgang Y Der Eingangswert von MAN_IN + OFFSET ausgegeben. Y wird </text:span><text:span text:style-name="T21">jederzeit auf die durch LIM_L und LIM_H definierten Grenzen begrenzt. Erreicht Y eine der Grenzen, so wird der Ausgang LIM TRUE. CTRL_OUT kann benutzt werden um eigene Regelbausteine Aufzubauen.</text:span></text:p>
      <text:p text:style-name="P183"><draw:frame draw:style-name="fr3" draw:name="Grafik585" text:anchor-type="paragraph" svg:x="1.046cm" svg:y="0.623cm" svg:width="8.301cm" svg:height="5.941cm" draw:z-index="579"><draw:image xlink:href="Pictures/10000000000001C000000141F9C24170.png" xlink:type="simple" xlink:show="embed" xlink:actuate="onLoad"/></draw:frame>Blockschaltbild von CTRL_OUT:</text:p>
      <text:p text:style-name="P173"/>
      <text:list xml:id="list38478298" text:continue-numbering="true" text:style-name="L1">
        <text:list-item>
          <text:list>
            <text:list-item>
              <text:h text:style-name="P216" text:outline-level="2"><text:alphabetical-index-mark-start text:id="IMark211656492"/>CTRL_PI<text:alphabetical-index-mark-end text:id="IMark211656492"/></text:h>
            </text:list-item>
          </text:list>
        </text:list-item>
      </text:list>
      <text:p text:style-name="P69">Type<text:tab/>Funktionsbaustein</text:p>
      <text:p text:style-name="P66"><text:span text:style-name="T15">Input</text:span><text:span text:style-name="T14"><text:tab/>ACT : REAL (gemessener Wert nach der Strecke)</text:span></text:p>
      <text:p text:style-name="P69"><text:tab/>SET : REAL (Vorgabewert)</text:p>
      <text:p text:style-name="P179"><text:tab/>SUP : REAL (Rauschunterdrückung)</text:p>
      <text:p text:style-name="P69"><text:tab/>OFS : REAL (Offset für den Ausgang)</text:p>
      <text:p text:style-name="P69"><text:tab/>M_I : REAL (Eingangswert für manuellen Betrieb)</text:p>
      <text:p text:style-name="P69"><text:tab/>MAN : BOOL (Umschalten auf Handbetrieb, MANUAL = TRUE)</text:p>
      <text:p text:style-name="P179"><text:soft-page-break/><text:tab/>RST : BOOL (Asynchroner Reset-Eingang)</text:p>
      <text:p text:style-name="P69"><text:tab/>KP : REAL (Proportionaler Anteil des Reglers)</text:p>
      <text:p text:style-name="P69"><text:tab/>KI : REAL (Integraler Anteil des Reglers)</text:p>
      <text:p text:style-name="P69"><text:tab/>LL : REAL (untere Ausgangsbegrenzung)</text:p>
      <text:p text:style-name="P69"><text:tab/>LH : REAL (obere Ausgangsbegrenzung)</text:p>
      <text:p text:style-name="P73">Output<text:tab/>Y : REAL (Ausgang des Reglers)</text:p>
      <text:p text:style-name="P183"><text:tab/>DIFF : Real (Regelabweichung)</text:p>
      <text:p text:style-name="P73"><draw:frame draw:style-name="fr3" draw:name="Grafik595" text:anchor-type="paragraph" svg:x="1.222cm" svg:y="0.667cm" svg:width="2.499cm" svg:height="5.091cm" draw:z-index="679"><draw:image xlink:href="Pictures/10000000000000BD00000181C1E0984C.png" xlink:type="simple" xlink:show="embed" xlink:actuate="onLoad"/></draw:frame><text:tab/>LIM : BOOL (TRUE, wenn der Ausgang ein Limit erreicht hat)</text:p>
      <text:p text:style-name="P73"><text:line-break/>CTRL_PI ist ein PI-Regler mit dynamischen Anti Wind-Up und manuellem Steuereingang. Der PI Regler arbeitet nach der Formel:</text:p>
      <text:p text:style-name="P183">Y = KP * DIFF + KI * INTEG(DIFF) + OFFSET</text:p>
      <text:p text:style-name="P73">wobei DIFF = SET_POINT – ACTUAL</text:p>
      <text:p text:style-name="P73">Im Handbetrieb (Manual = TRUE) gilt: Y = MANUAL_IN + OFFSET</text:p>
      <text:p text:style-name="P66"><text:span text:style-name="T21">ACT ist der gemessene Wert nach der Regelstrecke und Set ist die Sollwertvorgabe für den Regler. Die Eingangswerte LH und LL begrenzen den Ausgangswert Y. Mit RST kann der interne Integrator jederzeit auf 0 gesetzt werden. Der Ausgang LIM signalisiert das der Regler an eine der Grenzen LL oder LH gelaufen ist. Der PI-Regler arbeitet frei laufend und benutzt zur Berechnung des Integrators die Trapezregel für höchste Genauigkeit und optimale Geschwindigkeit. Die </text:span><text:span text:style-name="T16">Default</text:span><text:span text:style-name="T21">-Werte der Eingangsparameter sind wie folgt vordefiniert: KP = 1, KI = 1, LIMIT_L = -1000 und LIMIT_H = +1000. Mit dem Eingang SUP wird eine Rauschunterdrückung eingestellt, der Wert am Eingang SUP legt fest ab welcher Regeldifferenz der Regler einschaltet. Mit SUP wird vermieden das der Ausgang des Reglers <text:s/>dauern schwankt. Der Wert am Eingang SUP sollte so bemessen sein das er das Rauschen der Regelstrecke und der Sensoren unterdrückt. Wird zum Beispiel der Eingang SUP auf 0.1 gesetzt so wird der Regler erst bei Regelabweichungen größer als 0.1 aktiv. Der Ausgang DIFF stellt die gemessene und durch ein </text:span><text:span text:style-name="T16">Noise</text:span><text:span text:style-name="T21"> Filter (DEAD_BAND) gefilterte Regelabweichung zur Verfügung. DIFF wird in einer Regelstrecke normalerweise nicht benötigt, kann aber zur Beeinflussung der Regelparameter benutzt wer</text:span><text:span text:style-name="T21">den. Der Eingang OFS wird als letzter </text:span><text:soft-page-break/><text:span text:style-name="T21">Wert zum Ausgang addiert, und dient vor allem zum kompensieren von Störsignalen, deren Wirkung auf den Regelkreis abgeschätzt werden kann.</text:span></text:p>
      <text:p text:style-name="P173"><text:span text:style-name="T21">Der Regler arbeitet mit einem Dynamischen Wind-</text:span><text:span text:style-name="T16">Up </text:span><text:span text:style-name="T19">das verhindert dass der Integrator bei erreichen eines Ausgangslimits und weiterer Regelabweichung unbegrenzt weiter läuft und die Regeleigenschaften negativ beeinflusst. In der Einleitung des Kapitel Regelungstechnik finden sich weitere Details zum Thema Anti Wind-</text:span><text:span text:style-name="T16">Up.</text:span></text:p>
      <text:p text:style-name="P173"><draw:frame draw:style-name="fr3" draw:name="Grafik592" text:anchor-type="paragraph" svg:x="0.974cm" svg:y="0.766cm" svg:width="15.998cm" svg:height="5.833cm" draw:z-index="585"><draw:image xlink:href="Pictures/1000000000000373000001428B0010EA.png" xlink:type="simple" xlink:show="embed" xlink:actuate="onLoad"/></draw:frame><text:span text:style-name="T21">Die folgende Grafik verdeutlicht die interne Struktur des Reglers:</text:span></text:p>
      <text:p text:style-name="P179"/>
      <text:list xml:id="list38449365" text:continue-numbering="true" text:style-name="L1">
        <text:list-item>
          <text:list>
            <text:list-item>
              <text:h text:style-name="P216" text:outline-level="2"><text:alphabetical-index-mark-start text:id="IMark211656492"/>CTRL_PID<text:alphabetical-index-mark-end text:id="IMark211656492"/></text:h>
            </text:list-item>
          </text:list>
        </text:list-item>
      </text:list>
      <text:p text:style-name="P69">Type<text:tab/>Funktionsbaustein</text:p>
      <text:p text:style-name="P66"><text:span text:style-name="T15">Input</text:span><text:span text:style-name="T14"><text:tab/>ACT : REAL (gemessener Wert nach der Strecke)</text:span></text:p>
      <text:p text:style-name="P69"><text:tab/>SET : REAL (Vorgabewert)</text:p>
      <text:p text:style-name="P179"><text:tab/>SUP : REAL (Rauschunterdrückung)</text:p>
      <text:p text:style-name="P69"><text:tab/>OFS : REAL (Offset für den Ausgang)</text:p>
      <text:p text:style-name="P69"><text:tab/>M_I : REAL (Eingangswert für manuellen Betrieb)</text:p>
      <text:p text:style-name="P69"><text:tab/>MAN : BOOL (Umschalten auf Handbetrieb, MANUAL = TRUE)</text:p>
      <text:p text:style-name="P179"><text:tab/>RST : BOOL (Asynchroner Reset-Eingang)</text:p>
      <text:p text:style-name="P69"><text:tab/>KP : REAL (Verstärkung des Reglers)</text:p>
      <text:p text:style-name="P69"><text:tab/>TN : REAL (Nachstellzeit des Reglers)</text:p>
      <text:p text:style-name="P69"><text:tab/>TV : REAL (Vorhaltezeit des Reglers)</text:p>
      <text:p text:style-name="P69"><text:tab/>LL : REAL (untere Ausgangsbegrenzung)</text:p>
      <text:p text:style-name="P69"><text:soft-page-break/><text:tab/>LH : REAL (obere Ausgangsbegrenzung)</text:p>
      <text:p text:style-name="P73">Output<text:tab/>Y : REAL (Ausgang des Reglers)</text:p>
      <text:p text:style-name="P183"><text:tab/>DIFF : Real (Regelabweichung)</text:p>
      <text:p text:style-name="P73"><draw:frame draw:style-name="fr3" draw:name="Grafik594" text:anchor-type="paragraph" svg:x="1.002cm" svg:y="0.688cm" svg:width="2.499cm" svg:height="5.489cm" draw:z-index="680"><draw:image xlink:href="Pictures/10000000000000BD0000019FF2C2AAC6.png" xlink:type="simple" xlink:show="embed" xlink:actuate="onLoad"/></draw:frame><text:tab/>LIM : BOOL (TRUE, wenn der Ausgang ein Limit erreicht hat)</text:p>
      <text:p text:style-name="P66"><text:span text:style-name="T21"><text:line-break/>CTRL_PID ist ein PID-Regler mit dynamischen Anti Wind-</text:span><text:span text:style-name="T16">Up</text:span><text:span text:style-name="T21"> und manuellem Steuereingang. Der PID Regler arbeitet nach der Formel:</text:span></text:p>
      <text:p text:style-name="P183">Y = KP * ( DIFF + 1/TN * INTEG(DIFF) + TV *DERIV(DIFF)) + OFFSET</text:p>
      <text:p text:style-name="P73">wobei DIFF = SET_POINT – ACTUAL</text:p>
      <text:p text:style-name="P73">Im Handbetrieb (Manual = TRUE) gilt: Y = MANUAL_IN + OFFSET</text:p>
      <text:p text:style-name="P66"><text:span text:style-name="T21">ACT ist der gemessene Wert nach der Regelstrecke und SET ist die Sollwertvorgabe für den Regler. Die Eingangswerte LH und LL begrenzen den Ausgangswert Y. Mit RST kann der interne Integrator jederzeit auf 0 gesetzt werden. Der Ausgang LIM signalisiert das der Regler an eine der Grenzen LL oder LH gelaufen ist. Der PID-Regler arbeitet frei laufend und benutzt zur Berechnung die Trapezregel für höchste Genauigkeit und optimale Geschwindigkeit. Die </text:span><text:span text:style-name="T16">Default</text:span><text:span text:style-name="T21">-Werte der Eingangsparameter sind wie folgt vordefiniert: KP = 1, TN = 1, TV = 1, LIMIT_L = -1000 und LIMIT_H = +1000. Mit dem Eingang SUP wird eine Rauschunterdrückung eingestellt, der Wert am Eingang SUP legt fest ab welcher Regeldifferenz der Regler einschaltet. Mit SUP wird vermieden das der Ausgang des Reglers <text:s/>dauern schwankt. Der Wert am Eingang SUP sollte so bemessen sein das er das Rauschen der Regelstrecke und der Sensoren unterdrückt. Wird zum Beispiel der Eingang SUP auf 0.1 gesetzt so wird der Regler erst bei Regelabweichungen größer als 0.1 aktiv. Der Ausgang DIFF stellt die gemessene und durch ein </text:span><text:span text:style-name="T16">Noise</text:span><text:span text:style-name="T21"> Filter (DEAD_BAND) gefilterte Regelabweichung zur Verfügung. DIFF wird in einer Regelstrecke normalerweise nicht benötigt, kann aber zur Beeinflussung der Regelparameter benutzt werden. Der Eingang OFS wird als letzter Wert zum Ausgang addiert, und dient vor allem zum kompensieren <text:s/>von Störsignalen, deren Wirkung auf den Regelkreis abgeschätzt werden kann.</text:span></text:p>
      <text:p text:style-name="P173"><text:span text:style-name="T21">Der Regler arbeitet mit einem Dynamischen Wind-</text:span><text:span text:style-name="T16">Up </text:span><text:span text:style-name="T19">das verhindert dass der Integrator bei erreichen eines Ausgangslimits und weiterer Regelabwei</text:span><text:soft-page-break/><text:span text:style-name="T19">chung unbegrenzt weiter läuft und die Regeleigenschaften negativ beeinflusst. In der Einleitung des Kapitel Regelungstechnik finden sich weitere Details zum Thema Anti Wind-</text:span><text:span text:style-name="T16">Up.</text:span><text:span text:style-name="T19"> </text:span></text:p>
      <text:p text:style-name="P11">Die Regelparameter werden in der Form KP, TN und TV angegeben, falls die Parameter als KP, KI und KD vorliegen können sie entsprechend der folgenden Formel umgerechnet werden:</text:p>
      <text:p text:style-name="P183">TN = KP/KI und TV = KD/KP</text:p>
      <text:p text:style-name="P183"><draw:frame draw:style-name="fr3" draw:name="Grafik593" text:anchor-type="paragraph" svg:x="0.977cm" svg:y="0.642cm" svg:width="15.998cm" svg:height="5.272cm" draw:z-index="586"><draw:image xlink:href="Pictures/10000000000003D100000142215AF8DA.png" xlink:type="simple" xlink:show="embed" xlink:actuate="onLoad"/></draw:frame>Die folgende Grafik zeigt die interne Struktur des PID Reglers:</text:p>
      <text:p text:style-name="P88">Im folgenden Beispiel wir ein PID Regler gezeigt, dessen SET_POINT durch den Baustein TUNE2 mittels Taster erzeugt wird. Der Ausgang DIFF wird an einen Baustein PARSET2 geleitet welcher abhängig von der Regelabweichung am Ausgang DIFF die Parameter KP, TN und TV verändert.</text:p>
      <text:p text:style-name="P88"><draw:frame draw:style-name="fr3" draw:name="Grafik685" text:anchor-type="paragraph" svg:x="1.023cm" svg:y="0.012cm" svg:width="15.998cm" svg:height="4.643cm" draw:z-index="681"><draw:image xlink:href="Pictures/1000000000000323000000E9507C516F.png" xlink:type="simple" xlink:show="embed" xlink:actuate="onLoad"/></draw:frame></text:p>
      <text:p text:style-name="P254"/>
      <text:p text:style-name="P254"/>
      <text:p text:style-name="P254"/>
      <text:list xml:id="list38464520" text:continue-numbering="true" text:style-name="L1">
        <text:list-item>
          <text:list>
            <text:list-item>
              <text:h text:style-name="P216" text:outline-level="2"><text:soft-page-break/><text:alphabetical-index-mark-start text:id="IMark211656492"/>CTRL_PWM<text:alphabetical-index-mark-end text:id="IMark211656492"/></text:h>
            </text:list-item>
          </text:list>
        </text:list-item>
      </text:list>
      <text:p text:style-name="P69">Type<text:tab/>Funktionsbaustein</text:p>
      <text:p text:style-name="P66"><text:span text:style-name="T15">Input</text:span><text:span text:style-name="T14"><text:tab/>CI : REAL (Eingang vom Controller)</text:span></text:p>
      <text:p text:style-name="P179"><text:tab/>MAN_IN : REAL (Manueller Eingangswert)<text:tab/></text:p>
      <text:p text:style-name="P179"><text:tab/>MANUAL : BOOL (Umschalter für Handbetrieb)</text:p>
      <text:p text:style-name="P179"><text:tab/>F : REAL (Frequenz der Ausgangsimpulse in Hz)</text:p>
      <text:p text:style-name="P66"><draw:frame draw:style-name="fr3" draw:name="Grafik597" text:anchor-type="paragraph" svg:x="1.046cm" svg:y="0.688cm" svg:width="3.62cm" svg:height="2.649cm" draw:z-index="589"><draw:image xlink:href="Pictures/1000000000000112000000C8CEA838DB.png" xlink:type="simple" xlink:show="embed" xlink:actuate="onLoad"/></draw:frame><text:span text:style-name="T14">Output<text:tab/>Q : BOOL </text:span><text:span text:style-name="T21">(Steuersignal)<text:tab/></text:span></text:p>
      <text:p text:style-name="P183"><text:line-break/>CTRL_PWM wandelt den Eingangswert CI (0..1) in ein Pulsweitenmoduliertes Ausgangssignal Q. Wenn MANUAL = TRUE wird am Ausgang Q Der Eingangswert von MAN_IN ausgegeben. CTRL_OUT kann benutzt werden um eigene Regelbausteine Aufzubauen.</text:p>
      <text:p text:style-name="P183"><draw:frame draw:style-name="fr3" draw:name="Grafik598" text:anchor-type="paragraph" svg:x="1.046cm" svg:y="0.661cm" svg:width="6.2cm" svg:height="2.889cm" draw:z-index="590"><draw:image xlink:href="Pictures/100000000000014F0000009CEDFA6C02.png" xlink:type="simple" xlink:show="embed" xlink:actuate="onLoad"/></draw:frame>Blockschaltbild von CTRL_PWM:</text:p>
      <text:p text:style-name="P183"/>
      <text:p text:style-name="P183"><draw:frame draw:style-name="fr3" draw:name="Grafik599" text:anchor-type="paragraph" svg:x="1.025cm" svg:y="0.656cm" svg:width="15.109cm" svg:height="2.461cm" draw:z-index="591"><draw:image xlink:href="Pictures/1000000000000330000000852F41F780.png" xlink:type="simple" xlink:show="embed" xlink:actuate="onLoad"/></draw:frame>DAS folgende Beispiel zeigt einen PI Regler mit PWM Ausgang:</text:p>
      <text:p text:style-name="P173"/>
      <text:p text:style-name="P173"/>
      <text:p text:style-name="P173"/>
      <text:list xml:id="list38466707" text:continue-numbering="true" text:style-name="L1">
        <text:list-item>
          <text:list>
            <text:list-item>
              <text:h text:style-name="P216" text:outline-level="2"><text:soft-page-break/><text:alphabetical-index-mark-start text:id="IMark211656492"/>DEAD_BAND<text:alphabetical-index-mark-end text:id="IMark211656492"/></text:h>
            </text:list-item>
          </text:list>
        </text:list-item>
      </text:list>
      <text:p text:style-name="P2">Type<text:tab/><text:span text:style-name="T12">Funktionsbaustein</text:span></text:p>
      <text:p text:style-name="P66"><text:span text:style-name="T15">Input</text:span><text:span text:style-name="T14"><text:tab/>X : REAL (Eingangswert)</text:span></text:p>
      <text:p text:style-name="P66"><text:span text:style-name="T14"><text:tab/>L : REAL (</text:span><text:span text:style-name="T15">Lockout</text:span><text:span text:style-name="T14"> Wert)</text:span></text:p>
      <text:p text:style-name="P66"><draw:frame draw:style-name="fr3" draw:name="Grafik372" text:anchor-type="paragraph" svg:x="1.002cm" svg:y="0.688cm" svg:width="4.521cm" svg:height="1.57cm" draw:z-index="348"><draw:image xlink:href="Pictures/1000000000000156000000777A87234D.png" xlink:type="simple" xlink:show="embed" xlink:actuate="onLoad"/></draw:frame><text:span text:style-name="T14">Output<text:tab/>Y : </text:span><text:span text:style-name="T21">REAL (Ausgangswert)</text:span></text:p>
      <text:p text:style-name="P66"><text:span text:style-name="T21"><text:line-break/>DEAD_BAND ist eine lineare Übertragungsfunktion mit Totzone. Die Funkti</text:span><text:span text:style-name="T21">on verschiebt den positiven Teil der Kurve um -L und den negativen Teil der Kurve um +L. DEAD_BAND wird benutzt um Quantisierungsrauschen und andere Rauschanteile aus einem Signal zu filtern. DEAD_BAND wird zum Beispiel in Regelkreisen eingesetzt um zu verhindern das der Regler dauernd in kleinen Schritten schaltet und dabei das Stellglied übermäßig belastet und abnutzt.</text:span></text:p>
      <text:p text:style-name="P173"><text:span text:style-name="T16">DEAD_BAND</text:span><text:span text:style-name="T21"> = X - SGN(X)*L wenn ABS(X) &gt; L wenn ABS(X) &gt; L</text:span></text:p>
      <text:p text:style-name="P66"><draw:frame draw:style-name="fr3" draw:name="Grafik373" text:anchor-type="paragraph" svg:x="1.067cm" svg:y="0.693cm" svg:width="5.821cm" svg:height="5.45cm" draw:z-index="349"><draw:image xlink:href="Pictures/10000000000001B80000019CCA42DE37.png" xlink:type="simple" xlink:show="embed" xlink:actuate="onLoad"/></draw:frame><text:span text:style-name="T16">DEAD_BAND</text:span><text:span text:style-name="T21"> = 0 wenn ABS(X) &lt;= L</text:span></text:p>
      <text:p text:style-name="P250"/>
      <text:p text:style-name="P174"/>
      <text:p text:style-name="P174"/>
      <text:p text:style-name="P174"/>
      <text:list xml:id="list38475902" text:continue-numbering="true" text:style-name="L1">
        <text:list-item>
          <text:list>
            <text:list-item>
              <text:h text:style-name="P216" text:outline-level="2"><text:soft-page-break/><text:alphabetical-index-mark-start text:id="IMark211656492"/>DEAD_BAND_A<text:alphabetical-index-mark-end text:id="IMark211656492"/></text:h>
            </text:list-item>
          </text:list>
        </text:list-item>
      </text:list>
      <text:p text:style-name="P2">Type<text:tab/><text:span text:style-name="T12">Funktionsbaustein</text:span></text:p>
      <text:p text:style-name="P66"><text:span text:style-name="T15">Input</text:span><text:span text:style-name="T14"><text:tab/>X : REAL (Eingangswert)</text:span></text:p>
      <text:p text:style-name="P66"><text:span text:style-name="T14"><text:tab/>L : REAL (</text:span><text:span text:style-name="T15">Lockout</text:span><text:span text:style-name="T14"> Wert)</text:span></text:p>
      <text:p text:style-name="P66"><draw:frame draw:style-name="fr3" draw:name="Grafik621" text:anchor-type="paragraph" svg:x="1.046cm" svg:y="0.667cm" svg:width="2.9cm" svg:height="2.311cm" draw:z-index="617"><draw:image xlink:href="Pictures/10000000000000DB000000AF1AEF6230.png" xlink:type="simple" xlink:show="embed" xlink:actuate="onLoad"/></draw:frame><text:span text:style-name="T14">Output<text:tab/>Y : </text:span><text:span text:style-name="T21">REAL (Ausgangswert)</text:span></text:p>
      <text:p text:style-name="P66"><text:span text:style-name="T21"><text:line-break/>DEAD_BAND_A ist eine selbst adaptierende lineare Übertragungsfunktion </text:span><text:span text:style-name="T21">mit Totzone. Die Funktion verschiebt den positiven Teil der Kurve um -L und den negativen Teil der Kurve um +L. DEAD_BAND_A wird benutzt um Rauschanteile um den Nullpunkt aus einem Signal zu filtern. DEAD_BAND_A wird zum Beispiel in Regelkreisen eingesetzt um zu verhin</text:span><text:span text:style-name="T21">dern das der Reg</text:span><text:span text:style-name="T21">ler dauernd in kleinen Schritten schaltet und dabei das Stellglied übermäßig belastet und abnutzt.</text:span></text:p>
      <text:p text:style-name="P183">Die Größe L wird berechnet indem aus dem Eingangssignal X die HF Anteile über einen Tiefpaß mit der Zeitkonstante T gefiltert werden und aus der Amplitude des HF Anteils wird die Totzone L berechnet. Die Empfindlichkeit des Bausteins kann über den Parameter KL verändert werden. KL ist mit 1 vordefiniert und kann deshalb unbeschaltet beliben. Sinnvolle Werte für KL liegen zwischen 1 - 5.</text:p>
      <text:p text:style-name="P183">L = HF_Amplitude (effektiv) <text:s/>* KL.</text:p>
      <text:p text:style-name="P183">Damit der Baustein auch bei extremen Betriebsbedingungen stabil bleibt wird über den Eingang LM der Maximalwert von L begrenzt.</text:p>
      <text:p text:style-name="P173"><text:span text:style-name="T16">DEAD_BAND</text:span><text:span text:style-name="T21"> = X - SGN(X)*L wenn ABS(X) &gt; L wenn ABS(X) &gt; L</text:span></text:p>
      <text:p text:style-name="P66"><draw:frame draw:style-name="fr17" draw:name="Grafik622" text:anchor-type="paragraph" svg:x="1.021cm" svg:y="0.7cm" svg:width="6.399cm" svg:height="6.001cm" draw:z-index="616"><draw:image xlink:href="Pictures/10000000000001B80000019CCA42DE37.png" xlink:type="simple" xlink:show="embed" xlink:actuate="onLoad"/></draw:frame><text:span text:style-name="T16">DEAD_BAND</text:span><text:span text:style-name="T21"> = 0 wenn ABS(X) &lt;= L</text:span></text:p>
      <text:p text:style-name="P183"/>
      <text:list xml:id="list38466578" text:continue-numbering="true" text:style-name="L1">
        <text:list-item>
          <text:list>
            <text:list-item>
              <text:h text:style-name="P216" text:outline-level="2"><text:soft-page-break/><text:alphabetical-index-mark-start text:id="IMark211656492"/>DEAD_ZONE<text:alphabetical-index-mark-end text:id="IMark211656492"/></text:h>
            </text:list-item>
          </text:list>
        </text:list-item>
      </text:list>
      <text:p text:style-name="P69">Type<text:tab/>Funktion : REAL</text:p>
      <text:p text:style-name="P66"><text:span text:style-name="T15">Input</text:span><text:span text:style-name="T14"><text:tab/>X : REAL (Eingangswert)</text:span></text:p>
      <text:p text:style-name="P66"><text:span text:style-name="T14"><text:tab/>L : REAL (</text:span><text:span text:style-name="T15">Lockout</text:span><text:span text:style-name="T14"> Wert)</text:span></text:p>
      <text:p text:style-name="P66"><draw:frame draw:style-name="fr3" draw:name="Grafik275" text:anchor-type="paragraph" svg:x="1.132cm" svg:y="0.801cm" svg:width="4.521cm" svg:height="1.57cm" draw:z-index="228"><draw:image xlink:href="Pictures/100000000000015600000077727F39FC.png" xlink:type="simple" xlink:show="embed" xlink:actuate="onLoad"/></draw:frame><text:span text:style-name="T14">Output<text:tab/></text:span><text:span text:style-name="T21">REAL (Ausgangswert)</text:span></text:p>
      <text:p text:style-name="P2"><text:line-break/>DEAD_<text:span text:style-name="T4">ZONE</text:span> ist eine <text:span text:style-name="T4">lineare</text:span> Übertragungsfunktion mit Totzone. Der Ausgang entspricht dem Eingangssignal, wenn der Absolutwert des Eingangs größer als L ist.</text:p>
      <text:p text:style-name="P66"><text:span text:style-name="T16">DEAD_ZONE</text:span><text:span text:style-name="T21"> = X wenn ABS(X) &gt; L</text:span></text:p>
      <text:p text:style-name="P66"><draw:g text:anchor-type="paragraph" draw:z-index="226" draw:style-name="gr1"><draw:line draw:style-name="gr14" draw:text-style-name="P264" svg:x1="2.135cm" svg:y1="3.91cm" svg:x2="7.47cm" svg:y2="3.91cm"><text:p/></draw:line><draw:line draw:style-name="gr14" draw:text-style-name="P264" svg:x1="4.802cm" svg:y1="1.238cm" svg:x2="4.802cm" svg:y2="6.632cm"><text:p/></draw:line><draw:frame draw:style-name="gr44" draw:text-style-name="P269" svg:width="1.355cm" svg:height="1.512cm" svg:x="1.469cm" svg:y="3.842cm"><draw:text-box><text:p text:style-name="P258"><text:span text:style-name="T38">X</text:span></text:p></draw:text-box></draw:frame><draw:frame draw:style-name="gr45" draw:text-style-name="P269" svg:width="1.338cm" svg:height="1.509cm" svg:x="3.87cm" svg:y="0.63cm"><draw:text-box><text:p text:style-name="P258"><text:span text:style-name="T38">Y</text:span></text:p></draw:text-box></draw:frame><draw:line draw:style-name="gr46" draw:text-style-name="P264" svg:x1="2.135cm" svg:y1="6.577cm" svg:x2="3.468cm" svg:y2="5.243cm"><text:p/></draw:line><draw:line draw:style-name="gr46" draw:text-style-name="P264" svg:x1="3.468cm" svg:y1="3.91cm" svg:x2="3.468cm" svg:y2="5.242cm"><text:p/></draw:line><draw:line draw:style-name="gr46" draw:text-style-name="P264" svg:x1="3.468cm" svg:y1="3.91cm" svg:x2="6.137cm" svg:y2="3.91cm"><text:p/></draw:line><draw:line draw:style-name="gr46" draw:text-style-name="P264" svg:x1="6.133cm" svg:y1="2.584cm" svg:x2="6.133cm" svg:y2="3.918cm"><text:p/></draw:line><draw:line draw:style-name="gr46" draw:text-style-name="P264" svg:x1="6.133cm" svg:y1="2.573cm" svg:x2="7.464cm" svg:y2="1.238cm"><text:p/></draw:line><draw:line draw:style-name="gr47" draw:text-style-name="P264" svg:x1="4.802cm" svg:y1="4.571cm" svg:x2="6.136cm" svg:y2="4.571cm"><text:p/></draw:line><draw:frame draw:style-name="gr45" draw:text-style-name="P269" svg:width="1.611cm" svg:height="1.509cm" svg:x="5.106cm" svg:y="4.588cm"><draw:text-box><text:p text:style-name="P258"><text:span text:style-name="T38">L</text:span></text:p></draw:text-box></draw:frame></draw:g><text:span text:style-name="T16">DEAD_ZONE</text:span><text:span text:style-name="T21"> = 0 wenn ABS(X) &lt;= L</text:span></text:p>
      <text:p text:style-name="P73"/>
      <text:list xml:id="list38456931" text:continue-numbering="true" text:style-name="L1">
        <text:list-item>
          <text:list>
            <text:list-item>
              <text:h text:style-name="P216" text:outline-level="2"><text:alphabetical-index-mark-start text:id="IMark211656492"/>DEAD_ZONE2<text:alphabetical-index-mark-end text:id="IMark211656492"/></text:h>
            </text:list-item>
          </text:list>
        </text:list-item>
      </text:list>
      <text:p text:style-name="P2">Type<text:tab/><text:span text:style-name="T4">Funktionsbaustein</text:span></text:p>
      <text:p text:style-name="P66"><text:span text:style-name="T15">Input</text:span><text:span text:style-name="T14"><text:tab/>X : REAL (Eingangswert)</text:span></text:p>
      <text:p text:style-name="P66"><text:span text:style-name="T14"><text:tab/>L : REAL (</text:span><text:span text:style-name="T15">Lockout</text:span><text:span text:style-name="T14"> Wert)</text:span></text:p>
      <text:p text:style-name="P66"><draw:frame draw:style-name="fr3" draw:name="Grafik276" text:anchor-type="paragraph" svg:x="1.083cm" svg:y="0.676cm" svg:width="2.731cm" svg:height="1.75cm" draw:z-index="229"><draw:image xlink:href="Pictures/10000000000000CE00000084A207AB63.png" xlink:type="simple" xlink:show="embed" xlink:actuate="onLoad"/></draw:frame><text:span text:style-name="T14">Output<text:tab/>Y : </text:span><text:span text:style-name="T21">REAL (Ausgangswert)</text:span></text:p>
      <text:p text:style-name="P73"><text:soft-page-break/><text:line-break/>DEAD_ZONE2 ist eine lineare Übertragungsfunktion mit Totzone und Hysterese. Der Ausgang entspricht dem Eingangssignal, wenn der Absolutwert des Eingangs größer als L ist.</text:p>
      <text:p text:style-name="P183">DEAD_ZONE2 = X wenn ABS(X) &gt; L</text:p>
      <text:p text:style-name="P183">DEAD_ZONE2 = +/- L wenn ABS(X) &lt;= L</text:p>
      <text:p text:style-name="P183"><draw:g text:anchor-type="paragraph" draw:z-index="227" draw:style-name="gr1"><draw:line draw:style-name="gr14" draw:text-style-name="P264" svg:x1="1.673cm" svg:y1="3.207cm" svg:x2="7.008cm" svg:y2="3.207cm"><text:p/></draw:line><draw:line draw:style-name="gr14" draw:text-style-name="P264" svg:x1="4.34cm" svg:y1="0.539cm" svg:x2="4.34cm" svg:y2="5.931cm"><text:p/></draw:line><draw:frame draw:style-name="gr48" draw:text-style-name="P269" svg:width="1.438cm" svg:height="1.131cm" svg:x="1.011cm" svg:y="3.139cm"><draw:text-box><text:p text:style-name="P258"><text:span text:style-name="T38">X</text:span></text:p></draw:text-box></draw:frame><draw:frame draw:style-name="gr49" draw:text-style-name="P269" svg:width="1.338cm" svg:height="1.133cm" svg:x="3.44cm" svg:y="-0.071cm"><draw:text-box><text:p text:style-name="P258"><text:span text:style-name="T38">Y</text:span></text:p></draw:text-box></draw:frame><draw:line draw:style-name="gr46" draw:text-style-name="P264" svg:x1="1.673cm" svg:y1="5.862cm" svg:x2="3.008cm" svg:y2="4.529cm"><text:p/></draw:line><draw:line draw:style-name="gr50" draw:text-style-name="P264" svg:x1="3.015cm" svg:y1="1.872cm" svg:x2="3.015cm" svg:y2="4.537cm"><text:p/></draw:line><draw:line draw:style-name="gr46" draw:text-style-name="P264" svg:x1="3.015cm" svg:y1="4.529cm" svg:x2="5.683cm" svg:y2="4.529cm"><text:p/></draw:line><draw:line draw:style-name="gr51" draw:text-style-name="P264" svg:x1="5.682cm" svg:y1="1.872cm" svg:x2="5.682cm" svg:y2="4.537cm"><text:p/></draw:line><draw:line draw:style-name="gr46" draw:text-style-name="P264" svg:x1="5.682cm" svg:y1="1.872cm" svg:x2="7.014cm" svg:y2="0.539cm"><text:p/></draw:line><draw:line draw:style-name="gr47" draw:text-style-name="P264" svg:x1="4.34cm" svg:y1="3.868cm" svg:x2="5.675cm" svg:y2="3.868cm"><text:p/></draw:line><draw:frame draw:style-name="gr48" draw:text-style-name="P269" svg:width="1.033cm" svg:height="1.131cm" svg:x="4.65cm" svg:y="3.884cm"><draw:text-box><text:p text:style-name="P258"><text:span text:style-name="T38">L</text:span></text:p></draw:text-box></draw:frame><draw:line draw:style-name="gr46" draw:text-style-name="P264" svg:x1="3.015cm" svg:y1="1.872cm" svg:x2="5.683cm" svg:y2="1.872cm"><text:p/></draw:line></draw:g></text:p>
      <text:list xml:id="list38465949" text:continue-numbering="true" text:style-name="L1">
        <text:list-item>
          <text:list>
            <text:list-item>
              <text:h text:style-name="P216" text:outline-level="2"><text:alphabetical-index-mark-start text:id="IMark211656492"/>FT_DERIV<text:alphabetical-index-mark-end text:id="IMark211656492"/></text:h>
            </text:list-item>
          </text:list>
        </text:list-item>
      </text:list>
      <text:p text:style-name="P69">Type<text:tab/>Funktionsbaustein</text:p>
      <text:p text:style-name="P66"><text:span text:style-name="T15">Input</text:span><text:span text:style-name="T14"><text:tab/>IN : REAL (Eingangssignal)</text:span></text:p>
      <text:p text:style-name="P69"><text:tab/>K : REAL (Multiplikator)</text:p>
      <text:p text:style-name="P69"><text:tab/>RUN : BOOL (Freigabe Eingang)</text:p>
      <text:p text:style-name="P66"><draw:frame draw:style-name="fr3" draw:name="Grafik66" text:anchor-type="paragraph" svg:x="1.109cm" svg:y="0.686cm" svg:width="2.281cm" svg:height="2.2cm" draw:z-index="161"><draw:image xlink:href="Pictures/10000000000000AC000000A61FC4E3D2.png" xlink:type="simple" xlink:show="embed" xlink:actuate="onLoad"/></draw:frame><text:span text:style-name="T21">Output<text:tab/>OUT : REAL (Ableitung des Eingangssignals K * </text:span><text:span text:style-name="T21">X / </text:span>T<text:span text:style-name="T21">)</text:span></text:p>
      <text:p text:style-name="P66"><text:span text:style-name="T21"><text:line-break/>FT_DERIV ist ein D-Glied, oder auch LZI-Übertragungsglied, welches ein differenzierendes Übertragungsverhalten aufweist. Am Ausgang von FT_DERIV steht die Ableitung über die Zeit T in Sekunden zur Verfügung. Wenn </text:span><text:soft-page-break/><text:span text:style-name="T21">das Eingangssignal in einer Sekunde von 3 auf 4 steigt so ist der Ausgang 1*K ( K * </text:span><text:span text:style-name="T21">X / </text:span>T = 1 * (4 – 3) / 1 = 1.</text:p>
      <text:p text:style-name="P173">Anders ausgedrückt ist die Ableitung des Eingangssignals die momentane Steigung des Eingangssignals. Mit dem Eingang RUN kann FT_DERIV enabled, beziehungsweise disabled werden. FT_DERIV arbeitet intern in Mikrosekunden und wird dadurch auch den Anforderungen <text:s/>sehr schneller SPS Controller mit Zykluszeiten unter einer Millisekunde gerecht.</text:p>
      <text:p text:style-name="P7">Strukturbild:</text:p>
      <text:p text:style-name="P173"><draw:g text:anchor-type="paragraph" draw:z-index="618" draw:style-name="gr82"><draw:rect draw:style-name="gr28" draw:text-style-name="P262" svg:width="2.77cm" svg:height="1.574cm" svg:x="5.124cm" svg:y="-0.161cm"><text:p/></draw:rect><draw:line draw:style-name="gr29" draw:text-style-name="P262" svg:x1="5.311cm" svg:y1="-0.009cm" svg:x2="5.311cm" svg:y2="1.208cm"><text:p/></draw:line><draw:line draw:style-name="gr29" draw:text-style-name="P262" svg:x1="7.631cm" svg:y1="1.208cm" svg:x2="5.311cm" svg:y2="1.208cm"><text:p/></draw:line><draw:line draw:style-name="gr30" draw:text-style-name="P262" svg:x1="4.355cm" svg:y1="0.649cm" svg:x2="5.121cm" svg:y2="0.649cm"><text:p/></draw:line><draw:frame draw:style-name="gr83" draw:text-style-name="P263" svg:width="0.519cm" svg:height="0.495cm" svg:x="3.986cm" svg:y="0.474cm"><draw:text-box><text:p>in</text:p></draw:text-box></draw:frame><draw:line draw:style-name="gr30" draw:text-style-name="P262" svg:x1="7.895cm" svg:y1="0.635cm" svg:x2="8.661cm" svg:y2="0.635cm"><text:p/></draw:line><draw:frame draw:style-name="gr84" draw:text-style-name="P263" svg:width="0.519cm" svg:height="0.987cm" svg:x="8.692cm" svg:y="0.451cm"><draw:text-box><text:p>out</text:p></draw:text-box></draw:frame><draw:frame draw:style-name="gr84" draw:text-style-name="P263" svg:width="0.518cm" svg:height="0.495cm" svg:x="5.124cm" svg:y="1.412cm"><draw:text-box><text:p>K</text:p></draw:text-box></draw:frame></draw:g></text:p>
      <text:list xml:id="list38455313" text:continue-numbering="true" text:style-name="L1">
        <text:list-item>
          <text:list>
            <text:list-item>
              <text:h text:style-name="P216" text:outline-level="2"><text:alphabetical-index-mark-start text:id="IMark211656492"/>FT_IMP<text:alphabetical-index-mark-end text:id="IMark211656492"/></text:h>
            </text:list-item>
          </text:list>
        </text:list-item>
      </text:list>
      <text:p text:style-name="P69">Type<text:tab/>Funktionsbaustein</text:p>
      <text:p text:style-name="P66"><text:span text:style-name="T15">Input</text:span><text:span text:style-name="T14"><text:tab/>IN : REAL (Eingangssignal)</text:span></text:p>
      <text:p text:style-name="P69"><text:tab/>T : TIME (Zeitkonstante)</text:p>
      <text:p text:style-name="P69"><text:tab/>K : REAL (Multiplikator)</text:p>
      <text:p text:style-name="P66"><draw:frame draw:style-name="fr3" draw:name="Grafik68" text:anchor-type="paragraph" svg:x="1.196cm" svg:y="0.681cm" svg:width="2.281cm" svg:height="2.2cm" draw:z-index="162"><draw:image xlink:href="Pictures/10000000000000AC000000A67B683ACB.png" xlink:type="simple" xlink:show="embed" xlink:actuate="onLoad"/></draw:frame><text:span text:style-name="T14">Output<text:tab/>OUT : REAL </text:span><text:span text:style-name="T21">(Hochpass</text:span> Mit Zeitkonstante T<text:span text:style-name="T21">)</text:span></text:p>
      <text:p text:style-name="P73"><text:line-break/>FT_IMP Ist ein Hochpass-Filter mit Zeitkonstante T und Multiplikator K. Eine sprunghafte Änderung am Eingang wird am Ausgang sichtbar, kling aber nach der Zeit T bereits um 63% und nach 3 * T um 95% ab. Somit ist nach einer sprunghaften Änderung des Eingangssignals von 0 auf 10 der Ausgang zum Zeitpunkt der Eingangsänderung 10 und kling nach 1 * T auf 3,7 und nach 3 * T auf 0,5 ab und wird dann allmählich wieder 0.</text:p>
      <text:p text:style-name="P73"><draw:g text:anchor-type="paragraph" draw:z-index="426" draw:style-name="gr1"><draw:rect draw:style-name="gr28" draw:text-style-name="P262" svg:width="2.994cm" svg:height="1.629cm" svg:x="4.93cm" svg:y="0.982cm"><text:p/></draw:rect><draw:line draw:style-name="gr29" draw:text-style-name="P262" svg:x1="5.14cm" svg:y1="1.14cm" svg:x2="5.14cm" svg:y2="2.399cm"><text:p/></draw:line><draw:line draw:style-name="gr30" draw:text-style-name="P262" svg:x1="4.102cm" svg:y1="1.824cm" svg:x2="4.93cm" svg:y2="1.824cm"><text:p/></draw:line><draw:frame draw:style-name="gr68" draw:text-style-name="P263" svg:width="0.56cm" svg:height="0.495cm" svg:x="3.701cm" svg:y="1.638cm"><draw:text-box><text:p>in</text:p></draw:text-box></draw:frame><draw:line draw:style-name="gr30" draw:text-style-name="P262" svg:x1="7.927cm" svg:y1="1.808cm" svg:x2="8.755cm" svg:y2="1.808cm"><text:p/></draw:line><draw:frame draw:style-name="gr69" draw:text-style-name="P263" svg:width="0.56cm" svg:height="0.495cm" svg:x="8.788cm" svg:y="1.617cm"><draw:text-box><text:p>out</text:p></draw:text-box></draw:frame><draw:frame draw:style-name="gr69" draw:text-style-name="P263" svg:width="0.56cm" svg:height="0.495cm" svg:x="4.93cm" svg:y="2.61cm"><draw:text-box><text:p>K</text:p></draw:text-box></draw:frame><draw:frame draw:style-name="gr69" draw:text-style-name="P263" svg:width="0.558cm" svg:height="0.495cm" svg:x="7.608cm" svg:y="2.61cm"><draw:text-box><text:p>T</text:p></draw:text-box></draw:frame><draw:custom-shape draw:style-name="gr70" draw:text-style-name="P262" svg:width="5.183cm" svg:height="2.49cm" svg:x="5.137cm" svg:y="-0.092cm"><text:p/><draw:enhanced-geometry svg:viewBox="0 0 21600 21600" draw:extrusion-first-light-direction="(0 0 0)" draw:glue-point-type="segments" draw:type="mso-spt100" draw:modifiers="179.959752357279 90.000000000012"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mirror-vertical="false" draw:handle-mirror-horizontal="false" draw:handle-switched="false" draw:handle-position="10800 $0" draw:handle-polar="10800 10800" draw:handle-radius-range-minimum="10800" draw:handle-radius-range-maximum="10800"/><draw:handle draw:handle-mirror-vertical="false" draw:handle-mirror-horizontal="false" draw:handle-switched="false" draw:handle-position="10800 $1" draw:handle-polar="10800 10800" draw:handle-radius-range-minimum="10800" draw:handle-radius-range-maximum="10800"/></draw:enhanced-geometry></draw:custom-shape><draw:rect draw:style-name="gr71" draw:text-style-name="P262" svg:width="2.664cm" svg:height="0.126cm" svg:x="5.149cm" svg:y="1.056cm"><text:p/></draw:rect><draw:rect draw:style-name="gr71" draw:text-style-name="P262" svg:width="0.158cm" svg:height="1.341cm" svg:x="7.656cm" svg:y="1.056cm"><text:p/></draw:rect></draw:g>Strukturbild:</text:p>
      <text:p text:style-name="P73"/>
      <text:list xml:id="list38454042" text:continue-numbering="true" text:style-name="L1">
        <text:list-item>
          <text:list>
            <text:list-item>
              <text:h text:style-name="P216" text:outline-level="2"><text:soft-page-break/><text:alphabetical-index-mark-start text:id="IMark211656492"/>FT_INT<text:alphabetical-index-mark-end text:id="IMark211656492"/></text:h>
            </text:list-item>
          </text:list>
        </text:list-item>
      </text:list>
      <text:p text:style-name="P69">Type<text:tab/>Funktionsbaustein</text:p>
      <text:p text:style-name="P66"><text:span text:style-name="T15">Input</text:span><text:span text:style-name="T14"><text:tab/>IN : REAL (Eingangssignal)</text:span></text:p>
      <text:p text:style-name="P73"><text:tab/>K : REAL (Multiplikator)</text:p>
      <text:p text:style-name="P73"><text:tab/>RUN : BOOL (Freigabe Eingang)</text:p>
      <text:p text:style-name="P73"><text:tab/>RST : BOOL (Reset Eingang)</text:p>
      <text:p text:style-name="P73"><text:tab/>OUT_MIN : REAL (unteres Ausgangs Limit)</text:p>
      <text:p text:style-name="P73"><text:tab/>OUT_MAX : REAL (oberes Ausgangs Limit)</text:p>
      <text:p text:style-name="P73">Output<text:tab/>OUT : REAL (Ausgangssignal)</text:p>
      <text:p text:style-name="P183"><draw:frame draw:style-name="fr3" draw:name="Grafik69" text:anchor-type="paragraph" svg:x="1.025cm" svg:y="0.667cm" svg:width="4.069cm" svg:height="3.54cm" draw:z-index="573"><draw:image xlink:href="Pictures/10000000000001340000010CEF610A1B.png" xlink:type="simple" xlink:show="embed" xlink:actuate="onLoad"/></draw:frame><text:tab/>LIM : BOOL (TRUE wenn der Ausgang an einem Limit steht)</text:p>
      <text:p text:style-name="P73"/>
      <text:p text:style-name="P66"><text:span text:style-name="T21">FT_INT ist ein Integratorbaustein der das Integral über das Eingangssignal am Ausgang bereitstellt. Der Eingang K ist ein Multiplikator für das Ausgangssignal. Run schaltet den Integrator ein wenn TRUE und Aus wenn FALSE. RST (Reset) setzt den Ausgang auf 0. Die Eingänge OUT_MIN und OUT_MAX dienen dazu obere und untere Grenzwerte für den Ausgang des Integrators festzulegen. </text:span>FT_INT <text:line-break/>arbeitet intern in Mikrosekunden und wird dadurch auch den Anforderungen <text:s/>sehr Schneller SPS Controller mit Zykluszeiten unter einer Millisekunde gerecht.</text:p>
      <text:p text:style-name="P173">Ein Grundsatzproblem bei Integratoren ist die Auflösung, So hat der Ausgang vom Typ Real eine Auflösung von 7-8 Stellen was zur Folge hat das bei einem errechneten Integrationsschritt von 1 bei einem Ausgangswert von größer als hundert Millionen (1E8) dieser Schritt nicht mehr aufaddiert werden kann da er unter die Auflösungsgrenze von maximal 8 Stellen beim Typ Real fällt. Diese Limitation ist bei Einsatz von FT_INT zu beachten.</text:p>
      <text:p text:style-name="P173">Beispiel: ein Eingangssignal von 0,0001 bei einer Abtastzeit von 1 Millisekunde und einem Ausgangswert von 100000 würde einen Wert von 0,0001 * 0,001 Sekunden = 0,000001 zum Ausgangswert von 100000 addieren, was unweigerlich wieder den Wert von 100000 ergibt, denn die Auflösung des Datentyps Real kann nur maximal 8 Stellen erfassen. Dies ist vor allem zu beachten wenn FT_INT als Verbrauchszähler oder ähnlichen Anwendungen zum Einsatz kommen soll.</text:p>
      <text:p text:style-name="P11"><text:soft-page-break/>Strukturbild:</text:p>
      <text:p text:style-name="P38"><draw:g text:anchor-type="paragraph" draw:z-index="160" draw:style-name="gr1"><draw:rect draw:style-name="gr28" draw:text-style-name="P262" svg:width="3.183cm" svg:height="1.736cm" svg:x="4.676cm" svg:y="-0.191cm"><text:p/></draw:rect><draw:line draw:style-name="gr29" draw:text-style-name="P262" svg:x1="7.522cm" svg:y1="0.08cm" svg:x2="4.896cm" svg:y2="1.319cm"><text:p/></draw:line><draw:line draw:style-name="gr30" draw:text-style-name="P262" svg:x1="3.797cm" svg:y1="0.701cm" svg:x2="4.677cm" svg:y2="0.701cm"><text:p/></draw:line><draw:frame draw:style-name="gr31" draw:text-style-name="P263" svg:width="0.595cm" svg:height="0.495cm" svg:x="3.371cm" svg:y="0.509cm"><draw:text-box><text:p>in</text:p></draw:text-box></draw:frame><draw:line draw:style-name="gr30" draw:text-style-name="P262" svg:x1="7.86cm" svg:y1="0.687cm" svg:x2="8.74cm" svg:y2="0.687cm"><text:p/></draw:line><draw:frame draw:style-name="gr31" draw:text-style-name="P263" svg:width="0.595cm" svg:height="0.495cm" svg:x="8.777cm" svg:y="0.485cm"><draw:text-box><text:p>out</text:p></draw:text-box></draw:frame><draw:frame draw:style-name="gr31" draw:text-style-name="P263" svg:width="0.595cm" svg:height="0.495cm" svg:x="4.676cm" svg:y="1.545cm"><draw:text-box><text:p>K</text:p></draw:text-box></draw:frame></draw:g></text:p>
      <text:list xml:id="list38460623" text:continue-numbering="true" text:style-name="L1">
        <text:list-item>
          <text:list>
            <text:list-item>
              <text:h text:style-name="P216" text:outline-level="2"><text:alphabetical-index-mark-start text:id="IMark211656492"/>FT_INT2<text:alphabetical-index-mark-end text:id="IMark211656492"/></text:h>
            </text:list-item>
          </text:list>
        </text:list-item>
      </text:list>
      <text:p text:style-name="P69">Type<text:tab/>Funktionsbaustein</text:p>
      <text:p text:style-name="P66"><text:span text:style-name="T15">Input</text:span><text:span text:style-name="T14"><text:tab/>IN : REAL (Eingangssignal)</text:span></text:p>
      <text:p text:style-name="P73"><text:tab/>K : REAL (Multiplikator)</text:p>
      <text:p text:style-name="P73"><text:tab/>RUN : BOOL (Freigabe Eingang)</text:p>
      <text:p text:style-name="P73"><text:tab/>RST : BOOL (Reset Eingang)</text:p>
      <text:p text:style-name="P73"><text:tab/>OUT_MIN : REAL (unteres Ausgangs Limit)</text:p>
      <text:p text:style-name="P73"><text:tab/>OUT_MAX : REAL (oberes Ausgangs Limit)</text:p>
      <text:p text:style-name="P73">Output<text:tab/>OUT : REAL (Ausgangssignal)</text:p>
      <text:p text:style-name="P183"><text:tab/>LIM : BOOL (TRUE wenn der Ausgang an einem Limit steht)</text:p>
      <text:p text:style-name="P73"><draw:frame draw:style-name="fr3" draw:name="Grafik581" text:anchor-type="paragraph" svg:x="0.937cm" svg:y="0.034cm" svg:width="4.069cm" svg:height="3.54cm" draw:z-index="575"><draw:image xlink:href="Pictures/10000000000001340000010C9C4064D5.png" xlink:type="simple" xlink:show="embed" xlink:actuate="onLoad"/></draw:frame></text:p>
      <text:p text:style-name="P66"><text:span text:style-name="T21"><text:line-break/>FT_INT2 ist ein Integratorbaustein </text:span>der intern mit doppelter Genauigkeit rechnet und eine Auflösung von 14 Dezimalstellen sicherstellt. Dies macht FT_INT2 im Gegensatz zu FT_INT für z.B. Verbrauchszähler und ähnliche Anwendungen geeignet.</text:p>
      <text:p text:style-name="P173">Beispiel: ein Eingangssignal von 0,0001 bei einer Abtastzeit von 1 Millisekunde und einem Ausgangswert von 100000 ergibt einen Wert von 0,0001 * 0,001 Sekunden = 0,000001 der zum Ausgangswert von 100000 addiert werden soll, was unweigerlich wieder den Wert von 100000 ergibt, denn die Auflösung des Datentyps Real kann nur maximal 8 Stellen erfassen. FT_INT2 löst dieses Problem indem er intern mit doppelter Genauigkeit (14 <text:soft-page-break/>Dezimalstellen) rechnet und addiert auch kleinste Eingangswerte auf so dass keine Informationen verloren gehen.</text:p>
      <text:list xml:id="list38477702" text:continue-numbering="true" text:style-name="L1">
        <text:list-item>
          <text:list>
            <text:list-item>
              <text:h text:style-name="P216" text:outline-level="2"><text:alphabetical-index-mark-start text:id="IMark211656492"/>FT_PD<text:alphabetical-index-mark-end text:id="IMark211656492"/></text:h>
            </text:list-item>
          </text:list>
        </text:list-item>
      </text:list>
      <text:p text:style-name="P69">Type<text:tab/>Funktionsbaustein</text:p>
      <text:p text:style-name="P66"><text:span text:style-name="T15">Input</text:span><text:span text:style-name="T14"><text:tab/>IN : REAL (Eingangssignal)</text:span></text:p>
      <text:p text:style-name="P69"><text:tab/>KP : REAL (Proportionaler Anteil des Reglers)</text:p>
      <text:p text:style-name="P69"><text:tab/>TV : REAL (Nachstellzeit des Differenzierers in Sekunden)<text:tab/></text:p>
      <text:p text:style-name="P73"><draw:frame draw:style-name="fr3" draw:name="Grafik600" text:anchor-type="paragraph" svg:x="1.025cm" svg:y="0.667cm" svg:width="2.281cm" svg:height="2.2cm" draw:z-index="592"><draw:image xlink:href="Pictures/10000000000000AC000000A644C28F3E.png" xlink:type="simple" xlink:show="embed" xlink:actuate="onLoad"/></draw:frame>Output<text:tab/>Y : REAL (Ausgang des Reglers)</text:p>
      <text:p text:style-name="P73"><text:line-break/>FT_PD ist ein PD-Regler der nach folgender Formel arbeitet:</text:p>
      <text:p text:style-name="P183">Y = KP * (IN + DERIV(IN))</text:p>
      <text:p text:style-name="P15">FT_PD kann zusammen mit den Bausteinen CTRL_IN und CTRL_OUT zum Aufbau eines PD Reglers benutzt werden.</text:p>
      <text:p text:style-name="P184"><draw:frame draw:style-name="fr3" draw:name="Grafik601" text:anchor-type="paragraph" svg:x="1.025cm" svg:y="0.658cm" svg:width="4.89cm" svg:height="2.371cm" draw:z-index="593"><draw:image xlink:href="Pictures/10000000000001080000008035F37D22.png" xlink:type="simple" xlink:show="embed" xlink:actuate="onLoad"/></draw:frame>Die folgende Grafik verdeutlicht die interne Struktur des Reglers:</text:p>
      <text:p text:style-name="P14"/>
      <text:list xml:id="list38459722" text:continue-numbering="true" text:style-name="L1">
        <text:list-item>
          <text:list>
            <text:list-item>
              <text:h text:style-name="P216" text:outline-level="2"><text:alphabetical-index-mark-start text:id="IMark211656492"/>FT_PDT1<text:alphabetical-index-mark-end text:id="IMark211656492"/></text:h>
            </text:list-item>
          </text:list>
        </text:list-item>
      </text:list>
      <text:p text:style-name="P69">Type<text:tab/>Funktionsbaustein</text:p>
      <text:p text:style-name="P66"><text:span text:style-name="T15">Input</text:span><text:span text:style-name="T14"><text:tab/>IN : REAL (Eingangssignal)</text:span></text:p>
      <text:p text:style-name="P69"><text:tab/>KP : REAL (Proportionaler Anteil des Reglers)</text:p>
      <text:p text:style-name="P69"><text:soft-page-break/><text:tab/>TV : REAL (Nachstellzeit des Differenzierers in Sekunden)</text:p>
      <text:p text:style-name="P179"><text:tab/>T1 : REAL (T1 des PT1 Gliedes in Sekunden)</text:p>
      <text:p text:style-name="P73"><draw:frame draw:style-name="fr3" draw:name="Grafik602" text:anchor-type="paragraph" svg:x="1.067cm" svg:y="0.644cm" svg:width="2.731cm" svg:height="2.649cm" draw:z-index="594"><draw:image xlink:href="Pictures/10000000000000CE000000C850335A03.png" xlink:type="simple" xlink:show="embed" xlink:actuate="onLoad"/></draw:frame>Output<text:tab/>Y : REAL (Ausgang des Reglers)</text:p>
      <text:p text:style-name="P73"><text:line-break/>FT_PDT1 ist ein PD-Regler mit T1 Glied im D-Anteil. Der Baustein arbeitet nach folgender Formel:</text:p>
      <text:p text:style-name="P183">Y = KP * (IN + PT1(DERIV(IN))</text:p>
      <text:p text:style-name="P68">FT_PDT1 kann zusammen mit den Bausteinen CTRL_IN und CTRL_OUT sowie weiteren Regelungstechnischen Bausteinen zum Aufbau komplexer Reglerschaltungen benutzt werden.</text:p>
      <text:p text:style-name="P174"><draw:frame draw:style-name="fr3" draw:name="Grafik603" text:anchor-type="paragraph" svg:x="1.067cm" svg:y="0.667cm" svg:width="6.72cm" svg:height="2.371cm" draw:z-index="595"><draw:image xlink:href="Pictures/100000000000016B00000080FCC4CFA6.png" xlink:type="simple" xlink:show="embed" xlink:actuate="onLoad"/></draw:frame>Interner Aufbau des Bausteins:</text:p>
      <text:p text:style-name="P174"/>
      <text:list xml:id="list38458362" text:continue-numbering="true" text:style-name="L1">
        <text:list-item>
          <text:list>
            <text:list-item>
              <text:h text:style-name="P216" text:outline-level="2"><text:alphabetical-index-mark-start text:id="IMark211656492"/>FT_PI<text:alphabetical-index-mark-end text:id="IMark211656492"/></text:h>
            </text:list-item>
          </text:list>
        </text:list-item>
      </text:list>
      <text:p text:style-name="P69">Type<text:tab/>Funktionsbaustein</text:p>
      <text:p text:style-name="P66"><text:span text:style-name="T15">Input</text:span><text:span text:style-name="T14"><text:tab/>IN : REAL (Eingangssignal)</text:span></text:p>
      <text:p text:style-name="P69"><text:tab/>KP : REAL (Proportionaler Anteil des Reglers)</text:p>
      <text:p text:style-name="P69"><text:tab/>KI : REAL (Integraler Anteil des Reglers)</text:p>
      <text:p text:style-name="P69"><text:tab/>ILIM_L : REAL (untere Ausgangsbegrenzung des Integrators)</text:p>
      <text:p text:style-name="P69"><text:tab/>ILIM_H : REAL (obere Ausgangsbegrenzung des Integrators)</text:p>
      <text:p text:style-name="P173"><text:span text:style-name="T14"><text:tab/>IEN : BOOL (</text:span><text:span text:style-name="T15">Enable</text:span><text:span text:style-name="T14"> für den </text:span><text:span text:style-name="T15">Integrator</text:span><text:span text:style-name="T14">)</text:span></text:p>
      <text:p text:style-name="P179"><text:tab/>RST : BOOL (Asynchroner Reset-Eingang)</text:p>
      <text:p text:style-name="P73">Output<text:tab/>Y : REAL (Ausgang des Reglers)<text:tab/></text:p>
      <text:p text:style-name="P73"><draw:frame draw:style-name="fr3" draw:name="Grafik368" text:anchor-type="paragraph" svg:x="1.002cm" svg:y="0.623cm" svg:width="3.18cm" svg:height="3.99cm" draw:z-index="596"><draw:image xlink:href="Pictures/10000000000000F00000012EC9B3DE67.png" xlink:type="simple" xlink:show="embed" xlink:actuate="onLoad"/></draw:frame><text:tab/>LIM : BOOL (TRUE, wenn der Ausgang ein Limit erreicht hat)</text:p>
      <text:p text:style-name="P73"><text:soft-page-break/><text:line-break/>FT_PI ist ein PI-Regler der nach folgender Formel arbeitet:</text:p>
      <text:p text:style-name="P183">Y = KP * IN + KI * INTEG(IN)</text:p>
      <text:p text:style-name="P66"><text:span text:style-name="T21">Die Eingangswerte ILIM_H und ILIM_L begrenzen den Arbeitsbereich des internen Integrators. Mit RST kann der interne </text:span>Integrator<text:span text:style-name="T21"> jederzeit auf 0 gesetzt werden. Der Ausgang LIM signalisiert das der </text:span><text:span text:style-name="T16">Integrator</text:span><text:span text:style-name="T21"> an eine der Grenzen ILIM_L oder ILIM_H gelaufen ist. Der PI-Regler arbeitet frei laufend und benutzt zur Berechnung des Integrators die Trapezregel für höchste Genauigkeit und optimale Geschwindigkeit. Die Default-Werte der Ein</text:span><text:span text:style-name="T21">gangsparameter sind wie folgt vordefiniert: KP = 1, KI = 1, ILIM_L = -1E38 und ILIM_H = +1E38.</text:span></text:p>
      <text:p text:style-name="P173"><text:span text:style-name="T21">Anti </text:span><text:span text:style-name="T16">Wind-Up</text:span><text:span text:style-name="T21">: Regelbausteine mit Interalanteil neigen zu dem so genannten Wind </text:span><text:span text:style-name="T16">Up Effekt.</text:span><text:span text:style-name="T21"> Ein </text:span><text:span text:style-name="T16">Wind-Up</text:span><text:span text:style-name="T21"> bedeutet das der Integratorbaustein kontinuierlich weiter läuft weil z.B. das Stellsignal Y an einem Anschlag steht und die Regelung über längere Zeit nicht in der Lage ist die Regelabweichung auszugleichen, was dann nach anschließendem Übergang in den Regelbereich erst zu einem langen und Zeitaufwendigen Abbau des Integratorwertes führt und die Regelung nur verzögert reagiert. Da der Integralanteil nur für den Ausgleich der Regelabweichung nach allen anderen Regelanteilen nötig ist, kann und sollte der Bereich des Integrators mit den Werten ILIM begrenzt werden. Der </text:span><text:span text:style-name="T16">Integrator</text:span><text:span text:style-name="T21"> wird dann bei Erreichen ei</text:span><text:span text:style-name="T21">nes </text:span><text:span text:style-name="T16">Limits</text:span><text:span text:style-name="T21"> ge</text:span><text:span text:style-name="T21">stoppt und verharrt auf dem letzten gültigen </text:span><text:span text:style-name="T21">Wert. Für andere Wind-</text:span><text:span text:style-name="T16">Up</text:span><text:span text:style-name="T21"> Maßnahmen kann </text:span><text:span text:style-name="T21">der </text:span><text:span text:style-name="T16">Integrator</text:span><text:span text:style-name="T21"> jederzeit mit dem Eingang IEN = FALSE separat gesteuert werden, der </text:span><text:span text:style-name="T16">Integrator</text:span><text:span text:style-name="T21"> läuft nur wenn IEN = TRUE.</text:span></text:p>
      <text:p text:style-name="P183"><draw:frame draw:style-name="fr3" draw:name="Grafik369" text:anchor-type="paragraph" svg:x="1.134cm" svg:y="0.617cm" svg:width="5.3cm" svg:height="3.57cm" draw:z-index="587"><draw:image xlink:href="Pictures/100000000000011E000000C1EB7B3A5F.png" xlink:type="simple" xlink:show="embed" xlink:actuate="onLoad"/></draw:frame>Die folgende Grafik verdeutlicht die interne Struktur des Reglers:</text:p>
      <text:p text:style-name="P179"/>
      <text:p text:style-name="P179"><draw:frame draw:style-name="fr3" draw:name="Grafik596" text:anchor-type="paragraph" svg:x="1.069cm" svg:y="1.148cm" svg:width="13.831cm" svg:height="2.979cm" draw:z-index="597"><draw:image xlink:href="Pictures/10000000000002B9000000968052015A.png" xlink:type="simple" xlink:show="embed" xlink:actuate="onLoad"/></draw:frame>FT_PI kann zusammen mit den Bausteinen CTRL_IN und CTRL_OUT zum Aufbau eines PI Reglers benutzt werden.</text:p>
      <text:p text:style-name="P252"><text:soft-page-break/></text:p>
      <text:list xml:id="list38446350" text:continue-numbering="true" text:style-name="L1">
        <text:list-item>
          <text:list>
            <text:list-item>
              <text:h text:style-name="P216" text:outline-level="2"><text:alphabetical-index-mark-start text:id="IMark211656492"/>FT_PID<text:alphabetical-index-mark-end text:id="IMark211656492"/></text:h>
            </text:list-item>
          </text:list>
        </text:list-item>
      </text:list>
      <text:p text:style-name="P69">Type<text:tab/>Funktionsbaustein</text:p>
      <text:p text:style-name="P66"><text:span text:style-name="T15">Input</text:span><text:span text:style-name="T14"><text:tab/>IN : REAL (Eingangswert)</text:span></text:p>
      <text:p text:style-name="P69"><text:tab/>KP : REAL (Verstärkung des Reglers)</text:p>
      <text:p text:style-name="P69"><text:tab/>TN : REAL (Nachstellzeit des Reglers in Sekunden)</text:p>
      <text:p text:style-name="P69"><text:tab/>TV : REAL (Vorhaltezeit des Reglers in Sekunden)</text:p>
      <text:p text:style-name="P69"><text:tab/>ILIM_L : REAL (untere Ausgangsbegrenzung des Integrators)</text:p>
      <text:p text:style-name="P69"><text:tab/>ILIM_H : REAL (obere Ausgangsbegrenzung des Integrators)</text:p>
      <text:p text:style-name="P173"><text:span text:style-name="T14"><text:tab/>IEN : BOOL (</text:span><text:span text:style-name="T15">Enable</text:span><text:span text:style-name="T14"> für den </text:span><text:span text:style-name="T15">Integrator</text:span><text:span text:style-name="T14">)</text:span></text:p>
      <text:p text:style-name="P179"><text:tab/>RST : BOOL (Asynchroner Reset-Eingang)</text:p>
      <text:p text:style-name="P73">Output<text:tab/>Y : REAL (Ausgang des Reglers)<text:tab/></text:p>
      <text:p text:style-name="P73"><draw:frame draw:style-name="fr3" draw:name="Grafik204" text:anchor-type="paragraph" svg:x="1.025cm" svg:y="0.649cm" svg:width="3.18cm" svg:height="4.44cm" draw:z-index="598"><draw:image xlink:href="Pictures/10000000000000F000000150590A32A5.png" xlink:type="simple" xlink:show="embed" xlink:actuate="onLoad"/></draw:frame><text:tab/>LIM : BOOL (TRUE, wenn der Ausgang ein Limit erreicht hat)</text:p>
      <text:p text:style-name="P183"><text:line-break/>FT_PID ist ein PID-Regler der nach folgender Formel arbeitet:</text:p>
      <text:p text:style-name="P183">Y = KP * ( IN + 1/TN * INTEG(IN) + TV *DERIV(IN))</text:p>
      <text:p text:style-name="P73">Die Regelparameter werden in der Form KP, TN und TV angegeben, falls die Parameter als KP, KI und KD vorliegen können sie entsprechend der folgenden Formel umgerechnet werden:</text:p>
      <text:p text:style-name="P183"><text:soft-page-break/>TN = KP/KI und TV = KD/KP</text:p>
      <text:p text:style-name="P73">Die Eingangswerte ILIM_H und ILIM_L begrenzen den Arbeitsbereich des internen Integrators. Mit RST kann der interne Integrator jederzeit auf 0 gesetzt werden. Der Ausgang LIM signalisiert das der Integrator an eine der Grenzen ILIM_L oder ILIM_H gelaufen ist. Der PI-Regler arbeitet frei laufend und benutzt zur Berechnung des Integrators die Trapezregel für höchste Genauigkeit und optimale Geschwindigkeit. Die Default-Werte der Eingangsparameter sind wie folgt vordefiniert: KP = 1, TN = 1s, TV = 1s, ILIM_L = -1E38 und ILIM_H = +1E38.</text:p>
      <text:p text:style-name="P173"><text:span text:style-name="T21">Anti </text:span><text:span text:style-name="T16">Wind-Up</text:span><text:span text:style-name="T21">: Regelbausteine mit Interalanteil neigen zu dem so genannten Wind </text:span><text:span text:style-name="T16">Up Effekt.</text:span><text:span text:style-name="T21"> Ein </text:span><text:span text:style-name="T16">Wind-Up</text:span><text:span text:style-name="T21"> bedeutet das der Integratorbaustein kontinuierlich weiter läuft weil z.B. das Stellsignal Y an einem Anschlag steht </text:span><text:span text:style-name="T21">und </text:span><text:span text:style-name="T21">die Regelung über längere Zeit nicht in der Lage ist die Regelabweichung auszugleichen, was dann nach anschließendem Übergang in den Regelbereich erst zu einem langen und Zeitaufwendigen Abbau des Integratorwertes führt und die Regelung nur verzögert reagiert. Da der Integralanteil nur </text:span><text:span text:style-name="T21">für den Ausgleich der Regelabweichung nach allen anderen Regelanteilen nötig ist, kann und sollte der Bereich des Integrators mit den Werten ILIM begrenzt werden. Der </text:span><text:span text:style-name="T16">Integrator</text:span><text:span text:style-name="T21"> wird dann bei Erreichen eines </text:span><text:span text:style-name="T16">Limits</text:span><text:span text:style-name="T21"> gestoppt und verharrt auf dem letzten gültigen Wert. Für andere Wind-</text:span><text:span text:style-name="T16">Up</text:span><text:span text:style-name="T21"> Maßnahmen kann der </text:span><text:span text:style-name="T16">Integrator</text:span><text:span text:style-name="T21"> jederzeit mit dem Eingang IEN = FALSE separat gesteuert werden, der </text:span><text:span text:style-name="T16">Integrator</text:span><text:span text:style-name="T21"> läuft nur wenn IEN = TRUE.</text:span></text:p>
      <text:p text:style-name="P183"><draw:frame draw:style-name="fr3" draw:name="Grafik370" text:anchor-type="paragraph" svg:x="1.067cm" svg:y="0.667cm" svg:width="7.519cm" svg:height="3.5cm" draw:z-index="588"><draw:image xlink:href="Pictures/1000000000000196000000BD42A5D9B7.png" xlink:type="simple" xlink:show="embed" xlink:actuate="onLoad"/></draw:frame>Die folgende Grafik zeigt die interne Struktur des PID Reglers:</text:p>
      <text:p text:style-name="P183"/>
      <text:p text:style-name="P183">FT_PID kann zusammen mit den Bausteinen CTRL_IN und CTRL_OUT zum Aufbau eines PID Reglers benutzt werden.</text:p>
      <text:p text:style-name="P173"><draw:frame draw:style-name="fr3" draw:name="Grafik379" text:anchor-type="paragraph" svg:x="1.09cm" svg:y="0.176cm" svg:width="13.831cm" svg:height="3.311cm" draw:z-index="599"><draw:image xlink:href="Pictures/10000000000002B9000000A767162A86.png" xlink:type="simple" xlink:show="embed" xlink:actuate="onLoad"/></draw:frame></text:p>
      <text:list xml:id="list38471137" text:continue-numbering="true" text:style-name="L1">
        <text:list-item>
          <text:list>
            <text:list-item>
              <text:h text:style-name="P216" text:outline-level="2"><text:soft-page-break/><text:alphabetical-index-mark-start text:id="IMark211656492"/>FT_PIDW<text:alphabetical-index-mark-end text:id="IMark211656492"/></text:h>
            </text:list-item>
          </text:list>
        </text:list-item>
      </text:list>
      <text:p text:style-name="P69">Type<text:tab/>Funktionsbaustein</text:p>
      <text:p text:style-name="P66"><text:span text:style-name="T15">Input</text:span><text:span text:style-name="T14"><text:tab/>IN : REAL (Eingangssignal)</text:span></text:p>
      <text:p text:style-name="P69"><text:tab/>KP : REAL (Proportionaler Anteil des Reglers)</text:p>
      <text:p text:style-name="P69"><text:tab/>TN : REAL (Nachstellzeit des Reglers in Sekunden)</text:p>
      <text:p text:style-name="P179"><text:tab/>TV : REAL (Vorhaltezeit des Reglers in Sekunden)</text:p>
      <text:p text:style-name="P69"><text:tab/>LIM_L : REAL (untere Ausgangsbegrenzung des Integrators)</text:p>
      <text:p text:style-name="P69"><text:tab/>LIM_H : REAL (obere Ausgangsbegrenzung des Integrators)<text:tab/></text:p>
      <text:p text:style-name="P179"><text:tab/>RST : BOOL (Asynchroner Reset-Eingang)</text:p>
      <text:p text:style-name="P73">Output<text:tab/>Y : REAL (Ausgang des Reglers)<text:tab/></text:p>
      <text:p text:style-name="P73"><draw:frame draw:style-name="fr3" draw:name="Grafik606" text:anchor-type="paragraph" svg:x="1.09cm" svg:y="0.667cm" svg:width="3.18cm" svg:height="3.99cm" draw:z-index="602"><draw:image xlink:href="Pictures/10000000000000F00000012E0C86952B.png" xlink:type="simple" xlink:show="embed" xlink:actuate="onLoad"/></draw:frame><text:tab/>LIM : BOOL (TRUE, wenn der Ausgang ein Limit erreicht hat)</text:p>
      <text:p text:style-name="P173"><text:span text:style-name="T21"><text:line-break/>FT_PIDW ist ein PID-Regler mit Anti Wind-</text:span><text:span text:style-name="T16">Up</text:span><text:span text:style-name="T21"> Hold der nach folgender Formel arbeitet:</text:span></text:p>
      <text:p text:style-name="P183">Y = KP * ( IN + 1/TN * INTEG(IN) + TV *DERIV(IN))</text:p>
      <text:p text:style-name="P73">Die Regelparameter werden in der Form KP, TN und TV angegeben, falls die Parameter als KP, KI und KD vorliegen können sie entsprechend der folgenden Formel umgerechnet werden:</text:p>
      <text:p text:style-name="P183">TN = KP/KI und TV = KD/KP</text:p>
      <text:p text:style-name="P66"><text:span text:style-name="T21">Die Eingangswerte LIM_H und LIM_L begrenzen den Wertebereich des Ausgangs Y. Mit RST kann der interne </text:span>Integrator<text:span text:style-name="T21"> jederzeit auf 0 gesetzt werden. Der Ausgang LIM signalisiert das der </text:span><text:span text:style-name="T19">Ausgang</text:span><text:span text:style-name="T16"> Y</text:span><text:span text:style-name="T21"> an eine der Grenzen LIM_L oder LIM_H gelaufen ist. Der Regler arbeitet frei laufend und benutzt zur Berechnung des Integrators die Trapezregel für höchste Genauigkeit und optimale Geschwindigkeit. Die </text:span><text:span text:style-name="T16">Default</text:span><text:span text:style-name="T21">-Werte der Eingangsparameter sind wie folgt vordefiniert: KP = 1, TN = 1s, TV = 1s, <text:s/>ILIM_L = -1E38 und ILIM_H = +1E38.</text:span></text:p>
      <text:p text:style-name="P173"><text:span text:style-name="T21">Anti </text:span><text:span text:style-name="T16">Wind-Up</text:span><text:span text:style-name="T21">: Regelbausteine mit Interalanteil neigen zu dem so genannten Wind-</text:span><text:span text:style-name="T16">Up Effekt.</text:span><text:span text:style-name="T21"> Ein </text:span><text:span text:style-name="T16">Wind-Up</text:span><text:span text:style-name="T21"> bedeutet das der Integratorbaustein kontinuierlich weiter läuft weil z.B. das Stellsignal Y an einem Anschlag steht und die Regelung über längere Zeit nicht in der Lage ist die Regelabwei</text:span><text:span text:style-name="T21">chung </text:span><text:soft-page-break/><text:span text:style-name="T21">auszugleichen, was dann nach anschließendem Übergang in den Regelbereich erst zu einem langen und Zeitauf</text:span><text:span text:style-name="T21">wen</text:span><text:span text:style-name="T21">digen Abbau des In</text:span><text:span text:style-name="T21">tegratorwertes führt und die Regelung nur verzögert reagiert. Da der Integralanteil nur für den Ausgleich der Regelabweichung nach allen anderen Regelanteilen nötig ist, kann und sollte der Bereich des Integrators mit den Werten ILIM begrenzt werden.</text:span></text:p>
      <text:p text:style-name="P66"><text:span text:style-name="T21">Der Baustein FT_PIDW hat einen so genannten Wind-</text:span><text:span text:style-name="T16">Up</text:span><text:span text:style-name="T21"> Hold der bei erreichen einer Ausgangsbegrenzung (LIM_L, LIM_H) den </text:span><text:span text:style-name="T16">Integrator</text:span><text:span text:style-name="T21"> auf dem letzten Wert einfriert und so einen Wind-</text:span><text:span text:style-name="T16">Up</text:span><text:span text:style-name="T21"> verhindert.</text:span></text:p>
      <text:p text:style-name="P183"><draw:frame draw:style-name="fr3" draw:name="Grafik607" text:anchor-type="paragraph" svg:x="1.067cm" svg:y="0.667cm" svg:width="7.519cm" svg:height="3.5cm" draw:z-index="603"><draw:image xlink:href="Pictures/1000000000000196000000BD42A5D9B7.png" xlink:type="simple" xlink:show="embed" xlink:actuate="onLoad"/></draw:frame>Die folgende Grafik zeigt die interne Struktur des PIDW Reglers:</text:p>
      <text:p text:style-name="P37"/>
      <text:p text:style-name="P184">FT_PIDW kann zusammen mit den Bausteinen CTRL_IN und CTRL_OUT zum Aufbau eines PID Reglers benutzt werden.</text:p>
      <text:list xml:id="list38462501" text:continue-numbering="true" text:style-name="L1">
        <text:list-item>
          <text:list>
            <text:list-item>
              <text:h text:style-name="P216" text:outline-level="2"><text:alphabetical-index-mark-start text:id="IMark211656492"/>FT_PIDWL<text:alphabetical-index-mark-end text:id="IMark211656492"/></text:h>
            </text:list-item>
          </text:list>
        </text:list-item>
      </text:list>
      <text:p text:style-name="P69">Type<text:tab/>Funktionsbaustein</text:p>
      <text:p text:style-name="P66"><text:span text:style-name="T15">Input</text:span><text:span text:style-name="T14"><text:tab/>IN : REAL (Eingangssignal)</text:span></text:p>
      <text:p text:style-name="P69"><text:tab/>KP : REAL (Proportionaler Anteil des Reglers)</text:p>
      <text:p text:style-name="P69"><text:tab/>TN : REAL (Nachstellzeit des Reglers in Sekunden)</text:p>
      <text:p text:style-name="P179"><text:tab/>TV : REAL (Vorhaltezeit des Reglers in Sekunden)</text:p>
      <text:p text:style-name="P69"><text:tab/>LIM_L : REAL (untere Ausgangsbegrenzung des Integrators)</text:p>
      <text:p text:style-name="P69"><text:tab/>LIM_H : REAL (obere Ausgangsbegrenzung des Integrators)<text:tab/></text:p>
      <text:p text:style-name="P179"><text:tab/>RST : BOOL (Asynchroner Reset-Eingang)</text:p>
      <text:p text:style-name="P73">Output<text:tab/>Y : REAL (Ausgang des Reglers)<text:tab/></text:p>
      <text:p text:style-name="P73"><draw:frame draw:style-name="fr3" draw:name="Grafik619" text:anchor-type="paragraph" svg:x="1.09cm" svg:y="0.667cm" svg:width="3.18cm" svg:height="3.99cm" draw:z-index="614"><draw:image xlink:href="Pictures/10000000000000F00000012E0C86952B.png" xlink:type="simple" xlink:show="embed" xlink:actuate="onLoad"/></draw:frame><text:tab/>LIM : BOOL (TRUE, wenn der Ausgang ein Limit erreicht hat)</text:p>
      <text:p text:style-name="P173"><text:soft-page-break/><text:span text:style-name="T21"><text:line-break/>FT_PIDW ist ein PID-Regler mit dynamischen Wind-</text:span><text:span text:style-name="T16">Up</text:span><text:span text:style-name="T21"> Reset der nach folgender Formel arbeitet:</text:span></text:p>
      <text:p text:style-name="P183">Y = KP * ( IN + 1/TN * INTEG(IN) + TV *DERIV(IN))</text:p>
      <text:p text:style-name="P73">Die Regelparameter werden in der Form KP, TN und TV angegeben, falls die Parameter als KP, KI und KD vorliegen können sie entsprechend der folgenden Formel umgerechnet werden:</text:p>
      <text:p text:style-name="P183">TN = KP/KI und TV = KD/KP</text:p>
      <text:p text:style-name="P66"><text:span text:style-name="T21">Die Eingangswerte LIM_H und LIM_L begrenzen den Wertebereich des Ausgangs Y. Mit RST kann der interne </text:span>Integrator<text:span text:style-name="T21"> jederzeit auf 0 gesetzt werden. Der Ausgang LIM signalisiert das der </text:span><text:span text:style-name="T19">Ausgang</text:span><text:span text:style-name="T16"> Y</text:span><text:span text:style-name="T21"> an eine der Grenzen LIM_L oder LIM_H gelaufen ist. Der Regler arbeitet frei laufend und benutzt zur Be</text:span><text:span text:style-name="T21">rechnung des Integrators die Trapezregel für höchste Genauigkeit und optimale Geschwindigkeit. Die </text:span><text:span text:style-name="T16">Default</text:span><text:span text:style-name="T21">-Werte der Eingangsparameter sind wie folgt vordefiniert: KP = 1, TN = 1s, TV = 1s, <text:s/>ILIM_L = -1E38 und ILIM_H = +1E38.</text:span></text:p>
      <text:p text:style-name="P173"><text:span text:style-name="T21">Anti </text:span><text:span text:style-name="T16">Wind-Up</text:span><text:span text:style-name="T21">: Regelbausteine mit Interalanteil neigen zu dem so genannten Wind-</text:span><text:span text:style-name="T16">Up Effekt.</text:span><text:span text:style-name="T21"> Ein </text:span><text:span text:style-name="T16">Wind-Up</text:span><text:span text:style-name="T21"> bedeutet das der Integratorbaustein kontinuierlich weiter läuft weil z.B. das Stellsignal Y an einem Anschlag steht und die Regelung über längere Zeit nicht in der Lage ist die Regelabweichung auszugleichen, was dann nach anschließendem </text:span><text:span text:style-name="T21">Übergang in den Regelbereich erst zu einem langen und Zeitaufwen</text:span><text:span text:style-name="T21">digen Abbau des Integratorwertes führt und die Regelung nur verzögert reagiert. Da der Integralanteil nur für den Ausgleich der Regelabweichung nach allen anderen Regelanteilen nötig ist, kann und sollte der Bereich des Integrators mit den Werten ILIM begrenzt werden.</text:span></text:p>
      <text:p text:style-name="P66"><text:span text:style-name="T21">Der Baustein FT_PIW hat einen so genannten dynamischen Wind-</text:span><text:span text:style-name="T16">Up</text:span><text:span text:style-name="T21"> Reset der bei erreichen einer Ausgangsbegrenzung (LIM_L, LIM_H) den </text:span><text:span text:style-name="T16">Integrator</text:span><text:span text:style-name="T21"> auf einen Wert zurücksetzt der dem Ausgangslimit entspricht. Wenn nach erreichen einen </text:span><text:span text:style-name="T16">Limits</text:span><text:span text:style-name="T21"> der Regler wieder in den Arbeitsbereich eintritt muss der </text:span><text:span text:style-name="T16">Integrator</text:span><text:span text:style-name="T21"> nicht erst Auf- oder Ab- integriert werden, und der Regler ist ohne Verzögerung sofort Einsatzbereit. Die dynamische Anti Wind-</text:span><text:span text:style-name="T16">Up</text:span><text:span text:style-name="T21"> Methode ist die in den meisten Fällen ohne Nachteile vorzuziehende Methode, da Sie den Regler nicht negativ beeinflusst und die Nachteile des Wind_</text:span><text:span text:style-name="T16">Up</text:span><text:span text:style-name="T21"> verhindert.</text:span></text:p>
      <text:p text:style-name="P183"><draw:frame draw:style-name="fr3" draw:name="Grafik620" text:anchor-type="paragraph" svg:x="1.067cm" svg:y="0.667cm" svg:width="7.519cm" svg:height="3.5cm" draw:z-index="615"><draw:image xlink:href="Pictures/1000000000000196000000BD42A5D9B7.png" xlink:type="simple" xlink:show="embed" xlink:actuate="onLoad"/></draw:frame>Die folgende Grafik zeigt die interne Struktur des PIDW Reglers:</text:p>
      <text:p text:style-name="P37"><text:soft-page-break/></text:p>
      <text:p text:style-name="P184">FT_PIDW kann zusammen mit den Bausteinen CTRL_IN und CTRL_OUT zum Aufbau eines PID Reglers benutzt werden.</text:p>
      <text:list xml:id="list38474771" text:continue-numbering="true" text:style-name="L1">
        <text:list-item>
          <text:list>
            <text:list-item>
              <text:h text:style-name="P216" text:outline-level="2"><text:alphabetical-index-mark-start text:id="IMark211656492"/>FT_PIW<text:alphabetical-index-mark-end text:id="IMark211656492"/></text:h>
            </text:list-item>
          </text:list>
        </text:list-item>
      </text:list>
      <text:p text:style-name="P69">Type<text:tab/>Funktionsbaustein</text:p>
      <text:p text:style-name="P66"><text:span text:style-name="T15">Input</text:span><text:span text:style-name="T14"><text:tab/>IN : REAL (Eingangssignal)</text:span></text:p>
      <text:p text:style-name="P69"><text:tab/>KP : REAL (Proportionaler Anteil des Reglers)</text:p>
      <text:p text:style-name="P69"><text:tab/>KI : REAL (Integraler Anteil des Reglers)</text:p>
      <text:p text:style-name="P69"><text:tab/>LIM_L : REAL (untere Ausgangsbegrenzung des Integrators)</text:p>
      <text:p text:style-name="P69"><text:tab/>LIM_H : REAL (obere Ausgangsbegrenzung des Integrators)<text:tab/></text:p>
      <text:p text:style-name="P179"><text:tab/>RST : BOOL (Asynchroner Reset-Eingang)</text:p>
      <text:p text:style-name="P73">Output<text:tab/>Y : REAL (Ausgang des Reglers)<text:tab/></text:p>
      <text:p text:style-name="P73"><draw:frame draw:style-name="fr3" draw:name="Grafik605" text:anchor-type="paragraph" svg:x="1.002cm" svg:y="0.667cm" svg:width="3.18cm" svg:height="3.54cm" draw:z-index="601"><draw:image xlink:href="Pictures/10000000000000F00000010C63930DF9.png" xlink:type="simple" xlink:show="embed" xlink:actuate="onLoad"/></draw:frame><text:tab/>LIM : BOOL (TRUE, wenn der Ausgang ein Limit erreicht hat)</text:p>
      <text:p text:style-name="P66"><text:span text:style-name="T21"><text:line-break/>FT_PIW ist ein PI-Regler mit Anti Wind-</text:span><text:span text:style-name="T16">Up</text:span><text:span text:style-name="T21"> </text:span><text:span text:style-name="T16">Hold</text:span><text:span text:style-name="T21"> der nach folgender Formel arbeitet:</text:span></text:p>
      <text:p text:style-name="P183">Y = KP * IN + KI * INTEG(IN)</text:p>
      <text:p text:style-name="P66"><text:span text:style-name="T21">Die Eingangswerte LIM_H und LIM_L begrenzen den Wertebereich des Ausgangs Y. Mit RST kann der interne </text:span>Integrator<text:span text:style-name="T21"> jederzeit auf 0 gesetzt werden. Der Ausgang LIM signalisiert das der </text:span><text:span text:style-name="T19">Ausgang</text:span><text:span text:style-name="T16"> Y</text:span><text:span text:style-name="T21"> an eine der Grenzen LIM_L oder LIM_H gelaufen ist. Der Regler arbeitet frei laufend und benutzt </text:span><text:span text:style-name="T21">zur Be</text:span><text:soft-page-break/><text:span text:style-name="T21">rechnung des Integrators die Trapezregel </text:span><text:span text:style-name="T21">für höchste Genauigkeit und optimale Geschwindigkeit. Die </text:span><text:span text:style-name="T16">Default</text:span><text:span text:style-name="T21">-Werte </text:span><text:span text:style-name="T21">der Eingangsparameter sind wie folgt vordefiniert: KP = 1, KI = 1, ILIM_L = -1E38 und ILIM_H = +1E38.</text:span></text:p>
      <text:p text:style-name="P173"><text:span text:style-name="T21">Anti </text:span><text:span text:style-name="T16">Wind-Up</text:span><text:span text:style-name="T21">: Regelbausteine mit Interalanteil neigen zu dem so genannten Wind </text:span><text:span text:style-name="T16">Up Effekt.</text:span><text:span text:style-name="T21"> Ein </text:span><text:span text:style-name="T16">Wind-Up</text:span><text:span text:style-name="T21"> bedeutet das der Integratorbaustein kontinuierlich weiter läuft weil z.B. das Stellsignal Y an einem Anschlag steht und die Regelung über längere Zeit nicht in der Lage ist die Regelabweichung auszugleichen, was dann nach anschließendem Übergang in den Regelbereich erst zu einem langen und Zeitaufwen</text:span><text:span text:style-name="T21">digen Abbau des Integratorwertes führt und die Regelung nur verzögert reagiert. Da der Integralanteil nur für den Ausgleich der Regelabweichung nach allen anderen Regelanteilen nötig ist, kann und sollte der Bereich des Integrators mit den Werten ILIM begrenzt werden.</text:span></text:p>
      <text:p text:style-name="P173"><text:span text:style-name="T21">Der Baustein FT_PIW hat einen so genannten Wind-</text:span><text:span text:style-name="T16">Up</text:span><text:span text:style-name="T21"> Hold der bei erreichen einer Ausgangsbegrenzung (LIM_L, LIM_H) den </text:span><text:span text:style-name="T16">Integrator</text:span><text:span text:style-name="T21"> auf dem letzten Wert einfriert und so einen Wind-</text:span><text:span text:style-name="T16">Up</text:span><text:span text:style-name="T21"> verhindert.</text:span></text:p>
      <text:p text:style-name="P183"><draw:frame draw:style-name="fr3" draw:name="Grafik604" text:anchor-type="paragraph" svg:x="1.09cm" svg:y="0.67cm" svg:width="5.3cm" svg:height="3.57cm" draw:z-index="600"><draw:image xlink:href="Pictures/100000000000011E000000C1EB7B3A5F.png" xlink:type="simple" xlink:show="embed" xlink:actuate="onLoad"/></draw:frame>Die folgende Grafik verdeutlicht die interne Struktur des Reglers:</text:p>
      <text:p text:style-name="P179"/>
      <text:p text:style-name="P179">FT_PIW kann zusammen mit den Bausteinen CTRL_IN und CTRL_OUT zum Aufbau komplexer Regler benutzt werden.</text:p>
      <text:list xml:id="list38469610" text:continue-numbering="true" text:style-name="L1">
        <text:list-item>
          <text:list>
            <text:list-item>
              <text:h text:style-name="P216" text:outline-level="2"><text:alphabetical-index-mark-start text:id="IMark211656492"/>FT_PIWL<text:alphabetical-index-mark-end text:id="IMark211656492"/></text:h>
            </text:list-item>
          </text:list>
        </text:list-item>
      </text:list>
      <text:p text:style-name="P69">Type<text:tab/>Funktionsbaustein</text:p>
      <text:p text:style-name="P66"><text:span text:style-name="T15">Input</text:span><text:span text:style-name="T14"><text:tab/>IN : REAL (Eingangssignal)</text:span></text:p>
      <text:p text:style-name="P69"><text:tab/>KP : REAL (Proportionaler Anteil des Reglers)</text:p>
      <text:p text:style-name="P69"><text:tab/>KI : REAL (Integraler Anteil des Reglers)</text:p>
      <text:p text:style-name="P69"><text:tab/>LIM_L : REAL (untere Ausgangsbegrenzung des Integrators)</text:p>
      <text:p text:style-name="P69"><text:tab/>LIM_H : REAL (obere Ausgangsbegrenzung des Integrators)<text:tab/></text:p>
      <text:p text:style-name="P179"><text:tab/>RST : BOOL (Asynchroner Reset-Eingang)</text:p>
      <text:p text:style-name="P73"><text:soft-page-break/>Output<text:tab/>Y : REAL (Ausgang des Reglers)<text:tab/></text:p>
      <text:p text:style-name="P73"><draw:frame draw:style-name="fr3" draw:name="Grafik618" text:anchor-type="paragraph" svg:x="1.002cm" svg:y="0.667cm" svg:width="3.18cm" svg:height="3.54cm" draw:z-index="613"><draw:image xlink:href="Pictures/10000000000000F00000010C63930DF9.png" xlink:type="simple" xlink:show="embed" xlink:actuate="onLoad"/></draw:frame><text:tab/>LIM : BOOL (TRUE, wenn der Ausgang ein Limit erreicht hat)</text:p>
      <text:p text:style-name="P66"><text:span text:style-name="T21"><text:line-break/>FT_PIWL ist ein PI-Regler mit dynamischen Anti Wind-</text:span><text:span text:style-name="T16">Up</text:span><text:span text:style-name="T21"> der nach folgender Formel arbeitet:</text:span></text:p>
      <text:p text:style-name="P183">Y = KP * IN + KI * INTEG(IN)</text:p>
      <text:p text:style-name="P66"><text:span text:style-name="T21">Die Eingangswerte LIM_H und LIM_L begrenzen den Wertebereich des Ausgangs Y. Mit RST kann der interne </text:span>Integrator<text:span text:style-name="T21"> jederzeit auf 0 gesetzt werden. Der Ausgang LIM signalisiert das der </text:span><text:span text:style-name="T19">Ausgang</text:span><text:span text:style-name="T16"> Y</text:span><text:span text:style-name="T21"> an eine der Grenzen LIM_L oder LIM_H gelaufen ist. Der Regler arbeitet frei laufend und benutzt zur Be</text:span><text:span text:style-name="T21">rechnung des Integrators die Trapezregel für höchste Genauigkeit und optimale Geschwindigkeit. Die </text:span><text:span text:style-name="T16">Default</text:span><text:span text:style-name="T21">-Werte der Eingangsparameter sind wie folgt vordefiniert: KP = 1, KI = 1, ILIM_L = -1E38 und ILIM_H = +1E38.</text:span></text:p>
      <text:p text:style-name="P173"><text:span text:style-name="T21">Anti </text:span><text:span text:style-name="T16">Wind-Up</text:span><text:span text:style-name="T21">: Regelbausteine mit Interalanteil neigen zu dem so genannten Wind </text:span><text:span text:style-name="T16">Up Effekt.</text:span><text:span text:style-name="T21"> Ein </text:span><text:span text:style-name="T16">Wind-Up</text:span><text:span text:style-name="T21"> bedeutet das der Integratorbaustein kontinuierlich weiter läuft weil z.B. das Stellsignal Y an einem Anschlag steht und die Regelung über längere Zeit nicht in der Lage ist die Regelabweichung auszugleichen, was dann nach anschließendem Übergang in den Regelbereich erst zu einem langen und Zeitaufwendigen Abbau des Integratorwertes führt und die Regelung nur verzögert reagiert. Da der Integralanteil nur für den Ausgleich der Regelabweichung nach allen anderen Regelanteilen nötig ist, kann und sollte der Bereich des Integrators mit den Werten ILIM begrenzt werden.</text:span></text:p>
      <text:p text:style-name="P173"><text:span text:style-name="T21">Der Baustein FT_PIWL hat einen so genannten dynamischen Wind-</text:span><text:span text:style-name="T16">Up</text:span><text:span text:style-name="T21"> Reset der bei erreichen einer Ausgangsbegrenzung (LIM_L, LIM_H) den </text:span><text:span text:style-name="T16">Integrator</text:span><text:span text:style-name="T21"> auf einen Wert </text:span><text:span text:style-name="T21">zurücksetzt der dem Ausgangslimit entspricht. Wenn nach erreichen einen </text:span><text:span text:style-name="T16">Limits</text:span><text:span text:style-name="T21"> der Reg</text:span><text:span text:style-name="T21">ler wieder in den Arbeitsbereich eintritt muss der </text:span><text:span text:style-name="T16">Integrator</text:span><text:span text:style-name="T21"> nicht erst Auf- oder Ab- integriert werden, und der Regler ist ohne Verzögerung sofort Einsatzbereit. Die dynamische Anti Wind-</text:span><text:span text:style-name="T16">Up</text:span><text:span text:style-name="T21"> Methode ist die in den meisten Fällen ohne Nachteile vorzuziehende Methode, da Sie den Regler nicht negativ beeinflusst und die Nachteile des Wind_</text:span><text:span text:style-name="T16">Up</text:span><text:span text:style-name="T21"> verhindert.</text:span></text:p>
      <text:p text:style-name="P183"><draw:frame draw:style-name="fr3" draw:name="Grafik617" text:anchor-type="paragraph" svg:x="1.09cm" svg:y="0.67cm" svg:width="5.3cm" svg:height="3.57cm" draw:z-index="612"><draw:image xlink:href="Pictures/100000000000011E000000C1EB7B3A5F.png" xlink:type="simple" xlink:show="embed" xlink:actuate="onLoad"/></draw:frame>Die folgende Grafik verdeutlicht die interne Struktur des Reglers:</text:p>
      <text:p text:style-name="P183"><text:soft-page-break/></text:p>
      <text:p text:style-name="P189">FT_PIWL kann zusammen mit den Bausteinen CTRL_IN und CTRL_OUT zum Aufbau komplexer Regler benutzt werden.</text:p>
      <text:list xml:id="list38467452" text:continue-numbering="true" text:style-name="L1">
        <text:list-item>
          <text:list>
            <text:list-item>
              <text:h text:style-name="P216" text:outline-level="2"><text:alphabetical-index-mark-start text:id="IMark211656492"/>FT_PT1<text:alphabetical-index-mark-end text:id="IMark211656492"/></text:h>
            </text:list-item>
          </text:list>
        </text:list-item>
      </text:list>
      <text:p text:style-name="P69">Type<text:tab/>Funktionsbaustein</text:p>
      <text:p text:style-name="P66"><text:span text:style-name="T15">Input</text:span><text:span text:style-name="T14"><text:tab/>IN : REAL (Eingangssignal)</text:span></text:p>
      <text:p text:style-name="P69"><text:tab/>T : TIME (Zeitkonstante)</text:p>
      <text:p text:style-name="P73"><text:tab/>K : REAL (Multiplikator)</text:p>
      <text:p text:style-name="P73"><draw:frame draw:style-name="fr3" draw:name="Grafik71" text:anchor-type="paragraph" svg:x="1.083cm" svg:y="0.66cm" svg:width="2.281cm" svg:height="2.2cm" draw:z-index="163"><draw:image xlink:href="Pictures/10000000000000AC000000A67F0AD6E1.png" xlink:type="simple" xlink:show="embed" xlink:actuate="onLoad"/></draw:frame>Output<text:tab/>OUT : REAL (Ausgangssignal)</text:p>
      <text:p text:style-name="P2"><text:line-break/>FT_PT1 ist ein LZI-<text:span text:style-name="T11">Übertragungsglied</text:span> mit einem proportionalen Übertragungsverhalten 1. Ordnung, auch als Tiefpass Filter 1. Ordnung bezeichnet. Der Multiplikator K legt den Verstärkungsfaktor ( Multiplikator) fest und T die Zeitkonstante.<text:line-break/>Eine Änderung am Eingang wird am Ausgang gedämpft sichtbar. Das Ausgangssignal steigt innerhalb von T auf 63% des Eingangswerts und <text:s/>nach 3 * T auf 95% des Eingangswerts an. Somit ist nach einer sprunghaften Änderung des Eingangssignals von 0 auf 10 der Ausgang zum Zeitpunkt der Eingangsänderung 0, steigt nach 1 * T auf 6,3 an und erreicht nach 3 * T 9,5 und nähert sich dann asymptotisch dem Wert 10 an. Beim ersten Aufruf wird der Ausgang OUT mit dem Eingangswert IN initialisiert um ein definiertes Anlauf Verhalten zu gewährleisten. Falls der Eingang T gleich T#0s ist entspricht der Ausgang OUT = K * IN.</text:p>
      <text:p text:style-name="P183"><draw:frame draw:style-name="fr3" draw:name="Grafik554" text:anchor-type="paragraph" svg:x="2.148cm" svg:y="0.667cm" svg:width="7.121cm" svg:height="2.679cm" draw:z-index="537"><draw:image xlink:href="Pictures/100000000000021A000000CBE056F602.png" xlink:type="simple" xlink:show="embed" xlink:actuate="onLoad"/></draw:frame>Strukturbild:</text:p>
      <text:p text:style-name="P183"><draw:frame draw:style-name="fr3" draw:name="Grafik79" text:anchor-type="paragraph" svg:x="0.979cm" svg:y="3.762cm" svg:width="12.3cm" svg:height="5.32cm" draw:z-index="165"><draw:image xlink:href="Pictures/1000000000000245000001923E2FE58F.png" xlink:type="simple" xlink:show="embed" xlink:actuate="onLoad"/></draw:frame><text:soft-page-break/>Sprungantwort für T=1s, K=1</text:p>
      <text:p text:style-name="P184"/>
      <text:list xml:id="list38475467" text:continue-numbering="true" text:style-name="L1">
        <text:list-item>
          <text:list>
            <text:list-item>
              <text:h text:style-name="P216" text:outline-level="2"><text:alphabetical-index-mark-start text:id="IMark211656492"/>FT_PT2<text:alphabetical-index-mark-end text:id="IMark211656492"/></text:h>
            </text:list-item>
          </text:list>
        </text:list-item>
      </text:list>
      <text:p text:style-name="P69">Type<text:tab/>Funktionsbaustein</text:p>
      <text:p text:style-name="P66"><text:span text:style-name="T15">Input</text:span><text:span text:style-name="T14"><text:tab/>IN : REAL (Eingangssignal)</text:span></text:p>
      <text:p text:style-name="P69"><text:tab/>T : REAL (Zeitkonstante)</text:p>
      <text:p text:style-name="P73"><text:tab/>D : REAL (Dämpfung)</text:p>
      <text:p text:style-name="P73"><text:tab/>K : REAL (Multiplikator)</text:p>
      <text:p text:style-name="P73"><draw:frame draw:style-name="fr14" draw:name="Grafik72" text:anchor-type="paragraph" svg:x="1.041cm" svg:y="0.644cm" svg:width="2.281cm" svg:height="2.649cm" draw:z-index="164"><draw:image xlink:href="Pictures/10000000000000AC000000C8E04E1013.png" xlink:type="simple" xlink:show="embed" xlink:actuate="onLoad"/></draw:frame>Output<text:tab/>OUT : REAL (Ausgangssignal)</text:p>
      <text:p text:style-name="P73"><text:line-break/>FT_PT2 ist ein LZI-Übertragungsglied mit einem proportionalen Übertragungsverhalten 2. Ordnung, auch als Tiefpass Filter 2. Ordnung bekannt. Der Multiplikator K legt den Verstärkungsfaktor ( Multiplikator) fest, T und D die Zeitkonstante und die Dämpfung. Falls der Eingang T gleich T#0s ist entspricht der Ausgang OUT = K * IN.</text:p>
      <text:p text:style-name="P183"><text:soft-page-break/>Die entsprechende Funktionalbeziehung in Zeitbereich ist folgende Differenzialgleichung gegeben:</text:p>
      <text:p text:style-name="P183">T² * OUT''(T) + 2 * D* T * OUT'(T) + OUT(T) = K * in(T).</text:p>
      <text:p text:style-name="P73"><draw:frame draw:style-name="fr3" draw:name="Grafik374" text:anchor-type="paragraph" svg:x="3.56cm" svg:y="0.896cm" svg:width="5.11cm" svg:height="2.6cm" draw:z-index="350"><draw:image xlink:href="Pictures/10000000000003040000018989C596AA.png" xlink:type="simple" xlink:show="embed" xlink:actuate="onLoad"/></draw:frame>Strukturbild:</text:p>
      <text:p text:style-name="P183"><draw:g text:anchor-type="paragraph" draw:z-index="166" draw:style-name="gr1"><draw:frame draw:style-name="gr32" draw:text-style-name="P264" svg:width="13.001cm" svg:height="5.811cm" svg:x="1.05cm" svg:y="3.551cm"><draw:image xlink:href="Pictures/10000000000002450000018F25A869AE.png" xlink:type="simple" xlink:show="embed" xlink:actuate="onLoad"><text:p/></draw:image></draw:frame><draw:frame draw:style-name="gr33" draw:text-style-name="P265" svg:width="2.075cm" svg:height="2.015cm" svg:x="3.197cm" svg:y="3.789cm"><draw:text-box><text:p text:style-name="P258"><text:span text:style-name="T35">D=0.2</text:span></text:p></draw:text-box></draw:frame><draw:frame draw:style-name="gr34" draw:text-style-name="P265" svg:width="2.077cm" svg:height="1.154cm" svg:x="2.274cm" svg:y="6.592cm"><draw:text-box><text:p text:style-name="P258"><text:span text:style-name="T35">D=1</text:span></text:p></draw:text-box></draw:frame><draw:frame draw:style-name="gr34" draw:text-style-name="P265" svg:width="2.077cm" svg:height="1.154cm" svg:x="7.885cm" svg:y="6.401cm"><draw:text-box><text:p text:style-name="P258"><text:span text:style-name="T35">D=5</text:span></text:p></draw:text-box></draw:frame></draw:g>Sprungantwort für T=1, K=2, D=0,2 / 1 / 5</text:p>
      <text:p text:style-name="P183"/>
      <text:list xml:id="list38453895" text:continue-numbering="true" text:style-name="L1">
        <text:list-item>
          <text:list>
            <text:list-item>
              <text:h text:style-name="P216" text:outline-level="2"><text:alphabetical-index-mark-start text:id="IMark229571112"/>FT_TN16<text:alphabetical-index-mark-end text:id="IMark229571112"/></text:h>
            </text:list-item>
          </text:list>
        </text:list-item>
      </text:list>
      <text:p text:style-name="P69">Type<text:tab/>Funktionsbaustein</text:p>
      <text:p text:style-name="P66"><text:span text:style-name="T15">Input</text:span><text:span text:style-name="T14"><text:tab/>IN : REAL (Eingangssignal)</text:span></text:p>
      <text:p text:style-name="P73"><text:tab/>T : REAL (Verzögerungszeit)</text:p>
      <text:p text:style-name="P73"><draw:frame draw:style-name="fr3" draw:name="Grafik74" text:anchor-type="paragraph" svg:x="1.09cm" svg:y="0.672cm" svg:width="2.281cm" svg:height="1.75cm" draw:z-index="169"><draw:image xlink:href="Pictures/10000000000000AC0000008416BD044A.png" xlink:type="simple" xlink:show="embed" xlink:actuate="onLoad"/></draw:frame>Output<text:tab/>OUT : REAL (Ausgangssignal)</text:p>
      <text:p text:style-name="P73"><text:line-break/>FT_TN16 verzögert ein Eingangssignal um eine einstellbare Zeit T und tastet es in der Zeit T 16 mal ab. Nach jedem update des Ausgangssignals OUT wird TRIG für einen Zyklus TRUE.</text:p>
      <text:p text:style-name="P183"><draw:g text:anchor-type="paragraph" draw:z-index="568" draw:style-name="gr1"><draw:line draw:style-name="gr2" draw:text-style-name="P257" svg:x1="2.166cm" svg:y1="2.578cm" svg:x2="3.424cm" svg:y2="2.578cm"><text:p/></draw:line><draw:line draw:style-name="gr2" draw:text-style-name="P257" svg:x1="3.427cm" svg:y1="2.189cm" svg:x2="3.427cm" svg:y2="2.576cm"><text:p/></draw:line><draw:line draw:style-name="gr2" draw:text-style-name="P257" svg:x1="3.427cm" svg:y1="2.189cm" svg:x2="4.715cm" svg:y2="2.189cm"><text:p/></draw:line><draw:line draw:style-name="gr2" draw:text-style-name="P257" svg:x1="4.711cm" svg:y1="1.965cm" svg:x2="4.711cm" svg:y2="2.192cm"><text:p/></draw:line><draw:line draw:style-name="gr2" draw:text-style-name="P257" svg:x1="4.711cm" svg:y1="1.965cm" svg:x2="5.399cm" svg:y2="1.965cm"><text:p/></draw:line><draw:line draw:style-name="gr2" draw:text-style-name="P257" svg:x1="7.98cm" svg:y1="1.651cm" svg:x2="8.574cm" svg:y2="1.651cm"><text:p/></draw:line><draw:line draw:style-name="gr2" draw:text-style-name="P257" svg:x1="8.588cm" svg:y1="1.024cm" svg:x2="8.581cm" svg:y2="1.651cm"><text:p/></draw:line><draw:line draw:style-name="gr2" draw:text-style-name="P257" svg:x1="8.588cm" svg:y1="1.024cm" svg:x2="9.874cm" svg:y2="1.024cm"><text:p/></draw:line><draw:line draw:style-name="gr2" draw:text-style-name="P257" svg:x1="9.874cm" svg:y1="0.643cm" svg:x2="9.874cm" svg:y2="1.03cm"><text:p/></draw:line><draw:line draw:style-name="gr60" draw:text-style-name="P257" svg:x1="2.161cm" svg:y1="2.634cm" svg:x2="2.166cm" svg:y2="0.257cm"><text:p/></draw:line><draw:line draw:style-name="gr60" draw:text-style-name="P257" svg:x1="7.999cm" svg:y1="2.578cm" svg:x2="11.957cm" svg:y2="2.578cm"><text:p/></draw:line><draw:line draw:style-name="gr23" draw:text-style-name="P257" svg:x1="2.067cm" svg:y1="2.578cm" svg:x2="6.023cm" svg:y2="2.578cm"><text:p/></draw:line><draw:path draw:style-name="gr72" draw:text-style-name="P257" svg:width="2.682cm" svg:height="0.391cm" svg:x="2.769cm" svg:y="1.861cm" svg:viewBox="0 0 2683 392" svg:d="m0 392c115-16 252-18 365-34 136-18 281-19 401-56 100-30 285-39 363-75 88-39 219-39 328-59s256-11 363-35c124-31 231-62 378-83 118-17 249-27 363-45l122-5v0"><text:p/></draw:path><draw:line draw:style-name="gr2" draw:text-style-name="P257" svg:x1="2.161cm" svg:y1="2.578cm" svg:x2="3.449cm" svg:y2="2.578cm"><text:p/></draw:line><draw:line draw:style-name="gr21" draw:text-style-name="P257" svg:x1="2.178cm" svg:y1="3.056cm" svg:x2="11.29cm" svg:y2="3.056cm"><text:p/></draw:line><draw:frame draw:style-name="gr76" draw:text-style-name="P261" svg:width="0.937cm" svg:height="0.983cm" svg:x="6.521cm" svg:y="2.9cm"><draw:text-box><text:p text:style-name="P258"><text:span text:style-name="T34">T</text:span></text:p></draw:text-box></draw:frame><draw:frame draw:style-name="gr77" draw:text-style-name="P260" svg:width="0.937cm" svg:height="0.576cm" svg:x="10.709cm" svg:y="2.558cm"><draw:text-box><text:p text:style-name="P258"><text:span text:style-name="T33">16</text:span></text:p></draw:text-box></draw:frame><draw:line draw:style-name="gr2" draw:text-style-name="P257" svg:x1="9.874cm" svg:y1="0.635cm" svg:x2="11.16cm" svg:y2="0.635cm"><text:p/></draw:line><draw:line draw:style-name="gr2" draw:text-style-name="P257" svg:x1="11.158cm" svg:y1="0.828cm" svg:x2="11.16cm" svg:y2="0.635cm"><text:p/></draw:line><draw:line draw:style-name="gr2" draw:text-style-name="P257" svg:x1="11.158cm" svg:y1="0.83cm" svg:x2="11.752cm" svg:y2="0.83cm"><text:p/></draw:line><draw:path draw:style-name="gr72" draw:text-style-name="P257" svg:width="4.188cm" svg:height="0.891cm" svg:x="7.576cm" svg:y="0.561cm" svg:viewBox="0 0 4189 892" svg:d="m0 892c162-11 286-63 402-110s222-97 311-161c79-58 188-110 284-164s234-97 354-145c115-44 231-88 371-119 114-28 268-12 356-56 102-52 224-75 354-94 122-16 226-43 357-43 113 52 233 104 368 147 111 37 247 51 355 89 125 42 236 83 356 121l120 28 141 33 60 12"><text:p/></draw:path><draw:frame draw:style-name="gr78" draw:text-style-name="P273" svg:width="0.863cm" svg:height="0.659cm" svg:x="2.097cm" svg:y="2.101cm"><draw:text-box><text:p text:style-name="P258"><text:span text:style-name="T41">IN</text:span></text:p></draw:text-box></draw:frame><draw:frame draw:style-name="gr64" draw:text-style-name="P274" svg:width="1.378cm" svg:height="0.659cm" svg:x="8.668cm" svg:y="1.493cm"><draw:text-box><text:p text:style-name="P258"><text:span text:style-name="T42">OUT</text:span></text:p></draw:text-box></draw:frame><draw:frame draw:style-name="gr77" draw:text-style-name="P260" svg:width="0.937cm" svg:height="0.576cm" svg:x="9.52cm" svg:y="2.558cm"><draw:text-box><text:p text:style-name="P258"><text:span text:style-name="T33">15</text:span></text:p></draw:text-box></draw:frame><draw:frame draw:style-name="gr77" draw:text-style-name="P260" svg:width="0.937cm" svg:height="0.576cm" svg:x="8.269cm" svg:y="2.558cm"><draw:text-box><text:p text:style-name="P258"><text:span text:style-name="T33">14</text:span></text:p></draw:text-box></draw:frame><draw:frame draw:style-name="gr77" draw:text-style-name="P260" svg:width="0.937cm" svg:height="0.576cm" svg:x="1.958cm" svg:y="2.558cm"><draw:text-box><text:p text:style-name="P258"><text:span text:style-name="T33">0</text:span></text:p></draw:text-box></draw:frame><draw:frame draw:style-name="gr77" draw:text-style-name="P260" svg:width="0.937cm" svg:height="0.576cm" svg:x="3.02cm" svg:y="2.558cm"><draw:text-box><text:p text:style-name="P258"><text:span text:style-name="T33">1</text:span></text:p></draw:text-box></draw:frame><draw:frame draw:style-name="gr77" draw:text-style-name="P260" svg:width="0.937cm" svg:height="0.576cm" svg:x="4.457cm" svg:y="2.558cm"><draw:text-box><text:p text:style-name="P258"><text:span text:style-name="T33">2</text:span></text:p></draw:text-box></draw:frame></draw:g><text:soft-page-break/></text:p>
      <text:list xml:id="list38474178" text:continue-numbering="true" text:style-name="L1">
        <text:list-item>
          <text:list>
            <text:list-item>
              <text:h text:style-name="P216" text:outline-level="2"><text:alphabetical-index-mark-start text:id="IMark229571112"/>FT_TN64<text:alphabetical-index-mark-end text:id="IMark229571112"/></text:h>
            </text:list-item>
          </text:list>
        </text:list-item>
      </text:list>
      <text:p text:style-name="P69">Type<text:tab/>Funktionsbaustein</text:p>
      <text:p text:style-name="P66"><text:span text:style-name="T15">Input</text:span><text:span text:style-name="T14"><text:tab/>IN : REAL (Eingangssignal)</text:span></text:p>
      <text:p text:style-name="P73"><text:tab/>T : REAL (Verzögerungszeit)</text:p>
      <text:p text:style-name="P73"><draw:frame draw:style-name="fr3" draw:name="Grafik75" text:anchor-type="paragraph" svg:x="1.092cm" svg:y="0.661cm" svg:width="2.281cm" svg:height="1.75cm" draw:z-index="168"><draw:image xlink:href="Pictures/10000000000000AC00000084B399053C.png" xlink:type="simple" xlink:show="embed" xlink:actuate="onLoad"/></draw:frame>Output<text:tab/>OUT : REAL (Ausgangssignal)</text:p>
      <text:p text:style-name="P73"><text:line-break/>FT_TN64 verzögert ein Eingangssignal um eine einstellbare Zeit T und tastet es in der Zeit T 64 mal ab. Nach jedem update des Ausgangssignals OUT wird TRIG für einen Zyklus TRUE.</text:p>
      <text:p text:style-name="P73"><draw:g text:anchor-type="paragraph" draw:z-index="567" draw:style-name="gr1"><draw:line draw:style-name="gr2" draw:text-style-name="P257" svg:x1="1.981cm" svg:y1="3.156cm" svg:x2="3.239cm" svg:y2="3.156cm"><text:p/></draw:line><draw:line draw:style-name="gr2" draw:text-style-name="P257" svg:x1="3.242cm" svg:y1="2.695cm" svg:x2="3.242cm" svg:y2="3.153cm"><text:p/></draw:line><draw:line draw:style-name="gr2" draw:text-style-name="P257" svg:x1="3.242cm" svg:y1="2.695cm" svg:x2="4.53cm" svg:y2="2.695cm"><text:p/></draw:line><draw:line draw:style-name="gr2" draw:text-style-name="P257" svg:x1="4.526cm" svg:y1="2.424cm" svg:x2="4.526cm" svg:y2="2.695cm"><text:p/></draw:line><draw:line draw:style-name="gr2" draw:text-style-name="P257" svg:x1="4.526cm" svg:y1="2.424cm" svg:x2="5.214cm" svg:y2="2.424cm"><text:p/></draw:line><draw:line draw:style-name="gr2" draw:text-style-name="P257" svg:x1="7.795cm" svg:y1="2.05cm" svg:x2="8.389cm" svg:y2="2.05cm"><text:p/></draw:line><draw:line draw:style-name="gr2" draw:text-style-name="P257" svg:x1="8.403cm" svg:y1="1.318cm" svg:x2="8.396cm" svg:y2="2.061cm"><text:p/></draw:line><draw:line draw:style-name="gr2" draw:text-style-name="P257" svg:x1="8.403cm" svg:y1="1.318cm" svg:x2="9.689cm" svg:y2="1.318cm"><text:p/></draw:line><draw:line draw:style-name="gr2" draw:text-style-name="P257" svg:x1="9.689cm" svg:y1="0.859cm" svg:x2="9.689cm" svg:y2="1.319cm"><text:p/></draw:line><draw:line draw:style-name="gr60" draw:text-style-name="P257" svg:x1="1.979cm" svg:y1="3.224cm" svg:x2="1.984cm" svg:y2="0.404cm"><text:p/></draw:line><draw:line draw:style-name="gr60" draw:text-style-name="P257" svg:x1="7.814cm" svg:y1="3.156cm" svg:x2="11.772cm" svg:y2="3.156cm"><text:p/></draw:line><draw:line draw:style-name="gr23" draw:text-style-name="P257" svg:x1="1.882cm" svg:y1="3.156cm" svg:x2="5.838cm" svg:y2="3.156cm"><text:p/></draw:line><draw:path draw:style-name="gr72" draw:text-style-name="P257" svg:width="2.682cm" svg:height="0.465cm" svg:x="2.584cm" svg:y="2.303cm" svg:viewBox="0 0 2683 466" svg:d="m0 466c115-19 252-20 365-41 136-21 281-21 401-66 100-37 285-46 363-89 88-46 219-46 328-70s256-14 363-41c124-36 231-74 378-99 118-22 249-32 363-54l122-6v0"><text:p/></draw:path><draw:line draw:style-name="gr2" draw:text-style-name="P257" svg:x1="1.979cm" svg:y1="3.156cm" svg:x2="3.267cm" svg:y2="3.156cm"><text:p/></draw:line><draw:line draw:style-name="gr21" draw:text-style-name="P257" svg:x1="1.993cm" svg:y1="3.723cm" svg:x2="11.105cm" svg:y2="3.723cm"><text:p/></draw:line><draw:frame draw:style-name="gr73" draw:text-style-name="P261" svg:width="0.937cm" svg:height="0.983cm" svg:x="6.336cm" svg:y="3.537cm"><draw:text-box><text:p text:style-name="P258"><text:span text:style-name="T34">T</text:span></text:p></draw:text-box></draw:frame><draw:frame draw:style-name="gr74" draw:text-style-name="P260" svg:width="0.937cm" svg:height="0.576cm" svg:x="10.524cm" svg:y="3.133cm"><draw:text-box><text:p text:style-name="P258"><text:span text:style-name="T33">64</text:span></text:p></draw:text-box></draw:frame><draw:line draw:style-name="gr2" draw:text-style-name="P257" svg:x1="9.689cm" svg:y1="0.854cm" svg:x2="10.975cm" svg:y2="0.854cm"><text:p/></draw:line><draw:line draw:style-name="gr2" draw:text-style-name="P257" svg:x1="10.973cm" svg:y1="1.08cm" svg:x2="10.975cm" svg:y2="0.854cm"><text:p/></draw:line><draw:line draw:style-name="gr2" draw:text-style-name="P257" svg:x1="10.973cm" svg:y1="1.08cm" svg:x2="11.567cm" svg:y2="1.08cm"><text:p/></draw:line><draw:path draw:style-name="gr72" draw:text-style-name="P257" svg:width="4.188cm" svg:height="1.06cm" svg:x="7.391cm" svg:y="0.762cm" svg:viewBox="0 0 4189 1061" svg:d="m0 1061c162-16 286-78 402-135s222-114 311-188c79-71 188-131 284-197s234-113 354-170c115-52 231-105 371-143 114-34 268-12 356-65 102-62 224-88 354-112 122-19 226-51 357-51 113 63 233 123 368 174 111 46 247 62 355 106 125 51 236 97 356 145l120 33 141 38 60 14"><text:p/></draw:path><draw:frame draw:style-name="gr75" draw:text-style-name="P273" svg:width="0.863cm" svg:height="0.659cm" svg:x="1.912cm" svg:y="2.588cm"><draw:text-box><text:p text:style-name="P258"><text:span text:style-name="T41">IN</text:span></text:p></draw:text-box></draw:frame><draw:frame draw:style-name="gr75" draw:text-style-name="P274" svg:width="1.378cm" svg:height="0.659cm" svg:x="8.483cm" svg:y="1.868cm"><draw:text-box><text:p text:style-name="P258"><text:span text:style-name="T42">OUT</text:span></text:p></draw:text-box></draw:frame><draw:frame draw:style-name="gr74" draw:text-style-name="P260" svg:width="0.937cm" svg:height="0.576cm" svg:x="9.335cm" svg:y="3.133cm"><draw:text-box><text:p text:style-name="P258"><text:span text:style-name="T33">63</text:span></text:p></draw:text-box></draw:frame><draw:frame draw:style-name="gr74" draw:text-style-name="P260" svg:width="0.937cm" svg:height="0.576cm" svg:x="8.084cm" svg:y="3.133cm"><draw:text-box><text:p text:style-name="P258"><text:span text:style-name="T33">62</text:span></text:p></draw:text-box></draw:frame><draw:frame draw:style-name="gr74" draw:text-style-name="P260" svg:width="0.937cm" svg:height="0.576cm" svg:x="1.773cm" svg:y="3.133cm"><draw:text-box><text:p text:style-name="P258"><text:span text:style-name="T33">0</text:span></text:p></draw:text-box></draw:frame><draw:frame draw:style-name="gr74" draw:text-style-name="P260" svg:width="0.937cm" svg:height="0.576cm" svg:x="2.835cm" svg:y="3.133cm"><draw:text-box><text:p text:style-name="P258"><text:span text:style-name="T33">1</text:span></text:p></draw:text-box></draw:frame><draw:frame draw:style-name="gr74" draw:text-style-name="P260" svg:width="0.937cm" svg:height="0.576cm" svg:x="4.272cm" svg:y="3.133cm"><draw:text-box><text:p text:style-name="P258"><text:span text:style-name="T33">2</text:span></text:p></draw:text-box></draw:frame></draw:g></text:p>
      <text:list xml:id="list38478439" text:continue-numbering="true" text:style-name="L1">
        <text:list-item>
          <text:list>
            <text:list-item>
              <text:h text:style-name="P216" text:outline-level="2"><text:soft-page-break/><text:alphabetical-index-mark-start text:id="IMark229571112"/>FT_<text:span text:style-name="T27">TN8</text:span><text:alphabetical-index-mark-end text:id="IMark229571112"/></text:h>
            </text:list-item>
          </text:list>
        </text:list-item>
      </text:list>
      <text:p text:style-name="P177">Type<text:tab/>Funktionsbaustein</text:p>
      <text:p text:style-name="P66"><text:span text:style-name="T15">Input</text:span><text:span text:style-name="T14"><text:tab/>IN : REAL (Eingangssignal)</text:span></text:p>
      <text:p text:style-name="P73"><text:tab/>T : REAL (Verzögerungszeit)</text:p>
      <text:p text:style-name="P73">Output<text:tab/>OUT : REAL (Ausgangssignal)</text:p>
      <text:p text:style-name="P73"><draw:frame draw:style-name="fr3" draw:name="Grafik76" text:anchor-type="paragraph" svg:x="1.217cm" svg:y="0.379cm" svg:width="2.281cm" svg:height="1.75cm" draw:z-index="167"><draw:image xlink:href="Pictures/10000000000000AC000000842C10F87F.png" xlink:type="simple" xlink:show="embed" xlink:actuate="onLoad"/></draw:frame><text:line-break/>FT_TN8 verzögert ein Eingangssignal um eine einstellbare Zeit T und tastet es in der Zeit T 8 mal ab. Nach jedem update des Ausgangssignals OUT wird TRIG für einen Zyklus TRUE.</text:p>
      <text:p text:style-name="P183"><draw:g text:anchor-type="paragraph" draw:z-index="571" draw:style-name="gr1"><draw:line draw:style-name="gr2" draw:text-style-name="P257" svg:x1="1.898cm" svg:y1="3.222cm" svg:x2="3.156cm" svg:y2="3.222cm"><text:p/></draw:line><draw:line draw:style-name="gr2" draw:text-style-name="P257" svg:x1="3.156cm" svg:y1="2.759cm" svg:x2="3.156cm" svg:y2="3.222cm"><text:p/></draw:line><draw:line draw:style-name="gr2" draw:text-style-name="P257" svg:x1="3.156cm" svg:y1="2.759cm" svg:x2="4.444cm" svg:y2="2.759cm"><text:p/></draw:line><draw:line draw:style-name="gr2" draw:text-style-name="P257" svg:x1="4.443cm" svg:y1="2.487cm" svg:x2="4.443cm" svg:y2="2.762cm"><text:p/></draw:line><draw:line draw:style-name="gr2" draw:text-style-name="P257" svg:x1="4.443cm" svg:y1="2.487cm" svg:x2="5.131cm" svg:y2="2.487cm"><text:p/></draw:line><draw:line draw:style-name="gr2" draw:text-style-name="P257" svg:x1="7.712cm" svg:y1="2.113cm" svg:x2="8.306cm" svg:y2="2.113cm"><text:p/></draw:line><draw:line draw:style-name="gr2" draw:text-style-name="P257" svg:x1="8.32cm" svg:y1="1.369cm" svg:x2="8.313cm" svg:y2="2.119cm"><text:p/></draw:line><draw:line draw:style-name="gr2" draw:text-style-name="P257" svg:x1="8.319cm" svg:y1="1.369cm" svg:x2="9.605cm" svg:y2="1.369cm"><text:p/></draw:line><draw:line draw:style-name="gr2" draw:text-style-name="P257" svg:x1="9.606cm" svg:y1="0.91cm" svg:x2="9.606cm" svg:y2="1.372cm"><text:p/></draw:line><draw:line draw:style-name="gr60" draw:text-style-name="P257" svg:x1="1.893cm" svg:y1="3.293cm" svg:x2="1.898cm" svg:y2="0.45cm"><text:p/></draw:line><draw:line draw:style-name="gr60" draw:text-style-name="P257" svg:x1="7.731cm" svg:y1="3.222cm" svg:x2="11.689cm" svg:y2="3.222cm"><text:p/></draw:line><draw:line draw:style-name="gr23" draw:text-style-name="P257" svg:x1="1.799cm" svg:y1="3.222cm" svg:x2="5.755cm" svg:y2="3.224cm"><text:p/></draw:line><draw:path draw:style-name="gr72" draw:text-style-name="P257" svg:width="2.682cm" svg:height="0.467cm" svg:x="2.501cm" svg:y="2.367cm" svg:viewBox="0 0 2683 468" svg:d="m0 468c115-18 252-20 365-40 136-22 281-23 401-67 100-37 285-47 363-90 88-46 219-46 328-70s256-14 363-42c124-35 231-75 378-100 118-20 249-30 363-55l122-4v0"><text:p/></draw:path><draw:line draw:style-name="gr2" draw:text-style-name="P257" svg:x1="1.893cm" svg:y1="3.222cm" svg:x2="3.181cm" svg:y2="3.222cm"><text:p/></draw:line><draw:line draw:style-name="gr21" draw:text-style-name="P257" svg:x1="1.909cm" svg:y1="3.794cm" svg:x2="11.021cm" svg:y2="3.794cm"><text:p/></draw:line><draw:frame draw:style-name="gr79" draw:text-style-name="P261" svg:width="0.937cm" svg:height="0.983cm" svg:x="6.253cm" svg:y="3.606cm"><draw:text-box><text:p text:style-name="P258"><text:span text:style-name="T34">T</text:span></text:p></draw:text-box></draw:frame><draw:frame draw:style-name="gr80" draw:text-style-name="P260" svg:width="0.937cm" svg:height="0.576cm" svg:x="10.441cm" svg:y="3.2cm"><draw:text-box><text:p text:style-name="P258"><text:span text:style-name="T33">8</text:span></text:p></draw:text-box></draw:frame><draw:line draw:style-name="gr2" draw:text-style-name="P257" svg:x1="9.606cm" svg:y1="0.904cm" svg:x2="10.892cm" svg:y2="0.904cm"><text:p/></draw:line><draw:line draw:style-name="gr2" draw:text-style-name="P257" svg:x1="10.89cm" svg:y1="1.132cm" svg:x2="10.892cm" svg:y2="0.904cm"><text:p/></draw:line><draw:line draw:style-name="gr2" draw:text-style-name="P257" svg:x1="10.89cm" svg:y1="1.134cm" svg:x2="11.484cm" svg:y2="1.134cm"><text:p/></draw:line><draw:path draw:style-name="gr72" draw:text-style-name="P257" svg:width="4.188cm" svg:height="1.067cm" svg:x="7.308cm" svg:y="0.81cm" svg:viewBox="0 0 4189 1068" svg:d="m0 1068c162-14 286-77 402-134s222-114 311-188c79-73 188-133 284-200s234-114 354-171c115-55 231-106 371-144 114-33 268-13 356-66 102-63 224-88 354-112 122-20 226-53 357-53 113 65 233 124 368 177 111 45 247 61 355 106 125 51 236 100 356 145l120 33 141 40 60 13"><text:p/></draw:path><draw:frame draw:style-name="gr81" draw:text-style-name="P273" svg:width="0.863cm" svg:height="0.659cm" svg:x="1.829cm" svg:y="2.65cm"><draw:text-box><text:p text:style-name="P258"><text:span text:style-name="T41">IN</text:span></text:p></draw:text-box></draw:frame><draw:frame draw:style-name="gr81" draw:text-style-name="P274" svg:width="1.378cm" svg:height="0.659cm" svg:x="8.4cm" svg:y="1.925cm"><draw:text-box><text:p text:style-name="P258"><text:span text:style-name="T42">OUT</text:span></text:p></draw:text-box></draw:frame><draw:frame draw:style-name="gr80" draw:text-style-name="P260" svg:width="0.937cm" svg:height="0.576cm" svg:x="9.252cm" svg:y="3.2cm"><draw:text-box><text:p text:style-name="P258"><text:span text:style-name="T33">7</text:span></text:p></draw:text-box></draw:frame><draw:frame draw:style-name="gr80" draw:text-style-name="P260" svg:width="0.937cm" svg:height="0.576cm" svg:x="8.001cm" svg:y="3.2cm"><draw:text-box><text:p text:style-name="P258"><text:span text:style-name="T33">6</text:span></text:p></draw:text-box></draw:frame><draw:frame draw:style-name="gr80" draw:text-style-name="P260" svg:width="0.937cm" svg:height="0.576cm" svg:x="1.69cm" svg:y="3.2cm"><draw:text-box><text:p text:style-name="P258"><text:span text:style-name="T33">0</text:span></text:p></draw:text-box></draw:frame><draw:frame draw:style-name="gr80" draw:text-style-name="P260" svg:width="0.937cm" svg:height="0.576cm" svg:x="2.752cm" svg:y="3.2cm"><draw:text-box><text:p text:style-name="P258"><text:span text:style-name="T33">1</text:span></text:p></draw:text-box></draw:frame><draw:frame draw:style-name="gr80" draw:text-style-name="P260" svg:width="0.937cm" svg:height="0.576cm" svg:x="4.189cm" svg:y="3.2cm"><draw:text-box><text:p text:style-name="P258"><text:span text:style-name="T33">2</text:span></text:p></draw:text-box></draw:frame></draw:g></text:p>
      <text:list xml:id="list38459529" text:continue-numbering="true" text:style-name="L1">
        <text:list-item>
          <text:list>
            <text:list-item>
              <text:h text:style-name="P216" text:outline-level="2"><text:alphabetical-index-mark-start text:id="IMark229571112"/>HYST<text:alphabetical-index-mark-end text:id="IMark229571112"/></text:h>
            </text:list-item>
          </text:list>
        </text:list-item>
      </text:list>
      <text:p text:style-name="P69">Type<text:tab/>Funktionsbaustein</text:p>
      <text:p text:style-name="P66"><text:span text:style-name="T15">Input</text:span><text:span text:style-name="T14"><text:tab/>IN : REAL (Eingangswert)</text:span></text:p>
      <text:p text:style-name="P69"><text:tab/>ON : REAL (oberer Schwellenwert)</text:p>
      <text:p text:style-name="P69"><text:tab/>OFF : REAL (unterer Schwellenwert)</text:p>
      <text:p text:style-name="P69">Output<text:tab/>Q : BOOL (Ausgangssignal)</text:p>
      <text:p text:style-name="P66"><draw:frame draw:style-name="fr3" draw:name="Grafik579" text:anchor-type="paragraph" svg:x="1.09cm" svg:y="0.667cm" svg:width="2.281cm" svg:height="2.2cm" draw:z-index="572"><draw:image xlink:href="Pictures/10000000000000AC000000A6121EB97D.png" xlink:type="simple" xlink:show="embed" xlink:actuate="onLoad"/></draw:frame><text:span text:style-name="T21"><text:tab/></text:span><text:span text:style-name="T16">WIN</text:span><text:span text:style-name="T21"> : BOOL (zeigt an, dass In zwischen ON und OFF liegt)</text:span></text:p>
      <text:p text:style-name="P183"><text:soft-page-break/><text:line-break/>HYST ist ein Standard Hysteresebaustein, Seine Funktion hängt von den Eingangswerten ON und OFF ab.</text:p>
      <text:p text:style-name="P183"><draw:frame draw:style-name="fr3" draw:name="Grafik586" text:anchor-type="paragraph" svg:x="1.067cm" svg:y="1.164cm" svg:width="6.83cm" svg:height="2.559cm" draw:z-index="580"><draw:image xlink:href="Pictures/10000000000001710000008A82D0411A.png" xlink:type="simple" xlink:show="embed" xlink:actuate="onLoad"/></draw:frame>Ist ON &gt; OFF so wird der Ausgang TRUE gesetzt wenn IN &gt; ON und er wird FALSE gesetzt wenn IN &lt; OFF.</text:p>
      <text:p text:style-name="P183"/>
      <text:p text:style-name="P183"><draw:frame draw:style-name="fr3" draw:name="Grafik587" text:anchor-type="paragraph" svg:x="1.044cm" svg:y="1.173cm" svg:width="6.83cm" svg:height="2.54cm" draw:z-index="581"><draw:image xlink:href="Pictures/100000000000017100000089169A8287.png" xlink:type="simple" xlink:show="embed" xlink:actuate="onLoad"/></draw:frame>Ist ON &lt; OFF so wird der Ausgang TRUE gesetzt wenn IN &lt; ON und er wird FALSE gesetzt wenn IN &gt; OFF.</text:p>
      <text:p text:style-name="P183"/>
      <text:p text:style-name="P183"><draw:frame draw:style-name="fr3" draw:name="Grafik588" text:anchor-type="paragraph" svg:x="1.067cm" svg:y="1.194cm" svg:width="6.83cm" svg:height="2.559cm" draw:z-index="582"><draw:image xlink:href="Pictures/10000000000001710000008A2D818B69.png" xlink:type="simple" xlink:show="embed" xlink:actuate="onLoad"/></draw:frame>Der Ausgang WIN wird TRUE wenn IN zwischen ON und OFF liegt, liegt IN außerhalb des Bereichs ON – OFF wird WIN FALSE.</text:p>
      <text:p text:style-name="P184"/>
      <text:p text:style-name="P184"/>
      <text:p text:style-name="P184"/>
      <text:p text:style-name="P184"/>
      <text:list xml:id="list38476124" text:continue-numbering="true" text:style-name="L1">
        <text:list-item>
          <text:list>
            <text:list-item>
              <text:h text:style-name="P216" text:outline-level="2"><text:soft-page-break/><text:alphabetical-index-mark-start text:id="IMark229571112"/>HYST_1<text:alphabetical-index-mark-end text:id="IMark229571112"/></text:h>
            </text:list-item>
          </text:list>
        </text:list-item>
      </text:list>
      <text:p text:style-name="P69">Type<text:tab/>Funktionsbaustein</text:p>
      <text:p text:style-name="P66"><text:span text:style-name="T15">Input</text:span><text:span text:style-name="T14"><text:tab/>IN : REAL (Eingangswert)</text:span></text:p>
      <text:p text:style-name="P69"><text:tab/>HIGH : REAL (oberer Schwellenwert)</text:p>
      <text:p text:style-name="P69"><text:tab/>LOW : REAL (unterer Schwellenwert)</text:p>
      <text:p text:style-name="P69">Output<text:tab/>Q : BOOL (Ausgangssignal)</text:p>
      <text:p text:style-name="P66"><draw:frame draw:style-name="fr3" draw:name="Grafik185" text:anchor-type="paragraph" svg:x="1.094cm" svg:y="0.677cm" svg:width="2.281cm" svg:height="2.2cm" draw:z-index="170"><draw:image xlink:href="Pictures/10000000000000AC000000A680FBA7F6.png" xlink:type="simple" xlink:show="embed" xlink:actuate="onLoad"/></draw:frame><text:span text:style-name="T14"><text:tab/></text:span><text:span text:style-name="T15">WIN</text:span><text:span text:style-name="T14"> : BOOL (zeigt an, dass In zwischen LOW und HIGH liegt)</text:span></text:p>
      <text:p text:style-name="P73"><draw:frame draw:style-name="fr3" draw:name="Grafik589" text:anchor-type="paragraph" svg:x="1.046cm" svg:y="0.018cm" svg:width="6.83cm" svg:height="2.589cm" draw:z-index="583"><draw:image xlink:href="Pictures/10000000000001710000008C66929A22.png" xlink:type="simple" xlink:show="embed" xlink:actuate="onLoad"/></draw:frame><text:line-break/>HYST_1 ist ein Hysterese Baustein der mit oberen und unterem Limit arbeitet. Der Ausgang Q wird nur dann TRUE, wenn das Eingangssignal an IN den Wert HIGH überschritten hat. Es bleibt dann solange TRUE, bis das Eingangssignal wieder LOW unterschreitet und Q FALSE wird. Ein weiterer Ausgang WIN zeigt an, ob sich das Eingangssignal zwischen LOW und HIGH befindet.</text:p>
      <text:p text:style-name="P183"><draw:frame draw:style-name="fr3" draw:name="Grafik186" text:anchor-type="paragraph" svg:x="1.016cm" svg:y="1.67cm" svg:width="15.67cm" svg:height="4.06cm" draw:z-index="171"><draw:image xlink:href="Pictures/10000000000004A100000133E7F496FB.png" xlink:type="simple" xlink:show="embed" xlink:actuate="onLoad"/></draw:frame>Das folgende Beispiel zeigt eine Dreiecksgenerator mit nachgeschalteten Hysterese Baustein HYST_1.</text:p>
      <text:p text:style-name="P38"><text:soft-page-break/>Die grüne Kurve zeigt das Eingangssignal, Rot den Hysterese Ausgang und Blau den WIN Ausgang.</text:p>
      <text:p text:style-name="P37"><draw:frame draw:style-name="fr3" draw:name="Grafik187" text:anchor-type="paragraph" svg:x="1.057cm" svg:y="0.129cm" svg:width="14cm" svg:height="5.001cm" draw:z-index="172"><draw:image xlink:href="Pictures/10000000000002DC0000011B44272AE6.png" xlink:type="simple" xlink:show="embed" xlink:actuate="onLoad"/></draw:frame></text:p>
      <text:list xml:id="list38477784" text:continue-numbering="true" text:style-name="L1">
        <text:list-item>
          <text:list>
            <text:list-item>
              <text:h text:style-name="P216" text:outline-level="2"><text:alphabetical-index-mark-start text:id="IMark229571112"/>HYST_2<text:alphabetical-index-mark-end text:id="IMark229571112"/></text:h>
            </text:list-item>
          </text:list>
        </text:list-item>
      </text:list>
      <text:p text:style-name="P69">Type<text:tab/>Funktionsbaustein</text:p>
      <text:p text:style-name="P66"><text:span text:style-name="T15">Input</text:span><text:span text:style-name="T14"><text:tab/>IN : REAL (Eingangswert)</text:span></text:p>
      <text:p text:style-name="P69"><text:tab/>VAL : REAL (Mittelwert der Hysterese)</text:p>
      <text:p text:style-name="P69"><text:tab/>HYS : REAL (Breite der Hysterese)</text:p>
      <text:p text:style-name="P69">Output<text:tab/>Q : BOOL (Ausgangssignal)</text:p>
      <text:p text:style-name="P66"><draw:frame draw:style-name="fr3" draw:name="Grafik188" text:anchor-type="paragraph" svg:x="1.127cm" svg:y="0.635cm" svg:width="2.281cm" svg:height="2.2cm" draw:z-index="173"><draw:image xlink:href="Pictures/10000000000000AC000000A6B54B041E.png" xlink:type="simple" xlink:show="embed" xlink:actuate="onLoad"/></draw:frame><text:span text:style-name="T21"><text:tab/></text:span><text:span text:style-name="T16">WIN </text:span><text:span text:style-name="T21">: BOOL (zeigt an das In zwischen LOW und HIGH liegt)</text:span></text:p>
      <text:p text:style-name="P73"><text:line-break/>HYST_2 ist ein Hysterese Baustein bei dem Die Schaltschwellen durch einen Mittelwert und die zugehörige Hysterese definiert wird. Die untere Schaltschwelle liegt bei VAL – HYS / 2 und die obere Schaltschwelle bei VAL + HYS / 2.</text:p>
      <text:p text:style-name="P183"><draw:frame draw:style-name="fr3" draw:name="Grafik590" text:anchor-type="paragraph" svg:x="1.002cm" svg:y="0.012cm" svg:width="6.83cm" svg:height="2.589cm" draw:z-index="584"><draw:image xlink:href="Pictures/10000000000001710000008CE09BE27C.png" xlink:type="simple" xlink:show="embed" xlink:actuate="onLoad"/></draw:frame><text:soft-page-break/>Eine eingehende Beschreibung der Hysteresefunktion und ein Anwendungsbeispiel finden Sie unter HYST_1.</text:p>
      <text:list xml:id="list38477412" text:continue-numbering="true" text:style-name="L1">
        <text:list-item>
          <text:list>
            <text:list-item>
              <text:h text:style-name="P216" text:outline-level="2"><text:alphabetical-index-mark-start text:id="IMark229571112"/>HYST_3<text:alphabetical-index-mark-end text:id="IMark229571112"/></text:h>
            </text:list-item>
          </text:list>
        </text:list-item>
      </text:list>
      <text:p text:style-name="P69">Type<text:tab/>Funktionsbaustein</text:p>
      <text:p text:style-name="P66"><text:span text:style-name="T15">Input</text:span><text:span text:style-name="T14"><text:tab/>IN : REAL (Eingangswert)</text:span></text:p>
      <text:p text:style-name="P69"><text:tab/>HYST : REAL (Breite der Hysterese)</text:p>
      <text:p text:style-name="P69"><text:tab/>VAL1 : REAL (Mittelwert der Hysterese 1)</text:p>
      <text:p text:style-name="P69"><text:tab/>VAL2 : REAL (Mittelwert der Hysterese 2)</text:p>
      <text:p text:style-name="P69">Output<text:tab/>Q1 : BOOL (Ausgangssignal 1)</text:p>
      <text:p text:style-name="P69"><draw:frame draw:style-name="fr3" draw:name="Grafik209" text:anchor-type="paragraph" svg:x="1.178cm" svg:y="0.626cm" svg:width="2.281cm" svg:height="2.649cm" draw:z-index="783"><draw:image xlink:href="Pictures/10000000000000AC000000C8CFCB5245.png" xlink:type="simple" xlink:show="embed" xlink:actuate="onLoad"/></draw:frame><text:tab/>Q2 : BOOL (Ausgangssignal 2)</text:p>
      <text:p text:style-name="P73"><draw:frame draw:style-name="fr3" draw:name="Grafik591" text:anchor-type="paragraph" svg:x="1.046cm" svg:y="6.736cm" svg:width="6.83cm" svg:height="3.431cm" draw:z-index="786"><draw:image xlink:href="Pictures/1000000000000171000000B9C21E391B.png" xlink:type="simple" xlink:show="embed" xlink:actuate="onLoad"/></draw:frame><text:line-break/>HYST_3 ist ein Dreipunktregler. Der Dreipunktregler besteht aus 2 Hysteresefunktionen. Q1 ist eine Hysterese mit val1 als Schwellenwert und HYST als Hysterese. Q1 wird TRUE, wenn IN kleiner ist als VAL1 – HYST / 2 und <text:s/>wird FALSE, wenn IN größer ist als VAL1 + HYST / <text:s/>2. Q2 funktioniert analog mit Val2. Der Dreipunktregler wird vor allen dann eingesetzt, wenn man motorische Klappen steuert, die dann mit Q1 auf und mit Q2 ab gesteuert werden. Ist der Wert von IN zwischen VAL1 und VAL2 bleiben beide Ausgänge FALSE und der Motor bleibt stehen.</text:p>
      <text:p text:style-name="P183"/>
      <text:p text:style-name="P183"><draw:frame draw:style-name="fr3" draw:name="Grafik210" text:anchor-type="paragraph" svg:x="1.12cm" svg:y="0.681cm" svg:width="9.83cm" svg:height="3.11cm" draw:z-index="784"><draw:image xlink:href="Pictures/10000000000002E7000000EBCD6375D8.png" xlink:type="simple" xlink:show="embed" xlink:actuate="onLoad"/></draw:frame>Folgendes Beispiel zeigt den Signalverlauf an einem 3-Punkt Regler:</text:p>
      <text:p text:style-name="P183"><text:soft-page-break/></text:p>
      <text:p text:style-name="P183"><draw:frame draw:style-name="fr3" draw:name="Grafik211" text:anchor-type="paragraph" svg:x="1.087cm" svg:y="0.086cm" svg:width="13.259cm" svg:height="5.78cm" draw:z-index="785"><draw:image xlink:href="Pictures/10000000000002CC0000013829E74D4A.png" xlink:type="simple" xlink:show="embed" xlink:actuate="onLoad"/></draw:frame></text:p>
      <text:list xml:id="list38464176" text:continue-numbering="true" text:style-name="L1">
        <text:list-item>
          <text:list>
            <text:list-item>
              <text:h text:style-name="P216" text:outline-level="2"><text:alphabetical-index-mark-start text:id="IMark229571112"/>INTEGRATE<text:alphabetical-index-mark-end text:id="IMark229571112"/></text:h>
            </text:list-item>
          </text:list>
        </text:list-item>
      </text:list>
      <text:p text:style-name="P69">Type<text:tab/>Funktionsbaustein</text:p>
      <text:p text:style-name="P66"><text:span text:style-name="T15">Input</text:span><text:span text:style-name="T14"><text:tab/>E : BOOL (</text:span><text:span text:style-name="T15">Enable</text:span><text:span text:style-name="T14"> Eingang, </text:span><text:span text:style-name="T15">Default</text:span><text:span text:style-name="T14"> = TRUE)</text:span></text:p>
      <text:p text:style-name="P179"><text:tab/>X : REAL (Eingangswert)</text:p>
      <text:p text:style-name="P69"><text:tab/>K : REAL (Integrationsbeiwert in 1/s)</text:p>
      <text:p text:style-name="P69"><draw:frame draw:style-name="fr3" draw:name="Grafik740" text:anchor-type="paragraph" svg:x="1.067cm" svg:y="0.653cm" svg:width="2.499cm" svg:height="2.311cm" draw:z-index="787"><draw:image xlink:href="Pictures/10000000000000BD000000AF2EEE478C.png" xlink:type="simple" xlink:show="embed" xlink:actuate="onLoad"/></draw:frame><text:span text:style-name="T10">I/O<text:tab/>Y : REAL (</text:span><text:span text:style-name="T3">Integrator</text:span><text:span text:style-name="T10"> Ausgang)</text:span></text:p>
      <text:p text:style-name="P183"><text:line-break/>INTEGRATE ist ein <text:span text:style-name="T2">Integrator</text:span> der den Wert X auf einen externen Wert Y auf integriert. Der Integrator arbeitet wenn E = TRUE, der interne <text:span text:style-name="T2">Default</text:span> von E = TRUE.</text:p>
      <text:list xml:id="list38467582" text:continue-numbering="true" text:style-name="L1">
        <text:list-item>
          <text:h text:style-name="P210" text:outline-level="1">Stellglieder</text:h>
          <text:list>
            <text:list-item>
              <text:h text:style-name="P216" text:outline-level="2"><text:alphabetical-index-mark-start text:id="IMark229571112"/>ACTUATOR_2P<text:alphabetical-index-mark-end text:id="IMark229571112"/></text:h>
            </text:list-item>
          </text:list>
        </text:list-item>
      </text:list>
      <text:p text:style-name="P69">Type<text:tab/>Funktionsbaustein</text:p>
      <text:p text:style-name="P66"><text:span text:style-name="T16">Input</text:span><text:span text:style-name="T21"><text:tab/>IN : BYTE (Steuereingang 0 - 255)</text:span></text:p>
      <text:p text:style-name="P73"><text:tab/>TEST : BOOL (startet Autorun wenn TRUE)</text:p>
      <text:p text:style-name="P73"><text:tab/>ARE : BOOL (<text:span text:style-name="T2">Enable</text:span> für Autorun)</text:p>
      <text:p text:style-name="P183">I/O<text:tab/>ARX : BOOL (Autorun Signal Bus)</text:p>
      <text:p text:style-name="P73">Output<text:tab/>OUT : BOOL (Schaltsignal für Ventil)</text:p>
      <text:p text:style-name="P73">Config<text:tab/>CYCLE_TIME : TIME (Taktrate des Ventils)</text:p>
      <text:p text:style-name="P183"><text:tab/>SENS : BYTE (Minimale und Maximale Eingangswerte)</text:p>
      <text:p text:style-name="P183"><text:tab/>SELF_ACT_TIME : TIME (Selbstbetätigungszeit)</text:p>
      <text:p text:style-name="P73"><text:tab/>SELF_ACT_PULSE : TIME (Schaltzeit bei Autorun)</text:p>
      <text:p text:style-name="P183"><draw:frame draw:style-name="fr3" draw:name="Grafik212" text:anchor-type="paragraph" svg:x="1.002cm" svg:y="0.654cm" svg:width="2.9cm" svg:height="2.311cm" draw:z-index="803"><draw:image xlink:href="Pictures/10000000000000DB000000AF271AE2FF.png" xlink:type="simple" xlink:show="embed" xlink:actuate="onLoad"/></draw:frame><text:tab/>SELF_ACT_CYCLES : INT (Anzahl Zyklen bei Autorun)<text:tab/></text:p>
      <text:p text:style-name="P66"><text:span text:style-name="T21"><text:line-break/>ACTUATOR_2P ist ein Interface für 2-Punkt Aktuatoren wie z B. Magnetventile. Der 2-Punkt Aktuator kann nur Ein / Aus Schalten und deshalb wird der Eingangswert IN in ein Puls / Pause Signal am Ausgang OUT gewandelt. Die Zykluszeit (CYCLE_TIME) bestimmt die Schaltzeiten des Ausgangs. Damit ein Festkleben des Ventils durch langes ruhen verhindert wird, kann durch einstellen der Selbstbetätigungszeit (SELF_ACT_TIME) und der Anzahl der Selbstaktivierungszyklen (SELF_ACT_CYCLES) sowie der Impulsdauer (SELF_ACT_PULSE) bestimmt werden, nach welcher Zeit wie viele Schaltzyklen automatisch ausgeführt werden, um ein festkleben des Ventils zu verhindern. Nach Ablauf der Zeit SELF_ACT_TIME prüft der Baustein ob ARE = TRUE und ARX = FALSE sind und schaltet dann ARO für die Dauer der Selbstaktivierung auf TRUE. Gleichzeitig wird ARX auf TRUE gesetzt um zu verhindern das andere Bausteine die an ARX angeschlossen sind gleichzeitig in den Autorun gehen. Der Eingangswert IN kann von 0..255 variiert werden. Ist das Eingangssignal IN &lt; SENS bleibt das Ventil dau</text:span><text:span text:style-name="T21">ernd ge</text:span><text:soft-page-break/><text:span text:style-name="T21">schlos</text:span><text:span text:style-name="T21">sen (OUT = FALSE) und IN &gt; 255 - SENS bedeutet das Ventil ist dauernd offen (OUT = TRUE).</text:span></text:p>
      <text:list xml:id="list38461140" text:continue-numbering="true" text:style-name="L1">
        <text:list-item>
          <text:list>
            <text:list-item>
              <text:h text:style-name="P216" text:outline-level="2"><text:alphabetical-index-mark-start text:id="IMark229571112"/>ACTUATOR_3P<text:alphabetical-index-mark-end text:id="IMark229571112"/></text:h>
            </text:list-item>
          </text:list>
        </text:list-item>
      </text:list>
      <text:p text:style-name="P69">Type<text:tab/>Funktionsbaustein</text:p>
      <text:p text:style-name="P66"><text:span text:style-name="T16">Input</text:span><text:span text:style-name="T21"><text:tab/>VAL : REAL (Eingang Steuersignal 0 - 1)</text:span></text:p>
      <text:p text:style-name="P73"><text:tab/>FORCE : BOOL (ON / OFF Steuermodus wenn TRUE)</text:p>
      <text:p text:style-name="P73"><text:tab/>ON : BOOL (Steuersignal wenn FORCE = TRUE)</text:p>
      <text:p text:style-name="P73">Output<text:tab/>OUT1 : BOOL (Steuersignal für Klappe in Richtung auf)</text:p>
      <text:p text:style-name="P73"><text:tab/>OUT2 : BOOL (Steuersignal für Klappe in Richtung geschlossen)</text:p>
      <text:p text:style-name="P73"><text:tab/>POS : REAL (Wert 0–1 der der Momentanen Klappenstellung </text:p>
      <text:p text:style-name="P183"><text:tab/>entspricht)</text:p>
      <text:p text:style-name="P73">Config<text:tab/>MIN_ONTIME : TIME (Minimale Laufzeit für Motor)</text:p>
      <text:p text:style-name="P73"><text:tab/>MIN_OFFTIME : TIME (Minimale Totzeit für Motor)</text:p>
      <text:p text:style-name="P73"><text:tab/>MAX_RUNTIME : TIME (Maximale Laufzeit für den Motor)</text:p>
      <text:p text:style-name="P73"><text:tab/>AUTO_DIAG_TIME : TIME (Zeit nach der Automatisch eine <text:tab/>Diagnose durchgeführt wird)</text:p>
      <text:p text:style-name="P73"><text:tab/>CAL_RUNTIME : TIME (Laufzeit des Motors nach der automatisch <text:tab/>eine Kalibrierung durchgeführt wird.)</text:p>
      <text:p text:style-name="P66"><draw:frame draw:style-name="fr3" draw:name="Grafik217" text:anchor-type="paragraph" svg:x="1.349cm" svg:y="1.344cm" svg:width="3.62cm" svg:height="3.099cm" draw:z-index="177"><draw:image xlink:href="Pictures/1000000000000112000000EA826E342F.png" xlink:type="simple" xlink:show="embed" xlink:actuate="onLoad"/></draw:frame><text:span text:style-name="T21"><text:tab/></text:span><text:span text:style-name="T16">SWITCH</text:span><text:span text:style-name="T21">_</text:span><text:span text:style-name="T16">AVAILABLE</text:span><text:span text:style-name="T21"> : BOOL (TRUE, wenn ein Endschalter <text:tab/>angeschlossen ist)</text:span></text:p>
      <text:p text:style-name="P24"><text:span text:style-name="T21"><text:line-break/>ACTUATOR_3P ist ein 3-Punkt Aktuator Interface zum Ansteuern von Stellmotoren mit Auf / Ab Eingang. Das Signal am Eingang IN wird umgesetzt in Steuerimpulse an den Ausgängen OUT1 und OUT2 die den Motor entsprechend Steuern. Das Eingangssignal IN wird so verarbeitet und die beiden Steuerausgänge (OUT1 und OUT2) so gesteuert, dass ein Eingangswert von 0 Klappe geschlossen, 1 Klappe offen, 0.5 Klappe halb geöffnet usw. bewirkt. Wird der FORCE-Eingang auf TRUE gesetzt, so folgt die Stellung </text:span><text:span text:style-name="T21">der </text:span><text:soft-page-break/><text:span text:style-name="T21">Klappen nicht mehr dem Eingangssignal IN, sondern folgt dem binären Steuersignal ON. ON=FALSE bedeutet Klappe geschlossen, ON=TRUE bedeutet Klappe 100% offen. Im </text:span><text:span text:style-name="T16">Force</text:span><text:span text:style-name="T21"> Modus sind keine Zwischenstellungen möglich. Die Klappe kann nur 100% offen oder geschlossen sein. Der Baustein kann auch einen Endschalter verarbeiten. Die Endschalter müssen so angeschlossen werden, dass egal ob oberes oder unteres Ende erreicht wurden, der Eingang END_POS TRUE wird und damit anzeigt, dass die Klappe eine der beiden Endstellungen erreicht hat. Um die Endschalterfunktion in Betrieb zu setzen muss die Config-Variable SWITCH_AVAILABLE auf TRUE stehen, ansonsten wird der Endschalter ignoriert. Ein Diagnose Eingang (DIAG) kann zu jederzeit eine Klappen und Motor-Diagnose starten. Der Baustein durchläuft dann einen Diagnosezyklus und meldet Fehler am Ausgang ERROR. Ein Diagnosezyklus fährt die Klappe zurück auf 0%, vermisst dann die Laufzeit von 0% - 100% und wieder zurück auf 0%. Er prüft auch, ob Endschalter funktionieren (falls diese durch die Config-Variable </text:span><text:span text:style-name="T16">Switch</text:span><text:span text:style-name="T21">_</text:span><text:span text:style-name="T16">available</text:span><text:span text:style-name="T21">) aktiviert wurden. Nach dem Diagnose-Zyklus fährt die Klappe wieder in die durch den Eingang IN definierte Stellung. Die während der Diagnose gemessenen Laufzeiten werden im Betrieb verwendet um die Klappe extrem genau auf die jeweils geforderte Position zu bewegen. Mit der Config-Variable AUTO_DIAG_TIME wird spezifiziert, nach welcher Zeit eine Diagnose selbständig ohne durch den Eingang DIAG aktiviert zu werden, durchgeführt wird. Nach dem Einschalten wird automatisch immer ein Diagnose-Zyklus durchgeführt. Ist dieser Wert 0, wird keine automatische Diagnose durchgeführt.</text:span></text:p>
      <text:p text:style-name="P173"><text:span text:style-name="T21">Der Ausgang BUSY zeigt an, dass sich die Klappe gerade bewegt oder Diagnose durchgeführt wird und der Ausgang POS ist ein Signal von 0 – 1, dass der momentanen Klappenstellung entspricht. Um ein Flattern der </text:span><text:span text:style-name="T21">Klappe zu </text:span><text:span text:style-name="T21">vermeiden und bei großen Motoren ein Auslaufen des Getriebes abzuwarten kann eine minimale Laufzeit (MIN_ONTIME) und eine minimale Totzeit (MIN_OFFTIME) definiert werden.</text:span></text:p>
      <text:p text:style-name="P183">Eine Klappe wird Üblicherweise Auf und Ab bewegt um verschiedenen Stellungen einzustellen. Je mehr sich eine Klappe bewegt, desto mehr weicht sie von einer idealen absoluten Position ab, weil bei jeder Bewegung ein kleiner Positionsfehler auftritt und sich über viele Bewegungen addiert. Um diesem Fehler entgegen zu Wirken kann mit der Setup Variablen CAL_RUNTIME nach einer definierten Laufzeit (aufaddierte Zeit aller Klappenbewegungen) der Klappe eine Kalibrierung automatisch durchgeführt werden. Bei dieser Kalibrierung fährt der Motor in Nullstellung und stellt die Klappe anschließend wieder auf den durch IN spezifizierten Wert. Ein Wert 0 für die CAL_RUNTIME bedeutet, dass keine automatische Kalibrierung durchgeführt wird.<text:line-break/>Die SETUP Variable MAX_RUNTIME stellt die Zeit ein, die der Motor maximal für einen vollen Durchlauf von 0% nach 100% oder umgekehrt benötigen darf.</text:p>
      <text:list xml:id="list38474035" text:continue-numbering="true" text:style-name="L1">
        <text:list-item>
          <text:list>
            <text:list-item>
              <text:h text:style-name="P216" text:outline-level="2"><text:soft-page-break/><text:alphabetical-index-mark-start text:id="IMark229571112"/>ACTUATOR_A<text:alphabetical-index-mark-end text:id="IMark229571112"/></text:h>
            </text:list-item>
          </text:list>
        </text:list-item>
      </text:list>
      <text:p text:style-name="P69">Type<text:tab/>Funktionsbaustein</text:p>
      <text:p text:style-name="P66"><text:span text:style-name="T16">Input</text:span><text:span text:style-name="T21"><text:tab/>IN: BOOL (Steuersignal)</text:span></text:p>
      <text:p text:style-name="P183">Config<text:tab/>RUNTIME : TIME (Laufzeit des Stellmotors)</text:p>
      <text:p text:style-name="P183"><text:tab/>SELF_ACT_TIME : TIME (Zeit für automatische Bewegung)</text:p>
      <text:p text:style-name="P183"><text:tab/>OUT_MIN : DWORD (Ausgangswert bei I = 0)</text:p>
      <text:p text:style-name="P183"><text:tab/>OUT_MAX : DWORD (Ausgangswert bei I = 255)</text:p>
      <text:p text:style-name="P183"><draw:frame draw:style-name="fr3" draw:name="Grafik738" text:anchor-type="paragraph" svg:x="1.002cm" svg:y="0.697cm" svg:width="2.9cm" svg:height="2.709cm" draw:z-index="781"><draw:image xlink:href="Pictures/10000000000000DB000000CD95ED1A4E.png" xlink:type="simple" xlink:show="embed" xlink:actuate="onLoad"/></draw:frame>Output<text:tab/>Y : DWORD (Steuersignal für den Stellmotor)</text:p>
      <text:p text:style-name="P183"><text:line-break/>ACTUATOR_A dient zur Ansteuerung von Stellmotoren mit analog Eingang. Der Baustein hat zwei Eingänge (I1 und I2) die im Bereich 0..255 den gesamten Ausgangsbereich an Y abdecken. Der Ausgang Y ist vom Typ DWORD, und sein Schaltbereich wird durch die Setup Werte OUT_MIN und OUT_MAX vorgegeben. Ein Eingangswert von 0 erzeugt den Ausgangswert OUT_MIN und ein Eingangswert von 255 erzeugt den Ausgangswert OUT_MAX, andere Eingangswerte erzeugen entsprechende Ausgangswerte <text:s/>zwischen OUT_MIN und OUT_MAX. Zur Ansteuerung von DA Wandlern mit 16Bit Eingang kann die Standard Funktion DWORD_TO_WORD zwischengeschaltet werden. Der Eingang IS selektiert zwischen zwei Eingängen I1 und I2, somit kann z.B. zwischen Hand und Automatikbetrieb umgeschaltet werden. Ein weiterer Eingang DX schaltet bei steigender Flanke unmittelbar eine Selbstaktivierung ein. wenn SELF_ACT_TIME &gt; t#0s dann wird die Selbstaktivierung nach Ablauf der Zeit SELF_ACT_TIME automatisch wiederholt, dabei schaltet der Ausgang Y für die Zeit RUNTIME auf OUT_MIN, anschließend für die gleiche Zeit auf OUT_MAX und kehrt danach wieder zum normalen Stellwert zurück. Der Eingang RV kann den Ausgang Invertieren, Y = OUT_MAX wenn I = 0 und Y = OUT_MIN wenn I = 255. Auf diese Weise kann ganz einfach die Laufrichtung des Stellmotors umgekehrt werden.</text:p>
      <table:table table:name="Tabelle48" table:style-name="Tabelle48">
        <table:table-column table:style-name="Tabelle48.A"/>
        <table:table-column table:style-name="Tabelle48.B"/>
        <table:table-column table:style-name="Tabelle48.C"/>
        <table:table-column table:style-name="Tabelle48.D"/>
        <table:table-row>
          <table:table-cell table:style-name="Tabelle48.A1" office:value-type="string">
            <text:p text:style-name="P140">IS</text:p>
          </table:table-cell>
          <table:table-cell table:style-name="Tabelle48.A1" office:value-type="string">
            <text:p text:style-name="P140">RV</text:p>
          </table:table-cell>
          <table:table-cell table:style-name="Tabelle48.A1" office:value-type="string">
            <text:p text:style-name="P140">DX</text:p>
          </table:table-cell>
          <table:table-cell table:style-name="Tabelle48.D1" office:value-type="string">
            <text:p text:style-name="P140">Y</text:p>
          </table:table-cell>
        </table:table-row>
        <table:table-row>
          <table:table-cell table:style-name="Tabelle48.A2" office:value-type="float" office:value="0">
            <text:p text:style-name="P140">0</text:p>
          </table:table-cell>
          <table:table-cell table:style-name="Tabelle48.A2" office:value-type="float" office:value="0">
            <text:p text:style-name="P140">0</text:p>
          </table:table-cell>
          <table:table-cell table:style-name="Tabelle48.A2" office:value-type="float" office:value="0">
            <text:p text:style-name="P140">0</text:p>
          </table:table-cell>
          <table:table-cell table:style-name="Tabelle48.D2" office:value-type="string">
            <text:p text:style-name="P139">Y = (OUT_MAX-OUT_MIN) * I1 /255 +OUT_MIN</text:p>
          </table:table-cell>
        </table:table-row>
        <table:table-row>
          <table:table-cell table:style-name="Tabelle48.A2" office:value-type="float" office:value="1">
            <text:p text:style-name="P140">1</text:p>
          </table:table-cell>
          <table:table-cell table:style-name="Tabelle48.A2" office:value-type="float" office:value="0">
            <text:p text:style-name="P140">0</text:p>
          </table:table-cell>
          <table:table-cell table:style-name="Tabelle48.A2" office:value-type="float" office:value="0">
            <text:p text:style-name="P140">0</text:p>
          </table:table-cell>
          <table:table-cell table:style-name="Tabelle48.D2" office:value-type="string">
            <text:p text:style-name="P139">Y = (OUT_MAX-OUT_MIN) * I2 /255 +OUT_MIN</text:p>
          </table:table-cell>
        </table:table-row>
        <table:table-row>
          <table:table-cell table:style-name="Tabelle48.A2" office:value-type="float" office:value="0">
            <text:p text:style-name="P140">0</text:p>
          </table:table-cell>
          <table:table-cell table:style-name="Tabelle48.A2" office:value-type="float" office:value="1">
            <text:p text:style-name="P140">1</text:p>
          </table:table-cell>
          <table:table-cell table:style-name="Tabelle48.A2" office:value-type="float" office:value="0">
            <text:p text:style-name="P140">0</text:p>
          </table:table-cell>
          <table:table-cell table:style-name="Tabelle48.D2" office:value-type="string">
            <text:p text:style-name="P139">Y = OUT_MAX - (OUT_MAX-OUT_MIN) * I1 /255</text:p>
          </table:table-cell>
        </table:table-row>
        <table:table-row>
          <table:table-cell table:style-name="Tabelle48.A2" office:value-type="float" office:value="1">
            <text:p text:style-name="P140">1</text:p>
          </table:table-cell>
          <table:table-cell table:style-name="Tabelle48.A2" office:value-type="float" office:value="1">
            <text:p text:style-name="P140">1</text:p>
          </table:table-cell>
          <table:table-cell table:style-name="Tabelle48.A2" office:value-type="float" office:value="0">
            <text:p text:style-name="P140">0</text:p>
          </table:table-cell>
          <table:table-cell table:style-name="Tabelle48.D2" office:value-type="string">
            <text:p text:style-name="P139">Y = OUT_MAX - (OUT_MAX-OUT_MIN) * I2 /255</text:p>
          </table:table-cell>
        </table:table-row>
        <text:soft-page-break/>
        <table:table-row>
          <table:table-cell table:style-name="Tabelle48.A6" office:value-type="string">
            <text:p text:style-name="P140">-</text:p>
          </table:table-cell>
          <table:table-cell table:style-name="Tabelle48.A6" office:value-type="string">
            <text:p text:style-name="P140">-</text:p>
          </table:table-cell>
          <table:table-cell table:style-name="Tabelle48.A6" office:value-type="string">
            <text:p text:style-name="P142"></text:p>
          </table:table-cell>
          <table:table-cell table:style-name="Tabelle48.D2" office:value-type="string">
            <text:p text:style-name="P139">startet einen Selbstaktivierungszyklus</text:p>
          </table:table-cell>
        </table:table-row>
      </table:table>
      <text:p text:style-name="P183"/>
      <text:list xml:id="list38456800" text:continue-numbering="true" text:style-name="L1">
        <text:list-item>
          <text:list>
            <text:list-item>
              <text:h text:style-name="P216" text:outline-level="2"><text:alphabetical-index-mark-start text:id="IMark229571112"/>ACTUATOR_COIL<text:alphabetical-index-mark-end text:id="IMark229571112"/></text:h>
            </text:list-item>
          </text:list>
        </text:list-item>
      </text:list>
      <text:p text:style-name="P69">Type<text:tab/>Funktionsbaustein</text:p>
      <text:p text:style-name="P66"><text:span text:style-name="T16">Input</text:span><text:span text:style-name="T21"><text:tab/>IN: BOOL (Steuersignal)</text:span></text:p>
      <text:p text:style-name="P183">Config<text:tab/>SELF_ACT_CYCLE : TIME (Automatische Aktivierungszeit)</text:p>
      <text:p text:style-name="P183"><text:tab/>SELF_ACT_TIME : TIME (Einschaltzeit bei Autoaktivierung)</text:p>
      <text:p text:style-name="P73">Output<text:tab/>OUT : BOOL (Steuersignal für die Pumpe)</text:p>
      <text:p text:style-name="P183"><draw:frame draw:style-name="fr3" draw:name="Grafik577" text:anchor-type="paragraph" svg:x="1.067cm" svg:y="0.623cm" svg:width="3.62cm" svg:height="1.75cm" draw:z-index="569"><draw:image xlink:href="Pictures/10000000000001120000008426B07E96.png" xlink:type="simple" xlink:show="embed" xlink:actuate="onLoad"/></draw:frame><text:tab/>STATUS : BYTE (ESR kompatibler Statusausgang)</text:p>
      <text:p text:style-name="P173"><text:span text:style-name="T21"><text:line-break/></text:span><text:span text:style-name="T19">ACTUATOR_COIL dient zur Ansteuerung von einfachen Ventilen. Der Ausgang OUT folgt dabei dem Eingangssignal IN. Wird die Config Variable SELF_ACT_CYCLE auf einen Wert größer 0 gesetzt, wird das Ventil Automatisch für die Dauer von SELF_ACT_TIME aktiviert falls es für die Zeit SELF_ACT_CYCLE ausgeschaltet war. Ein ESR kompatibler Statusausgang meldet Zustandsänderungen des Ventils zur Weiterverarbeitung oder zum Data </text:span><text:span text:style-name="T16">Logging.</text:span><text:span text:style-name="T19"> Die Statusmeldungen sind wie folgt definiert:<text:tab/></text:span></text:p>
      <text:p text:style-name="P173"><text:span text:style-name="T19">STATUS = 100, </text:span><text:span text:style-name="T16">Standby.</text:span></text:p>
      <text:p text:style-name="P188">STATUS = 101, Ventil wurde durch TRUE am Eingang IN aktiviert.</text:p>
      <text:p text:style-name="P188">STATUS = 102, Ventil wurde Automatisch aktiviert.</text:p>
      <text:p text:style-name="P188"/>
      <text:p text:style-name="P188"/>
      <text:p text:style-name="P188"/>
      <text:list xml:id="list38454561" text:continue-numbering="true" text:style-name="L1">
        <text:list-item>
          <text:list>
            <text:list-item>
              <text:h text:style-name="P216" text:outline-level="2"><text:soft-page-break/><text:alphabetical-index-mark-start text:id="IMark229571112"/>ACTUATOR_PUMP<text:alphabetical-index-mark-end text:id="IMark229571112"/></text:h>
            </text:list-item>
          </text:list>
        </text:list-item>
      </text:list>
      <text:p text:style-name="P69">Type<text:tab/>Funktionsbaustein</text:p>
      <text:p text:style-name="P66"><text:span text:style-name="T16">Input</text:span><text:span text:style-name="T21"><text:tab/>IN: BOOL (Steuersignal für Pumpe)</text:span></text:p>
      <text:p text:style-name="P73"><text:tab/>MANUAL : BOOL (Manuelles Steuersignal)</text:p>
      <text:p text:style-name="P73"><text:tab/>RST : BOOL (Reset Signal)</text:p>
      <text:p text:style-name="P73">Output<text:tab/>PUMP : BOOL (Steuersignal für die Pumpe)</text:p>
      <text:p text:style-name="P73"><text:tab/>RUNTIME : REAL (Betriebsstunden des Motors in Stunden)</text:p>
      <text:p text:style-name="P73"><text:tab/>CYCLES : REAL (Anzahl der Ein / Aus Zyklen der Pumpe)</text:p>
      <text:p text:style-name="P73">Config<text:tab/>MIN_ONTIME : TIME (Minimale Laufzeit für Motor)</text:p>
      <text:p text:style-name="P73"><text:tab/>MIN_OFFTIME : TIME (Minimale Totzeit für Motor)</text:p>
      <text:p text:style-name="P73"><text:tab/>RUN_EVERY : TIME (Zeit nach der die Pumpe selbsttätig läuft)</text:p>
      <text:p text:style-name="P73"><draw:frame draw:style-name="fr3" draw:name="Grafik218" text:anchor-type="paragraph" svg:x="1.335cm" svg:y="0.12cm" svg:width="3.18cm" svg:height="2.2cm" draw:z-index="178"><draw:image xlink:href="Pictures/10000000000000F0000000A6DA716962.png" xlink:type="simple" xlink:show="embed" xlink:actuate="onLoad"/></draw:frame><text:line-break/>ACTUATOR_PUMP ist ein Pumpeninterface mit Betriebsstundenzähler. Die Pumpe kann sowohl mit IN oder Manual eingeschaltet werden. Die Config-Variablen MIN_ONTIME und MIN_OFFTIME legen eine minimale Einschaltdauer und eine minimale Laufzeit fest. Wird der Eingang IN kürzer als MIN_ONTIME auf TRUE gesetzt, so läuft die Pumpe weiter bis die minimale Laufzeit erreicht ist. Wird die Pumpe kurz hintereinander eingeschaltet, so wartet die Pumpe bis die Zeit MIN_OFFTIME verstrichen ist, bis sie die Pumpe wieder einschaltet. Mit der Setup-Variablen RUN_EVERY wird die Zeit definiert, nach der die Pumpe selbsttätig läuft, wenn sie länger als RUN_EVERY stillsteht um ein festsitzen der Pumpe zu vermeiden. Die Pumpe schaltet in diesem Fall selbsttätig ein und läuft für MIN_ONTIME. Durch RUN_EVERY = T#0s kann die automatische Aktivierung abgeschaltet werden.</text:p>
      <text:p text:style-name="P173"><text:span text:style-name="T21">Ein interner Betriebsstundenzähler zählt die Laufzeit der Pumpe in Stunden und auch die Anzahl der Schaltzyklen. Beide Werte können mit TRUE am </text:span><text:span text:style-name="T21">Eingang RST auf Null zurückgesetzt werden. Der Betriebsstundenzähler ist permanent und geht weder bei Stromausfall oder Reset verloren. </text:span><text:span text:style-name="T16">RUNTIME</text:span><text:span text:style-name="T21"> </text:span><text:span text:style-name="T21">und </text:span><text:span text:style-name="T16">CYCLES</text:span><text:span text:style-name="T21"> sind beides REAL-Werte, damit nicht der übliche </text:span><text:span text:style-name="T16">Overflow</text:span><text:span text:style-name="T21"> wie bei TIME Werten nach 50 Tagen passiert.</text:span></text:p>
      <text:list xml:id="list38477670" text:continue-numbering="true" text:style-name="L1">
        <text:list-item>
          <text:list>
            <text:list-item>
              <text:h text:style-name="P216" text:outline-level="2"><text:soft-page-break/><text:alphabetical-index-mark-start text:id="IMark229571112"/>ACTUATOR_UD<text:alphabetical-index-mark-end text:id="IMark229571112"/></text:h>
            </text:list-item>
          </text:list>
        </text:list-item>
      </text:list>
      <text:p text:style-name="P2">Type<text:tab/><text:span text:style-name="T11">Funktionsbaustein</text:span></text:p>
      <text:p text:style-name="P66"><text:span text:style-name="T16">Input</text:span><text:span text:style-name="T21"><text:tab/>UD : BOOL (Richtungs Eingang in Auto Mode UP=TRUE)</text:span></text:p>
      <text:p text:style-name="P73"><text:tab/>ON : BOOL (TRUE, wenn im Auto Mode)</text:p>
      <text:p text:style-name="P73"><text:tab/>MANUAL : BOOL (TRUE, wenn Manual Mode)</text:p>
      <text:p text:style-name="P66"><text:span text:style-name="T21"><text:tab/>UP : BOOL (UP </text:span><text:span text:style-name="T16">enable</text:span><text:span text:style-name="T21"> in Manual Mode)</text:span></text:p>
      <text:p text:style-name="P66"><text:span text:style-name="T21"><text:tab/>DN : BOOL (DN </text:span><text:span text:style-name="T16">enable</text:span><text:span text:style-name="T21"> in Manual Mode)</text:span></text:p>
      <text:p text:style-name="P73"><text:tab/>OFF : BOOL (Sicherheits Ausschalter TRUE = Ausgänge FALSE)</text:p>
      <text:p text:style-name="P73"><text:tab/>YUP_IN : BOOL (Rückführungseingang UP Relais)</text:p>
      <text:p text:style-name="P73"><text:tab/>YDN_IN : BOOL (Rückführungseingang DN Relais)</text:p>
      <text:p text:style-name="P73">Output<text:tab/>YUP : BOOL (Ausgang für Richtung UP)</text:p>
      <text:p text:style-name="P73"><text:tab/>YDN : BOOL (Ausgang für Richtung DN)</text:p>
      <text:p text:style-name="P73"><text:tab/>STATUS : Byte (ESR kompatibler Status und Fehler Ausgang )</text:p>
      <text:p text:style-name="P73">Config<text:tab/>TON : TIME (minimale Einschaltzeit)</text:p>
      <text:p text:style-name="P73"><text:tab/>TOFF : TIME (minimale Ausschaltzeit)</text:p>
      <text:p text:style-name="P73"><draw:frame draw:style-name="fr3" draw:name="Grafik219" text:anchor-type="paragraph" svg:x="1.032cm" svg:y="1.326cm" svg:width="3.18cm" svg:height="4.44cm" draw:z-index="793"><draw:image xlink:href="Pictures/10000000000000F000000150D5281BFE.png" xlink:type="simple" xlink:show="embed" xlink:actuate="onLoad"/></draw:frame><text:tab/>OUT_RETURN : BOOL (schaltet die Rückführeingänge YUP_In und <text:tab/>YDN_in ein)</text:p>
      <text:p text:style-name="P183"><text:line-break/><text:span text:style-name="T12">ACTUATOR_UD</text:span> ist eine Wendeschützinterface mit Verriegelung und konfigurierbarem Timing. Mit zusätzlichen Rückführeingängen wird eine Aktivierung verhindert solange ein Relais klemmt. Der Baustein kennt einen Automatik und einen Handbetrieb. Im Automatikmodus (ON = TRUE und Manual = FALSE) entscheidet der Eingang UD über die Richtung und ON über Ein / Aus. Sobald der Manual Eingang TRUE wird beginnt der Manual Modus und die Ausgänge folgen nur den Eingängen UP und DN. UP und DN dürfen nie gleichzeitig TRUE sein, falls trotzdem werden beide Ausgänge FALSE. Mit einem Sicherheitsausschalteingang OFF können sowohl im Manual als auch im Automatik Modus jederzeit die Ausgänge abgeschaltet werden.<text:line-break/>Zwei Rückführeingänge YUP_IN und YDN_IN dienen dazu über separate Eingänge den Zustand der Schaltrelais auf den Baustein zurückzuführen und <text:soft-page-break/>bei versagen eines Relais das aktivieren des anderen Ausgangs zu vermeiden. Dieser Fehler wird auch durch Fehlermeldungen am Ausgang STATUS gemeldet. Die Rückmeldefunktion ist jedoch nur verfügbar wenn die Config Variable OUT_RETURN auf TRUE gesetzt wird. Status meldet auch alle Aktivitäten des Bausteins um sie für eine Datenaufzeichnung zur Verfügung zu stellen. Der Status Ausgang ist ESR kompatibel und mit anderen ESR Modulen aus unserer Bibliothek kombinierbar.<text:line-break/>Der Ausgang Status meldet 2 Fehler:</text:p>
      <text:p text:style-name="P183">1 : YUP kann nicht gesetzt werden weil YDN_IN TRUE ist.</text:p>
      <text:p text:style-name="P183">2 : YDN kann nicht gesetzt werden weil YUP_IN TRUE ist.</text:p>
      <text:p text:style-name="P183">Mit den Config Variablen TON und TOFF kann eine Mindeste Einschaltzeit und eine Mindeste Totzeit zwischen 2 Ausgangsimpulsen definiert werden um das Schalten großer Motoren oder Getriebe die ein An und Auslaufen benötigen zu ermöglichen.</text:p>
      <table:table table:name="Tabelle3" table:style-name="Tabelle3">
        <table:table-column table:style-name="Tabelle3.A"/>
        <table:table-column table:style-name="Tabelle3.B"/>
        <table:table-column table:style-name="Tabelle3.C"/>
        <table:table-column table:style-name="Tabelle3.D"/>
        <table:table-column table:style-name="Tabelle3.E"/>
        <table:table-column table:style-name="Tabelle3.F"/>
        <table:table-column table:style-name="Tabelle3.G"/>
        <table:table-column table:style-name="Tabelle3.H"/>
        <table:table-column table:style-name="Tabelle3.I"/>
        <table:table-row>
          <table:table-cell table:style-name="Tabelle3.A1" office:value-type="string">
            <text:p text:style-name="P205">Manual</text:p>
          </table:table-cell>
          <table:table-cell table:style-name="Tabelle3.A1" office:value-type="string">
            <text:p text:style-name="P206">UP</text:p>
          </table:table-cell>
          <table:table-cell table:style-name="Tabelle3.A1" office:value-type="string">
            <text:p text:style-name="P206">DN</text:p>
          </table:table-cell>
          <table:table-cell table:style-name="Tabelle3.A1" office:value-type="string">
            <text:p text:style-name="P206">ON</text:p>
          </table:table-cell>
          <table:table-cell table:style-name="Tabelle3.A1" office:value-type="string">
            <text:p text:style-name="P206">UD</text:p>
          </table:table-cell>
          <table:table-cell table:style-name="Tabelle3.A1" office:value-type="string">
            <text:p text:style-name="P206">OFF</text:p>
          </table:table-cell>
          <table:table-cell table:style-name="Tabelle3.A1" office:value-type="string">
            <text:p text:style-name="P206">YUP</text:p>
          </table:table-cell>
          <table:table-cell table:style-name="Tabelle3.A1" office:value-type="string">
            <text:p text:style-name="P206">YDN</text:p>
          </table:table-cell>
          <table:table-cell table:style-name="Tabelle3.I1" office:value-type="string">
            <text:p text:style-name="P206">Status</text:p>
          </table:table-cell>
        </table:table-row>
        <table:table-row>
          <table:table-cell table:style-name="Tabelle3.A2" office:value-type="string">
            <text:p text:style-name="P122">1</text:p>
          </table:table-cell>
          <table:table-cell table:style-name="Tabelle3.A2" office:value-type="string">
            <text:p text:style-name="P122">0</text:p>
          </table:table-cell>
          <table:table-cell table:style-name="Tabelle3.A2" office:value-type="string">
            <text:p text:style-name="P122">0</text:p>
          </table:table-cell>
          <table:table-cell table:style-name="Tabelle3.A2" office:value-type="string">
            <text:p text:style-name="P122">-</text:p>
          </table:table-cell>
          <table:table-cell table:style-name="Tabelle3.A2" office:value-type="string">
            <text:p text:style-name="P122">-</text:p>
          </table:table-cell>
          <table:table-cell table:style-name="Tabelle3.A2" office:value-type="string">
            <text:p text:style-name="P122">0</text:p>
          </table:table-cell>
          <table:table-cell table:style-name="Tabelle3.A2" office:value-type="string">
            <text:p text:style-name="P122">0</text:p>
          </table:table-cell>
          <table:table-cell table:style-name="Tabelle3.A2" office:value-type="string">
            <text:p text:style-name="P122">0</text:p>
          </table:table-cell>
          <table:table-cell table:style-name="Tabelle3.I2" office:value-type="string">
            <text:p text:style-name="P122">102</text:p>
          </table:table-cell>
        </table:table-row>
        <table:table-row>
          <table:table-cell table:style-name="Tabelle3.A2" office:value-type="string">
            <text:p text:style-name="P122">1</text:p>
          </table:table-cell>
          <table:table-cell table:style-name="Tabelle3.A2" office:value-type="string">
            <text:p text:style-name="P122">1</text:p>
          </table:table-cell>
          <table:table-cell table:style-name="Tabelle3.A2" office:value-type="string">
            <text:p text:style-name="P122">0</text:p>
          </table:table-cell>
          <table:table-cell table:style-name="Tabelle3.A2" office:value-type="string">
            <text:p text:style-name="P122">-</text:p>
          </table:table-cell>
          <table:table-cell table:style-name="Tabelle3.A2" office:value-type="string">
            <text:p text:style-name="P122">-</text:p>
          </table:table-cell>
          <table:table-cell table:style-name="Tabelle3.A2" office:value-type="string">
            <text:p text:style-name="P122">0</text:p>
          </table:table-cell>
          <table:table-cell table:style-name="Tabelle3.A2" office:value-type="string">
            <text:p text:style-name="P122">1</text:p>
          </table:table-cell>
          <table:table-cell table:style-name="Tabelle3.A2" office:value-type="string">
            <text:p text:style-name="P122">0</text:p>
          </table:table-cell>
          <table:table-cell table:style-name="Tabelle3.I2" office:value-type="string">
            <text:p text:style-name="P122">103</text:p>
          </table:table-cell>
        </table:table-row>
        <table:table-row>
          <table:table-cell table:style-name="Tabelle3.A2" office:value-type="string">
            <text:p text:style-name="P122">1</text:p>
          </table:table-cell>
          <table:table-cell table:style-name="Tabelle3.A2" office:value-type="string">
            <text:p text:style-name="P122">0</text:p>
          </table:table-cell>
          <table:table-cell table:style-name="Tabelle3.A2" office:value-type="string">
            <text:p text:style-name="P122">1</text:p>
          </table:table-cell>
          <table:table-cell table:style-name="Tabelle3.A2" office:value-type="string">
            <text:p text:style-name="P122">-</text:p>
          </table:table-cell>
          <table:table-cell table:style-name="Tabelle3.A2" office:value-type="string">
            <text:p text:style-name="P122">-</text:p>
          </table:table-cell>
          <table:table-cell table:style-name="Tabelle3.A2" office:value-type="string">
            <text:p text:style-name="P122">0</text:p>
          </table:table-cell>
          <table:table-cell table:style-name="Tabelle3.A2" office:value-type="string">
            <text:p text:style-name="P122">0</text:p>
          </table:table-cell>
          <table:table-cell table:style-name="Tabelle3.A2" office:value-type="string">
            <text:p text:style-name="P122">1</text:p>
          </table:table-cell>
          <table:table-cell table:style-name="Tabelle3.I2" office:value-type="string">
            <text:p text:style-name="P122">104</text:p>
          </table:table-cell>
        </table:table-row>
        <table:table-row>
          <table:table-cell table:style-name="Tabelle3.A2" office:value-type="string">
            <text:p text:style-name="P122">1</text:p>
          </table:table-cell>
          <table:table-cell table:style-name="Tabelle3.A2" office:value-type="string">
            <text:p text:style-name="P122">1</text:p>
          </table:table-cell>
          <table:table-cell table:style-name="Tabelle3.A2" office:value-type="string">
            <text:p text:style-name="P122">1</text:p>
          </table:table-cell>
          <table:table-cell table:style-name="Tabelle3.A2" office:value-type="string">
            <text:p text:style-name="P122">-</text:p>
          </table:table-cell>
          <table:table-cell table:style-name="Tabelle3.A2" office:value-type="string">
            <text:p text:style-name="P122">-</text:p>
          </table:table-cell>
          <table:table-cell table:style-name="Tabelle3.A2" office:value-type="string">
            <text:p text:style-name="P122">0</text:p>
          </table:table-cell>
          <table:table-cell table:style-name="Tabelle3.A2" office:value-type="string">
            <text:p text:style-name="P122">0</text:p>
          </table:table-cell>
          <table:table-cell table:style-name="Tabelle3.A2" office:value-type="string">
            <text:p text:style-name="P122">0</text:p>
          </table:table-cell>
          <table:table-cell table:style-name="Tabelle3.I2" office:value-type="string">
            <text:p text:style-name="P122">102</text:p>
          </table:table-cell>
        </table:table-row>
        <table:table-row>
          <table:table-cell table:style-name="Tabelle3.A2" office:value-type="string">
            <text:p text:style-name="P122">0</text:p>
          </table:table-cell>
          <table:table-cell table:style-name="Tabelle3.A2" office:value-type="string">
            <text:p text:style-name="P122">-</text:p>
          </table:table-cell>
          <table:table-cell table:style-name="Tabelle3.A2" office:value-type="string">
            <text:p text:style-name="P122">-</text:p>
          </table:table-cell>
          <table:table-cell table:style-name="Tabelle3.A2" office:value-type="string">
            <text:p text:style-name="P122">1</text:p>
          </table:table-cell>
          <table:table-cell table:style-name="Tabelle3.A2" office:value-type="string">
            <text:p text:style-name="P122">1</text:p>
          </table:table-cell>
          <table:table-cell table:style-name="Tabelle3.A2" office:value-type="string">
            <text:p text:style-name="P122">0</text:p>
          </table:table-cell>
          <table:table-cell table:style-name="Tabelle3.A2" office:value-type="string">
            <text:p text:style-name="P122">1</text:p>
          </table:table-cell>
          <table:table-cell table:style-name="Tabelle3.A2" office:value-type="string">
            <text:p text:style-name="P122">0</text:p>
          </table:table-cell>
          <table:table-cell table:style-name="Tabelle3.I2" office:value-type="string">
            <text:p text:style-name="P122">111</text:p>
          </table:table-cell>
        </table:table-row>
        <table:table-row>
          <table:table-cell table:style-name="Tabelle3.A2" office:value-type="string">
            <text:p text:style-name="P122">0</text:p>
          </table:table-cell>
          <table:table-cell table:style-name="Tabelle3.A2" office:value-type="string">
            <text:p text:style-name="P122">-</text:p>
          </table:table-cell>
          <table:table-cell table:style-name="Tabelle3.A2" office:value-type="string">
            <text:p text:style-name="P122">-</text:p>
          </table:table-cell>
          <table:table-cell table:style-name="Tabelle3.A2" office:value-type="string">
            <text:p text:style-name="P122">1</text:p>
          </table:table-cell>
          <table:table-cell table:style-name="Tabelle3.A2" office:value-type="string">
            <text:p text:style-name="P122">0</text:p>
          </table:table-cell>
          <table:table-cell table:style-name="Tabelle3.A2" office:value-type="string">
            <text:p text:style-name="P122">0</text:p>
          </table:table-cell>
          <table:table-cell table:style-name="Tabelle3.A2" office:value-type="string">
            <text:p text:style-name="P122">0</text:p>
          </table:table-cell>
          <table:table-cell table:style-name="Tabelle3.A2" office:value-type="string">
            <text:p text:style-name="P122">1</text:p>
          </table:table-cell>
          <table:table-cell table:style-name="Tabelle3.I2" office:value-type="string">
            <text:p text:style-name="P122">112</text:p>
          </table:table-cell>
        </table:table-row>
        <table:table-row>
          <table:table-cell table:style-name="Tabelle3.A2" office:value-type="string">
            <text:p text:style-name="P122">-</text:p>
          </table:table-cell>
          <table:table-cell table:style-name="Tabelle3.A2" office:value-type="string">
            <text:p text:style-name="P122">-</text:p>
          </table:table-cell>
          <table:table-cell table:style-name="Tabelle3.A2" office:value-type="string">
            <text:p text:style-name="P122">-</text:p>
          </table:table-cell>
          <table:table-cell table:style-name="Tabelle3.A2" office:value-type="string">
            <text:p text:style-name="P122">-</text:p>
          </table:table-cell>
          <table:table-cell table:style-name="Tabelle3.A2" office:value-type="string">
            <text:p text:style-name="P122">-</text:p>
          </table:table-cell>
          <table:table-cell table:style-name="Tabelle3.A2" office:value-type="string">
            <text:p text:style-name="P122">1</text:p>
          </table:table-cell>
          <table:table-cell table:style-name="Tabelle3.A2" office:value-type="string">
            <text:p text:style-name="P122">0</text:p>
          </table:table-cell>
          <table:table-cell table:style-name="Tabelle3.A2" office:value-type="string">
            <text:p text:style-name="P122">0</text:p>
          </table:table-cell>
          <table:table-cell table:style-name="Tabelle3.I2" office:value-type="string">
            <text:p text:style-name="P122">101</text:p>
          </table:table-cell>
        </table:table-row>
        <table:table-row>
          <table:table-cell table:style-name="Tabelle3.A2" office:value-type="string">
            <text:p text:style-name="P122">1</text:p>
          </table:table-cell>
          <table:table-cell table:style-name="Tabelle3.A2" office:value-type="string">
            <text:p text:style-name="P122">0</text:p>
          </table:table-cell>
          <table:table-cell table:style-name="Tabelle3.A2" office:value-type="string">
            <text:p text:style-name="P122">0</text:p>
          </table:table-cell>
          <table:table-cell table:style-name="Tabelle3.A2" office:value-type="string">
            <text:p text:style-name="P122">0</text:p>
          </table:table-cell>
          <table:table-cell table:style-name="Tabelle3.A2" office:value-type="string">
            <text:p text:style-name="P122">-</text:p>
          </table:table-cell>
          <table:table-cell table:style-name="Tabelle3.A2" office:value-type="string">
            <text:p text:style-name="P122">0</text:p>
          </table:table-cell>
          <table:table-cell table:style-name="Tabelle3.A2" office:value-type="string">
            <text:p text:style-name="P122">0</text:p>
          </table:table-cell>
          <table:table-cell table:style-name="Tabelle3.A2" office:value-type="string">
            <text:p text:style-name="P122">0</text:p>
          </table:table-cell>
          <table:table-cell table:style-name="Tabelle3.I2" office:value-type="string">
            <text:p text:style-name="P122">110</text:p>
          </table:table-cell>
        </table:table-row>
        <table:table-row>
          <table:table-cell table:style-name="Tabelle3.A2" office:value-type="string">
            <text:p text:style-name="P122">0</text:p>
          </table:table-cell>
          <table:table-cell table:style-name="Tabelle3.A2" office:value-type="string">
            <text:p text:style-name="P122">-</text:p>
          </table:table-cell>
          <table:table-cell table:style-name="Tabelle3.A2" office:value-type="string">
            <text:p text:style-name="P122">-</text:p>
          </table:table-cell>
          <table:table-cell table:style-name="Tabelle3.A2" office:value-type="string">
            <text:p text:style-name="P122">0</text:p>
          </table:table-cell>
          <table:table-cell table:style-name="Tabelle3.A2" office:value-type="string">
            <text:p text:style-name="P122">-</text:p>
          </table:table-cell>
          <table:table-cell table:style-name="Tabelle3.A2" office:value-type="string">
            <text:p text:style-name="P122">-</text:p>
          </table:table-cell>
          <table:table-cell table:style-name="Tabelle3.A2" office:value-type="string">
            <text:p text:style-name="P122">0</text:p>
          </table:table-cell>
          <table:table-cell table:style-name="Tabelle3.A2" office:value-type="string">
            <text:p text:style-name="P122">0</text:p>
          </table:table-cell>
          <table:table-cell table:style-name="Tabelle3.I2" office:value-type="string">
            <text:p text:style-name="P122">110</text:p>
          </table:table-cell>
        </table:table-row>
      </table:table>
      <text:p text:style-name="P183"/>
      <text:list xml:id="list38451863" text:continue-numbering="true" text:style-name="L1">
        <text:list-item>
          <text:list>
            <text:list-item>
              <text:h text:style-name="P216" text:outline-level="2"><text:alphabetical-index-mark-start text:id="IMark229571112"/>AUTORUN<text:alphabetical-index-mark-end text:id="IMark229571112"/></text:h>
            </text:list-item>
          </text:list>
        </text:list-item>
      </text:list>
      <text:p text:style-name="P2">Type<text:tab/><text:span text:style-name="T11">Funktionsbaustein</text:span></text:p>
      <text:p text:style-name="P66"><text:span text:style-name="T16">Input</text:span><text:span text:style-name="T21"><text:tab/>IN : BOOL (Schalteingang)</text:span></text:p>
      <text:p text:style-name="P183"><text:tab/>TEST : BOOL (aktiviert den Autorun Zyklus)</text:p>
      <text:p text:style-name="P173"><text:span text:style-name="T21"><text:tab/>ARE : BOOL (</text:span><text:span text:style-name="T16">Enable</text:span><text:span text:style-name="T21"> Autorun)</text:span></text:p>
      <text:p text:style-name="P183"><text:soft-page-break/>Setup<text:tab/>TRUN : TIME (Mindestlaufzeit des Verbrauchers)</text:p>
      <text:p text:style-name="P183"><text:tab/>TOFF : TIME (Maximale Standzeit des Verbrauchers)</text:p>
      <text:p text:style-name="P73">I/O<text:tab/>ARX : BOOL (Autorun <text:span text:style-name="T2">Enable</text:span> Signal)</text:p>
      <text:p text:style-name="P73">Output<text:tab/>OUT : BOOL (Ausgang für Verbraucher)</text:p>
      <text:p text:style-name="P73"><draw:frame draw:style-name="fr3" draw:name="Grafik743" text:anchor-type="paragraph" svg:x="1.025cm" svg:y="0.699cm" svg:width="2.9cm" svg:height="2.311cm" draw:z-index="794"><draw:image xlink:href="Pictures/10000000000000DB000000AFA368BBF5.png" xlink:type="simple" xlink:show="embed" xlink:actuate="onLoad"/></draw:frame><text:tab/>ARO : BOOL (TRUE wenn Autorun aktiv)</text:p>
      <text:p text:style-name="P183"><text:line-break/>AUTORUN überwacht die Laufzeit eines Verbrauchers und sorgt dafür, dass der Verbraucher an OUT nach Ablauf der Zeit TOFF mindestens für Die Zeit TRUN eingeschaltet wird. AUTORUN speichert die Laufzeit und schaltet den Ausgang erst dann ein wenn die Mindestlaufzeit TRUN innerhalb der Zeit TOFF unterschritten wird. Der Eingang IN ist der Schalteingang für den Ausgang OUT. Der Ausgang ARO signalisiert dass gerade Autorun aktiv ist. Der Eingang ARE muss TRUE sein um Autorun zu ermöglichen, an ARE kann ein <text:span text:style-name="T2">Timer</text:span> angeschlossen werden um Autorun zu bestimmten Zeiten zu starten. Der I/O ARX verhindert wenn TRUE einen Autorun, Autorun kann nur aktiv werden wenn ARI = FALSE. Wenn ARI = FLASE und die internen <text:span text:style-name="T2">Timer</text:span> abgelaufen sind schaltet der Baustein ARO und OUT auf TRUE und gleichzeitig setzt er ARI. Dieser Mechanismus kann auf verschiedene Weise genutzt werden:</text:p>
      <text:p text:style-name="P183">a) Ein TRUE am I/O ARX kann verhindern das Autorun stattfindet, es kann z.B. von einem externen <text:span text:style-name="T2">Timer</text:span> gesteuert werden und <text:s/>so den Autorun nur während einer bestimmten Zeit erlauben.</text:p>
      <text:p text:style-name="P183">b) Die ARI Anschlüsse mehrerer Bausteine können zusammen geschaltet werden und somit wird verhindert das mehrere Bausteine gleichzeitig in den Autorun Modus schalten. Die Bausteine warten bis der erste Baustein mit Autorun fertig ist und dann wird der nächste Baustein beginnen. Dies ist sehr sinnvoll um bei einer größeren Anzahl von Verbrauchern zu verhindern dass alle gleichzeitig den Autorun durchführen und somit unnötig hohe Strombelastung erzeugen.</text:p>
      <text:p text:style-name="P183">Die Betriebszustände von AUTORUN:</text:p>
      <table:table table:name="Tabelle51" table:style-name="Tabelle51">
        <table:table-column table:style-name="Tabelle51.A"/>
        <table:table-column table:style-name="Tabelle51.B"/>
        <table:table-column table:style-name="Tabelle51.A"/>
        <table:table-column table:style-name="Tabelle51.D"/>
        <table:table-column table:style-name="Tabelle51.A"/>
        <table:table-column table:style-name="Tabelle51.F"/>
        <table:table-column table:style-name="Tabelle51.G"/>
        <table:table-row>
          <table:table-cell table:style-name="Tabelle51.A1" office:value-type="string">
            <text:p text:style-name="P151">IN</text:p>
          </table:table-cell>
          <table:table-cell table:style-name="Tabelle51.A1" office:value-type="string">
            <text:p text:style-name="P151">TEST</text:p>
          </table:table-cell>
          <table:table-cell table:style-name="Tabelle51.A1" office:value-type="string">
            <text:p text:style-name="P151">ARE</text:p>
          </table:table-cell>
          <table:table-cell table:style-name="Tabelle51.A1" office:value-type="string">
            <text:p text:style-name="P151">ARX</text:p>
          </table:table-cell>
          <table:table-cell table:style-name="Tabelle51.A1" office:value-type="string">
            <text:p text:style-name="P151">ARO</text:p>
          </table:table-cell>
          <table:table-cell table:style-name="Tabelle51.A1" office:value-type="string">
            <text:p text:style-name="P152">OUT</text:p>
          </table:table-cell>
          <table:table-cell table:style-name="Tabelle51.G1" office:value-type="string">
            <text:p text:style-name="P152"/>
          </table:table-cell>
        </table:table-row>
        <table:table-row>
          <table:table-cell table:style-name="Tabelle51.A2" office:value-type="string">
            <text:p text:style-name="P150">X</text:p>
          </table:table-cell>
          <table:table-cell table:style-name="Tabelle51.B2" office:value-type="float" office:value="0">
            <text:p text:style-name="P150">0</text:p>
          </table:table-cell>
          <table:table-cell table:style-name="Tabelle51.A2" office:value-type="string">
            <text:p text:style-name="P150">-</text:p>
          </table:table-cell>
          <table:table-cell table:style-name="Tabelle51.A2" office:value-type="string">
            <text:p text:style-name="P150">-</text:p>
          </table:table-cell>
          <table:table-cell table:style-name="Tabelle51.A2" office:value-type="string">
            <text:p text:style-name="P150">-</text:p>
          </table:table-cell>
          <table:table-cell table:style-name="Tabelle51.A2" office:value-type="string">
            <text:p text:style-name="P150">X</text:p>
          </table:table-cell>
          <table:table-cell table:style-name="Tabelle51.G2" office:value-type="string">
            <text:p text:style-name="P150">normaler Betrieb</text:p>
          </table:table-cell>
        </table:table-row>
        <table:table-row>
          <table:table-cell table:style-name="Tabelle51.A2" office:value-type="string">
            <text:p text:style-name="P150">-</text:p>
          </table:table-cell>
          <table:table-cell table:style-name="Tabelle51.B2" office:value-type="float" office:value="1">
            <text:p text:style-name="P150">1</text:p>
          </table:table-cell>
          <table:table-cell table:style-name="Tabelle51.A2" office:value-type="string">
            <text:p text:style-name="P150">-</text:p>
          </table:table-cell>
          <table:table-cell table:style-name="Tabelle51.B2" office:value-type="float" office:value="1">
            <text:p text:style-name="P150">1</text:p>
          </table:table-cell>
          <table:table-cell table:style-name="Tabelle51.B2" office:value-type="float" office:value="1">
            <text:p text:style-name="P150">1</text:p>
          </table:table-cell>
          <table:table-cell table:style-name="Tabelle51.B2" office:value-type="float" office:value="1">
            <text:p text:style-name="P150">1</text:p>
          </table:table-cell>
          <table:table-cell table:style-name="Tabelle51.G2" office:value-type="string">
            <text:p text:style-name="P150">TEST startet Autorun Zyklus</text:p>
          </table:table-cell>
        </table:table-row>
        <table:table-row>
          <table:table-cell table:style-name="Tabelle51.A2" office:value-type="string">
            <text:p text:style-name="P150">-</text:p>
          </table:table-cell>
          <table:table-cell table:style-name="Tabelle51.B2" office:value-type="float" office:value="0">
            <text:p text:style-name="P150">0</text:p>
          </table:table-cell>
          <table:table-cell table:style-name="Tabelle51.B2" office:value-type="float" office:value="1">
            <text:p text:style-name="P150">1</text:p>
          </table:table-cell>
          <table:table-cell table:style-name="Tabelle51.B2" office:value-type="float" office:value="1">
            <text:p text:style-name="P150">1</text:p>
          </table:table-cell>
          <table:table-cell table:style-name="Tabelle51.A2" office:value-type="string">
            <text:p text:style-name="P150">0 &gt;&gt; 1</text:p>
          </table:table-cell>
          <table:table-cell table:style-name="Tabelle51.B2" office:value-type="float" office:value="1">
            <text:p text:style-name="P150">1</text:p>
          </table:table-cell>
          <table:table-cell table:style-name="Tabelle51.G2" office:value-type="string">
            <text:p text:style-name="P150">Autorun Zyklus ist aktiv</text:p>
          </table:table-cell>
        </table:table-row>
      </table:table>
      <text:p text:style-name="P183"/>
      <text:p text:style-name="P183"><draw:frame draw:style-name="fr3" draw:name="Grafik744" text:anchor-type="paragraph" svg:x="1.067cm" svg:y="0.669cm" svg:width="15.998cm" svg:height="2.083cm" draw:z-index="797"><draw:image xlink:href="Pictures/100000000000029C000000572C4AF2E2.png" xlink:type="simple" xlink:show="embed" xlink:actuate="onLoad"/></draw:frame><text:soft-page-break/>Eine simple Anwendung von Autorun mit Eingang und Ausgang:</text:p>
      <text:p text:style-name="P183"/>
      <text:p text:style-name="P183"><draw:frame draw:style-name="fr3" draw:name="Grafik745" text:anchor-type="paragraph" svg:x="1.002cm" svg:y="2.177cm" svg:width="15.998cm" svg:height="4.598cm" draw:z-index="795"><draw:image xlink:href="Pictures/100000000000029C000000C079B11C89.png" xlink:type="simple" xlink:show="embed" xlink:actuate="onLoad"/></draw:frame>Im nächsten Beispiel werden Die Eingänge ARE (Autorun <text:span text:style-name="T2">Enable</text:span>) durch einen <text:span text:style-name="T2">Timer</text:span> Freigegeben, so dass Autorun nur zu bestimmten Zeiten ausgeführt wird. Der Autorun der Bausteine X1 und X2 startet hierbei gleichzeitig.</text:p>
      <text:p text:style-name="P183"/>
      <text:p text:style-name="P183"><draw:frame draw:style-name="fr3" draw:name="Grafik746" text:anchor-type="paragraph" svg:x="1.09cm" svg:y="1.831cm" svg:width="15.371cm" svg:height="6.83cm" draw:z-index="796"><draw:image xlink:href="Pictures/100000000000029C0000012975744091.png" xlink:type="simple" xlink:show="embed" xlink:actuate="onLoad"/></draw:frame>Das folgende Beispiel zeigt 3 Autorun Bausteine die über ARI gegenseitig verriegelt sind, so dass immer nur ein Baustein in den Autorun gehen kann und der andere entsprechend warten muss.</text:p>
      <text:p text:style-name="P183"/>
      <text:p text:style-name="P183"/>
      <text:list xml:id="list38465165" text:continue-numbering="true" text:style-name="L1">
        <text:list-item>
          <text:h text:style-name="P210" text:outline-level="1">Heizung Lüftung und Klima</text:h>
          <text:list>
            <text:list-item>
              <text:h text:style-name="P216" text:outline-level="2"><text:alphabetical-index-mark-start text:id="IMark229571112"/>AIR_DENSITY<text:alphabetical-index-mark-end text:id="IMark229571112"/></text:h>
            </text:list-item>
          </text:list>
        </text:list-item>
      </text:list>
      <text:p text:style-name="P2">Type<text:tab/><text:span text:style-name="T11">Funktion</text:span> : REAL</text:p>
      <text:p text:style-name="P66"><text:span text:style-name="T16">Input</text:span><text:span text:style-name="T21"><text:tab/>T : REAL (Temperatur der Luft in °C)</text:span></text:p>
      <text:p text:style-name="P183"><text:tab/>P : REAL (Luftdruck in Pascal)</text:p>
      <text:p text:style-name="P183"><text:tab/>RH : REAL (Luftfeuchtigkeit in %)</text:p>
      <text:p text:style-name="P73"><draw:frame draw:style-name="fr3" draw:name="Grafik366" text:anchor-type="paragraph" svg:x="1.025cm" svg:y="0.688cm" svg:width="4.069cm" svg:height="2.02cm" draw:z-index="345"><draw:image xlink:href="Pictures/1000000000000134000000993E48239F.png" xlink:type="simple" xlink:show="embed" xlink:actuate="onLoad"/></draw:frame>Output<text:tab/>(Dichte der Luft in kg/m³)</text:p>
      <text:p text:style-name="P183"><text:line-break/>AIR_DENSITY berechnet die Dichte der Luft in kg/m³ abhängig von Druck, Feuchte und Temperatur. Die Temperatur wird in °C, Druck in Pascal und die Feuchte in % (50 = 50%) angegeben.</text:p>
      <text:list xml:id="list38468184" text:continue-numbering="true" text:style-name="L1">
        <text:list-item>
          <text:list>
            <text:list-item>
              <text:h text:style-name="P216" text:outline-level="2"><text:alphabetical-index-mark-start text:id="IMark229571112"/>AIR_ENTHALPY<text:alphabetical-index-mark-end text:id="IMark229571112"/></text:h>
            </text:list-item>
          </text:list>
        </text:list-item>
      </text:list>
      <text:p text:style-name="P2">Type<text:tab/><text:span text:style-name="T11">Funktion</text:span> : REAL</text:p>
      <text:p text:style-name="P66"><text:span text:style-name="T16">Input</text:span><text:span text:style-name="T21"><text:tab/>T : REAL (Temperatur der Luft)</text:span></text:p>
      <text:p text:style-name="P183"><text:tab/>RH : REAL (Relative Feuchte der Luft)</text:p>
      <text:p text:style-name="P73"><draw:frame draw:style-name="fr3" draw:name="Grafik367" text:anchor-type="paragraph" svg:x="1.046cm" svg:y="0.667cm" svg:width="4.521cm" svg:height="1.57cm" draw:z-index="346"><draw:image xlink:href="Pictures/100000000000015600000077E6566A09.png" xlink:type="simple" xlink:show="embed" xlink:actuate="onLoad"/></draw:frame>Output<text:tab/>(Enthalpie der Luft in J/g)</text:p>
      <text:p text:style-name="P183"><text:line-break/>AIR_ENTHALPY berechnet die Enthalpie von Feuchter Luft aus den Angaben T für Temperatur in Grad Celsius und der relativen Feuchte RH in % (50 = 50%). Die Enthalpie wird in Joule / Gramm berechnet.</text:p>
      <text:list xml:id="list38468433" text:continue-numbering="true" text:style-name="L1">
        <text:list-item>
          <text:list>
            <text:list-item>
              <text:h text:style-name="P216" text:outline-level="2"><text:soft-page-break/><text:alphabetical-index-mark-start text:id="IMark229571112"/>BOILER<text:alphabetical-index-mark-end text:id="IMark229571112"/></text:h>
            </text:list-item>
          </text:list>
        </text:list-item>
      </text:list>
      <text:p text:style-name="P2"><text:span text:style-name="T11">Type</text:span><text:tab/><text:span text:style-name="T11">Funktionsbaustein</text:span></text:p>
      <text:p text:style-name="P66"><text:span text:style-name="T16">Input</text:span><text:span text:style-name="T21"><text:tab/>T_UPPER : REAL (Eingang oberer Temperatursensor)</text:span></text:p>
      <text:p text:style-name="P73"><text:tab/>T_LOWER : REAL (Eingang unterer Temperatursensor)</text:p>
      <text:p text:style-name="P73"><text:tab/>PRESSURE : REAL (Eingang Drucksensor)</text:p>
      <text:p text:style-name="P73"><text:tab/>ENABLE : BOOL (Warmwasseranforderung)</text:p>
      <text:p text:style-name="P73"><text:tab/>REQ_1 : BOOL (Anforderungseingang für vordefinierte <text:tab/>Temperatur 1)</text:p>
      <text:p text:style-name="P73"><text:tab/>REQ_2 : BOOL (Anforderungseingang für vordefinierte <text:tab/>Temperatur 2)</text:p>
      <text:p text:style-name="P73"><text:tab/>BOOST : BOOL (Anforderungseingang für sofortige Bereitstel<text:tab/>lung)</text:p>
      <text:p text:style-name="P73">Output<text:tab/>HEAT : BOOL (Ausgang für Ladekreis)</text:p>
      <text:p text:style-name="P73"><text:tab/>ERROR : BOOL (Fehlersignal)</text:p>
      <text:p text:style-name="P73"><text:tab/>STATUS : Byte (ESR kompatibler Status Ausgang)</text:p>
      <text:p text:style-name="P73">Config<text:tab/>T_UPPER_MIN : REAL (Mindesttemperatur für oben) Default = 50</text:p>
      <text:p text:style-name="P73"><text:tab/>T_UPPER_MAX : REAL (Maximaltemperatur für oben) </text:p>
      <text:p text:style-name="P183"><text:tab/>Default = 60</text:p>
      <text:p text:style-name="P2"><text:tab/><text:span text:style-name="T11">T_LOWER_ENABLE</text:span> : BOOL (FALSE, wenn unterer <text:tab/><text:tab/><text:span text:style-name="T11">Temperatursensor</text:span> nicht vorhanden ist) </text:p>
      <text:p text:style-name="P73"><text:tab/>T_LOWER_MAX : REAL (Maximaltemperatur des unten) </text:p>
      <text:p text:style-name="P183"><text:tab/>Default = 60</text:p>
      <text:p text:style-name="P73"><text:tab/>T_REQUEST_1 : REAL (Temperatur bei Anforderung 1) </text:p>
      <text:p text:style-name="P183"><text:tab/>Default = 70</text:p>
      <text:p text:style-name="P73"><text:tab/>T_REQUEST_2 : REAL(Temperatur bei Anforderung 2) </text:p>
      <text:p text:style-name="P183"><text:tab/>Default = 50</text:p>
      <text:p text:style-name="P73"><text:tab/>T_REQUEST_HYS : REAL (Hysterese für Regelung) Default = 5</text:p>
      <text:p text:style-name="P73"><text:tab/>T_PROTECT_HIGH : REAL (obere Grenztemperatur, Default = 80)</text:p>
      <text:p text:style-name="P73"><draw:frame draw:style-name="fr3" draw:name="Grafik286" text:anchor-type="paragraph" svg:x="1.305cm" svg:y="0.73cm" svg:width="3.62cm" svg:height="3.99cm" draw:z-index="239"><draw:image xlink:href="Pictures/10000000000001120000012EB846BD62.png" xlink:type="simple" xlink:show="embed" xlink:actuate="onLoad"/></draw:frame><text:tab/>T_PROTECT_LOW : REAL (untere Grenztemperatur, Default = 10)</text:p>
      <text:p text:style-name="P2"><text:soft-page-break/><text:line-break/>BOILER ist ein <text:span text:style-name="T11">Controller</text:span> <text:span text:style-name="T11">für</text:span> Pufferspeicher wie etwa Warmwasserspeicher. Durch 2 separate Temperatursensor-Eingänge können auch Schichtenspeicher geregelt werden. Mit der Config-Variable <text:s/>T_LOWER_ENABLE kann der untere Temperatursensor aus- und eingeschaltet werden. Wenn der Eingang ENABLE auf TRUE ist, wird der Boiler aufgeheizt (HEAT = TRUE) bis die Vorgabetemperatur T_LOWER_MAX im unteren Bereich des Puffers erreicht ist und dann die Heizung ausgeschaltet, bis die untere Grenztemperatur des oberen Bereichs (T_UPPER_MIN) erreicht wird. Falls T_LOWER_ENABLE auf FALSE ist, wird der untere Sensor nicht ausgewertet und die Temperatur zwischen T_UPPER_MIN und T_UPPER_MAX im oberen Bereich geregelt. Ein PRESSURE-Eingang schützt den Boiler und verhindert die Ladung, wenn nicht genügend Wasserdruck im Boiler vorhanden ist. Falls ein Drucksensor nicht vorhanden ist, bleibt der Eingang unbeschaltet. Als weitere Schutzfunktion stehen die Vorgabewerte T_PROTECT_LOW (Frostschutz) und T_PROTECT_HIGH zur Verfügung und verhindern das die Temperatur im Puffer einen oberen Grenzwert nicht übersteigt und ein unterer Grenzwert nicht unterschritten wird. Bei Auftreten eines Fehlers wird der Ausgang ERROR auf TRUE gesetzt und gleichzeitig ein Statusbyte am Ausgang Status gemeldet, welches durch Bausteine wie ESR_COLLECT weiter ausgewertet werden kann. Durch eine steigende Flanke am Eingang BOOST wird die Puffertemperatur unmittelbar auf T_UPPER_MAX (T_LOWER_ENABLE = FALSE) beziehungsweise T_LOWER_MAX (T_LOWER_ENABLE = TRUE) aufgeheizt. BOOST kann zur außerplanmäßigen Aufheizung des Boilers, wenn ENABLE auf FALSE ist, benutzt werden. Die Aufheizung durch BOOST ist flankengetriggert und führt bei jeder steigenden Flanke an BOOST zu genau einem Aufheizvorgang. Durch eine steigende Flanke an BOOST während ENABLE TRUE ist wird die Heizung sofort gestartet bis die maximale Temperatur erreicht ist. Der Boiler wird also nachgeladen, um maximale Wärmekapazität bereitzustellen. Die Eingänge REQ_1 und REQ_2 dienen dazu, jederzeit eine vordefinierte Temperatur (T_REQUEST_1 oder T_REQUEST_2) bereitzustellen. REQ kann zum Beispiel zur Bereitstellung einer höheren Temperatur zur Legionellendesinfektion oder auch zu anderen Zwecken verwendet werden. Die Bereitstellung der Request-Temperaturen erfolgt durch Messung am oberen Temperatursensor und mit einer 2-Punkt Regelung deren Hysterese durch T_REQUEST_HYS voreingestellt wird.</text:p>
      <table:table table:name="Tabelle10" table:style-name="Tabelle10">
        <table:table-column table:style-name="Tabelle10.A"/>
        <table:table-column table:style-name="Tabelle10.B"/>
        <text:soft-page-break/>
        <table:table-row>
          <table:table-cell table:style-name="Tabelle10.A1" office:value-type="string">
            <text:p text:style-name="P127">Status</text:p>
          </table:table-cell>
          <table:table-cell table:style-name="Tabelle10.B1" office:value-type="string">
            <text:p text:style-name="P94"/>
          </table:table-cell>
        </table:table-row>
        <table:table-row>
          <table:table-cell table:style-name="Tabelle10.A2" office:value-type="string">
            <text:p text:style-name="P127">1</text:p>
          </table:table-cell>
          <table:table-cell table:style-name="Tabelle10.B2" office:value-type="string">
            <text:p text:style-name="P126">oberer Temperatursensor hat die obere Grenztemperatur überschritten</text:p>
          </table:table-cell>
        </table:table-row>
        <table:table-row>
          <table:table-cell table:style-name="Tabelle10.A2" office:value-type="string">
            <text:p text:style-name="P127">2</text:p>
          </table:table-cell>
          <table:table-cell table:style-name="Tabelle10.B2" office:value-type="string">
            <text:p text:style-name="P126">oberer Temperatursensor hat die untere Grenztemperatur unterschritten</text:p>
          </table:table-cell>
        </table:table-row>
        <table:table-row>
          <table:table-cell table:style-name="Tabelle10.A2" office:value-type="string">
            <text:p text:style-name="P127">3</text:p>
          </table:table-cell>
          <table:table-cell table:style-name="Tabelle10.B2" office:value-type="string">
            <text:p text:style-name="P126">unterer Temperatursensor hat die obere Grenztemperatur überschritten</text:p>
          </table:table-cell>
        </table:table-row>
        <table:table-row>
          <table:table-cell table:style-name="Tabelle10.A2" office:value-type="string">
            <text:p text:style-name="P127">4</text:p>
          </table:table-cell>
          <table:table-cell table:style-name="Tabelle10.B2" office:value-type="string">
            <text:p text:style-name="P126">unterer Temperatursensor hat die untere Grenztemperatur unterschritten</text:p>
          </table:table-cell>
        </table:table-row>
        <table:table-row>
          <table:table-cell table:style-name="Tabelle10.A2" office:value-type="string">
            <text:p text:style-name="P127">5</text:p>
          </table:table-cell>
          <table:table-cell table:style-name="Tabelle10.B2" office:value-type="string">
            <text:p text:style-name="P126">Wasserdruck im Puffer ist zu gering</text:p>
          </table:table-cell>
        </table:table-row>
        <table:table-row>
          <table:table-cell table:style-name="Tabelle10.A2" office:value-type="string">
            <text:p text:style-name="P127">100</text:p>
          </table:table-cell>
          <table:table-cell table:style-name="Tabelle10.B2" office:value-type="string">
            <text:p text:style-name="P96">Standby</text:p>
          </table:table-cell>
        </table:table-row>
        <table:table-row>
          <table:table-cell table:style-name="Tabelle10.A2" office:value-type="string">
            <text:p text:style-name="P127">101</text:p>
          </table:table-cell>
          <table:table-cell table:style-name="Tabelle10.B2" office:value-type="string">
            <text:p text:style-name="P126">BOOST Nachladung</text:p>
          </table:table-cell>
        </table:table-row>
        <table:table-row>
          <table:table-cell table:style-name="Tabelle10.A2" office:value-type="string">
            <text:p text:style-name="P127">102</text:p>
          </table:table-cell>
          <table:table-cell table:style-name="Tabelle10.B2" office:value-type="string">
            <text:p text:style-name="P126">Standard Nachladung</text:p>
          </table:table-cell>
        </table:table-row>
        <table:table-row>
          <table:table-cell table:style-name="Tabelle10.A2" office:value-type="string">
            <text:p text:style-name="P127">103</text:p>
          </table:table-cell>
          <table:table-cell table:style-name="Tabelle10.B2" office:value-type="string">
            <text:p text:style-name="P126">Nachladung auf <text:span text:style-name="T2">Request</text:span> Temperatur 1</text:p>
          </table:table-cell>
        </table:table-row>
        <table:table-row>
          <table:table-cell table:style-name="Tabelle10.A2" office:value-type="string">
            <text:p text:style-name="P127">104</text:p>
          </table:table-cell>
          <table:table-cell table:style-name="Tabelle10.B2" office:value-type="string">
            <text:p text:style-name="P126">Nachladung auf <text:span text:style-name="T2">Request</text:span> Temperatur 2</text:p>
          </table:table-cell>
        </table:table-row>
      </table:table>
      <text:p text:style-name="P2"><draw:frame draw:style-name="fr3" draw:name="Grafik287" text:anchor-type="paragraph" svg:x="1.039cm" svg:y="1.87cm" svg:width="15.52cm" svg:height="3.99cm" draw:z-index="240"><draw:image xlink:href="Pictures/100000000000030E000000C9488E3441.png" xlink:type="simple" xlink:show="embed" xlink:actuate="onLoad"/></draw:frame><text:line-break/>Das folgende <text:span text:style-name="T11">Beispiel </text:span>zeigt die Anwendung von BOILER mit einem TIMER und einer Feiertagsschaltung:</text:p>
      <text:p text:style-name="P73"/>
      <text:list xml:id="list38468712" text:continue-numbering="true" text:style-name="L1">
        <text:list-item>
          <text:list>
            <text:list-item>
              <text:h text:style-name="P216" text:outline-level="2"><text:alphabetical-index-mark-start text:id="IMark229571112"/>BURNER<text:alphabetical-index-mark-end text:id="IMark229571112"/></text:h>
            </text:list-item>
          </text:list>
        </text:list-item>
      </text:list>
      <text:p text:style-name="P2">Type<text:tab/><text:span text:style-name="T11">Funktionsbaustein</text:span></text:p>
      <text:p text:style-name="P66"><text:span text:style-name="T16">Input</text:span><text:span text:style-name="T21"><text:tab/>IN : BOOL (Steuereingang)</text:span></text:p>
      <text:p text:style-name="P73"><text:tab/>STAGE2 : BOOL (Steuereingang Stufe 2)</text:p>
      <text:p text:style-name="P73"><text:tab/>OVER_TEMP : BOOL (Temperaturbegrenzung des Kessels)</text:p>
      <text:p text:style-name="P73"><text:tab/>OIL_TEMP : BOOL (Thermostat der Ölvorerwärmung)</text:p>
      <text:p text:style-name="P73"><text:tab/>FLAME : BOOL (Flammwächter)</text:p>
      <text:p text:style-name="P73"><text:soft-page-break/><text:tab/>RST : BOOL (Reset-Eingang Für Störrücksetzung)</text:p>
      <text:p text:style-name="P73"><text:tab/>RST_TIMER : BOOL (Reset für die Betriebszähler)</text:p>
      <text:p text:style-name="P73">Output<text:tab/>MOTOR : BOOL (Steuersignal für den Motor)</text:p>
      <text:p text:style-name="P73"><text:tab/>COIL1 : BOOL (Steuersignal für Ölventil Stufe 1)</text:p>
      <text:p text:style-name="P73"><text:tab/>COIL2 : BOOL (Steuereingang für Ölventil Stufe 2)</text:p>
      <text:p text:style-name="P73"><text:tab/>PRE_HEAT : BOOL (Ölvorerwärmung)</text:p>
      <text:p text:style-name="P73"><text:tab/>IGNITE : BOOL (Zündung)</text:p>
      <text:p text:style-name="P183"><text:tab/>KWH : REAL (Kilowattstundenzähler)</text:p>
      <text:p text:style-name="P73"><text:tab/>STATUS : Byte (ESR Kompatibler Statusausgang)</text:p>
      <text:p text:style-name="P183"><text:tab/>FAIL : BOOL (Störmeldung: TRUE, wenn Fehler Auftritt)</text:p>
      <text:p text:style-name="P73">IO<text:tab/>RUNTIME1 : UDINT (Betriebszeit Stufe 1)</text:p>
      <text:p text:style-name="P73">IO<text:tab/>RUNTIME2 : UDINT (Betriebszeit Stufe 2)</text:p>
      <text:p text:style-name="P73">IO<text:tab/>CYCLES : UDINT (Anzahl der Brenner Starts)</text:p>
      <text:p text:style-name="P73">Config<text:tab/>PRE_HEAT_TIME : TIME (maximale Zeit für die Ölvorerwärmung)</text:p>
      <text:p text:style-name="P73"><text:tab/>PRE_VENT_TIME : TIME (Vorbelüftungszeit)</text:p>
      <text:p text:style-name="P73"><text:tab/>PRE_IGNITE_TIME : TIME (Vorzündungszeit)</text:p>
      <text:p text:style-name="P73"><text:tab/>POST_IGNITE_TIME : TIME (Nachzündungszeit)</text:p>
      <text:p text:style-name="P73"><text:tab/>STAGE2_DELAY : TIME (Verzögerung Stufe 2)</text:p>
      <text:p text:style-name="P73"><text:tab/>SAFETY_TIME : TIME ()</text:p>
      <text:p text:style-name="P73"><text:tab/>LOCKOUT_TIME : TIME (Zeit die vergehen muss, bevor mit </text:p>
      <text:p text:style-name="P183"><text:tab/>einem RST eine Störung gelöscht werden kann)</text:p>
      <text:p text:style-name="P73"><text:tab/>MULTIPLE_IGNITION : BOOL ()</text:p>
      <text:p text:style-name="P73"><text:tab/>KW1 : REAL (Leistung des Brenners auf Stufe 1 in KW)</text:p>
      <text:p text:style-name="P73"><draw:frame draw:style-name="fr3" draw:name="Grafik220" text:anchor-type="paragraph" svg:x="0.891cm" svg:y="0.667cm" svg:width="4.48cm" svg:height="5.091cm" draw:z-index="730"><draw:image xlink:href="Pictures/100000000000015300000181F6FC643D.png" xlink:type="simple" xlink:show="embed" xlink:actuate="onLoad"/></draw:frame><text:tab/>KW2 : REAL (Leistung des Brenners auf Stufe 2 in KW)</text:p>
      <text:p text:style-name="P66"><text:span text:style-name="T21"><text:line-break/>BURNER ist ein Steuerinterface für Öl- oder Gasbrenner mit Betriebszähler </text:span><text:soft-page-break/><text:span text:style-name="T21">und Kilowattstundenzähler. Der Baustein steuert einen zweistufigen Bren</text:span><text:span text:style-name="T21">ner mit optionaler Ölvorerwärmung. Der Eingang IN ist der Steuereingang, der den Brenner nur dann startet, wenn der Eingang OVER_TEMP FALSE ist. OVER_TEMP ist der Kesselschutzthermostat, der TRUE wird, wenn die Kesseltemperatur die maximal zulässige Temperatur erreicht hat. Ein Brennerstart beginnt mit der Ölvorerwärmung, indem PRE_HEAT TRUE wird. Dann wird auf ein Signal am Eingang OIL_TEMP gewartet. Falls innerhalb der PRE_HEAT_TIME das Signal OIL_TEMP nicht TRUE wird und die Öltemperatur nicht erreicht wird, wird die Startsequenz unterbrochen und der Ausgang Störung gesetzt. Gleichzeitig wird am Ausgang Status Der Fehler 1 ausgegeben. Nach der Ölvorerwärmung wird der Motor eingeschaltet und damit der Ventilator in Betrieb gesetzt. Anschließend wird nach definierter Zeit die Zündung eingeschaltet und danach das Ölventil geöffnet. Sollte dann nach spezifizierter Zeit (SAFETY_TIME) der Flammwächter nicht ansprechen, so geht der Baustein auf Störung. Eine Störung wird auch dann signalisiert, wenn der Flammwächter bereits vor der Zündung anspricht. Falls nach erfolgreicher Zündung die Flamme abreißt und die Config-Variable MULTIPLE_IGNITION = TRUE steht, wird sofort wieder gezündet. Eine zweite Stufe wird nach Ablauf der STAGE2_DELAY Zeit automatisch zugeschaltet wenn der Eingang STAGE2 TRUE ist.</text:span></text:p>
      <text:p text:style-name="P2">Tritt eine Störung auf, so wird der Baustein für eine feste Zeit LOCKOUT_TIME blockiert und erst danach kann ein RST den Betrieb wieder starten. Während der LOCKOUT_TIME muss der RST-<text:span text:style-name="T2">Eingang</text:span> FALSE sein. Ein TRUE am Eingang OVER_TEMP stoppt sofort jede Aktion und meldet den Fehler 9.</text:p>
      <text:p text:style-name="P20">Der Status-Ausgang signalisiert den momentanen Zustand des Bausteins:</text:p>
      <text:p text:style-name="P175"><text:span text:style-name="T21">110 = Warten auf Startsignal (</text:span><text:span text:style-name="T16">Standby</text:span><text:span text:style-name="T21">)<text:line-break/>111 = Startsequenz wird durchlaufen<text:line-break/>112 = Brenner Läuft auf Stufe 1<text:line-break/>113 = Brenner läuft auf Stufe 2</text:span></text:p>
      <text:p text:style-name="P187">Eine Reihe von Fehlerzuständen werden am Ausgang STATUS bereitgestellt, wenn ein Fehler Auftritt:</text:p>
      <text:p text:style-name="P175"><text:span text:style-name="T21">1 = Ölvorerwärmung hat innerhalb der PRE_HEAT_TIME nicht angesprochen<text:line-break/>2 = Flammwächter ist aktiv während der Ölvorerwärmung (PRE_HEAT_TIME)<text:line-break/></text:span><text:span text:style-name="T21">3 = Flammwächter ist aktiv während der Belüftungszeit (PRE_VENTILATION_TIME)<text:line-break/>4 = Sicherheitszeit (</text:span><text:span text:style-name="T16">Safety</text:span><text:span text:style-name="T21">_TIME) wurde ohne Flamme überschritten<text:line-break/>5 = Flamme ist im Betrieb Abgerissen<text:line-break/>9 = Kessel Übertemperatur Kontakt hat Ausgelöst</text:span></text:p>
      <text:p text:style-name="P187">Traceaufzeichnung einer Normalen Startsequenz:</text:p>
      <text:p text:style-name="P66"><draw:frame draw:style-name="fr3" draw:name="Grafik221" text:anchor-type="paragraph" svg:x="1.044cm" svg:y="0.078cm" svg:width="15.939cm" svg:height="7.167cm" draw:z-index="179"><draw:image xlink:href="Pictures/1000000000000450000001F0CC5508DE.png" xlink:type="simple" xlink:show="embed" xlink:actuate="onLoad"/></draw:frame><text:span text:style-name="T21"><text:line-break/>Das Signal IN startet die Sequenz mit dem Ausgang PRE_HEAT. Nach erreichen der Öltemperatur (OIL_TEMP = TRUE) wird der Motor gestartet und </text:span><text:span text:style-name="T21">die </text:span><text:soft-page-break/><text:span text:style-name="T21">PRE_VENTILATION_TIME (Zeit von Motor Start bis Ölventil offen ist) abgewartet. Nach einer einstellbaren Zeit (PPR_IGNITION_TIME) vor dem Öffnen des Ölventils wird die Zündung eingeschaltet. Die Zündung bleibt dann solange ein, bis die POST_IGNITION_TIME abgelaufen ist. Die Betriebszeit wird je Stufe unabhängig in Sekunden gemessen.</text:span></text:p>
      <text:p text:style-name="P183"/>
      <table:table table:name="Tabelle4" table:style-name="Tabelle4">
        <table:table-column table:style-name="Tabelle4.A"/>
        <table:table-column table:style-name="Tabelle4.B"/>
        <table:table-column table:style-name="Tabelle4.C"/>
        <table:table-column table:style-name="Tabelle4.D"/>
        <table:table-column table:style-name="Tabelle4.E"/>
        <table:table-column table:style-name="Tabelle4.F"/>
        <table:table-column table:style-name="Tabelle4.G"/>
        <table:table-column table:style-name="Tabelle4.H"/>
        <table:table-column table:style-name="Tabelle4.I"/>
        <table:table-column table:style-name="Tabelle4.J"/>
        <table:table-column table:style-name="Tabelle4.K"/>
        <table:table-column table:style-name="Tabelle4.L"/>
        <table:table-row table:style-name="Tabelle4.1">
          <table:table-cell table:style-name="Tabelle4.A1" office:value-type="string">
            <text:p text:style-name="P109">In</text:p>
          </table:table-cell>
          <table:table-cell table:style-name="Tabelle4.A1" office:value-type="string">
            <text:p text:style-name="P115">over</text:p>
            <text:p text:style-name="P115">temp</text:p>
          </table:table-cell>
          <table:table-cell table:style-name="Tabelle4.A1" office:value-type="string">
            <text:p text:style-name="P115">Oil</text:p>
            <text:p text:style-name="P109">temp</text:p>
          </table:table-cell>
          <table:table-cell table:style-name="Tabelle4.A1" office:value-type="string">
            <text:p text:style-name="P115">Flame</text:p>
          </table:table-cell>
          <table:table-cell table:style-name="Tabelle4.A1" office:value-type="string">
            <text:p text:style-name="P109">Rst</text:p>
          </table:table-cell>
          <table:table-cell table:style-name="Tabelle4.A1" office:value-type="string">
            <text:p text:style-name="P115">motor</text:p>
          </table:table-cell>
          <table:table-cell table:style-name="Tabelle4.A1" office:value-type="string">
            <text:p text:style-name="P115">Oil</text:p>
            <text:p text:style-name="P115">coil</text:p>
          </table:table-cell>
          <table:table-cell table:style-name="Tabelle4.A1" office:value-type="string">
            <text:p text:style-name="P109">Pre</text:p>
            <text:p text:style-name="P115">heat</text:p>
          </table:table-cell>
          <table:table-cell table:style-name="Tabelle4.A1" office:value-type="string">
            <text:p text:style-name="P116">ignite</text:p>
          </table:table-cell>
          <table:table-cell table:style-name="Tabelle4.A1" office:value-type="string">
            <text:p text:style-name="P105">Status</text:p>
          </table:table-cell>
          <table:table-cell table:style-name="Tabelle4.A1" office:value-type="string">
            <text:p text:style-name="P116">fail</text:p>
          </table:table-cell>
          <table:table-cell table:style-name="Tabelle4.L1" office:value-type="string">
            <text:p text:style-name="P94"/>
          </table:table-cell>
        </table:table-row>
        <table:table-row table:style-name="Tabelle4.2">
          <table:table-cell table:style-name="Tabelle4.A2" office:value-type="string">
            <text:p text:style-name="P109">0</text:p>
          </table:table-cell>
          <table:table-cell table:style-name="Tabelle4.A2" office:value-type="string">
            <text:p text:style-name="P109">0</text:p>
          </table:table-cell>
          <table:table-cell table:style-name="Tabelle4.A2" office:value-type="string">
            <text:p text:style-name="P109">-</text:p>
          </table:table-cell>
          <table:table-cell table:style-name="Tabelle4.A2" office:value-type="string">
            <text:p text:style-name="P109">-</text:p>
          </table:table-cell>
          <table:table-cell table:style-name="Tabelle4.A2" office:value-type="string">
            <text:p text:style-name="P109">0</text:p>
          </table:table-cell>
          <table:table-cell table:style-name="Tabelle4.A2" office:value-type="string">
            <text:p text:style-name="P109">0</text:p>
          </table:table-cell>
          <table:table-cell table:style-name="Tabelle4.A2" office:value-type="string">
            <text:p text:style-name="P109">0</text:p>
          </table:table-cell>
          <table:table-cell table:style-name="Tabelle4.A2" office:value-type="string">
            <text:p text:style-name="P109">0</text:p>
          </table:table-cell>
          <table:table-cell table:style-name="Tabelle4.A2" office:value-type="string">
            <text:p text:style-name="P106">0</text:p>
          </table:table-cell>
          <table:table-cell table:style-name="Tabelle4.A2" office:value-type="string">
            <text:p text:style-name="P106">110</text:p>
          </table:table-cell>
          <table:table-cell table:style-name="Tabelle4.A2" office:value-type="string">
            <text:p text:style-name="P106">0</text:p>
          </table:table-cell>
          <table:table-cell table:style-name="Tabelle4.L2" office:value-type="string">
            <text:p text:style-name="P106">Wartezustand</text:p>
          </table:table-cell>
        </table:table-row>
        <table:table-row table:style-name="Tabelle4.2">
          <table:table-cell table:style-name="Tabelle4.A2" office:value-type="string">
            <text:p text:style-name="P109">1</text:p>
          </table:table-cell>
          <table:table-cell table:style-name="Tabelle4.A2" office:value-type="string">
            <text:p text:style-name="P109">0</text:p>
          </table:table-cell>
          <table:table-cell table:style-name="Tabelle4.A2" office:value-type="string">
            <text:p text:style-name="P109">0</text:p>
          </table:table-cell>
          <table:table-cell table:style-name="Tabelle4.A2" office:value-type="string">
            <text:p text:style-name="P109">0</text:p>
          </table:table-cell>
          <table:table-cell table:style-name="Tabelle4.A2" office:value-type="string">
            <text:p text:style-name="P109">0</text:p>
          </table:table-cell>
          <table:table-cell table:style-name="Tabelle4.A2" office:value-type="string">
            <text:p text:style-name="P109">0</text:p>
          </table:table-cell>
          <table:table-cell table:style-name="Tabelle4.A2" office:value-type="string">
            <text:p text:style-name="P109">0</text:p>
          </table:table-cell>
          <table:table-cell table:style-name="Tabelle4.A2" office:value-type="string">
            <text:p text:style-name="P109">1</text:p>
          </table:table-cell>
          <table:table-cell table:style-name="Tabelle4.A2" office:value-type="string">
            <text:p text:style-name="P106">0</text:p>
          </table:table-cell>
          <table:table-cell table:style-name="Tabelle4.A2" office:value-type="string">
            <text:p text:style-name="P106">111</text:p>
          </table:table-cell>
          <table:table-cell table:style-name="Tabelle4.A2" office:value-type="string">
            <text:p text:style-name="P106">0</text:p>
          </table:table-cell>
          <table:table-cell table:style-name="Tabelle4.L2" office:value-type="string">
            <text:p text:style-name="P106">Ölvorwärmphase</text:p>
          </table:table-cell>
        </table:table-row>
        <table:table-row table:style-name="Tabelle4.2">
          <table:table-cell table:style-name="Tabelle4.A2" office:value-type="string">
            <text:p text:style-name="P109">1</text:p>
          </table:table-cell>
          <table:table-cell table:style-name="Tabelle4.A2" office:value-type="string">
            <text:p text:style-name="P109">0</text:p>
          </table:table-cell>
          <table:table-cell table:style-name="Tabelle4.A2" office:value-type="string">
            <text:p text:style-name="P109">1</text:p>
          </table:table-cell>
          <table:table-cell table:style-name="Tabelle4.A2" office:value-type="string">
            <text:p text:style-name="P109">0</text:p>
          </table:table-cell>
          <table:table-cell table:style-name="Tabelle4.A2" office:value-type="string">
            <text:p text:style-name="P109">0</text:p>
          </table:table-cell>
          <table:table-cell table:style-name="Tabelle4.A2" office:value-type="string">
            <text:p text:style-name="P109">1</text:p>
          </table:table-cell>
          <table:table-cell table:style-name="Tabelle4.A2" office:value-type="string">
            <text:p text:style-name="P109">0</text:p>
          </table:table-cell>
          <table:table-cell table:style-name="Tabelle4.A2" office:value-type="string">
            <text:p text:style-name="P109">1</text:p>
          </table:table-cell>
          <table:table-cell table:style-name="Tabelle4.A2" office:value-type="string">
            <text:p text:style-name="P106">0</text:p>
          </table:table-cell>
          <table:table-cell table:style-name="Tabelle4.A2" office:value-type="string">
            <text:p text:style-name="P106">111</text:p>
          </table:table-cell>
          <table:table-cell table:style-name="Tabelle4.A2" office:value-type="string">
            <text:p text:style-name="P106">0</text:p>
          </table:table-cell>
          <table:table-cell table:style-name="Tabelle4.L2" office:value-type="string">
            <text:p text:style-name="P106">Vorbelüftungsphase</text:p>
          </table:table-cell>
        </table:table-row>
        <table:table-row table:style-name="Tabelle4.2">
          <table:table-cell table:style-name="Tabelle4.A2" office:value-type="string">
            <text:p text:style-name="P109">1</text:p>
          </table:table-cell>
          <table:table-cell table:style-name="Tabelle4.A2" office:value-type="string">
            <text:p text:style-name="P109">0</text:p>
          </table:table-cell>
          <table:table-cell table:style-name="Tabelle4.A2" office:value-type="string">
            <text:p text:style-name="P109">1</text:p>
          </table:table-cell>
          <table:table-cell table:style-name="Tabelle4.A2" office:value-type="string">
            <text:p text:style-name="P109">0</text:p>
          </table:table-cell>
          <table:table-cell table:style-name="Tabelle4.A2" office:value-type="string">
            <text:p text:style-name="P109">0</text:p>
          </table:table-cell>
          <table:table-cell table:style-name="Tabelle4.A2" office:value-type="string">
            <text:p text:style-name="P109">1</text:p>
          </table:table-cell>
          <table:table-cell table:style-name="Tabelle4.A2" office:value-type="string">
            <text:p text:style-name="P109">0</text:p>
          </table:table-cell>
          <table:table-cell table:style-name="Tabelle4.A2" office:value-type="string">
            <text:p text:style-name="P109">1</text:p>
          </table:table-cell>
          <table:table-cell table:style-name="Tabelle4.A2" office:value-type="string">
            <text:p text:style-name="P106">1</text:p>
          </table:table-cell>
          <table:table-cell table:style-name="Tabelle4.A2" office:value-type="string">
            <text:p text:style-name="P106">111</text:p>
          </table:table-cell>
          <table:table-cell table:style-name="Tabelle4.A2" office:value-type="string">
            <text:p text:style-name="P106">0</text:p>
          </table:table-cell>
          <table:table-cell table:style-name="Tabelle4.L2" office:value-type="string">
            <text:p text:style-name="P106">Vorzündphase</text:p>
          </table:table-cell>
        </table:table-row>
        <table:table-row table:style-name="Tabelle4.2">
          <table:table-cell table:style-name="Tabelle4.A2" office:value-type="string">
            <text:p text:style-name="P109">1</text:p>
          </table:table-cell>
          <table:table-cell table:style-name="Tabelle4.A2" office:value-type="string">
            <text:p text:style-name="P109">0</text:p>
          </table:table-cell>
          <table:table-cell table:style-name="Tabelle4.A2" office:value-type="string">
            <text:p text:style-name="P109">1</text:p>
          </table:table-cell>
          <table:table-cell table:style-name="Tabelle4.A2" office:value-type="string">
            <text:p text:style-name="P109">0</text:p>
          </table:table-cell>
          <table:table-cell table:style-name="Tabelle4.A2" office:value-type="string">
            <text:p text:style-name="P109">0</text:p>
          </table:table-cell>
          <table:table-cell table:style-name="Tabelle4.A2" office:value-type="string">
            <text:p text:style-name="P109">1</text:p>
          </table:table-cell>
          <table:table-cell table:style-name="Tabelle4.A2" office:value-type="string">
            <text:p text:style-name="P109">1</text:p>
          </table:table-cell>
          <table:table-cell table:style-name="Tabelle4.A2" office:value-type="string">
            <text:p text:style-name="P109">1</text:p>
          </table:table-cell>
          <table:table-cell table:style-name="Tabelle4.A2" office:value-type="string">
            <text:p text:style-name="P106">1</text:p>
          </table:table-cell>
          <table:table-cell table:style-name="Tabelle4.A2" office:value-type="string">
            <text:p text:style-name="P106">111</text:p>
          </table:table-cell>
          <table:table-cell table:style-name="Tabelle4.A2" office:value-type="string">
            <text:p text:style-name="P106">0</text:p>
          </table:table-cell>
          <table:table-cell table:style-name="Tabelle4.L2" office:value-type="string">
            <text:p text:style-name="P106">Ventil Stufe 1 öffnen</text:p>
          </table:table-cell>
        </table:table-row>
        <table:table-row table:style-name="Tabelle4.2">
          <table:table-cell table:style-name="Tabelle4.A2" office:value-type="string">
            <text:p text:style-name="P109">1</text:p>
          </table:table-cell>
          <table:table-cell table:style-name="Tabelle4.A2" office:value-type="string">
            <text:p text:style-name="P109">0</text:p>
          </table:table-cell>
          <table:table-cell table:style-name="Tabelle4.A2" office:value-type="string">
            <text:p text:style-name="P109">1</text:p>
          </table:table-cell>
          <table:table-cell table:style-name="Tabelle4.A2" office:value-type="string">
            <text:p text:style-name="P109">1</text:p>
          </table:table-cell>
          <table:table-cell table:style-name="Tabelle4.A2" office:value-type="string">
            <text:p text:style-name="P109">0</text:p>
          </table:table-cell>
          <table:table-cell table:style-name="Tabelle4.A2" office:value-type="string">
            <text:p text:style-name="P109">1</text:p>
          </table:table-cell>
          <table:table-cell table:style-name="Tabelle4.A2" office:value-type="string">
            <text:p text:style-name="P109">1</text:p>
          </table:table-cell>
          <table:table-cell table:style-name="Tabelle4.A2" office:value-type="string">
            <text:p text:style-name="P109">1</text:p>
          </table:table-cell>
          <table:table-cell table:style-name="Tabelle4.A2" office:value-type="string">
            <text:p text:style-name="P106">1</text:p>
          </table:table-cell>
          <table:table-cell table:style-name="Tabelle4.A2" office:value-type="string">
            <text:p text:style-name="P106">112</text:p>
          </table:table-cell>
          <table:table-cell table:style-name="Tabelle4.A2" office:value-type="string">
            <text:p text:style-name="P106">0</text:p>
          </table:table-cell>
          <table:table-cell table:style-name="Tabelle4.L2" office:value-type="string">
            <text:p text:style-name="P106">Flamme brennt Nachzündphase</text:p>
          </table:table-cell>
        </table:table-row>
        <table:table-row table:style-name="Tabelle4.2">
          <table:table-cell table:style-name="Tabelle4.A2" office:value-type="string">
            <text:p text:style-name="P109">1</text:p>
          </table:table-cell>
          <table:table-cell table:style-name="Tabelle4.A2" office:value-type="string">
            <text:p text:style-name="P109">0</text:p>
          </table:table-cell>
          <table:table-cell table:style-name="Tabelle4.A2" office:value-type="string">
            <text:p text:style-name="P109">1</text:p>
          </table:table-cell>
          <table:table-cell table:style-name="Tabelle4.A2" office:value-type="string">
            <text:p text:style-name="P109">1</text:p>
          </table:table-cell>
          <table:table-cell table:style-name="Tabelle4.A2" office:value-type="string">
            <text:p text:style-name="P109">0</text:p>
          </table:table-cell>
          <table:table-cell table:style-name="Tabelle4.A2" office:value-type="string">
            <text:p text:style-name="P109">1</text:p>
          </table:table-cell>
          <table:table-cell table:style-name="Tabelle4.A2" office:value-type="string">
            <text:p text:style-name="P109">1</text:p>
          </table:table-cell>
          <table:table-cell table:style-name="Tabelle4.A2" office:value-type="string">
            <text:p text:style-name="P109">1</text:p>
          </table:table-cell>
          <table:table-cell table:style-name="Tabelle4.A2" office:value-type="string">
            <text:p text:style-name="P106">0</text:p>
          </table:table-cell>
          <table:table-cell table:style-name="Tabelle4.A2" office:value-type="string">
            <text:p text:style-name="P106">112</text:p>
          </table:table-cell>
          <table:table-cell table:style-name="Tabelle4.A2" office:value-type="string">
            <text:p text:style-name="P106">0</text:p>
          </table:table-cell>
          <table:table-cell table:style-name="Tabelle4.L2" office:value-type="string">
            <text:p text:style-name="P106">Brenner läuft</text:p>
          </table:table-cell>
        </table:table-row>
        <table:table-row table:style-name="Tabelle4.2">
          <table:table-cell table:style-name="Tabelle4.A2" office:value-type="string">
            <text:p text:style-name="P109">1</text:p>
          </table:table-cell>
          <table:table-cell table:style-name="Tabelle4.A2" office:value-type="string">
            <text:p text:style-name="P109">0</text:p>
          </table:table-cell>
          <table:table-cell table:style-name="Tabelle4.A2" office:value-type="string">
            <text:p text:style-name="P109">1</text:p>
          </table:table-cell>
          <table:table-cell table:style-name="Tabelle4.A2" office:value-type="string">
            <text:p text:style-name="P109">0</text:p>
          </table:table-cell>
          <table:table-cell table:style-name="Tabelle4.A2" office:value-type="string">
            <text:p text:style-name="P109">0</text:p>
          </table:table-cell>
          <table:table-cell table:style-name="Tabelle4.A2" office:value-type="string">
            <text:p text:style-name="P109">1</text:p>
          </table:table-cell>
          <table:table-cell table:style-name="Tabelle4.A2" office:value-type="string">
            <text:p text:style-name="P109">1</text:p>
          </table:table-cell>
          <table:table-cell table:style-name="Tabelle4.A2" office:value-type="string">
            <text:p text:style-name="P109">1</text:p>
          </table:table-cell>
          <table:table-cell table:style-name="Tabelle4.A2" office:value-type="string">
            <text:p text:style-name="P106">1</text:p>
          </table:table-cell>
          <table:table-cell table:style-name="Tabelle4.A2" office:value-type="string">
            <text:p text:style-name="P106">111</text:p>
          </table:table-cell>
          <table:table-cell table:style-name="Tabelle4.A2" office:value-type="string">
            <text:p text:style-name="P106">0</text:p>
          </table:table-cell>
          <table:table-cell table:style-name="Tabelle4.L2" office:value-type="string">
            <text:p text:style-name="P106">Nachzündung nach Flammabriß</text:p>
          </table:table-cell>
        </table:table-row>
        <table:table-row table:style-name="Tabelle4.2">
          <table:table-cell table:style-name="Tabelle4.A2" office:value-type="string">
            <text:p text:style-name="P109">-</text:p>
          </table:table-cell>
          <table:table-cell table:style-name="Tabelle4.A2" office:value-type="string">
            <text:p text:style-name="P109">1</text:p>
          </table:table-cell>
          <table:table-cell table:style-name="Tabelle4.A2" office:value-type="string">
            <text:p text:style-name="P109">-</text:p>
          </table:table-cell>
          <table:table-cell table:style-name="Tabelle4.A2" office:value-type="string">
            <text:p text:style-name="P109">-</text:p>
          </table:table-cell>
          <table:table-cell table:style-name="Tabelle4.A2" office:value-type="string">
            <text:p text:style-name="P109">-</text:p>
          </table:table-cell>
          <table:table-cell table:style-name="Tabelle4.A2" office:value-type="string">
            <text:p text:style-name="P109">-</text:p>
          </table:table-cell>
          <table:table-cell table:style-name="Tabelle4.A2" office:value-type="string">
            <text:p text:style-name="P109">-</text:p>
          </table:table-cell>
          <table:table-cell table:style-name="Tabelle4.A2" office:value-type="string">
            <text:p text:style-name="P109">-</text:p>
          </table:table-cell>
          <table:table-cell table:style-name="Tabelle4.A2" office:value-type="string">
            <text:p text:style-name="P106">-</text:p>
          </table:table-cell>
          <table:table-cell table:style-name="Tabelle4.A2" office:value-type="string">
            <text:p text:style-name="P106">9</text:p>
          </table:table-cell>
          <table:table-cell table:style-name="Tabelle4.A2" office:value-type="string">
            <text:p text:style-name="P106">1</text:p>
          </table:table-cell>
          <table:table-cell table:style-name="Tabelle4.L2" office:value-type="string">
            <text:p text:style-name="P106">Kessel Übertemperatur</text:p>
          </table:table-cell>
        </table:table-row>
        <table:table-row table:style-name="Tabelle4.2">
          <table:table-cell table:style-name="Tabelle4.A2" office:value-type="string">
            <text:p text:style-name="P109">1</text:p>
          </table:table-cell>
          <table:table-cell table:style-name="Tabelle4.A2" office:value-type="string">
            <text:p text:style-name="P109">0</text:p>
          </table:table-cell>
          <table:table-cell table:style-name="Tabelle4.A2" office:value-type="string">
            <text:p text:style-name="P109">1</text:p>
          </table:table-cell>
          <table:table-cell table:style-name="Tabelle4.A2" office:value-type="string">
            <text:p text:style-name="P109">1</text:p>
          </table:table-cell>
          <table:table-cell table:style-name="Tabelle4.A2" office:value-type="string">
            <text:p text:style-name="P109">0</text:p>
          </table:table-cell>
          <table:table-cell table:style-name="Tabelle4.A2" office:value-type="string">
            <text:p text:style-name="P109">1</text:p>
          </table:table-cell>
          <table:table-cell table:style-name="Tabelle4.A2" office:value-type="string">
            <text:p text:style-name="P109">0</text:p>
          </table:table-cell>
          <table:table-cell table:style-name="Tabelle4.A2" office:value-type="string">
            <text:p text:style-name="P109">1</text:p>
          </table:table-cell>
          <table:table-cell table:style-name="Tabelle4.A2" office:value-type="string">
            <text:p text:style-name="P106">0</text:p>
          </table:table-cell>
          <table:table-cell table:style-name="Tabelle4.A2" office:value-type="string">
            <text:p text:style-name="P106">3</text:p>
          </table:table-cell>
          <table:table-cell table:style-name="Tabelle4.A2" office:value-type="string">
            <text:p text:style-name="P106">1</text:p>
          </table:table-cell>
          <table:table-cell table:style-name="Tabelle4.L2" office:value-type="string">
            <text:p text:style-name="P106">Fremdlichtfehler</text:p>
          </table:table-cell>
        </table:table-row>
      </table:table>
      <text:p text:style-name="P2"/>
      <text:p text:style-name="P2">Das folgende <text:span text:style-name="T11">Zeitdiagramm</text:span> erläutert die verschiedenen Config-Zeiten und den Ablauf:</text:p>
      <text:p text:style-name="P3"/>
      <text:p text:style-name="P183">Das Zeitdiagramm gibt den genauen Zeitverlauf wieder:</text:p>
      <text:p text:style-name="P183"><text:tab/>t1 = Vorheizzeit (PRE_HEAT_TIME)</text:p>
      <text:p text:style-name="P173"><text:span text:style-name="T21"><text:tab/>t2 = Vorbelüftungszeit (PRE_</text:span><text:span text:style-name="T16">VENT</text:span><text:span text:style-name="T21">_TIME)</text:span></text:p>
      <text:p text:style-name="P183"><text:tab/>t3 = Vorzündungszeit (PRE_IGNITE_TIME)</text:p>
      <text:p text:style-name="P183"><text:tab/>t4 = Sicherheitszeit (SAFETY_TIME)</text:p>
      <text:p text:style-name="P183"><text:tab/>t5 = Nachzündungszeit (POST_IGNITE_TIME)</text:p>
      <text:p text:style-name="P183"><draw:g text:anchor-type="paragraph" draw:z-index="181" draw:style-name="gr1"><draw:line draw:style-name="gr13" draw:text-style-name="P257" svg:x1="3.847cm" svg:y1="3.036cm" svg:x2="4.48cm" svg:y2="3.036cm"><text:p/></draw:line><draw:line draw:style-name="gr13" draw:text-style-name="P257" svg:x1="4.475cm" svg:y1="2.782cm" svg:x2="4.475cm" svg:y2="3.04cm"><text:p/></draw:line><draw:line draw:style-name="gr13" draw:text-style-name="P257" svg:x1="4.475cm" svg:y1="2.782cm" svg:x2="12.998cm" svg:y2="2.782cm"><text:p/></draw:line><draw:line draw:style-name="gr13" draw:text-style-name="P257" svg:x1="12.998cm" svg:y1="3.04cm" svg:x2="12.998cm" svg:y2="2.782cm"><text:p/></draw:line><draw:line draw:style-name="gr3" draw:text-style-name="P257" svg:x1="4.159cm" svg:y1="2.264cm" svg:x2="4.159cm" svg:y2="2.521cm"><text:p/></draw:line><draw:line draw:style-name="gr3" draw:text-style-name="P257" svg:x1="3.847cm" svg:y1="2.52cm" svg:x2="4.163cm" svg:y2="2.52cm"><text:p/></draw:line><draw:line draw:style-name="gr3" draw:text-style-name="P257" svg:x1="4.159cm" svg:y1="2.264cm" svg:x2="13.63cm" svg:y2="2.264cm"><text:p/></draw:line><draw:frame draw:style-name="gr35" draw:text-style-name="P260" svg:width="2.842cm" svg:height="0.641cm" svg:x="1.633cm" svg:y="2.006cm"><draw:text-box><text:p text:style-name="P258"><text:span text:style-name="T33">over_temp</text:span></text:p></draw:text-box></draw:frame><draw:line draw:style-name="gr13" draw:text-style-name="P257" svg:x1="12.998cm" svg:y1="3.036cm" svg:x2="13.631cm" svg:y2="3.036cm"><text:p/></draw:line><draw:line draw:style-name="gr2" draw:text-style-name="P257" svg:x1="3.847cm" svg:y1="4.583cm" svg:x2="5.11cm" svg:y2="4.583cm"><text:p/></draw:line><draw:line draw:style-name="gr2" draw:text-style-name="P257" svg:x1="5.106cm" svg:y1="4.328cm" svg:x2="5.106cm" svg:y2="4.585cm"><text:p/></draw:line><draw:line draw:style-name="gr2" draw:text-style-name="P257" svg:x1="5.106cm" svg:y1="4.328cm" svg:x2="12.998cm" svg:y2="4.328cm"><text:p/></draw:line><draw:line draw:style-name="gr4" draw:text-style-name="P257" svg:x1="6.687cm" svg:y1="5.615cm" svg:x2="6.687cm" svg:y2="5.357cm"><text:p/></draw:line><draw:line draw:style-name="gr4" draw:text-style-name="P257" svg:x1="13cm" svg:y1="5.357cm" svg:x2="6.687cm" svg:y2="5.357cm"><text:p/></draw:line><draw:line draw:style-name="gr4" draw:text-style-name="P257" svg:x1="12.998cm" svg:y1="5.357cm" svg:x2="12.998cm" svg:y2="5.615cm"><text:p/></draw:line><draw:line draw:style-name="gr4" draw:text-style-name="P257" svg:x1="13.631cm" svg:y1="5.618cm" svg:x2="12.998cm" svg:y2="5.618cm"><text:p/></draw:line><draw:line draw:style-name="gr4" draw:text-style-name="P257" svg:x1="3.847cm" svg:y1="5.618cm" svg:x2="6.69cm" svg:y2="5.618cm"><text:p/></draw:line><draw:line draw:style-name="gr4" draw:text-style-name="P257" svg:x1="3.847cm" svg:y1="6.133cm" svg:x2="9.215cm" svg:y2="6.133cm"><text:p/></draw:line><draw:line draw:style-name="gr4" draw:text-style-name="P257" svg:x1="12.998cm" svg:y1="5.872cm" svg:x2="12.998cm" svg:y2="6.13cm"><text:p/></draw:line><draw:line draw:style-name="gr4" draw:text-style-name="P257" svg:x1="12.998cm" svg:y1="6.133cm" svg:x2="13.631cm" svg:y2="6.133cm"><text:p/></draw:line><draw:line draw:style-name="gr5" draw:text-style-name="P257" svg:x1="3.847cm" svg:y1="3.55cm" svg:x2="4.48cm" svg:y2="3.55cm"><text:p/></draw:line><draw:line draw:style-name="gr5" draw:text-style-name="P257" svg:x1="4.475cm" svg:y1="3.295cm" svg:x2="4.475cm" svg:y2="3.552cm"><text:p/></draw:line><draw:line draw:style-name="gr5" draw:text-style-name="P257" svg:x1="12.998cm" svg:y1="3.295cm" svg:x2="4.475cm" svg:y2="3.295cm"><text:p/></draw:line><draw:line draw:style-name="gr5" draw:text-style-name="P257" svg:x1="12.998cm" svg:y1="3.295cm" svg:x2="12.998cm" svg:y2="3.552cm"><text:p/></draw:line><draw:line draw:style-name="gr5" draw:text-style-name="P257" svg:x1="13.631cm" svg:y1="3.55cm" svg:x2="12.998cm" svg:y2="3.55cm"><text:p/></draw:line><draw:line draw:style-name="gr11" draw:text-style-name="P257" svg:x1="5.106cm" svg:y1="4.068cm" svg:x2="5.106cm" svg:y2="3.81cm"><text:p/></draw:line><draw:line draw:style-name="gr11" draw:text-style-name="P257" svg:x1="13.63cm" svg:y1="3.81cm" svg:x2="5.106cm" svg:y2="3.81cm"><text:p/></draw:line><draw:line draw:style-name="gr11" draw:text-style-name="P257" svg:x1="3.847cm" svg:y1="4.066cm" svg:x2="5.11cm" svg:y2="4.066cm"><text:p/></draw:line><draw:line draw:style-name="gr12" draw:text-style-name="P257" svg:x1="3.847cm" svg:y1="5.103cm" svg:x2="5.743cm" svg:y2="5.103cm"><text:p/></draw:line><draw:line draw:style-name="gr12" draw:text-style-name="P257" svg:x1="5.743cm" svg:y1="4.841cm" svg:x2="5.743cm" svg:y2="5.099cm"><text:p/></draw:line><draw:line draw:style-name="gr12" draw:text-style-name="P257" svg:x1="7.953cm" svg:y1="4.841cm" svg:x2="5.743cm" svg:y2="4.841cm"><text:p/></draw:line><draw:line draw:style-name="gr12" draw:text-style-name="P257" svg:x1="7.948cm" svg:y1="4.841cm" svg:x2="7.948cm" svg:y2="5.099cm"><text:p/></draw:line><draw:line draw:style-name="gr12" draw:text-style-name="P257" svg:x1="13.631cm" svg:y1="5.103cm" svg:x2="7.948cm" svg:y2="5.103cm"><text:p/></draw:line><draw:line draw:style-name="gr36" draw:text-style-name="P257" svg:x1="7.003cm" svg:y1="6.648cm" svg:x2="3.847cm" svg:y2="6.648cm"><text:p/></draw:line><draw:line draw:style-name="gr4" draw:text-style-name="P257" svg:x1="9.211cm" svg:y1="5.872cm" svg:x2="12.998cm" svg:y2="5.872cm"><text:p/></draw:line><draw:line draw:style-name="gr4" draw:text-style-name="P257" svg:x1="9.211cm" svg:y1="6.13cm" svg:x2="9.211cm" svg:y2="5.872cm"><text:p/></draw:line><draw:frame draw:style-name="gr37" draw:text-style-name="P260" svg:width="0.948cm" svg:height="0.639cm" svg:x="1.633cm" svg:y="2.521cm"><draw:text-box><text:p text:style-name="P258"><text:span text:style-name="T33">in</text:span></text:p></draw:text-box></draw:frame><draw:frame draw:style-name="gr35" draw:text-style-name="P260" svg:width="2.213cm" svg:height="0.641cm" svg:x="1.633cm" svg:y="3.036cm"><draw:text-box><text:p text:style-name="P258"><text:span text:style-name="T33">pre_heat</text:span></text:p></draw:text-box></draw:frame><draw:frame draw:style-name="gr35" draw:text-style-name="P260" svg:width="2.213cm" svg:height="0.641cm" svg:x="1.633cm" svg:y="3.551cm"><draw:text-box><text:p text:style-name="P258"><text:span text:style-name="T33">oil_temp</text:span></text:p></draw:text-box></draw:frame><draw:frame draw:style-name="gr35" draw:text-style-name="P260" svg:width="2.213cm" svg:height="0.641cm" svg:x="1.633cm" svg:y="4.068cm"><draw:text-box><text:p text:style-name="P258"><text:span text:style-name="T33">motor</text:span></text:p></draw:text-box></draw:frame><draw:line draw:style-name="gr2" draw:text-style-name="P257" svg:x1="12.998cm" svg:y1="4.585cm" svg:x2="12.998cm" svg:y2="4.328cm"><text:p/></draw:line><draw:line draw:style-name="gr2" draw:text-style-name="P257" svg:x1="12.998cm" svg:y1="4.583cm" svg:x2="13.631cm" svg:y2="4.583cm"><text:p/></draw:line><draw:frame draw:style-name="gr35" draw:text-style-name="P260" svg:width="2.213cm" svg:height="0.641cm" svg:x="1.633cm" svg:y="4.583cm"><draw:text-box><text:p text:style-name="P258"><text:span text:style-name="T33">ignite</text:span></text:p></draw:text-box></draw:frame><draw:frame draw:style-name="gr35" draw:text-style-name="P260" svg:width="2.213cm" svg:height="0.641cm" svg:x="1.633cm" svg:y="5.102cm"><draw:text-box><text:p text:style-name="P258"><text:span text:style-name="T33">Coil 1</text:span></text:p></draw:text-box></draw:frame><draw:frame draw:style-name="gr35" draw:text-style-name="P260" svg:width="2.213cm" svg:height="0.641cm" svg:x="1.633cm" svg:y="5.615cm"><draw:text-box><text:p text:style-name="P258"><text:span text:style-name="T33">Coil 2</text:span></text:p></draw:text-box></draw:frame><draw:frame draw:style-name="gr35" draw:text-style-name="P260" svg:width="2.213cm" svg:height="0.641cm" svg:x="1.633cm" svg:y="6.13cm"><draw:text-box><text:p text:style-name="P258"><text:span text:style-name="T33">Flame</text:span></text:p></draw:text-box></draw:frame><draw:line draw:style-name="gr36" draw:text-style-name="P257" svg:x1="6.999cm" svg:y1="6.645cm" svg:x2="6.999cm" svg:y2="6.387cm"><text:p/></draw:line><draw:line draw:style-name="gr36" draw:text-style-name="P257" svg:x1="12.998cm" svg:y1="6.387cm" svg:x2="6.999cm" svg:y2="6.387cm"><text:p/></draw:line><draw:line draw:style-name="gr36" draw:text-style-name="P257" svg:x1="12.998cm" svg:y1="6.387cm" svg:x2="12.998cm" svg:y2="6.645cm"><text:p/></draw:line><draw:line draw:style-name="gr36" draw:text-style-name="P257" svg:x1="13.631cm" svg:y1="6.648cm" svg:x2="12.998cm" svg:y2="6.648cm"><text:p/></draw:line><draw:line draw:style-name="gr14" draw:text-style-name="P257" svg:x1="6.687cm" svg:y1="7.162cm" svg:x2="6.687cm" svg:y2="1.233cm"><text:p/></draw:line><draw:line draw:style-name="gr14" draw:text-style-name="P257" svg:x1="4.475cm" svg:y1="3.553cm" svg:x2="4.475cm" svg:y2="1.748cm"><text:p/></draw:line><draw:line draw:style-name="gr14" draw:text-style-name="P257" svg:x1="5.106cm" svg:y1="7.162cm" svg:x2="5.106cm" svg:y2="1.233cm"><text:p/></draw:line><draw:line draw:style-name="gr38" draw:text-style-name="P257" svg:x1="4.475cm" svg:y1="2.005cm" svg:x2="5.105cm" svg:y2="2.005cm"><text:p/></draw:line><draw:frame draw:style-name="gr39" draw:text-style-name="P266" svg:width="0.948cm" svg:height="0.588cm" svg:x="4.475cm" svg:y="1.489cm"><draw:text-box><text:p text:style-name="P258"><text:span text:style-name="T36">t1</text:span></text:p></draw:text-box></draw:frame><draw:frame draw:style-name="gr39" draw:text-style-name="P266" svg:width="0.948cm" svg:height="0.588cm" svg:x="5.422cm" svg:y="0.974cm"><draw:text-box><text:p text:style-name="P258"><text:span text:style-name="T36">t2</text:span></text:p></draw:text-box></draw:frame><draw:line draw:style-name="gr38" draw:text-style-name="P257" svg:x1="5.106cm" svg:y1="1.489cm" svg:x2="6.686cm" svg:y2="1.489cm"><text:p/></draw:line><draw:line draw:style-name="gr14" draw:text-style-name="P257" svg:x1="5.743cm" svg:y1="1.748cm" svg:x2="5.743cm" svg:y2="5.1cm"><text:p/></draw:line><draw:line draw:style-name="gr38" draw:text-style-name="P257" svg:x1="5.743cm" svg:y1="2.005cm" svg:x2="6.69cm" svg:y2="2.005cm"><text:p/></draw:line><draw:frame draw:style-name="gr39" draw:text-style-name="P266" svg:width="0.948cm" svg:height="0.588cm" svg:x="5.738cm" svg:y="1.489cm"><draw:text-box><text:p text:style-name="P258"><text:span text:style-name="T36">t3</text:span></text:p></draw:text-box></draw:frame><draw:line draw:style-name="gr14" draw:text-style-name="P257" svg:x1="6.999cm" svg:y1="7.677cm" svg:x2="6.999cm" svg:y2="6.387cm"><text:p/></draw:line><draw:frame draw:style-name="gr39" draw:text-style-name="P266" svg:width="0.946cm" svg:height="0.588cm" svg:x="6.053cm" svg:y="6.872cm"><draw:text-box><text:p text:style-name="P258"><text:span text:style-name="T36">t4</text:span></text:p></draw:text-box></draw:frame><draw:line draw:style-name="gr14" draw:text-style-name="P257" svg:x1="7.948cm" svg:y1="7.162cm" svg:x2="7.948cm" svg:y2="4.841cm"><text:p/></draw:line><draw:line draw:style-name="gr38" draw:text-style-name="P257" svg:x1="6.999cm" svg:y1="6.903cm" svg:x2="7.947cm" svg:y2="6.903cm"><text:p/></draw:line><draw:frame draw:style-name="gr39" draw:text-style-name="P266" svg:width="0.948cm" svg:height="0.588cm" svg:x="6.999cm" svg:y="6.872cm"><draw:text-box><text:p text:style-name="P258"><text:span text:style-name="T36">t5</text:span></text:p></draw:text-box></draw:frame><draw:line draw:style-name="gr40" draw:text-style-name="P257" svg:x1="6.685cm" svg:y1="6.903cm" svg:x2="6.052cm" svg:y2="6.903cm"><text:p/></draw:line><draw:line draw:style-name="gr14" draw:text-style-name="P257" svg:x1="9.211cm" svg:y1="7.677cm" svg:x2="9.211cm" svg:y2="5.872cm"><text:p/></draw:line><draw:line draw:style-name="gr38" draw:text-style-name="P257" svg:x1="6.999cm" svg:y1="7.417cm" svg:x2="9.212cm" svg:y2="7.417cm"><text:p/></draw:line><draw:frame draw:style-name="gr39" draw:text-style-name="P266" svg:width="0.948cm" svg:height="0.588cm" svg:x="7.632cm" svg:y="7.388cm"><draw:text-box><text:p text:style-name="P258"><text:span text:style-name="T36">t6</text:span></text:p></draw:text-box></draw:frame></draw:g><text:soft-page-break/><text:tab/>t6 = Verzögerung für Stufe 2 (STAGE2_DELAY)</text:p>
      <text:p text:style-name="P183"/>
      <text:list xml:id="list38464374" text:continue-numbering="true" text:style-name="L1">
        <text:list-item>
          <text:list>
            <text:list-item>
              <text:h text:style-name="P216" text:outline-level="2"><text:alphabetical-index-mark-start text:id="IMark229571112"/>DEW_CON<text:alphabetical-index-mark-end text:id="IMark229571112"/></text:h>
            </text:list-item>
          </text:list>
        </text:list-item>
      </text:list>
      <text:p text:style-name="P2">Type<text:tab/><text:span text:style-name="T11">Funktion</text:span> : REAL</text:p>
      <text:p text:style-name="P66"><text:span text:style-name="T16">Input</text:span><text:span text:style-name="T21"><text:tab/>RH : REAL (Relative Feuchte)</text:span></text:p>
      <text:p text:style-name="P73"><text:tab/>T : REAL (Temperatur in °C)</text:p>
      <text:p text:style-name="P73">Output<text:tab/>REAL (Wasserdampf Konzentration in Gramm / m³)</text:p>
      <text:p text:style-name="P2"><draw:frame draw:style-name="fr3" draw:name="Grafik299" text:anchor-type="paragraph" svg:x="1.092cm" svg:y="0.019cm" svg:width="3.62cm" svg:height="1.57cm" draw:z-index="256"><draw:image xlink:href="Pictures/100000000000011200000077FAB485F5.png" xlink:type="simple" xlink:show="embed" xlink:actuate="onLoad"/></draw:frame><text:line-break/>Der Baustein <text:span text:style-name="T11">DEW_CON</text:span> berechnet aus der Relativen Feuchte (RH) und der Temperatur (T in °C) die Wasserdampfkonzentration in der Luft. Das Ergebnis wird in Gramm / m³ ermittelt. RH ist in % (50 = 50%) anzugeben und die Temperatur in °C.</text:p>
      <text:list xml:id="list38477119" text:continue-numbering="true" text:style-name="L1">
        <text:list-item>
          <text:list>
            <text:list-item>
              <text:h text:style-name="P216" text:outline-level="2"><text:soft-page-break/><text:alphabetical-index-mark-start text:id="IMark229571112"/>DEW_RH<text:alphabetical-index-mark-end text:id="IMark229571112"/></text:h>
            </text:list-item>
          </text:list>
        </text:list-item>
      </text:list>
      <text:p text:style-name="P2">Type<text:tab/><text:span text:style-name="T11">Funktion</text:span> : REAL</text:p>
      <text:p text:style-name="P66"><text:span text:style-name="T16">Input</text:span><text:span text:style-name="T21"><text:tab/>VC : REAL (Wasserdampfkonzentration in Luft in Gramm / m³)</text:span></text:p>
      <text:p text:style-name="P73"><text:tab/>T : REAL (Temperatur in °C)</text:p>
      <text:p text:style-name="P73"><draw:frame draw:style-name="fr3" draw:name="Grafik301" text:anchor-type="paragraph" svg:x="1.092cm" svg:y="0.605cm" svg:width="3.18cm" svg:height="1.57cm" draw:z-index="260"><draw:image xlink:href="Pictures/10000000000000F00000007777DC1125.png" xlink:type="simple" xlink:show="embed" xlink:actuate="onLoad"/></draw:frame>Output<text:tab/>REAL (Relative Luftfeuchtigkeit in %)</text:p>
      <text:p text:style-name="P73"><text:line-break/>Der Baustein DEW_RH berechnet aus der Wasserdampfkonzentration (VC) und der Temperatur (T in °C) die relative Luftfeuchtigkeit in % (50 = 50%). Die Wasserdampfkonzentration wird in Gramm/m³ angegeben. DEW_CON kann für Berechnungen in beide Richtungen (aufheizen und abkühlen) verwendet werden. Wird zu stark abgekühlt, so ist die maximale relative Feuchte auf 100% begrenzt. Für Berechnungen des Taupunktes wird der Baustein DEW_TEMP empfohlen.</text:p>
      <text:p text:style-name="P171"><draw:frame draw:style-name="fr3" draw:name="Grafik302" text:anchor-type="paragraph" svg:x="1.005cm" svg:y="3.604cm" svg:width="15.79cm" svg:height="1.829cm" draw:z-index="261"><draw:image xlink:href="Pictures/10000000000002970000004D3731414C.png" xlink:type="simple" xlink:show="embed" xlink:actuate="onLoad"/></draw:frame>Im folgenden Beispiel wird der Fall berechnet, wenn Luft von 30°C und relativer Feuchte von 50% um 6 Grad abgekühlt wird. Der Baustein DEW_CON liefert die Feuchtigkeitskonzentration in der Ausgangsluft von 30° und DEW_RH berechnet die resultierende relative Luftfeuchtigkeit RH von 69,7%. Diese Berechnungen sind wichtig, wenn Luft abgekühlt oder aufgeheizt wird. In Klimaanlagen ist eine resultierende relative Feuchte von 100% wegen Taubildung und den daraus resultierenden Problemen zu vermeiden.</text:p>
      <text:p text:style-name="P171"><text:line-break/>Siehe hierzu auch die Bausteine DEW_CON und DEW_TEMP.</text:p>
      <text:list xml:id="list38467425" text:continue-numbering="true" text:style-name="L1">
        <text:list-item>
          <text:list>
            <text:list-item>
              <text:h text:style-name="P216" text:outline-level="2"><text:alphabetical-index-mark-start text:id="IMark229571112"/>DEW_TEMP<text:alphabetical-index-mark-end text:id="IMark229571112"/></text:h>
            </text:list-item>
          </text:list>
        </text:list-item>
      </text:list>
      <text:p text:style-name="P2">Type<text:tab/><text:span text:style-name="T11">Funktion</text:span> : REAL</text:p>
      <text:p text:style-name="P66"><text:span text:style-name="T16">Input</text:span><text:span text:style-name="T21"><text:tab/>RH : REAL (Relative Feuchte)</text:span></text:p>
      <text:p text:style-name="P73"><text:tab/>T : REAL (Temperatur in °C)</text:p>
      <text:p text:style-name="P73"><draw:frame draw:style-name="fr3" draw:name="Grafik222" text:anchor-type="paragraph" svg:x="0.845cm" svg:y="0.683cm" svg:width="4.069cm" svg:height="1.57cm" draw:z-index="180"><draw:image xlink:href="Pictures/1000000000000134000000776116D3C7.png" xlink:type="simple" xlink:show="embed" xlink:actuate="onLoad"/></draw:frame>Output<text:tab/>REAL (Taupunkttemperatur)</text:p>
      <text:p text:style-name="P73"><text:soft-page-break/><text:line-break/>Der Baustein DEW_TEMP berechnet aus der Relativen Feuchte (RH) und der Temperatur (T in °C) die Taupunkttemperatur. Die Relative Feuchte wird in % angegeben <text:s/>(50 = 50%).</text:p>
      <text:list xml:id="list38453913" text:continue-numbering="true" text:style-name="L1">
        <text:list-item>
          <text:list>
            <text:list-item>
              <text:h text:style-name="P216" text:outline-level="2"><text:alphabetical-index-mark-start text:id="IMark229571112"/>HEAT_INDEX<text:alphabetical-index-mark-end text:id="IMark229571112"/></text:h>
            </text:list-item>
          </text:list>
        </text:list-item>
      </text:list>
      <text:p text:style-name="P2">Type<text:tab/><text:span text:style-name="T11">Funktion</text:span> : REAL</text:p>
      <text:p text:style-name="P66"><text:span text:style-name="T16">Input</text:span><text:span text:style-name="T21"><text:tab/>T : REAL (Temperatur in °C)</text:span></text:p>
      <text:p text:style-name="P73"><text:tab/>RH : REAL (Relative Feuchte)</text:p>
      <text:p text:style-name="P66"><text:span text:style-name="T21">Output<text:tab/>REAL (</text:span><text:span text:style-name="T16">Heat</text:span><text:span text:style-name="T21"> Index Temperatur)</text:span></text:p>
      <text:p text:style-name="P73"><draw:frame draw:style-name="fr3" draw:name="Grafik272" text:anchor-type="paragraph" svg:x="1.094cm" svg:y="0.037cm" svg:width="4.521cm" svg:height="1.57cm" draw:z-index="225"><draw:image xlink:href="Pictures/100000000000015600000077B6FEB5E3.png" xlink:type="simple" xlink:show="embed" xlink:actuate="onLoad"/></draw:frame><text:line-break/>HEAT_INDEX berechnet die bei hohen Temperaturen und hoher Feuchte gefühlte Temperatur. Die Funktion ist definiert für Temperaturen größer 20 °C und relativer Feuchte &gt; 10%. Für Werte außerhalb des Definitionsbereichs wird die Eingangstemperatur ausgegeben.</text:p>
      <text:list xml:id="list38477181" text:continue-numbering="true" text:style-name="L1">
        <text:list-item>
          <text:list>
            <text:list-item>
              <text:h text:style-name="P216" text:outline-level="2"><text:alphabetical-index-mark-start text:id="IMark229571112"/>HEAT_METER<text:alphabetical-index-mark-end text:id="IMark229571112"/></text:h>
            </text:list-item>
          </text:list>
        </text:list-item>
      </text:list>
      <text:p text:style-name="P2">Type<text:tab/><text:span text:style-name="T11">Funktion</text:span> : REAL</text:p>
      <text:p text:style-name="P66"><text:span text:style-name="T16">Input</text:span><text:span text:style-name="T21"><text:tab/>TF : REAL (Vorlauftemperatur in °C)</text:span></text:p>
      <text:p text:style-name="P73"><text:tab/>TR : REAL (Rücklauftemperatur in °C)</text:p>
      <text:p text:style-name="P183"><text:tab/>LPH : REAL (Durchflussmenge in L/h bzw. L/Impuls)</text:p>
      <text:p text:style-name="P173"><text:span text:style-name="T21"><text:tab/>E : BOOL (</text:span><text:span text:style-name="T16">Enable</text:span><text:span text:style-name="T21"> Signal)</text:span></text:p>
      <text:p text:style-name="P183"><text:tab/>RST : BOOL (asynchroner Reset Eingang)</text:p>
      <text:p text:style-name="P173"><text:span text:style-name="T19">Config</text:span><text:span text:style-name="T21"><text:tab/>CP : REAL (Spezifische Wärmekapazität der <text:s/>2ten Komponente)</text:span></text:p>
      <text:p text:style-name="P183"><text:soft-page-break/><text:tab/>DENSITY : REAL (Dichte der 2ten Komponente)</text:p>
      <text:p text:style-name="P183"><text:tab/>CONTENT : REAL (Anteil, 1 = 100%)</text:p>
      <text:p text:style-name="P183"><text:tab/>PULSE_MODE : BOOL (Impulszähler wenn TRUE)</text:p>
      <text:p text:style-name="P183"><text:tab/>RETURN_METER : BOOL (Durchflussmesser im Rücklauf </text:p>
      <text:p text:style-name="P183"><text:tab/>wenn TRUE)</text:p>
      <text:p text:style-name="P183"><text:tab/>AVG_TIME : TIME (Zeit für die Ermittlung des </text:p>
      <text:p text:style-name="P183"><text:tab/>Momentanverbrauchs)<text:tab/></text:p>
      <text:p text:style-name="P73"><draw:frame draw:style-name="fr3" draw:name="Grafik386" text:anchor-type="paragraph" svg:x="1.067cm" svg:y="0.69cm" svg:width="2.731cm" svg:height="3.099cm" draw:z-index="360"><draw:image xlink:href="Pictures/10000000000000CE000000EA89835D48.png" xlink:type="simple" xlink:show="embed" xlink:actuate="onLoad"/></draw:frame>Output<text:tab/>REAL (Wärmemenge in Joule)</text:p>
      <text:p text:style-name="P66"><text:span text:style-name="T21"><text:line-break/>HEAT_METER ist ein Wärmemengenzähler. Die Wärmemenge Y wird in Joule gemessen. Die Eingänge TF und TR sind die Vorlauf und Rücklauftemperatur des Mediums. Am Eingang LPH wird die Durchflussmenge in Liter/Stunde beziehungsweise die Durchflussmenge je Impuls an E spezifiziert. Die Eigenschaft von E wird durch die </text:span><text:span text:style-name="T19">Config</text:span><text:span text:style-name="T21"> Variable PULSE_MODE bestimmt. PULSE_MODE = FALSE bedeutet das <text:s/>die Wärmemenge kontinuierlich aufaddiert wird solange E auf TRUE ist. PULSE_MODE = TRUE bedeutet das die Wärmemenge mit jeder steigenden Flanke von E aufaddiert wird. Der PULSE_MODE ist bei Verwendung von Wärmezählern einzuschalten, während am Eingang LPH die Flussmenge in Litern je Impuls anzugeben ist und am Eingang E wird der Wärmezähler angeschlossen. Wenn kein Flussmengenmesser Vorhanden ist, so wird am Eingang E das Pumpensignal angeschlossen und am Eingang LPH die Pumpenleistung in Litern / Stunde angegeben. Bei Verwendung eines Flussmengenmessers mit Analogem Ausgang wird der Ausgang entsprechend auf Liter / Stunde umgerechnet und auf den Eingang LPH gelegt, Der Eingang E wird hierbei auf TRUE gesetzt. Mit den Setup- Variablen CP, DENSITY und CONTENT wird die 2te Komponente des Mediums spezifiziert. Für den Betrieb mit reinem Wasser sind keinerlei Angaben von CP, DENSITY und CONTENT nötig. Wenn ein Gemisch aus Wasser und einem 2ten Medium vorhanden ist werden Mit CP die Spezifische Wärmekapazität in KJ/KgK, mit DENISTY die DICHTE in KG/l und mit CONTENT der Anteil der 2ten Komponente spezifiziert. Ein Anteil von 0.5 bedeutet 50% und 1 wäre entsprechend 100%. Mit der Config Variablen RETURN_METER wird angegeben ob der Durchflussmesser im Vorlauf oder Rücklauf sitzt. RETRUN_METER = TRUE steht für Rücklaufmessung und FALSE für Vorlaufmessung. Am Ausgang C stellt der Baustein den momentanen Verbrauch zur Verfügung. Der momentane Ver</text:span><text:span text:style-name="T21">brauch wird in Joule / Stunde angegeben, und in den Zeitabständen von AVG_TIME ermittelt.</text:span></text:p>
      <text:p text:style-name="P183"><text:soft-page-break/>Der Baustein hat folgende Vorgabewerte, die aktiv sind wenn die entsprechenden Werte vom Anwender nicht gesetzt werden:</text:p>
      <text:p text:style-name="P183">PULSE_MODE = FALSE</text:p>
      <text:p text:style-name="P183">RETURN_METER = FALSE</text:p>
      <text:p text:style-name="P183">AVG_TIME = T#5s</text:p>
      <text:list xml:id="list38452399" text:continue-numbering="true" text:style-name="L1">
        <text:list-item>
          <text:list>
            <text:list-item>
              <text:h text:style-name="P216" text:outline-level="2"><text:alphabetical-index-mark-start text:id="IMark229571112"/><text:span text:style-name="T27">HEAT</text:span>_TEMP<text:alphabetical-index-mark-end text:id="IMark229571112"/></text:h>
            </text:list-item>
          </text:list>
        </text:list-item>
      </text:list>
      <text:p text:style-name="P2">Type<text:tab/><text:span text:style-name="T11">Funktionsbaustein</text:span></text:p>
      <text:p text:style-name="P66"><text:span text:style-name="T16">Input</text:span><text:span text:style-name="T21"><text:tab/>T_EXT : REAL (Außentemperatur)</text:span></text:p>
      <text:p text:style-name="P183"><text:tab/>T_INT : REAL (Soll Raumtemperatur)</text:p>
      <text:p text:style-name="P73"><text:tab/>OFFSET : REAL (Absenkung oder Anhebung der Raumtemperatur)</text:p>
      <text:p text:style-name="P73"><text:tab/>T_REQ : REAL (Temperaturanforderung)</text:p>
      <text:p text:style-name="P73">Output<text:tab/>TY : REAL (Heizkreisvorlauftemperatur)</text:p>
      <text:p text:style-name="P183"><text:tab/>HEAT : BOOL (Heizungsanforderung)</text:p>
      <text:p text:style-name="P73">Config<text:tab/>TY_MAX : REAL (Minimale Heizkreistemperatur, 70°C)</text:p>
      <text:p text:style-name="P73"><text:tab/>TY_MIN : REAL (Maximale Heizkreistemperatur, 25°C)</text:p>
      <text:p text:style-name="P73"><text:tab/>TY_C : REAL (Auslegungstemperatur, 70°C)</text:p>
      <text:p text:style-name="P183"><text:tab/>T_INT_C : REAL (Auslegungstemperatur Raum, 20°C)</text:p>
      <text:p text:style-name="P73"><text:tab/>T_EXT_C : REAL (T_EXT bei Auslegungstemperatur -15°C)</text:p>
      <text:p text:style-name="P183"><text:tab/>T_DIFF_C : REAL (Vor- Rücklaufdifferenz 10°C)</text:p>
      <text:p text:style-name="P73"><text:tab/>C : REAL (Konstante des Heizsystems, DEFAULT = 1,33)</text:p>
      <text:p text:style-name="P183"><draw:frame draw:style-name="fr3" draw:name="Grafik224" text:anchor-type="paragraph" svg:x="1.177cm" svg:y="0.679cm" svg:width="3.29cm" svg:height="2.311cm" draw:z-index="689"><draw:image xlink:href="Pictures/10000000000000F9000000AFD41AB5F8.png" xlink:type="simple" xlink:show="embed" xlink:actuate="onLoad"/></draw:frame><text:tab/>H : REAL (Schwelle für Heizungsanforderung 3°C)</text:p>
      <text:p text:style-name="P2"><text:line-break/><text:span text:style-name="T11">HEAT_TEMP</text:span> <text:span text:style-name="T11">berechnet</text:span> die Vorlauftemperatur aus der Außentemperatur nach folgender Formel:</text:p>
      <text:p text:style-name="P173">TY = <text:s/>TR + T_DIFF / 2 * TX + (TY_CONFIG - T_DIFF / 2 - TR) * TX ^ (1 / C)</text:p>
      <text:p text:style-name="P173">mit: <text:tab/>TR = T_INT + OFFSET</text:p>
      <text:p text:style-name="P173"><text:soft-page-break/><text:tab/>TX := (TR - T_EXT) / (T_INT_CONFIG - T_EXT_CONFIG);</text:p>
      <text:p text:style-name="P183">Die Parameter der Heizkurve werden durch die Setup Variablen TY_C (Auslegungsvorlauftemperatur), T_INT_C (Raumtemperatur im Auslegungspunkt), T_EXT_C (Außentemperatur im Auslegungspunkt) und T_DIFF_C (Differenz Vor- Rücklauf im Auslegungspunkt) vorgegeben. Mit dem Eingang Offset kann die Heizkurve an Raumabsenkung (negativer Offset) oder Raumanhebung (positiver Offset) angepasst werden. Mit den Setup Variablen TY_MIN und TY_MAX kann die Vorlauftemperatur auf einen Minimal- und Maximalwert begrenzt werden. Der Eingang T_REQ dient dazu, externe Temperaturanforderungen wie z.B. vom Boiler zu unterstützen. Ist T_REQ größer als der aus der Heizkurve berechnete Wert für TY, so wird TY auf T_REQ gesetzt. Die Begrenzung auf TY_MAX gilt nicht für die Anforderung durch T_REQ. Durch die Setup Variable H wird festgelegt ab welcher Außentemperatur die Heizkurve berechnet wird, solange T_EXT + H &gt;= als T_INT + OFFSET ist bleibt TY auf 0 und HEAT ist FALSE. Wird T_EXT + H &lt; als T_INT + OFFSET wird HEAT TRUE und TY gibt die berechnete Vorlauftemperatur aus. Die Setup Variable C legt die Krümmung der Heizkurve fest. Die Krümmung ist abhängig vom verwendeten Heizsystem.</text:p>
      <text:p text:style-name="P183"><text:tab/>Konvektoren: <text:s/><text:tab/>C = 1.25 – 1.45</text:p>
      <text:p text:style-name="P73"><text:tab/>Plattenheizkörper:<text:tab/>C = 1.20 – 1.30</text:p>
      <text:p text:style-name="P73"><text:tab/>Radiatoren:<text:tab/>C = 1.30</text:p>
      <text:p text:style-name="P73"><text:tab/>Rohre:<text:tab/><text:tab/>C = 1.25</text:p>
      <text:p text:style-name="P73"><text:tab/>Fußbodenheizung:<text:tab/>C = 1.1</text:p>
      <text:p text:style-name="P73">Je größer der Wert von C, desto stärker ist die Heizkurve gekrümmt. Ein Wert von 1.0 ergibt eine Gerade als Heizkurve. <text:s/>Typische Heizsysteme liegen zwischen 1.0 und 1.5.</text:p>
      <text:p text:style-name="P13">Die Grafik zeigt <text:span text:style-name="T11">Heizkurven</text:span> für Auslegungstemperaturen von 30 – 80 °C Vorlauftemperatur bei -20°C Außentemperatur und bei einem C von 1.33:</text:p>
      <text:p text:style-name="P2"><draw:g text:anchor-type="paragraph" draw:z-index="185" draw:style-name="gr1"><draw:frame draw:style-name="gr41" draw:text-style-name="P257" svg:width="13.749cm" svg:height="10cm" svg:x="1.594cm" svg:y="-0.046cm"><draw:image xlink:href="Pictures/10000000000002D4000002231CFA4ECF.png" xlink:type="simple" xlink:show="embed" xlink:actuate="onLoad"><text:p text:style-name="P267"><text:span text:style-name="T34"><text:s text:c="10"/></text:span></text:p></draw:image></draw:frame><draw:line draw:style-name="gr21" draw:text-style-name="P257" svg:x1="2.016cm" svg:y1="7.082cm" svg:x2="3.685cm" svg:y2="7.682cm"><text:p/></draw:line><draw:line draw:style-name="gr7" draw:text-style-name="P257" svg:x1="0.342cm" svg:y1="6.484cm" svg:x2="2.014cm" svg:y2="7.084cm"><text:p/></draw:line><draw:frame draw:style-name="gr42" draw:text-style-name="P268" svg:width="1.265cm" svg:height="1.327cm" svg:x="0.562cm" svg:y="6.05cm"><draw:text-box><text:p text:style-name="P258"><text:span text:style-name="T37">Ofs</text:span></text:p><text:p text:style-name="P258"><text:span text:style-name="T37">+5°</text:span></text:p></draw:text-box></draw:frame><draw:frame draw:style-name="gr43" draw:text-style-name="P268" svg:width="1.265cm" svg:height="1.325cm" svg:x="2.912cm" svg:y="7.694cm"><draw:text-box><text:p text:style-name="P258"><text:span text:style-name="T37">Ofs</text:span></text:p><text:p text:style-name="P258"><text:span text:style-name="T37">-5°</text:span></text:p></draw:text-box></draw:frame></draw:g><text:soft-page-break/></text:p>
      <text:list xml:id="list384615181" text:continue-numbering="true" text:style-name="L1">
        <text:list-item>
          <text:list>
            <text:list-item>
              <text:h text:style-name="P216" text:outline-level="2"><text:alphabetical-index-mark-start text:id="IMark225941772"/>LEGIONELLA<text:alphabetical-index-mark-end text:id="IMark225941772"/></text:h>
            </text:list-item>
          </text:list>
        </text:list-item>
      </text:list>
      <text:p text:style-name="P73">Type<text:tab/>Funktionsbaustein</text:p>
      <text:p text:style-name="P66"><text:span text:style-name="T16">Input</text:span><text:span text:style-name="T21"><text:tab/>MANUAL : BOOL (Manual Start Input)</text:span></text:p>
      <text:p text:style-name="P73"><text:tab/>TEMP_BOILER : REAL (Boiler Temperatur)</text:p>
      <text:p text:style-name="P73"><text:tab/>TEMP_RETURN : REAL (Temperatur der Zirkulationsleitung)</text:p>
      <text:p text:style-name="P73"><text:tab/>DT_IN : DATE_TIME (Momentane Tageszeit und Datum)</text:p>
      <text:p text:style-name="P73"><text:tab/>RST : BOOL (Asynchroner Reset)</text:p>
      <text:p text:style-name="P73">Output<text:tab/>HEAT : BOOL (Steuersignal für Warmwasserheizung)</text:p>
      <text:p text:style-name="P73"><text:tab/>PUMP : BOOL (Steuersignal für Zirkulationspumpe)</text:p>
      <text:p text:style-name="P73"><text:tab/>STATUS : Byte (ESR kompatibler Statusausgang)</text:p>
      <text:p text:style-name="P73"><text:tab/>VALVE0..7 : BOOL (Steuerausgänge für Ventile der <text:tab/><text:tab/>Zirkulationskreise)</text:p>
      <text:p text:style-name="P73"><text:tab/>RUN : BOOL (TRUE wenn Sequenz läuft)</text:p>
      <text:p text:style-name="P73">Config<text:tab/>T_START : TOD (Tageszeit zu der die Desinfizierung startet)</text:p>
      <text:p text:style-name="P73"><text:soft-page-break/><text:tab/>DAY : INT (Wochentag an dem die Desinfizierung startet)</text:p>
      <text:p text:style-name="P173"><text:span text:style-name="T14"><text:tab/></text:span><text:span text:style-name="T22">TEMP_SET</text:span><text:span text:style-name="T14"> : REAL (Temperatur des Boilers)</text:span></text:p>
      <text:p text:style-name="P73"><text:tab/>TEMP_OFFSET : REAL ()</text:p>
      <text:p text:style-name="P73"><text:tab/>TEMP_HYS : REAL ()</text:p>
      <text:p text:style-name="P73"><text:tab/>T_MAX_HEAT : TIME (maximale Zeit zum Aufheizen des Boilers)</text:p>
      <text:p text:style-name="P73"><text:tab/>T_MAX_RETURN : TIME (maximale Zeit, bis der Eingang </text:p>
      <text:p text:style-name="P73"><text:tab/>TEMP_RETURN nach VALVE aktiv wird)</text:p>
      <text:p text:style-name="P73"><draw:frame draw:style-name="fr3" draw:name="Grafik225" text:anchor-type="paragraph" svg:x="1.531cm" svg:y="0.686cm" svg:width="4.581cm" svg:height="6.241cm" draw:z-index="188"><draw:image xlink:href="Pictures/100000000000015A000001D82A3C622B.png" xlink:type="simple" xlink:show="embed" xlink:actuate="onLoad"/></draw:frame><text:tab/>TP_0 .. 7 : TIME (Desinfektionszeit für Kreise 0..7)</text:p>
      <text:p text:style-name="P73"><text:line-break/>LEGIONELLA hat eine integrierte Schaltuhr, die an einem bestimmten Wochentag (DAY) zu einer bestimmten Tageszeit (T_START) die Desinfektion startet. Hierzu ist die externe Anschaltung der Lokalzeit nötig (DT_IN). Jederzeit kann mit einer steigenden Flanke an MANUAL die Desinfektion auch von Hand gestartet werden.</text:p>
      <text:p text:style-name="P183">Der Ablauf eines Desinfektionszyklus wird mit einem internen Start aufgrund von DT_IN, DAY und T_START, oder durch eine steigende Flanke an MANUAL gestartet. <text:s/>Der Ausgang HEAT wird TRUE und steuert die Heizung des Boilers an. Innerhalb der Aufheizzeit T_MAX_HEAT muss dann das Eingangssignal TEMP_BOILER auf TRUE gehen. Wird die Temperatur nicht innerhalb von T_MAX_HEAT gemeldet, geht der Ausgang Status auf Störung. Die Desinfektion läuft aber trotzdem weiter. Nach der Aufheizphase wird die Boilertemperatur gemessen und falls nötig durch TRUE am Ausgang HEAT wieder nachgeheizt. Sobald die Boilertemperatur erreicht ist, wird PUMP TRUE und die Zirkulationspumpe eingeschaltet. Dann werden nacheinander die einzelnen Ventile geöffnet und gemessen, ob innerhalb der Zeit T_MAX_RETURN die Temperatur am Rücklauf der Zirkulationsleitung erreicht wurde. Falls ein Rückflußthermometer nicht vorhanden ist, kann der Eingang T_MAX_RETURN einfach offen bleiben.</text:p>
      <text:p text:style-name="P183">Der Ausgang Status ist ESR kompatibel und kann folgende Meldungen abgeben:</text:p>
      <text:p text:style-name="P183"><text:soft-page-break/>110<text:tab/>Wartestellung<text:line-break/>111<text:tab/>Sequenz läuft</text:p>
      <text:p text:style-name="P73">1<text:tab/>Boiler Temperatur wurde nicht erreicht</text:p>
      <text:p text:style-name="P73">2<text:tab/>Rücklauftemperatur bei Ventil0 wurde nicht erreicht</text:p>
      <text:p text:style-name="P73">3..8<text:tab/>Rücklauftemperatur bei Ventil1..7 wurde nicht erreicht</text:p>
      <text:p text:style-name="P73"><draw:frame draw:style-name="fr3" draw:name="Grafik226" text:anchor-type="paragraph" svg:x="0.917cm" svg:y="0.663cm" svg:width="14.517cm" svg:height="8.391cm" draw:z-index="182"><draw:image xlink:href="Pictures/10000000000003BD0000022901FF5F75.png" xlink:type="simple" xlink:show="embed" xlink:actuate="onLoad"/></draw:frame>Schematischer interner Aufbau von LEGIONELLA:</text:p>
      <text:p text:style-name="P2">Das Folgende <text:span text:style-name="T11">Beispiel </text:span>zeigt eine Simulation für 2 Desinfektionskreise mit Traceaufzeichnung. In diesem Aufbau ist VALVE2 auf den Eingang RST geschaltet und unterbricht damit die Sequenz nach 2 Kreisen:</text:p>
      <text:p text:style-name="P2"/>
      <text:p text:style-name="P173"><draw:frame draw:style-name="fr3" draw:name="Grafik223" text:anchor-type="paragraph" svg:x="1.03cm" svg:y="0.014cm" svg:width="15.76cm" svg:height="6.459cm" draw:z-index="186"><draw:image xlink:href="Pictures/10000000000003530000015D4A2BC405.png" xlink:type="simple" xlink:show="embed" xlink:actuate="onLoad"/></draw:frame></text:p>
      <text:p text:style-name="P183"><draw:frame draw:style-name="fr10" draw:name="Grafik227" text:anchor-type="paragraph" svg:x="0.781cm" svg:y="0.102cm" svg:width="16.215cm" svg:height="8.534cm" draw:z-index="187"><draw:image xlink:href="Pictures/10000000000003B6000001F41AC5FDB2.png" xlink:type="simple" xlink:show="embed" xlink:actuate="onLoad"/></draw:frame></text:p>
      <text:p text:style-name="P183"><text:soft-page-break/></text:p>
      <text:list xml:id="list38469925" text:continue-numbering="true" text:style-name="L1">
        <text:list-item>
          <text:list>
            <text:list-item>
              <text:h text:style-name="P216" text:outline-level="2"><text:alphabetical-index-mark-start text:id="IMark225941772"/>SDD<text:alphabetical-index-mark-end text:id="IMark225941772"/></text:h>
            </text:list-item>
          </text:list>
        </text:list-item>
      </text:list>
      <text:p text:style-name="P2">Type<text:tab/><text:span text:style-name="T11">Funktion</text:span> : REAL</text:p>
      <text:p text:style-name="P66"><text:span text:style-name="T16">Input</text:span><text:span text:style-name="T21"><text:tab/>T : REAL (Temperatur der Luft in °C)</text:span></text:p>
      <text:p text:style-name="P183"><text:tab/>ICE : BOOL (TRUE für Luft über Eis und FALSE für Luft über Wasser)</text:p>
      <text:p text:style-name="P73"><draw:frame draw:style-name="fr3" draw:name="Grafik365" text:anchor-type="paragraph" svg:x="1.046cm" svg:y="0.667cm" svg:width="2.281cm" svg:height="1.57cm" draw:z-index="344"><draw:image xlink:href="Pictures/10000000000000AC00000077865F2CB4.png" xlink:type="simple" xlink:show="embed" xlink:actuate="onLoad"/></draw:frame>Output<text:tab/>REAL (Sättigungsdampfdruck in Pa)</text:p>
      <text:p text:style-name="P183"><text:line-break/>SDD berechnet den Sättigungsdampfdruck für Wasserdampf in Luft. Die Temperatur T wird in °C angegeben. Das Ergebnis kann sowohl für Luft über Eis (ICE = TRUE) und für Luft über Wasser (ICE = FALSE) berechnet werden. Der Gültigkeitsbereich der Funktion liegt bei -30°C bis 70°C über Wasser und bei -60°C bis 0°C über Eis. Die Berechnung wird nach der Magnusformel ausgeführt.</text:p>
      <text:list xml:id="list38473854" text:continue-numbering="true" text:style-name="L1">
        <text:list-item>
          <text:list>
            <text:list-item>
              <text:h text:style-name="P216" text:outline-level="2"><text:soft-page-break/><text:alphabetical-index-mark-start text:id="IMark225941772"/>T_AVG24<text:alphabetical-index-mark-end text:id="IMark225941772"/></text:h>
            </text:list-item>
          </text:list>
        </text:list-item>
      </text:list>
      <text:p text:style-name="P2">Type<text:tab/><text:span text:style-name="T11">Funktionsbaustein</text:span></text:p>
      <text:p text:style-name="P66"><text:span text:style-name="T16">Input</text:span><text:span text:style-name="T21"><text:tab/>TS : INT (Außentemperatur Sensor)</text:span></text:p>
      <text:p text:style-name="P73"><text:tab/>DTI : DT (Datum und Tageszeit)</text:p>
      <text:p text:style-name="P73"><text:tab/>RST : BOOL (Reset)</text:p>
      <text:p text:style-name="P73">Config<text:tab/>T_FILTER : TIME (T des Eingangsfilters)</text:p>
      <text:p text:style-name="P183"><text:tab/>SCALE : REAL := 1.0 (Skalierungsfaktor)</text:p>
      <text:p text:style-name="P183"><text:tab/>OFS : REAL (Nullpunktabgleich)</text:p>
      <text:p text:style-name="P73">Output<text:tab/>TA : REAL (Momentane Außentemperatur)</text:p>
      <text:p text:style-name="P183"><text:tab/>TP : BOOL (TRUE wenn T24 erneuert wird</text:p>
      <text:p text:style-name="P73"><draw:frame draw:style-name="fr3" draw:name="Grafik737" text:anchor-type="paragraph" svg:x="1.046cm" svg:y="0.647cm" svg:width="2.9cm" svg:height="2.311cm" draw:z-index="780"><draw:image xlink:href="Pictures/10000000000000DB000000AFA6D4B6F8.png" xlink:type="simple" xlink:show="embed" xlink:actuate="onLoad"/></draw:frame>IO<text:tab/>T24 : REAL (Tagesmitteltemperatur)</text:p>
      <text:p text:style-name="P73"><text:line-break/>T_AVG24 ermittelt die Tagesmitteltemperatur T24. Der Sensor Eingang TS ist vom Typ INT und stellt die Temperatur * 10 dar (ein Wert von 234 bedeutet 23,4 °C). Die Daten von Filter laufen zur Unterdrückung von Störungen über ein Tiefpassfilter mit der Zeit T_FILTER. Mittels SCALE und OFS können Nullpunktfehler und Skalierung des Sensors angepasst werden. Der Ausgang TA gibt die aktuelle Außentemperatur, welche jede halbe und volle Stunde gemessen wird, an. Der Baustein schreibt alle 30 Minuten den über die letzten 48 Werte ermittelten Tagesmittelwert in die I/O Variable T24, die extern definiert werden muss und dadurch auch <text:span text:style-name="T7">REMANENT</text:span> oder PERSISTENT definiert werden kann. Wird beim ersten Start ein Wert von -1000 in T24 vorgefunden, so initialisiert sich der Baustein beim ersten Aufruf mit dem aktuellen Sensorwert, so dass danach alle 30 Minuten ein gültiger Mittelwert ausgegeben werden kann. Hat T24 einen beliebigen anderen Wert als -1000, so initialisiert sich der Baustein mit diesem Wert und Rechnet den Mittelwert basierend aus diesem Wert weiter. Dies ermöglicht bei Stromausfall und remanenter Speicherung von T24 ein sofortiges Weiterarbeiten nach dem wieder Einschalten. Ein Reset Eingang kann jederzeit einen Neustart des Bausteins erzwingen, wobei abhängig vom Wert in T24 der Baustein entweder mit TS oder dem alten Wert von T24 initialisiert wird. Möchte man den Baustein auf einen bestimmten Mittelwert setzen, so wird der gewünschte Wert in T24 geschrieben und dann ein Reset erzeugt.</text:p>
      <text:list xml:id="list38474238" text:continue-numbering="true" text:style-name="L1">
        <text:list-item>
          <text:list>
            <text:list-item>
              <text:h text:style-name="P216" text:outline-level="2"><text:soft-page-break/><text:alphabetical-index-mark-start text:id="IMark225941772"/>TEMP_EXT<text:alphabetical-index-mark-end text:id="IMark225941772"/></text:h>
            </text:list-item>
          </text:list>
        </text:list-item>
      </text:list>
      <text:p text:style-name="P2">Type<text:tab/><text:span text:style-name="T11">Funktionsbaustein</text:span></text:p>
      <text:p text:style-name="P66"><text:span text:style-name="T16">Input</text:span><text:span text:style-name="T21"><text:tab/>T_EXT1 : REAL (Außentemperatur Sensor 1)</text:span></text:p>
      <text:p text:style-name="P73"><text:tab/>T_EXT2 : REAL (Außentemperatur Sensor 2)</text:p>
      <text:p text:style-name="P73"><text:tab/>T_EXT3 : REAL (Außentemperatur Sensor 3)</text:p>
      <text:p text:style-name="P73"><text:tab/>T_EXT_CONFIG : BYTE (Abfragemodus)</text:p>
      <text:p text:style-name="P73"><text:tab/>DT_IN : DATE_TIME (Tageszeit)</text:p>
      <text:p text:style-name="P73">Output<text:tab/>T_EXT : REAL (Ausgang Außentemperatur)</text:p>
      <text:p text:style-name="P73"><text:tab/>HEAT : BOOL (Heizsignal)</text:p>
      <text:p text:style-name="P73"><text:tab/>COOL : BOOL (Kühlsignal)</text:p>
      <text:p text:style-name="P73">Config<text:tab/>T_EXT_MIN : REAL (Minimum Außentemperatur)</text:p>
      <text:p text:style-name="P73"><text:tab/>T_EXT_MAX : REAL (Maximum Außentemperatur)</text:p>
      <text:p text:style-name="P73"><text:tab/>T_EXT_DEFAULT : REAL (Default Außentemperatur)</text:p>
      <text:p text:style-name="P73"><text:tab/>HEAT_PERIOD_START : DATE (Beginn der Heizperiode)</text:p>
      <text:p text:style-name="P73"><text:tab/>HEAT_PERIOD_STOP : DATE (Ende der Heizperiode)</text:p>
      <text:p text:style-name="P73"><text:tab/>COOL_PERIOD_START : DATE (Beginn der Kühlperiode)</text:p>
      <text:p text:style-name="P73"><text:tab/>COOL_PERIOD_STOP : DATE (Ende der Kühlperiode)</text:p>
      <text:p text:style-name="P73"><text:tab/>HEAT_START_TEAMP_DAY (Heiztriggertemperatur Tag)</text:p>
      <text:p text:style-name="P73"><text:tab/>HEAT_START_TEAMP_NIGHT (Heiztriggertemperatur Nacht)</text:p>
      <text:p text:style-name="P73"><text:tab/>HEAT_STOP_TEMP : REAL (Heizen Stopp Temperatur)</text:p>
      <text:p text:style-name="P73"><text:tab/>COOL_START_TEAMP_DAY (Kühl Start Temperatur Tag)</text:p>
      <text:p text:style-name="P73"><text:tab/>COOL_START_TEMP_NIGHT (Kühl Start Temperatur Nacht)</text:p>
      <text:p text:style-name="P73"><text:tab/>COOL_STOP_TEMP : REAL (Kühl Stopp Temperatur)</text:p>
      <text:p text:style-name="P73"><text:tab/>START_DAY : TOD (Anfang des Tages)</text:p>
      <text:p text:style-name="P73"><text:tab/>START_NIGHT : TOD (Anfang der Nacht)</text:p>
      <text:p text:style-name="P73"><draw:frame draw:style-name="fr3" draw:name="Grafik228" text:anchor-type="paragraph" svg:x="1.081cm" svg:y="0.653cm" svg:width="4.521cm" svg:height="3.099cm" draw:z-index="215"><draw:image xlink:href="Pictures/1000000000000156000000EA4D59944B.png" xlink:type="simple" xlink:show="embed" xlink:actuate="onLoad"/></draw:frame><text:tab/>CYCLE_TIME : TIME (Abfragezeit für Außentemperatur)</text:p>
      <text:p text:style-name="P66"><text:span text:style-name="T21"><text:line-break/>TEMP_EXT verarbeitet bis zu 3 Außentemperaturfühler und stellt eine durch Mode selektierte Außentemperatur der Heizungsregelung zur Verfü</text:span><text:span text:style-name="T21">gung. Es </text:span><text:soft-page-break/><text:span text:style-name="T21">errechnet Signale für Heizung und Kühlung abhängig von Außentemperatur, Datum und Uhrzeit. Mit dem Eingang T_EXT_CONFIG wird festgelegt, wie der Ausgangswert T_EXT ermittelt wird. Wird T_EXT_CONFIG nicht beschaltet, so ist der Vorgabewert 0. Die Config-Werte T_EXT_MIN und T_EXT_Max legen den Mindestwert und Maximalwert der Außentempe</text:span><text:span text:style-name="T21">ra</text:span><text:span text:style-name="T21">tureingänge fest. Werden diese Grenzen über- oder unterschritten, so wird von einem Fehler im Sensor oder Drahtbruch ausgegangen und an Stelle des Messwertes der Vorgabewert T_EXT_DEFAULT benutzt. <text:s/></text:span></text:p>
      <table:table table:name="Tabelle5" table:style-name="Tabelle5">
        <table:table-column table:style-name="Tabelle5.A"/>
        <table:table-column table:style-name="Tabelle5.B"/>
        <table:table-row>
          <table:table-cell table:style-name="Tabelle5.A1" office:value-type="string">
            <text:p text:style-name="P60">T_EXT_CONFIG</text:p>
          </table:table-cell>
          <table:table-cell table:style-name="Tabelle5.B1" office:value-type="string">
            <text:p text:style-name="P61">T_EXT</text:p>
          </table:table-cell>
        </table:table-row>
        <table:table-row>
          <table:table-cell table:style-name="Tabelle5.A2" office:value-type="string">
            <text:p text:style-name="P60">0</text:p>
          </table:table-cell>
          <table:table-cell table:style-name="Tabelle5.B2" office:value-type="string">
            <text:p text:style-name="P61">Durchschnittswert von T_EXT1, T_ext2 und T_ext3</text:p>
          </table:table-cell>
        </table:table-row>
        <table:table-row>
          <table:table-cell table:style-name="Tabelle5.A2" office:value-type="string">
            <text:p text:style-name="P60">1</text:p>
          </table:table-cell>
          <table:table-cell table:style-name="Tabelle5.B2" office:value-type="string">
            <text:p text:style-name="P61">T_EXT1</text:p>
          </table:table-cell>
        </table:table-row>
        <table:table-row>
          <table:table-cell table:style-name="Tabelle5.A2" office:value-type="string">
            <text:p text:style-name="P60">2</text:p>
          </table:table-cell>
          <table:table-cell table:style-name="Tabelle5.B2" office:value-type="string">
            <text:p text:style-name="P61">T_EXT2</text:p>
          </table:table-cell>
        </table:table-row>
        <table:table-row>
          <table:table-cell table:style-name="Tabelle5.A2" office:value-type="string">
            <text:p text:style-name="P60">3</text:p>
          </table:table-cell>
          <table:table-cell table:style-name="Tabelle5.B2" office:value-type="string">
            <text:p text:style-name="P61">T_EXT3</text:p>
          </table:table-cell>
        </table:table-row>
        <table:table-row>
          <table:table-cell table:style-name="Tabelle5.A2" office:value-type="string">
            <text:p text:style-name="P60">4</text:p>
          </table:table-cell>
          <table:table-cell table:style-name="Tabelle5.B2" office:value-type="string">
            <text:p text:style-name="P61">T_EXT_DEFAULT</text:p>
          </table:table-cell>
        </table:table-row>
        <table:table-row>
          <table:table-cell table:style-name="Tabelle5.A2" office:value-type="string">
            <text:p text:style-name="P60">5</text:p>
          </table:table-cell>
          <table:table-cell table:style-name="Tabelle5.B2" office:value-type="string">
            <text:p text:style-name="P61">Niedrigster Wert der 3 Eingänge</text:p>
          </table:table-cell>
        </table:table-row>
        <table:table-row>
          <table:table-cell table:style-name="Tabelle5.A2" office:value-type="string">
            <text:p text:style-name="P60">6</text:p>
          </table:table-cell>
          <table:table-cell table:style-name="Tabelle5.B2" office:value-type="string">
            <text:p text:style-name="P61">Höchster Wert der 3 Eingänge</text:p>
          </table:table-cell>
        </table:table-row>
        <table:table-row>
          <table:table-cell table:style-name="Tabelle5.A2" office:value-type="string">
            <text:p text:style-name="P60">7</text:p>
          </table:table-cell>
          <table:table-cell table:style-name="Tabelle5.B2" office:value-type="string">
            <text:p text:style-name="P61">Mittlerer Wert der 3 Eingänge</text:p>
          </table:table-cell>
        </table:table-row>
      </table:table>
      <text:p text:style-name="P73"/>
      <text:p text:style-name="P183">Mit den Config-Variablen HEAT_PERIOD und COOL_PERIOD wird definiert, wann Heizen und wann Kühlen erlaubt ist. Die Entscheidung, ob der Ausgang HEAT oder COOL TRUE wird hängt weiterhin von den CONFIG-Werten HEAT_START- HEAT_STOP und COOL_START und COOL_STOP ab. Diese Werte können separat für Tag und Nacht definiert werden. Der Start für eine Tag- und Nachtperiode kann durch die Config-Variablen START_DAY und START_NIGHT festgelegt werden. Ein Variable CYCLE_TIME legt fest, wie oft die Außentemperatur abgefragt werden soll.</text:p>
      <text:list xml:id="list38482596" text:continue-numbering="true" text:style-name="L1">
        <text:list-item>
          <text:list>
            <text:list-item>
              <text:h text:style-name="P216" text:outline-level="2"><text:alphabetical-index-mark-start text:id="IMark225941772"/>WATER_CP<text:alphabetical-index-mark-end text:id="IMark225941772"/></text:h>
            </text:list-item>
          </text:list>
        </text:list-item>
      </text:list>
      <text:p text:style-name="P2">Type<text:tab/><text:span text:style-name="T11">Funktion</text:span> : REAL</text:p>
      <text:p text:style-name="P66"><text:span text:style-name="T16">Input</text:span><text:span text:style-name="T21"><text:tab/>T : REAL (Temperatur des Wassers in °C)</text:span></text:p>
      <text:p text:style-name="P73"><draw:frame draw:style-name="fr3" draw:name="Grafik364" text:anchor-type="paragraph" svg:x="1.134cm" svg:y="0.6cm" svg:width="4.069cm" svg:height="1.12cm" draw:z-index="343"><draw:image xlink:href="Pictures/1000000000000134000000555DC448BD.png" xlink:type="simple" xlink:show="embed" xlink:actuate="onLoad"/></draw:frame>Output<text:tab/>REAL (Spezifische Wärmekapazität bei der Temperatur T)</text:p>
      <text:p text:style-name="P173"><text:soft-page-break/><text:span text:style-name="T21"><text:line-break/>WATER_CP berechnet die spezifische Wärmekapazität von flüssigem Wassers in Abhängigkeit von der Temperatur bei Normaldruck. Die Berechnung ist gültig im Temperaturbereich von 0 bis 100 Grad Celsius und wird </text:span><text:span text:style-name="T21">in Joule / (Gramm * Kelvin) errechnet. Die Temperatur T wird in °C angegeben.</text:span></text:p>
      <text:list xml:id="list38471511" text:continue-numbering="true" text:style-name="L1">
        <text:list-item>
          <text:list>
            <text:list-item>
              <text:h text:style-name="P216" text:outline-level="2"><text:alphabetical-index-mark-start text:id="IMark225941772"/>WATER_DENSITY<text:alphabetical-index-mark-end text:id="IMark225941772"/></text:h>
            </text:list-item>
          </text:list>
        </text:list-item>
      </text:list>
      <text:p text:style-name="P2">Type<text:tab/><text:span text:style-name="T11">Funktion</text:span> : REAL</text:p>
      <text:p text:style-name="P66"><text:span text:style-name="T16">Input</text:span><text:span text:style-name="T21"><text:tab/>T : REAL (Temperatur des Wassers)</text:span></text:p>
      <text:p text:style-name="P73"><text:tab/>SAT : BOOL (TRUE, wenn das Wasser mit Luft gesättigt ist)</text:p>
      <text:p text:style-name="P183"><draw:frame draw:style-name="fr3" draw:name="Grafik314" text:anchor-type="paragraph" svg:x="1.035cm" svg:y="0.792cm" svg:width="5.669cm" svg:height="1.39cm" draw:z-index="273"><draw:image xlink:href="Pictures/10000000000001AD000000695D16FAC0.png" xlink:type="simple" xlink:show="embed" xlink:actuate="onLoad"/></draw:frame>Output<text:tab/>REAL (Dichte des Wassers in Gramm / Liter)</text:p>
      <text:p text:style-name="P73"><text:line-break/>WATER_DENSITY berechnet die Dichte von flüssigem Wassers in Abhängigkeit von der Temperatur bei Normaldruck. Die Temperatur T wird in °C angegeben. Die höchste Dichte erreicht Wasser bei 3,983 °C mit 999,974950 Gramm pro Liter. WATER_DENSITY berechnet die Dichte für flüssiges Wasser, nicht für gefrorenes oder verdampftes Wasser. WATER_DENSITY berechnet die Dichte von luftfreiem Wasser wenn SAT = FALSE und von luftgesättigtem Wasser wenn SAT = TRUE. Die Berechneten Werte werden nach einer Näherungsformel berechnet und liefert Werte mit einer Genauigkeit besser las 0,01% im Temperaturbereich von 0 - 100 °C bei einem konstanten Druck von 1013 mBar.</text:p>
      <text:p text:style-name="P183">Die Abweichung der Dichte von mit Luft gesättigtem Wasser wird nach der Formel vom Bignell korrigiert.</text:p>
      <text:p text:style-name="P183">Die Abhängigkeit der Wasserdichte vom Druck ist verhältnismäßig gering mit ca. 0,046 kg/m³ je 1 Bar Druckerhöhung Im Bereich bis 50 Bar. Die geringe Druckabhängigkeit hat in praktischen Anwendungsfällen keinen nennenswerten Einfluss.</text:p>
      <text:list xml:id="list38450349" text:continue-numbering="true" text:style-name="L1">
        <text:list-item>
          <text:list>
            <text:list-item>
              <text:h text:style-name="P216" text:outline-level="2"><text:soft-page-break/><text:alphabetical-index-mark-start text:id="IMark225941772"/>WATER_ENTHALPY<text:alphabetical-index-mark-end text:id="IMark225941772"/></text:h>
            </text:list-item>
          </text:list>
        </text:list-item>
      </text:list>
      <text:p text:style-name="P2">Type<text:tab/><text:span text:style-name="T11">Funktion</text:span> : REAL</text:p>
      <text:p text:style-name="P66"><text:span text:style-name="T16">Input</text:span><text:span text:style-name="T21"><text:tab/>T : REAL (Temperatur des Wassers)</text:span></text:p>
      <text:p text:style-name="P73"><draw:frame draw:style-name="fr3" draw:name="Grafik363" text:anchor-type="paragraph" svg:x="1.134cm" svg:y="0.646cm" svg:width="5.42cm" svg:height="1.12cm" draw:z-index="342"><draw:image xlink:href="Pictures/100000000000019A000000558B1C00B8.png" xlink:type="simple" xlink:show="embed" xlink:actuate="onLoad"/></draw:frame>Output<text:tab/>REAL (Enthalpie des Wassers in J/Gramm bei der Temperatur T)</text:p>
      <text:p text:style-name="P173"><text:span text:style-name="T21"><text:line-break/>WATER_ENTHALPY berechnet die </text:span><text:span text:style-name="T19">Enthalpie</text:span><text:span text:style-name="T21"> (Wärmeinhalt) von flüssigem Wasser in Abhängigkeit von der Temperatur bei Normaldruck. Die Temperatur T wird in °C angegeben. Die Berechnung ist gültig für eine Temperatur </text:span><text:span text:style-name="T21">von 0 bis 100 °C und das Ergebnis ist die Wärmemenge die benötigt wird um das Wasser von 0°C auf die Temperatur von T zu Erwärmen. Das Ergebnis wird in Joule/Gramm J/g Beziehungsweise KJ/Kg ausgegeben. Die Berechnung erfolgt durch lineare Interpolation in Schritten von 10° und erreicht damit eine für nicht wissenschaftliche Anwendungen hinreichende Genauigkeit. Eine mögliche <text:s/>Anwendung von WATER_ENTHALPY ist die Berechnung der Energiemenge die benötigt wird um zum Beispiel einen Pufferspeicher um X (T2 – T1) Grad zu erwärmen. Aus der benötigten Energie kann dann die Laufzeit eines Heizkessels berechnet werden und exakt die benötigte Energie bereitgestellt werden. Da Temperaturmesswerte in der </text:span><text:span text:style-name="T21">Praxis stark zeitverzögert vorliegen ist mit dieser Methode eine bessere Aufheizung möglich.</text:span></text:p>
      <text:list xml:id="list38469088" text:continue-numbering="true" text:style-name="L1">
        <text:list-item>
          <text:list>
            <text:list-item>
              <text:h text:style-name="P216" text:outline-level="2"><text:alphabetical-index-mark-start text:id="IMark225941772"/>WCT<text:alphabetical-index-mark-end text:id="IMark225941772"/></text:h>
            </text:list-item>
          </text:list>
        </text:list-item>
      </text:list>
      <text:p text:style-name="P2">Type<text:tab/><text:span text:style-name="T11">Funktion</text:span> : REAL</text:p>
      <text:p text:style-name="P66"><text:span text:style-name="T16">Input</text:span><text:span text:style-name="T21"><text:tab/>T : REAL (Außentemperatur in °C)</text:span></text:p>
      <text:p text:style-name="P73"><text:tab/>V : REAL (Windgeschwindigkeit in km/h)</text:p>
      <text:p text:style-name="P73">Output<text:tab/>REAL (Windchill Temperatur)</text:p>
      <text:p text:style-name="P73"><draw:frame draw:style-name="fr3" draw:name="Grafik271" text:anchor-type="paragraph" svg:x="1.134cm" svg:y="0.095cm" svg:width="2.731cm" svg:height="1.57cm" draw:z-index="224"><draw:image xlink:href="Pictures/10000000000000CE000000771CAD8813.png" xlink:type="simple" xlink:show="embed" xlink:actuate="onLoad"/></draw:frame><text:line-break/>WCT berechnet die Windchill-Temperatur abhängig von der Windgeschwindigkeit in Km/h und der Außentemperatur in °C. Die Windchill-Temperatur ist nur definiert für Windgeschwindigkeiten größer als 5 Km/h und Tempe<text:soft-page-break/>raturen kleiner 10 °C. Für Werte außerhalb des definierten Bereichs wird die Eingangstemperatur ausgegeben.</text:p>
      <text:list xml:id="list38466930" text:continue-numbering="true" text:style-name="L1">
        <text:list-item>
          <text:h text:style-name="P210" text:outline-level="1">Elektrotechnik</text:h>
          <text:list>
            <text:list-item>
              <text:h text:style-name="P216" text:outline-level="2"><text:alphabetical-index-mark-start text:id="IMark225941772"/>CLICK<text:alphabetical-index-mark-end text:id="IMark225941772"/></text:h>
            </text:list-item>
          </text:list>
        </text:list-item>
      </text:list>
      <text:p text:style-name="P2">Type<text:tab/><text:span text:style-name="T11">Funktionsbaustein</text:span></text:p>
      <text:p text:style-name="P66"><text:span text:style-name="T16">Input</text:span><text:span text:style-name="T21"><text:tab/>IN : BOOL (Steuereingang für Taster)<text:tab/></text:span></text:p>
      <text:p text:style-name="P183">Output<text:tab/>Q : BOOL (Schaltausgang)</text:p>
      <text:p text:style-name="P73"><text:tab/>SINGLE : BOOL (Ausgang für einfachen Tastendruck)</text:p>
      <text:p text:style-name="P73"><text:tab/>DOUBLE : BOOL (Ausgang für doppelten Tastendruck)</text:p>
      <text:p text:style-name="P73"><text:tab/>TRIPLE : BOOL (Ausgang für dreifachen Tastendruck)</text:p>
      <text:p text:style-name="P183"><text:tab/>STATUS : BYTE (ESR kompatibler Status Ausgang)</text:p>
      <text:p text:style-name="P73">Config<text:tab/>T_DEBOUNCE : TIME (Entprellzeit für Taster)</text:p>
      <text:p text:style-name="P73"><text:tab/>T_SHORT : TIME (Maximale Zeit für kurzen Impuls)</text:p>
      <text:p text:style-name="P73"><text:tab/>T_PAUSE : TIME (Maximale Pause zwischen 2 Impulsen)</text:p>
      <text:p text:style-name="P73"><text:tab/>T_RECONFIG : TIME (Rekonfigurationszeit)</text:p>
      <text:p text:style-name="P66"><draw:frame draw:style-name="fr3" draw:name="Grafik281" text:anchor-type="paragraph" svg:x="1.266cm" svg:y="0cm" svg:width="3.18cm" svg:height="3.099cm" draw:z-index="234"><draw:image xlink:href="Pictures/10000000000000F0000000EA15109C1B.png" xlink:type="simple" xlink:show="embed" xlink:actuate="onLoad"/></draw:frame><text:span text:style-name="T21"><text:line-break/>CLICK ist ein Tastinterface das sich selbsttätig auf den angeschlossenen Taster einstellt. Wird ein Taster angeschlossen, so erkennt CLICK selbst, ob es ein Öffner oder Schließer ist und wertet dann nur die jeweils erste Flanke aus. Mit der Config-Variable T_DEBOUNCE wird die Entprellzeit des Tasters festgelegt. Sie ist standardmäßig auf 10ms voreingestellt. Die Zeit T_RECONFIG wird verwendet, um zu entscheiden ob ein Schließer oder Öffner am Eingang IN angeschlossen ist. Bleibt der Eingang länger als diese Zeit in einem Zustand, so wird dies als Ruhestellung angenommen. Der Vorgabewert für T_RECONFIG beträgt 1 Minute. Mit kurz aufeinander folgenden Impulsen wird ein einfacher, doppelter oder dreifacher Puls ausgewertet und schaltet entsprechend den Ausgang SINGLE, DOUBLE oder TRIPLE ein. Ist der Puls länger als die Config-Zeit T_SHORT oder eine Pause zwischen 2 Impulsen länger als T_PAUSE, so wird die Puls-Sequenz unterbrochen und der entsprechende Ausgang gesetzt, bis der Eingangspuls wi</text:span><text:span text:style-name="T21">der inaktiv wird. </text:span><text:soft-page-break/><text:span text:style-name="T21">Der Ausgang Q entspricht dem Eingangsimpuls. Jedoch ist er immer </text:span><text:span text:style-name="T16">High-</text:span><text:span text:style-name="T21">aktiv. Ein ESR kompatibler Status Ausgang meldet Zustandsänderungen an nachfolgende ESR kompatible Auswertemodule. Mit kurzen Impulsen wird der Ausgang SINGLE (ein Puls), DOUBLE (2 Impulse) oder TRIPLE (3 Impulse) ausgewählt. Der entsprechende Ausgang bleibt mindestens einen Zyklus aktiv und maximal solange wie der Eingang IN aktiv bleibt.</text:span></text:p>
      <table:table table:name="Tabelle9" table:style-name="Tabelle9">
        <table:table-column table:style-name="Tabelle9.A"/>
        <table:table-column table:style-name="Tabelle9.B"/>
        <table:table-row>
          <table:table-cell table:style-name="Tabelle9.A1" office:value-type="string">
            <text:p text:style-name="P59">Status</text:p>
          </table:table-cell>
          <table:table-cell table:style-name="Tabelle9.B1" office:value-type="string">
            <text:p text:style-name="P55"/>
          </table:table-cell>
        </table:table-row>
        <table:table-row>
          <table:table-cell table:style-name="Tabelle9.A2" office:value-type="string">
            <text:p text:style-name="P59">110</text:p>
          </table:table-cell>
          <table:table-cell table:style-name="Tabelle9.B2" office:value-type="string">
            <text:p text:style-name="P59">Eingang inaktiv</text:p>
          </table:table-cell>
        </table:table-row>
        <table:table-row>
          <table:table-cell table:style-name="Tabelle9.A2" office:value-type="string">
            <text:p text:style-name="P59">111</text:p>
          </table:table-cell>
          <table:table-cell table:style-name="Tabelle9.B2" office:value-type="string">
            <text:p text:style-name="P59">Ausgang SINGLE aktiviert</text:p>
          </table:table-cell>
        </table:table-row>
        <table:table-row>
          <table:table-cell table:style-name="Tabelle9.A2" office:value-type="string">
            <text:p text:style-name="P59">112</text:p>
          </table:table-cell>
          <table:table-cell table:style-name="Tabelle9.B2" office:value-type="string">
            <text:p text:style-name="P59">Ausgang DOUBLE aktiviert</text:p>
          </table:table-cell>
        </table:table-row>
        <table:table-row>
          <table:table-cell table:style-name="Tabelle9.A2" office:value-type="string">
            <text:p text:style-name="P59">113</text:p>
          </table:table-cell>
          <table:table-cell table:style-name="Tabelle9.B2" office:value-type="string">
            <text:p text:style-name="P59">Ausgang TRIPLE aktiviert</text:p>
          </table:table-cell>
        </table:table-row>
      </table:table>
      <text:p text:style-name="P73"/>
      <text:p text:style-name="P73">Beispiel 1 zeigt eine Anwendung von CLICK mit 3 nachfolgenden Dimm Bausteinen. Analog können auch bis zu 3 Schalter oder eine Mischung aus Dimmern <text:s/>oder Schaltern benutzt werden.</text:p>
      <text:p text:style-name="P73"><draw:frame draw:style-name="fr10" draw:name="Grafik282" text:anchor-type="paragraph" svg:x="1.02cm" svg:y="0cm" svg:width="15.67cm" svg:height="6.69cm" draw:z-index="235"><draw:image xlink:href="Pictures/10000000000004A1000001FA51BF57DA.png" xlink:type="simple" xlink:show="embed" xlink:actuate="onLoad"/></draw:frame><text:line-break/>Beispiel 2 zeigt CLICK mit einem Dimmer, wobei sich der Dimmer wie ein Dimmer ohne CLICK verhält, jedoch ein kurzer Doppelklick den Ausgang des Dimmers sofort auf 100% setzt und ein Dreifachklick als weiterer Schaltausgang zur Verfügung steht.</text:p>
      <text:p text:style-name="P73"><draw:frame draw:style-name="fr18" draw:name="Grafik283" text:anchor-type="paragraph" svg:width="14.319cm" svg:height="3.56cm" draw:z-index="236"><draw:image xlink:href="Pictures/100000000000043B0000010DC14622CE.png" xlink:type="simple" xlink:show="embed" xlink:actuate="onLoad"/></draw:frame></text:p>
      <text:list xml:id="list38470227" text:continue-numbering="true" text:style-name="L1">
        <text:list-item>
          <text:list>
            <text:list-item>
              <text:h text:style-name="P216" text:outline-level="2"><text:soft-page-break/><text:alphabetical-index-mark-start text:id="IMark225941772"/>CLICK_MODE<text:alphabetical-index-mark-end text:id="IMark225941772"/></text:h>
            </text:list-item>
          </text:list>
        </text:list-item>
      </text:list>
      <text:p text:style-name="P2">Type<text:tab/><text:span text:style-name="T11">Funktionsbaustein</text:span></text:p>
      <text:p text:style-name="P66"><text:span text:style-name="T16">Input</text:span><text:span text:style-name="T21"><text:tab/>IN : BOOL (Steuereingang für Taster)<text:tab/></text:span></text:p>
      <text:p text:style-name="P183">Output<text:tab/>SINGLE : BOOL (Ausgang für einfachen Tastendruck)</text:p>
      <text:p text:style-name="P73"><text:tab/>DOUBLE : BOOL (Ausgang für doppelten Tastendruck)</text:p>
      <text:p text:style-name="P73"><text:tab/>LONG : BOOL (Ausgang für einen langen Tastendruck)</text:p>
      <text:p text:style-name="P183"><text:tab/>TP_LONG : BOOL (Impuls wenn Langer Tastendruck startet)</text:p>
      <text:p text:style-name="P73"><draw:frame draw:style-name="fr3" draw:name="Grafik742" text:anchor-type="paragraph" svg:x="0.958cm" svg:y="0.676cm" svg:width="3.69cm" svg:height="2.311cm" draw:z-index="790"><draw:image xlink:href="Pictures/1000000000000117000000AF7BFE1637.png" xlink:type="simple" xlink:show="embed" xlink:actuate="onLoad"/></draw:frame>Config<text:tab/>T_LONG : TIME (Dekodierzeit für Langen Tastendruck)<text:tab/></text:p>
      <text:p text:style-name="P73"><text:line-break/>CLICK_MODE ist ein Taster Interface das sowohl einfachen Klick, Doppelklick oder Lange Tastendrücke dekodiert. Mit kurzen Impulsen wird ein einfacher oder Doppelklick dekodiert und schaltet entsprechend die Ausgänge SINGLE oder DOUBLE für jeweils einen Zyklus ein. Ist der Puls länger als die T_LONG, so wird der Ausgang TP_OUT für einen Zyklus auf TRUE gesetzt und der Ausgang LONG bleibt solange TRUE bis der Eingang IN wieder auf FALSE geht.</text:p>
      <text:list xml:id="list38468469" text:continue-numbering="true" text:style-name="L1">
        <text:list-item>
          <text:list>
            <text:list-item>
              <text:h text:style-name="P216" text:outline-level="2"><text:alphabetical-index-mark-start text:id="IMark225941772"/>DEBOUNCE<text:alphabetical-index-mark-end text:id="IMark225941772"/></text:h>
            </text:list-item>
          </text:list>
        </text:list-item>
      </text:list>
      <text:p text:style-name="P2"><text:span text:style-name="T11">Type</text:span><text:tab/><text:span text:style-name="T11">Funktionsbaustein</text:span></text:p>
      <text:p text:style-name="P66"><text:span text:style-name="T16">Input</text:span><text:span text:style-name="T21"><text:tab/>IN : BOOL (Eingangssignal vom Schalter oder Taster)</text:span></text:p>
      <text:p text:style-name="P73"><text:tab/>TD : TIME (Entprellzeit)</text:p>
      <text:p text:style-name="P73"><text:tab/>PM : BOOL (Betriebsart TRUE = Impulsbetrieb)</text:p>
      <text:p text:style-name="P183"><draw:frame draw:style-name="fr3" draw:name="Grafik686" text:anchor-type="paragraph" svg:x="1.067cm" svg:y="0.688cm" svg:width="2.499cm" svg:height="1.921cm" draw:z-index="682"><draw:image xlink:href="Pictures/10000000000000BD0000009103A4D141.png" xlink:type="simple" xlink:show="embed" xlink:actuate="onLoad"/></draw:frame>Output<text:tab/>Q : BOOL (Ausgangssignal)</text:p>
      <text:p text:style-name="P183"><text:line-break/>DEBOUNCE kann das Signal von einem Schalter oder Taster entprellen und am Ausgang Q entprellt bereitstellen. Wenn PM = FALSE folgt der Ausgang <text:soft-page-break/>Q dem entprellten Eingangsignal IN, ist PM = TRUE wird am Eingang In eine steigende Flanke detektiert und der Ausgang Q bleibt nur für einen Zyklus auf TRUE. Die Entprellzeit für den Eingang IN wird mit der Zeit TD eingestellt.</text:p>
      <text:list xml:id="list38470564" text:continue-numbering="true" text:style-name="L1">
        <text:list-item>
          <text:list>
            <text:list-item>
              <text:h text:style-name="P216" text:outline-level="2"><text:alphabetical-index-mark-start text:id="IMark225941772"/>DIMM_I<text:alphabetical-index-mark-end text:id="IMark225941772"/></text:h>
            </text:list-item>
          </text:list>
        </text:list-item>
      </text:list>
      <text:p text:style-name="P2"><text:span text:style-name="T11">Type</text:span><text:tab/><text:span text:style-name="T11">Funktionsbaustein</text:span></text:p>
      <text:p text:style-name="P66"><text:span text:style-name="T16">Input</text:span><text:span text:style-name="T21"><text:tab/>SET : BOOL (Eingang zum Einschalten des Ausgangs auf VAL)</text:span></text:p>
      <text:p text:style-name="P183"><text:tab/>VAL : BYTE (Wert für die SET Operation)</text:p>
      <text:p text:style-name="P73"><text:tab/>IN : BOOL (Steuereingang für Taster)</text:p>
      <text:p text:style-name="P73"><text:tab/>RST : BOOL (Eingang zum Ausschalten des Ausgangs)</text:p>
      <text:p text:style-name="P73">Output<text:tab/>Q : BOOL (Schaltausgang)</text:p>
      <text:p text:style-name="P183"><text:tab/>DBL : BOOL (Ausgang für Doppelklick)</text:p>
      <text:p text:style-name="P173"><text:span text:style-name="T21">I/O</text:span><text:span text:style-name="T21"><text:tab/>OUT : Byte (</text:span><text:span text:style-name="T16">Dimmer</text:span><text:span text:style-name="T21"> Ausgang)</text:span></text:p>
      <text:p text:style-name="P73">Config<text:tab/>T_DEBOUNCE : TIME (Entprellzeit für Taster)</text:p>
      <text:p text:style-name="P73"><text:tab/>T_RECONFIG : TIME (Rekonfigurationszeit)</text:p>
      <text:p text:style-name="P73"><text:tab/>T_ON_MAX : TIME (Einschaltbegrenzung)</text:p>
      <text:p text:style-name="P73"><text:tab/>T_DIMM_START : TIME (Reaktionszeit zum Dimmen)</text:p>
      <text:p text:style-name="P73"><text:tab/>T_DIMM : TIME (Zeit für eine Dimm Rampe)</text:p>
      <text:p text:style-name="P183"><text:tab/>MIN_ON : BYTE := 50 (Minimalwert von OUT beim Einschalten)</text:p>
      <text:p text:style-name="P183"><text:tab/>MAX_ON : BYTE := 255 (Maximalwert von OUT beim Einschalten)</text:p>
      <text:p text:style-name="P183"><text:tab/>SOFT_DIMM : BOOL (wenn TRUE beginnt Dimmen nach dem</text:p>
      <text:p text:style-name="P183"><text:tab/>Einschalten immer bei 0)</text:p>
      <text:p text:style-name="P183"><text:tab/>DBL_TOGGLE : BOOL (wenn TRUE wird der Ausgang DBL bei </text:p>
      <text:p text:style-name="P183"><text:tab/>jedem Doppelklick invertiert)</text:p>
      <text:p text:style-name="P183"><draw:frame draw:style-name="fr3" draw:name="Grafik260" text:anchor-type="paragraph" svg:x="1.069cm" svg:y="0.69cm" svg:width="2.9cm" svg:height="2.709cm" draw:z-index="789"><draw:image xlink:href="Pictures/10000000000000DB000000CD1A271F70.png" xlink:type="simple" xlink:show="embed" xlink:actuate="onLoad"/></draw:frame><text:tab/>RST_OUT : BOOL (Reset setzt OUT auf 0 gesetzt wenn TRUE)</text:p>
      <text:p text:style-name="P66"><text:soft-page-break/><text:span text:style-name="T21"><text:line-break/>DIMM_I ist ein intelligenter </text:span><text:span text:style-name="T16">Dimmer</text:span><text:span text:style-name="T21"> der sich selbständig an Öffner oder Schließer anpasst ohne neu konfiguriert werden zu müssen. Der </text:span><text:span text:style-name="T16">Dimmer</text:span><text:span text:style-name="T21"> kann über Setup-Variablen eingestellt werden. Die Zeit T_DEBOUNCE dient zur Entprellung des Tasters und ist standardmäßig auf 10ms eingestellt. Die Zeit T_RECONFIG wird verwendet, um zu entscheiden ob ein Schließer oder Öffner am Eingang IN angeschlossen ist. Bleibt der Eingang länger als diese Zeit in einem Zustand, so wird dies als Ruhestellung angenommen. Eine Einschaltbegrenzung T_ON_MAX schaltet den Ausgang automatisch ab, wenn sie überschritten wird. Die Zeiten T_DIMM_Start und T_DIMM legen das Zeitverhalten des </text:span><text:span text:style-name="T16">Dimmers</text:span><text:span text:style-name="T21"> fest.</text:span></text:p>
      <text:p text:style-name="P173"><text:span text:style-name="T21">Mit den Eingängen SET und RST kann der Ausgang Q jederzeit Ein- beziehungsweise Aus-geschaltet werden. SET setzt dabei den Ausgang OUT auf den durch VAL VAL Vorgegebenen Wert, RST setzt OUT auf 0 wenn die Setup Variable RST_OUT auf TRUE steht.RST schaltet zusätzlich DBL auf FALSE. SET und RST können unter anderem zum Anschluss von </text:span><text:span text:style-name="T19">Brandmeldeanlagen oder </text:span><text:span text:style-name="T21">Alarmanlagen benutzt werden. Mit SET können im Brandfall oder bei Einbruch alle Leuchten auf Ein oder mit RST beim verlassen des Gebäudes Zentral auf Aus geschaltet werden.</text:span></text:p>
      <text:p text:style-name="P183">Beim Ein- und Aus- schalten bleibt der letzte Ausgangswert des Dimmers am Ausgang OUT erhalten, lediglich ein FALSE am Ausgang Q schaltet das Leuchtmittel ab, und TRUE am Ausgang Q schaltet das Leuchtmittel wieder ein. Beim Einschalten durch einen kurzen Tastendruck limitiert der Baustein den Ausgang OUT auf mindestens MIN_ON und maximal MAX_ON. Steht z.B. der Dimmer auf 0 so setzt der Baustein den Ausgang OUT automatisch auf 50 und umgekehrt wird der Ausgang OUT falls er höher als MAX_ON steht auf MAX_ON begrenzt. Diese Parameter sollen verhindern das nach dem Einschalten ein sehr kleiner Wert am Ausgang OUT anliegt und trotz aktiven Q kein Licht angeht. Es wird durch den Parameter MIN_ON ein minimaler Leuchtwert beim Einschalten vorgegeben. Umgekehrt kann z.B: bei Schlafzimmern verhindert werden das beim Einschalten sofort volle Leuchtstärke anliegt. Wird der Parameter SOFT_DIMM auf TRUE gesetzt, so beginnt das DIMMEN beim Einschalten mit langem Tastendruck immer bei 0. zusätzlich zur Funktion des Dimmers wird am Eingang IN ein Doppelklick dekodiert der den Ausgang DBL für einen Zyklus auf TRUE setzt. Wird die Setup Variable DBL_TOGGLE auf TRUE gesetzt so wird der Ausgang DBL bei jedem Doppelklick invertiert. Der Ausgang DBL kann benutzt werden um zusätzliche Verbraucher oder Ereignisse mit einem Doppelklick zu schalten. Der Ausgang DBL kann auch auf den Eingang SET gelegt werden und der Dimmer mittels eines Doppelklicks auf einen durch VAL vordefinierten Wert gesetzt werden. OUT ist der Wert des Dimmers und wird als I/O Variable extern definiert. dies hat den Vorteil das der Wert des Dimmers jederzeit extern beeinflusst werden kann und auch nach enem Stromausfall wieder rekonstruiert werden kann. OUT kann auf Wunsch Remanent und Persistent definiert werden. </text:p>
      <text:p text:style-name="P183">Die folgende Tabelle zeigt die Betriebszustände des Dimmers:</text:p>
      <table:table table:name="Tabelle49" table:style-name="Tabelle49">
        <table:table-column table:style-name="Tabelle49.A"/>
        <table:table-column table:style-name="Tabelle49.B"/>
        <table:table-column table:style-name="Tabelle49.C"/>
        <table:table-column table:style-name="Tabelle49.D"/>
        <table:table-column table:style-name="Tabelle49.E"/>
        <table:table-column table:style-name="Tabelle49.F"/>
        <table:table-column table:style-name="Tabelle49.G"/>
        <text:soft-page-break/>
        <table:table-row>
          <table:table-cell table:style-name="Tabelle49.A1" office:value-type="string">
            <text:p text:style-name="P145">IN</text:p>
          </table:table-cell>
          <table:table-cell table:style-name="Tabelle49.A1" office:value-type="string">
            <text:p text:style-name="P145">SET</text:p>
          </table:table-cell>
          <table:table-cell table:style-name="Tabelle49.A1" office:value-type="string">
            <text:p text:style-name="P145">RST</text:p>
          </table:table-cell>
          <table:table-cell table:style-name="Tabelle49.A1" office:value-type="string">
            <text:p text:style-name="P145">Q</text:p>
          </table:table-cell>
          <table:table-cell table:style-name="Tabelle49.A1" office:value-type="string">
            <text:p text:style-name="P145">DIR</text:p>
          </table:table-cell>
          <table:table-cell table:style-name="Tabelle49.A1" office:value-type="string">
            <text:p text:style-name="P145">DBL</text:p>
          </table:table-cell>
          <table:table-cell table:style-name="Tabelle49.G1" office:value-type="string">
            <text:p text:style-name="P145">OUT</text:p>
          </table:table-cell>
        </table:table-row>
        <table:table-row>
          <table:table-cell table:style-name="Tabelle49.A2" office:value-type="string">
            <text:p text:style-name="P146">single</text:p>
          </table:table-cell>
          <table:table-cell table:style-name="Tabelle49.B2" office:value-type="float" office:value="0">
            <text:p text:style-name="P144">0</text:p>
          </table:table-cell>
          <table:table-cell table:style-name="Tabelle49.B2" office:value-type="float" office:value="0">
            <text:p text:style-name="P144">0</text:p>
          </table:table-cell>
          <table:table-cell table:style-name="Tabelle49.A2" office:value-type="string">
            <text:p text:style-name="P144">NOT Q</text:p>
          </table:table-cell>
          <table:table-cell table:style-name="Tabelle49.A2" office:value-type="string">
            <text:p text:style-name="P144">OUT&lt;127</text:p>
          </table:table-cell>
          <table:table-cell table:style-name="Tabelle49.A2" office:value-type="string">
            <text:p text:style-name="P144">-</text:p>
          </table:table-cell>
          <table:table-cell table:style-name="Tabelle49.G2" office:value-type="string">
            <text:p text:style-name="P144">LIMIT(MIN_ON,OUT,MAX_ON)</text:p>
          </table:table-cell>
        </table:table-row>
        <table:table-row>
          <table:table-cell table:style-name="Tabelle49.A2" office:value-type="string">
            <text:p text:style-name="P146">double</text:p>
          </table:table-cell>
          <table:table-cell table:style-name="Tabelle49.B2" office:value-type="float" office:value="0">
            <text:p text:style-name="P144">0</text:p>
          </table:table-cell>
          <table:table-cell table:style-name="Tabelle49.B2" office:value-type="float" office:value="0">
            <text:p text:style-name="P144">0</text:p>
          </table:table-cell>
          <table:table-cell table:style-name="Tabelle49.A2" office:value-type="string">
            <text:p text:style-name="P144">-</text:p>
          </table:table-cell>
          <table:table-cell table:style-name="Tabelle49.A2" office:value-type="string">
            <text:p text:style-name="P144">-</text:p>
          </table:table-cell>
          <table:table-cell table:style-name="Tabelle49.A2" office:value-type="string">
            <text:p text:style-name="P144">TOG</text:p>
            <text:p text:style-name="P144">PULSE</text:p>
          </table:table-cell>
          <table:table-cell table:style-name="Tabelle49.G2" office:value-type="string">
            <text:p text:style-name="P144"/>
          </table:table-cell>
        </table:table-row>
        <table:table-row>
          <table:table-cell table:style-name="Tabelle49.A2" office:value-type="string">
            <text:p text:style-name="P146">long</text:p>
          </table:table-cell>
          <table:table-cell table:style-name="Tabelle49.B2" office:value-type="float" office:value="0">
            <text:p text:style-name="P144">0</text:p>
          </table:table-cell>
          <table:table-cell table:style-name="Tabelle49.B2" office:value-type="float" office:value="0">
            <text:p text:style-name="P144">0</text:p>
          </table:table-cell>
          <table:table-cell table:style-name="Tabelle49.A2" office:value-type="string">
            <text:p text:style-name="P144">ON</text:p>
          </table:table-cell>
          <table:table-cell table:style-name="Tabelle49.A2" office:value-type="string">
            <text:p text:style-name="P144">NOT DIR</text:p>
          </table:table-cell>
          <table:table-cell table:style-name="Tabelle49.A2" office:value-type="string">
            <text:p text:style-name="P144">-</text:p>
          </table:table-cell>
          <table:table-cell table:style-name="Tabelle49.G2" office:value-type="string">
            <text:p text:style-name="P144"><text:span text:style-name="T2">Ramp</text:span> <text:span text:style-name="T2">up</text:span> <text:span text:style-name="T2">or</text:span> <text:span text:style-name="T2">down</text:span> <text:span text:style-name="T2">depending</text:span> <text:span text:style-name="T2">on</text:span> DIR</text:p>
            <text:p text:style-name="P144"><text:span text:style-name="T2">start</text:span> <text:span text:style-name="T2">at</text:span> 0 <text:span text:style-name="T2">when</text:span> soft_dimm = TRUE <text:span text:style-name="T2">and</text:span> Q = 0</text:p>
            <text:p text:style-name="P144"><text:span text:style-name="T2">reverse</text:span> <text:span text:style-name="T2">direction</text:span> if 0 <text:span text:style-name="T2">or</text:span> 255 <text:span text:style-name="T2">is</text:span> <text:span text:style-name="T2">reached</text:span></text:p>
          </table:table-cell>
        </table:table-row>
        <table:table-row>
          <table:table-cell table:style-name="Tabelle49.A2" office:value-type="string">
            <text:p text:style-name="P146">-</text:p>
          </table:table-cell>
          <table:table-cell table:style-name="Tabelle49.B2" office:value-type="float" office:value="1">
            <text:p text:style-name="P144">1</text:p>
          </table:table-cell>
          <table:table-cell table:style-name="Tabelle49.B2" office:value-type="float" office:value="0">
            <text:p text:style-name="P144">0</text:p>
          </table:table-cell>
          <table:table-cell table:style-name="Tabelle49.A2" office:value-type="string">
            <text:p text:style-name="P144">ON</text:p>
          </table:table-cell>
          <table:table-cell table:style-name="Tabelle49.A2" office:value-type="string">
            <text:p text:style-name="P144">OUT&lt;127</text:p>
          </table:table-cell>
          <table:table-cell table:style-name="Tabelle49.A2" office:value-type="string">
            <text:p text:style-name="P144">-</text:p>
          </table:table-cell>
          <table:table-cell table:style-name="Tabelle49.G2" office:value-type="string">
            <text:p text:style-name="P144">VAL</text:p>
          </table:table-cell>
        </table:table-row>
        <table:table-row>
          <table:table-cell table:style-name="Tabelle49.A2" office:value-type="string">
            <text:p text:style-name="P146">-</text:p>
          </table:table-cell>
          <table:table-cell table:style-name="Tabelle49.B2" office:value-type="float" office:value="0">
            <text:p text:style-name="P144">0</text:p>
          </table:table-cell>
          <table:table-cell table:style-name="Tabelle49.B2" office:value-type="float" office:value="1">
            <text:p text:style-name="P144">1</text:p>
          </table:table-cell>
          <table:table-cell table:style-name="Tabelle49.A2" office:value-type="string">
            <text:p text:style-name="P144">OFF</text:p>
          </table:table-cell>
          <table:table-cell table:style-name="Tabelle49.A2" office:value-type="string">
            <text:p text:style-name="P144">UP</text:p>
          </table:table-cell>
          <table:table-cell table:style-name="Tabelle49.A2" office:value-type="string">
            <text:p text:style-name="P144">OFF</text:p>
          </table:table-cell>
          <table:table-cell table:style-name="Tabelle49.G2" office:value-type="string">
            <text:p text:style-name="P144">0 wenn RST_OUT = TRUE</text:p>
          </table:table-cell>
        </table:table-row>
      </table:table>
      <text:p text:style-name="P183"/>
      <text:list xml:id="list38459935" text:continue-numbering="true" text:style-name="L1">
        <text:list-item>
          <text:list>
            <text:list-item>
              <text:h text:style-name="P216" text:outline-level="2"><text:alphabetical-index-mark-start text:id="IMark225941772"/>F_LAMP<text:alphabetical-index-mark-end text:id="IMark225941772"/></text:h>
            </text:list-item>
          </text:list>
        </text:list-item>
      </text:list>
      <text:p text:style-name="P2">Type<text:tab/><text:span text:style-name="T11">Funktionsbaustein</text:span></text:p>
      <text:p text:style-name="P66"><text:span text:style-name="T16">Input</text:span><text:span text:style-name="T21"><text:tab/>SWITCH : BOOL (Schalteingang vom Dimmer)</text:span></text:p>
      <text:p text:style-name="P73"><text:tab/>DIMM : BYTE (Eingang vom Dimmer)</text:p>
      <text:p text:style-name="P73"><text:tab/>RST : BOOL (Eingang zum Rücksetzen des Zählers)</text:p>
      <text:p text:style-name="P73">Output<text:tab/>LAMP : BYTE (Dimmer Ausgang)</text:p>
      <text:p text:style-name="P73">IO<text:tab/>ONTIME : UDINT (Betriebszeit in Sekunden)</text:p>
      <text:p text:style-name="P73">IO<text:tab/>CYCLES : UDINT (Anzahl der Schaltzyklen des Leuchtmittels)</text:p>
      <text:p text:style-name="P73">Config<text:tab/>T_NO_DIMM : UINT (Sperrzeit für Dimmer in Stunden)</text:p>
      <text:p text:style-name="P66"><text:span text:style-name="T21"><text:tab/>T_</text:span><text:span text:style-name="T16">Maintenance</text:span><text:span text:style-name="T21"> : UINT (Meldezeit für Lampenwechsel in </text:span></text:p>
      <text:p text:style-name="P183"><draw:frame draw:style-name="fr3" draw:name="Grafik273" text:anchor-type="paragraph" svg:x="1.023cm" svg:y="0.75cm" svg:width="4.09cm" svg:height="2.709cm" draw:z-index="728"><draw:image xlink:href="Pictures/1000000000000135000000CD4D0D15D3.png" xlink:type="simple" xlink:show="embed" xlink:actuate="onLoad"/></draw:frame><text:tab/>Stunden)</text:p>
      <text:p text:style-name="P66"><text:span text:style-name="T21"><text:line-break/>F_LAMP ist ein Lampeninterface für Leuchtstofflampen. Der Ausgang LAMP folgt dem Eingang DIMM und SWITCH. Wenn Dimm nicht beschaltet wird ist die Vorgabe 255 und der Ausgang LAMP schaltet zwischen 0 und 255 abhängig von SWITCH. Die Ausgänge ONTIME und CYCLES zählen die Be</text:span><text:soft-page-break/><text:span text:style-name="T21">triebszeit des Leuchtmittels in Sekunden und die Schaltzyklen. Beide Werte </text:span><text:span text:style-name="T19">werden extern</text:span><text:span text:style-name="T21"> gespeichert und können </text:span><text:span text:style-name="T19"><text:s/></text:span><text:span text:style-name="T16">Remanent</text:span><text:span text:style-name="T19"> oder Persistent </text:span><text:span text:style-name="T21">gespeichert werden, weitere Infos hierzu finden Sie beim Baustein ONTIME. Ein TRUE am Eingang RST setzt diese beiden Werte auf 0 zurück. Mit der Config-Variablen T_NO_DIMM wird festgelegt, nach welcher Betriebsdauer </text:span><text:span text:style-name="T21">eines neuen Leuchtmittels mit dem Dimmen begonnen werden darf. Die</text:span><text:span text:style-name="T21">ser Wert ist, wenn er nicht vom Anwender anders eingestellt wird, auf 100 Stunden voreingestellt. Leuchtstofflampen dürfen während der ersten 100 Betriebsstunden nicht </text:span><text:span text:style-name="T19">in Ihrer Leuchtkraft reduziert</text:span><text:span text:style-name="T21"> werden, sonst wird Ihre Lebensdauer drastisch verkürzt. Durch einen RST beim Lampenwechsel verhindert dieser Baustein das Dimmen in der Anfangsphase. Der Ausgang Status ist ESR kompatibel und kann Betriebszustände melden, aber auch eine Meldung zum Lampenwechsel absetzen. Die <text:s/>voreingestellte Zeit für T_MAINTENANCE beträgt, falls vom Anwender nicht anders eingestellt, 15000 Stunden. Wird T_</text:span><text:span text:style-name="T16">Maintenance</text:span><text:span text:style-name="T21"> auf 0 gesetzt so wird keine Meldung zum Lampenwechsel generiert.</text:span></text:p>
      <table:table table:name="Tabelle7" table:style-name="Tabelle7">
        <table:table-column table:style-name="Tabelle7.A"/>
        <table:table-column table:style-name="Tabelle7.B"/>
        <table:table-row table:style-name="Tabelle7.1">
          <table:table-cell table:style-name="Tabelle7.A1" office:value-type="string">
            <text:p text:style-name="P62">Status</text:p>
          </table:table-cell>
          <table:table-cell table:style-name="Tabelle7.B1" office:value-type="string">
            <text:p text:style-name="P63"/>
          </table:table-cell>
        </table:table-row>
        <table:table-row table:style-name="Tabelle7.1">
          <table:table-cell table:style-name="Tabelle7.A2" office:value-type="string">
            <text:p text:style-name="P62">110</text:p>
          </table:table-cell>
          <table:table-cell table:style-name="Tabelle7.B2" office:value-type="string">
            <text:p text:style-name="P62">Lampe ausgeschaltet</text:p>
          </table:table-cell>
        </table:table-row>
        <table:table-row table:style-name="Tabelle7.1">
          <table:table-cell table:style-name="Tabelle7.A2" office:value-type="string">
            <text:p text:style-name="P62">111</text:p>
          </table:table-cell>
          <table:table-cell table:style-name="Tabelle7.B2" office:value-type="string">
            <text:p text:style-name="P62">Lampe eingeschaltet Dimmen nicht erlaubt</text:p>
          </table:table-cell>
        </table:table-row>
        <table:table-row table:style-name="Tabelle7.1">
          <table:table-cell table:style-name="Tabelle7.A2" office:value-type="string">
            <text:p text:style-name="P62">112</text:p>
          </table:table-cell>
          <table:table-cell table:style-name="Tabelle7.B2" office:value-type="string">
            <text:p text:style-name="P62">Lampe eingeschaltet Dimmen erlaubt</text:p>
          </table:table-cell>
        </table:table-row>
        <table:table-row table:style-name="Tabelle7.1">
          <table:table-cell table:style-name="Tabelle7.A2" office:value-type="string">
            <text:p text:style-name="P62">120</text:p>
          </table:table-cell>
          <table:table-cell table:style-name="Tabelle7.B2" office:value-type="string">
            <text:p text:style-name="P62">Aufforderung zum Lampenwechsel</text:p>
          </table:table-cell>
        </table:table-row>
      </table:table>
      <text:p text:style-name="P73"/>
      <text:p text:style-name="P183"><draw:frame draw:style-name="fr3" draw:name="Grafik274" text:anchor-type="paragraph" svg:x="1.025cm" svg:y="1.175cm" svg:width="15.998cm" svg:height="2.709cm" draw:z-index="729"><draw:image xlink:href="Pictures/100000000000026000000067DDD434ED.png" xlink:type="simple" xlink:show="embed" xlink:actuate="onLoad"/></draw:frame>Das folgende Beispiel zeigt die Anwendung des Bausteins F_LAMP in Verbindung mit DIMM_I:</text:p>
      <text:p text:style-name="P183"/>
      <text:p text:style-name="P183"/>
      <text:p text:style-name="P183"/>
      <text:p text:style-name="P183"/>
      <text:list xml:id="list38464998" text:continue-numbering="true" text:style-name="L1">
        <text:list-item>
          <text:list>
            <text:list-item>
              <text:h text:style-name="P216" text:outline-level="2"><text:soft-page-break/><text:alphabetical-index-mark-start text:id="IMark225941772"/>PULSE_LENGTH<text:alphabetical-index-mark-end text:id="IMark225941772"/></text:h>
            </text:list-item>
          </text:list>
        </text:list-item>
      </text:list>
      <text:p text:style-name="P2">Type<text:tab/><text:span text:style-name="T11">Funktionsbaustein</text:span></text:p>
      <text:p text:style-name="P66"><text:span text:style-name="T16">Input</text:span><text:span text:style-name="T21"><text:tab/>IN : BOOL (Eingangspuls)</text:span></text:p>
      <text:p text:style-name="P73">Output<text:tab/>SHORT : BOOL (Puls wenn IN &lt; T_SHORT)</text:p>
      <text:p text:style-name="P73"><text:tab/>MIDDLE : BOOL (Puls wenn IN =&lt; T_LONG und IN &gt;= T_SHORT)</text:p>
      <text:p text:style-name="P73"><text:tab/>LONG : BOOL (TRUE wenn IN &gt; T_SHORT)</text:p>
      <text:p text:style-name="P73">Config<text:tab/>T_SHORT : TIME (Maximale Länge für kurzen Puls)</text:p>
      <text:p text:style-name="P66"><draw:frame draw:style-name="fr3" draw:name="Grafik284" text:anchor-type="paragraph" svg:x="1.214cm" svg:y="0.663cm" svg:width="3.18cm" svg:height="2.2cm" draw:z-index="237"><draw:image xlink:href="Pictures/10000000000000F0000000A6295BB749.png" xlink:type="simple" xlink:show="embed" xlink:actuate="onLoad"/></draw:frame><text:span text:style-name="T21"><text:tab/>T_</text:span><text:span text:style-name="T16">LONG</text:span><text:span text:style-name="T21"> : TIME (Minimale Länge für Langen Puls) </text:span></text:p>
      <text:p text:style-name="P73"><text:line-break/>PULSE_LENGTH setzt bei einem Eingangspuls an IN einen der 3 Ausgänge. Der Ausgang SHORT wird für einen Zyklus TRUE, wenn der Eingangspuls kleiner als T_SHORT ist. Der Ausgang MIDDLE wird für einen Zyklus TRUE, wenn der Eingangspuls zwischen T_SHORT und T_LONG lang ist. Der Ausgang LONG wird gesetzt, sobald der Eingangsimpuls T_LONG überschritten hat und bleibt solange auf TRUE, wie der Eingangsimpuls auf TRUE bleibt.</text:p>
      <text:list xml:id="list38470313" text:continue-numbering="true" text:style-name="L1">
        <text:list-item>
          <text:list>
            <text:list-item>
              <text:h text:style-name="P216" text:outline-level="2"><text:alphabetical-index-mark-start text:id="IMark225941772"/>PULSE_T<text:alphabetical-index-mark-end text:id="IMark225941772"/></text:h>
            </text:list-item>
          </text:list>
        </text:list-item>
      </text:list>
      <text:p text:style-name="P2">Type<text:tab/><text:span text:style-name="T11">Funktionsbaustein</text:span></text:p>
      <text:p text:style-name="P66"><text:span text:style-name="T16">Input</text:span><text:span text:style-name="T21"><text:tab/>IN : BOOL (Eingangspuls)</text:span></text:p>
      <text:p text:style-name="P73"><draw:frame draw:style-name="fr3" draw:name="Grafik666" text:anchor-type="paragraph" svg:x="1.002cm" svg:y="0.667cm" svg:width="2.499cm" svg:height="2.311cm" draw:z-index="657"><draw:image xlink:href="Pictures/10000000000000BD000000AFB03493E8.png" xlink:type="simple" xlink:show="embed" xlink:actuate="onLoad"/></draw:frame>Output<text:tab/>Q : BOOL (Ausgangspuls)</text:p>
      <text:p text:style-name="P183"><text:line-break/>PULSE_T erzeugt einen Ausgangsimpuls der Länge T2 wenn der Eingang IN kürzer als T1 auf TRUE geht. Bleibt der Eingang IN länger als T1 auf TRUE so folgt der Ausgang Q dem Eingang IN und geht zeitgleich mit IN wieder auf FALSE. Bleibt IN länger als die Zeit T2 auf TRUE wird der Ausgang nach Ablauf der Zeit T2 automatisch auf FALSE zurückgesetzt. Eine weiterer Im<text:soft-page-break/>puls an IN während der Ausgang TRUE ist setzt den Ausgang mit der fallenden Flanke von IN auf FALSE. liegt der Eingang IN länger als die Zeit T2 auf TRUE so wird der Ausgang Q nach Ablauf der Zeit T2 automatisch auf FALSE gesetzt.</text:p>
      <text:p text:style-name="P183"><draw:frame draw:style-name="fr3" draw:name="Grafik667" text:anchor-type="paragraph" svg:x="1.046cm" svg:y="3.397cm" svg:width="11.411cm" svg:height="3.3cm" draw:z-index="658"><draw:image xlink:href="Pictures/10000000000002CF000000D0595AACA4.png" xlink:type="simple" xlink:show="embed" xlink:actuate="onLoad"/></draw:frame>Das folgende Zeitdiagramm zeigt einen Eingangsimpuls der länger ist als T1 anliegt und den Ausgang Q der dem Eingang folgt. Anschließend wird am Eingang IN ein kurzer Puls (kürzer als T1) erzeugt und der Ausgang bleibt aktiv bis Ihn ein weiterer Impuls an IN wieder löscht. Ein weiterer kurzer Impuls am Eingang IN setzt den Ausgang auf TRUE bis dieser nach Ablauf der Zeit T2 selbsttätig gelöscht wird.</text:p>
      <text:p text:style-name="P183"/>
      <text:list xml:id="list38458848" text:continue-numbering="true" text:style-name="L1">
        <text:list-item>
          <text:list>
            <text:list-item>
              <text:h text:style-name="P216" text:outline-level="2"><text:alphabetical-index-mark-start text:id="IMark225941772"/>SW_RECONFIG<text:alphabetical-index-mark-end text:id="IMark225941772"/></text:h>
            </text:list-item>
          </text:list>
        </text:list-item>
      </text:list>
      <text:p text:style-name="P2">Type<text:tab/><text:span text:style-name="T11">Funktionsbaustein</text:span></text:p>
      <text:p text:style-name="P66"><text:span text:style-name="T16">Input</text:span><text:span text:style-name="T21"><text:tab/>IN : BOOL (Taster Eingang)</text:span></text:p>
      <text:p text:style-name="P73"><text:tab/>TD : TIME (Entprellzeit für den Eingang)</text:p>
      <text:p text:style-name="P73"><text:tab/>TR : TIME (Rekonfigurationszeit)</text:p>
      <text:p text:style-name="P73"><draw:frame draw:style-name="fr3" draw:name="Grafik103" text:anchor-type="paragraph" svg:x="1.002cm" svg:y="0.658cm" svg:width="2.9cm" svg:height="1.921cm" draw:z-index="733"><draw:image xlink:href="Pictures/10000000000000DB00000091146119EC.png" xlink:type="simple" xlink:show="embed" xlink:actuate="onLoad"/></draw:frame>Output<text:tab/>Q : BOOL (Schaltausgang)</text:p>
      <text:p text:style-name="P183"><text:line-break/>SW_RECONFIG ist ein intelligentes Taster Interface, es kann den Eingang entprellen und erkennt selbständig ob ein Öffner oder Schließer am Eingang IN angeschlossen ist. Wird am Eingang IN ein Öffner erkannt, so wird der Ausgang Q invertiert. Wird am Eingang IN ein Schalter angeschlossen, so erzeugt der Baustein bei jedem Zustandswechsel des Schalters einen Puls mit der Länge TR. TD ist die Entprellzeit und TR die Rekonfigurationszeit. immer Dann wenn der Eingang IN länger als die Rekonfigurationzeit in einem Zustand bleibt geht der Ausgang auf FALSE und wird somit beim <text:soft-page-break/>nächsten Impuls an Eingang in einen High aktiven Impuls ausgeben. In der praktischen Installationstechnik kann dies von großem Vorteil sein wenn Schalter manchmal als Öffner und manchmal als Schließer angeschlossen sind.</text:p>
      <text:p text:style-name="P183"><draw:frame draw:style-name="fr3" draw:name="Grafik715" text:anchor-type="paragraph" svg:x="1.067cm" svg:y="0.697cm" svg:width="14.131cm" svg:height="4.009cm" draw:z-index="769"><draw:image xlink:href="Pictures/100000000000042C0000012F5B54DF61.png" xlink:type="simple" xlink:show="embed" xlink:actuate="onLoad"/></draw:frame>Die folgende Grafik verdeutlicht die Funktionsweise des Bausteins:</text:p>
      <text:p text:style-name="P37"/>
      <text:list xml:id="list38462630" text:continue-numbering="true" text:style-name="L1">
        <text:list-item>
          <text:list>
            <text:list-item>
              <text:h text:style-name="P216" text:outline-level="2"><text:alphabetical-index-mark-start text:id="IMark225941772"/>SWITCH_I<text:alphabetical-index-mark-end text:id="IMark225941772"/></text:h>
            </text:list-item>
          </text:list>
        </text:list-item>
      </text:list>
      <text:p text:style-name="P2">Type<text:tab/><text:span text:style-name="T11">Funktionsbaustein</text:span></text:p>
      <text:p text:style-name="P66"><text:span text:style-name="T16">Input</text:span><text:span text:style-name="T21"><text:tab/>SET : BOOL (Eingang zum Einschalten des Ausgangs auf 100%)</text:span></text:p>
      <text:p text:style-name="P73"><text:tab/>IN : BOOL (Steuereingang für Taster)</text:p>
      <text:p text:style-name="P73"><text:tab/>RST : BOOL (Eingang zum Ausschalten des Ausgangs)</text:p>
      <text:p text:style-name="P73">Output<text:tab/>Q : BOOL (Schaltausgang)</text:p>
      <text:p text:style-name="P73">Config<text:tab/>T_DEBOUNCE : TIME (Entprellzeit für Taster)</text:p>
      <text:p text:style-name="P73"><text:tab/>T_RECONFIG : TIME (Rekonfigurationszeit)</text:p>
      <text:p text:style-name="P73"><draw:frame draw:style-name="fr3" draw:name="Grafik261" text:anchor-type="paragraph" svg:x="1.002cm" svg:y="0.646cm" svg:width="2.281cm" svg:height="2.2cm" draw:z-index="216"><draw:image xlink:href="Pictures/10000000000000AC000000A605E8BC26.png" xlink:type="simple" xlink:show="embed" xlink:actuate="onLoad"/></draw:frame><text:tab/>T_ON_MAX : TIME (Einschaltbegrenzung)</text:p>
      <text:p text:style-name="P173"><text:span text:style-name="T21"><text:line-break/>SWITCH_I ist ein intelligenter Schalter der sich selbsttätig auf den angeschlossenen Taster oder Schalter einstellt. Wird ein Schalter angeschlossen, so folgt der Ausgang jeder Schaltflanke des Schalters. Wird jedoch ein </text:span><text:span text:style-name="T21">Taster angeschlossen, so erkennt SWITCH_I selbst, ob es ein Öffner oder Schließer ist und wertet dann nur die jeweils erste Flanke aus. Die Config-Variable T_ON_MAX legt fest, nach welcher Zeit der Ausgang automatisch wieder ausgeschaltet werden soll. Mit den Eingängen SET und RST kann </text:span><text:span text:style-name="T21">der </text:span><text:soft-page-break/><text:span text:style-name="T21">Aus</text:span><text:span text:style-name="T21">gang jederzeit auf 100% ein oder ausgeschaltet werden. Anwendungsbeispiele sind die Meldung von Rauchmeldern oder Alarmanlagen. Die Zeit T_DEBOUNCE dient zum Entprellen des Tasters und ist standardmäßig auf 10ms eingestellt. Die Zeit T_RECONFIG wird verwendet, um zu </text:span><text:span text:style-name="T21">entscheiden, </text:span><text:span text:style-name="T21">ob ein Schließer oder Öffner am Eingang IN angeschlossen </text:span><text:span text:style-name="T21">ist. Bleibt der Eingang länger als diese Zeit in einem Zustand, so wird dies als Ruhestellung angenommen. </text:span></text:p>
      <text:list xml:id="list38480484" text:continue-numbering="true" text:style-name="L1">
        <text:list-item>
          <text:list>
            <text:list-item>
              <text:h text:style-name="P216" text:outline-level="2"><text:alphabetical-index-mark-start text:id="IMark225941772"/><text:alphabetical-index-mark-start text:id="IMark228074036"/>SWITCH_X<text:alphabetical-index-mark-end text:id="IMark228074036"/><text:alphabetical-index-mark-end text:id="IMark225941772"/></text:h>
            </text:list-item>
          </text:list>
        </text:list-item>
      </text:list>
      <text:p text:style-name="P2">Type<text:tab/><text:span text:style-name="T11">Funktionsbaustein</text:span></text:p>
      <text:p text:style-name="P66"><text:span text:style-name="T16">Input</text:span><text:span text:style-name="T21"><text:tab/>IN1..6 : BOOL (Taster Eingänge)</text:span></text:p>
      <text:p text:style-name="P73">Output<text:tab/>QX : BOOL (Schaltausgänge)</text:p>
      <text:p text:style-name="P73"><draw:frame draw:style-name="fr3" draw:name="Grafik285" text:anchor-type="paragraph" svg:x="1.212cm" svg:y="0.64cm" svg:width="2.281cm" svg:height="7.14cm" draw:z-index="238"><draw:image xlink:href="Pictures/10000000000000AC0000021C6B9CE65D.png" xlink:type="simple" xlink:show="embed" xlink:actuate="onLoad"/></draw:frame>Config<text:tab/>T_DEBOUNCE : TIME (Entprellzeit für Taster)</text:p>
      <text:p text:style-name="P183"><text:line-break/>SWITCH_X ist ein Interface für bis zu 6 Taster. Die einzelnen Taster werden mit der Entprellzeit T_DEBOUNCE entprellt und schalten die jeweiligen Ausgänge Q1 bis Q6. IN3 bis IN6 werden direkt auf die Ausgänge geschaltet, wenn sie alleine betätigt werden. IN1 und IN2 erzeugen einen Puls für einen Zyklus nachdem sie betätigt wurden. Wird während IN1 oder IN2 betätigt ist, einer der Eingänge IN3 bis IN 6 betätigt, so wird kein Ausgangsimpuls an Q1 bis Q6 erzeugt, sondern es wird der entsprechende Ausgang Q31 bis Q62 aktiviert. Q42 wird zum Beispiel dann aktiviert, wenn IN4 betätigt wird, während IN2 betätigt ist. Q2 und Q4 werden dann nicht aktiv.</text:p>
      <text:p text:style-name="P183"><text:soft-page-break/>SWITCH_X erlaubt es also auf den Eingängen IN3 bis IN6 eine Dreifachbelegung zu Realisieren und diese durch Betätigen von IN1 oder IN2 und einem weiteren Eingang auszuwählen.</text:p>
      <text:list xml:id="list38478716" text:continue-numbering="true" text:style-name="L1">
        <text:list-item>
          <text:list>
            <text:list-item>
              <text:h text:style-name="P216" text:outline-level="2"><text:alphabetical-index-mark-start text:id="IMark225941772"/>TIMER<text:span text:style-name="T27">_</text:span>1<text:alphabetical-index-mark-end text:id="IMark225941772"/></text:h>
            </text:list-item>
          </text:list>
        </text:list-item>
      </text:list>
      <text:p text:style-name="P2">Type<text:tab/><text:span text:style-name="T11">Funktionsbaustein</text:span></text:p>
      <text:p text:style-name="P66"><text:span text:style-name="T16">Input</text:span><text:span text:style-name="T21"><text:tab/>E : BOOL (</text:span><text:span text:style-name="T16">Enable</text:span><text:span text:style-name="T21"> Eingang)</text:span></text:p>
      <text:p text:style-name="P183"><text:tab/>DTI : DATE_TIME (Datum Zeit Eingang)</text:p>
      <text:p text:style-name="P73"><text:tab/>START : TOD (Startzeit)</text:p>
      <text:p text:style-name="P73"><text:tab/>DURATION : TIME (Zeitdauer des Ausgangssignals)</text:p>
      <text:p text:style-name="P73"><text:tab/>DAY : BYTE (Auswahl der Wochentage)</text:p>
      <text:p text:style-name="P73"><draw:frame draw:style-name="fr3" draw:name="Grafik262" text:anchor-type="paragraph" svg:x="1.023cm" svg:y="0.693cm" svg:width="3.69cm" svg:height="2.709cm" draw:z-index="740"><draw:image xlink:href="Pictures/1000000000000117000000CD2B374128.png" xlink:type="simple" xlink:show="embed" xlink:actuate="onLoad"/></draw:frame>Output<text:tab/>Q : BOOL (Schaltausgang)</text:p>
      <text:p text:style-name="P176"><text:span text:style-name="T21"><text:line-break/>TIMER_1 erzeugt an selektierbaren Tagen der Woche ein Ausgangsereignis Q mit einer programmierbaren Dauer (DURATION) und festgelegter Anfangszeit START. DTI liefert dem Baustein die Lokalzeit. START und DURATION legt die Tageszeit und die Dauer des Ereignisses fest. Der Eingang DAY legt fest, an welchen Wochentagen das Ereignis erzeugt wird. Wird DAY auf 0 gesetzt, so kein Ereignis erzeugt. Eine DURATION = 0 legt fest, dass das Ausgangssignal nur für einen Zyklus gesetzt wird. Das erzeugte Ausgangssignal kann auch über Mitternacht verlaufen, oder es kann auch länger als einen Tag sein. Die maximale Impulsdauer liegt jedoch bei 49 tagen (T#49d). Der Eingang DAY ist vom Typ BYTE und die Bits 0..7 legen die Tage des Ereignisses Fest. Bit 0 entspricht Sonntag, Bit 1 Samstag .. Bit 6 entspricht Montag. Werden die Bits 0..6 in DAY gesetzt so wird jeden Tag ein Ereignis erzeugt, ansonsten nur für diejenigen Tage, für die das entsprechende Bit gesetzt ist. Der Eingang </text:span><text:span text:style-name="T16">Default</text:span><text:span text:style-name="T21"> ist wenn er nicht beschaltet wird auf 2#0111_1111 gesetzt und somit ist der Baustein für je</text:span><text:span text:style-name="T21">den Tag aktiv. Ein zusätzlicher </text:span><text:span text:style-name="T16">Enable</text:span><text:span text:style-name="T21"> Eingang E kann den Baustein Freischalten Dieser Eingang ist TRUE wenn er nicht beschaltet wird.</text:span></text:p>
      <text:list xml:id="list38451658" text:continue-numbering="true" text:style-name="L1">
        <text:list-item>
          <text:list>
            <text:list-item>
              <text:h text:style-name="P216" text:outline-level="2"><text:soft-page-break/><text:alphabetical-index-mark-start text:id="IMark225941772"/>TIMER_2<text:alphabetical-index-mark-end text:id="IMark225941772"/></text:h>
            </text:list-item>
          </text:list>
        </text:list-item>
      </text:list>
      <text:p text:style-name="P2">Type<text:tab/><text:span text:style-name="T11">Funktionsbaustein</text:span></text:p>
      <text:p text:style-name="P66"><text:span text:style-name="T16">Input</text:span><text:span text:style-name="T21"><text:tab/>DT_IN : DATE_TIME (Datum Zeit Eingang)</text:span></text:p>
      <text:p text:style-name="P73"><text:tab/>START_TIME : TOD (Startzeit)</text:p>
      <text:p text:style-name="P73"><text:tab/>DURATION : TIME (Zeitdauer des Ausgangssignals)</text:p>
      <text:p text:style-name="P73"><text:tab/>START_DAY : INT (Wochentag des Ereignisses, 1= Montag)</text:p>
      <text:p text:style-name="P73"><draw:frame draw:style-name="fr3" draw:name="Grafik263" text:anchor-type="paragraph" svg:x="1cm" svg:y="1.101cm" svg:width="3.62cm" svg:height="3.099cm" draw:z-index="217"><draw:image xlink:href="Pictures/1000000000000112000000EA5595A5E4.png" xlink:type="simple" xlink:show="embed" xlink:actuate="onLoad"/></draw:frame>Output<text:tab/> Q : BOOL (Schaltausgang)</text:p>
      <text:p text:style-name="P73"><text:line-break/>TIMER_2 erzeugt ein Ausgangsereignis mit einer programmierbaren Dauer. DT_IN liefert dem Baustein die Lokalzeit. START_TIME und DURATION legt die Tageszeit und die Dauer des Ereignisses fest. Der Eingang Mode legt fest, wie oft und an welchem Tagen das Ereignis erzeugt werden soll. HOLIDAY ist ein Eingangssignal, das anzeigt ob der aktuelle Tag ein Feiertag ist. Dieses Signal kann vom Baustein HOLIDAY erzeugt werden.</text:p>
      <table:table table:name="Tabelle6" table:style-name="Tabelle6">
        <table:table-column table:style-name="Tabelle6.A"/>
        <table:table-column table:style-name="Tabelle6.B"/>
        <table:table-row table:style-name="Tabelle6.1">
          <table:table-cell table:style-name="Tabelle6.A1" office:value-type="string">
            <text:p text:style-name="P60">MODE</text:p>
          </table:table-cell>
          <table:table-cell table:style-name="Tabelle6.B1" office:value-type="string">
            <text:p text:style-name="P59">Q</text:p>
          </table:table-cell>
        </table:table-row>
        <table:table-row table:style-name="Tabelle6.1">
          <table:table-cell table:style-name="Tabelle6.A2" office:value-type="string">
            <text:p text:style-name="P60">0</text:p>
          </table:table-cell>
          <table:table-cell table:style-name="Tabelle6.B2" office:value-type="string">
            <text:p text:style-name="P59">Es wird kein Ausgangssignal erzeugt</text:p>
          </table:table-cell>
        </table:table-row>
        <table:table-row table:style-name="Tabelle6.1">
          <table:table-cell table:style-name="Tabelle6.A2" office:value-type="string">
            <text:p text:style-name="P60">1</text:p>
          </table:table-cell>
          <table:table-cell table:style-name="Tabelle6.B2" office:value-type="string">
            <text:p text:style-name="P59">nur am Montag</text:p>
          </table:table-cell>
        </table:table-row>
        <table:table-row table:style-name="Tabelle6.1">
          <table:table-cell table:style-name="Tabelle6.A2" office:value-type="string">
            <text:p text:style-name="P60">2</text:p>
          </table:table-cell>
          <table:table-cell table:style-name="Tabelle6.B2" office:value-type="string">
            <text:p text:style-name="P59">nur am Dienstag</text:p>
          </table:table-cell>
        </table:table-row>
        <table:table-row table:style-name="Tabelle6.1">
          <table:table-cell table:style-name="Tabelle6.A2" office:value-type="string">
            <text:p text:style-name="P60">3</text:p>
          </table:table-cell>
          <table:table-cell table:style-name="Tabelle6.B2" office:value-type="string">
            <text:p text:style-name="P59">nur am Mittwoch</text:p>
          </table:table-cell>
        </table:table-row>
        <table:table-row table:style-name="Tabelle6.1">
          <table:table-cell table:style-name="Tabelle6.A2" office:value-type="string">
            <text:p text:style-name="P60">4</text:p>
          </table:table-cell>
          <table:table-cell table:style-name="Tabelle6.B2" office:value-type="string">
            <text:p text:style-name="P59">nur am Donnerstag</text:p>
          </table:table-cell>
        </table:table-row>
        <table:table-row table:style-name="Tabelle6.1">
          <table:table-cell table:style-name="Tabelle6.A2" office:value-type="string">
            <text:p text:style-name="P60">5</text:p>
          </table:table-cell>
          <table:table-cell table:style-name="Tabelle6.B2" office:value-type="string">
            <text:p text:style-name="P59">nur am Freitag</text:p>
          </table:table-cell>
        </table:table-row>
        <table:table-row table:style-name="Tabelle6.1">
          <table:table-cell table:style-name="Tabelle6.A2" office:value-type="string">
            <text:p text:style-name="P60">6</text:p>
          </table:table-cell>
          <table:table-cell table:style-name="Tabelle6.B2" office:value-type="string">
            <text:p text:style-name="P59">nur am Samstag</text:p>
          </table:table-cell>
        </table:table-row>
        <table:table-row table:style-name="Tabelle6.1">
          <table:table-cell table:style-name="Tabelle6.A2" office:value-type="string">
            <text:p text:style-name="P60">7</text:p>
          </table:table-cell>
          <table:table-cell table:style-name="Tabelle6.B2" office:value-type="string">
            <text:p text:style-name="P59">nur am Sonntag</text:p>
          </table:table-cell>
        </table:table-row>
        <table:table-row table:style-name="Tabelle6.1">
          <table:table-cell table:style-name="Tabelle6.A2" office:value-type="string">
            <text:p text:style-name="P60">11</text:p>
          </table:table-cell>
          <table:table-cell table:style-name="Tabelle6.B2" office:value-type="string">
            <text:p text:style-name="P59">jeden Tag</text:p>
          </table:table-cell>
        </table:table-row>
        <table:table-row table:style-name="Tabelle6.1">
          <table:table-cell table:style-name="Tabelle6.A2" office:value-type="string">
            <text:p text:style-name="P60">12</text:p>
          </table:table-cell>
          <table:table-cell table:style-name="Tabelle6.B2" office:value-type="string">
            <text:p text:style-name="P59">alle 2 Tage</text:p>
          </table:table-cell>
        </table:table-row>
        <table:table-row table:style-name="Tabelle6.1">
          <table:table-cell table:style-name="Tabelle6.A2" office:value-type="string">
            <text:p text:style-name="P60">13</text:p>
          </table:table-cell>
          <table:table-cell table:style-name="Tabelle6.B2" office:value-type="string">
            <text:p text:style-name="P59">alle 3 Tage</text:p>
          </table:table-cell>
        </table:table-row>
        <table:table-row table:style-name="Tabelle6.1">
          <table:table-cell table:style-name="Tabelle6.A2" office:value-type="string">
            <text:p text:style-name="P60">14</text:p>
          </table:table-cell>
          <table:table-cell table:style-name="Tabelle6.B2" office:value-type="string">
            <text:p text:style-name="P59">alle 4 Tage</text:p>
          </table:table-cell>
        </table:table-row>
        <table:table-row table:style-name="Tabelle6.1">
          <table:table-cell table:style-name="Tabelle6.A2" office:value-type="string">
            <text:p text:style-name="P60">15</text:p>
          </table:table-cell>
          <table:table-cell table:style-name="Tabelle6.B2" office:value-type="string">
            <text:p text:style-name="P59">alle 5 Tage</text:p>
          </table:table-cell>
        </table:table-row>
        <table:table-row table:style-name="Tabelle6.1">
          <table:table-cell table:style-name="Tabelle6.A2" office:value-type="string">
            <text:p text:style-name="P60">16</text:p>
          </table:table-cell>
          <table:table-cell table:style-name="Tabelle6.B2" office:value-type="string">
            <text:p text:style-name="P59">alle 6 Tage</text:p>
          </table:table-cell>
        </table:table-row>
        <table:table-row table:style-name="Tabelle6.1">
          <table:table-cell table:style-name="Tabelle6.A2" office:value-type="string">
            <text:p text:style-name="P60">20</text:p>
          </table:table-cell>
          <table:table-cell table:style-name="Tabelle6.B2" office:value-type="string">
            <text:p text:style-name="P59">Wochentage (Montag bis Freitag)</text:p>
          </table:table-cell>
        </table:table-row>
        <text:soft-page-break/>
        <table:table-row table:style-name="Tabelle6.1">
          <table:table-cell table:style-name="Tabelle6.A2" office:value-type="string">
            <text:p text:style-name="P60">21</text:p>
          </table:table-cell>
          <table:table-cell table:style-name="Tabelle6.B2" office:value-type="string">
            <text:p text:style-name="P59">Samstag und Sonntag</text:p>
          </table:table-cell>
        </table:table-row>
        <table:table-row table:style-name="Tabelle6.1">
          <table:table-cell table:style-name="Tabelle6.A2" office:value-type="string">
            <text:p text:style-name="P60">22</text:p>
          </table:table-cell>
          <table:table-cell table:style-name="Tabelle6.B2" office:value-type="string">
            <text:p text:style-name="P59">Arbeitstage (Wochentage ohne Feiertage)</text:p>
          </table:table-cell>
        </table:table-row>
        <table:table-row table:style-name="Tabelle6.1">
          <table:table-cell table:style-name="Tabelle6.A2" office:value-type="string">
            <text:p text:style-name="P60">23</text:p>
          </table:table-cell>
          <table:table-cell table:style-name="Tabelle6.B2" office:value-type="string">
            <text:p text:style-name="P59">Feiertage und Wochenende</text:p>
          </table:table-cell>
        </table:table-row>
        <table:table-row table:style-name="Tabelle6.1">
          <table:table-cell table:style-name="Tabelle6.A2" office:value-type="string">
            <text:p text:style-name="P60">24</text:p>
          </table:table-cell>
          <table:table-cell table:style-name="Tabelle6.B2" office:value-type="string">
            <text:p text:style-name="P59">Nur an Feiertagen</text:p>
          </table:table-cell>
        </table:table-row>
        <table:table-row table:style-name="Tabelle6.1">
          <table:table-cell table:style-name="Tabelle6.A2" office:value-type="string">
            <text:p text:style-name="P60">25</text:p>
          </table:table-cell>
          <table:table-cell table:style-name="Tabelle6.B2" office:value-type="string">
            <text:p text:style-name="P59">Erster Tag im Monat</text:p>
          </table:table-cell>
        </table:table-row>
        <table:table-row table:style-name="Tabelle6.1">
          <table:table-cell table:style-name="Tabelle6.A2" office:value-type="string">
            <text:p text:style-name="P60">26</text:p>
          </table:table-cell>
          <table:table-cell table:style-name="Tabelle6.B2" office:value-type="string">
            <text:p text:style-name="P59">Letzter Tag im Monat</text:p>
          </table:table-cell>
        </table:table-row>
        <table:table-row table:style-name="Tabelle6.1">
          <table:table-cell table:style-name="Tabelle6.A2" office:value-type="string">
            <text:p text:style-name="P60">27</text:p>
          </table:table-cell>
          <table:table-cell table:style-name="Tabelle6.B2" office:value-type="string">
            <text:p text:style-name="P59">Letzter Tag im Jahr (31. Dezember)</text:p>
          </table:table-cell>
        </table:table-row>
        <table:table-row table:style-name="Tabelle6.1">
          <table:table-cell table:style-name="Tabelle6.A2" office:value-type="string">
            <text:p text:style-name="P60">28</text:p>
          </table:table-cell>
          <table:table-cell table:style-name="Tabelle6.B2" office:value-type="string">
            <text:p text:style-name="P59">Erster Tag im Jahr (1. Januar)</text:p>
          </table:table-cell>
        </table:table-row>
      </table:table>
      <text:p text:style-name="P73"/>
      <text:p text:style-name="P21"><draw:frame draw:style-name="fr10" draw:name="Grafik280" text:anchor-type="paragraph" svg:x="0.982cm" svg:y="1.042cm" svg:width="15.87cm" svg:height="2.29cm" draw:z-index="233"><draw:image xlink:href="Pictures/100000000000039B00000085EAD6E83B.png" xlink:type="simple" xlink:show="embed" xlink:actuate="onLoad"/></draw:frame>Beispiel für die Anwendung von TIMER_2:</text:p>
      <text:p text:style-name="P75">Das Beispiel zeigt die System-Routine (in diesem Fall für einen Wago Controller), die die interne Uhr ausliest und DATE_TIME für TIMER_2 und HOLIDAY bereitstellt. HOLIDAY liefert die Feiertagsinformation an TIMER_2. TIMER_2 liefert in diesem Beispiel an Wochenenden (Samstag und Sonntag), sowie an Feiertagen (Mode = 22) ein Ausgangssignal jeweils um 12:00 Mittags für eine Dauer von 30 Minuten. TIMER_2 erzeugt limitiert von der Zykluszeit immer die exakte DURATION am Ausgang. TIMER_2 merkt sich an welchen Tag er den letzten Ausgangsimpuls erzeugt hat, so dass sichergestellt ist das nur ein Impuls pro Tag erzeugt wird.</text:p>
      <text:list xml:id="list38474219" text:continue-numbering="true" text:style-name="L1">
        <text:list-item>
          <text:list>
            <text:list-item>
              <text:h text:style-name="P216" text:outline-level="2"><text:alphabetical-index-mark-start text:id="IMark225941772"/>TIMER_EVENT_DECODE<text:alphabetical-index-mark-end text:id="IMark225941772"/></text:h>
            </text:list-item>
          </text:list>
        </text:list-item>
      </text:list>
      <text:p text:style-name="P2">Type<text:tab/><text:span text:style-name="T11">Funktion</text:span></text:p>
      <text:p text:style-name="P172"><text:span text:style-name="T16">Input</text:span><text:span text:style-name="T21"><text:tab/>EVENT : STRING (</text:span><text:span text:style-name="T16">Event</text:span><text:span text:style-name="T21"> Zeichenkette)</text:span></text:p>
      <text:p text:style-name="P185"><text:tab/>LANG : INT (Sprachauswahl)</text:p>
      <text:p text:style-name="P185"><draw:frame draw:style-name="fr3" draw:name="Grafik640" text:anchor-type="paragraph" svg:x="1.023cm" svg:y="0.676cm" svg:width="7.26cm" svg:height="1.39cm" draw:z-index="751"><draw:image xlink:href="Pictures/1000000000000225000000691580ACDC.png" xlink:type="simple" xlink:show="embed" xlink:actuate="onLoad"/></draw:frame>OUTPUT<text:tab/>TIMER_EVENT</text:p>
      <text:p text:style-name="P172"><text:span text:style-name="T21"><text:line-break/>TIMER_EVENT_DECODE erlaubt die Programmierung von </text:span><text:span text:style-name="T16">Timer</text:span><text:span text:style-name="T21"> Ereignissen mittels Zeichenkette anstelle des Ladens der Struktur TIMER_EVENT.</text:span></text:p>
      <text:p text:style-name="P185"><text:soft-page-break/>Die Ereignisse werden wie folgt spezifiziert:</text:p>
      <text:p text:style-name="P172"><text:span text:style-name="T21">&lt;Typ;Kanal;</text:span><text:span text:style-name="T16">Day</text:span><text:span text:style-name="T21">;Start;Dauer;Land;Lor&gt;</text:span></text:p>
      <table:table table:name="Tabelle40" table:style-name="Tabelle40">
        <table:table-column table:style-name="Tabelle40.A"/>
        <table:table-column table:style-name="Tabelle40.B"/>
        <table:table-column table:style-name="Tabelle40.C"/>
        <table:table-row>
          <table:table-cell table:style-name="Tabelle40.A1" office:value-type="string">
            <text:p text:style-name="P51">Element</text:p>
          </table:table-cell>
          <table:table-cell table:style-name="Tabelle40.A1" office:value-type="string">
            <text:p text:style-name="P51">Beschreibung</text:p>
          </table:table-cell>
          <table:table-cell table:style-name="Tabelle40.C1" office:value-type="string">
            <text:p text:style-name="P47">Formate</text:p>
          </table:table-cell>
        </table:table-row>
        <table:table-row>
          <table:table-cell table:style-name="Tabelle40.A2" office:value-type="string">
            <text:p text:style-name="P51">&lt; &gt;</text:p>
          </table:table-cell>
          <table:table-cell table:style-name="Tabelle40.A2" office:value-type="string">
            <text:p text:style-name="P51">Start und Stopp Zeichen des Datensatzes.</text:p>
          </table:table-cell>
          <table:table-cell table:style-name="Tabelle40.C2" office:value-type="string">
            <text:p text:style-name="P46"/>
          </table:table-cell>
        </table:table-row>
        <table:table-row>
          <table:table-cell table:style-name="Tabelle40.A2" office:value-type="string">
            <text:p text:style-name="P51">Typ</text:p>
          </table:table-cell>
          <table:table-cell table:style-name="Tabelle40.A2" office:value-type="string">
            <text:p text:style-name="P51">Typ des Ereignisses (siehe Beschreibung in TIMER_P4)</text:p>
          </table:table-cell>
          <table:table-cell table:style-name="Tabelle40.C2" office:value-type="string">
            <text:p text:style-name="P48">'123', 2#0101, 8#33, 16#FF</text:p>
          </table:table-cell>
        </table:table-row>
        <table:table-row>
          <table:table-cell table:style-name="Tabelle40.A2" office:value-type="string">
            <text:p text:style-name="P51">Kanal</text:p>
          </table:table-cell>
          <table:table-cell table:style-name="Tabelle40.A2" office:value-type="string">
            <text:p text:style-name="P51">zu programmierender Kanal</text:p>
          </table:table-cell>
          <table:table-cell table:style-name="Tabelle40.C2" office:value-type="string">
            <text:p text:style-name="P49">'123', 2#0101, 8#33, 16#FF</text:p>
          </table:table-cell>
        </table:table-row>
        <table:table-row>
          <table:table-cell table:style-name="Tabelle40.A2" office:value-type="string">
            <text:p text:style-name="P51">Day</text:p>
          </table:table-cell>
          <table:table-cell table:style-name="Tabelle40.A2" office:value-type="string">
            <text:p text:style-name="P51">Auswahlnummer z.B. Tag</text:p>
          </table:table-cell>
          <table:table-cell table:style-name="Tabelle40.C2" office:value-type="string">
            <text:p text:style-name="P49">'123', 2#0101, 8#33, 16#FF, 'Mo'</text:p>
            <text:p text:style-name="P49">'MO,DI,DO'</text:p>
          </table:table-cell>
        </table:table-row>
        <table:table-row>
          <table:table-cell table:style-name="Tabelle40.A2" office:value-type="string">
            <text:p text:style-name="P51">Start</text:p>
          </table:table-cell>
          <table:table-cell table:style-name="Tabelle40.A2" office:value-type="string">
            <text:p text:style-name="P51">Startzeitpunkt (Tageszeit)</text:p>
          </table:table-cell>
          <table:table-cell table:style-name="Tabelle40.C2" office:value-type="string">
            <text:p text:style-name="P49">'TOD#12:00'</text:p>
          </table:table-cell>
        </table:table-row>
        <table:table-row>
          <table:table-cell table:style-name="Tabelle40.A2" office:value-type="string">
            <text:p text:style-name="P51">Dauer</text:p>
          </table:table-cell>
          <table:table-cell table:style-name="Tabelle40.A2" office:value-type="string">
            <text:p text:style-name="P51">Zeitdauer des Ereignisses</text:p>
          </table:table-cell>
          <table:table-cell table:style-name="Tabelle40.C2" office:value-type="string">
            <text:p text:style-name="P49">'T#1h3m22s'</text:p>
          </table:table-cell>
        </table:table-row>
        <table:table-row>
          <table:table-cell table:style-name="Tabelle40.A2" office:value-type="string">
            <text:p text:style-name="P51">Land</text:p>
          </table:table-cell>
          <table:table-cell table:style-name="Tabelle40.A2" office:value-type="string">
            <text:p text:style-name="P51">logische Und Verknüpfung</text:p>
          </table:table-cell>
          <table:table-cell table:style-name="Tabelle40.C2" office:value-type="string">
            <text:p text:style-name="P49">'123', 2#0101, 8#33, 16#FF</text:p>
          </table:table-cell>
        </table:table-row>
        <table:table-row>
          <table:table-cell table:style-name="Tabelle40.A2" office:value-type="string">
            <text:p text:style-name="P51">Lor</text:p>
          </table:table-cell>
          <table:table-cell table:style-name="Tabelle40.A2" office:value-type="string">
            <text:p text:style-name="P51">logische oder Verknüpfung</text:p>
          </table:table-cell>
          <table:table-cell table:style-name="Tabelle40.C2" office:value-type="string">
            <text:p text:style-name="P49">'123', 2#0101, 8#33, 16#FF</text:p>
          </table:table-cell>
        </table:table-row>
      </table:table>
      <text:p text:style-name="P53"/>
      <text:p text:style-name="P5">Das Feld DAY hat je nach Typ des Ereignisses verschiedenen Bedeutung und kann auch mit Wochentagen als Text oder einer Liste von Wochentagen spezifiziert werden. Der Eingang LANG spezifiziert die zu verwendende Sprache, 0 = die im Setup eingestellt <text:span text:style-name="T2">Default</text:span> Sprache, 1 = Englisch, .... nähere Infos zu Sprachen siehe im Kapitel Datentypen.</text:p>
      <text:list xml:id="list38476452" text:continue-numbering="true" text:style-name="L1">
        <text:list-item>
          <text:list>
            <text:list-item>
              <text:h text:style-name="P216" text:outline-level="2"><text:alphabetical-index-mark-start text:id="IMark225941772"/>TIMER_EXT<text:alphabetical-index-mark-end text:id="IMark225941772"/></text:h>
            </text:list-item>
          </text:list>
        </text:list-item>
      </text:list>
      <text:p text:style-name="P2">Type<text:tab/><text:span text:style-name="T11">Funktionsbaustein</text:span></text:p>
      <text:p text:style-name="P66"><text:span text:style-name="T16">Input</text:span><text:span text:style-name="T21"><text:tab/>ENA : BOOL (Baustein </text:span><text:span text:style-name="T16">Enable</text:span><text:span text:style-name="T21">)</text:span></text:p>
      <text:p text:style-name="P183"><text:tab/>ON : BOOL (zwingt den Ausgang Q auf TRUE)</text:p>
      <text:p text:style-name="P183"><text:tab/>OFF : BOOL (zwingt den Ausgang Q auf FALSE)</text:p>
      <text:p text:style-name="P183"><text:tab/>MAN : BOOL (Steuereingang wenn ON = OFF = TRUE)</text:p>
      <text:p text:style-name="P183"><text:tab/>SWITCH : BOOL (Eingang für Taster)</text:p>
      <text:p text:style-name="P183"><text:tab/>DT_IN : DATETIME (Eingang für Datum und Tageszeit)</text:p>
      <text:p text:style-name="P183"><text:tab/>SUN_SET : TOD (Zeit des Sonnenuntergangs)</text:p>
      <text:p text:style-name="P183"><text:soft-page-break/><text:tab/>SUN_RISE : TOD (Zeit des Sonnenaufgangs)</text:p>
      <text:p text:style-name="P183"><text:tab/>HOLIDAY : BOOL (Eingang für Feiertagsmodul)</text:p>
      <text:p text:style-name="P183">Config<text:tab/>T_DEBOUNCE : TIME (Entprellzeit für den Eingang SWITCH)</text:p>
      <text:p text:style-name="P183"><text:tab/>T_SET_START : TIME (Einschaltzeit vor Sonnenuntergang)</text:p>
      <text:p text:style-name="P183"><text:tab/>T_SET_STOP : TIME (Ausschaltzeit nach Sonnenuntergang)</text:p>
      <text:p text:style-name="P183"><text:tab/>T_DAY_STOP : TOD (Ausschaltzeit nach Tageszeit)</text:p>
      <text:p text:style-name="P183"><text:tab/>T_RISE_START : TIME (Einschaltzeit vor Sonnenaufgang)</text:p>
      <text:p text:style-name="P183"><text:tab/>T_DAY_START : TOD (Einschaltzeit nach Tageszeit)</text:p>
      <text:p text:style-name="P183"><text:tab/>T_RISE_STOP : TIME (Ausschaltzeit nach Sonnenaufgang)</text:p>
      <text:p text:style-name="P183"><text:tab/>ENABLE_SATURDAY : BOOL (aktiv an Samstagen wenn TRUE)</text:p>
      <text:p text:style-name="P183"><text:tab/>ENABLE_SUNDAY : BOOL (aktiv an Sonntagen wenn TRUE)</text:p>
      <text:p text:style-name="P183"><text:tab/>ENABLE_HOLIDAY : BOOL (aktiv an Feiertagen wenn TRUE)</text:p>
      <text:p text:style-name="P183"><draw:frame draw:style-name="fr3" draw:name="Grafik687" text:anchor-type="paragraph" svg:x="1.067cm" svg:y="0.667cm" svg:width="3.69cm" svg:height="4.3cm" draw:z-index="683"><draw:image xlink:href="Pictures/1000000000000117000001458DE1C1C1.png" xlink:type="simple" xlink:show="embed" xlink:actuate="onLoad"/></draw:frame>Output<text:tab/>Q : BOOL (Schaltausgang)</text:p>
      <text:p text:style-name="P173"><text:span text:style-name="T21"><text:line-break/>TIMER_EXT ist ein </text:span><text:span text:style-name="T16">Timer</text:span><text:span text:style-name="T21"> speziell für Außenbeleuchtungen oder andere Verbraucher die während der Dämmerung eingeschaltet sein sollen. Der Ausgang Q kann zu festen Tageszeiten ein und ausgeschaltet werden, zusätzlich kann der Ausgang vor der Dämmerung ein und nach der Dämmerung automatisch wieder ausgeschaltet werden. Ein zusätzlicher Eingang SWITCH kann den Ausgang unabhängig von der Tageszeit ein- und aus-schalten. Die Eingänge ENA, ON, OFF und MAN erlauben eine ausführliche automatische und manuelle Steuerung des Ausgangs. Wird ENA nicht beschaltet ist der Baustein trotzdem </text:span><text:span text:style-name="T16">Enabled</text:span><text:span text:style-name="T21"> weil sein interner </text:span><text:span text:style-name="T16">Default</text:span><text:span text:style-name="T21"> TRUE ist. Die folgende Tabelle gibt detaillierte Informationen über die Betriebszustände des Bausteins.</text:span></text:p>
      <table:table table:name="Tabelle42" table:style-name="Tabelle42">
        <table:table-column table:style-name="Tabelle42.A"/>
        <table:table-column table:style-name="Tabelle42.B"/>
        <table:table-column table:style-name="Tabelle42.C"/>
        <table:table-column table:style-name="Tabelle42.D"/>
        <table:table-column table:style-name="Tabelle42.E"/>
        <table:table-column table:style-name="Tabelle42.F"/>
        <table:table-column table:style-name="Tabelle42.G"/>
        <table:table-column table:style-name="Tabelle42.H"/>
        <table:table-row>
          <table:table-cell table:style-name="Tabelle42.A1" office:value-type="string">
            <text:p text:style-name="P113">ENA</text:p>
          </table:table-cell>
          <table:table-cell table:style-name="Tabelle42.A1" office:value-type="string">
            <text:p text:style-name="P113">ON</text:p>
          </table:table-cell>
          <table:table-cell table:style-name="Tabelle42.A1" office:value-type="string">
            <text:p text:style-name="P113">OFF</text:p>
          </table:table-cell>
          <table:table-cell table:style-name="Tabelle42.A1" office:value-type="string">
            <text:p text:style-name="P113">MAN</text:p>
          </table:table-cell>
          <table:table-cell table:style-name="Tabelle42.A1" office:value-type="string">
            <text:p text:style-name="P113">SWITCH</text:p>
          </table:table-cell>
          <table:table-cell table:style-name="Tabelle42.A1" office:value-type="string">
            <text:p text:style-name="P118">Timer</text:p>
          </table:table-cell>
          <table:table-cell table:style-name="Tabelle42.A1" office:value-type="string">
            <text:p text:style-name="P113">Q</text:p>
          </table:table-cell>
          <table:table-cell table:style-name="Tabelle42.H1" office:value-type="string">
            <text:p text:style-name="P113">STATUS</text:p>
          </table:table-cell>
        </table:table-row>
        <table:table-row>
          <table:table-cell table:style-name="Tabelle42.A2" office:value-type="string">
            <text:p text:style-name="P113">L</text:p>
          </table:table-cell>
          <table:table-cell table:style-name="Tabelle42.A2" office:value-type="string">
            <text:p text:style-name="P113">-</text:p>
          </table:table-cell>
          <table:table-cell table:style-name="Tabelle42.A2" office:value-type="string">
            <text:p text:style-name="P113">-</text:p>
          </table:table-cell>
          <table:table-cell table:style-name="Tabelle42.A2" office:value-type="string">
            <text:p text:style-name="P113">-</text:p>
          </table:table-cell>
          <table:table-cell table:style-name="Tabelle42.A2" office:value-type="string">
            <text:p text:style-name="P113">-</text:p>
          </table:table-cell>
          <table:table-cell table:style-name="Tabelle42.A2" office:value-type="string">
            <text:p text:style-name="P114">-</text:p>
          </table:table-cell>
          <table:table-cell table:style-name="Tabelle42.A2" office:value-type="string">
            <text:p text:style-name="P113">L</text:p>
          </table:table-cell>
          <table:table-cell table:style-name="Tabelle42.H2" office:value-type="float" office:value="104">
            <text:p text:style-name="P113">104</text:p>
          </table:table-cell>
        </table:table-row>
        <table:table-row>
          <table:table-cell table:style-name="Tabelle42.A2" office:value-type="string">
            <text:p text:style-name="P113">H</text:p>
          </table:table-cell>
          <table:table-cell table:style-name="Tabelle42.A2" office:value-type="string">
            <text:p text:style-name="P113">H</text:p>
          </table:table-cell>
          <table:table-cell table:style-name="Tabelle42.A2" office:value-type="string">
            <text:p text:style-name="P113">L</text:p>
          </table:table-cell>
          <table:table-cell table:style-name="Tabelle42.A2" office:value-type="string">
            <text:p text:style-name="P113">-</text:p>
          </table:table-cell>
          <table:table-cell table:style-name="Tabelle42.A2" office:value-type="string">
            <text:p text:style-name="P113">-</text:p>
          </table:table-cell>
          <table:table-cell table:style-name="Tabelle42.A2" office:value-type="string">
            <text:p text:style-name="P114">-</text:p>
          </table:table-cell>
          <table:table-cell table:style-name="Tabelle42.A2" office:value-type="string">
            <text:p text:style-name="P113">H</text:p>
          </table:table-cell>
          <table:table-cell table:style-name="Tabelle42.H2" office:value-type="float" office:value="101">
            <text:p text:style-name="P113">101</text:p>
          </table:table-cell>
        </table:table-row>
        <table:table-row>
          <table:table-cell table:style-name="Tabelle42.A2" office:value-type="string">
            <text:p text:style-name="P113">H</text:p>
          </table:table-cell>
          <table:table-cell table:style-name="Tabelle42.A2" office:value-type="string">
            <text:p text:style-name="P113">L</text:p>
          </table:table-cell>
          <table:table-cell table:style-name="Tabelle42.A2" office:value-type="string">
            <text:p text:style-name="P113">H</text:p>
          </table:table-cell>
          <table:table-cell table:style-name="Tabelle42.A2" office:value-type="string">
            <text:p text:style-name="P113">-</text:p>
          </table:table-cell>
          <table:table-cell table:style-name="Tabelle42.A2" office:value-type="string">
            <text:p text:style-name="P113">-</text:p>
          </table:table-cell>
          <table:table-cell table:style-name="Tabelle42.A2" office:value-type="string">
            <text:p text:style-name="P114">-</text:p>
          </table:table-cell>
          <table:table-cell table:style-name="Tabelle42.A2" office:value-type="string">
            <text:p text:style-name="P113">L</text:p>
          </table:table-cell>
          <table:table-cell table:style-name="Tabelle42.H2" office:value-type="float" office:value="102">
            <text:p text:style-name="P113">102</text:p>
          </table:table-cell>
        </table:table-row>
        <table:table-row>
          <table:table-cell table:style-name="Tabelle42.A2" office:value-type="string">
            <text:p text:style-name="P113">H</text:p>
          </table:table-cell>
          <table:table-cell table:style-name="Tabelle42.A2" office:value-type="string">
            <text:p text:style-name="P113">H</text:p>
          </table:table-cell>
          <table:table-cell table:style-name="Tabelle42.A2" office:value-type="string">
            <text:p text:style-name="P113">H</text:p>
          </table:table-cell>
          <table:table-cell table:style-name="Tabelle42.A2" office:value-type="string">
            <text:p text:style-name="P113">X</text:p>
          </table:table-cell>
          <table:table-cell table:style-name="Tabelle42.A2" office:value-type="string">
            <text:p text:style-name="P113">-</text:p>
          </table:table-cell>
          <table:table-cell table:style-name="Tabelle42.A2" office:value-type="string">
            <text:p text:style-name="P114">-</text:p>
          </table:table-cell>
          <table:table-cell table:style-name="Tabelle42.A2" office:value-type="string">
            <text:p text:style-name="P113">MAN</text:p>
          </table:table-cell>
          <table:table-cell table:style-name="Tabelle42.H2" office:value-type="float" office:value="103">
            <text:p text:style-name="P113">103</text:p>
          </table:table-cell>
        </table:table-row>
        <text:soft-page-break/>
        <table:table-row>
          <table:table-cell table:style-name="Tabelle42.A2" office:value-type="string">
            <text:p text:style-name="P113">H</text:p>
          </table:table-cell>
          <table:table-cell table:style-name="Tabelle42.A2" office:value-type="string">
            <text:p text:style-name="P113">L</text:p>
          </table:table-cell>
          <table:table-cell table:style-name="Tabelle42.A2" office:value-type="string">
            <text:p text:style-name="P113">L</text:p>
          </table:table-cell>
          <table:table-cell table:style-name="Tabelle42.A2" office:value-type="string">
            <text:p text:style-name="P113">-</text:p>
          </table:table-cell>
          <table:table-cell table:style-name="Tabelle42.A2" office:value-type="string">
            <text:p text:style-name="P143"></text:p>
          </table:table-cell>
          <table:table-cell table:style-name="Tabelle42.A2" office:value-type="string">
            <text:p text:style-name="P114">-</text:p>
          </table:table-cell>
          <table:table-cell table:style-name="Tabelle42.A2" office:value-type="string">
            <text:p text:style-name="P113">NOT Q</text:p>
          </table:table-cell>
          <table:table-cell table:style-name="Tabelle42.H2" office:value-type="float" office:value="110">
            <text:p text:style-name="P113">110</text:p>
          </table:table-cell>
        </table:table-row>
        <table:table-row>
          <table:table-cell table:style-name="Tabelle42.A2" office:value-type="string">
            <text:p text:style-name="P113">H</text:p>
          </table:table-cell>
          <table:table-cell table:style-name="Tabelle42.A2" office:value-type="string">
            <text:p text:style-name="P113">L</text:p>
          </table:table-cell>
          <table:table-cell table:style-name="Tabelle42.A2" office:value-type="string">
            <text:p text:style-name="P113">L</text:p>
          </table:table-cell>
          <table:table-cell table:style-name="Tabelle42.A2" office:value-type="string">
            <text:p text:style-name="P113">-</text:p>
          </table:table-cell>
          <table:table-cell table:style-name="Tabelle42.A2" office:value-type="string">
            <text:p text:style-name="P113">-</text:p>
          </table:table-cell>
          <table:table-cell table:style-name="Tabelle42.A2" office:value-type="string">
            <text:p text:style-name="P114">TOD = T_DAY_START</text:p>
          </table:table-cell>
          <table:table-cell table:style-name="Tabelle42.A2" office:value-type="string">
            <text:p text:style-name="P113">H</text:p>
          </table:table-cell>
          <table:table-cell table:style-name="Tabelle42.H2" office:value-type="float" office:value="111">
            <text:p text:style-name="P113">111</text:p>
          </table:table-cell>
        </table:table-row>
        <table:table-row>
          <table:table-cell table:style-name="Tabelle42.A2" office:value-type="string">
            <text:p text:style-name="P113">H</text:p>
          </table:table-cell>
          <table:table-cell table:style-name="Tabelle42.A2" office:value-type="string">
            <text:p text:style-name="P113">L</text:p>
          </table:table-cell>
          <table:table-cell table:style-name="Tabelle42.A2" office:value-type="string">
            <text:p text:style-name="P113">L</text:p>
          </table:table-cell>
          <table:table-cell table:style-name="Tabelle42.A2" office:value-type="string">
            <text:p text:style-name="P113">-</text:p>
          </table:table-cell>
          <table:table-cell table:style-name="Tabelle42.A2" office:value-type="string">
            <text:p text:style-name="P113">-</text:p>
          </table:table-cell>
          <table:table-cell table:style-name="Tabelle42.A2" office:value-type="string">
            <text:p text:style-name="P114">TOD = T_DAY_STOP</text:p>
          </table:table-cell>
          <table:table-cell table:style-name="Tabelle42.A2" office:value-type="string">
            <text:p text:style-name="P113">L</text:p>
          </table:table-cell>
          <table:table-cell table:style-name="Tabelle42.H2" office:value-type="float" office:value="112">
            <text:p text:style-name="P113">112</text:p>
          </table:table-cell>
        </table:table-row>
        <table:table-row>
          <table:table-cell table:style-name="Tabelle42.A2" office:value-type="string">
            <text:p text:style-name="P113">H</text:p>
          </table:table-cell>
          <table:table-cell table:style-name="Tabelle42.A2" office:value-type="string">
            <text:p text:style-name="P113">L</text:p>
          </table:table-cell>
          <table:table-cell table:style-name="Tabelle42.A2" office:value-type="string">
            <text:p text:style-name="P113">L</text:p>
          </table:table-cell>
          <table:table-cell table:style-name="Tabelle42.A2" office:value-type="string">
            <text:p text:style-name="P113">-</text:p>
          </table:table-cell>
          <table:table-cell table:style-name="Tabelle42.A2" office:value-type="string">
            <text:p text:style-name="P113">-</text:p>
          </table:table-cell>
          <table:table-cell table:style-name="Tabelle42.A2" office:value-type="string">
            <text:p text:style-name="P114">TOD = SUN_RISE - T_RISE_START</text:p>
          </table:table-cell>
          <table:table-cell table:style-name="Tabelle42.A2" office:value-type="string">
            <text:p text:style-name="P113">H</text:p>
          </table:table-cell>
          <table:table-cell table:style-name="Tabelle42.H2" office:value-type="float" office:value="113">
            <text:p text:style-name="P113">113</text:p>
          </table:table-cell>
        </table:table-row>
        <table:table-row>
          <table:table-cell table:style-name="Tabelle42.A2" office:value-type="string">
            <text:p text:style-name="P113">H</text:p>
          </table:table-cell>
          <table:table-cell table:style-name="Tabelle42.A2" office:value-type="string">
            <text:p text:style-name="P113">L</text:p>
          </table:table-cell>
          <table:table-cell table:style-name="Tabelle42.A2" office:value-type="string">
            <text:p text:style-name="P113">L</text:p>
          </table:table-cell>
          <table:table-cell table:style-name="Tabelle42.A2" office:value-type="string">
            <text:p text:style-name="P113">-</text:p>
          </table:table-cell>
          <table:table-cell table:style-name="Tabelle42.A2" office:value-type="string">
            <text:p text:style-name="P113">-</text:p>
          </table:table-cell>
          <table:table-cell table:style-name="Tabelle42.A2" office:value-type="string">
            <text:p text:style-name="P114">TOD = SUN_RISE + T_RISE_STOP</text:p>
          </table:table-cell>
          <table:table-cell table:style-name="Tabelle42.A2" office:value-type="string">
            <text:p text:style-name="P113">L</text:p>
          </table:table-cell>
          <table:table-cell table:style-name="Tabelle42.H2" office:value-type="float" office:value="114">
            <text:p text:style-name="P113">114</text:p>
          </table:table-cell>
        </table:table-row>
        <table:table-row>
          <table:table-cell table:style-name="Tabelle42.A2" office:value-type="string">
            <text:p text:style-name="P113">H</text:p>
          </table:table-cell>
          <table:table-cell table:style-name="Tabelle42.A2" office:value-type="string">
            <text:p text:style-name="P113">L</text:p>
          </table:table-cell>
          <table:table-cell table:style-name="Tabelle42.A2" office:value-type="string">
            <text:p text:style-name="P113">L</text:p>
          </table:table-cell>
          <table:table-cell table:style-name="Tabelle42.A2" office:value-type="string">
            <text:p text:style-name="P113">-</text:p>
          </table:table-cell>
          <table:table-cell table:style-name="Tabelle42.A2" office:value-type="string">
            <text:p text:style-name="P113">-</text:p>
          </table:table-cell>
          <table:table-cell table:style-name="Tabelle42.A2" office:value-type="string">
            <text:p text:style-name="P114">TOD = SUN_SET - T_SET_START</text:p>
          </table:table-cell>
          <table:table-cell table:style-name="Tabelle42.A2" office:value-type="string">
            <text:p text:style-name="P113">H</text:p>
          </table:table-cell>
          <table:table-cell table:style-name="Tabelle42.H2" office:value-type="float" office:value="115">
            <text:p text:style-name="P113">115</text:p>
          </table:table-cell>
        </table:table-row>
        <table:table-row>
          <table:table-cell table:style-name="Tabelle42.A2" office:value-type="string">
            <text:p text:style-name="P113">H</text:p>
          </table:table-cell>
          <table:table-cell table:style-name="Tabelle42.A2" office:value-type="string">
            <text:p text:style-name="P113">L</text:p>
          </table:table-cell>
          <table:table-cell table:style-name="Tabelle42.A2" office:value-type="string">
            <text:p text:style-name="P113">L</text:p>
          </table:table-cell>
          <table:table-cell table:style-name="Tabelle42.A2" office:value-type="string">
            <text:p text:style-name="P113">-</text:p>
          </table:table-cell>
          <table:table-cell table:style-name="Tabelle42.A2" office:value-type="string">
            <text:p text:style-name="P113">-</text:p>
          </table:table-cell>
          <table:table-cell table:style-name="Tabelle42.A2" office:value-type="string">
            <text:p text:style-name="P114">TOD = SUN_SET + T_SET_STOP</text:p>
          </table:table-cell>
          <table:table-cell table:style-name="Tabelle42.A2" office:value-type="string">
            <text:p text:style-name="P113">L</text:p>
          </table:table-cell>
          <table:table-cell table:style-name="Tabelle42.H2" office:value-type="float" office:value="116">
            <text:p text:style-name="P113">116</text:p>
          </table:table-cell>
        </table:table-row>
      </table:table>
      <text:p text:style-name="P179"/>
      <text:p text:style-name="P173"><text:span text:style-name="T14">Die Setup Variablen ENABLE_SUNDAY, SATURDAY und HOLIDAY definieren ob der Baustein auch an Samstagen, Sonntagen und Feiertagen aktiv ist. Wenn der Baustein an Feiertagen nicht schalten soll muss am Eingang HO</text:span><text:span text:style-name="T14">LIDAY der Baustein HOLIDAY aus der Bibliothek angeschlossen werden, dieser Baustein signalisiert mit einem TRUE das heute ein Feiertag ist. Die </text:span><text:span text:style-name="T14">Setup Variablen T_SET_START, T_SET_STOP, T_RISE_START, T_RISE_STOP, T_DAY_START und T_DAY_STOP legen die Schaltzeiten fest. ist eine dieser </text:span><text:span text:style-name="T14">Variablen T#0s oder TOD#00:00 dann ist diese Schaltzeit nicht aktiv. Das </text:span><text:span text:style-name="T14">bedeutet das z.B. T_SET_START (Einschaltzeit vor Sonnenuntergang) nur dann einschaltet wenn sie auf mindestens 1 Sekunde eingestellt ist. Der Baustein schaltet bei erreichen der Zeit T_DAY_START den Ausgang Q ein, und bei erreichen von T_DAY_STOP wieder aus, wenn eine der beiden Zeiten (T_DAY_START oder T_DAY_STOP) auf TOD#00:00 steht wird der entsprechende Schaltvorgang nicht ausgeführt. Der Baustein schaltet um die Zeit T_RISE_START vor Sonnenaufgang (SUN_RISE) ein und <text:s/>bei erreichen von T_RISE_STOP nach Sonnenaufgang wieder aus. Dasselbe gibt für die Zeiten bei Sonnenuntergang.</text:span></text:p>
      <text:list xml:id="list38463701" text:continue-numbering="true" text:style-name="L1">
        <text:list-item>
          <text:list>
            <text:list-item>
              <text:h text:style-name="P216" text:outline-level="2"><text:alphabetical-index-mark-start text:id="IMark225941772"/>TIMER_P4<text:alphabetical-index-mark-end text:id="IMark225941772"/></text:h>
            </text:list-item>
          </text:list>
        </text:list-item>
      </text:list>
      <text:p text:style-name="P2">Type<text:tab/><text:span text:style-name="T11">Funktionsbaustein</text:span></text:p>
      <text:p text:style-name="P66"><text:span text:style-name="T16">Input</text:span><text:span text:style-name="T21"><text:tab/>DTIME : DATE_TIME (Datum Zeit Eingang)</text:span></text:p>
      <text:p text:style-name="P73"><text:tab/>TREF_0 : TOD (Referenzzeit 0)</text:p>
      <text:p text:style-name="P183"><text:tab/>TREF_1 : TOD (Referenzzeit 1)</text:p>
      <text:p text:style-name="P73"><text:tab/>HOLY : BOOL (Feiertagseingang)</text:p>
      <text:p text:style-name="P73"><text:tab/>L0..L3 : BOOL (Logische Eingänge)</text:p>
      <text:p text:style-name="P183"><text:tab/>OFS : INT (Kanal Offset)</text:p>
      <text:p text:style-name="P183"><text:soft-page-break/><text:tab/>ENQ : BOOL (Wenn ENQ = FALSE bleiben alle Ausgänge FALSE)</text:p>
      <text:p text:style-name="P183"><text:tab/>MAN : BOOL (Umschalter für Handbetrieb)</text:p>
      <text:p text:style-name="P183"><text:tab/>MI : BYTE (Kanalwahl bei Handbetrieb)</text:p>
      <text:p text:style-name="P183"><text:tab/>RST : BOOL (Asynchroner Reset)</text:p>
      <text:p text:style-name="P183"><text:tab/>PROG : ARRAY[0..63] OF TIMER_EVENT (Programmdaten)</text:p>
      <text:p text:style-name="P185">Output<text:tab/>Q0..Q3 : BOOL (Schaltausgänge)</text:p>
      <text:p text:style-name="P185"><draw:frame draw:style-name="fr3" draw:name="Grafik629" text:anchor-type="paragraph" svg:x="1.046cm" svg:y="0.676cm" svg:width="3.62cm" svg:height="7.14cm" draw:z-index="700"><draw:image xlink:href="Pictures/10000000000001120000021C4A31700C.png" xlink:type="simple" xlink:show="embed" xlink:actuate="onLoad"/></draw:frame><text:tab/>STATUS : BYTE (ESR kompatibler Status Ausgang)</text:p>
      <text:p text:style-name="P172"><text:span text:style-name="T21"><text:line-break/>TIMER_P4 ist ein universell programmierbarer </text:span><text:span text:style-name="T16">Timer</text:span><text:span text:style-name="T21"> der ein Fülle vom Möglichkeiten bietet. Neben Ereignissen zu festen Zeiten können auch Ereignisse in Abhängigkeit von externen Zeiten wie zum Beispiel Sonnen- Auf oder Sonnen- Untergang programmiert werden. Zusätzlich zur zeitlichen Programmierung können alle Ausgänge flexibel mit logischen Eingängen verknüpft werden. Mit maximal 63 unabhängig programmierbaren Ereignissen stehen dem Anwender praktisch unbegrenzte Möglichkeiten zur Verfügung.</text:span></text:p>
      <text:p text:style-name="P172"><text:span text:style-name="T21">Die Programmierung des </text:span><text:span text:style-name="T16">Timers</text:span><text:span text:style-name="T21"> erfolgt über ein ARRAY[0..63] OF TIMER_EVENT. Es können dabei beliebig viele Ereignisse je Kanal und auch überlappende Ereignisse Erzeugt werden.</text:span></text:p>
      <text:p text:style-name="P185">Die Datenstruktur TIMER_EVENT enthält folgende Felder:</text:p>
      <table:table table:name="Tabelle39" table:style-name="Tabelle39">
        <table:table-column table:style-name="Tabelle39.A"/>
        <table:table-column table:style-name="Tabelle39.B"/>
        <table:table-column table:style-name="Tabelle39.C"/>
        <table:table-row>
          <table:table-cell table:style-name="Tabelle39.A1" office:value-type="string">
            <text:p text:style-name="P133">Datenfeld</text:p>
          </table:table-cell>
          <table:table-cell table:style-name="Tabelle39.A1" office:value-type="string">
            <text:p text:style-name="P133">Datentyp</text:p>
          </table:table-cell>
          <table:table-cell table:style-name="Tabelle39.C1" office:value-type="string">
            <text:p text:style-name="P128">Beschreibung</text:p>
          </table:table-cell>
        </table:table-row>
        <table:table-row>
          <table:table-cell table:style-name="Tabelle39.A2" office:value-type="string">
            <text:p text:style-name="P132">CHANNEL</text:p>
          </table:table-cell>
          <table:table-cell table:style-name="Tabelle39.A2" office:value-type="string">
            <text:p text:style-name="P132">BYTE</text:p>
          </table:table-cell>
          <table:table-cell table:style-name="Tabelle39.C2" office:value-type="string">
            <text:p text:style-name="P132">Kanalnummer</text:p>
          </table:table-cell>
        </table:table-row>
        <table:table-row>
          <table:table-cell table:style-name="Tabelle39.A2" office:value-type="string">
            <text:p text:style-name="P132">TYP</text:p>
          </table:table-cell>
          <table:table-cell table:style-name="Tabelle39.A2" office:value-type="string">
            <text:p text:style-name="P132">BYTE</text:p>
          </table:table-cell>
          <table:table-cell table:style-name="Tabelle39.C2" office:value-type="string">
            <text:p text:style-name="P132">Ereignistyp</text:p>
          </table:table-cell>
        </table:table-row>
        <table:table-row>
          <table:table-cell table:style-name="Tabelle39.A2" office:value-type="string">
            <text:p text:style-name="P132">DAY</text:p>
          </table:table-cell>
          <table:table-cell table:style-name="Tabelle39.A2" office:value-type="string">
            <text:p text:style-name="P132">BYTE</text:p>
          </table:table-cell>
          <table:table-cell table:style-name="Tabelle39.C2" office:value-type="string">
            <text:p text:style-name="P132">Tag oder andere Nummer</text:p>
          </table:table-cell>
        </table:table-row>
        <table:table-row>
          <table:table-cell table:style-name="Tabelle39.A2" office:value-type="string">
            <text:p text:style-name="P132">START</text:p>
          </table:table-cell>
          <table:table-cell table:style-name="Tabelle39.A2" office:value-type="string">
            <text:p text:style-name="P132">TOD</text:p>
          </table:table-cell>
          <table:table-cell table:style-name="Tabelle39.C2" office:value-type="string">
            <text:p text:style-name="P132">Startzeitpunkt</text:p>
          </table:table-cell>
        </table:table-row>
        <table:table-row>
          <table:table-cell table:style-name="Tabelle39.A2" office:value-type="string">
            <text:p text:style-name="P132">DURATION</text:p>
          </table:table-cell>
          <table:table-cell table:style-name="Tabelle39.A2" office:value-type="string">
            <text:p text:style-name="P132">TIME</text:p>
          </table:table-cell>
          <table:table-cell table:style-name="Tabelle39.C2" office:value-type="string">
            <text:p text:style-name="P132">Zeitdauer des Events<text:soft-page-break/></text:p>
          </table:table-cell>
        </table:table-row>
        <table:table-row>
          <table:table-cell table:style-name="Tabelle39.A2" office:value-type="string">
            <text:p text:style-name="P132">LAND</text:p>
          </table:table-cell>
          <table:table-cell table:style-name="Tabelle39.A2" office:value-type="string">
            <text:p text:style-name="P132">BYTE</text:p>
          </table:table-cell>
          <table:table-cell table:style-name="Tabelle39.C2" office:value-type="string">
            <text:p text:style-name="P132">Maske für Logisches UND</text:p>
          </table:table-cell>
        </table:table-row>
        <table:table-row>
          <table:table-cell table:style-name="Tabelle39.A2" office:value-type="string">
            <text:p text:style-name="P132">LOR</text:p>
          </table:table-cell>
          <table:table-cell table:style-name="Tabelle39.A2" office:value-type="string">
            <text:p text:style-name="P132">BYTE</text:p>
          </table:table-cell>
          <table:table-cell table:style-name="Tabelle39.C2" office:value-type="string">
            <text:p text:style-name="P132">Maske für Logisches ODER</text:p>
          </table:table-cell>
        </table:table-row>
        <table:table-row>
          <table:table-cell table:style-name="Tabelle39.A2" office:value-type="string">
            <text:p text:style-name="P132">LAST</text:p>
          </table:table-cell>
          <table:table-cell table:style-name="Tabelle39.A2" office:value-type="string">
            <text:p text:style-name="P132">DWORD</text:p>
          </table:table-cell>
          <table:table-cell table:style-name="Tabelle39.C2" office:value-type="string">
            <text:p text:style-name="P132">Interne Benutzung</text:p>
          </table:table-cell>
        </table:table-row>
      </table:table>
      <text:p text:style-name="P185"/>
      <text:p text:style-name="P172"><text:span text:style-name="T21">Im Datenfeld CHANNEL wird der für das Ereignis relevante Kanal spezifiziert, falls mehrere Kanäle gleichzeitig geschaltet werden sollen müssen je </text:span><text:span text:style-name="T21">Kanal separate Ereignisse programmiert werden. Der TYP des Ereignisses </text:span><text:span text:style-name="T21">legt fest welche Art von Ereignis programmiert werden soll, siehe hierzu die Übersicht in der folgenden Tabelle. DAY legt entweder als Bitmaske die Wochentage (Bit7 = MO, BIT0 = SO) fest, oder den Tag im Monat / Jahr oder eine je nach Ereignistyp definierte andere Nummer beziehungsweise Anzahl. START ist die jeweilige Anfangszeit (TIMEOFDAY) des Ereignisses, bei Ereignissen in Abhängigkeit einer externen Zeit kann START auch eine Zeitverschiebung definieren. Die Dauer legt unabhängig vom Typ des Ereignisses fest wie lange das Ereignis andauert. Wurde ein Ereignis gestartet merkt sich der </text:span><text:span text:style-name="T16">Timer</text:span><text:span text:style-name="T21"> in der Datenstruktur den jeweiligen Tag so dass jedes Ereignis maximal einmal pro Tag gestartet wird. Sollen mehrere Ereignisse je Tag und Kanal definiert werden, können diese durch mehrere unabhängige Ereignisse programmiert werden. LAND und LOR definieren Logische Masken für zusätzliche Logische Verknüpfungen, eine detaillierte Beschreibung der möglichen Zustandsverknüpfungen findet sich weiter unten im Text.</text:span></text:p>
      <text:p text:style-name="P172"><text:span text:style-name="T21">Der </text:span><text:span text:style-name="T16">Timer</text:span><text:span text:style-name="T21"> hat einen zusätzlichen manuellen Eingang der es erlaubt Ausgänge Manuell zu überschreiben. Wenn MAN = TRUE ist werden die 4 untersten Bits des Eingangs MI auf die Ausgänge Q geschaltet. Der Eingang ENQ ist ein Freigabeeingang und muss für normalen Betrieb auf TRUE stehen, wird ENQ auf FALSE gestellt, bleiben alle Ausgänge auf FALSE. Der Baustein kann jederzeit mittels des asynchronen Eingangs RST zurückgesetzt werden, dabei werden alle laufenden Ereignisse gelöscht. Der Eingang OFS wird nur dann benützt wenn mehrere TIMER Bausteine kaskadiert werden, der WERT an OFS legt dann fest welche Kanalnummer der erste Ausgang des Bausteins hat. Wird OFS beispielsweise auf 4 gesetzt so reagiert der entsprechende Baustein nicht mehr auf die Kanalnummern 0..3 sonder auf die Kanäle 4..7. Somit lassen sich mehrere Bausteine einfach kaskadieren.</text:span></text:p>
      <text:p text:style-name="P185">Der Ausgang STATUS ist ein ESR kompatibler Status Ausgang der die Betriebszustände des Bausteins meldet.</text:p>
      <text:p text:style-name="P172"><text:span text:style-name="T21">STATUS = 100 (Der Baustein ist </text:span><text:span text:style-name="T16">disabled</text:span><text:span text:style-name="T21">, ENQ = FALSE)</text:span></text:p>
      <text:p text:style-name="P185">STATUS = 101 (Handbetrieb, MAN = TRUE)</text:p>
      <text:p text:style-name="P185">STATUS = 102 (automatischer Betrieb)</text:p>
      <text:p text:style-name="P172"><draw:frame draw:style-name="fr3" draw:name="Grafik641" text:anchor-type="paragraph" svg:x="1.729cm" svg:y="0.66cm" svg:width="13.48cm" svg:height="6.07cm" draw:z-index="634"><draw:image xlink:href="Pictures/10000000000002D80000014850FDB20C.png" xlink:type="simple" xlink:show="embed" xlink:actuate="onLoad"/></draw:frame><text:span text:style-name="T21">Das folgende Beispiel zeigt 2 kaskadierte </text:span><text:span text:style-name="T16">Timer</text:span><text:span text:style-name="T21">:</text:span></text:p>
      <text:p text:style-name="P185"><text:soft-page-break/></text:p>
      <text:p text:style-name="P172"><draw:frame draw:style-name="fr3" draw:name="Grafik630" text:anchor-type="paragraph" svg:x="3.025cm" svg:y="0.686cm" svg:width="11.19cm" svg:height="6.04cm" draw:z-index="624"><draw:image xlink:href="Pictures/100000000000025C00000146F4C42A29.png" xlink:type="simple" xlink:show="embed" xlink:actuate="onLoad"/></draw:frame><text:span text:style-name="T21">Blockschaltbild des </text:span><text:span text:style-name="T16">Timers</text:span><text:span text:style-name="T21">:</text:span></text:p>
      <text:p text:style-name="P42"/>
      <text:p text:style-name="P172"><text:span text:style-name="T21">Tritt ein programmiertes Ereignis ein so wird der entsprechende </text:span><text:span text:style-name="T16">Timer</text:span><text:span text:style-name="T21"> des Angesprochenen Kanals mit der vordefinierten Zeitdauer gestartet. Der Kanalausgang kann durch logisches UND mit bis zu 4 Eingängen L0..L3 verknüpft werden, es werden dabei nur die Eingänge verknüpft die in der Ereignismaske LAND mit einer 1 <text:s/>Definiert sind. enthält die Maske LAND keine 1 (2#00000000) dann wird kein Eingang mit dem Ausgang verknüpft. Enthält die Maske LAND zum Beispiel 2#00001001) dann wird das Ausgangssignal des </text:span><text:span text:style-name="T16">Timers</text:span><text:span text:style-name="T21"> mit den Logischen Eingängen L0 und L3 per AND verknüpft. Der Ausgang wird in diesem Fall nur Dann TRUE wenn sowohl ein Ereignis den </text:span><text:span text:style-name="T16">Timer</text:span><text:span text:style-name="T21"> gestartet hat und gleichzeitig auch L0 und L3 </text:span><text:span text:style-name="T21">TRUE sind. Nach der UND Verknüpfung kann der Ausgang noch zusätzlich mit beliebigen logischen Eingängen in der selben Weise mittels der Maske LOR OR verknüpft werden.</text:span></text:p>
      <text:p text:style-name="P185">Folgende Ereignisse können Programmiert werden:</text:p>
      <table:table table:name="Tabelle38" table:style-name="Tabelle38">
        <table:table-column table:style-name="Tabelle38.A"/>
        <table:table-column table:style-name="Tabelle38.B"/>
        <table:table-column table:style-name="Tabelle38.C"/>
        <table:table-column table:style-name="Tabelle38.D"/>
        <table:table-column table:style-name="Tabelle38.E"/>
        <table:table-row>
          <table:table-cell table:style-name="Tabelle38.A1" office:value-type="string">
            <text:p text:style-name="P134">TYP</text:p>
          </table:table-cell>
          <table:table-cell table:style-name="Tabelle38.A1" office:value-type="string">
            <text:p text:style-name="P134">Beschreibung</text:p>
          </table:table-cell>
          <table:table-cell table:style-name="Tabelle38.A1" office:value-type="string">
            <text:p text:style-name="P134">DAY</text:p>
          </table:table-cell>
          <table:table-cell table:style-name="Tabelle38.A1" office:value-type="string">
            <text:p text:style-name="P134">Start</text:p>
          </table:table-cell>
          <table:table-cell table:style-name="Tabelle38.E1" office:value-type="string">
            <text:p text:style-name="P134">Duration</text:p>
          </table:table-cell>
        </table:table-row>
        <table:table-row>
          <table:table-cell table:style-name="Tabelle38.A2" office:value-type="string">
            <text:p text:style-name="P132">1</text:p>
          </table:table-cell>
          <table:table-cell table:style-name="Tabelle38.A2" office:value-type="string">
            <text:p text:style-name="P132">tägliches Ereignis</text:p>
          </table:table-cell>
          <table:table-cell table:style-name="Tabelle38.A2" office:value-type="string">
            <text:p text:style-name="P132">-</text:p>
          </table:table-cell>
          <table:table-cell table:style-name="Tabelle38.A2" office:value-type="string">
            <text:p text:style-name="P132">Anfangszeit</text:p>
          </table:table-cell>
          <table:table-cell table:style-name="Tabelle38.E2" office:value-type="string">
            <text:p text:style-name="P132">Dauer</text:p>
          </table:table-cell>
        </table:table-row>
        <text:soft-page-break/>
        <table:table-row>
          <table:table-cell table:style-name="Tabelle38.A2" office:value-type="string">
            <text:p text:style-name="P132">2</text:p>
          </table:table-cell>
          <table:table-cell table:style-name="Tabelle38.A2" office:value-type="string">
            <text:p text:style-name="P132">Ereignis an selektierten Wochentagen</text:p>
          </table:table-cell>
          <table:table-cell table:style-name="Tabelle38.A2" office:value-type="string">
            <text:p text:style-name="P132">B0..6</text:p>
          </table:table-cell>
          <table:table-cell table:style-name="Tabelle38.A2" office:value-type="string">
            <text:p text:style-name="P132">Anfangszeit</text:p>
          </table:table-cell>
          <table:table-cell table:style-name="Tabelle38.E2" office:value-type="string">
            <text:p text:style-name="P132">Dauer</text:p>
          </table:table-cell>
        </table:table-row>
        <table:table-row>
          <table:table-cell table:style-name="Tabelle38.A2" office:value-type="string">
            <text:p text:style-name="P132">3</text:p>
          </table:table-cell>
          <table:table-cell table:style-name="Tabelle38.A2" office:value-type="string">
            <text:p text:style-name="P132">Ereignis alle N Tage</text:p>
          </table:table-cell>
          <table:table-cell table:style-name="Tabelle38.A2" office:value-type="string">
            <text:p text:style-name="P132">N</text:p>
          </table:table-cell>
          <table:table-cell table:style-name="Tabelle38.A2" office:value-type="string">
            <text:p text:style-name="P132">Anfangszeit</text:p>
          </table:table-cell>
          <table:table-cell table:style-name="Tabelle38.E2" office:value-type="string">
            <text:p text:style-name="P132">Dauer</text:p>
          </table:table-cell>
        </table:table-row>
        <table:table-row>
          <table:table-cell table:style-name="Tabelle38.A2" office:value-type="string">
            <text:p text:style-name="P132">10</text:p>
          </table:table-cell>
          <table:table-cell table:style-name="Tabelle38.A2" office:value-type="string">
            <text:p text:style-name="P132">wöchentliches Ereignis</text:p>
          </table:table-cell>
          <table:table-cell table:style-name="Tabelle38.A2" office:value-type="string">
            <text:p text:style-name="P132">Tag der Woche</text:p>
          </table:table-cell>
          <table:table-cell table:style-name="Tabelle38.A2" office:value-type="string">
            <text:p text:style-name="P132">Anfangszeit</text:p>
          </table:table-cell>
          <table:table-cell table:style-name="Tabelle38.E2" office:value-type="string">
            <text:p text:style-name="P132">Dauer</text:p>
          </table:table-cell>
        </table:table-row>
        <table:table-row>
          <table:table-cell table:style-name="Tabelle38.A2" office:value-type="string">
            <text:p text:style-name="P132">20</text:p>
          </table:table-cell>
          <table:table-cell table:style-name="Tabelle38.A2" office:value-type="string">
            <text:p text:style-name="P132">monatliches Ereignis</text:p>
          </table:table-cell>
          <table:table-cell table:style-name="Tabelle38.A2" office:value-type="string">
            <text:p text:style-name="P132">Tag des Monats</text:p>
          </table:table-cell>
          <table:table-cell table:style-name="Tabelle38.A2" office:value-type="string">
            <text:p text:style-name="P132">Anfangszeit</text:p>
          </table:table-cell>
          <table:table-cell table:style-name="Tabelle38.E2" office:value-type="string">
            <text:p text:style-name="P132">Dauer</text:p>
          </table:table-cell>
        </table:table-row>
        <table:table-row>
          <table:table-cell table:style-name="Tabelle38.A2" office:value-type="string">
            <text:p text:style-name="P132">21</text:p>
          </table:table-cell>
          <table:table-cell table:style-name="Tabelle38.A2" office:value-type="string">
            <text:p text:style-name="P132">letzter Tag des Monats</text:p>
          </table:table-cell>
          <table:table-cell table:style-name="Tabelle38.A2" office:value-type="string">
            <text:p text:style-name="P132">-</text:p>
          </table:table-cell>
          <table:table-cell table:style-name="Tabelle38.A2" office:value-type="string">
            <text:p text:style-name="P132">Anfangszeit</text:p>
          </table:table-cell>
          <table:table-cell table:style-name="Tabelle38.E2" office:value-type="string">
            <text:p text:style-name="P132">Dauer</text:p>
          </table:table-cell>
        </table:table-row>
        <table:table-row>
          <table:table-cell table:style-name="Tabelle38.A2" office:value-type="string">
            <text:p text:style-name="P132">30</text:p>
          </table:table-cell>
          <table:table-cell table:style-name="Tabelle38.A2" office:value-type="string">
            <text:p text:style-name="P132">jährliches Ereignis</text:p>
          </table:table-cell>
          <table:table-cell table:style-name="Tabelle38.A2" office:value-type="string">
            <text:p text:style-name="P132">Tag des Jahres</text:p>
          </table:table-cell>
          <table:table-cell table:style-name="Tabelle38.A2" office:value-type="string">
            <text:p text:style-name="P132">Anfangszeit</text:p>
          </table:table-cell>
          <table:table-cell table:style-name="Tabelle38.E2" office:value-type="string">
            <text:p text:style-name="P132">Dauer</text:p>
          </table:table-cell>
        </table:table-row>
        <table:table-row>
          <table:table-cell table:style-name="Tabelle38.A2" office:value-type="string">
            <text:p text:style-name="P132">31</text:p>
          </table:table-cell>
          <table:table-cell table:style-name="Tabelle38.A2" office:value-type="string">
            <text:p text:style-name="P132">letzter Tag des Jahres</text:p>
          </table:table-cell>
          <table:table-cell table:style-name="Tabelle38.A2" office:value-type="string">
            <text:p text:style-name="P132">-</text:p>
          </table:table-cell>
          <table:table-cell table:style-name="Tabelle38.A2" office:value-type="string">
            <text:p text:style-name="P132">Anfangszeit</text:p>
          </table:table-cell>
          <table:table-cell table:style-name="Tabelle38.E2" office:value-type="string">
            <text:p text:style-name="P132">Dauer</text:p>
          </table:table-cell>
        </table:table-row>
        <table:table-row>
          <table:table-cell table:style-name="Tabelle38.A2" office:value-type="string">
            <text:p text:style-name="P132">40</text:p>
          </table:table-cell>
          <table:table-cell table:style-name="Tabelle38.A2" office:value-type="string">
            <text:p text:style-name="P132">Ereignis an Schalttagen</text:p>
          </table:table-cell>
          <table:table-cell table:style-name="Tabelle38.A2" office:value-type="string">
            <text:p text:style-name="P132">-</text:p>
          </table:table-cell>
          <table:table-cell table:style-name="Tabelle38.A2" office:value-type="string">
            <text:p text:style-name="P132">Anfangszeit</text:p>
          </table:table-cell>
          <table:table-cell table:style-name="Tabelle38.E2" office:value-type="string">
            <text:p text:style-name="P132">Dauer</text:p>
          </table:table-cell>
        </table:table-row>
        <table:table-row>
          <table:table-cell table:style-name="Tabelle38.A2" office:value-type="string">
            <text:p text:style-name="P132">41</text:p>
          </table:table-cell>
          <table:table-cell table:style-name="Tabelle38.A2" office:value-type="string">
            <text:p text:style-name="P132">Ereignis an Feiertagen</text:p>
          </table:table-cell>
          <table:table-cell table:style-name="Tabelle38.A2" office:value-type="string">
            <text:p text:style-name="P132">-</text:p>
          </table:table-cell>
          <table:table-cell table:style-name="Tabelle38.A2" office:value-type="string">
            <text:p text:style-name="P132">Anfangszeit</text:p>
          </table:table-cell>
          <table:table-cell table:style-name="Tabelle38.E2" office:value-type="string">
            <text:p text:style-name="P132">Dauer</text:p>
          </table:table-cell>
        </table:table-row>
        <table:table-row>
          <table:table-cell table:style-name="Tabelle38.A2" office:value-type="string">
            <text:p text:style-name="P132">42</text:p>
          </table:table-cell>
          <table:table-cell table:style-name="Tabelle38.A2" office:value-type="string">
            <text:p text:style-name="P132">an Feiertagen und Wochenenden</text:p>
          </table:table-cell>
          <table:table-cell table:style-name="Tabelle38.A2" office:value-type="string">
            <text:p text:style-name="P132">-</text:p>
          </table:table-cell>
          <table:table-cell table:style-name="Tabelle38.A2" office:value-type="string">
            <text:p text:style-name="P132">Anfangszeit</text:p>
          </table:table-cell>
          <table:table-cell table:style-name="Tabelle38.E2" office:value-type="string">
            <text:p text:style-name="P132">Dauer</text:p>
          </table:table-cell>
        </table:table-row>
        <table:table-row>
          <table:table-cell table:style-name="Tabelle38.A2" office:value-type="string">
            <text:p text:style-name="P132">43</text:p>
          </table:table-cell>
          <table:table-cell table:style-name="Tabelle38.A2" office:value-type="string">
            <text:p text:style-name="P132">Ereignis an Werktagen</text:p>
          </table:table-cell>
          <table:table-cell table:style-name="Tabelle38.A2" office:value-type="string">
            <text:p text:style-name="P132">-</text:p>
          </table:table-cell>
          <table:table-cell table:style-name="Tabelle38.A2" office:value-type="string">
            <text:p text:style-name="P132">Anfangszeit</text:p>
          </table:table-cell>
          <table:table-cell table:style-name="Tabelle38.E2" office:value-type="string">
            <text:p text:style-name="P132">Dauer</text:p>
          </table:table-cell>
        </table:table-row>
        <table:table-row>
          <table:table-cell table:style-name="Tabelle38.A2" office:value-type="string">
            <text:p text:style-name="P132">50</text:p>
          </table:table-cell>
          <table:table-cell table:style-name="Tabelle38.A2" office:value-type="string">
            <text:p text:style-name="P132">Ereignis nach externer Zeit</text:p>
          </table:table-cell>
          <table:table-cell table:style-name="Tabelle38.C14" office:value-type="float" office:value="0.1">
            <text:p text:style-name="P132">0,1</text:p>
          </table:table-cell>
          <table:table-cell table:style-name="Tabelle38.A2" office:value-type="string">
            <text:p text:style-name="P132">Offset</text:p>
          </table:table-cell>
          <table:table-cell table:style-name="Tabelle38.E2" office:value-type="string">
            <text:p text:style-name="P132">Dauer</text:p>
          </table:table-cell>
        </table:table-row>
        <table:table-row>
          <table:table-cell table:style-name="Tabelle38.A2" office:value-type="string">
            <text:p text:style-name="P132">51</text:p>
          </table:table-cell>
          <table:table-cell table:style-name="Tabelle38.A2" office:value-type="string">
            <text:p text:style-name="P132">Ereignis vor externer Zeit </text:p>
          </table:table-cell>
          <table:table-cell table:style-name="Tabelle38.A2" office:value-type="string">
            <text:p text:style-name="P132">0,1</text:p>
          </table:table-cell>
          <table:table-cell table:style-name="Tabelle38.A2" office:value-type="string">
            <text:p text:style-name="P132">-Offset</text:p>
          </table:table-cell>
          <table:table-cell table:style-name="Tabelle38.E2" office:value-type="string">
            <text:p text:style-name="P132">Dauer</text:p>
          </table:table-cell>
        </table:table-row>
        <table:table-row>
          <table:table-cell table:style-name="Tabelle38.C14" office:value-type="float" office:value="52">
            <text:p text:style-name="P132">52</text:p>
          </table:table-cell>
          <table:table-cell table:style-name="Tabelle38.A2" office:value-type="string">
            <text:p text:style-name="P132">Ausgang zu Zeit + Offset setzen</text:p>
          </table:table-cell>
          <table:table-cell table:style-name="Tabelle38.A2" office:value-type="string">
            <text:p text:style-name="P132">0,1,2</text:p>
          </table:table-cell>
          <table:table-cell table:style-name="Tabelle38.A2" office:value-type="string">
            <text:p text:style-name="P132">Offset</text:p>
          </table:table-cell>
          <table:table-cell table:style-name="Tabelle38.E2" office:value-type="string">
            <text:p text:style-name="P132"/>
          </table:table-cell>
        </table:table-row>
        <table:table-row>
          <table:table-cell table:style-name="Tabelle38.C14" office:value-type="float" office:value="53">
            <text:p text:style-name="P132">53</text:p>
          </table:table-cell>
          <table:table-cell table:style-name="Tabelle38.A2" office:value-type="string">
            <text:p text:style-name="P132">Ausgang zu Zeit + Offset löschen</text:p>
          </table:table-cell>
          <table:table-cell table:style-name="Tabelle38.A2" office:value-type="string">
            <text:p text:style-name="P132">0,1,2</text:p>
          </table:table-cell>
          <table:table-cell table:style-name="Tabelle38.A2" office:value-type="string">
            <text:p text:style-name="P132">Offset</text:p>
          </table:table-cell>
          <table:table-cell table:style-name="Tabelle38.E2" office:value-type="string">
            <text:p text:style-name="P132"/>
          </table:table-cell>
        </table:table-row>
        <table:table-row>
          <table:table-cell table:style-name="Tabelle38.C14" office:value-type="float" office:value="54">
            <text:p text:style-name="P132">54</text:p>
          </table:table-cell>
          <table:table-cell table:style-name="Tabelle38.A2" office:value-type="string">
            <text:p text:style-name="P132">Ausgang zu Zeit - Offset setzen</text:p>
          </table:table-cell>
          <table:table-cell table:style-name="Tabelle38.A2" office:value-type="string">
            <text:p text:style-name="P132">0,1,2</text:p>
          </table:table-cell>
          <table:table-cell table:style-name="Tabelle38.A2" office:value-type="string">
            <text:p text:style-name="P132">Offset</text:p>
          </table:table-cell>
          <table:table-cell table:style-name="Tabelle38.E2" office:value-type="string">
            <text:p text:style-name="P132"/>
          </table:table-cell>
        </table:table-row>
        <table:table-row>
          <table:table-cell table:style-name="Tabelle38.C14" office:value-type="float" office:value="55">
            <text:p text:style-name="P132">55</text:p>
          </table:table-cell>
          <table:table-cell table:style-name="Tabelle38.A2" office:value-type="string">
            <text:p text:style-name="P132">Ausgang zu Zeit - Offset löschen</text:p>
          </table:table-cell>
          <table:table-cell table:style-name="Tabelle38.A2" office:value-type="string">
            <text:p text:style-name="P132">0,1,2</text:p>
          </table:table-cell>
          <table:table-cell table:style-name="Tabelle38.A2" office:value-type="string">
            <text:p text:style-name="P132">Offset</text:p>
          </table:table-cell>
          <table:table-cell table:style-name="Tabelle38.E2" office:value-type="string">
            <text:p text:style-name="P132"/>
          </table:table-cell>
        </table:table-row>
      </table:table>
      <text:p text:style-name="P185"/>
      <text:p text:style-name="P185">Ereignistypen:</text:p>
      <text:p text:style-name="P185">1. tägliches Ereignis</text:p>
      <text:p text:style-name="P185">bei einem täglichen Ereignis wird lediglich Kanalnummer, Startzeit und Dauer des Ereignisses Programmiert. Das Feld DAY hat keine Bedeutung.</text:p>
      <text:p text:style-name="P185">2. Ereignis an selektierten Wochentagen</text:p>
      <text:p text:style-name="P172"><text:span text:style-name="T21">bei diesem Ereignis wird der </text:span><text:span text:style-name="T16">Timer</text:span><text:span text:style-name="T21"> an selektierbaren Wochentagen gestartet. Im Feld DAY wird dabei über eine Bitmaske festgelegt an welchen Wochentagen das Ereignis zu starten ist. Montag = Bit 6, .... Sonntag = Bit 0. Das Ereignis wird nur an den Wochentagen gestartet wenn das entsprechende Bit im Feld DAY TRUE ist.</text:span></text:p>
      <text:p text:style-name="P185">3. Ereignis alle N Tage</text:p>
      <text:p text:style-name="P172"><text:soft-page-break/><text:span text:style-name="T21">hierbei wird nach Ablauf von N Tagen das definierte Ereignis gestartet. Im Feld DAY wird dabei angegeben nach wie vielen Tagen das Ereignis gestar</text:span><text:span text:style-name="T21">tet wird. N=3 bedeutet das das Ereignis jeden 3ten Tag gestartet wird. N kann hierbei Werte von 1..255 annehmen.</text:span></text:p>
      <text:p text:style-name="P185">10. wöchentliches Ereignis</text:p>
      <text:p text:style-name="P185">hierbei wird an einem bestimmten Tag in der Woche das Ereignis gestartet, der entsprechende Tag wird im Feld DAY festgelegt: 1 = Montag.....7 = Sonntag.</text:p>
      <text:p text:style-name="P185">20. monatliches Ereignis</text:p>
      <text:p text:style-name="P185">Bei monatlichen Ereignissen wird im Feld DAY der entsprechende Tag des Monats an dem das Ereignis stattfinden soll festgelegt. DAY = 24 bedeutet das das Ereignis jeweils am 24. eines Monats gestartet wird.</text:p>
      <text:p text:style-name="P185">21. Ende des Monats</text:p>
      <text:p text:style-name="P185">Da Monate keine feste Länge haben ist es Sinnvoll auch ein Ereignis am letzten Tag eines Monats generieren zu können. In diesen Mode hat DAY keine Bedeutung.</text:p>
      <text:p text:style-name="P185">30. jährliches Ereignis</text:p>
      <text:p text:style-name="P185">Bei jährlichen Ereignissen wird im Feld DAY der entsprechende Tag des Jahres an dem das Ereignis stattfinden soll festgelegt. DAY = 33 bedeutet das das Ereignis jeweils am 33. Tag eines Jahres gestartet wird, was dem dem 2. Februar entspricht.</text:p>
      <text:p text:style-name="P185">31. Ende des Jahres</text:p>
      <text:p text:style-name="P185">Da Jahre keine feste Länge haben ist es Sinnvoll auch ein Ereignis am letzten Tag eines Jahres generieren zu können. In diesen Mode hat DAY keine Bedeutung. Das Ereignis wird immer am 31. Dezember erzeugt.</text:p>
      <text:p text:style-name="P185">40. Ereignis an Schalttagen</text:p>
      <text:p text:style-name="P185">Dieses Ereignis wird nur am 29. Februar, also nur in einem Schaltjahr generiert. DAY hat hierbei keine Bedeutung.</text:p>
      <text:p text:style-name="P185">41. Ereignis an Feiertagen</text:p>
      <text:p text:style-name="P185">Dieses Ereignis wird nur dann erzeugt wenn der Eingang HOLY = TRUE ist. An diesem Eingang muss zu diesem Zweck der Baustein HOLDAY aus der Bibliothek angeschlossen werden. Wird dieser Mode nicht genutzt kann der Eingang HOLY offen bleiben. Das Feld DAY hat hierbei keine Bedeutung.</text:p>
      <text:p text:style-name="P185">42. Ereignis an Feiertagen und Wochenenden</text:p>
      <text:p text:style-name="P185">Dieses Ereignis wird erzeugt wenn der Eingang HOLY = TRUE ist, oder ein Samstag oder Sonntag vorliegt. Am Eingang HOLY muss zu diesem Zweck der Baustein HOLDAY aus der Bibliothek angeschlossen werden. Wird dieser Mode nicht genutzt kann der Eingang HOLY offen bleiben. Das Feld DAY hat hierbei keine Bedeutung.</text:p>
      <text:p text:style-name="P185">43. Ereignis an Werktagen</text:p>
      <text:p text:style-name="P185"><text:soft-page-break/>Dieses Ereignis wird nur an den Wochentagen Montag bis Freitag erzeugt. Das Feld DAY hat hierbei keine Bedeutung.</text:p>
      <text:p text:style-name="P185">50. Ereignis nach externer Zeit</text:p>
      <text:p text:style-name="P185">hierbei wird ein tägliches Ereignis erzeugt das von einer externen Zeit abhängig ist. IM Feld START wird hierbei nicht die Startzeit selbst, sondern der Offset von der externen Zeit festgelegt. Im Feld DAY wird angegeben welche externe Zeit als Referenz herangezogen wird. DAY = 0 bedeutet TREF_0 und DAY = 1 entspricht TREF_1. Ein Ereignis nach externer Zeit ist zum Beispiel ein Ereignis 1 Stunde nach Sonnenuntergang. In diesem Fall würde an TREF_1 <text:s/>(DAY muss hierzu auf 1 stehen) die Zeit des Sonnenuntergangs eingespeist werden, und im Feld START die Zeit 01:00 (eine Stunde Offset) angegeben. Die Zeiten für Sonnen- Auf und Sonnen- Untergang können aus dem Baustein SUN_TIME aus der Bibliothek eingespeist werden.</text:p>
      <text:p text:style-name="P5">51. Ereignis vor externer Zeit</text:p>
      <text:p text:style-name="P185">hierbei wird ein tägliches Ereignis erzeugt das von einer externen Zeit abhängig ist. IM Feld START wird hierbei nicht die Startzeit selbst, sondern der Offset vor der externen Zeit festgelegt. Im Feld DAY wird angegeben welche externe Zeit als Referenz herangezogen wird. DAY = 0 bedeutet TREF_0 und DAY = 1 entspricht TREF_1. Ein Ereignis vor externer Zeit ist zum Beispiel ein Ereignis 1 Stunde vor Sonnenuntergang. In diesem Fall würde an TREF_1 (DAY muss hierzu auf 1 stehen) die Zeit des Sonnenuntergangs eingespeist werden, und im Feld START die Zeit 01:00 (eine Stunde Offset vor TREF_1) angegeben. Die Zeiten für Sonnen- Auf und Sonnen- Untergang können aus dem Baustein SUN_TIME aus der Bibliothek eingespeist werden.</text:p>
      <text:p text:style-name="P185">52 Ausgang setzen nach externer Zeit</text:p>
      <text:p text:style-name="P185">Ein Ereignis vom Typ 52 schaltet den Ausgang bei erreichen der externen Zeit + START ein. Die externe Zeit ist TREF1 wenn DAY = 1 oder TREF_0 wenn DAY = 0, ist DAY &gt; 1 ist die externe Zeit 0. Der Ausgang bleibt dann solange auf TRUE bis er durch ein neues Ereignis überschrieben oder durch ein separates Ereignis wieder gelöscht wird.</text:p>
      <text:p text:style-name="P185">53 Ausgang löschen mit externem Offset</text:p>
      <text:p text:style-name="P185">Ein Ereignis vom Typ 53 schaltet den Ausgang bei erreichen der externen Zeit + START aus. Die externe Zeit ist TREF1 wenn DAY = 1 oder TREF_0 wenn DAY = 0, ist DAY &gt; 1 ist die externe Zeit 0.</text:p>
      <text:p text:style-name="P185">54 Ausgang setzen mit negativen Offset</text:p>
      <text:p text:style-name="P185">Ein Ereignis vom Typ 54 schaltet den Ausgang bei erreichen der externen Zeit - START ein. Die externe Zeit ist TREF1 wenn DAY = 1 oder TREF_0 wenn DAY = 0, ist DAY &gt; 1 ist die externe Zeit 0. Der Ausgang bleibt dann solange auf TRUE bis er durch ein neues Ereignis überschrieben oder durch ein separates Ereignis wieder gelöscht wird.</text:p>
      <text:p text:style-name="P185">55 Ausgang löschen mit negativen Offset</text:p>
      <text:p text:style-name="P185"><text:soft-page-break/>Ein Ereignis vom Typ 55 schaltet den Ausgang bei erreichen der externen Zeit - START aus. Die externe Zeit ist TREF1 wenn DAY = 1 oder TREF_0 wenn DAY = 0, ist DAY &gt; 1 ist die externe Zeit 0.</text:p>
      <text:list xml:id="list38450486" text:continue-numbering="true" text:style-name="L1">
        <text:list-item>
          <text:h text:style-name="P212" text:outline-level="1">Jalousiesteuerung</text:h>
          <text:list>
            <text:list-item>
              <text:h text:style-name="P216" text:outline-level="2">Einleitung</text:h>
            </text:list-item>
          </text:list>
        </text:list-item>
      </text:list>
      <text:p text:style-name="P75">Die folgenden Bausteine sind so konzipiert und aufeinander abgestimmt dass Sie einen modularen Aufbau eines Jalousiecontrollers ermöglichen. Dieses modulare System erlaubt einen schnellen und einfachen Aufbau von einfachen bis komplexen Jalousiecontrollern die exakt auf die Anwendung abgestimmt sind. Das System lässt sich auch später jederzeit erweitern und erlaubt einen beliebigen Ausbau des Funktionsumfangs. Die Anwendungen umfassen Jalousien aller Art, Rollladen, und alle Arten von Beschattungseinrichtungen. Die Module sind so gestaltet das sie sich einfach hintereinander schalten lassen und die Reihenfolge der Verschaltung gleichzeitig die Priorität der Funktionen festlegt. Die Signale UP und DN für den Handbetrieb, sowie die Vorgaben für Winkel und Position im Automatikbetrieb (PI und AI) werden dabei von Modul zu Modul weitergereicht, was einen simplen Signalfluss und einen übersichtlichen Aufbau gewährleistet. Eine Besonderheit ist dabei das Die Signale UP und DN wenn beide gleichzeitig TRUE sind den Automatikmodus einschalten.</text:p>
      <text:p text:style-name="P185">Alle Bausteine haben die Eingänge UP und DN mit denen der Manuelle Auf und Ab Befehl empfangen wird und durch QU und QD an den nächsten Baustein weitergereicht wird. Werden beide Eingänge UP und DN auf TRUE gesetzt so schalten die betreffenden Module auf Automatik Modus und werten die Eingänge PI und AI (Position- und Winkel- Eingang für die Jalousie aus.</text:p>
      <text:p text:style-name="P185">Der Ausgang STATUS gibt ESR kompatible Meldungen über den Zustand des betreffenden Bausteins aus. Wenn keine eigenen Zustandsmeldungen anstehen reicht jeder Baustein die am Eingang S_IN anliegenden Statusmeldungen an den Ausgang STATUS weiter.</text:p>
      <text:p text:style-name="P172"><text:span text:style-name="T21">Durch die Reihenschaltung einzelner Funktionen kann im Falle einer Fehlersuche auf einfache Weise der Signalfluss und die Funktionsweise überprüft werden. Durch die Reihenfolge der Module wird auch gleichzeitig die Priorität der einzelnen Funktionen festgelegt und kann ohne großen Aufwand vom </text:span><text:span text:style-name="T19">Anwender</text:span><text:span text:style-name="T21"> jederzeit geändert werden.</text:span></text:p>
      <text:p text:style-name="P185">Zukünftige oder Kundenspezifische Funktionen können auf diese Weise einfach und schnell in die Vorhandenen Blöcke eingeschaltet werden ohne dabei die vorhandene Programmierung ändern zu müssen.</text:p>
      <text:list xml:id="list38477590" text:continue-numbering="true" text:style-name="L1">
        <text:list-item>
          <text:list>
            <text:list-item>
              <text:h text:style-name="P216" text:outline-level="2"><text:soft-page-break/><text:alphabetical-index-mark-start text:id="IMark225941772"/>BLIND_ACTUATOR<text:alphabetical-index-mark-end text:id="IMark225941772"/></text:h>
            </text:list-item>
          </text:list>
        </text:list-item>
      </text:list>
      <text:p text:style-name="P75">Type<text:tab/>Funktionsbaustein</text:p>
      <text:p text:style-name="P172"><text:span text:style-name="T16">Input</text:span><text:span text:style-name="T21"><text:tab/>UP : BOOL (Eingang AUF)</text:span></text:p>
      <text:p text:style-name="P185"><text:tab/>DN : BOOL (Eingang AB)</text:p>
      <text:p text:style-name="P185"><text:tab/>S_IN : BYTE (ESR kompatibler Status Eingang)</text:p>
      <text:p text:style-name="P185"><text:tab/>T_UD : TIME (Laufzeit AUF / AB)</text:p>
      <text:p text:style-name="P185"><text:tab/>T_ANGLE : TIME (Laufzeit der Lamellenverstellung)</text:p>
      <text:p text:style-name="P185">Config<text:tab/>T_LOCKOUT : TIME (Totzeit zwischen Richtungswechsel)<text:tab/></text:p>
      <text:p text:style-name="P185">Output<text:tab/>POS : BYTE (Position der Jalousie, 0 = unten, 255 = oben)</text:p>
      <text:p text:style-name="P185"><text:tab/>ANG : BYTE (Winkel der Lamelle, 0 = vertikal, 255 = horizontal)</text:p>
      <text:p text:style-name="P185"><text:tab/>QU : BOOL (Motor Auf Signal)</text:p>
      <text:p text:style-name="P185"><text:tab/>QD : BOOL (Motor Ab Signal)</text:p>
      <text:p text:style-name="P185"><draw:frame draw:style-name="fr3" draw:name="Grafik328" text:anchor-type="paragraph" svg:x="1.046cm" svg:y="0.642cm" svg:width="3.69cm" svg:height="2.709cm" draw:z-index="299"><draw:image xlink:href="Pictures/1000000000000117000000CD51E39A6F.png" xlink:type="simple" xlink:show="embed" xlink:actuate="onLoad"/></draw:frame><text:tab/>STATUS : BYTE (ESR kompatibler Status Ausgang)</text:p>
      <text:p text:style-name="P172"><text:span text:style-name="T21"><text:line-break/>BLIND_ACTUATOR ist ein Jalousie / Rollladen Aktor mit Simulation der Position und der Winkelstellung der Lamellen. Die Eingänge UP und DN sind gegenseitig verriegelt, so dass QU und QD nie gleichzeitig aktiv sein können. Mit der Zeit T_LOCKOUT wird die minimale Pause zwischen einem Richtungswechsel festgelegt. zusätzlich bietet BLIND_ACTUATOR noch 2 Ausgänge vom Typ Byte die die jeweilige Stellung und Position der Jalousie simulieren. Für eine exakte Simulation sind die Setup Zeiten T_UD und T_ANGLE entsprechend Einzustellen. T_UD legt die Zeit fest die zum Fahren von "geschlossen" auf "offen" (hochfahren) benötigt wird. T_ANGLE spezifiziert die Zeit die zur Verstellung der </text:span><text:span text:style-name="T19">Lamellen</text:span><text:span text:style-name="T21"> von "senkrecht" nach Horizontal benötigt wird. Der Aktor stellt sicher das beim Hochfahren zuerst die Lamellen auf Horizontal gestellt werden und anschließend erst mit dem Hochfahren begonnen wird. Umgekehrt werden beim Herunterfahren erst die Lamellen auf Senkrecht gestellt und dann mit dem Herunterfahren begonnen. POS = 0 bedeutet Jalousie heruntergefahren, und POS = 255 bedeutet Jalousie ist hochgefahren. Zwischenstellungen werden entsprechend mit Zwischenwerten 0 .. 255 ausgegeben. Der Winkel der Lamellen wird durch den Ausgang ANG ausgegeben, wobei ANG = 0 die vertikale Stellung und ANG = 255 die horizontale Stellung bedeuten, Werte zwischen 0 und 255 geben den entsprechenden Winkel an. Durch die Ausgänge POS und ANG wird die Information über die Jalousie Stellung der Steue</text:span><text:span text:style-name="T21">rung zur Verfügung gestellt. </text:span><text:soft-page-break/><text:span text:style-name="T21">ANG und POS können jedoch nur sinnvolle Werte liefern wenn die Zeiten T_UD und T_ANGLE exakt für die entsprechende Jalousie angepasst sind. Der Aktor kann, wenn T_ANGLE auf T#0s gesetzt wird auch für Rollladen aller Arten verwendet werden. Die Eingänge T_UD, T_ANGLE und T_LOCKOUT haben folgende Vorgabewerte:</text:span></text:p>
      <text:p text:style-name="P185">T_UD = T#10S</text:p>
      <text:p text:style-name="P185">T_ANGLE = T#3S</text:p>
      <text:p text:style-name="P185">T_LOCKOUT = T#100MS</text:p>
      <text:p text:style-name="P185">Der Eingang S_IN und der Ausgang STATUS sind ESR kompatible Aus und Eingänge , über den Eingang S_IN melden vorgeschaltete Funktionen Ihren Status an das Modul, dieser Status wird an den Ausgang STATUS weitergeleitet, und eigene Statusmeldungen werden über STATUS Ausgegeben. Wenn am Eingang eine Statusmeldung vorliegt überschreibt diese die eigenen Statusmeldungen, ein Fehler wird mit höchster Priorität ausgegeben.</text:p>
      <table:table table:name="Tabelle14" table:style-name="Tabelle14">
        <table:table-column table:style-name="Tabelle14.A"/>
        <table:table-column table:style-name="Tabelle14.B"/>
        <table:table-row>
          <table:table-cell table:style-name="Tabelle14.A1" office:value-type="string">
            <text:p text:style-name="P126">STATUS</text:p>
          </table:table-cell>
          <table:table-cell table:style-name="Tabelle14.B1" office:value-type="string">
            <text:p text:style-name="P126">Bedeutung</text:p>
          </table:table-cell>
        </table:table-row>
        <table:table-row>
          <table:table-cell table:style-name="Tabelle14.A2" office:value-type="string">
            <text:p text:style-name="P126">0</text:p>
          </table:table-cell>
          <table:table-cell table:style-name="Tabelle14.B2" office:value-type="string">
            <text:p text:style-name="P126">keine Meldung</text:p>
          </table:table-cell>
        </table:table-row>
        <table:table-row>
          <table:table-cell table:style-name="Tabelle14.A2" office:value-type="string">
            <text:p text:style-name="P126">1</text:p>
          </table:table-cell>
          <table:table-cell table:style-name="Tabelle14.B2" office:value-type="string">
            <text:p text:style-name="P126">Fehler, UP und DN gleichzeitig aktiv</text:p>
          </table:table-cell>
        </table:table-row>
        <table:table-row>
          <table:table-cell table:style-name="Tabelle14.A2" office:value-type="string">
            <text:p text:style-name="P126">101</text:p>
          </table:table-cell>
          <table:table-cell table:style-name="Tabelle14.B2" office:value-type="string">
            <text:p text:style-name="P126">Manual UP</text:p>
          </table:table-cell>
        </table:table-row>
        <table:table-row>
          <table:table-cell table:style-name="Tabelle14.A2" office:value-type="string">
            <text:p text:style-name="P126">102</text:p>
          </table:table-cell>
          <table:table-cell table:style-name="Tabelle14.B2" office:value-type="string">
            <text:p text:style-name="P126">Manual DN</text:p>
          </table:table-cell>
        </table:table-row>
        <table:table-row>
          <table:table-cell table:style-name="Tabelle14.A2" office:value-type="string">
            <text:p text:style-name="P126">NNN</text:p>
          </table:table-cell>
          <table:table-cell table:style-name="Tabelle14.B2" office:value-type="string">
            <text:p text:style-name="P126">weitergereichte Meldung</text:p>
          </table:table-cell>
        </table:table-row>
      </table:table>
      <text:p text:style-name="P185"><text:s/></text:p>
      <text:p text:style-name="P185"><draw:frame draw:style-name="fr3" draw:name="Grafik329" text:anchor-type="paragraph" svg:x="0.981cm" svg:y="1.341cm" svg:width="15.998cm" svg:height="3.937cm" draw:z-index="293"><draw:image xlink:href="Pictures/1000000000000404000000FD6B8FB6C2.png" xlink:type="simple" xlink:show="embed" xlink:actuate="onLoad"/></draw:frame>Die folgende Grafik zeigt den inneren Aufbau und die Funktionsweise des Moduls:</text:p>
      <text:p text:style-name="P185"/>
      <text:list xml:id="list38461003" text:continue-numbering="true" text:style-name="L1">
        <text:list-item>
          <text:list>
            <text:list-item>
              <text:h text:style-name="P216" text:outline-level="2"><text:soft-page-break/><text:alphabetical-index-mark-start text:id="IMark225941772"/>BLIND_CONTROL<text:alphabetical-index-mark-end text:id="IMark225941772"/></text:h>
            </text:list-item>
          </text:list>
        </text:list-item>
      </text:list>
      <text:p text:style-name="P75">Type<text:tab/>Funktionsbaustein</text:p>
      <text:p text:style-name="P172"><text:span text:style-name="T16">Input</text:span><text:span text:style-name="T21"><text:tab/>UP : BOOL (Eingang AUF)</text:span></text:p>
      <text:p text:style-name="P185"><text:tab/>DN : BOOL (Eingang AB)</text:p>
      <text:p text:style-name="P185"><text:tab/>S_IN : BYTE (ESR kompatibler Status Eingang)</text:p>
      <text:p text:style-name="P185"><text:tab/>PI : BYTE (Vorgabe der Position)</text:p>
      <text:p text:style-name="P185"><text:tab/>AI : BYTE (Vorgabe des Lamellenwinkels)</text:p>
      <text:p text:style-name="P185"><text:tab/>T_UD : TIME (Zeit zum Hochfahren von 0 .. 255)</text:p>
      <text:p text:style-name="P185"><text:tab/>T_ANGLE : TIME (Zeit um den Lamellenwinkel von 0 .. 255 </text:p>
      <text:p text:style-name="P185"><text:tab/>zu verstellen)</text:p>
      <text:p text:style-name="P185">Config<text:tab/>SENS : BYTE (Auflösung der Regelung)</text:p>
      <text:p text:style-name="P185"><text:tab/>T_LOCKOUT : TIME (Totzeit bei Richtungswechsel der Motoren)</text:p>
      <text:p text:style-name="P185">Output<text:tab/>POS : BYTE (Simulierte Jalousiestellung)</text:p>
      <text:p text:style-name="P185"><text:tab/>ANG : BYTE (Simulierter Lamellenwinkel)</text:p>
      <text:p text:style-name="P185"><text:tab/>MU : BOOL (Motor Auf Signal)</text:p>
      <text:p text:style-name="P185"><text:tab/>MD : BOOL (Motor Ab Signal)</text:p>
      <text:p text:style-name="P185"><draw:frame draw:style-name="fr3" draw:name="Grafik332" text:anchor-type="paragraph" svg:x="1.115cm" svg:y="0.612cm" svg:width="3.69cm" svg:height="3.5cm" draw:z-index="300"><draw:image xlink:href="Pictures/1000000000000117000001094A5B6D2C.png" xlink:type="simple" xlink:show="embed" xlink:actuate="onLoad"/></draw:frame><text:tab/>STATUS : BYTE (ESR kompatibler Status Ausgang)</text:p>
      <text:p text:style-name="P172"><text:span text:style-name="T21"><text:line-break/>BLIND_CONTROL regelt die Jalousiestellung und den Lamellenwinkel gemäß den Vorgaben von PI und AI wenn UP und DN gleichzeitig TRUE sind (Automatik Modus). POS und ANG sind dabei die Aktualwerte der Jalousie, An diesen Ausgängen simuliert der Baustein den aktuellen Winkel und die Position der Jalousie. BLIND_CONTROL schaltet die Ausgänge MU oder MD solange in der geeigneten Reihenfolge auf TRUE bis die Werte an POS und ANG den Sollwerten an PI und AI entsprechen. Ein interner Sequenzer berücksichtigt dabei dass beim Auf- und Ab-fahren der Jalousie sich der Lamellenwinkel zuerst verstellt und anschließend erst das Hoch- oder Runter-fahren Der Jalousie beginnt. Wird also die Jalousie Hoch- oder Runter-gefahren so verstellt sich zwangsläufig der Lamellenwinkel welcher dann anschließend wieder durch entsprechende Gegenfahrt eingestellt werden muss. Der Eingang SENS legt fest ab welche Regeldifferenz die Regelung aktiv wird und den Ausgang so einstellt das er den Eingängen PI und AI </text:span><text:span text:style-name="T21">entspricht. Ist SENS = </text:span><text:soft-page-break/><text:span text:style-name="T21">0 so wird jede Abweichung ausgeregelt, Ist SENS = 5 (Vorgabewert) so wird erst ab einer Differenz von 5 zwischen den Vorgabewerten und den tatsächlichen werten ausgeregelt. Wenn UP und DN nicht beide TRUE sind verlässt BLIND_CONTROL den Automatikmodus und die Ausgänge QU und QD werden im Handbetrieb direkt von UP und DN gesteuert. BLIND_CONTROL benötigt nicht den Baustein BLIND_ACTUATOR um eine JALOUSIE zu steuern, BLIND_ACTUATOR ist bereits in BLIND_CONTROL integriert. Wenn keine Automatische Regelung der Jalousie benötigt wird so kann auf BLIND_CONTROL verzichtet werden und BLIND_ACTUATOR zum Einsatz kommen. Beim Einsatz von BLIND_CONTROL ist darauf zu achten dass die Zykluszeit für den Baustein kleiner als T_ANGLE / 512 * SENS beträgt. SENS kann durch einen Doppelklick auf das grafische Symbol von BLIND_CONTROL verändert werden, der Vorgabewert ist 5. Wird die Zykluszeit zu groß so beginnt die Jalousie unregelmäßig hin und herzufahren. Wenn eine kleiner Zykluszeit nicht möglich ist kann der Wert von SENS vergrößert werden.</text:span></text:p>
      <text:p text:style-name="P22">Die folgende Grafik verdeutlicht die Geometrie der Jalousie:</text:p>
      <text:p text:style-name="P186"/>
      <text:p text:style-name="P76"><draw:frame draw:style-name="fr3" draw:name="Grafik345" text:anchor-type="paragraph" svg:x="1.111cm" svg:y="0.222cm" svg:width="12.291cm" svg:height="7.091cm" draw:z-index="312"><draw:image xlink:href="Pictures/1000000000000306000001BFC1D5987B.png" xlink:type="simple" xlink:show="embed" xlink:actuate="onLoad"/></draw:frame></text:p>
      <text:p text:style-name="P186">Die folgende Tabelle stellt die Betriebszustände des Bausteins dar:</text:p>
      <table:table table:name="Tabelle46" table:style-name="Tabelle46">
        <table:table-column table:style-name="Tabelle46.A"/>
        <table:table-column table:style-name="Tabelle46.B"/>
        <table:table-column table:style-name="Tabelle46.C"/>
        <table:table-column table:style-name="Tabelle46.D"/>
        <table:table-column table:style-name="Tabelle46.A"/>
        <table:table-column table:style-name="Tabelle46.F"/>
        <table:table-column table:style-name="Tabelle46.G"/>
        <table:table-row>
          <table:table-cell table:style-name="Tabelle46.A1" office:value-type="string">
            <text:p text:style-name="P99">UP</text:p>
          </table:table-cell>
          <table:table-cell table:style-name="Tabelle46.A1" office:value-type="string">
            <text:p text:style-name="P99">DN</text:p>
          </table:table-cell>
          <table:table-cell table:style-name="Tabelle46.A1" office:value-type="string">
            <text:p text:style-name="P99">PI</text:p>
          </table:table-cell>
          <table:table-cell table:style-name="Tabelle46.A1" office:value-type="string">
            <text:p text:style-name="P99">AI</text:p>
          </table:table-cell>
          <table:table-cell table:style-name="Tabelle46.A1" office:value-type="string">
            <text:p text:style-name="P99">MU</text:p>
          </table:table-cell>
          <table:table-cell table:style-name="Tabelle46.A1" office:value-type="string">
            <text:p text:style-name="P99">MD</text:p>
          </table:table-cell>
          <table:table-cell table:style-name="Tabelle46.G1" office:value-type="string">
            <text:p text:style-name="P123"/>
          </table:table-cell>
        </table:table-row>
        <table:table-row>
          <table:table-cell table:style-name="Tabelle46.A2" office:value-type="string">
            <text:p text:style-name="P110">L</text:p>
          </table:table-cell>
          <table:table-cell table:style-name="Tabelle46.A2" office:value-type="string">
            <text:p text:style-name="P110">L</text:p>
          </table:table-cell>
          <table:table-cell table:style-name="Tabelle46.A2" office:value-type="string">
            <text:p text:style-name="P110">-</text:p>
          </table:table-cell>
          <table:table-cell table:style-name="Tabelle46.A2" office:value-type="string">
            <text:p text:style-name="P110">-</text:p>
          </table:table-cell>
          <table:table-cell table:style-name="Tabelle46.A2" office:value-type="string">
            <text:p text:style-name="P110">L</text:p>
          </table:table-cell>
          <table:table-cell table:style-name="Tabelle46.A2" office:value-type="string">
            <text:p text:style-name="P110">L</text:p>
          </table:table-cell>
          <table:table-cell table:style-name="Tabelle46.G2" office:value-type="string">
            <text:p text:style-name="P111">keine Aktion</text:p>
          </table:table-cell>
        </table:table-row>
        <table:table-row>
          <table:table-cell table:style-name="Tabelle46.A2" office:value-type="string">
            <text:p text:style-name="P110">H</text:p>
          </table:table-cell>
          <table:table-cell table:style-name="Tabelle46.A2" office:value-type="string">
            <text:p text:style-name="P110">L</text:p>
          </table:table-cell>
          <table:table-cell table:style-name="Tabelle46.A2" office:value-type="string">
            <text:p text:style-name="P110">-</text:p>
          </table:table-cell>
          <table:table-cell table:style-name="Tabelle46.A2" office:value-type="string">
            <text:p text:style-name="P110">-</text:p>
          </table:table-cell>
          <table:table-cell table:style-name="Tabelle46.A2" office:value-type="string">
            <text:p text:style-name="P110">H</text:p>
          </table:table-cell>
          <table:table-cell table:style-name="Tabelle46.A2" office:value-type="string">
            <text:p text:style-name="P110">L</text:p>
          </table:table-cell>
          <table:table-cell table:style-name="Tabelle46.G2" office:value-type="string">
            <text:p text:style-name="P111">Jalousie fährt aufwärts</text:p>
          </table:table-cell>
        </table:table-row>
        <table:table-row>
          <table:table-cell table:style-name="Tabelle46.A2" office:value-type="string">
            <text:p text:style-name="P110">L</text:p>
          </table:table-cell>
          <table:table-cell table:style-name="Tabelle46.A2" office:value-type="string">
            <text:p text:style-name="P110">H</text:p>
          </table:table-cell>
          <table:table-cell table:style-name="Tabelle46.A2" office:value-type="string">
            <text:p text:style-name="P110">-</text:p>
          </table:table-cell>
          <table:table-cell table:style-name="Tabelle46.A2" office:value-type="string">
            <text:p text:style-name="P110">-</text:p>
          </table:table-cell>
          <table:table-cell table:style-name="Tabelle46.A2" office:value-type="string">
            <text:p text:style-name="P110">L</text:p>
          </table:table-cell>
          <table:table-cell table:style-name="Tabelle46.A2" office:value-type="string">
            <text:p text:style-name="P110">H</text:p>
          </table:table-cell>
          <table:table-cell table:style-name="Tabelle46.G2" office:value-type="string">
            <text:p text:style-name="P111">Jalousie fährt abwärts</text:p>
          </table:table-cell>
        </table:table-row>
        <table:table-row>
          <table:table-cell table:style-name="Tabelle46.A2" office:value-type="string">
            <text:p text:style-name="P110">H</text:p>
          </table:table-cell>
          <table:table-cell table:style-name="Tabelle46.A2" office:value-type="string">
            <text:p text:style-name="P110">H</text:p>
          </table:table-cell>
          <table:table-cell table:style-name="Tabelle46.A2" office:value-type="string">
            <text:p text:style-name="P110">P</text:p>
          </table:table-cell>
          <table:table-cell table:style-name="Tabelle46.A2" office:value-type="string">
            <text:p text:style-name="P110">A</text:p>
          </table:table-cell>
          <table:table-cell table:style-name="Tabelle46.A2" office:value-type="string">
            <text:p text:style-name="P110">X</text:p>
          </table:table-cell>
          <table:table-cell table:style-name="Tabelle46.A2" office:value-type="string">
            <text:p text:style-name="P110">X</text:p>
          </table:table-cell>
          <table:table-cell table:style-name="Tabelle46.G2" office:value-type="string">
            <text:p text:style-name="P111">Position P und Winkel A werden Automatisch angefahren </text:p>
          </table:table-cell>
        </table:table-row>
      </table:table>
      <text:p text:style-name="P186"/>
      <text:p text:style-name="P186"><text:line-break/><text:soft-page-break/>Der Eingang S_IN und der Ausgang STATUS sind ESR kompatible Aus und Eingänge , über den Eingang S_IN melden vorgeschaltete Funktionen Ihren Status an das Modul, dieser Status wird an den Ausgang STATUS weitergeleitet, und eigene Statusmeldungen werden über STATUS Ausgegeben.</text:p>
      <table:table table:name="Tabelle16" table:style-name="Tabelle16">
        <table:table-column table:style-name="Tabelle16.A"/>
        <table:table-column table:style-name="Tabelle16.B"/>
        <table:table-row>
          <table:table-cell table:style-name="Tabelle16.A1" office:value-type="string">
            <text:p text:style-name="P100">STATUS</text:p>
          </table:table-cell>
          <table:table-cell table:style-name="Tabelle16.B1" office:value-type="string">
            <text:p text:style-name="P100">Bedeutung</text:p>
          </table:table-cell>
        </table:table-row>
        <table:table-row>
          <table:table-cell table:style-name="Tabelle16.A2" office:value-type="float" office:value="0">
            <text:p text:style-name="P104">0</text:p>
          </table:table-cell>
          <table:table-cell table:style-name="Tabelle16.B2" office:value-type="string">
            <text:p text:style-name="P104">keine Meldung</text:p>
          </table:table-cell>
        </table:table-row>
        <table:table-row>
          <table:table-cell table:style-name="Tabelle16.A3" office:value-type="string">
            <text:p text:style-name="P104">101</text:p>
          </table:table-cell>
          <table:table-cell table:style-name="Tabelle16.B2" office:value-type="string">
            <text:p text:style-name="P104">Manual Auf</text:p>
          </table:table-cell>
        </table:table-row>
        <table:table-row>
          <table:table-cell table:style-name="Tabelle16.A3" office:value-type="string">
            <text:p text:style-name="P104">102</text:p>
          </table:table-cell>
          <table:table-cell table:style-name="Tabelle16.B2" office:value-type="string">
            <text:p text:style-name="P104">Manual Ab</text:p>
          </table:table-cell>
        </table:table-row>
        <table:table-row>
          <table:table-cell table:style-name="Tabelle16.A3" office:value-type="string">
            <text:p text:style-name="P104">121</text:p>
          </table:table-cell>
          <table:table-cell table:style-name="Tabelle16.B2" office:value-type="string">
            <text:p text:style-name="P104">Position Auf</text:p>
          </table:table-cell>
        </table:table-row>
        <table:table-row>
          <table:table-cell table:style-name="Tabelle16.A3" office:value-type="string">
            <text:p text:style-name="P104">122</text:p>
          </table:table-cell>
          <table:table-cell table:style-name="Tabelle16.B2" office:value-type="string">
            <text:p text:style-name="P104">Position Ab</text:p>
          </table:table-cell>
        </table:table-row>
        <table:table-row>
          <table:table-cell table:style-name="Tabelle16.A3" office:value-type="string">
            <text:p text:style-name="P104">123</text:p>
          </table:table-cell>
          <table:table-cell table:style-name="Tabelle16.B2" office:value-type="string">
            <text:p text:style-name="P104">Lamellenstellung Horizontal</text:p>
          </table:table-cell>
        </table:table-row>
        <table:table-row>
          <table:table-cell table:style-name="Tabelle16.A3" office:value-type="string">
            <text:p text:style-name="P104">124</text:p>
          </table:table-cell>
          <table:table-cell table:style-name="Tabelle16.B2" office:value-type="string">
            <text:p text:style-name="P104">Lamellenstellung Vertikal</text:p>
          </table:table-cell>
        </table:table-row>
        <table:table-row>
          <table:table-cell table:style-name="Tabelle16.A3" office:value-type="string">
            <text:p text:style-name="P104">NNN</text:p>
          </table:table-cell>
          <table:table-cell table:style-name="Tabelle16.B2" office:value-type="string">
            <text:p text:style-name="P104">weitergereichte Meldungen</text:p>
          </table:table-cell>
        </table:table-row>
      </table:table>
      <text:p text:style-name="P185"/>
      <text:list xml:id="list38482045" text:continue-numbering="true" text:style-name="L1">
        <text:list-item>
          <text:list>
            <text:list-item>
              <text:h text:style-name="P216" text:outline-level="2"><text:alphabetical-index-mark-start text:id="IMark225941772"/>BLIND_INPUT<text:alphabetical-index-mark-end text:id="IMark225941772"/></text:h>
            </text:list-item>
          </text:list>
        </text:list-item>
      </text:list>
      <text:p text:style-name="P75">Type<text:tab/>Funktionsbaustein</text:p>
      <text:p text:style-name="P172"><text:span text:style-name="T16">Input</text:span><text:span text:style-name="T21"><text:tab/>S1 : BOOL (Eingang AUF)</text:span></text:p>
      <text:p text:style-name="P185"><text:tab/>S2 : BOOL (Eingang AB)</text:p>
      <text:p text:style-name="P185"><text:tab/>SINGLE : BOOL (Konfiguriert Ein Taster Betrieb)</text:p>
      <text:p text:style-name="P185"><text:tab/>POS : BYTE (Rückführung der Jalousiestellung)</text:p>
      <text:p text:style-name="P185"><text:tab/>ANG : BYTE (Rückführung des Lamellenwinkels)</text:p>
      <text:p text:style-name="P185"><text:tab/>IN : BOOL (Stellt die Jalousie auf die durch AI und PI </text:p>
      <text:p text:style-name="P185"><text:tab/>definierte Position)</text:p>
      <text:p text:style-name="P185"><text:tab/>PI : BYTE (Position wenn IN = TRUE)</text:p>
      <text:p text:style-name="P185"><text:tab/>AI : BYTE (Winkel <text:s/>wenn IN = TRUE)</text:p>
      <text:p text:style-name="P185">Config<text:tab/>SINGLE_SWITCH : BOOL (Konfigurations Bit für </text:p>
      <text:p text:style-name="P185"><text:tab/>Einzeltasterbetrieb)</text:p>
      <text:p text:style-name="P172"><text:span text:style-name="T21"><text:tab/>CLICK_MODE : BOOL (</text:span><text:span text:style-name="T19">Konfigurations</text:span><text:span text:style-name="T21"> Bit für </text:span><text:span text:style-name="T16">Click</text:span><text:span text:style-name="T21"> Taster Betrieb)</text:span></text:p>
      <text:p text:style-name="P172"><text:span text:style-name="T21"><text:tab/>CLICK_TIME : TIME (</text:span><text:span text:style-name="T16">Timeout</text:span><text:span text:style-name="T21"> für </text:span><text:span text:style-name="T16">Click</text:span><text:span text:style-name="T21"> Modus)</text:span></text:p>
      <text:p text:style-name="P172"><text:soft-page-break/><text:span text:style-name="T21"><text:tab/>MAX_RUNTIME : TIME (</text:span><text:span text:style-name="T16">Timeout</text:span><text:span text:style-name="T21"> für eine Bewegung ohne </text:span></text:p>
      <text:p text:style-name="P185"><text:tab/>Abbruch)</text:p>
      <text:p text:style-name="P172"><text:span text:style-name="T21"><text:tab/>MANUAL_TIMEOUT : TIME (</text:span><text:span text:style-name="T16">Timeout</text:span><text:span text:style-name="T21"> des Handbetriebs)</text:span></text:p>
      <text:p text:style-name="P185"><text:tab/>DEBOUNCE_TIME : TIME (Entprellzeit für die Eingänge S1 </text:p>
      <text:p text:style-name="P185"><text:tab/>und S2)</text:p>
      <text:p text:style-name="P185"><text:tab/>DBL_CLK1 : BOOL (Ein Doppelklick an S1 forciert CLK1POS </text:p>
      <text:p text:style-name="P185"><text:tab/>und ANG)</text:p>
      <text:p text:style-name="P185"><text:tab/>DBL_CLK1_POS : BYTE (Position nach Doppelklick auf S1)</text:p>
      <text:p text:style-name="P185"><text:tab/>DBL_CLK1_ANG : BYTE (Winkelstellung nach Doppelklick auf S1)</text:p>
      <text:p text:style-name="P185"><text:tab/>DBL_CLK2 : BOOL (Ein Doppelklick an S2 forciert CLK2POS </text:p>
      <text:p text:style-name="P185"><text:tab/>und ANG)</text:p>
      <text:p text:style-name="P185"><text:tab/>DBL_CLK2_POS : BYTE (Position nach Doppelklick auf S2)</text:p>
      <text:p text:style-name="P185"><text:tab/>DBL_CLK2_ANG : BYTE (Winkelstellung nach Doppelklick auf S2)</text:p>
      <text:p text:style-name="P185">Output<text:tab/>QU : BOOL (Motor Auf Signal)</text:p>
      <text:p text:style-name="P185"><text:tab/>QD : BOOL (Motor Ab Signal)</text:p>
      <text:p text:style-name="P185"><text:tab/>STATUS : BYTE (ESR kompatibler Status Ausgang)</text:p>
      <text:p text:style-name="P185"><text:tab/>PO : BYTE (Ausgang Position)</text:p>
      <text:p text:style-name="P185"><text:tab/>AO : BYTE (Ausgang Winkelstellung)</text:p>
      <text:p text:style-name="P185"><text:tab/>D1 : BOOL (Kommandoausgang für Doppelklick Funktion 1)</text:p>
      <text:p text:style-name="P185"><draw:frame draw:style-name="fr3" draw:name="Grafik333" text:anchor-type="paragraph" svg:x="1.245cm" svg:y="0.736cm" svg:width="3.29cm" svg:height="3.5cm" draw:z-index="667"><draw:image xlink:href="Pictures/10000000000000F90000010956F1FAA3.png" xlink:type="simple" xlink:show="embed" xlink:actuate="onLoad"/></draw:frame><text:tab/>D2 : BOOL (Kommandoausgang für Doppelklick Funktion 2)</text:p>
      <text:p text:style-name="P172"><text:span text:style-name="T21"><text:s/><text:line-break/>BLIND_INPUT dient als Taster Interface zur Bedienung von Jalousien. Der Baustein unterstützt 3 Modi, Handbetrieb, Automatikbetrieb und gesteuerter Betrieb. wenn IN = FALSE (Handbetrieb) werden die Eingänge S1 und S2 benutzt um die Ausgänge QU und QD zu steuern. Wenn die Config Variable SINGLE_SWITCH = TRUE ist, dann wird der Eingang S2 ignoriert, und die gesamte Steuerung erfolgt über den Taster S1. S1 schaltet dann abwechselnd QU und QD so dass durch aufeinander folgendes Drücken des Tasters S1 zwischen Auf und Ab Bewegung gewechselt wird. Der interne Vorgabewert ist FALSE (2 Taster Konfiguration). Die Config Variable MANUAL_TIMEOUT definiert nach welcher Ruhezeit (Zeit ohne Signal auf S1 oder </text:span><text:span text:style-name="T21">S2 </text:span><text:soft-page-break/><text:span text:style-name="T21">der Bau</text:span><text:span text:style-name="T21">stein selbständig in den Automatikbetrieb wechselt. Wird dieser Wert nicht spezifiziert so wird der Interne Vorgabewert von 1 Stunde <text:s/>verwendet. Wenn der Eingang IN = TRUE ist, werden die Ausgänge QU und QD auf Automatik (beide TRUE) gesetzt und die Eingänge PI und AI auf die Ausgänge PO und AO geschaltet. Die Eingänge POS und <text:s/>ANG sind die Rückführungseingänge für die aktuelle Position der Jalousie. Diese Werte werden von dem Modul BLIND_CONTROL bereitgestellt. Mit der Config Variable CLICK_MODE wird ein Tast Betrieb festgelegt, ein kurzer Tastendruck startet die Richtung Auf für S1 und Ab für S2 und ein zweiter kurzer Tastendruck beendet die entsprechende Richtung oder kehrt die Richtung um. Diese Einstellung ist für Rollladen mit langer Laufzeit Sinnvoll, oder um mit einem kurzen Tastendruck in eine Endstellung zu fahren. wird der Tastendruck länger als die Config Zeit CLICK_TIME so wird für diesen Tastendruck der CLICK Modus verlassen und die Jalousie fährt solange wie die Taste gedrückt bleibt. Ist ein Tastendruck kürzer als CLICK_TIME so Fährt die Jalousie weiter bis ein weiterer Klick die Fahrt beendet oder eine Endstellung erreicht wird. Der Vorgabewert für CLICK_TIME ist 200 Millisekunden und die Vorgabe für CLICK_MODE ist TRUE. Wenn beide Config Variable CLICK_MODE und SINGLE_SWITCH gleichzeitug TRUE sind wird ein Tastbetrieb mit nur einem Taster an S1 ermöglicht. Mit der über MAX_RUNTIME eingestellten Zeit wird die Laufzeit begrenzt die durch einen einfachen </text:span><text:span text:style-name="T16">Click</text:span><text:span text:style-name="T21"> gestartet wird aber nicht mit einem weiteren </text:span><text:span text:style-name="T16">Click</text:span><text:span text:style-name="T21"> beendet wird. Der MAX_</text:span><text:span text:style-name="T16">RUNTIME</text:span><text:span text:style-name="T21"> ist mit T#60s vorbelegt und sollte solange sein das die Jalousie sicher aus jeder beliebigen Stellung die Endstellung erreichen kann. Zwei Ausgänge D1 und D2 können benutzt werden um einen Doppelklick auf S1 oder S2 auszuwerten, Ein Doppelklick schaltet den entsprechenden Ausgang ein und ein weitere Doppelklick wieder aus. Mithilfe der Setup Variablen DBL_CLK?, <text:s/>DBL_CLK?_POS und <text:s/>DBL_CLK?_ANG kann ein Doppelklick auch dazu benutzt werden um eine bestimmte vordefinierte Position anzufahren. Sobald die Variable DBL_CLK? auf TRUE gesetzt ist wird bei einem Doppelklick nicht mehr der entsprechende Ausgang D1 oder D2 gesetzt sondern Automatisch die vorprogrammierte Position angefahren. So kann ein Doppelklick je nach Programmierung benutzt werden um nachgeschaltete Module wie z.B. Beschattung Ein- oder Aus-zuschalten, oder aber eine Vordefinierte Position anzufahren. </text:span></text:p>
      <text:p text:style-name="P185">Die folgende Tabelle zeigt die Betriebszustände des Bausteins:</text:p>
      <table:table table:name="Tabelle47" table:style-name="Tabelle47">
        <table:table-column table:style-name="Tabelle47.A"/>
        <table:table-column table:style-name="Tabelle47.B"/>
        <table:table-column table:style-name="Tabelle47.C"/>
        <table:table-column table:style-name="Tabelle47.B" table:number-columns-repeated="2"/>
        <table:table-column table:style-name="Tabelle47.F"/>
        <table:table-column table:style-name="Tabelle47.A"/>
        <table:table-column table:style-name="Tabelle47.B"/>
        <table:table-column table:style-name="Tabelle47.C"/>
        <table:table-column table:style-name="Tabelle47.B"/>
        <table:table-column table:style-name="Tabelle47.K"/>
        <table:table-row>
          <table:table-cell table:style-name="Tabelle47.A1" office:value-type="string">
            <text:p text:style-name="P101">POS</text:p>
            <text:p text:style-name="P101">ANG</text:p>
          </table:table-cell>
          <table:table-cell table:style-name="Tabelle47.A1" office:value-type="string">
            <text:p text:style-name="P101">S1</text:p>
          </table:table-cell>
          <table:table-cell table:style-name="Tabelle47.A1" office:value-type="string">
            <text:p text:style-name="P101">S2</text:p>
          </table:table-cell>
          <table:table-cell table:style-name="Tabelle47.A1" office:value-type="string">
            <text:p text:style-name="P101">IN</text:p>
          </table:table-cell>
          <table:table-cell table:style-name="Tabelle47.A1" office:value-type="string">
            <text:p text:style-name="P101">PI</text:p>
            <text:p text:style-name="P101">AI</text:p>
          </table:table-cell>
          <table:table-cell table:style-name="Tabelle47.A1" office:value-type="string">
            <text:p text:style-name="P101">QU</text:p>
          </table:table-cell>
          <table:table-cell table:style-name="Tabelle47.A1" office:value-type="string">
            <text:p text:style-name="P101">QD</text:p>
          </table:table-cell>
          <table:table-cell table:style-name="Tabelle47.A1" office:value-type="string">
            <text:p text:style-name="P101">PO</text:p>
            <text:p text:style-name="P101">AO</text:p>
          </table:table-cell>
          <table:table-cell table:style-name="Tabelle47.A1" office:value-type="string">
            <text:p text:style-name="P101">D1</text:p>
          </table:table-cell>
          <table:table-cell table:style-name="Tabelle47.A1" office:value-type="string">
            <text:p text:style-name="P101">D2</text:p>
          </table:table-cell>
          <table:table-cell table:style-name="Tabelle47.K1" office:value-type="string">
            <text:p text:style-name="P120"/>
          </table:table-cell>
        </table:table-row>
        <table:table-row>
          <table:table-cell table:style-name="Tabelle47.A2" office:value-type="string">
            <text:p text:style-name="P107">-</text:p>
          </table:table-cell>
          <table:table-cell table:style-name="Tabelle47.A2" office:value-type="string">
            <text:p text:style-name="P107">-</text:p>
          </table:table-cell>
          <table:table-cell table:style-name="Tabelle47.A2" office:value-type="string">
            <text:p text:style-name="P107">-</text:p>
          </table:table-cell>
          <table:table-cell table:style-name="Tabelle47.A2" office:value-type="string">
            <text:p text:style-name="P107">H</text:p>
          </table:table-cell>
          <table:table-cell table:style-name="Tabelle47.A2" office:value-type="string">
            <text:p text:style-name="P107">X</text:p>
          </table:table-cell>
          <table:table-cell table:style-name="Tabelle47.A2" office:value-type="string">
            <text:p text:style-name="P107">H</text:p>
          </table:table-cell>
          <table:table-cell table:style-name="Tabelle47.A2" office:value-type="string">
            <text:p text:style-name="P107">H</text:p>
          </table:table-cell>
          <table:table-cell table:style-name="Tabelle47.A2" office:value-type="string">
            <text:p text:style-name="P107">X</text:p>
          </table:table-cell>
          <table:table-cell table:style-name="Tabelle47.A2" office:value-type="string">
            <text:p text:style-name="P107">L</text:p>
          </table:table-cell>
          <table:table-cell table:style-name="Tabelle47.A2" office:value-type="string">
            <text:p text:style-name="P107">L</text:p>
          </table:table-cell>
          <table:table-cell table:style-name="Tabelle47.K2" office:value-type="string">
            <text:p text:style-name="P107">gesteuerter Betrieb, PI und AI werden angefahren</text:p>
          </table:table-cell>
        </table:table-row>
        <table:table-row>
          <table:table-cell table:style-name="Tabelle47.A2" office:value-type="string">
            <text:p text:style-name="P107">-</text:p>
          </table:table-cell>
          <table:table-cell table:style-name="Tabelle47.A2" office:value-type="string">
            <text:p text:style-name="P107">L</text:p>
          </table:table-cell>
          <table:table-cell table:style-name="Tabelle47.A2" office:value-type="string">
            <text:p text:style-name="P107">L</text:p>
          </table:table-cell>
          <table:table-cell table:style-name="Tabelle47.A2" office:value-type="string">
            <text:p text:style-name="P107">L</text:p>
          </table:table-cell>
          <table:table-cell table:style-name="Tabelle47.A2" office:value-type="string">
            <text:p text:style-name="P107">-</text:p>
          </table:table-cell>
          <table:table-cell table:style-name="Tabelle47.A2" office:value-type="string">
            <text:p text:style-name="P107">H</text:p>
          </table:table-cell>
          <table:table-cell table:style-name="Tabelle47.A2" office:value-type="string">
            <text:p text:style-name="P107">H</text:p>
          </table:table-cell>
          <table:table-cell table:style-name="Tabelle47.A2" office:value-type="string">
            <text:p text:style-name="P107">*1</text:p>
          </table:table-cell>
          <table:table-cell table:style-name="Tabelle47.A2" office:value-type="string">
            <text:p text:style-name="P107">L</text:p>
          </table:table-cell>
          <table:table-cell table:style-name="Tabelle47.A2" office:value-type="string">
            <text:p text:style-name="P107">L</text:p>
          </table:table-cell>
          <table:table-cell table:style-name="Tabelle47.K2" office:value-type="string">
            <text:p text:style-name="P107">Automatikbetrieb</text:p>
          </table:table-cell>
        </table:table-row>
        <table:table-row>
          <table:table-cell table:style-name="Tabelle47.A2" office:value-type="string">
            <text:p text:style-name="P107">X</text:p>
          </table:table-cell>
          <table:table-cell table:style-name="Tabelle47.A2" office:value-type="string">
            <text:p text:style-name="P107">H</text:p>
          </table:table-cell>
          <table:table-cell table:style-name="Tabelle47.A2" office:value-type="string">
            <text:p text:style-name="P107">L</text:p>
          </table:table-cell>
          <table:table-cell table:style-name="Tabelle47.A2" office:value-type="string">
            <text:p text:style-name="P107">L</text:p>
          </table:table-cell>
          <table:table-cell table:style-name="Tabelle47.A2" office:value-type="string">
            <text:p text:style-name="P107">-</text:p>
          </table:table-cell>
          <table:table-cell table:style-name="Tabelle47.A2" office:value-type="string">
            <text:p text:style-name="P107">H</text:p>
          </table:table-cell>
          <table:table-cell table:style-name="Tabelle47.A2" office:value-type="string">
            <text:p text:style-name="P107">L</text:p>
          </table:table-cell>
          <table:table-cell table:style-name="Tabelle47.A2" office:value-type="string">
            <text:p text:style-name="P107">X</text:p>
          </table:table-cell>
          <table:table-cell table:style-name="Tabelle47.A2" office:value-type="string">
            <text:p text:style-name="P107">L</text:p>
          </table:table-cell>
          <table:table-cell table:style-name="Tabelle47.A2" office:value-type="string">
            <text:p text:style-name="P107">L</text:p>
          </table:table-cell>
          <table:table-cell table:style-name="Tabelle47.K2" office:value-type="string">
            <text:p text:style-name="P107">Handbetrieb Auf</text:p>
          </table:table-cell>
        </table:table-row>
        <table:table-row>
          <table:table-cell table:style-name="Tabelle47.A2" office:value-type="string">
            <text:p text:style-name="P107">X</text:p>
          </table:table-cell>
          <table:table-cell table:style-name="Tabelle47.A2" office:value-type="string">
            <text:p text:style-name="P107">L</text:p>
          </table:table-cell>
          <table:table-cell table:style-name="Tabelle47.A2" office:value-type="string">
            <text:p text:style-name="P107">H</text:p>
          </table:table-cell>
          <table:table-cell table:style-name="Tabelle47.A2" office:value-type="string">
            <text:p text:style-name="P107">L</text:p>
          </table:table-cell>
          <table:table-cell table:style-name="Tabelle47.A2" office:value-type="string">
            <text:p text:style-name="P107">-</text:p>
          </table:table-cell>
          <table:table-cell table:style-name="Tabelle47.A2" office:value-type="string">
            <text:p text:style-name="P107">L</text:p>
          </table:table-cell>
          <table:table-cell table:style-name="Tabelle47.A2" office:value-type="string">
            <text:p text:style-name="P107">H</text:p>
          </table:table-cell>
          <table:table-cell table:style-name="Tabelle47.A2" office:value-type="string">
            <text:p text:style-name="P107">X</text:p>
          </table:table-cell>
          <table:table-cell table:style-name="Tabelle47.A2" office:value-type="string">
            <text:p text:style-name="P107">L</text:p>
          </table:table-cell>
          <table:table-cell table:style-name="Tabelle47.A2" office:value-type="string">
            <text:p text:style-name="P107">L</text:p>
          </table:table-cell>
          <table:table-cell table:style-name="Tabelle47.K2" office:value-type="string">
            <text:p text:style-name="P107">Handbetrieb Ab</text:p>
          </table:table-cell>
        </table:table-row>
        <text:soft-page-break/>
        <table:table-row>
          <table:table-cell table:style-name="Tabelle47.A2" office:value-type="string">
            <text:p text:style-name="P107">X</text:p>
          </table:table-cell>
          <table:table-cell table:style-name="Tabelle47.A2" office:value-type="string">
            <text:p text:style-name="P107">L</text:p>
          </table:table-cell>
          <table:table-cell table:style-name="Tabelle47.A2" office:value-type="string">
            <text:p text:style-name="P107">L</text:p>
          </table:table-cell>
          <table:table-cell table:style-name="Tabelle47.A2" office:value-type="string">
            <text:p text:style-name="P107">L</text:p>
          </table:table-cell>
          <table:table-cell table:style-name="Tabelle47.A2" office:value-type="string">
            <text:p text:style-name="P107">-</text:p>
          </table:table-cell>
          <table:table-cell table:style-name="Tabelle47.A2" office:value-type="string">
            <text:p text:style-name="P107">L</text:p>
          </table:table-cell>
          <table:table-cell table:style-name="Tabelle47.A2" office:value-type="string">
            <text:p text:style-name="P107">L</text:p>
          </table:table-cell>
          <table:table-cell table:style-name="Tabelle47.A2" office:value-type="string">
            <text:p text:style-name="P107">X</text:p>
          </table:table-cell>
          <table:table-cell table:style-name="Tabelle47.A2" office:value-type="string">
            <text:p text:style-name="P107">L</text:p>
          </table:table-cell>
          <table:table-cell table:style-name="Tabelle47.A2" office:value-type="string">
            <text:p text:style-name="P107">L</text:p>
          </table:table-cell>
          <table:table-cell table:style-name="Tabelle47.K2" office:value-type="string">
            <text:p text:style-name="P107">Handbetrieb Standby bis Timeout abläuft</text:p>
          </table:table-cell>
        </table:table-row>
        <table:table-row>
          <table:table-cell table:style-name="Tabelle47.A2" office:value-type="string">
            <text:p text:style-name="P107">-</text:p>
          </table:table-cell>
          <table:table-cell table:style-name="Tabelle47.A2" office:value-type="string">
            <text:p text:style-name="P107">*2</text:p>
          </table:table-cell>
          <table:table-cell table:style-name="Tabelle47.A2" office:value-type="string">
            <text:p text:style-name="P107">L</text:p>
          </table:table-cell>
          <table:table-cell table:style-name="Tabelle47.A2" office:value-type="string">
            <text:p text:style-name="P107">L</text:p>
          </table:table-cell>
          <table:table-cell table:style-name="Tabelle47.A2" office:value-type="string">
            <text:p text:style-name="P107">-</text:p>
          </table:table-cell>
          <table:table-cell table:style-name="Tabelle47.A2" office:value-type="string">
            <text:p text:style-name="P107">H</text:p>
          </table:table-cell>
          <table:table-cell table:style-name="Tabelle47.A2" office:value-type="string">
            <text:p text:style-name="P107">H</text:p>
          </table:table-cell>
          <table:table-cell table:style-name="Tabelle47.A2" office:value-type="string">
            <text:p text:style-name="P107">-</text:p>
          </table:table-cell>
          <table:table-cell table:style-name="Tabelle47.A2" office:value-type="string">
            <text:p text:style-name="P107">/ D1</text:p>
          </table:table-cell>
          <table:table-cell table:style-name="Tabelle47.A2" office:value-type="string">
            <text:p text:style-name="P107">L</text:p>
          </table:table-cell>
          <table:table-cell table:style-name="Tabelle47.K2" office:value-type="string">
            <text:p text:style-name="P107">Ausgang D1 wird invertiert</text:p>
          </table:table-cell>
        </table:table-row>
        <table:table-row>
          <table:table-cell table:style-name="Tabelle47.A2" office:value-type="string">
            <text:p text:style-name="P107">-</text:p>
          </table:table-cell>
          <table:table-cell table:style-name="Tabelle47.A2" office:value-type="string">
            <text:p text:style-name="P107">L</text:p>
          </table:table-cell>
          <table:table-cell table:style-name="Tabelle47.A2" office:value-type="string">
            <text:p text:style-name="P107">*2</text:p>
          </table:table-cell>
          <table:table-cell table:style-name="Tabelle47.A2" office:value-type="string">
            <text:p text:style-name="P107">L</text:p>
          </table:table-cell>
          <table:table-cell table:style-name="Tabelle47.A2" office:value-type="string">
            <text:p text:style-name="P107">-</text:p>
          </table:table-cell>
          <table:table-cell table:style-name="Tabelle47.A2" office:value-type="string">
            <text:p text:style-name="P107">H</text:p>
          </table:table-cell>
          <table:table-cell table:style-name="Tabelle47.A2" office:value-type="string">
            <text:p text:style-name="P107">H</text:p>
          </table:table-cell>
          <table:table-cell table:style-name="Tabelle47.A2" office:value-type="string">
            <text:p text:style-name="P107">-</text:p>
          </table:table-cell>
          <table:table-cell table:style-name="Tabelle47.A2" office:value-type="string">
            <text:p text:style-name="P107">L</text:p>
          </table:table-cell>
          <table:table-cell table:style-name="Tabelle47.A2" office:value-type="string">
            <text:p text:style-name="P107">/D2</text:p>
          </table:table-cell>
          <table:table-cell table:style-name="Tabelle47.K2" office:value-type="string">
            <text:p text:style-name="P107">Ausgang D2 wird invertiert</text:p>
          </table:table-cell>
        </table:table-row>
        <table:table-row>
          <table:table-cell table:style-name="Tabelle47.K2" table:number-columns-spanned="11" office:value-type="string">
            <text:p text:style-name="P137">*1 <text:s text:c="2"/>bei Übergang in den Automatikbetrieb werden die Ausgänge PO und AO auf den letzten Stand von POS und ANG gesetzt</text:p>
            <text:p text:style-name="P138">*2 <text:s text:c="2"/>Doppelklick (wenn DBL_CLK? auf FALSE steht</text:p>
          </table:table-cell>
          <table:covered-table-cell/>
          <table:covered-table-cell/>
          <table:covered-table-cell/>
          <table:covered-table-cell/>
          <table:covered-table-cell/>
          <table:covered-table-cell/>
          <table:covered-table-cell/>
          <table:covered-table-cell/>
          <table:covered-table-cell/>
          <table:covered-table-cell/>
        </table:table-row>
      </table:table>
      <text:p text:style-name="P185"/>
      <text:p text:style-name="P185">Der Ausgang STATUS ist ESR kompatibel und gibt Statusmeldungen über Zustandsänderungen aus.</text:p>
      <table:table table:name="Tabelle17" table:style-name="Tabelle17">
        <table:table-column table:style-name="Tabelle17.A"/>
        <table:table-column table:style-name="Tabelle17.B"/>
        <table:table-row>
          <table:table-cell table:style-name="Tabelle17.A1" office:value-type="string">
            <text:p text:style-name="P98">STATUS</text:p>
          </table:table-cell>
          <table:table-cell table:style-name="Tabelle17.B1" office:value-type="string">
            <text:p text:style-name="P98">Bedeutung</text:p>
          </table:table-cell>
        </table:table-row>
        <table:table-row>
          <table:table-cell table:style-name="Tabelle17.A2" office:value-type="string">
            <text:p text:style-name="P103">0</text:p>
          </table:table-cell>
          <table:table-cell table:style-name="Tabelle17.B2" office:value-type="string">
            <text:p text:style-name="P103">keine Meldung</text:p>
          </table:table-cell>
        </table:table-row>
        <table:table-row>
          <table:table-cell table:style-name="Tabelle17.A2" office:value-type="string">
            <text:p text:style-name="P103">131</text:p>
          </table:table-cell>
          <table:table-cell table:style-name="Tabelle17.B2" office:value-type="string">
            <text:p text:style-name="P119">Forced Input Active</text:p>
          </table:table-cell>
        </table:table-row>
        <table:table-row>
          <table:table-cell table:style-name="Tabelle17.A2" office:value-type="string">
            <text:p text:style-name="P103">132</text:p>
          </table:table-cell>
          <table:table-cell table:style-name="Tabelle17.B2" office:value-type="string">
            <text:p text:style-name="P103">Manual Auf</text:p>
          </table:table-cell>
        </table:table-row>
        <table:table-row>
          <table:table-cell table:style-name="Tabelle17.A2" office:value-type="string">
            <text:p text:style-name="P103">133</text:p>
          </table:table-cell>
          <table:table-cell table:style-name="Tabelle17.B2" office:value-type="string">
            <text:p text:style-name="P103">Manual Ab</text:p>
          </table:table-cell>
        </table:table-row>
        <table:table-row>
          <table:table-cell table:style-name="Tabelle17.A2" office:value-type="string">
            <text:p text:style-name="P103">134</text:p>
          </table:table-cell>
          <table:table-cell table:style-name="Tabelle17.B2" office:value-type="string">
            <text:p text:style-name="P103">Auto Mode nach <text:span text:style-name="T2">Timeout</text:span></text:p>
          </table:table-cell>
        </table:table-row>
        <table:table-row>
          <table:table-cell table:style-name="Tabelle17.A2" office:value-type="string">
            <text:p text:style-name="P103">135</text:p>
          </table:table-cell>
          <table:table-cell table:style-name="Tabelle17.B2" office:value-type="string">
            <text:p text:style-name="P103">Doppelklick an S1 schaltet D1 on</text:p>
          </table:table-cell>
        </table:table-row>
        <table:table-row>
          <table:table-cell table:style-name="Tabelle17.A2" office:value-type="string">
            <text:p text:style-name="P103">136</text:p>
          </table:table-cell>
          <table:table-cell table:style-name="Tabelle17.B2" office:value-type="string">
            <text:p text:style-name="P103">Doppelklick an S2 schaltet D2</text:p>
          </table:table-cell>
        </table:table-row>
      </table:table>
      <text:p text:style-name="P185"/>
      <text:p text:style-name="P185"><draw:frame draw:style-name="fr3" draw:name="Grafik334" text:anchor-type="paragraph" svg:x="1.178cm" svg:y="1.168cm" svg:width="15.311cm" svg:height="3.93cm" draw:z-index="668"><draw:image xlink:href="Pictures/10000000000004CF0000013CA2605BF5.png" xlink:type="simple" xlink:show="embed" xlink:actuate="onLoad"/></draw:frame>Das folgende Beispiel zeigt den Aufbau eines Jalousiecontrollers mit dem Baustein BLIND_INPUT und BLIND_CONTROL:</text:p>
      <text:p text:style-name="P185"/>
      <text:p text:style-name="P185">Die Verwendung weiterer BLIND Module ist optional und dient dazu den Funktionsumfang zu erweitern. BLIND_INPUT und BLIND_CONTROL ergeben bereits eine vollwertige Jalousiesteuerung.</text:p>
      <text:p text:style-name="P185"><draw:frame draw:style-name="fr3" draw:name="Grafik675" text:anchor-type="paragraph" svg:x="1.222cm" svg:y="2.147cm" svg:width="15.439cm" svg:height="4.521cm" draw:z-index="669"><draw:image xlink:href="Pictures/100000000000048F00000156E2A5C0D1.png" xlink:type="simple" xlink:show="embed" xlink:actuate="onLoad"/></draw:frame>BLIND_INPUT kann an den beiden Eingängen S1 und S2 jeweils einen Doppelklick dekodieren und schaltet damit die beiden Ausgänge D1 und D2. Diese Ausgänge können dazu benutzt werden nachgeschaltete Funktionsblöcke oder sonstige Ereignisse zu steuern.</text:p>
      <text:p text:style-name="P185"><text:soft-page-break/></text:p>
      <text:list xml:id="list38451622" text:continue-numbering="true" text:style-name="L1">
        <text:list-item>
          <text:list>
            <text:list-item>
              <text:h text:style-name="P216" text:outline-level="2"><text:alphabetical-index-mark-start text:id="IMark225941772"/>BLIND_NIGHT<text:alphabetical-index-mark-end text:id="IMark225941772"/></text:h>
            </text:list-item>
          </text:list>
        </text:list-item>
      </text:list>
      <text:p text:style-name="P75">Type<text:tab/>Funktionsbaustein</text:p>
      <text:p text:style-name="P172"><text:span text:style-name="T16">Input</text:span><text:span text:style-name="T21"><text:tab/>UP : BOOL (Eingang AUF)</text:span></text:p>
      <text:p text:style-name="P185"><text:tab/>DN : BOOL (Eingang AB)</text:p>
      <text:p text:style-name="P185"><text:tab/>S_IN : BYTE (ESR kompatibler Status Eingang)</text:p>
      <text:p text:style-name="P185"><text:tab/>PI : BYTE (Eingangswert der Jalousiestellung im </text:p>
      <text:p text:style-name="P185"><text:tab/>Automatikbetrieb)</text:p>
      <text:p text:style-name="P185"><text:tab/>AI : BYTE (Eingangswert des Lamellenwinkels im </text:p>
      <text:p text:style-name="P185"><text:tab/>Automatikbetrieb)</text:p>
      <text:p text:style-name="P185"><text:tab/>E_NIGHT : BOOL (Automatische Nachtschaltung ein)</text:p>
      <text:p text:style-name="P185"><text:tab/>E_DAY : BOOL (Automatische Tagschaltung ein)</text:p>
      <text:p text:style-name="P185"><text:tab/>DTIN : DT (Datum und Tageszeit in Weltzeit UTC)</text:p>
      <text:p text:style-name="P185"><text:tab/>SUNRISE : TOD (Zeit für Sonnenaufgang)</text:p>
      <text:p text:style-name="P185"><text:tab/>SUNSET : TOD (Zeit für Sonnenuntergang)</text:p>
      <text:p text:style-name="P185">Config<text:tab/>SUNRISE_OFFSET : TIME (Verzögerung bei Sonnenuntergang)</text:p>
      <text:p text:style-name="P185"><text:tab/>SUNSET_OFFSET : TIME (Verzögerung bei Sonnenaufgang)</text:p>
      <text:p text:style-name="P185"><text:tab/>NIGHT_POSITION : BYTE (Position für Nachtschaltung)</text:p>
      <text:p text:style-name="P185"><text:tab/>NIGHT_ANGLE : BYTE (Winkel für Nachtschaltung)</text:p>
      <text:p text:style-name="P185">Output<text:tab/>QU : BOOL (Motor Auf Signal)</text:p>
      <text:p text:style-name="P185"><text:tab/>QD : BOOL (Motor Ab Signal)</text:p>
      <text:p text:style-name="P185"><text:tab/>STATUS : BYTE (ESR kompatibler Status Ausgang)</text:p>
      <text:p text:style-name="P185"><text:soft-page-break/><text:tab/>PO : BYTE (Ausgangswert der Jalousiestellung im </text:p>
      <text:p text:style-name="P185"><text:tab/>Automatikbetrieb)</text:p>
      <text:p text:style-name="P185"><text:tab/>AO : BYTE (Ausgangswert des Lamellenwinkels im </text:p>
      <text:p text:style-name="P185"><draw:frame draw:style-name="fr3" draw:name="Grafik335" text:anchor-type="paragraph" svg:x="1.111cm" svg:y="0.66cm" svg:width="3.69cm" svg:height="4.701cm" draw:z-index="301"><draw:image xlink:href="Pictures/100000000000011700000163A7B78A37.png" xlink:type="simple" xlink:show="embed" xlink:actuate="onLoad"/></draw:frame><text:tab/>Automatikbetrieb)</text:p>
      <text:p text:style-name="P185"><text:line-break/>BLIND_NIGHT dient dazu die Rollladen oder Jalousie bei Nacht zu schließen. Der Baustein schließt automatisch nach Sonnenuntergang mit einer Verzögerung von SUNSET_OFFSET die Jalousie und fährt die Jalousie nach Sonnenaufgang mit einer Verzögerung von SUNRISE_OFFSET wieder auf die Position die vor der Nachtbeschattung bestanden hat zurück. Das Schließen und Öffnen kann separat mit den Eingängen E_NIGHT für schließen und E_DAY für öffnen Freigeschaltet werden. Wird zum Beispiel E_NIGHT auf TRUE gestellt und E_DAY nicht so fährt am Abend bei Dämmerung die Jalousie herunter, jedoch muss sie am nächsten Morgen manuell Hochgefahren werden. Werden E_NIGHT und E_DAY nicht beschaltet so werden beide intern auf TRUE gesetzt. Damit die entsprechenden Zeiten ermittelt werden können benötigt der Baustein die Tageszeit nach Weltzeit (DTIN) und die entsprechenden Zeiten für Sonnenaufgang (SUNRISE) und Sonnenuntergang (SUNSET). Die Zeiten für Sonnenaufgang und Sonnenuntergang liefert der Baustein SUN_TIME aus der Bibliothek unter Zeit- Datums-Funktionen. UP, DN und SIN sind die Eingänge von anderen BLIND Modulen und werden im Tagesbetrieb an die Ausgänge QU, QD und STATUS weitergegeben. Die Signale PI, AI und PO, AO reichen die Werte für die Position und den Lamellenwinkel der Jalousie an die folgenden Bausteine weiter. Im Nachtbetrieb werden an den Ausgängen PO und AO die Werte für den Nachtbetrieb ausgegeben, jegliche manuelle Betätigung löscht den Automatischen Nachtbetrieb. BLIND_NIGHT beendet den Nachtbetrieb indem es auf die zuletzt (vor Beginn der Nachtbeschattung) an den Eingängen PI und AI anliegende Position fährt. Die Jalousie wird also nur dann hochgefahren wenn sie bei Beginn der Nachtbeschattung auch oben war.</text:p>
      <text:p text:style-name="P185">Der Eingang S_IN und der Ausgang STATUS sind ESR kompatible Aus und Eingänge , über den Eingang S_IN melden vorgeschaltete Funktionen Ihren Status an das Modul, dieser Status wird an den Ausgang STATUS weitergeleitet, und eigene Statusmeldungen werden über STATUS Ausgegeben.</text:p>
      <table:table table:name="Tabelle18" table:style-name="Tabelle18">
        <table:table-column table:style-name="Tabelle18.A"/>
        <table:table-column table:style-name="Tabelle18.B"/>
        <table:table-row>
          <table:table-cell table:style-name="Tabelle18.A1" office:value-type="string">
            <text:p text:style-name="P126">STATUS</text:p>
          </table:table-cell>
          <table:table-cell table:style-name="Tabelle18.B1" office:value-type="string">
            <text:p text:style-name="P126">Bedeutung<text:soft-page-break/></text:p>
          </table:table-cell>
        </table:table-row>
        <table:table-row>
          <table:table-cell table:style-name="Tabelle18.A2" office:value-type="string">
            <text:p text:style-name="P126">0</text:p>
          </table:table-cell>
          <table:table-cell table:style-name="Tabelle18.B2" office:value-type="string">
            <text:p text:style-name="P126">keine Meldung</text:p>
          </table:table-cell>
        </table:table-row>
        <table:table-row>
          <table:table-cell table:style-name="Tabelle18.A2" office:value-type="string">
            <text:p text:style-name="P126">141</text:p>
          </table:table-cell>
          <table:table-cell table:style-name="Tabelle18.B2" office:value-type="string">
            <text:p text:style-name="P126">Nachtbetrieb</text:p>
          </table:table-cell>
        </table:table-row>
        <table:table-row>
          <table:table-cell table:style-name="Tabelle18.A2" office:value-type="string">
            <text:p text:style-name="P126">NNN</text:p>
          </table:table-cell>
          <table:table-cell table:style-name="Tabelle18.B2" office:value-type="string">
            <text:p text:style-name="P126">weitergereichte Meldungen</text:p>
          </table:table-cell>
        </table:table-row>
      </table:table>
      <text:p text:style-name="P185"/>
      <text:p text:style-name="P185"><draw:frame draw:style-name="fr3" draw:name="Grafik331" text:anchor-type="paragraph" svg:x="1.023cm" svg:y="1.101cm" svg:width="15.998cm" svg:height="5.754cm" draw:z-index="302"><draw:image xlink:href="Pictures/100000000000031B0000011E629C30B1.png" xlink:type="simple" xlink:show="embed" xlink:actuate="onLoad"/></draw:frame>Die folgende Grafik zeigt die Verschaltung von BLIND_NIGHT mit anderen Modulen zur Jalousiesteuerung:</text:p>
      <text:p text:style-name="P185"/>
      <text:list xml:id="list38458816" text:continue-numbering="true" text:style-name="L1">
        <text:list-item>
          <text:list>
            <text:list-item>
              <text:h text:style-name="P216" text:outline-level="2"><text:alphabetical-index-mark-start text:id="IMark225941772"/><text:span text:style-name="T27">BLIND_</text:span>SCENE<text:alphabetical-index-mark-end text:id="IMark225941772"/></text:h>
            </text:list-item>
          </text:list>
        </text:list-item>
      </text:list>
      <text:p text:style-name="P75">Type<text:tab/>Funktionsbaustein</text:p>
      <text:p text:style-name="P172"><text:span text:style-name="T16">Input</text:span><text:span text:style-name="T21"><text:tab/>UP : BOOL (Eingang AUF)</text:span></text:p>
      <text:p text:style-name="P185"><text:tab/>DN : BOOL (Eingang AB)</text:p>
      <text:p text:style-name="P185"><text:tab/>S_IN : BYTE (ESR kompatibler Status Eingang)</text:p>
      <text:p text:style-name="P185"><text:tab/>PI : BYTE (Eingangswert der Jalousiestellung im </text:p>
      <text:p text:style-name="P185"><text:tab/>Automatikbetrieb)</text:p>
      <text:p text:style-name="P185"><text:tab/>AI : BYTE (Eingangswert des Lamellenwinkels im </text:p>
      <text:p text:style-name="P185"><text:tab/>Automatikbetrieb)</text:p>
      <text:p text:style-name="P185"><text:tab/>ENABLE : BOOL (Freigabeeingang für Szenen)</text:p>
      <text:p text:style-name="P185"><text:tab/>SWRITE : BOOL (Schreibeingang für Szenen)</text:p>
      <text:p text:style-name="P185"><text:tab/>SCENE : BYTE (Nummer der Szene)</text:p>
      <text:p text:style-name="P185"><text:soft-page-break/>Output<text:tab/>QU : BOOL (Motor Auf Signal)</text:p>
      <text:p text:style-name="P185"><text:tab/>QD : BOOL (Motor Ab Signal)</text:p>
      <text:p text:style-name="P185"><text:tab/>STATUS : BYTE (ESR kompatibler Status Ausgang)</text:p>
      <text:p text:style-name="P185"><text:tab/>PO : BYTE (Ausgangswert der Jalousiestellung im </text:p>
      <text:p text:style-name="P185"><text:tab/>Automatikbetrieb)</text:p>
      <text:p text:style-name="P75"><text:tab/>AO : BYTE (Ausgangswert des Lamellenwinkels im </text:p>
      <text:p text:style-name="P185"><draw:frame draw:style-name="fr3" draw:name="Grafik361" text:anchor-type="paragraph" svg:x="1.134cm" svg:y="0.69cm" svg:width="3.47cm" svg:height="3.9cm" draw:z-index="340"><draw:image xlink:href="Pictures/100000000000010600000127326F07A3.png" xlink:type="simple" xlink:show="embed" xlink:actuate="onLoad"/></draw:frame><text:tab/>Automatikbetrieb)</text:p>
      <text:p text:style-name="P185"><text:line-break/>BLIND_SCENE speichert bis zu 16 Szenen bestehend aus jeweils aktueller Jalousiestellung und Winkel ab und kann diese Szenen bei Abruf wieder herstellen. jede einzelne Szene kann aktiv oder inaktiv sein, abhängig davon ob beim Speichern der Szene der Eingang ENABLE TRUE war oder nicht (ENABLE = TRUE bedeutet aktiv). Eine Szene wird abgerufen indem die Nummer der Szene ( 0 .. 15) am Eingang SCENE angelegt wird und gleichzeitig ENABLE auf TRUE gesetzt wird. Eine Szene kann nur dann abgerufen werden wenn die beiden Eingänge UP und DN gleichzeitig TRUE sind (Automatik Modus). Dadurch ist sichergestellt das eine aktive Szene immer von der Manuellen Betriebsart überschrieben wird. </text:p>
      <text:p text:style-name="P12">Die folgende Tabelle verdeutlicht die Funktionsweise von BLIND_SCENE:</text:p>
      <table:table table:name="Tabelle20" table:style-name="Tabelle20">
        <table:table-column table:style-name="Tabelle20.A"/>
        <table:table-column table:style-name="Tabelle20.B"/>
        <table:table-column table:style-name="Tabelle20.C"/>
        <table:table-column table:style-name="Tabelle20.D"/>
        <table:table-column table:style-name="Tabelle20.E"/>
        <table:table-column table:style-name="Tabelle20.A"/>
        <table:table-column table:style-name="Tabelle20.G"/>
        <table:table-column table:style-name="Tabelle20.H"/>
        <table:table-column table:style-name="Tabelle20.I"/>
        <table:table-column table:style-name="Tabelle20.J"/>
        <table:table-row>
          <table:table-cell table:style-name="Tabelle20.A1" office:value-type="string">
            <text:p text:style-name="P30">UP</text:p>
          </table:table-cell>
          <table:table-cell table:style-name="Tabelle20.A1" office:value-type="string">
            <text:p text:style-name="P30">DN</text:p>
          </table:table-cell>
          <table:table-cell table:style-name="Tabelle20.A1" office:value-type="string">
            <text:p text:style-name="P30">ENABLE</text:p>
          </table:table-cell>
          <table:table-cell table:style-name="Tabelle20.A1" office:value-type="string">
            <text:p text:style-name="P30">SWRITE</text:p>
          </table:table-cell>
          <table:table-cell table:style-name="Tabelle20.A1" office:value-type="string">
            <text:p text:style-name="P30">SCENE</text:p>
          </table:table-cell>
          <table:table-cell table:style-name="Tabelle20.A1" office:value-type="string">
            <text:p text:style-name="P30">QU</text:p>
          </table:table-cell>
          <table:table-cell table:style-name="Tabelle20.A1" office:value-type="string">
            <text:p text:style-name="P30">QD</text:p>
          </table:table-cell>
          <table:table-cell table:style-name="Tabelle20.A1" office:value-type="string">
            <text:p text:style-name="P30">PO</text:p>
          </table:table-cell>
          <table:table-cell table:style-name="Tabelle20.A1" office:value-type="string">
            <text:p text:style-name="P30">AO</text:p>
          </table:table-cell>
          <table:table-cell table:style-name="Tabelle20.J1" office:value-type="string">
            <text:p text:style-name="P30"/>
          </table:table-cell>
        </table:table-row>
        <table:table-row>
          <table:table-cell table:style-name="Tabelle20.A2" office:value-type="string">
            <text:p text:style-name="P30">1</text:p>
          </table:table-cell>
          <table:table-cell table:style-name="Tabelle20.A2" office:value-type="string">
            <text:p text:style-name="P30">1</text:p>
          </table:table-cell>
          <table:table-cell table:style-name="Tabelle20.A2" office:value-type="string">
            <text:p text:style-name="P30">0</text:p>
          </table:table-cell>
          <table:table-cell table:style-name="Tabelle20.A2" office:value-type="string">
            <text:p text:style-name="P30">0</text:p>
          </table:table-cell>
          <table:table-cell table:style-name="Tabelle20.A2" office:value-type="string">
            <text:p text:style-name="P30">-</text:p>
          </table:table-cell>
          <table:table-cell table:style-name="Tabelle20.A2" office:value-type="string">
            <text:p text:style-name="P30">1</text:p>
          </table:table-cell>
          <table:table-cell table:style-name="Tabelle20.A2" office:value-type="string">
            <text:p text:style-name="P30">1</text:p>
          </table:table-cell>
          <table:table-cell table:style-name="Tabelle20.A2" office:value-type="string">
            <text:p text:style-name="P30">PI</text:p>
          </table:table-cell>
          <table:table-cell table:style-name="Tabelle20.A2" office:value-type="string">
            <text:p text:style-name="P30">AI</text:p>
          </table:table-cell>
          <table:table-cell table:style-name="Tabelle20.J2" office:value-type="string">
            <text:p text:style-name="P30">no scene</text:p>
          </table:table-cell>
        </table:table-row>
        <table:table-row>
          <table:table-cell table:style-name="Tabelle20.A2" office:value-type="string">
            <text:p text:style-name="P30">-</text:p>
          </table:table-cell>
          <table:table-cell table:style-name="Tabelle20.A2" office:value-type="string">
            <text:p text:style-name="P30">-</text:p>
          </table:table-cell>
          <table:table-cell table:style-name="Tabelle20.A2" office:value-type="string">
            <text:p text:style-name="P30">1</text:p>
          </table:table-cell>
          <table:table-cell table:style-name="Tabelle20.A2" office:value-type="string">
            <text:p text:style-name="P30">1</text:p>
          </table:table-cell>
          <table:table-cell table:style-name="Tabelle20.A2" office:value-type="string">
            <text:p text:style-name="P30">y</text:p>
          </table:table-cell>
          <table:table-cell table:style-name="Tabelle20.A2" office:value-type="string">
            <text:p text:style-name="P30">-</text:p>
          </table:table-cell>
          <table:table-cell table:style-name="Tabelle20.A2" office:value-type="string">
            <text:p text:style-name="P30">-</text:p>
          </table:table-cell>
          <table:table-cell table:style-name="Tabelle20.A2" office:value-type="string">
            <text:p text:style-name="P30">-</text:p>
          </table:table-cell>
          <table:table-cell table:style-name="Tabelle20.A2" office:value-type="string">
            <text:p text:style-name="P30">-</text:p>
          </table:table-cell>
          <table:table-cell table:style-name="Tabelle20.J2" office:value-type="string">
            <text:p text:style-name="P30"><text:span text:style-name="T2">write</text:span> scene <text:span text:style-name="T2">number</text:span> y</text:p>
          </table:table-cell>
        </table:table-row>
        <table:table-row>
          <table:table-cell table:style-name="Tabelle20.A2" office:value-type="string">
            <text:p text:style-name="P30">-</text:p>
          </table:table-cell>
          <table:table-cell table:style-name="Tabelle20.A2" office:value-type="string">
            <text:p text:style-name="P30">-</text:p>
          </table:table-cell>
          <table:table-cell table:style-name="Tabelle20.A2" office:value-type="string">
            <text:p text:style-name="P30">0</text:p>
          </table:table-cell>
          <table:table-cell table:style-name="Tabelle20.A2" office:value-type="string">
            <text:p text:style-name="P30">1</text:p>
          </table:table-cell>
          <table:table-cell table:style-name="Tabelle20.A2" office:value-type="string">
            <text:p text:style-name="P30">y</text:p>
          </table:table-cell>
          <table:table-cell table:style-name="Tabelle20.A2" office:value-type="string">
            <text:p text:style-name="P30">-</text:p>
          </table:table-cell>
          <table:table-cell table:style-name="Tabelle20.A2" office:value-type="string">
            <text:p text:style-name="P30">-</text:p>
          </table:table-cell>
          <table:table-cell table:style-name="Tabelle20.A2" office:value-type="string">
            <text:p text:style-name="P30">-</text:p>
          </table:table-cell>
          <table:table-cell table:style-name="Tabelle20.A2" office:value-type="string">
            <text:p text:style-name="P30">-</text:p>
          </table:table-cell>
          <table:table-cell table:style-name="Tabelle20.J2" office:value-type="string">
            <text:p text:style-name="P30"><text:span text:style-name="T2">disable</text:span> scene <text:span text:style-name="T2">number</text:span> y</text:p>
          </table:table-cell>
        </table:table-row>
        <table:table-row>
          <table:table-cell table:style-name="Tabelle20.A2" office:value-type="string">
            <text:p text:style-name="P30">1</text:p>
          </table:table-cell>
          <table:table-cell table:style-name="Tabelle20.A2" office:value-type="string">
            <text:p text:style-name="P30">1</text:p>
          </table:table-cell>
          <table:table-cell table:style-name="Tabelle20.A2" office:value-type="string">
            <text:p text:style-name="P30">1</text:p>
          </table:table-cell>
          <table:table-cell table:style-name="Tabelle20.A2" office:value-type="string">
            <text:p text:style-name="P30">0</text:p>
          </table:table-cell>
          <table:table-cell table:style-name="Tabelle20.A2" office:value-type="string">
            <text:p text:style-name="P30">y</text:p>
          </table:table-cell>
          <table:table-cell table:style-name="Tabelle20.A2" office:value-type="string">
            <text:p text:style-name="P30">1</text:p>
          </table:table-cell>
          <table:table-cell table:style-name="Tabelle20.A2" office:value-type="string">
            <text:p text:style-name="P30">1</text:p>
          </table:table-cell>
          <table:table-cell table:style-name="Tabelle20.A2" office:value-type="string">
            <text:p text:style-name="P30">-</text:p>
          </table:table-cell>
          <table:table-cell table:style-name="Tabelle20.A2" office:value-type="string">
            <text:p text:style-name="P30">-</text:p>
          </table:table-cell>
          <table:table-cell table:style-name="Tabelle20.J2" office:value-type="string">
            <text:p text:style-name="P30"><text:span text:style-name="T2">recall</text:span> scene <text:span text:style-name="T2">number</text:span> y</text:p>
          </table:table-cell>
        </table:table-row>
      </table:table>
      <text:p text:style-name="P12"/>
      <text:p text:style-name="P186">Der Eingang S_IN und der Ausgang STATUS sind ESR kompatible Aus und Eingänge , über den Eingang S_IN melden vorgeschaltete Bausteine Ihren Status an das Modul, dieser Status wird an den Ausgang STATUS weitergeleitet, und eigene Statusmeldungen werden über STATUS Ausgegeben.</text:p>
      <text:p text:style-name="P186"/>
      <table:table table:name="Tabelle19" table:style-name="Tabelle19">
        <table:table-column table:style-name="Tabelle19.A"/>
        <table:table-column table:style-name="Tabelle19.B"/>
        <text:soft-page-break/>
        <table:table-row>
          <table:table-cell table:style-name="Tabelle19.A1" office:value-type="string">
            <text:p text:style-name="P31">STATUS</text:p>
          </table:table-cell>
          <table:table-cell table:style-name="Tabelle19.B1" office:value-type="string">
            <text:p text:style-name="P31">Bedeutung</text:p>
          </table:table-cell>
        </table:table-row>
        <table:table-row>
          <table:table-cell table:style-name="Tabelle19.A2" office:value-type="string">
            <text:p text:style-name="P31">160 .. 175</text:p>
          </table:table-cell>
          <table:table-cell table:style-name="Tabelle19.B2" office:value-type="string">
            <text:p text:style-name="P31">Szenen 0..15 aktiv</text:p>
          </table:table-cell>
        </table:table-row>
        <table:table-row>
          <table:table-cell table:style-name="Tabelle19.A2" office:value-type="string">
            <text:p text:style-name="P31">176</text:p>
          </table:table-cell>
          <table:table-cell table:style-name="Tabelle19.B2" office:value-type="string">
            <text:p text:style-name="P31">Szene geschrieben</text:p>
          </table:table-cell>
        </table:table-row>
        <table:table-row>
          <table:table-cell table:style-name="Tabelle19.A2" office:value-type="string">
            <text:p text:style-name="P31">NNN</text:p>
          </table:table-cell>
          <table:table-cell table:style-name="Tabelle19.B2" office:value-type="string">
            <text:p text:style-name="P31">weitergereichte Meldungen</text:p>
          </table:table-cell>
        </table:table-row>
      </table:table>
      <text:p text:style-name="P43"/>
      <text:p text:style-name="P186"><draw:frame draw:style-name="fr19" draw:name="Grafik362" text:anchor-type="paragraph" svg:x="1.002cm" svg:y="1.727cm" svg:width="14.96cm" svg:height="8.08cm" draw:z-index="341"><draw:image xlink:href="Pictures/1000000000000529000001972BD28FA2.png" xlink:type="simple" xlink:show="embed" xlink:actuate="onLoad"/></draw:frame>Die folgende Grafik zeigt die Anwendung von BLIND_SCENE mit anderen Modulen zur Ansteuerung einer Jalousie:</text:p>
      <text:p text:style-name="P186"/>
      <text:list xml:id="list38468587" text:continue-numbering="true" text:style-name="L1">
        <text:list-item>
          <text:list>
            <text:list-item>
              <text:h text:style-name="P216" text:outline-level="2"><text:alphabetical-index-mark-start text:id="IMark225941772"/>BLIND_SECURITY<text:alphabetical-index-mark-end text:id="IMark225941772"/></text:h>
            </text:list-item>
          </text:list>
        </text:list-item>
      </text:list>
      <text:p text:style-name="P75">Type<text:tab/>Funktionsbaustein</text:p>
      <text:p text:style-name="P172"><text:span text:style-name="T16">Input</text:span><text:span text:style-name="T21"><text:tab/>UP : BOOL (Eingang AUF)</text:span></text:p>
      <text:p text:style-name="P185"><text:tab/>DN : BOOL (Eingang AB)</text:p>
      <text:p text:style-name="P185"><text:tab/>S_IN : BYTE (ESR kompatibler Status Eingang)</text:p>
      <text:p text:style-name="P185"><text:tab/>PI : BYTE (Eingangswert der Jalousiestellung im Automatikbetrieb)</text:p>
      <text:p text:style-name="P185"><text:tab/>AI : BYTE (Eingangswert des Lamellenwinkels im Automatikbetrieb)</text:p>
      <text:p text:style-name="P185"><text:soft-page-break/><text:tab/>FIRE : BOOL (Eingang für Brandalarm)</text:p>
      <text:p text:style-name="P185"><text:tab/>WIND : BOOL (Eingang für Windalarm)</text:p>
      <text:p text:style-name="P185"><text:tab/>ALARM : BOOL (Eingang für Einbruchsmeldung)</text:p>
      <text:p text:style-name="P185"><text:tab/>DOOR : BOOL (Eingang für Türkontakt)</text:p>
      <text:p text:style-name="P185"><text:tab/>RAIN : BOOL (Eingang für Regenmelder)</text:p>
      <text:p text:style-name="P172"><text:span text:style-name="T21">Config<text:tab/>ALARM_UP : BOOL (Vorgaberichtung bei ALARM, </text:span><text:span text:style-name="T16">Default</text:span><text:span text:style-name="T21"> = </text:span><text:span text:style-name="T16">Up</text:span><text:span text:style-name="T21">)</text:span></text:p>
      <text:p text:style-name="P172"><text:span text:style-name="T21"><text:tab/>WIND_UP : BOOL (Vorgaberichtung bei Wind, </text:span><text:span text:style-name="T16">Default</text:span><text:span text:style-name="T21"> = </text:span><text:span text:style-name="T16">Up</text:span><text:span text:style-name="T21">)</text:span></text:p>
      <text:p text:style-name="P172"><text:span text:style-name="T21"><text:tab/>RAIN_UP : BOOL (Vorgaberichtung bei Regen, </text:span><text:span text:style-name="T16">Default</text:span><text:span text:style-name="T21"> = </text:span><text:span text:style-name="T16">Down</text:span><text:span text:style-name="T21">)</text:span></text:p>
      <text:p text:style-name="P185">Output<text:tab/>QU : BOOL (Motor Auf Signal)</text:p>
      <text:p text:style-name="P185"><text:tab/>QD : BOOL (Motor Ab Signal)</text:p>
      <text:p text:style-name="P185"><text:tab/>STATUS : BYTE (ESR kompatibler Status Ausgang)</text:p>
      <text:p text:style-name="P185"><text:tab/>PO : BYTE (Ausgangswert der Jalousiestellung im </text:p>
      <text:p text:style-name="P185"><text:tab/>Automatikbetrieb)</text:p>
      <text:p text:style-name="P185"><text:tab/>AO : BYTE (Ausgangswert des Lamellenwinkels im </text:p>
      <text:p text:style-name="P185"><draw:frame draw:style-name="fr3" draw:name="Grafik330" text:anchor-type="paragraph" svg:x="1.067cm" svg:y="0.623cm" svg:width="3.69cm" svg:height="4.701cm" draw:z-index="303"><draw:image xlink:href="Pictures/1000000000000117000001636CF94EFC.png" xlink:type="simple" xlink:show="embed" xlink:actuate="onLoad"/></draw:frame><text:tab/>Automatikbetrieb)</text:p>
      <text:p text:style-name="P172"><text:span text:style-name="T21"><text:line-break/>BLIND_SECURITY stellt sicher das Jalousien bei bestimmten Ereignissen entweder nach oben oder nach unten gefahren werden. Die Eingänge UP und DN steuern über die Ausgänge QU und QD ein nachgeschaltetes Modul BLIND_ACTUATOR. Mit den Eingängen FIRE, WIND, ALARM und RAIN werden die Eingänge UP und DN überschrieben und die Jalousie entweder ganz nach oben oder ganz nach unten gefahren. Hierbei hat FIRE die höchste Priorität, gefolgt von WIND, Alarm und mit der niedrigsten Priorität RAIN. Rain kann als einziger auch von den manuellen Eingängen UP und DN überschrieben werden. Sollte also der Benutzer entscheiden dass trotz Regen die Jalousie offen bleiben soll, so muss er lediglich den Regenschutz durch einen kurzen Tastendruck auf UP oder DN unterbrechen. FIRE fährt die Jalousie nach oben, während RAIN, Wind und Alarm für Auf oder Ab konfigurierbar sind. ALARM ist mit der Config Variablen ALARM_UP sowohl für Hoch- als auch Runter-Fahrt konfigurierbar, Die Config Variable WIND_UP legt fest ob bei Wind nach oben oder runter gefahren wird. Mit der Variable </text:span><text:soft-page-break/><text:span text:style-name="T21">RAIN_UP </text:span><text:span text:style-name="T21">wird festgelegt welche Stellung bei Regen angefahren wird. Die Vorgabewerte sind UP</text:span><text:span text:style-name="T16"> </text:span><text:span text:style-name="T21">für Alarm, </text:span><text:span text:style-name="T16">UP</text:span><text:span text:style-name="T21"> für Wind und </text:span><text:span text:style-name="T16">DN</text:span><text:span text:style-name="T21"> für Re</text:span><text:span text:style-name="T21">gen. Die Config Variablen können durch einen Doppelklick auf das Symbol jederzeit verändert werden.</text:span></text:p>
      <text:p text:style-name="P185">Der Eingang S_IN und der Ausgang STATUS sind ESR kompatible Aus und Eingänge , über den Eingang S_IN melden vorgeschaltete Funktionen Ihren Status an das Modul, dieser Status wird an den Ausgang STATUS weitergeleitet, und eigene Statusmeldungen werden über STATUS Ausgegeben.</text:p>
      <table:table table:name="Tabelle15" table:style-name="Tabelle15">
        <table:table-column table:style-name="Tabelle15.A"/>
        <table:table-column table:style-name="Tabelle15.B"/>
        <table:table-row>
          <table:table-cell table:style-name="Tabelle15.A1" office:value-type="string">
            <text:p text:style-name="P126">STATUS</text:p>
          </table:table-cell>
          <table:table-cell table:style-name="Tabelle15.B1" office:value-type="string">
            <text:p text:style-name="P126">Bedeutung</text:p>
          </table:table-cell>
        </table:table-row>
        <table:table-row>
          <table:table-cell table:style-name="Tabelle15.A2" office:value-type="string">
            <text:p text:style-name="P126">0</text:p>
          </table:table-cell>
          <table:table-cell table:style-name="Tabelle15.B2" office:value-type="string">
            <text:p text:style-name="P126">keine Meldung</text:p>
          </table:table-cell>
        </table:table-row>
        <table:table-row>
          <table:table-cell table:style-name="Tabelle15.A2" office:value-type="string">
            <text:p text:style-name="P126">111</text:p>
          </table:table-cell>
          <table:table-cell table:style-name="Tabelle15.B2" office:value-type="string">
            <text:p text:style-name="P126">Feuer</text:p>
          </table:table-cell>
        </table:table-row>
        <table:table-row>
          <table:table-cell table:style-name="Tabelle15.A2" office:value-type="string">
            <text:p text:style-name="P126">112</text:p>
          </table:table-cell>
          <table:table-cell table:style-name="Tabelle15.B2" office:value-type="string">
            <text:p text:style-name="P126">Wind</text:p>
          </table:table-cell>
        </table:table-row>
        <table:table-row>
          <table:table-cell table:style-name="Tabelle15.A2" office:value-type="string">
            <text:p text:style-name="P126">113</text:p>
          </table:table-cell>
          <table:table-cell table:style-name="Tabelle15.B2" office:value-type="string">
            <text:p text:style-name="P126">Einbruch Alarm</text:p>
          </table:table-cell>
        </table:table-row>
        <table:table-row>
          <table:table-cell table:style-name="Tabelle15.A2" office:value-type="string">
            <text:p text:style-name="P126">114</text:p>
          </table:table-cell>
          <table:table-cell table:style-name="Tabelle15.B2" office:value-type="string">
            <text:p text:style-name="P126">Türalarm</text:p>
          </table:table-cell>
        </table:table-row>
        <table:table-row>
          <table:table-cell table:style-name="Tabelle15.A2" office:value-type="string">
            <text:p text:style-name="P126">115</text:p>
          </table:table-cell>
          <table:table-cell table:style-name="Tabelle15.B2" office:value-type="string">
            <text:p text:style-name="P126">Regen</text:p>
          </table:table-cell>
        </table:table-row>
        <table:table-row>
          <table:table-cell table:style-name="Tabelle15.A2" office:value-type="string">
            <text:p text:style-name="P126">NNN</text:p>
          </table:table-cell>
          <table:table-cell table:style-name="Tabelle15.B2" office:value-type="string">
            <text:p text:style-name="P126">weitergereichte Meldungen</text:p>
          </table:table-cell>
        </table:table-row>
      </table:table>
      <text:p text:style-name="P185"/>
      <text:p text:style-name="P185"><draw:frame draw:style-name="fr3" draw:name="Grafik336" text:anchor-type="paragraph" svg:x="1.002cm" svg:y="1.177cm" svg:width="15.998cm" svg:height="4.627cm" draw:z-index="304"><draw:image xlink:href="Pictures/10000000000003F50000012564860453.png" xlink:type="simple" xlink:show="embed" xlink:actuate="onLoad"/></draw:frame>Die folgende Grafik zeigt die Anwendung von BLIND_SECURITY mit BLIND_ACTUATOR zur Steuerung einer Jalousie:</text:p>
      <text:p text:style-name="P185">BLIND_SECURITY muss unbedingt direkt vor BLIND_CONTROL eingesetzt werden. <text:s/>Sollten andere Module zwischen BLIND_SECURITY und BLIND_CONTROL eingebaut werden so sind die Sicherheitsfunktionen nicht mehr gewährleistet.</text:p>
      <text:p text:style-name="P185"/>
      <text:p text:style-name="P185"/>
      <text:list xml:id="list38468566" text:continue-numbering="true" text:style-name="L1">
        <text:list-item>
          <text:list>
            <text:list-item>
              <text:h text:style-name="P216" text:outline-level="2"><text:soft-page-break/><text:alphabetical-index-mark-start text:id="IMark225941772"/>BLIND_SHADE<text:alphabetical-index-mark-end text:id="IMark225941772"/></text:h>
            </text:list-item>
          </text:list>
        </text:list-item>
      </text:list>
      <text:p text:style-name="P75">Type<text:tab/>Funktionsbaustein</text:p>
      <text:p text:style-name="P172"><text:span text:style-name="T16">Input</text:span><text:span text:style-name="T21"><text:tab/>UP : BOOL (Eingang AUF)</text:span></text:p>
      <text:p text:style-name="P185"><text:tab/>DN : BOOL (Eingang AB)</text:p>
      <text:p text:style-name="P185"><text:tab/>S_IN : BYTE (ESR kompatibler Status Eingang)</text:p>
      <text:p text:style-name="P185"><text:tab/>PI : BYTE (Eingangswert der Jalousiestellung im </text:p>
      <text:p text:style-name="P185"><text:tab/>Automatikbetrieb)</text:p>
      <text:p text:style-name="P185"><text:tab/>AI : BYTE (Eingangswert des Lamellenwinkels im </text:p>
      <text:p text:style-name="P185"><text:tab/>Automatikbetrieb)</text:p>
      <text:p text:style-name="P185"><text:tab/>DTIN : DT (Datum und Tageszeit in Weltzeit UTC)</text:p>
      <text:p text:style-name="P185"><text:tab/>SUNRISE : TOD (Zeit für Sonnenaufgang)</text:p>
      <text:p text:style-name="P185"><text:tab/>SUNSET : TOD (Zeit für Sonnenuntergang)</text:p>
      <text:p text:style-name="P185"><text:tab/>SUN_HOR : REAL (Horizontaler Sonnenwinkel, Süd = 180°)</text:p>
      <text:p text:style-name="P185"><text:tab/>SUN_VER : Vertikaler Sonnenwinkel, 0° = Horizont)</text:p>
      <text:p text:style-name="P185">Config<text:tab/>SUNRISE_OFFSET : TIME (Verzögerung bei Sonnenaufgang)</text:p>
      <text:p text:style-name="P185"><text:tab/>SUNSET_PRESET : TIME (Verzögerung bei Sonnenuntergang)</text:p>
      <text:p text:style-name="P185"><text:tab/>DIRECTION : REAL (Fassadenausrichtung, 180° = Südfassade)</text:p>
      <text:p text:style-name="P185"><text:tab/>ANGLE_OFFSET : REAL (Horizontaler Öffnungswinkel für </text:p>
      <text:p text:style-name="P185"><text:tab/>Beschattung)</text:p>
      <text:p text:style-name="P185"><text:tab/>SLAT_WIDTH : REAL (Breite der Lamellen in mm)</text:p>
      <text:p text:style-name="P185"><text:tab/>SLAT_SPACING : REAL (Abstand der Lamellen in mm)</text:p>
      <text:p text:style-name="P185"><text:tab/>SHADE_DELAY : TIME (Verzögerungszeit der Beschattung)</text:p>
      <text:p text:style-name="P185">Output<text:tab/>QU : BOOL (Motor Auf Signal)</text:p>
      <text:p text:style-name="P185"><text:tab/>QD : BOOL (Motor Ab Signal)</text:p>
      <text:p text:style-name="P185"><text:tab/>STATUS : BYTE (ESR kompatibler Status Ausgang)</text:p>
      <text:p text:style-name="P185"><text:tab/>PO : BYTE (Ausgangswert der Jalousiestellung im </text:p>
      <text:p text:style-name="P185"><text:tab/>Automatikbetrieb)</text:p>
      <text:p text:style-name="P75"><text:tab/>AO : BYTE (Ausgangswert des Lamellenwinkels im </text:p>
      <text:p text:style-name="P185"><draw:frame draw:style-name="fr3" draw:name="Grafik341" text:anchor-type="paragraph" svg:x="1.044cm" svg:y="0.725cm" svg:width="3.859cm" svg:height="5.489cm" draw:z-index="308"><draw:image xlink:href="Pictures/10000000000001240000019FD33D3814.png" xlink:type="simple" xlink:show="embed" xlink:actuate="onLoad"/></draw:frame><text:tab/>Automatikbetrieb)</text:p>
      <text:p text:style-name="P185"><text:soft-page-break/><text:line-break/>BLIND_SHADE berechnet aus dem momentanen Sonnenstand den geeigneten Lamellenwinkel um eine optimale Beschattung zu gewährleisten. Die Lamellen werden dem Sonnenstand nachgeführt, so dass über den Tagesverlauf immer Beschattung Sichergestellt ist. Mit dem Eingang ENABLE wird die Funktion freigeschaltet wenn gleichzeitig UP und DN (Automatik Modus) aktiv sind. Der Baustein wertet weiterhin den EINGANG SUN aus welcher durch TRUE Sonnenschein anzeigt. Wird SUN oder ENABLE FALSE so schaltet sich der Baustein automatisch ab. SUNRISE_OFFSET mit welchem Zeitversatz nach Sonnenaufgang die Beschattung aktiv wird. SUNSET_PRESET legt mit welcher Zeitspanne vor Sonnenuntergang die Beschattung ausgesetzt wird. Die Beschattung ist dann Aktiv wenn SUN = TRUE, ENABLE = TRUE, UP = TRUE, DN = TRUE, der horizontale Sonnenwinkel sich innerhalb des Bereichs DIRECTION - <text:s/>ANGLE_OFFSET und DIRECTION + ANGLE_OFFSET befindet und die Tageszeit sich innerhalb des durch SUNRISE, SUNRISE_OFFSET, SUNSET und SUNSET_PRESET definierten Zeitbereichs befindet. DIRECTION legt die Ausrichtung der Fassade fest, 180° bedeutet Fassade zeigt genau nach Süden, 90° liegt im Osten und 270° im Westen. Mit der Setup Variable BLIND_SHADE wird festgelegt wie lange nachdem SUN auf FALSE geht die Beschattung eingestellt bleibt. Der Vorgabewert liegt bei 60 Sekunden. SHADE_DELAY Verhindert das bei Teilbewölkung die Jalousie dauernd auf und ab Fährt. Beim Einsatz von BLIND_SHADE ist darauf zu achten dass die Zykluszeit für den Baustein kleiner als T_ANGLE / 512 * SENS beträgt. SENS ist hierbei der SENS Wert des BLIND_CONTROLLERS. Wird die Zykluszeit zu groß so beginnt die Jalousie unregelmäßig hin und herzufahren.</text:p>
      <text:p text:style-name="P185"/>
      <text:p text:style-name="P91"><draw:frame draw:style-name="fr3" draw:name="Grafik343" text:anchor-type="paragraph" svg:x="1.067cm" svg:y="0.7cm" svg:width="10.239cm" svg:height="5.911cm" draw:z-index="310"><draw:image xlink:href="Pictures/1000000000000306000001BFC1D5987B.png" xlink:type="simple" xlink:show="embed" xlink:actuate="onLoad"/></draw:frame><text:soft-page-break/>Die folgende Grafik beschreibt die Geometrie der Jalousie:</text:p>
      <text:p text:style-name="P91"/>
      <text:p text:style-name="P45"><draw:frame draw:style-name="fr3" draw:name="Grafik344" text:anchor-type="paragraph" svg:x="1.092cm" svg:y="1.182cm" svg:width="14.6cm" svg:height="6.189cm" draw:z-index="311"><draw:image xlink:href="Pictures/1000000000000398000001862BC50B59.png" xlink:type="simple" xlink:show="embed" xlink:actuate="onLoad"/></draw:frame>Die folgende Grafik zeigt eine nach Süd-Ost gerichtete Fassade mit DIRECTION = 135°und ANGLE_OFFSET = 65°:</text:p>
      <text:p text:style-name="P45"/>
      <text:p text:style-name="P90"><text:span text:style-name="T21">Die Beschattungsfunktion berechnet den Lamellenwinkel so dass die Lamellen immer nur soweit </text:span><text:span text:style-name="T20">geschlossen</text:span><text:span text:style-name="T21"> werden dass die Sonne abgeschattet wird, aber dennoch soviel Licht wie möglich in den Raum gelangt. Aus den Angaben DIRECTION und ANGLE_OFFSET wird berechnet wann der horizontale Einstrahlwinkel der Sonne eine Beschattung erfordert. Je nach Stärke der Mauer und Breite des Fensters kann der ANGLE_OFFSET so eingestellt werden das unnötige Beschattung vermieden wird. Mit DIRECTION wird die Himmelsrichtung der Fassade angegeben. Mithilfe der Abmessungen der Lamellen, Breite und Abstand in Millimeter (SLAT_WIDTH und SLAT_SPACING) wird berechnet <text:s/>wie weit die Lamellen geneigt werden müssen um die Sonneneinstrahlung zu verhindern. Ziel ist es dabei die Lamellen nur soweit wie unbedingt nötig zu neigen damit optimale Lichtverhältnisse garantiert sind. Um bei Sonnenaufgang und Sonnenuntergang die Stimmung und Lichtverhältnisse nicht zu beeinflussen kann ein OFFSET vom Sonnenaufgang und ein PRESET vor dem Sonnenuntergang eingestellt werden. Mit einen OFFSET von 30 Minuten und einem PRESET von 60 </text:span><text:span text:style-name="T21">Minuten wird zum </text:span><text:soft-page-break/><text:span text:style-name="T21">Beispiel erst 30 Minuten nach Sonnenaufgang mit der Beschattung begonnen und bereits 60 Minuten vor Sonnenuntergang die Beschattung beendet. Der Eingang SUN des Moduls dient Dazu einen Sonnenintensitätssensor oder einen beliebigen geeigneten Sensor anzuschließen der die Funktion unterbricht wenn keine Sonnenstrahlung vorliegt.</text:span></text:p>
      <text:p text:style-name="P89"><draw:frame draw:style-name="fr3" draw:name="Grafik346" text:anchor-type="paragraph" svg:x="1.222cm" svg:y="0.633cm" svg:width="8.819cm" svg:height="5.091cm" draw:z-index="313"><draw:image xlink:href="Pictures/100000000000029B000001815997981A.png" xlink:type="simple" xlink:show="embed" xlink:actuate="onLoad"/></draw:frame>In der Folgenden Grafik wird die Abschattung verdeutlicht:</text:p>
      <text:p text:style-name="P42"/>
      <text:p text:style-name="P75">Der Eingang S_IN und der Ausgang STATUS sind ESR kompatible Aus und Eingänge , über den Eingang S_IN melden vorgeschaltete Funktionen Ihren Status an das Modul, dieser Status wird an den Ausgang STATUS weitergeleitet, und eigene Statusmeldungen werden über STATUS Ausgegeben. BLIND_SHADE meldet am STATUS Ausgang den STATUS 151 wenn die Beschattungsfunktion aktiv ist.</text:p>
      <text:p text:style-name="P185"><draw:frame draw:style-name="fr3" draw:name="Grafik342" text:anchor-type="paragraph" svg:x="1cm" svg:y="1.152cm" svg:width="15.998cm" svg:height="4.607cm" draw:z-index="309"><draw:image xlink:href="Pictures/10000000000004E500000169A274FFC0.png" xlink:type="simple" xlink:show="embed" xlink:actuate="onLoad"/></draw:frame>Das folgende Beispiel zeigt die Anwendung von BLIND_SHADE innerhalb einer Jalousiesteuerung:</text:p>
      <text:p text:style-name="P44"/>
      <text:list xml:id="list38454044" text:continue-numbering="true" text:style-name="L1">
        <text:list-item>
          <text:h text:style-name="P210" text:outline-level="1">Automation</text:h>
          <text:list>
            <text:list-item>
              <text:h text:style-name="P224" text:outline-level="2"><text:alphabetical-index-mark-start text:id="IMark225941772"/>DRIVER_1<text:alphabetical-index-mark-end text:id="IMark225941772"/></text:h>
            </text:list-item>
          </text:list>
        </text:list-item>
      </text:list>
      <text:p text:style-name="P78">Type<text:tab/>Funktionsbaustein</text:p>
      <text:p text:style-name="P173"><text:span text:style-name="T15">Input</text:span><text:span text:style-name="T14"><text:tab/>SET : BOOL (asynchroner Set Eingang)</text:span></text:p>
      <text:p text:style-name="P179"><text:tab/>IN : BOOL (Schalteingang)</text:p>
      <text:p text:style-name="P179"><text:tab/>RST : BOOL (asynchroner Reset Eingang)</text:p>
      <text:p text:style-name="P179">Config<text:tab/>TOGGLE_MODE : BOOL (Mode des Eingangs IN)</text:p>
      <text:p text:style-name="P179"><text:tab/>TIMEOUT : TIME (Maximale Einschaltdauer der Ausgänge)</text:p>
      <text:p text:style-name="P69"><draw:frame draw:style-name="fr3" draw:name="Grafik427" text:anchor-type="paragraph" svg:x="1.046cm" svg:y="0.658cm" svg:width="2.499cm" svg:height="1.921cm" draw:z-index="406"><draw:image xlink:href="Pictures/10000000000000BD000000919C43992A.png" xlink:type="simple" xlink:show="embed" xlink:actuate="onLoad"/></draw:frame>Output<text:tab/>Q0 : BOOL (Schaltausgang)</text:p>
      <text:p text:style-name="P173"><text:span text:style-name="T14"><text:line-break/>DRIVER_1 ist ein Treiberbaustein dessen Ausgang Q durch den Eingang IN wenn TOGGLE_MODE = FALSE gesetzt werden kann. Der Ausgang bleibt dann solange auf TRUE bis er entweder durch einen asynchronen Reset (RST) auf FALSE gesetzt wird oder bis die maximale Schaltzeit (TIMEOUT) abgelaufen ist. Weitere Impulse <text:s/>am Eingang IN verlängern dabei die TRUE Phase am Ausgang indem mit jeder steigenden Flanke an IN der </text:span><text:span text:style-name="T15">Timeout</text:span><text:span text:style-name="T14"> von Neuem beginnt. Wenn TOGGLE_MODE = TRUE, dann schaltet der Ausgang Q mit jeder steigenden Flanke an IN den Zustand zwischen TRUE und FALSE. Auch im TOGGLE_MODE wird mit TIMEOUT die maximale TRUE Phase am Ausgang Q begrenzt. Wird TIMEOUT auf T#0s gesetzt (</text:span><text:span text:style-name="T15">Default</text:span><text:span text:style-name="T14">) dann ist kein </text:span><text:span text:style-name="T15">Timeout</text:span><text:span text:style-name="T14"> aktiv. Die asynchronen SET und RST Eingänge setzten den Ausgang Q auf TRUE oder FALSE. Der Baustein DRIVER_4 stellt bei gleicher Funktionalität 4 Schaltausgänge zur Verfügung.</text:span></text:p>
      <text:p text:style-name="P179"/>
      <text:list xml:id="list38470101" text:continue-numbering="true" text:style-name="L1">
        <text:list-item>
          <text:list>
            <text:list-item>
              <text:h text:style-name="P224" text:outline-level="2"><text:soft-page-break/><text:alphabetical-index-mark-start text:id="IMark225941772"/>DRIVER_4<text:alphabetical-index-mark-end text:id="IMark225941772"/></text:h>
            </text:list-item>
          </text:list>
        </text:list-item>
      </text:list>
      <text:p text:style-name="P69">Type<text:tab/>Funktionsbaustein</text:p>
      <text:p text:style-name="P173"><text:span text:style-name="T15">Input</text:span><text:span text:style-name="T14"><text:tab/>SET : BOOL (asynchroner Set Eingang)</text:span></text:p>
      <text:p text:style-name="P179"><text:tab/>IN0..IN3 : BOOL (Schalteingänge)</text:p>
      <text:p text:style-name="P179"><text:tab/>RST : BOOL (asynchroner Reset Eingang)</text:p>
      <text:p text:style-name="P179">Config<text:tab/>TOGGLE_MODE : BOOL (Mode des Eingangs IN)</text:p>
      <text:p text:style-name="P179"><text:tab/>TIMEOUT : TIME (Maximale Ontime der Ausgänge)</text:p>
      <text:p text:style-name="P179"><draw:frame draw:style-name="fr3" draw:name="Grafik428" text:anchor-type="paragraph" svg:x="1.09cm" svg:y="0.667cm" svg:width="2.499cm" svg:height="3.11cm" draw:z-index="407"><draw:image xlink:href="Pictures/10000000000000BD000000EBBA635685.png" xlink:type="simple" xlink:show="embed" xlink:actuate="onLoad"/></draw:frame>Output<text:tab/>Q0 .. Q3 : BOOL (Schaltausgänge)</text:p>
      <text:p text:style-name="P69"><text:line-break/>DRIVER_1 ist ein Treiberbaustein dessen Ausgänge Q durch die Eingänge IN geschaltet werden. eine detaillierte Beschreibung des Bausteins befindet sich unter DRIVER_1. DRIVER_4 stellt im Gegensatz zu DRIVER_1 4 Schaltausgänge zur Verfügung, hat aber ansonsten die gleiche Funktionalität.</text:p>
      <text:list xml:id="list38473686" text:continue-numbering="true" text:style-name="L1">
        <text:list-item>
          <text:list>
            <text:list-item>
              <text:h text:style-name="P224" text:outline-level="2"><text:alphabetical-index-mark-start text:id="IMark225941772"/>FLOW_CONTROL<text:alphabetical-index-mark-end text:id="IMark225941772"/></text:h>
            </text:list-item>
          </text:list>
        </text:list-item>
      </text:list>
      <text:p text:style-name="P179">Type<text:tab/>Funktionsbaustein</text:p>
      <text:p text:style-name="P173"><text:span text:style-name="T15">Input</text:span><text:span text:style-name="T14"><text:tab/>IN : BOOL (Steuereingang)</text:span></text:p>
      <text:p text:style-name="P173"><text:span text:style-name="T14"><text:tab/>REQ : BOOL (</text:span><text:span text:style-name="T15">Request</text:span><text:span text:style-name="T14"> für Automatikmodus)</text:span></text:p>
      <text:p text:style-name="P173"><text:span text:style-name="T14"><text:tab/>ENQ : BOOL (</text:span><text:span text:style-name="T15">Enable</text:span><text:span text:style-name="T14"> für Ausgang Q)</text:span></text:p>
      <text:p text:style-name="P179"><text:tab/>RST : BOOL (asynchroner Reset Eingang)</text:p>
      <text:p text:style-name="P173"><text:span text:style-name="T15">Config</text:span><text:span text:style-name="T14"><text:tab/>T_AUTO : TIME (Ventil Einschaltzeit im Automatikmodus)</text:span></text:p>
      <text:p text:style-name="P173"><text:span text:style-name="T14"><text:tab/>T_DELAY : TIME(Ventil </text:span><text:span text:style-name="T15">Disable</text:span><text:span text:style-name="T14"> Zeit im Automatikmodus)</text:span></text:p>
      <text:p text:style-name="P179">Output<text:tab/>Q : BOOL (Schaltausgang für Ventil)</text:p>
      <text:p text:style-name="P179"><draw:frame draw:style-name="fr3" draw:name="Grafik658" text:anchor-type="paragraph" svg:x="0.956cm" svg:y="0.677cm" svg:width="3.29cm" svg:height="2.29cm" draw:z-index="647"><draw:image xlink:href="Pictures/10000000000000F9000000ADFCF0C3F2.png" xlink:type="simple" xlink:show="embed" xlink:actuate="onLoad"/></draw:frame><text:tab/>STATUS : BYTE (ESR kompatibler Statusausgang)</text:p>
      <text:p text:style-name="P179"><text:soft-page-break/><text:line-break/>FLOW_CONTROL Schaltet ein Ventil am Ausgang Q wenn der Eingang IN = TRUE. Zusätzlich kann das Ventil auch über den Eingang REQ geschaltet werden, Wenn REQ = TRUE schaltet das Ventil für die Zeit T_AUTO ein und wird dann für die Zeit T_DELAY gesperrt. nach Ablauf der Zeit T_DELAY kann über REQ das Ventil wieder Eingeschaltet werden. Während der Sperrzeit T_DELAY kann das Ventil jedoch über den Eingang IN gesteuert werden. Ein ESR kompatibler Status Ausgang STATUS signalisiert den Zustand des Bausteins. Sowohl REQ als auch IN können den Ausgang Q nur dann schalten wenn der Eingang ENQ auf TRUE steht.</text:p>
      <text:p text:style-name="P179">Status = 100<text:tab/>Betriebsbereit</text:p>
      <text:p text:style-name="P179">Status = 101<text:tab/>Ventil ein durch TRUE an IN</text:p>
      <text:p text:style-name="P179">Status = 102<text:tab/>Ventil ein durch TRUE an REQ</text:p>
      <text:p text:style-name="P179">Status = 103<text:tab/>Reset wurde ausgeführt</text:p>
      <text:p text:style-name="P179"/>
      <text:p text:style-name="P179"><draw:frame draw:style-name="fr3" draw:name="Grafik659" text:anchor-type="paragraph" svg:x="1.069cm" svg:y="0.693cm" svg:width="15.998cm" svg:height="5.138cm" draw:z-index="648"><draw:image xlink:href="Pictures/10000000000003390000010992A9D9B7.png" xlink:type="simple" xlink:show="embed" xlink:actuate="onLoad"/></draw:frame>Das folgernde Schema verdeutlicht den Aufbau von FLOW_CONTROL:</text:p>
      <text:p text:style-name="P179"/>
      <text:p text:style-name="P179"/>
      <text:p text:style-name="P179"/>
      <text:p text:style-name="P179"/>
      <text:list xml:id="list38482833" text:continue-numbering="true" text:style-name="L1">
        <text:list-item>
          <text:list>
            <text:list-item>
              <text:h text:style-name="P216" text:outline-level="2"><text:soft-page-break/><text:alphabetical-index-mark-start text:id="IMark225941772"/>FT_PROFILE<text:alphabetical-index-mark-end text:id="IMark225941772"/></text:h>
            </text:list-item>
          </text:list>
        </text:list-item>
      </text:list>
      <text:p text:style-name="P2">Type<text:tab/><text:span text:style-name="T11">Funktionsbaustein</text:span></text:p>
      <text:p text:style-name="P66"><text:span text:style-name="T16">Input</text:span><text:span text:style-name="T21"><text:tab/>K : REAL (Multiplikator)</text:span></text:p>
      <text:p text:style-name="P73"><text:tab/>O : REAL (Offset)</text:p>
      <text:p text:style-name="P73"><text:tab/>M : REAL (Zeitmultiplikator)</text:p>
      <text:p text:style-name="P73"><text:tab/>E : BOOL (Startsignal)</text:p>
      <text:p text:style-name="P73">Output<text:tab/>Y : REAL (Signalausgang)</text:p>
      <text:p text:style-name="P73"><text:tab/>RUN : BOOL (TRUE, wenn Ausgangssignal erzeugt wird)</text:p>
      <text:p text:style-name="P73"><text:tab/>ET : TIME (Zeit seit Start des Ausgangsprofils)</text:p>
      <text:p text:style-name="P73">Config<text:tab/>VALUE_0 : REAL (Ausgangswert des Ausgangs zum </text:p>
      <text:p text:style-name="P183"><text:tab/>Startzeitpunkt)</text:p>
      <text:p text:style-name="P73"><text:tab/>TIME_1 : TIME (Zeitpunkt wenn die Rampe VALUE_1 erreicht)</text:p>
      <text:p text:style-name="P73"><text:tab/>VALUE_1 : REAL (Wert den die Rampe zum Zeitpunkt TIME_1 </text:p>
      <text:p text:style-name="P183"><text:tab/>erreicht)</text:p>
      <text:p text:style-name="P73"><text:tab/>TIME_2 : TIME (Zeitpunkt wenn die Rampe VALUE_2 erreicht)</text:p>
      <text:p text:style-name="P73"><text:tab/>VALUE_2 : REAL (Wert den die Rampe zum Zeitpunkt TIME_2 </text:p>
      <text:p text:style-name="P183"><text:tab/>erreicht)</text:p>
      <text:p text:style-name="P73"><text:tab/>TIME_3 : TIME (Zeitpunkt wenn die Rampe VALUE_3 erreicht)</text:p>
      <text:p text:style-name="P73"><text:tab/>VALUE_3 : REAL (Wert den die Rampe zum Zeitpunkt TIME_3 </text:p>
      <text:p text:style-name="P183"><text:tab/>erreicht)</text:p>
      <text:p text:style-name="P73"><text:tab/>TIME_10 : TIME (Zeitpunkt wenn die Rampe VALUE_10 erreicht)</text:p>
      <text:p text:style-name="P73"><text:tab/>VALUE_10 : REAL (Wert den die Rampe zum Zeitpunkt TIME_10</text:p>
      <text:p text:style-name="P73"><text:tab/>erreicht)</text:p>
      <text:p text:style-name="P73"><text:tab/>TIME_11 : TIME (Zeitpunkt wenn die Rampe VALUE_11 erreicht)</text:p>
      <text:p text:style-name="P73"><text:tab/>VALUE_11 : REAL (Wert den die Rampe zum Zeitpunkt TIME_11</text:p>
      <text:p text:style-name="P73"><text:tab/>erreicht)</text:p>
      <text:p text:style-name="P73"><text:tab/>TIME_12 : TIME (Zeitpunkt wenn die Rampe VALUE_12 erreicht)</text:p>
      <text:p text:style-name="P73"><text:tab/>VALUE_12 : REAL (Wert den die Rampe zum Zeitpunkt TIME_12</text:p>
      <text:p text:style-name="P73"><text:tab/>erreicht)</text:p>
      <text:p text:style-name="P73"><text:tab/>TIME_13 : TIME (Zeitpunkt wenn die Rampe VALUE_13 erreicht)</text:p>
      <text:p text:style-name="P73"><text:tab/>VALUE_13 : REAL (Wert den die Rampe zum Zeitpunkt TIME_13</text:p>
      <text:p text:style-name="P73"><text:tab/>erreicht)</text:p>
      <text:p text:style-name="P23"><draw:frame draw:style-name="fr3" draw:name="Grafik289" text:anchor-type="paragraph" svg:x="1.337cm" svg:y="0.194cm" svg:width="2.731cm" svg:height="2.649cm" draw:z-index="242"><draw:image xlink:href="Pictures/10000000000000CE000000C86AD0ED53.png" xlink:type="simple" xlink:show="embed" xlink:actuate="onLoad"/></draw:frame><text:soft-page-break/> <text:s/><text:line-break/>FT_PROFILE erzeugt ein zeitabhängiges Ausgangssignal. Das Ausgangssignal wird definiert durch Zeit – Wertepaare. FT_PROFILE erzeugt ein Ausgangssignal Y, indem die Wertepaare durch Rampen verbunden werden. Ein typische Anwendung für FT_PROFILE ist die Erzeugung eines Temperaturprofils für einen Glühofen, aber auch jede Anwendung die ein zeitabhängiges Steuersignal benötigt stellt ein Anwendungsgebiet dar. Das zeitabhängige Ausgangssignal wird durch eine steigende Flanke an E gestartet und läuft dann selbsttätig ab. Nach dem Wertepaar (TIME_10, VALUE_10) verharrt das Ausgangssignal auf VALUE_10, bis der Eingang E FALSE wird. Mit einer Flanke an E kann also das Signal gestartet werden und zusätzlich kann der Eingang E auch benutzt werden um das Signal beliebig lange zu strecken. Dadurch ist es möglich einen Verlauf bis zum Wert VALUE_3 zu erzeugen, mit E zu strecken und nach der fallenden Flanke von E wieder einen Verlauf zurück zum Ausgangswert zu erzeugen. Mit den Eingängen K, O und M kann das Ausgangssignal dynamisch gestreckt und skaliert werden.</text:p>
      <text:p text:style-name="P74"><text:tab/>Y = erzeugter Wert * K + O</text:p>
      <text:p text:style-name="P185">Der Eingang M dient zum Strecken des Signals über die Zeit. Der tatsächliche Zeitverlauf entspricht dem über Setup definierten Zeitverlauf multipliziert mit M. Um geradlinige Rampen zu gewährleisten wirkt eine Zeitstreckung durch M nur nach Abschluss einer Flanke. Der Ausgang RUN wird mit einer steigenden Flanke von E auf TRUE gesetzt und wird erst nach Abschluss des Zeitprofils wieder FALSE. Am Ausgang ET kann die seit Start verstrichene Zeit abgelesen werden.</text:p>
      <text:p text:style-name="P185">Die folgenden Graphiken zeigen das Ausgangssignal für die Wertepaare:</text:p>
      <text:p text:style-name="P185"><text:tab/>VALUE_0 = 0</text:p>
      <text:p text:style-name="P185"><text:tab/>TIME_1, VALUE_1 = 1s, 50</text:p>
      <text:p text:style-name="P185"><text:tab/>TIME_2, VALUE_2 = 3s, 50</text:p>
      <text:p text:style-name="P185"><text:tab/>TIME_3, VALUE_3 = 4s, 100</text:p>
      <text:p text:style-name="P185"><text:tab/>TIME_10, VALUE_10 = 6s, 100</text:p>
      <text:p text:style-name="P185"><text:tab/>TIME_11, VALUE_11 = 7s, 50</text:p>
      <text:p text:style-name="P185"><text:tab/>TIME_12, VALUE_12 = 9s, 50</text:p>
      <text:p text:style-name="P185"><text:tab/>TIME_13, VALUE_13 = 10s, 0</text:p>
      <text:p text:style-name="P27"><text:soft-page-break/><text:line-break/>Die Schaubilder stellen das Ausgangssignal sowohl mit gestreckter Phase 3 durch E dar, als auch ohne Streckung.</text:p>
      <text:p text:style-name="P187"><draw:g text:anchor-type="paragraph" draw:z-index="243" draw:style-name="gr1"><draw:line draw:style-name="gr52" draw:text-style-name="P257" svg:x1="1.999cm" svg:y1="3.92cm" svg:x2="1.999cm" svg:y2="2.174cm"><text:p/></draw:line><draw:line draw:style-name="gr52" draw:text-style-name="P257" svg:x1="1.745cm" svg:y1="3.669cm" svg:x2="9.496cm" svg:y2="3.669cm"><text:p/></draw:line><draw:line draw:style-name="gr2" draw:text-style-name="P257" svg:x1="1.999cm" svg:y1="3.422cm" svg:x2="2.999cm" svg:y2="3.422cm"><text:p/></draw:line><draw:line draw:style-name="gr2" draw:text-style-name="P257" svg:x1="3.498cm" svg:y1="2.922cm" svg:x2="2.997cm" svg:y2="3.421cm"><text:p/></draw:line><draw:line draw:style-name="gr2" draw:text-style-name="P257" svg:x1="3.498cm" svg:y1="2.922cm" svg:x2="4.496cm" svg:y2="2.922cm"><text:p/></draw:line><draw:frame draw:style-name="gr6" draw:text-style-name="P259" svg:width="0.877cm" svg:height="0.65cm" svg:x="2.617cm" svg:y="3.569cm"><draw:text-box><text:p text:style-name="P258"><text:span text:style-name="T32">0</text:span></text:p></draw:text-box></draw:frame><draw:frame draw:style-name="gr6" draw:text-style-name="P259" svg:width="0.877cm" svg:height="0.65cm" svg:x="3.118cm" svg:y="3.569cm"><draw:text-box><text:p text:style-name="P258"><text:span text:style-name="T32">1</text:span></text:p></draw:text-box></draw:frame><draw:frame draw:style-name="gr6" draw:text-style-name="P259" svg:width="0.877cm" svg:height="0.65cm" svg:x="3.618cm" svg:y="3.569cm"><draw:text-box><text:p text:style-name="P258"><text:span text:style-name="T32">2</text:span></text:p></draw:text-box></draw:frame><draw:frame draw:style-name="gr6" draw:text-style-name="P259" svg:width="0.877cm" svg:height="0.65cm" svg:x="4.12cm" svg:y="3.569cm"><draw:text-box><text:p text:style-name="P258"><text:span text:style-name="T32">3</text:span></text:p></draw:text-box></draw:frame><draw:frame draw:style-name="gr6" draw:text-style-name="P259" svg:width="0.877cm" svg:height="0.65cm" svg:x="4.618cm" svg:y="3.569cm"><draw:text-box><text:p text:style-name="P258"><text:span text:style-name="T32">4</text:span></text:p></draw:text-box></draw:frame><draw:frame draw:style-name="gr6" draw:text-style-name="P259" svg:width="0.877cm" svg:height="0.65cm" svg:x="5.119cm" svg:y="3.569cm"><draw:text-box><text:p text:style-name="P258"><text:span text:style-name="T32">5</text:span></text:p></draw:text-box></draw:frame><draw:frame draw:style-name="gr6" draw:text-style-name="P259" svg:width="0.877cm" svg:height="0.65cm" svg:x="5.618cm" svg:y="3.569cm"><draw:text-box><text:p text:style-name="P258"><text:span text:style-name="T32">6</text:span></text:p></draw:text-box></draw:frame><draw:frame draw:style-name="gr6" draw:text-style-name="P259" svg:width="0.877cm" svg:height="0.65cm" svg:x="6.119cm" svg:y="3.569cm"><draw:text-box><text:p text:style-name="P258"><text:span text:style-name="T32">7</text:span></text:p></draw:text-box></draw:frame><draw:frame draw:style-name="gr6" draw:text-style-name="P259" svg:width="0.877cm" svg:height="0.65cm" svg:x="6.618cm" svg:y="3.569cm"><draw:text-box><text:p text:style-name="P258"><text:span text:style-name="T32">8</text:span></text:p></draw:text-box></draw:frame><draw:frame draw:style-name="gr6" draw:text-style-name="P259" svg:width="0.877cm" svg:height="0.65cm" svg:x="7.117cm" svg:y="3.569cm"><draw:text-box><text:p text:style-name="P258"><text:span text:style-name="T32">9</text:span></text:p></draw:text-box></draw:frame><draw:frame draw:style-name="gr6" draw:text-style-name="P259" svg:width="0.877cm" svg:height="0.65cm" svg:x="7.495cm" svg:y="3.569cm"><draw:text-box><text:p text:style-name="P258"><text:span text:style-name="T32">10</text:span></text:p></draw:text-box></draw:frame><draw:line draw:style-name="gr2" draw:text-style-name="P257" svg:x1="4.996cm" svg:y1="2.421cm" svg:x2="4.495cm" svg:y2="2.922cm"><text:p/></draw:line><draw:line draw:style-name="gr2" draw:text-style-name="P257" svg:x1="4.996cm" svg:y1="2.421cm" svg:x2="5.996cm" svg:y2="2.421cm"><text:p/></draw:line><draw:line draw:style-name="gr2" draw:text-style-name="P257" svg:x1="6.495cm" svg:y1="2.922cm" svg:x2="5.996cm" svg:y2="2.421cm"><text:p/></draw:line><draw:line draw:style-name="gr2" draw:text-style-name="P257" svg:x1="6.493cm" svg:y1="2.922cm" svg:x2="7.493cm" svg:y2="2.922cm"><text:p/></draw:line><draw:line draw:style-name="gr2" draw:text-style-name="P257" svg:x1="7.996cm" svg:y1="3.421cm" svg:x2="7.495cm" svg:y2="2.922cm"><text:p/></draw:line><draw:line draw:style-name="gr2" draw:text-style-name="P257" svg:x1="7.998cm" svg:y1="3.422cm" svg:x2="8.998cm" svg:y2="3.422cm"><text:p/></draw:line><draw:frame draw:style-name="gr6" draw:text-style-name="P259" svg:width="0.877cm" svg:height="0.65cm" svg:x="1.496cm" svg:y="3.068cm"><draw:text-box><text:p text:style-name="P258"><text:span text:style-name="T32">0</text:span></text:p></draw:text-box></draw:frame><draw:frame draw:style-name="gr6" draw:text-style-name="P259" svg:width="1.251cm" svg:height="0.65cm" svg:x="1.164cm" svg:y="2.172cm"><draw:text-box><text:p text:style-name="P258"><text:span text:style-name="T32">100</text:span></text:p></draw:text-box></draw:frame><draw:frame draw:style-name="gr6" draw:text-style-name="P259" svg:width="0.877cm" svg:height="0.65cm" svg:x="1.333cm" svg:y="2.671cm"><draw:text-box><text:p text:style-name="P258"><text:span text:style-name="T32">50</text:span></text:p></draw:text-box></draw:frame><draw:line draw:style-name="gr53" draw:text-style-name="P257" svg:x1="1.999cm" svg:y1="1.92cm" svg:x2="2.999cm" svg:y2="1.92cm"><text:p/></draw:line><draw:line draw:style-name="gr53" draw:text-style-name="P257" svg:x1="2.997cm" svg:y1="1.42cm" svg:x2="2.997cm" svg:y2="1.921cm"><text:p/></draw:line><draw:line draw:style-name="gr53" draw:text-style-name="P257" svg:x1="2.997cm" svg:y1="1.42cm" svg:x2="3.747cm" svg:y2="1.42cm"><text:p/></draw:line><draw:line draw:style-name="gr53" draw:text-style-name="P257" svg:x1="3.745cm" svg:y1="1.921cm" svg:x2="3.745cm" svg:y2="1.42cm"><text:p/></draw:line><draw:line draw:style-name="gr53" draw:text-style-name="P257" svg:x1="3.745cm" svg:y1="1.92cm" svg:x2="8.996cm" svg:y2="1.92cm"><text:p/></draw:line><draw:line draw:style-name="gr3" draw:text-style-name="P257" svg:x1="1.999cm" svg:y1="0.919cm" svg:x2="2.999cm" svg:y2="0.919cm"><text:p/></draw:line><draw:line draw:style-name="gr3" draw:text-style-name="P257" svg:x1="2.997cm" svg:y1="0.419cm" svg:x2="2.997cm" svg:y2="0.92cm"><text:p/></draw:line><draw:line draw:style-name="gr3" draw:text-style-name="P257" svg:x1="2.997cm" svg:y1="0.419cm" svg:x2="7.998cm" svg:y2="0.419cm"><text:p/></draw:line><draw:line draw:style-name="gr3" draw:text-style-name="P257" svg:x1="7.998cm" svg:y1="0.92cm" svg:x2="7.998cm" svg:y2="0.419cm"><text:p/></draw:line><draw:line draw:style-name="gr3" draw:text-style-name="P257" svg:x1="7.998cm" svg:y1="0.919cm" svg:x2="8.998cm" svg:y2="0.919cm"><text:p/></draw:line><draw:frame draw:style-name="gr6" draw:text-style-name="P259" svg:width="1.251cm" svg:height="0.65cm" svg:x="1.245cm" svg:y="1.318cm"><draw:text-box><text:p text:style-name="P258"><text:span text:style-name="T32">E</text:span></text:p></draw:text-box></draw:frame><draw:frame draw:style-name="gr6" draw:text-style-name="P259" svg:width="1.251cm" svg:height="0.65cm" svg:x="1.245cm" svg:y="0.318cm"><draw:text-box><text:p text:style-name="P258"><text:span text:style-name="T32">RUN</text:span></text:p></draw:text-box></draw:frame></draw:g></text:p>
      <text:p text:style-name="P187"><draw:g text:anchor-type="paragraph" draw:z-index="244" draw:style-name="gr1"><draw:line draw:style-name="gr52" draw:text-style-name="P257" svg:x1="2.055cm" svg:y1="3.921cm" svg:x2="2.055cm" svg:y2="2.175cm"><text:p/></draw:line><draw:line draw:style-name="gr2" draw:text-style-name="P257" svg:x1="2.055cm" svg:y1="3.43cm" svg:x2="3.055cm" svg:y2="3.43cm"><text:p/></draw:line><draw:line draw:style-name="gr2" draw:text-style-name="P257" svg:x1="3.553cm" svg:y1="2.929cm" svg:x2="3.052cm" svg:y2="3.43cm"><text:p/></draw:line><draw:line draw:style-name="gr2" draw:text-style-name="P257" svg:x1="3.556cm" svg:y1="2.929cm" svg:x2="4.554cm" svg:y2="2.929cm"><text:p/></draw:line><draw:frame draw:style-name="gr6" draw:text-style-name="P259" svg:width="0.877cm" svg:height="0.65cm" svg:x="2.674cm" svg:y="3.575cm"><draw:text-box><text:p text:style-name="P258"><text:span text:style-name="T32">0</text:span></text:p></draw:text-box></draw:frame><draw:frame draw:style-name="gr6" draw:text-style-name="P259" svg:width="0.877cm" svg:height="0.65cm" svg:x="3.175cm" svg:y="3.575cm"><draw:text-box><text:p text:style-name="P258"><text:span text:style-name="T32">1</text:span></text:p></draw:text-box></draw:frame><draw:frame draw:style-name="gr6" draw:text-style-name="P259" svg:width="0.877cm" svg:height="0.65cm" svg:x="3.675cm" svg:y="3.575cm"><draw:text-box><text:p text:style-name="P258"><text:span text:style-name="T32">2</text:span></text:p></draw:text-box></draw:frame><draw:frame draw:style-name="gr6" draw:text-style-name="P259" svg:width="0.877cm" svg:height="0.65cm" svg:x="4.176cm" svg:y="3.575cm"><draw:text-box><text:p text:style-name="P258"><text:span text:style-name="T32">3</text:span></text:p></draw:text-box></draw:frame><draw:frame draw:style-name="gr6" draw:text-style-name="P259" svg:width="0.877cm" svg:height="0.65cm" svg:x="4.675cm" svg:y="3.575cm"><draw:text-box><text:p text:style-name="P258"><text:span text:style-name="T32">4</text:span></text:p></draw:text-box></draw:frame><draw:frame draw:style-name="gr6" draw:text-style-name="P259" svg:width="0.877cm" svg:height="0.65cm" svg:x="5.176cm" svg:y="3.575cm"><draw:text-box><text:p text:style-name="P258"><text:span text:style-name="T32">5</text:span></text:p></draw:text-box></draw:frame><draw:frame draw:style-name="gr6" draw:text-style-name="P259" svg:width="0.877cm" svg:height="0.65cm" svg:x="5.675cm" svg:y="3.575cm"><draw:text-box><text:p text:style-name="P258"><text:span text:style-name="T32">6</text:span></text:p></draw:text-box></draw:frame><draw:frame draw:style-name="gr6" draw:text-style-name="P259" svg:width="0.877cm" svg:height="0.65cm" svg:x="6.176cm" svg:y="3.575cm"><draw:text-box><text:p text:style-name="P258"><text:span text:style-name="T32">7</text:span></text:p></draw:text-box></draw:frame><draw:frame draw:style-name="gr6" draw:text-style-name="P259" svg:width="0.877cm" svg:height="0.65cm" svg:x="6.675cm" svg:y="3.575cm"><draw:text-box><text:p text:style-name="P258"><text:span text:style-name="T32">8</text:span></text:p></draw:text-box></draw:frame><draw:frame draw:style-name="gr6" draw:text-style-name="P259" svg:width="0.877cm" svg:height="0.65cm" svg:x="7.174cm" svg:y="3.575cm"><draw:text-box><text:p text:style-name="P258"><text:span text:style-name="T32">9</text:span></text:p></draw:text-box></draw:frame><draw:frame draw:style-name="gr6" draw:text-style-name="P259" svg:width="0.877cm" svg:height="0.65cm" svg:x="7.552cm" svg:y="3.575cm"><draw:text-box><text:p text:style-name="P258"><text:span text:style-name="T32">10</text:span></text:p></draw:text-box></draw:frame><draw:line draw:style-name="gr2" draw:text-style-name="P257" svg:x1="5.05cm" svg:y1="2.429cm" svg:x2="4.549cm" svg:y2="2.928cm"><text:p/></draw:line><draw:line draw:style-name="gr2" draw:text-style-name="P257" svg:x1="5.05cm" svg:y1="2.429cm" svg:x2="6.05cm" svg:y2="2.429cm"><text:p/></draw:line><draw:line draw:style-name="gr2" draw:text-style-name="P257" svg:x1="7.551cm" svg:y1="2.928cm" svg:x2="7.052cm" svg:y2="2.429cm"><text:p/></draw:line><draw:line draw:style-name="gr2" draw:text-style-name="P257" svg:x1="7.553cm" svg:y1="2.929cm" svg:x2="8.553cm" svg:y2="2.929cm"><text:p/></draw:line><draw:line draw:style-name="gr2" draw:text-style-name="P257" svg:x1="9.054cm" svg:y1="3.43cm" svg:x2="8.553cm" svg:y2="2.929cm"><text:p/></draw:line><draw:line draw:style-name="gr2" draw:text-style-name="P257" svg:x1="9.054cm" svg:y1="3.43cm" svg:x2="10.054cm" svg:y2="3.43cm"><text:p/></draw:line><draw:frame draw:style-name="gr6" draw:text-style-name="P259" svg:width="0.877cm" svg:height="0.65cm" svg:x="1.553cm" svg:y="3.074cm"><draw:text-box><text:p text:style-name="P258"><text:span text:style-name="T32">0</text:span></text:p></draw:text-box></draw:frame><draw:frame draw:style-name="gr6" draw:text-style-name="P259" svg:width="1.251cm" svg:height="0.65cm" svg:x="1.221cm" svg:y="2.178cm"><draw:text-box><text:p text:style-name="P258"><text:span text:style-name="T32">100</text:span></text:p></draw:text-box></draw:frame><draw:frame draw:style-name="gr6" draw:text-style-name="P259" svg:width="0.877cm" svg:height="0.65cm" svg:x="1.39cm" svg:y="2.677cm"><draw:text-box><text:p text:style-name="P258"><text:span text:style-name="T32">50</text:span></text:p></draw:text-box></draw:frame><draw:line draw:style-name="gr53" draw:text-style-name="P257" svg:x1="2.055cm" svg:y1="1.929cm" svg:x2="3.055cm" svg:y2="1.929cm"><text:p/></draw:line><draw:line draw:style-name="gr53" draw:text-style-name="P257" svg:x1="3.052cm" svg:y1="1.429cm" svg:x2="3.052cm" svg:y2="1.928cm"><text:p/></draw:line><draw:line draw:style-name="gr53" draw:text-style-name="P257" svg:x1="3.052cm" svg:y1="1.429cm" svg:x2="6.052cm" svg:y2="1.429cm"><text:p/></draw:line><draw:line draw:style-name="gr53" draw:text-style-name="P257" svg:x1="7.052cm" svg:y1="1.928cm" svg:x2="7.052cm" svg:y2="1.429cm"><text:p/></draw:line><draw:line draw:style-name="gr53" draw:text-style-name="P257" svg:x1="7.052cm" svg:y1="1.929cm" svg:x2="10.052cm" svg:y2="1.929cm"><text:p/></draw:line><draw:line draw:style-name="gr3" draw:text-style-name="P257" svg:x1="2.055cm" svg:y1="0.928cm" svg:x2="3.055cm" svg:y2="0.928cm"><text:p/></draw:line><draw:line draw:style-name="gr3" draw:text-style-name="P257" svg:x1="3.052cm" svg:y1="0.427cm" svg:x2="3.052cm" svg:y2="0.926cm"><text:p/></draw:line><draw:line draw:style-name="gr3" draw:text-style-name="P257" svg:x1="3.052cm" svg:y1="0.427cm" svg:x2="6.052cm" svg:y2="0.427cm"><text:p/></draw:line><draw:line draw:style-name="gr3" draw:text-style-name="P257" svg:x1="9.054cm" svg:y1="0.926cm" svg:x2="9.054cm" svg:y2="0.427cm"><text:p/></draw:line><draw:line draw:style-name="gr3" draw:text-style-name="P257" svg:x1="9.054cm" svg:y1="0.928cm" svg:x2="10.054cm" svg:y2="0.928cm"><text:p/></draw:line><draw:frame draw:style-name="gr6" draw:text-style-name="P259" svg:width="1.251cm" svg:height="0.65cm" svg:x="1.302cm" svg:y="1.326cm"><draw:text-box><text:p text:style-name="P258"><text:span text:style-name="T32">E</text:span></text:p></draw:text-box></draw:frame><draw:frame draw:style-name="gr6" draw:text-style-name="P259" svg:width="1.251cm" svg:height="0.65cm" svg:x="1.302cm" svg:y="0.324cm"><draw:text-box><text:p text:style-name="P258"><text:span text:style-name="T32">RUN</text:span></text:p></draw:text-box></draw:frame><draw:frame draw:style-name="gr6" draw:text-style-name="P259" svg:width="0.877cm" svg:height="0.65cm" svg:x="8.053cm" svg:y="3.575cm"><draw:text-box><text:p text:style-name="P258"><text:span text:style-name="T32">11</text:span></text:p></draw:text-box></draw:frame><draw:frame draw:style-name="gr6" draw:text-style-name="P259" svg:width="0.877cm" svg:height="0.65cm" svg:x="8.552cm" svg:y="3.575cm"><draw:text-box><text:p text:style-name="P258"><text:span text:style-name="T32">12</text:span></text:p></draw:text-box></draw:frame><draw:line draw:style-name="gr14" draw:text-style-name="P257" svg:x1="6.052cm" svg:y1="3.429cm" svg:x2="6.052cm" svg:y2="0.178cm"><text:p/></draw:line><draw:line draw:style-name="gr14" draw:text-style-name="P257" svg:x1="7.052cm" svg:y1="3.429cm" svg:x2="7.052cm" svg:y2="0.178cm"><text:p/></draw:line><draw:line draw:style-name="gr54" draw:text-style-name="P257" svg:x1="7.052cm" svg:y1="2.429cm" svg:x2="6.052cm" svg:y2="2.429cm"><text:p/></draw:line><draw:line draw:style-name="gr2" draw:text-style-name="P257" svg:x1="5.05cm" svg:y1="2.429cm" svg:x2="6.05cm" svg:y2="2.429cm"><text:p/></draw:line><draw:line draw:style-name="gr55" draw:text-style-name="P257" svg:x1="7.052cm" svg:y1="1.429cm" svg:x2="6.052cm" svg:y2="1.429cm"><text:p/></draw:line><draw:line draw:style-name="gr3" draw:text-style-name="P257" svg:x1="9.052cm" svg:y1="0.427cm" svg:x2="7.052cm" svg:y2="0.427cm"><text:p/></draw:line><draw:line draw:style-name="gr56" draw:text-style-name="P257" svg:x1="6.052cm" svg:y1="0.427cm" svg:x2="7.052cm" svg:y2="0.427cm"><text:p/></draw:line></draw:g></text:p>
      <text:list xml:id="list38476802" text:continue-numbering="true" text:style-name="L1">
        <text:list-item>
          <text:list>
            <text:list-item>
              <text:h text:style-name="P216" text:outline-level="2"><text:alphabetical-index-mark-start text:id="IMark225941772"/>INC_DEC<text:alphabetical-index-mark-end text:id="IMark225941772"/></text:h>
            </text:list-item>
          </text:list>
        </text:list-item>
      </text:list>
      <text:p text:style-name="P69">Type<text:tab/>Funktionsbaustein</text:p>
      <text:p text:style-name="P66"><text:span text:style-name="T15">Input</text:span><text:span text:style-name="T14"><text:tab/>CHA : BOOL (Kanal A des Gebers)</text:span></text:p>
      <text:p text:style-name="P179"><text:tab/>CHB : BOOL (Kanal B des Gebers) </text:p>
      <text:p text:style-name="P179"><text:tab/>RST : BOOL (Reset)</text:p>
      <text:p text:style-name="P73">Output<text:tab/>DIR : BOOL (Drehrichtung)</text:p>
      <text:p text:style-name="P183"><draw:frame draw:style-name="fr3" draw:name="Grafik189" text:anchor-type="paragraph" svg:x="1.104cm" svg:y="0.605cm" svg:width="2.281cm" svg:height="2.2cm" draw:z-index="296"><draw:image xlink:href="Pictures/10000000000000AC000000A6A2F551A2.png" xlink:type="simple" xlink:show="embed" xlink:actuate="onLoad"/></draw:frame><text:tab/>CNT : INT (Zählerwert)</text:p>
      <text:p text:style-name="P66"><text:span text:style-name="T21"><text:line-break/>INC_DEC ist ein Decoder für Inkrementalgeber. Inkrementalgeber (Drehgeber) liefern 2 überlappende Impulse, Kanal A und Kanal B. Aus den beiden </text:span><text:soft-page-break/><text:span text:style-name="T21">Kanälen wird die Drehrichtung und der Drehwinkel dekodiert. INC_DEC detektiert jede einzelne Flanke des Drehgebers, sodass 4-fache Auflösung erreicht wird. Der Ausgang DIR zeigt die Drehrichtung an, und am Ausgang CNT steht ein Integer-Wert bereit, der die Anzahl der gezählten Impulse </text:span><text:span text:style-name="T21">ausgibt. Für eine volle Umdrehung eines Drehgebers mit 100 Impulsen zählt CNT bis 400, weil an jeder Flanke beider Kanäle gezählt wird, sodass 4-fache Auflösung erreicht wird. Ein RST Eingang erlaubt jederzeit den Zähler auf 0 zu stellen. Der Zähler zählt aufwärts, wenn DIR = TRUE und abwärts, wenn DIR = FALSE.</text:span></text:p>
      <text:p text:style-name="P2">Im Folgenden <text:span text:style-name="T11">Beispiel</text:span> wird ein Bitmustergenerator GEN_BIT benutzt um einen Drehgeber zu simulieren, der immer abwechselnd 3 Schritte im Uhrzeigersinn und 3 im Gegenuhrzeigersinn macht. In der <text:span text:style-name="T2">Tracea</text:span>ufzeichnung ist zu sehen, wie der INC_DEC die Bewegung in 12 Zahlschritte zerlegt und die Richtung dekodiert.</text:p>
      <text:p text:style-name="P73"><draw:frame draw:style-name="fr3" draw:name="Grafik193" text:anchor-type="paragraph" svg:x="1.078cm" svg:y="0.533cm" svg:width="15.757cm" svg:height="4.341cm" draw:z-index="297"><draw:image xlink:href="Pictures/10000000000004C300000150EB54EE5C.png" xlink:type="simple" xlink:show="embed" xlink:actuate="onLoad"/></draw:frame></text:p>
      <text:p text:style-name="P183"/>
      <text:p text:style-name="P183"><draw:frame draw:style-name="fr3" draw:name="Grafik194" text:anchor-type="paragraph" svg:x="0.857cm" svg:y="0.182cm" svg:width="16.127cm" svg:height="7.357cm" draw:z-index="295"><draw:image xlink:href="Pictures/10000000000002CD00000147ADF5621C.png" xlink:type="simple" xlink:show="embed" xlink:actuate="onLoad"/></draw:frame></text:p>
      <text:p text:style-name="P183"/>
      <text:list xml:id="list38466781" text:continue-numbering="true" text:style-name="L1">
        <text:list-item>
          <text:list>
            <text:list-item>
              <text:h text:style-name="P216" text:outline-level="2"><text:soft-page-break/><text:alphabetical-index-mark-start text:id="IMark225941772"/>INTERLOCK<text:alphabetical-index-mark-end text:id="IMark225941772"/></text:h>
            </text:list-item>
          </text:list>
        </text:list-item>
      </text:list>
      <text:p text:style-name="P2">Type<text:tab/><text:span text:style-name="T11">Funktionsbaustein</text:span></text:p>
      <text:p text:style-name="P2"><text:span text:style-name="T3">Input</text:span><text:span text:style-name="T10"><text:tab/>I1 : BOOL (Eingang 1)</text:span></text:p>
      <text:p text:style-name="P183"><text:tab/>I2 : BOOL (Eingang 2)</text:p>
      <text:p text:style-name="P183"><text:tab/>TL : TIME (Totzeit)</text:p>
      <text:p text:style-name="P183">Output<text:tab/>Q1 : BOOL (Ausgang 1)</text:p>
      <text:p text:style-name="P183"><text:tab/>Q2 : BOOL (Ausgang 2)</text:p>
      <text:p text:style-name="P183"><draw:frame draw:style-name="fr3" draw:name="Grafik327" text:anchor-type="paragraph" svg:x="1.355cm" svg:y="0.101cm" svg:width="2.499cm" svg:height="1.921cm" draw:z-index="298"><draw:image xlink:href="Pictures/10000000000000BD00000091B378DA83.png" xlink:type="simple" xlink:show="embed" xlink:actuate="onLoad"/></draw:frame><text:line-break/>Der Baustein INTERLOCK hat 2 Eingänge I1 und I2 die jeweils die Ausgänge Q1 und Q2 schalten. Q1 und Q2 sind jedoch gegenseitig verriegelt so dass immer nur ein Ausgang auf TRUE stehen kann. Die Zeit TL legt eine Totzeit zwischen den Beiden Ausgängen fest. Ein Ausgang kann nur dann TRUE werden wenn der andere Ausgang für mindestens für die Zeit TL FALSE war.</text:p>
      <table:table table:name="Tabelle13" table:style-name="Tabelle13">
        <table:table-column table:style-name="Tabelle13.A" table:number-columns-repeated="2"/>
        <table:table-column table:style-name="Tabelle13.C"/>
        <table:table-column table:style-name="Tabelle13.D"/>
        <table:table-row>
          <table:table-cell table:style-name="Tabelle13.A1" office:value-type="string">
            <text:p text:style-name="P122">I1</text:p>
          </table:table-cell>
          <table:table-cell table:style-name="Tabelle13.A1" office:value-type="string">
            <text:p text:style-name="P122">I2</text:p>
          </table:table-cell>
          <table:table-cell table:style-name="Tabelle13.A1" office:value-type="string">
            <text:p text:style-name="P122">Q1</text:p>
          </table:table-cell>
          <table:table-cell table:style-name="Tabelle13.D1" office:value-type="string">
            <text:p text:style-name="P122">Q2</text:p>
          </table:table-cell>
        </table:table-row>
        <table:table-row>
          <table:table-cell table:style-name="Tabelle13.A2" office:value-type="string">
            <text:p text:style-name="P122">0</text:p>
          </table:table-cell>
          <table:table-cell table:style-name="Tabelle13.A2" office:value-type="string">
            <text:p text:style-name="P122">0</text:p>
          </table:table-cell>
          <table:table-cell table:style-name="Tabelle13.A2" office:value-type="string">
            <text:p text:style-name="P122">0</text:p>
          </table:table-cell>
          <table:table-cell table:style-name="Tabelle13.D2" office:value-type="string">
            <text:p text:style-name="P122">0</text:p>
          </table:table-cell>
        </table:table-row>
        <table:table-row>
          <table:table-cell table:style-name="Tabelle13.A2" office:value-type="string">
            <text:p text:style-name="P122">0</text:p>
          </table:table-cell>
          <table:table-cell table:style-name="Tabelle13.A2" office:value-type="string">
            <text:p text:style-name="P122">1</text:p>
          </table:table-cell>
          <table:table-cell table:style-name="Tabelle13.A2" office:value-type="string">
            <text:p text:style-name="P122">0</text:p>
          </table:table-cell>
          <table:table-cell table:style-name="Tabelle13.D2" office:value-type="string">
            <text:p text:style-name="P122">1</text:p>
          </table:table-cell>
        </table:table-row>
        <table:table-row>
          <table:table-cell table:style-name="Tabelle13.A2" office:value-type="string">
            <text:p text:style-name="P122">1</text:p>
          </table:table-cell>
          <table:table-cell table:style-name="Tabelle13.A2" office:value-type="string">
            <text:p text:style-name="P122">0</text:p>
          </table:table-cell>
          <table:table-cell table:style-name="Tabelle13.A2" office:value-type="string">
            <text:p text:style-name="P122">1</text:p>
          </table:table-cell>
          <table:table-cell table:style-name="Tabelle13.D2" office:value-type="string">
            <text:p text:style-name="P122">0</text:p>
          </table:table-cell>
        </table:table-row>
        <table:table-row>
          <table:table-cell table:style-name="Tabelle13.A2" office:value-type="string">
            <text:p text:style-name="P122">1</text:p>
          </table:table-cell>
          <table:table-cell table:style-name="Tabelle13.A2" office:value-type="string">
            <text:p text:style-name="P122">1</text:p>
          </table:table-cell>
          <table:table-cell table:style-name="Tabelle13.A2" office:value-type="string">
            <text:p text:style-name="P122">0</text:p>
          </table:table-cell>
          <table:table-cell table:style-name="Tabelle13.D2" office:value-type="string">
            <text:p text:style-name="P122">0</text:p>
          </table:table-cell>
        </table:table-row>
      </table:table>
      <text:p text:style-name="P187"><draw:frame draw:style-name="fr3" draw:name="Grafik376" text:anchor-type="paragraph" svg:x="1.355cm" svg:y="1.035cm" svg:width="9.29cm" svg:height="4.44cm" draw:z-index="352"><draw:image xlink:href="Pictures/10000000000001D400000102A7446F75.png" xlink:type="simple" xlink:show="embed" xlink:actuate="onLoad"/></draw:frame></text:p>
      <text:p text:style-name="P183"/>
      <text:list xml:id="list38458261" text:continue-numbering="true" text:style-name="L1">
        <text:list-item>
          <text:list>
            <text:list-item>
              <text:h text:style-name="P216" text:outline-level="2"><text:soft-page-break/><text:alphabetical-index-mark-start text:id="IMark225941772"/>INTERLOCK_4<text:alphabetical-index-mark-end text:id="IMark225941772"/></text:h>
            </text:list-item>
          </text:list>
        </text:list-item>
      </text:list>
      <text:p text:style-name="P2">Type<text:tab/><text:span text:style-name="T11">Funktionsbaustein</text:span></text:p>
      <text:p text:style-name="P2"><text:span text:style-name="T3">Input</text:span><text:span text:style-name="T10"><text:tab/>I0 : BOOL (Eingangssignal 0)</text:span></text:p>
      <text:p text:style-name="P183"><text:tab/>I1 : BOOL (Eingangssignal 1)</text:p>
      <text:p text:style-name="P183"><text:tab/>I2 : BOOL (Eingangssignal 2)</text:p>
      <text:p text:style-name="P183"><text:tab/>I3 : BOOL (Eingangssignal 3)</text:p>
      <text:p text:style-name="P183"><text:tab/>E : BOOL (<text:span text:style-name="T2">Enable</text:span> Eingang)</text:p>
      <text:p text:style-name="P183"><text:tab/>MODE : INT (Betriebsmodus)</text:p>
      <text:p text:style-name="P183">Output<text:tab/>OUT : BOOL (Ausgangssignal)</text:p>
      <text:p text:style-name="P187"><draw:frame draw:style-name="fr3" draw:name="Grafik722" text:anchor-type="paragraph" svg:x="0.997cm" svg:y="0.658cm" svg:width="2.9cm" svg:height="3.08cm" draw:z-index="747"><draw:image xlink:href="Pictures/10000000000000DB000000E9724BBD7F.png" xlink:type="simple" xlink:show="embed" xlink:actuate="onLoad"/></draw:frame><text:tab/>TP : BOOL (TRUE wenn sich Ausgang verändert hat)</text:p>
      <text:p text:style-name="P187"><text:line-break/>INTERLOCK_4 packt die 4 Eingangswerte I0..I3 in die Bits (0..3) des Ausgangs OUT. Bei jeder Veränderung des Ausgangs wird der Ausgang TP für einen Zyklus TRUE damit weitere Bausteine zur Verarbeitung getriggert werden können. Ist der Eingang E = FALSE bleiben alle Ausgänge auf 0 bzw. FALSE. Der Eingang MODE stellt verschiedene Betriebsmode des Bausteins ein.</text:p>
      <table:table table:name="Tabelle50" table:style-name="Tabelle50">
        <table:table-column table:style-name="Tabelle50.A"/>
        <table:table-column table:style-name="Tabelle50.B"/>
        <table:table-row>
          <table:table-cell table:style-name="Tabelle50.A1" office:value-type="string">
            <text:p text:style-name="P140">MODE</text:p>
          </table:table-cell>
          <table:table-cell table:style-name="Tabelle50.B1" office:value-type="string">
            <text:p text:style-name="P139">Bedeutung</text:p>
          </table:table-cell>
        </table:table-row>
        <table:table-row>
          <table:table-cell table:style-name="Tabelle50.A2" office:value-type="float" office:value="0">
            <text:p text:style-name="P140">0</text:p>
          </table:table-cell>
          <table:table-cell table:style-name="Tabelle50.B2" office:value-type="string">
            <text:p text:style-name="P139">Eingänge werden direkt im Ausgangsbyte dargestellt</text:p>
            <text:p text:style-name="P139">z.B. I0, I2 = TRUE<text:tab/>OUT = 2#0000_0101</text:p>
          </table:table-cell>
        </table:table-row>
        <table:table-row>
          <table:table-cell table:style-name="Tabelle50.A2" office:value-type="float" office:value="1">
            <text:p text:style-name="P140">1</text:p>
          </table:table-cell>
          <table:table-cell table:style-name="Tabelle50.B2" office:value-type="string">
            <text:p text:style-name="P139">Nur der Eingang mit der höchsten Eingangsnummer wird ausgegeben, die anderen werden ignoriert.</text:p>
            <text:p text:style-name="P139">z.B. I0,I1,I2 = TRUE:<text:tab/>OUT = 2#0000_0100</text:p>
          </table:table-cell>
        </table:table-row>
        <table:table-row>
          <table:table-cell table:style-name="Tabelle50.A2" office:value-type="float" office:value="2">
            <text:p text:style-name="P140">2</text:p>
          </table:table-cell>
          <table:table-cell table:style-name="Tabelle50.B2" office:value-type="string">
            <text:p text:style-name="P139">Nur der zuletzt aktivierte Eingang wird ausgegeben.</text:p>
          </table:table-cell>
        </table:table-row>
        <table:table-row>
          <table:table-cell table:style-name="Tabelle50.A2" office:value-type="float" office:value="3">
            <text:p text:style-name="P140">3</text:p>
          </table:table-cell>
          <table:table-cell table:style-name="Tabelle50.B2" office:value-type="string">
            <text:p text:style-name="P139">Ein aktivierter Eingang <text:span text:style-name="T2">disabled</text:span> alle anderen Eingänge.</text:p>
          </table:table-cell>
        </table:table-row>
      </table:table>
      <text:p text:style-name="P187"/>
      <text:p text:style-name="P187"/>
      <text:p text:style-name="P187"/>
      <text:list xml:id="list38462320" text:continue-numbering="true" text:style-name="L1">
        <text:list-item>
          <text:list>
            <text:list-item>
              <text:h text:style-name="P216" text:outline-level="2"><text:soft-page-break/><text:alphabetical-index-mark-start text:id="IMark225941772"/>MANUAL<text:alphabetical-index-mark-end text:id="IMark225941772"/></text:h>
            </text:list-item>
          </text:list>
        </text:list-item>
      </text:list>
      <text:p text:style-name="P2">Type<text:tab/><text:span text:style-name="T11">Funktion : BOOL</text:span></text:p>
      <text:p text:style-name="P2"><text:span text:style-name="T3">Input</text:span><text:span text:style-name="T10"><text:tab/>IN : BOOL (Eingangssignal)</text:span></text:p>
      <text:p text:style-name="P183"><text:tab/>ON : BOOL (Handbetrieb Ein)</text:p>
      <text:p text:style-name="P183"><text:tab/>OFF : BOOL (Handbetrieb Aus)</text:p>
      <text:p text:style-name="P183"><draw:frame draw:style-name="fr3" draw:name="Grafik750" text:anchor-type="paragraph" svg:x="1.025cm" svg:y="0.676cm" svg:width="3.29cm" svg:height="1.79cm" draw:z-index="801"><draw:image xlink:href="Pictures/10000000000000F900000087F3E7FF4A.png" xlink:type="simple" xlink:show="embed" xlink:actuate="onLoad"/></draw:frame>Output<text:tab/>BOOL (Ausgangssignal)</text:p>
      <text:p text:style-name="P183"><text:line-break/>MANUAL kann ein Eingangssignal IN mit TRUE oder mit FALSE überschreiben.</text:p>
      <table:table table:name="Tabelle52" table:style-name="Tabelle52">
        <table:table-column table:style-name="Tabelle52.A"/>
        <table:table-column table:style-name="Tabelle52.B"/>
        <table:table-column table:style-name="Tabelle52.C"/>
        <table:table-column table:style-name="Tabelle52.D"/>
        <table:table-column table:style-name="Tabelle52.E"/>
        <table:table-row>
          <table:table-cell table:style-name="Tabelle52.A1" office:value-type="string">
            <text:p text:style-name="P148">IN</text:p>
          </table:table-cell>
          <table:table-cell table:style-name="Tabelle52.A1" office:value-type="string">
            <text:p text:style-name="P148">ON</text:p>
          </table:table-cell>
          <table:table-cell table:style-name="Tabelle52.A1" office:value-type="string">
            <text:p text:style-name="P148">OFF</text:p>
          </table:table-cell>
          <table:table-cell table:style-name="Tabelle52.A1" office:value-type="string">
            <text:p text:style-name="P148">Q</text:p>
          </table:table-cell>
          <table:table-cell table:style-name="Tabelle52.E1" office:value-type="string">
            <text:p text:style-name="P141"/>
          </table:table-cell>
        </table:table-row>
        <table:table-row>
          <table:table-cell table:style-name="Tabelle52.A2" office:value-type="float" office:value="0">
            <text:p text:style-name="P148">0</text:p>
          </table:table-cell>
          <table:table-cell table:style-name="Tabelle52.A2" office:value-type="float" office:value="0">
            <text:p text:style-name="P148">0</text:p>
          </table:table-cell>
          <table:table-cell table:style-name="Tabelle52.A2" office:value-type="float" office:value="0">
            <text:p text:style-name="P148">0</text:p>
          </table:table-cell>
          <table:table-cell table:style-name="Tabelle52.A2" office:value-type="float" office:value="0">
            <text:p text:style-name="P148">0</text:p>
          </table:table-cell>
          <table:table-cell table:style-name="Tabelle52.E2" office:value-type="string">
            <text:p text:style-name="P149"/>
          </table:table-cell>
        </table:table-row>
        <table:table-row>
          <table:table-cell table:style-name="Tabelle52.A2" office:value-type="float" office:value="1">
            <text:p text:style-name="P148">1</text:p>
          </table:table-cell>
          <table:table-cell table:style-name="Tabelle52.A2" office:value-type="float" office:value="0">
            <text:p text:style-name="P148">0</text:p>
          </table:table-cell>
          <table:table-cell table:style-name="Tabelle52.A2" office:value-type="float" office:value="0">
            <text:p text:style-name="P148">0</text:p>
          </table:table-cell>
          <table:table-cell table:style-name="Tabelle52.A2" office:value-type="float" office:value="1">
            <text:p text:style-name="P148">1</text:p>
          </table:table-cell>
          <table:table-cell table:style-name="Tabelle52.E2" office:value-type="string">
            <text:p text:style-name="P149"/>
          </table:table-cell>
        </table:table-row>
        <table:table-row>
          <table:table-cell table:style-name="Tabelle52.A4" office:value-type="string">
            <text:p text:style-name="P148">-</text:p>
          </table:table-cell>
          <table:table-cell table:style-name="Tabelle52.A4" office:value-type="string">
            <text:p text:style-name="P148">-</text:p>
          </table:table-cell>
          <table:table-cell table:style-name="Tabelle52.A2" office:value-type="float" office:value="1">
            <text:p text:style-name="P148">1</text:p>
          </table:table-cell>
          <table:table-cell table:style-name="Tabelle52.A2" office:value-type="float" office:value="0">
            <text:p text:style-name="P148">0</text:p>
          </table:table-cell>
          <table:table-cell table:style-name="Tabelle52.E2" office:value-type="string">
            <text:p text:style-name="P149">Handbetrieb Stellung AUS</text:p>
          </table:table-cell>
        </table:table-row>
        <table:table-row>
          <table:table-cell table:style-name="Tabelle52.A4" office:value-type="string">
            <text:p text:style-name="P148">-</text:p>
          </table:table-cell>
          <table:table-cell table:style-name="Tabelle52.A2" office:value-type="float" office:value="1">
            <text:p text:style-name="P148">1</text:p>
          </table:table-cell>
          <table:table-cell table:style-name="Tabelle52.A2" office:value-type="float" office:value="0">
            <text:p text:style-name="P148">0</text:p>
          </table:table-cell>
          <table:table-cell table:style-name="Tabelle52.A2" office:value-type="float" office:value="1">
            <text:p text:style-name="P148">1</text:p>
          </table:table-cell>
          <table:table-cell table:style-name="Tabelle52.E2" office:value-type="string">
            <text:p text:style-name="P149">Handbetrieb Stellung EIN</text:p>
          </table:table-cell>
        </table:table-row>
      </table:table>
      <text:p text:style-name="P183"/>
      <text:p text:style-name="P183">Die typische Verwendung von MANUAL ist mittels eines Schalters mit 3 Stellungen (AUS, AUTO, EIN) wobei die Anschlüsse AUS auf OFF und EIN auf ON geschaltet werden und AUTO des Schalters offen bleibt.</text:p>
      <text:p text:style-name="P183"><draw:frame draw:style-name="fr3" draw:name="Grafik751" text:anchor-type="paragraph" svg:x="1.069cm" svg:y="1.192cm" svg:width="7.669cm" svg:height="4.731cm" draw:z-index="802"><draw:image xlink:href="Pictures/10000000000001E30000012A846008E1.png" xlink:type="simple" xlink:show="embed" xlink:actuate="onLoad"/></draw:frame>Das folgende Schema zeigt die mögliche Anschaltung eines Schalters mit 3 Stellungen:</text:p>
      <text:p text:style-name="P183"/>
      <text:list xml:id="list38452192" text:continue-numbering="true" text:style-name="L1">
        <text:list-item>
          <text:list>
            <text:list-item>
              <text:h text:style-name="P216" text:outline-level="2"><text:soft-page-break/><text:alphabetical-index-mark-start text:id="IMark225941772"/>MANUAL_1<text:alphabetical-index-mark-end text:id="IMark225941772"/></text:h>
            </text:list-item>
          </text:list>
        </text:list-item>
      </text:list>
      <text:p text:style-name="P2">Type<text:tab/><text:span text:style-name="T11">Funktionsbaustein</text:span></text:p>
      <text:p text:style-name="P2"><text:span text:style-name="T3">Input</text:span><text:span text:style-name="T10"><text:tab/>IN : BOOL (Eingangssignal)</text:span></text:p>
      <text:p text:style-name="P183"><text:tab/>MAN : BOOL (Umschaltung auf Handbetrieb)</text:p>
      <text:p text:style-name="P183"><text:tab/>M_I : BOOL (Signalpegel bei Handbetrieb)</text:p>
      <text:p text:style-name="P183"><text:tab/>SET : BOOL (Asynchroner Set bei Handbetrieb)</text:p>
      <text:p text:style-name="P183"><text:tab/>RST : BOOL (Asynchroner Reset bei Handbetrieb)</text:p>
      <text:p text:style-name="P183">Output<text:tab/>Q : BOOL (Ausgangssignal)</text:p>
      <text:p text:style-name="P187"><draw:frame draw:style-name="fr3" draw:name="Grafik627" text:anchor-type="paragraph" svg:x="1.023cm" svg:y="0.688cm" svg:width="3.29cm" svg:height="2.679cm" draw:z-index="622"><draw:image xlink:href="Pictures/10000000000000F9000000CB3F47FF3A.png" xlink:type="simple" xlink:show="embed" xlink:actuate="onLoad"/></draw:frame><text:tab/>STATUS : BOOL (ESR kompatibler Status Ausgang) </text:p>
      <text:p text:style-name="P187"><text:line-break/>MANUAL_1 kann ein digitales Signal im Handbetrieb überschreiben. Solange MAN = FALSE folgt der Ausgang Q Eingang direkt dem Eingang IN. Sobald MAN = TRUE wird folgt der Ausgang dem Zustand des Eingangs M_I. Mit den Eingängen SET und RST kann im Handbetrieb ein asynchrones Setzen und Löschen des Ausgangs erzeugt werden. SET und RST sind nur während des Handbetriebs aktiv. Wird im Handbetrieb an SET oder RST eine steigende Flanke registriert, so folgt der Ausgang nicht mehr dem Eingang M_I sondern bleibt auf dem Zustand den eine steigende Flanke an SET (Ausgang = TRUE) beziehungsweise RST (Ausgang = FALSE) erzeugt hat. Sobald der Eingang MAN wieder auf FLASE geht folgt der Ausgang Q wieder dem Eingang IN.</text:p>
      <text:list xml:id="list38451649" text:continue-numbering="true" text:style-name="L1">
        <text:list-item>
          <text:list>
            <text:list-item>
              <text:h text:style-name="P216" text:outline-level="2"><text:alphabetical-index-mark-start text:id="IMark225941772"/>MANUAL_2<text:alphabetical-index-mark-end text:id="IMark225941772"/></text:h>
            </text:list-item>
          </text:list>
        </text:list-item>
      </text:list>
      <text:p text:style-name="P2">Type<text:tab/><text:span text:style-name="T11">Funktionsbaustein</text:span></text:p>
      <text:p text:style-name="P2"><text:span text:style-name="T3">Input</text:span><text:span text:style-name="T10"><text:tab/>IN : BOOL (Eingangssignal)</text:span></text:p>
      <text:p text:style-name="P2"><text:span text:style-name="T10"><text:tab/>ENA : BOOL (Baustein </text:span><text:span text:style-name="T3">Enable</text:span><text:span text:style-name="T10"> Eingang)</text:span></text:p>
      <text:p text:style-name="P183"><text:tab/>ON : BOOL (Zwingt den Ausgang auf TRUE)</text:p>
      <text:p text:style-name="P183"><text:tab/>OFF : BOOL (Zwingt den Ausgang auf FALSE)</text:p>
      <text:p text:style-name="P183"><text:tab/>MAN : BOOL (Ausgangszustand bei Manualbetrieb)</text:p>
      <text:p text:style-name="P183"><text:soft-page-break/>Output<text:tab/>Q : BOOL (Ausgangssignal)</text:p>
      <text:p text:style-name="P187"><draw:frame draw:style-name="fr3" draw:name="Grafik688" text:anchor-type="paragraph" svg:x="1.025cm" svg:y="0.667cm" svg:width="3.29cm" svg:height="2.709cm" draw:z-index="684"><draw:image xlink:href="Pictures/10000000000000F9000000CD3B1B35D9.png" xlink:type="simple" xlink:show="embed" xlink:actuate="onLoad"/></draw:frame><text:tab/>STATUS : BOOL (ESR kompatibler Status Ausgang) </text:p>
      <text:p text:style-name="P175"><text:span text:style-name="T21"><text:line-break/>MANUAL_2 <text:s/>kann ein digitales Signal überschreiben und schaltet zwischen Hand </text:span><text:span text:style-name="T21">und Automatikbetrieb um. der Baustein ist so ausgelegt das ein 3-stufiger Schalter zwischen Aus, Automatik und Ein schaltet. Das Signal im Automatikzustand wird auf IN gelegt, im Falle von erzwungenem Aus wird OFF auf TRUE gelegt und im Falle </text:span><text:span text:style-name="T21">von erzwungenem </text:span><text:span text:style-name="T21">Ein wird ON auf TRUE gelegt. die Beiden Eingänge ON und OFF auf FALSE schalten den Eingang IN direkt auf den Ausgang Q. werden jedoch beide Eingänge ON und OFF gleichzeitig auf TRUE gesetzt, so wird der Zustand des Eingangs MAN auf den Ausgang geschaltet. Der Eingang MAN kann auch dazu benutzt werden um einen Vorrang für ON oder OFF zu definieren, den der Wert von MAN wird immer dann auf den Ausgang gelegt wenn beide Eingänge ON und OFF gleichzeitig auf TRUE stehen. Ist der Eingang ENA auf FALSE so bleibt der Ausgang immer auf FALSE, der Baustein ist </text:span><text:span text:style-name="T16">disabled.</text:span><text:span text:style-name="T21"> Die folgende Tabelle definiert die Betriebszustände des Bausteins. Der Ausgang STATUS ist ESR kompatibel und meldet die Zustände des Bausteins an entsprechende ESR Bausteine weiter.</text:span></text:p>
      <table:table table:name="Tabelle43" table:style-name="Tabelle43">
        <table:table-column table:style-name="Tabelle43.A"/>
        <table:table-column table:style-name="Tabelle43.B"/>
        <table:table-column table:style-name="Tabelle43.A" table:number-columns-repeated="2"/>
        <table:table-column table:style-name="Tabelle43.E"/>
        <table:table-column table:style-name="Tabelle43.F"/>
        <table:table-column table:style-name="Tabelle43.G"/>
        <table:table-column table:style-name="Tabelle43.H"/>
        <table:table-row table:style-name="Tabelle43.1">
          <table:table-cell table:style-name="Tabelle43.A1" office:value-type="string">
            <text:p text:style-name="P102">IN</text:p>
          </table:table-cell>
          <table:table-cell table:style-name="Tabelle43.A1" office:value-type="string">
            <text:p text:style-name="P102">ENA</text:p>
          </table:table-cell>
          <table:table-cell table:style-name="Tabelle43.A1" office:value-type="string">
            <text:p text:style-name="P102">ON</text:p>
          </table:table-cell>
          <table:table-cell table:style-name="Tabelle43.A1" office:value-type="string">
            <text:p text:style-name="P102">OFF</text:p>
          </table:table-cell>
          <table:table-cell table:style-name="Tabelle43.A1" office:value-type="string">
            <text:p text:style-name="P102">MAN</text:p>
          </table:table-cell>
          <table:table-cell table:style-name="Tabelle43.A1" office:value-type="string">
            <text:p text:style-name="P102">Q</text:p>
          </table:table-cell>
          <table:table-cell table:style-name="Tabelle43.A1" office:value-type="string">
            <text:p text:style-name="P102">STATUS</text:p>
          </table:table-cell>
          <table:table-cell table:style-name="Tabelle43.H1" office:value-type="string">
            <text:p text:style-name="P94"/>
          </table:table-cell>
        </table:table-row>
        <table:table-row>
          <table:table-cell table:style-name="Tabelle43.A2" office:value-type="string">
            <text:p text:style-name="P102">-</text:p>
          </table:table-cell>
          <table:table-cell table:style-name="Tabelle43.A2" office:value-type="string">
            <text:p text:style-name="P102">L</text:p>
          </table:table-cell>
          <table:table-cell table:style-name="Tabelle43.A2" office:value-type="string">
            <text:p text:style-name="P102">-</text:p>
          </table:table-cell>
          <table:table-cell table:style-name="Tabelle43.A2" office:value-type="string">
            <text:p text:style-name="P102">-</text:p>
          </table:table-cell>
          <table:table-cell table:style-name="Tabelle43.A2" office:value-type="string">
            <text:p text:style-name="P102">-</text:p>
          </table:table-cell>
          <table:table-cell table:style-name="Tabelle43.A2" office:value-type="string">
            <text:p text:style-name="P102">L</text:p>
          </table:table-cell>
          <table:table-cell table:style-name="Tabelle43.G2" office:value-type="float" office:value="104">
            <text:p text:style-name="P102">104</text:p>
          </table:table-cell>
          <table:table-cell table:style-name="Tabelle43.H2" office:value-type="string">
            <text:p text:style-name="P117">Disabled</text:p>
          </table:table-cell>
        </table:table-row>
        <table:table-row>
          <table:table-cell table:style-name="Tabelle43.A2" office:value-type="string">
            <text:p text:style-name="P102">X</text:p>
          </table:table-cell>
          <table:table-cell table:style-name="Tabelle43.A2" office:value-type="string">
            <text:p text:style-name="P102">H</text:p>
          </table:table-cell>
          <table:table-cell table:style-name="Tabelle43.A2" office:value-type="string">
            <text:p text:style-name="P102">L</text:p>
          </table:table-cell>
          <table:table-cell table:style-name="Tabelle43.A2" office:value-type="string">
            <text:p text:style-name="P102">L</text:p>
          </table:table-cell>
          <table:table-cell table:style-name="Tabelle43.A2" office:value-type="string">
            <text:p text:style-name="P102">-</text:p>
          </table:table-cell>
          <table:table-cell table:style-name="Tabelle43.A2" office:value-type="string">
            <text:p text:style-name="P102">X</text:p>
          </table:table-cell>
          <table:table-cell table:style-name="Tabelle43.G2" office:value-type="float" office:value="100">
            <text:p text:style-name="P102">100</text:p>
          </table:table-cell>
          <table:table-cell table:style-name="Tabelle43.H2" office:value-type="string">
            <text:p text:style-name="P102">Auto Mode</text:p>
          </table:table-cell>
        </table:table-row>
        <table:table-row>
          <table:table-cell table:style-name="Tabelle43.A2" office:value-type="string">
            <text:p text:style-name="P102">-</text:p>
          </table:table-cell>
          <table:table-cell table:style-name="Tabelle43.A2" office:value-type="string">
            <text:p text:style-name="P102">H</text:p>
          </table:table-cell>
          <table:table-cell table:style-name="Tabelle43.A2" office:value-type="string">
            <text:p text:style-name="P102">H</text:p>
          </table:table-cell>
          <table:table-cell table:style-name="Tabelle43.A2" office:value-type="string">
            <text:p text:style-name="P102">L</text:p>
          </table:table-cell>
          <table:table-cell table:style-name="Tabelle43.A2" office:value-type="string">
            <text:p text:style-name="P102">-</text:p>
          </table:table-cell>
          <table:table-cell table:style-name="Tabelle43.A2" office:value-type="string">
            <text:p text:style-name="P102">H</text:p>
          </table:table-cell>
          <table:table-cell table:style-name="Tabelle43.G2" office:value-type="float" office:value="101">
            <text:p text:style-name="P102">101</text:p>
          </table:table-cell>
          <table:table-cell table:style-name="Tabelle43.H2" office:value-type="string">
            <text:p text:style-name="P102"><text:span text:style-name="T2">force</text:span> <text:span text:style-name="T2">High</text:span></text:p>
          </table:table-cell>
        </table:table-row>
        <table:table-row>
          <table:table-cell table:style-name="Tabelle43.A2" office:value-type="string">
            <text:p text:style-name="P102">-</text:p>
          </table:table-cell>
          <table:table-cell table:style-name="Tabelle43.A2" office:value-type="string">
            <text:p text:style-name="P102">H</text:p>
          </table:table-cell>
          <table:table-cell table:style-name="Tabelle43.A2" office:value-type="string">
            <text:p text:style-name="P102">L</text:p>
          </table:table-cell>
          <table:table-cell table:style-name="Tabelle43.A2" office:value-type="string">
            <text:p text:style-name="P102">H</text:p>
          </table:table-cell>
          <table:table-cell table:style-name="Tabelle43.A2" office:value-type="string">
            <text:p text:style-name="P102">-</text:p>
          </table:table-cell>
          <table:table-cell table:style-name="Tabelle43.A2" office:value-type="string">
            <text:p text:style-name="P102">L</text:p>
          </table:table-cell>
          <table:table-cell table:style-name="Tabelle43.G2" office:value-type="float" office:value="102">
            <text:p text:style-name="P102">102</text:p>
          </table:table-cell>
          <table:table-cell table:style-name="Tabelle43.H2" office:value-type="string">
            <text:p text:style-name="P102"><text:span text:style-name="T2">force</text:span> <text:span text:style-name="T2">Low</text:span></text:p>
          </table:table-cell>
        </table:table-row>
        <table:table-row>
          <table:table-cell table:style-name="Tabelle43.A2" office:value-type="string">
            <text:p text:style-name="P102">-</text:p>
          </table:table-cell>
          <table:table-cell table:style-name="Tabelle43.A2" office:value-type="string">
            <text:p text:style-name="P102">H</text:p>
          </table:table-cell>
          <table:table-cell table:style-name="Tabelle43.A2" office:value-type="string">
            <text:p text:style-name="P102">H</text:p>
          </table:table-cell>
          <table:table-cell table:style-name="Tabelle43.A2" office:value-type="string">
            <text:p text:style-name="P102">H</text:p>
          </table:table-cell>
          <table:table-cell table:style-name="Tabelle43.A2" office:value-type="string">
            <text:p text:style-name="P102">X</text:p>
          </table:table-cell>
          <table:table-cell table:style-name="Tabelle43.A2" office:value-type="string">
            <text:p text:style-name="P102">X</text:p>
          </table:table-cell>
          <table:table-cell table:style-name="Tabelle43.G2" office:value-type="float" office:value="103">
            <text:p text:style-name="P102">103</text:p>
          </table:table-cell>
          <table:table-cell table:style-name="Tabelle43.H2" office:value-type="string">
            <text:p text:style-name="P102">Manual <text:span text:style-name="T2">Input</text:span></text:p>
          </table:table-cell>
        </table:table-row>
        <table:table-row>
          <table:table-cell table:style-name="Tabelle43.A2" office:value-type="string">
            <text:p text:style-name="P102">-</text:p>
          </table:table-cell>
          <table:table-cell table:style-name="Tabelle43.A2" office:value-type="string">
            <text:p text:style-name="P102">H</text:p>
          </table:table-cell>
          <table:table-cell table:style-name="Tabelle43.A2" office:value-type="string">
            <text:p text:style-name="P102">H</text:p>
          </table:table-cell>
          <table:table-cell table:style-name="Tabelle43.A2" office:value-type="string">
            <text:p text:style-name="P102">H</text:p>
          </table:table-cell>
          <table:table-cell table:style-name="Tabelle43.A2" office:value-type="string">
            <text:p text:style-name="P102">L</text:p>
          </table:table-cell>
          <table:table-cell table:style-name="Tabelle43.A2" office:value-type="string">
            <text:p text:style-name="P102">L</text:p>
          </table:table-cell>
          <table:table-cell table:style-name="Tabelle43.G2" office:value-type="float" office:value="103">
            <text:p text:style-name="P102">103</text:p>
          </table:table-cell>
          <table:table-cell table:style-name="Tabelle43.H2" office:value-type="string">
            <text:p text:style-name="P102"><text:span text:style-name="T2">Force</text:span> <text:span text:style-name="T2">with</text:span> <text:span text:style-name="T2">Priority</text:span> <text:span text:style-name="T2">for</text:span> OFF</text:p>
          </table:table-cell>
        </table:table-row>
        <table:table-row>
          <table:table-cell table:style-name="Tabelle43.A2" office:value-type="string">
            <text:p text:style-name="P102">-</text:p>
          </table:table-cell>
          <table:table-cell table:style-name="Tabelle43.A2" office:value-type="string">
            <text:p text:style-name="P102">H</text:p>
          </table:table-cell>
          <table:table-cell table:style-name="Tabelle43.A2" office:value-type="string">
            <text:p text:style-name="P102">H</text:p>
          </table:table-cell>
          <table:table-cell table:style-name="Tabelle43.A2" office:value-type="string">
            <text:p text:style-name="P102">H</text:p>
          </table:table-cell>
          <table:table-cell table:style-name="Tabelle43.A2" office:value-type="string">
            <text:p text:style-name="P102">H</text:p>
          </table:table-cell>
          <table:table-cell table:style-name="Tabelle43.A2" office:value-type="string">
            <text:p text:style-name="P102">H</text:p>
          </table:table-cell>
          <table:table-cell table:style-name="Tabelle43.G2" office:value-type="float" office:value="103">
            <text:p text:style-name="P102">103</text:p>
          </table:table-cell>
          <table:table-cell table:style-name="Tabelle43.H2" office:value-type="string">
            <text:p text:style-name="P102"><text:span text:style-name="T2">Force</text:span> <text:span text:style-name="T2">with</text:span> <text:span text:style-name="T2">Priority</text:span> <text:span text:style-name="T2">for</text:span> ON</text:p>
          </table:table-cell>
        </table:table-row>
      </table:table>
      <text:p text:style-name="P187"/>
      <text:list xml:id="list38473748" text:continue-numbering="true" text:style-name="L1">
        <text:list-item>
          <text:list>
            <text:list-item>
              <text:h text:style-name="P216" text:outline-level="2"><text:soft-page-break/><text:alphabetical-index-mark-start text:id="IMark225941772"/>MANUAL_4<text:alphabetical-index-mark-end text:id="IMark225941772"/></text:h>
            </text:list-item>
          </text:list>
        </text:list-item>
      </text:list>
      <text:p text:style-name="P2">Type<text:tab/><text:span text:style-name="T11">Funktionsbaustein</text:span></text:p>
      <text:p text:style-name="P2"><text:span text:style-name="T3">Input</text:span><text:span text:style-name="T10"><text:tab/>I0..I3 : BOOL (Eingangssignale)</text:span></text:p>
      <text:p text:style-name="P183"><text:tab/>MAN : BOOL (Umschaltung auf Handbetrieb)</text:p>
      <text:p text:style-name="P183"><text:tab/>M0..M3 : BOOL (Eingangssignale bei Handbetrieb)</text:p>
      <text:p text:style-name="P173"><text:span text:style-name="T21"><text:tab/>STP : BOOL (Asynchroner </text:span><text:span text:style-name="T16">Step</text:span><text:span text:style-name="T21"> bei Handbetrieb)</text:span></text:p>
      <text:p text:style-name="P183">Output<text:tab/>Q0..Q3 : BOOL (Ausgangssignale)</text:p>
      <text:p text:style-name="P187"><draw:frame draw:style-name="fr3" draw:name="Grafik628" text:anchor-type="paragraph" svg:x="1.09cm" svg:y="0.644cm" svg:width="3.29cm" svg:height="4.701cm" draw:z-index="623"><draw:image xlink:href="Pictures/10000000000000F900000163830E4365.png" xlink:type="simple" xlink:show="embed" xlink:actuate="onLoad"/></draw:frame><text:tab/>STATUS : BOOL (ESR kompatibler Status Ausgang) </text:p>
      <text:p text:style-name="P187"><text:line-break/>MANUAL_4 kann 4 digitale Signal im Handbetrieb überschreiben. Solange MAN = FALSE folgen die Ausgänge Q direkt den Eingängen I. Sobald MAN = TRUE wird folgen die Ausgänge den Zuständen der Eingänge M. Mit dem Eingang STP <text:s/>kann im Handbetrieb ein rotierendes Setzen der Ausgänge erzeugt werden. STP ist nur während des Handbetriebs aktiv. Wird im Handbetrieb an STP eine steigende Flanke registriert, so folgen die Ausgänge nicht mehr den Eingängen MX sondern werden mit STP zyklisch durchgeschaltet. Bei der ersten steigenden Flanke an STP wird nur der Ausgang Q0 aktiv und bei der nächsten Flanke an STP schaltet der Baustein auf den Ausgang Q1 und so weiter. Sobald der Eingang MAN wieder auf FLASE geht folgen die Ausgänge Q wieder den Eingängen I. Der ESR kompatible Status Ausgang meldet Schaltzustände weiter.</text:p>
      <text:p text:style-name="P187"/>
      <table:table table:name="Tabelle44" table:style-name="Tabelle44">
        <table:table-column table:style-name="Tabelle44.A"/>
        <table:table-column table:style-name="Tabelle44.B"/>
        <table:table-row>
          <table:table-cell table:style-name="Tabelle44.A1" office:value-type="string">
            <text:p text:style-name="P103">STATUS</text:p>
          </table:table-cell>
          <table:table-cell table:style-name="Tabelle44.B1" office:value-type="string">
            <text:p text:style-name="P103">Zustand</text:p>
          </table:table-cell>
        </table:table-row>
        <table:table-row>
          <table:table-cell table:style-name="Tabelle44.A2" office:value-type="float" office:value="100">
            <text:p text:style-name="P103">100</text:p>
          </table:table-cell>
          <table:table-cell table:style-name="Tabelle44.B2" office:value-type="string">
            <text:p text:style-name="P103"><text:span text:style-name="T2">Automatic</text:span> Mode MAN = FALSE, Q0 = I0, Q1 = I1, Q2 = I2, Q3 = I3</text:p>
          </table:table-cell>
        </table:table-row>
        <table:table-row>
          <table:table-cell table:style-name="Tabelle44.A2" office:value-type="float" office:value="101">
            <text:p text:style-name="P103">101</text:p>
          </table:table-cell>
          <table:table-cell table:style-name="Tabelle44.B2" office:value-type="string">
            <text:p text:style-name="P103">Manual Mode MAN = TRUE, Q0 = M0, Q1 = M1, Q2 = M2, Q3 = M3</text:p>
          </table:table-cell>
        </table:table-row>
        <table:table-row>
          <table:table-cell table:style-name="Tabelle44.A4" office:value-type="string">
            <text:p text:style-name="P103">110,111,112,113</text:p>
          </table:table-cell>
          <table:table-cell table:style-name="Tabelle44.B2" office:value-type="string">
            <text:p text:style-name="P103"><text:span text:style-name="T2">Step</text:span> Mode <text:span text:style-name="T2">for</text:span> Output Q0, Q1, Q2, Q3</text:p>
          </table:table-cell>
        </table:table-row>
      </table:table>
      <text:p text:style-name="P187"/>
      <text:list xml:id="list38481827" text:continue-numbering="true" text:style-name="L1">
        <text:list-item>
          <text:list>
            <text:list-item>
              <text:h text:style-name="P216" text:outline-level="2"><text:soft-page-break/><text:alphabetical-index-mark-start text:id="IMark225941772"/>PARSET<text:alphabetical-index-mark-end text:id="IMark225941772"/></text:h>
            </text:list-item>
          </text:list>
        </text:list-item>
      </text:list>
      <text:p text:style-name="P69">Type<text:tab/>Funktionsbaustein</text:p>
      <text:p text:style-name="P66"><text:span text:style-name="T15">Input</text:span><text:span text:style-name="T14"><text:tab/>A0 : BOOL (Auswahl Eingang 0)</text:span></text:p>
      <text:p text:style-name="P179"><text:tab/>A1 : BOOL (Auswahl Eingang 1)</text:p>
      <text:p text:style-name="P179">Config<text:tab/>X01, X11, X21, X31 : REAL (Werte für Parameter P1)</text:p>
      <text:p text:style-name="P179"><text:tab/>X02, X12, X22, X32 : REAL (Werte für Parameter P2)</text:p>
      <text:p text:style-name="P179"><text:tab/>X03, X13, X23, X33 : REAL (Werte für Parameter P3)</text:p>
      <text:p text:style-name="P179"><text:tab/>X04, X14, X24, X34 : REAL (Werte für Parameter P4)</text:p>
      <text:p text:style-name="P179"><text:tab/>TC : TIME (Rampenzeit zu einem neuen Wert an den)</text:p>
      <text:p text:style-name="P74">Output<text:tab/>P1 : REAL (Parameter 1 Ausgang)</text:p>
      <text:p text:style-name="P74"><text:tab/>P2 : REAL (Parameter 2 Ausgang)</text:p>
      <text:p text:style-name="P74"><text:tab/>P3 : REAL (Parameter 3 Ausgang)</text:p>
      <text:p text:style-name="P74"><draw:frame draw:style-name="fr3" draw:name="Grafik375" text:anchor-type="paragraph" svg:x="1.002cm" svg:y="0.674cm" svg:width="1.829cm" svg:height="2.649cm" draw:z-index="351"><draw:image xlink:href="Pictures/100000000000008A000000C809A9B775.png" xlink:type="simple" xlink:show="embed" xlink:actuate="onLoad"/></draw:frame><text:tab/>P4 : REAL (Parameter 4 Ausgang)</text:p>
      <text:p text:style-name="P187"><text:line-break/>PARSET wählt aus bis zu 4 Parametersätzen je einen aus und liefert die Werte an den Ausgängen P1 bis P4. Die Werte für die Parametersätze werden mit Setup Variablen definiert. Wird die Setup Variable TC auf einen Wert &gt; 0 gesetzt, so schalten die Ausgänge nicht sprunghaft auf einen neuen Wert, sondern laufen in einer Rampe <text:s/>auf den neuen Wert zu so dass der Endwert nach der Zeit TC erreicht wird. Dies erlaubt den weichen Übergang zwischen verschiedenen Parametersätzen. Die Auswahl der Parameter wird durch die Eingänge A0 und A1 gesteuert.</text:p>
      <table:table table:name="Tabelle21" table:style-name="Tabelle21">
        <table:table-column table:style-name="Tabelle21.A"/>
        <table:table-column table:style-name="Tabelle21.B"/>
        <table:table-column table:style-name="Tabelle21.C"/>
        <table:table-column table:style-name="Tabelle21.B"/>
        <table:table-column table:style-name="Tabelle21.E"/>
        <table:table-row>
          <table:table-cell table:style-name="Tabelle21.A1" office:value-type="string">
            <text:p text:style-name="P121">A1,A0</text:p>
          </table:table-cell>
          <table:table-cell table:style-name="Tabelle21.A1" office:value-type="string">
            <text:p text:style-name="P121">P1</text:p>
          </table:table-cell>
          <table:table-cell table:style-name="Tabelle21.A1" office:value-type="string">
            <text:p text:style-name="P121">P2</text:p>
          </table:table-cell>
          <table:table-cell table:style-name="Tabelle21.A1" office:value-type="string">
            <text:p text:style-name="P121">P3</text:p>
          </table:table-cell>
          <table:table-cell table:style-name="Tabelle21.E1" office:value-type="string">
            <text:p text:style-name="P121">P4</text:p>
          </table:table-cell>
        </table:table-row>
        <table:table-row>
          <table:table-cell table:style-name="Tabelle21.A2" office:value-type="string">
            <text:p text:style-name="P121">00</text:p>
          </table:table-cell>
          <table:table-cell table:style-name="Tabelle21.A2" office:value-type="string">
            <text:p text:style-name="P121">X01</text:p>
          </table:table-cell>
          <table:table-cell table:style-name="Tabelle21.A2" office:value-type="string">
            <text:p text:style-name="P121">X02</text:p>
          </table:table-cell>
          <table:table-cell table:style-name="Tabelle21.A2" office:value-type="string">
            <text:p text:style-name="P121">X03</text:p>
          </table:table-cell>
          <table:table-cell table:style-name="Tabelle21.E2" office:value-type="string">
            <text:p text:style-name="P121">X04</text:p>
          </table:table-cell>
        </table:table-row>
        <table:table-row>
          <table:table-cell table:style-name="Tabelle21.A2" office:value-type="string">
            <text:p text:style-name="P121">01</text:p>
          </table:table-cell>
          <table:table-cell table:style-name="Tabelle21.A2" office:value-type="string">
            <text:p text:style-name="P121">X11</text:p>
          </table:table-cell>
          <table:table-cell table:style-name="Tabelle21.A2" office:value-type="string">
            <text:p text:style-name="P121">X12</text:p>
          </table:table-cell>
          <table:table-cell table:style-name="Tabelle21.A2" office:value-type="string">
            <text:p text:style-name="P121">X13</text:p>
          </table:table-cell>
          <table:table-cell table:style-name="Tabelle21.E2" office:value-type="string">
            <text:p text:style-name="P121">X14</text:p>
          </table:table-cell>
        </table:table-row>
        <table:table-row>
          <table:table-cell table:style-name="Tabelle21.A2" office:value-type="string">
            <text:p text:style-name="P121">10</text:p>
          </table:table-cell>
          <table:table-cell table:style-name="Tabelle21.A2" office:value-type="string">
            <text:p text:style-name="P121">X21</text:p>
          </table:table-cell>
          <table:table-cell table:style-name="Tabelle21.A2" office:value-type="string">
            <text:p text:style-name="P121">X22</text:p>
          </table:table-cell>
          <table:table-cell table:style-name="Tabelle21.A2" office:value-type="string">
            <text:p text:style-name="P121">X23</text:p>
          </table:table-cell>
          <table:table-cell table:style-name="Tabelle21.E2" office:value-type="string">
            <text:p text:style-name="P121">X24</text:p>
          </table:table-cell>
        </table:table-row>
        <table:table-row>
          <table:table-cell table:style-name="Tabelle21.A2" office:value-type="string">
            <text:p text:style-name="P121">11</text:p>
          </table:table-cell>
          <table:table-cell table:style-name="Tabelle21.A2" office:value-type="string">
            <text:p text:style-name="P121">X31</text:p>
          </table:table-cell>
          <table:table-cell table:style-name="Tabelle21.A2" office:value-type="string">
            <text:p text:style-name="P121">X32</text:p>
          </table:table-cell>
          <table:table-cell table:style-name="Tabelle21.A2" office:value-type="string">
            <text:p text:style-name="P121">X33</text:p>
          </table:table-cell>
          <table:table-cell table:style-name="Tabelle21.E2" office:value-type="string">
            <text:p text:style-name="P121">X34</text:p>
          </table:table-cell>
        </table:table-row>
      </table:table>
      <text:list xml:id="list38466600" text:continue-numbering="true" text:style-name="L1">
        <text:list-item>
          <text:list>
            <text:list-item>
              <text:h text:style-name="P216" text:outline-level="2"><text:soft-page-break/><text:alphabetical-index-mark-start text:id="IMark225941772"/>PARSET2<text:alphabetical-index-mark-end text:id="IMark225941772"/></text:h>
            </text:list-item>
          </text:list>
        </text:list-item>
      </text:list>
      <text:p text:style-name="P69">Type<text:tab/>Funktionsbaustein</text:p>
      <text:p text:style-name="P66"><text:span text:style-name="T15">Input</text:span><text:span text:style-name="T14"><text:tab/>X : REAL (Signaleingang)</text:span></text:p>
      <text:p text:style-name="P179">Config<text:tab/>X01, X11, X21, X31 : REAL (Werte für Parameter P1)</text:p>
      <text:p text:style-name="P179"><text:tab/>X02, X12, X22, X32 : REAL (Werte für Parameter P2)</text:p>
      <text:p text:style-name="P179"><text:tab/>X03, X13, X23, X33 : REAL (Werte für Parameter P3)</text:p>
      <text:p text:style-name="P179"><text:tab/>X04, X14, X24, X34 : REAL (Werte für Parameter P4)</text:p>
      <text:p text:style-name="P173"><text:span text:style-name="T14"><text:tab/>L1, L2, L3 : REAL (</text:span><text:span text:style-name="T15">Limits</text:span><text:span text:style-name="T14"> für die Parameterumschaltung</text:span></text:p>
      <text:p text:style-name="P179"><text:tab/>TC : TIME (Rampenzeit an den Ausgängen P)</text:p>
      <text:p text:style-name="P74">Output<text:tab/>P1 : REAL (Parameter 1 Ausgang)</text:p>
      <text:p text:style-name="P74"><text:tab/>P2 : REAL (Parameter 2 Ausgang)</text:p>
      <text:p text:style-name="P74"><text:tab/>P3 : REAL (Parameter 3 Ausgang)</text:p>
      <text:p text:style-name="P74"><draw:frame draw:style-name="fr3" draw:name="Grafik377" text:anchor-type="paragraph" svg:x="1.199cm" svg:y="0.667cm" svg:width="2.499cm" svg:height="2.311cm" draw:z-index="353"><draw:image xlink:href="Pictures/10000000000000BD000000AF061016C5.png" xlink:type="simple" xlink:show="embed" xlink:actuate="onLoad"/></draw:frame><text:tab/>P4 : REAL (Parameter 4 Ausgang)</text:p>
      <text:p text:style-name="P187"><text:line-break/>PARSET2 wählt aus bis zu 4 Parametersätzen je einen aus und liefert die Werte an den Ausgängen P1 bis P4. Die Werte für die Parametersätze werden mit Setup Variablen definiert. Wird die Setup Variable TC auf einen Wert &gt; 0 gesetzt, so schalten die Ausgänge nicht sprunghaft auf einen neuen Wert, sondern laufen in einer Rampe <text:s/>auf den neuen Wert zu so dass der Endwert nach der Zeit TC erreicht wird. Dies erlaubt den weichen Übergang zwischen verschiedenen Parametersätzen. Die Auswahl der Parameter wird durch die Steuergröße X und die Schaltschwellen L1 bis L3 festgelegt.</text:p>
      <table:table table:name="Tabelle22" table:style-name="Tabelle22">
        <table:table-column table:style-name="Tabelle22.A"/>
        <table:table-column table:style-name="Tabelle22.B"/>
        <table:table-column table:style-name="Tabelle22.C"/>
        <table:table-column table:style-name="Tabelle22.B"/>
        <table:table-column table:style-name="Tabelle22.E"/>
        <table:table-row>
          <table:table-cell table:style-name="Tabelle22.A1" office:value-type="string">
            <text:p text:style-name="P121">X</text:p>
          </table:table-cell>
          <table:table-cell table:style-name="Tabelle22.A1" office:value-type="string">
            <text:p text:style-name="P121">P1</text:p>
          </table:table-cell>
          <table:table-cell table:style-name="Tabelle22.A1" office:value-type="string">
            <text:p text:style-name="P121">P2</text:p>
          </table:table-cell>
          <table:table-cell table:style-name="Tabelle22.A1" office:value-type="string">
            <text:p text:style-name="P121">P3</text:p>
          </table:table-cell>
          <table:table-cell table:style-name="Tabelle22.E1" office:value-type="string">
            <text:p text:style-name="P121">P4</text:p>
          </table:table-cell>
        </table:table-row>
        <table:table-row>
          <table:table-cell table:style-name="Tabelle22.A2" office:value-type="string">
            <text:p text:style-name="P121">X &lt; L1</text:p>
          </table:table-cell>
          <table:table-cell table:style-name="Tabelle22.A2" office:value-type="string">
            <text:p text:style-name="P121">X01</text:p>
          </table:table-cell>
          <table:table-cell table:style-name="Tabelle22.A2" office:value-type="string">
            <text:p text:style-name="P121">X02</text:p>
          </table:table-cell>
          <table:table-cell table:style-name="Tabelle22.A2" office:value-type="string">
            <text:p text:style-name="P121">X03</text:p>
          </table:table-cell>
          <table:table-cell table:style-name="Tabelle22.E2" office:value-type="string">
            <text:p text:style-name="P121">X04</text:p>
          </table:table-cell>
        </table:table-row>
        <table:table-row>
          <table:table-cell table:style-name="Tabelle22.A2" office:value-type="string">
            <text:p text:style-name="P121">L1 &lt; X &lt; L2</text:p>
          </table:table-cell>
          <table:table-cell table:style-name="Tabelle22.A2" office:value-type="string">
            <text:p text:style-name="P121">X11</text:p>
          </table:table-cell>
          <table:table-cell table:style-name="Tabelle22.A2" office:value-type="string">
            <text:p text:style-name="P121">X12</text:p>
          </table:table-cell>
          <table:table-cell table:style-name="Tabelle22.A2" office:value-type="string">
            <text:p text:style-name="P121">X13</text:p>
          </table:table-cell>
          <table:table-cell table:style-name="Tabelle22.E2" office:value-type="string">
            <text:p text:style-name="P121">X14</text:p>
          </table:table-cell>
        </table:table-row>
        <table:table-row>
          <table:table-cell table:style-name="Tabelle22.A2" office:value-type="string">
            <text:p text:style-name="P121">L2 &lt; X &lt; L3</text:p>
          </table:table-cell>
          <table:table-cell table:style-name="Tabelle22.A2" office:value-type="string">
            <text:p text:style-name="P121">X21</text:p>
          </table:table-cell>
          <table:table-cell table:style-name="Tabelle22.A2" office:value-type="string">
            <text:p text:style-name="P121">X22</text:p>
          </table:table-cell>
          <table:table-cell table:style-name="Tabelle22.A2" office:value-type="string">
            <text:p text:style-name="P121">X23</text:p>
          </table:table-cell>
          <table:table-cell table:style-name="Tabelle22.E2" office:value-type="string">
            <text:p text:style-name="P121">X24</text:p>
          </table:table-cell>
        </table:table-row>
        <table:table-row>
          <table:table-cell table:style-name="Tabelle22.A2" office:value-type="string">
            <text:p text:style-name="P121">X &gt;= L3</text:p>
          </table:table-cell>
          <table:table-cell table:style-name="Tabelle22.A2" office:value-type="string">
            <text:p text:style-name="P121">X31</text:p>
          </table:table-cell>
          <table:table-cell table:style-name="Tabelle22.A2" office:value-type="string">
            <text:p text:style-name="P121">X32</text:p>
          </table:table-cell>
          <table:table-cell table:style-name="Tabelle22.A2" office:value-type="string">
            <text:p text:style-name="P121">X33</text:p>
          </table:table-cell>
          <table:table-cell table:style-name="Tabelle22.E2" office:value-type="string">
            <text:p text:style-name="P121">X34</text:p>
          </table:table-cell>
        </table:table-row>
      </table:table>
      <text:p text:style-name="P85"/>
      <text:list xml:id="list38461147" text:continue-numbering="true" text:style-name="L1">
        <text:list-item>
          <text:list>
            <text:list-item>
              <text:h text:style-name="P216" text:outline-level="2"><text:soft-page-break/><text:alphabetical-index-mark-start text:id="IMark225941772"/>SIGNAL<text:alphabetical-index-mark-end text:id="IMark225941772"/></text:h>
            </text:list-item>
          </text:list>
        </text:list-item>
      </text:list>
      <text:p text:style-name="P69">Type<text:tab/>Funktionsbaustein</text:p>
      <text:p text:style-name="P66"><text:span text:style-name="T15">Input</text:span><text:span text:style-name="T14"><text:tab/>IN : BOOL (Freigabeeingang)</text:span></text:p>
      <text:p text:style-name="P183"><text:tab/>SIG : BYTE (Bitpattern)</text:p>
      <text:p text:style-name="P183"><text:tab/>TS : TIME (Schaltzeit)</text:p>
      <text:p text:style-name="P87"><draw:frame draw:style-name="fr3" draw:name="Grafik415" text:anchor-type="paragraph" svg:x="1.09cm" svg:y="0.69cm" svg:width="2.101cm" svg:height="1.891cm" draw:z-index="388"><draw:image xlink:href="Pictures/100000000000009F0000008F381C00AF.png" xlink:type="simple" xlink:show="embed" xlink:actuate="onLoad"/></draw:frame>Output<text:tab/>Q : BOOL (Ausgangssignal)</text:p>
      <text:p text:style-name="P83"><text:span text:style-name="T21"><text:line-break/>SIGNAL erzeugt ein Ausgangssignal Q das dem Bitpattern in SIG entspricht. Das Bitpattern wird in TS langen Schritten Ausgegeben. Durch verschiedene Bitmuster in SIG können verschiedene Ausgangssignale erzeugt werden. Wird der Eingang IN auf TRUE geschaltet beginnt der Baustein den Ausgang Q entsprechend dem in SIG bereitgestellten Bitpattern <text:s/>Einzuschalten. Durch die Anpassung des Bitpattern können verschiedene Ausgangssignale erzeugt werden. Ein </text:span><text:span text:style-name="T16">Pattern</text:span><text:span text:style-name="T21"> von 10101010 erzeugt eine Ausgangssignal mit 50% </text:span><text:span text:style-name="T16">Duty</text:span><text:span text:style-name="T21"> </text:span><text:span text:style-name="T16">Cycle</text:span><text:span text:style-name="T21"> und einer Frequenz die 1 / 2*S entspricht. Ein </text:span><text:span text:style-name="T16">Pattern</text:span><text:span text:style-name="T21"> von 11110000 erzeugt hingegen ein Ausgangssignal von 50% DC und einer Frequenz von 1 / 8*TS. Der Start eines Ausgangssignals ist zufällig. Die </text:span><text:span text:style-name="T19">Bitsequenz</text:span><text:span text:style-name="T21"> beginnt ab einem Beliebigen Bit sobald der Eingang IN auf TRUE geht. Wird am Eingang TS keine Zeit vorgegeben so verwendet der Baustein intern eine Vorgabe von 1024ms je Zyklus (ein Zyklus ist der Durchlauf aller 8 Bits einer Sequenz). Typische Anwendungen für SIGNAL ist die Signalerzeugung für Sirenen oder Signallampen.</text:span></text:p>
      <text:p text:style-name="P87">Die folgende Grafik verdeutlicht die Funktionsweise von SIGANL für</text:p>
      <text:p text:style-name="P87">SIG = 2#1111_0000:</text:p>
      <text:p text:style-name="P87"><draw:frame draw:style-name="fr3" draw:name="Grafik417" text:anchor-type="paragraph" svg:x="1.025cm" svg:y="0.079cm" svg:width="11.375cm" svg:height="2.521cm" draw:z-index="390"><draw:image xlink:href="Pictures/10000000000001AE0000007FE6D1F7D1.png" xlink:type="simple" xlink:show="embed" xlink:actuate="onLoad"/></draw:frame></text:p>
      <text:list xml:id="list38457898" text:continue-numbering="true" text:style-name="L1">
        <text:list-item>
          <text:list>
            <text:list-item>
              <text:h text:style-name="P216" text:outline-level="2"><text:soft-page-break/><text:alphabetical-index-mark-start text:id="IMark225941772"/>SIGNAL_4<text:alphabetical-index-mark-end text:id="IMark225941772"/></text:h>
            </text:list-item>
          </text:list>
        </text:list-item>
      </text:list>
      <text:p text:style-name="P69">Type<text:tab/>Funktionsbaustein</text:p>
      <text:p text:style-name="P66"><text:span text:style-name="T15">Input</text:span><text:span text:style-name="T14"><text:tab/>IN1..IN4 : BOOL (Eingang für Bitpattern S1..S4)</text:span></text:p>
      <text:p text:style-name="P183"><text:tab/>TS : TIME (Schaltzeit)</text:p>
      <text:p text:style-name="P183">Config<text:tab/>S1 .. S4 : BYTE (Bitpattern S1 .. S4)</text:p>
      <text:p text:style-name="P87"><draw:frame draw:style-name="fr3" draw:name="Grafik416" text:anchor-type="paragraph" svg:x="1.046cm" svg:y="0.69cm" svg:width="2.499cm" svg:height="2.679cm" draw:z-index="389"><draw:image xlink:href="Pictures/10000000000000BD000000CB506CA3AC.png" xlink:type="simple" xlink:show="embed" xlink:actuate="onLoad"/></draw:frame>Output<text:tab/>Q : BOOL (Ausgangssignal)</text:p>
      <text:p text:style-name="P87"><text:line-break/>SIGNAL_4 erzeugt ein Ausgangssignal Q das einem von 4 Bitpattern (S1 .. S4) entspricht. Das Bitpattern wird in TS langen Schritten Ausgegeben. Die Eingänge IN1..IN4 sind priorisierte Eingänge. Ein TRUE an IN1 überschreibt allen anderen Eingänge, IN2 überschreibt IN3 und IN4 hat die niedrigste Priorität. Eine weiterführende Beschreibung der Funktion von SIGNAL_4 befindet sich unter SIGNAL. Die 4 verschiedenen Bitpattern sind in Config Variablen S1 .. S4 abgelegt und können vom Anwender jederzeit angepasst werden.</text:p>
      <text:p text:style-name="P87"><draw:frame draw:style-name="fr3" draw:name="Grafik418" text:anchor-type="paragraph" svg:x="2.852cm" svg:y="0.827cm" svg:width="11.031cm" svg:height="5.669cm" draw:z-index="391"><draw:image xlink:href="Pictures/10000000000001A10000011E7F03639C.png" xlink:type="simple" xlink:show="embed" xlink:actuate="onLoad"/></draw:frame>Der Baustein hat per folgende Bitpattern voreingestellt, welche aber vom Anwender bei Bedarf verändert werden können:</text:p>
      <text:p text:style-name="P87">S1 = 2#1111_1111</text:p>
      <text:p text:style-name="P87">S2 = 2#1111_0000</text:p>
      <text:p text:style-name="P87">S3 = 2#1010_1010</text:p>
      <text:p text:style-name="P87">S4 = 2#1010_0000</text:p>
      <text:list xml:id="list38472574" text:continue-numbering="true" text:style-name="L1">
        <text:list-item>
          <text:list>
            <text:list-item>
              <text:h text:style-name="P216" text:outline-level="2"><text:soft-page-break/><text:alphabetical-index-mark-start text:id="IMark225941772"/>SRAMP<text:alphabetical-index-mark-end text:id="IMark225941772"/></text:h>
            </text:list-item>
          </text:list>
        </text:list-item>
      </text:list>
      <text:p text:style-name="P69">Type<text:tab/>Funktionsbaustein</text:p>
      <text:p text:style-name="P66"><text:span text:style-name="T15">Input</text:span><text:span text:style-name="T14"><text:tab/>X: REAL (Eingangssignal)</text:span></text:p>
      <text:p text:style-name="P87"><text:tab/>A_UP : REAL (Maximale Beschleunigung Aufwärts)</text:p>
      <text:p text:style-name="P87"><text:tab/>A_DN : REAL (Maximale Beschleunigung Abwärts)</text:p>
      <text:p text:style-name="P87"><text:tab/>VU_MAX : REAL (Maximale Geschwindigkeit Aufwärts)</text:p>
      <text:p text:style-name="P87"><text:tab/>VD_MAX : REAL (Maximale Geschwindigkeit Abwärts)</text:p>
      <text:p text:style-name="P83"><text:span text:style-name="T21"><text:tab/>LIMIT_HIGH : REAL (Ausgangslimit </text:span><text:span text:style-name="T16">High</text:span><text:span text:style-name="T21">)</text:span></text:p>
      <text:p text:style-name="P83"><text:span text:style-name="T21"><text:tab/>LIMIT_LOW : REAL (Ausgangslimit </text:span><text:span text:style-name="T16">Low</text:span><text:span text:style-name="T21">)</text:span></text:p>
      <text:p text:style-name="P87"><text:tab/>RST : BOOL (Asynchroner Reset)</text:p>
      <text:p text:style-name="P87">Output<text:tab/>Y : REAL (Ausgangssignal)</text:p>
      <text:p text:style-name="P87"><draw:frame draw:style-name="fr3" draw:name="Grafik522" text:anchor-type="paragraph" svg:x="0.981cm" svg:y="0.727cm" svg:width="4.791cm" svg:height="3.9cm" draw:z-index="503"><draw:image xlink:href="Pictures/100000000000016A00000127117DF9A7.png" xlink:type="simple" xlink:show="embed" xlink:actuate="onLoad"/></draw:frame><text:tab/>V : REAL (Momentane Geschwindigkeit des Ausgangssignals)</text:p>
      <text:p text:style-name="P87"><text:line-break/>SRAMP erzeugt ein Ausgangssignal das durch einstellbare Parameter begrenzt wird. Das Ausgangssignal folgt dem Eingangssignal und wird dabei durch maximale Geschwindigkeit (VU_MAX und VD_MAX), oberer und unterer Grenzwert (LIMIT_LOW und LIMIT_HIGH), sowie eine maximale Beschleunigung (A_UP und A_DN) begrenzt. SRAMP wird verwendet um zum Beispiel Motoren anzusteuern. Der Ausgang V gibt die momentane Geschwindigkeit des Ausgangs an.</text:p>
      <text:p text:style-name="P87">Im folgenden Schema ist die Interne Arbeitsweise von SRAMP ersichtlich. Ein Rampengenerator X2 stellt die Geschwindigkeit mit der sich der Ausgang verändern darf ein und ein Zweiter Rampengenerator X3 steuert den Ausgang.</text:p>
      <text:p text:style-name="P87"><draw:frame draw:style-name="fr3" draw:name="Grafik523" text:anchor-type="paragraph" svg:x="1.312cm" svg:y="0.111cm" svg:width="15.109cm" svg:height="3.919cm" draw:z-index="504"><draw:image xlink:href="Pictures/10000000000002CA000000B98D0C8905.png" xlink:type="simple" xlink:show="embed" xlink:actuate="onLoad"/></draw:frame></text:p>
      <text:p text:style-name="P83"><draw:frame draw:style-name="fr20" draw:name="Grafik524" text:anchor-type="paragraph" svg:x="6.272cm" svg:y="0.325cm" svg:width="10.73cm" svg:height="6.05cm" draw:z-index="505"><draw:image xlink:href="Pictures/100000000000021D00000131EB477768.png" xlink:type="simple" xlink:show="embed" xlink:actuate="onLoad"/></draw:frame><text:soft-page-break/><text:span text:style-name="T21">Die </text:span><text:span text:style-name="T16">Trace</text:span><text:span text:style-name="T21"> Aufzeichnung zeigt ein Beispiel für SRAMP. Der Eingang (grün) steigt von 0 auf 20 und gleich danach auf 10 wobei der Ausgang mit der maximal zulässigen Beschleunigung auf die maximal zulässige Geschwindigkeit ansteigt, anschließend wird verdeutlicht das der Eingang auch während des Signalverlaufs sich ändern kann. In diesem Beispiel wird rechtzeitig wieder abgebremst, so das exakt bei 10 der Ausgang zum Stillstand kommt. Nach erreichen des Endwertes 10 schaltet der Eingang auf -3 und der Ausgang Y folgt entsprechend. </text:span></text:p>
      <text:p text:style-name="P87">Die Eingangswerte für A_UP und VU_MAX müssen mit positivem Vorzeichen angegeben werden, <text:s/>A_DN und VD_MAX benötigen ein negatives Vorzeichen.</text:p>
      <text:list xml:id="list38461321" text:continue-numbering="true" text:style-name="L1">
        <text:list-item>
          <text:list>
            <text:list-item>
              <text:h text:style-name="P216" text:outline-level="2"><text:alphabetical-index-mark-start text:id="IMark225941772"/>TANK_LEVEL<text:alphabetical-index-mark-end text:id="IMark225941772"/></text:h>
            </text:list-item>
          </text:list>
        </text:list-item>
      </text:list>
      <text:p text:style-name="P69">Type<text:tab/>Funktionsbaustein</text:p>
      <text:p text:style-name="P66"><text:span text:style-name="T15">Input</text:span><text:span text:style-name="T14"><text:tab/>LEVEL</text:span><text:span text:style-name="T21"> : BOOL (Eingang für Niveau Sensor)</text:span></text:p>
      <text:p text:style-name="P183"><text:tab/>LEAK : BOOL (Eingang für Leck Sensoren)</text:p>
      <text:p text:style-name="P183"><text:tab/>ACLR : BOOL (Eingang zum Rücksetzen des Alarms)</text:p>
      <text:p text:style-name="P183">Config<text:tab/>MAX_VALVE_TIME (Maximale Nachspeisezeit für Ventil)</text:p>
      <text:p text:style-name="P183"><text:tab/>LEVEL_DELAY_TIME : TIME (Ansprechzeit für LEVEL Eingang)</text:p>
      <text:p text:style-name="P87">Output<text:tab/>VALVE : BOOL (Ausgangssignal zum Ventil)</text:p>
      <text:p text:style-name="P87"><text:tab/>ALARM : BOOL (Alarmausgang)</text:p>
      <text:p text:style-name="P87"><draw:frame draw:style-name="fr3" draw:name="Grafik578" text:anchor-type="paragraph" svg:x="1.002cm" svg:y="0.64cm" svg:width="3.62cm" svg:height="2.2cm" draw:z-index="570"><draw:image xlink:href="Pictures/1000000000000112000000A613829649.png" xlink:type="simple" xlink:show="embed" xlink:actuate="onLoad"/></draw:frame><text:tab/>STATUS : BYTE (ESR kompatibler Status Ausgang)</text:p>
      <text:p text:style-name="P87"><text:soft-page-break/><text:line-break/>TANK_LEVEL dient dazu den Flüssigkeitsstand in einem Tank konstant zu halten. Am Eingang LEVEL wird der Nieveausensor angeschlossen und am Ausgang VALVE das Nachspeiseventil. Um bei unruhigen Oberflächen den Niveausensor zu entprellen kann dessen Ansprechzeit mittels der Setup Variable LEVEL_DELAY_TIME entsprechend eingestellt werden. Am Eingang LEVEL wird mit TRUE angezeigt das der Flüssigkeitsstand zu niedrig ist, nachdem der Eingang durchgehend für Die Zeit LEVEL_DELAY_TIME auf TRUE war wird der Ausgang VALVE auf TRUE gesetzt um Flüssigkeit nachzuspeisen. Während des Nachspeisevorgangs wird MAX_VALVE_TIME überwacht und falls VALVE länger als diese Zeit auf TRUE bleibt wird ein ALARM generiert um bei Sensorfehlern oder Lecks ein Dauerndes Nachspeisen zu verhindern. Der Baustein überwacht zusätzlich den Eingang LEAK welcher für normalen Betrieb immer FALSE sein muss. Sobald LEAK auf TRUE geht wird sofort die Nachspeisung unterbrochen und ein Alarm gerneriert. LEAK dient zum Anschluß von Lecksensoren und oder zusätzlichen Nieveausensoren oberhalb des normalen Niveaus. Tritt im Betrieb ein Alarm auf so stoppt de Baustein jegliche Nachspeisung bis der Fehler beseitigt wurde und der Eingang ACLR kurz auf TRUE getastet wird. Am ESR kompatiblen Statusausgang weren alle Betriebszustände mittels ESR Meldungen ausgegeben.</text:p>
      <text:p text:style-name="P87">STATUS = 1, Lecksensor (LEAK) ist aktiviert.</text:p>
      <text:p text:style-name="P87">STATUS = 2, Nachspeisezeit (MAX_VALVE_TIME) wurde überschritten.</text:p>
      <text:p text:style-name="P87">STATUS = 100, Niveau ist erreicht, Nachspeisung abgeschaltet.</text:p>
      <text:p text:style-name="P87">STATUS = 101, ACLR wurde betätigt.</text:p>
      <text:p text:style-name="P87">STATUS = 102, Niveau unterschritten, Nachspeisung läuft.</text:p>
      <text:list xml:id="list38467709" text:continue-numbering="true" text:style-name="L1">
        <text:list-item>
          <text:list>
            <text:list-item>
              <text:h text:style-name="P216" text:outline-level="2"><text:alphabetical-index-mark-start text:id="IMark225941772"/>TUNE<text:alphabetical-index-mark-end text:id="IMark225941772"/></text:h>
            </text:list-item>
          </text:list>
        </text:list-item>
      </text:list>
      <text:p text:style-name="P69">Type<text:tab/>Funktionsbaustein</text:p>
      <text:p text:style-name="P66"><text:span text:style-name="T15">Input</text:span><text:span text:style-name="T14"><text:tab/>SET : BOOL (Asynchroner Set Eingang)</text:span></text:p>
      <text:p text:style-name="P179"><text:tab/>SU, SD : BOOL (Eingänge für Auf und Ab)</text:p>
      <text:p text:style-name="P179"><text:tab/>RST : BOOL (Asynchroner Reset Eingang)</text:p>
      <text:p text:style-name="P179">Config<text:tab/>SS : REAL (Schrittweite für kleiner Schritt)</text:p>
      <text:p text:style-name="P179"><text:tab/>Limit_L : REAL (unterer Grenzwert)</text:p>
      <text:p text:style-name="P179"><text:tab/>Limit_H : REAL (oberer Grenzwert)</text:p>
      <text:p text:style-name="P179"><text:tab/>RST_VAL : REAL ( Ausgangswert nach Reset)</text:p>
      <text:p text:style-name="P179"><text:tab/>SET_VAL : REAL (Ausgangswert nach SET)</text:p>
      <text:p text:style-name="P183"><text:soft-page-break/><text:tab/>T1 : TIME (Zeit nach der die erste Rampe anläuft)</text:p>
      <text:p text:style-name="P183"><text:tab/>T1 : TIME (Zeit nach der die zweite Rampe anläuft)</text:p>
      <text:p text:style-name="P183"><text:tab/>S1 : REAL (Geschwindigkeit für erste Rampe)</text:p>
      <text:p text:style-name="P183"><text:tab/>S2 : REAL (Geschwindigkeit für zweite Rampe)</text:p>
      <text:p text:style-name="P183"><draw:frame draw:style-name="fr3" draw:name="Grafik380" text:anchor-type="paragraph" svg:x="1.046cm" svg:y="0.69cm" svg:width="2.281cm" svg:height="2.311cm" draw:z-index="355"><draw:image xlink:href="Pictures/10000000000000AC000000AF2235F3AD.png" xlink:type="simple" xlink:show="embed" xlink:actuate="onLoad"/></draw:frame>Output<text:tab/>Y : REAL (Ausgangssignal)</text:p>
      <text:p text:style-name="P87"><text:line-break/>TUNE setzt mithilfe von Auf- und Ab- Tastern ein Ausgangssignal Y. Durch entsprechende Config Variablen kann die Schrittweite individuell Programmiert werden. Ein oberer und unterer Grenzwert für den Ausgang Y kann <text:s/>mittels LIMIT_L und LIMIT_H vorgegeben werden. mit den Tastern SU und SD werden Schritte Auf oder Ab erzeugt. Wird eine Taste länger als die Zeit T1 gedrückt gehalten, so wird der Ausgang Y kontinuierlich Auf oder Ab verstellt. Die Geschwindigkeit mit der der Ausgang verstellt wird ist hierbei mit S1 vorgegeben. S1 und S2 geben die Einheiten je Sekunde an. Wird <text:s/>eine Taste länger als die Zeit T2 gedrückt gehalten, so schaltet der Baustein automatisch auf eine zweite Geschwindigkeit S2 um. Mit den Eingängen RST und SET kann der Ausgang jederzeit auf einen durch RST_VAL beziehungsweise SET_VAL vorgegebenen Wert gestellt werden.</text:p>
      <text:list xml:id="list38465994" text:continue-numbering="true" text:style-name="L1">
        <text:list-item>
          <text:list>
            <text:list-item>
              <text:h text:style-name="P216" text:outline-level="2"><text:alphabetical-index-mark-start text:id="IMark225941772"/>TUNE2<text:alphabetical-index-mark-end text:id="IMark225941772"/></text:h>
            </text:list-item>
          </text:list>
        </text:list-item>
      </text:list>
      <text:p text:style-name="P69">Type<text:tab/>Funktionsbaustein</text:p>
      <text:p text:style-name="P66"><text:span text:style-name="T15">Input</text:span><text:span text:style-name="T14"><text:tab/>SET : BOOL (Asynchroner Set Eingang)</text:span></text:p>
      <text:p text:style-name="P179"><text:tab/>SU, SD : BOOL (Eingänge für Auf und Ab in kleinen Schritten)</text:p>
      <text:p text:style-name="P179"><text:tab/>FU, FD : BOOL (Eingänge für Auf und Ab in großen Schritten)</text:p>
      <text:p text:style-name="P179"><text:tab/>RST : BOOL (Asynchroner Reset Eingang)</text:p>
      <text:p text:style-name="P179">Config<text:tab/>SS : REAL (Schrittweite für kleine Schritte)</text:p>
      <text:p text:style-name="P179"><text:tab/>FS : REAL (Schrittweite für große Schritte)</text:p>
      <text:p text:style-name="P179"><text:tab/>Limit_L : REAL (unterer Grenzwert)</text:p>
      <text:p text:style-name="P179"><text:tab/>Limit_H : REAL (oberer Grenzwert)</text:p>
      <text:p text:style-name="P179"><text:tab/>RST_VAL : REAL ( Ausgangswert nach Reset)</text:p>
      <text:p text:style-name="P179"><text:soft-page-break/><text:tab/>SET_VAL : REAL (Ausgangswert nach SET)</text:p>
      <text:p text:style-name="P183"><text:tab/>TR : TIME (Zeit nach der die Rampe anläuft)</text:p>
      <text:p text:style-name="P183"><text:tab/>S1 : REAL (Geschwindigkeit für kleine Rampe)</text:p>
      <text:p text:style-name="P183"><text:tab/>S2 : REAL (Geschwindigkeit für große Rampe)</text:p>
      <text:p text:style-name="P183"><draw:frame draw:style-name="fr3" draw:name="Grafik378" text:anchor-type="paragraph" svg:x="1.09cm" svg:y="0.688cm" svg:width="2.101cm" svg:height="3.11cm" draw:z-index="354"><draw:image xlink:href="Pictures/100000000000009F000000EB8A14BA85.png" xlink:type="simple" xlink:show="embed" xlink:actuate="onLoad"/></draw:frame>Output<text:tab/>Y : REAL (Ausgangssignal)</text:p>
      <text:p text:style-name="P183"><text:line-break/>TUNE2 setzt mithilfe von Auf- und Ab- Tastern ein Ausgangssignal Y. Durch entsprechende Config Variablen kann die Schrittweite für kleine und große Schritte individuell Programmiert werden. Ein oberer und unterer Grenzwert für den Ausgang Y kann <text:s/>mittels LIMIT_L und LIMIT_H vorgegeben werden. mit den Tastern SU und SD werden kleine Schritte Auf oder Ab erzeugt. Die Taster FU und FD erzeugen jeweils große Schritte am Ausgang Y. Wird eine Taste länger als TR gedrückt gehalten, so wird der Ausgang Y kontinuierlich Auf oder Ab verstellt. Die Geschwindigkeiten mit der der Ausgang verstellt wird ist hierbei für die beiden Tastenpaare <text:s/>mit S1 und S2 individuell einstellbar. S1 und S2 geben die Einheiten je Sekunde an. S1 ist die Geschwindigkeit für die Taster SU und SD, und S2 entsprechend für FU und FD. Mit den Eingängen RST und SET kann der Ausgang jederzeit auf einen durch RST_VAL beziehungsweise SET_VAL vorgegebenen Wert gestellt werden.</text:p>
      <text:list xml:id="list38465988" text:continue-numbering="true" text:style-name="L1">
        <text:list-item>
          <text:h text:style-name="P210" text:outline-level="1">Geräte Treiber</text:h>
          <text:list>
            <text:list-item>
              <text:h text:style-name="P224" text:outline-level="2">IRTRANS</text:h>
            </text:list-item>
          </text:list>
        </text:list-item>
      </text:list>
      <text:p text:style-name="P66"><text:span text:style-name="T21">Die Bausteine IRTRANS_? stellen ein Interface für Infrarot </text:span><text:span text:style-name="T16">Transmitter</text:span><text:span text:style-name="T21"> der Firma IRTrans GmbH zur Verfügung. IRTrans bietet </text:span><text:span text:style-name="T16">Transmitter</text:span><text:span text:style-name="T21"> für RS232 und TCP/IP an, welche alle mit den folgenden Treiberbausteinen betrieben werden können. Der grundsätzliche Anschluss an RS232 oder TCP/IP hat mit den entsprechenden Herstellerroutinen zu erfolgen. Die Interfacebausteine setzen auf ein </text:span><text:span text:style-name="T16">Buffer Interface</text:span><text:span text:style-name="T21"> auf welches in einen </text:span><text:span text:style-name="T16">Buffer</text:span><text:span text:style-name="T21"> (Array </text:span><text:span text:style-name="T16">of</text:span><text:span text:style-name="T21"> Byte) die Daten und in einem </text:span><text:span text:style-name="T16">Counter</text:span><text:span text:style-name="T21"> die Länge des Datenpakets in Bytes zur Verfügung stellt. Die IRTrans Geräte erlernen beliebige IR Tastencodes und setzten diese mittels einer konfigurierbaren Datenbank in ASCII </text:span><text:span text:style-name="T16">Strings</text:span><text:span text:style-name="T21"> um. Mit der Ethernet Variante werden diese </text:span><text:span text:style-name="T16">Strings</text:span><text:span text:style-name="T21"> dann über UDP versandt und können von einer SPS empfangen und ausgewertet werden. So können zum Beispiel vollautomatisch die Jalousien heruntergefahren werden wenn jemand den Fernseher einschaltet ohne das dafür eine zusätzliche Bedienung nötig wäre. Die SPS kann über Diesen Weg beliebig vielen Fernsteuerungen in unterschiedlichen Räumen zuhören und entsprechende Aktionen daraus ableiten. Umgekehrt ist natürlich auch die Aussendung von Tastencodes über die </text:span><text:span text:style-name="T16">Transmitter</text:span><text:span text:style-name="T21"> Module möglich.</text:span></text:p>
      <text:list xml:id="list38454978" text:continue-numbering="true" text:style-name="L1">
        <text:list-item>
          <text:list>
            <text:list-item>
              <text:h text:style-name="P216" text:outline-level="2"><text:alphabetical-index-mark-start text:id="IMark225941772"/>IRTRANS_1<text:alphabetical-index-mark-end text:id="IMark225941772"/></text:h>
            </text:list-item>
          </text:list>
        </text:list-item>
      </text:list>
      <text:p text:style-name="P2">Type<text:tab/><text:span text:style-name="T11">Funktionsbaustein</text:span></text:p>
      <text:p text:style-name="P2"><text:span text:style-name="T2">Input</text:span><text:tab/><text:span text:style-name="T11">CMD</text:span> : BOOL (TRUE wenn Daten zum Auswerten Anliegen)</text:p>
      <text:p text:style-name="P183"><text:tab/>DEV : STRING (Name der Fernsteuerung)</text:p>
      <text:p text:style-name="P183"><text:tab/>KEY : STRING (NAME der Taste)</text:p>
      <text:p text:style-name="P183">Config<text:tab/>DEV_CODE : STRING (zu dekodierender Fernsteuerungsname)</text:p>
      <text:p text:style-name="P183"><text:tab/>KEY_CODE : STRING (zu dekodierender Tastencode)</text:p>
      <text:p text:style-name="P183"><draw:frame draw:style-name="fr3" draw:name="Grafik423" text:anchor-type="paragraph" svg:x="1.046cm" svg:y="0.651cm" svg:width="2.9cm" svg:height="1.921cm" draw:z-index="717"><draw:image xlink:href="Pictures/10000000000000DB0000009109996717.png" xlink:type="simple" xlink:show="embed" xlink:actuate="onLoad"/></draw:frame>Output<text:tab/>Q : BOOL (Ausgangssignal)</text:p>
      <text:p text:style-name="P183"><text:soft-page-break/><text:line-break/>IRTRANS_1 überprüft wenn CMD = TRUE ob die Zeichenkette am Eingang DEV dem DEV_CODE (Device Code) entspricht und die Zeichenkette am Eingang KEY dem KEY_CODE entspricht. Wenn die Codes übereinstimmen und CMD = TRUE ist dann wird der Ausgang Q für einen Zyklus auf TRUE gesetzt.</text:p>
      <text:p text:style-name="P183">Das folgende Beispiel zeigt die Anwendung von IRTRANS_1:</text:p>
      <text:p text:style-name="P173"><draw:frame draw:style-name="fr3" draw:name="Grafik429" text:anchor-type="paragraph" svg:x="1.023cm" svg:y="0.012cm" svg:width="15.998cm" svg:height="2.314cm" draw:z-index="408"><draw:image xlink:href="Pictures/10000000000002C10000006625781225.png" xlink:type="simple" xlink:show="embed" xlink:actuate="onLoad"/></draw:frame><text:span text:style-name="T21"><text:line-break/>In diesem Beispiel berechnet ADR() die Adresse des Datenpuffers und gibt sie zusammen mit der Länge an IRTRANS_DECODE. Der Decoder ermittelt aus gültigen Datenpaketen den </text:span><text:span text:style-name="T16">String</text:span><text:span text:style-name="T21"> DEV und KEY und reicht diese per CMD an IRTRANS_1. IRTRANS_1 oder alternativ auch IRTRANS_4 und IRTRANS_8 überprüft dann ob DEV und KEY übereinstimmen und schaltet dann den Ausgang Q für einen Zyklus auf TRUE. im Beispiel wird damit ein DRIVER_1 gesteuert der es der Fernsteuerung erlaubt mit jedem empfangenen Protokoll den Ausgang umzuschalten.</text:span></text:p>
      <text:p text:style-name="P173"><text:span text:style-name="T21">Wenn mehrere </text:span><text:span text:style-name="T16">Key</text:span><text:span text:style-name="T21"> Codes ausgewertet werden sollen können alternativ die Bausteine IRTRANS_4 oder IRTRANS_8 verwendet werden oder mehrere dieser Bausteine parallel betrieben werden.</text:span></text:p>
      <text:p text:style-name="P183"><draw:frame draw:style-name="fr3" draw:name="Grafik430" text:anchor-type="paragraph" svg:x="1.157cm" svg:y="0.093cm" svg:width="13.651cm" svg:height="6.668cm" draw:z-index="409"><draw:image xlink:href="Pictures/1000000000000204000000FC13E17D34.png" xlink:type="simple" xlink:show="embed" xlink:actuate="onLoad"/></draw:frame></text:p>
      <text:list xml:id="list38453446" text:continue-numbering="true" text:style-name="L1">
        <text:list-item>
          <text:list>
            <text:list-item>
              <text:h text:style-name="P216" text:outline-level="2"><text:soft-page-break/><text:alphabetical-index-mark-start text:id="IMark225941772"/>IRTRANS_4<text:alphabetical-index-mark-end text:id="IMark225941772"/></text:h>
            </text:list-item>
          </text:list>
        </text:list-item>
      </text:list>
      <text:p text:style-name="P2">Type<text:tab/><text:span text:style-name="T11">Funktionsbaustein</text:span></text:p>
      <text:p text:style-name="P66"><text:span text:style-name="T16">Input</text:span><text:span text:style-name="T21"><text:tab/>CMD : BOOL (TRUE wenn Daten zum Auswerten Anliegen)</text:span></text:p>
      <text:p text:style-name="P183"><text:tab/>DEV : STRING (Name der Fernsteuerung)</text:p>
      <text:p text:style-name="P183"><text:tab/>KEY : STRING (NAME der Taste)</text:p>
      <text:p text:style-name="P183">Config<text:tab/>DEV_CODE : STRING (zu dekodierender Fernsteuerungsname)</text:p>
      <text:p text:style-name="P183"><text:tab/>KEY_CODE_0..7 : STRING (zu dekodierender Tastencode)</text:p>
      <text:p text:style-name="P73">Output<text:tab/>Q : BOOL (Ausgangssignal)</text:p>
      <text:p text:style-name="P183"><draw:frame draw:style-name="fr3" draw:name="Grafik426" text:anchor-type="paragraph" svg:x="1.023cm" svg:y="0.012cm" svg:width="2.9cm" svg:height="3.11cm" draw:z-index="718"><draw:image xlink:href="Pictures/10000000000000DB000000EBB23EB16E.png" xlink:type="simple" xlink:show="embed" xlink:actuate="onLoad"/></draw:frame><text:line-break/>IRTRANS_4 überprüft wenn CMD = TRUE ob die Zeichenkette am Eingang DEV dem DEV_CODE ( Device Code) entspricht und die Zeichenkette am Eingang KEY einem KEY_CODE entspricht. Wenn die Codes übereinstimmen und CMD = TRUE ist dann wird der entsprechende Ausgang Q für einen Zyklus auf TRUE gesetzt. Weitergehende Informationen zur Funktion des Bausteins befinden sich unter IRTRANS_1.</text:p>
      <text:list xml:id="list38453721" text:continue-numbering="true" text:style-name="L1">
        <text:list-item>
          <text:list>
            <text:list-item>
              <text:h text:style-name="P216" text:outline-level="2"><text:alphabetical-index-mark-start text:id="IMark225941772"/>IRTRANS_8<text:alphabetical-index-mark-end text:id="IMark225941772"/></text:h>
            </text:list-item>
          </text:list>
        </text:list-item>
      </text:list>
      <text:p text:style-name="P2">Type<text:tab/><text:span text:style-name="T11">Funktionsbaustein</text:span></text:p>
      <text:p text:style-name="P2"><text:span text:style-name="T2">Input</text:span><text:tab/><text:span text:style-name="T11">CMD</text:span> : BOOL (TRUE wenn Daten zum Auswerten Anliegen)</text:p>
      <text:p text:style-name="P183"><text:tab/>DEV : STRING (Name der Fernsteuerung)</text:p>
      <text:p text:style-name="P183"><text:tab/>KEY : STRING (NAME der Taste)</text:p>
      <text:p text:style-name="P183">Config<text:tab/>DEV_CODE : STRING (zu dekodierender Fernsteuerungsname)</text:p>
      <text:p text:style-name="P183"><text:tab/>KEY_CODE_0..7 : STRING (zu dekodierender Tastencode)</text:p>
      <text:p text:style-name="P73"><draw:frame draw:style-name="fr3" draw:name="Grafik425" text:anchor-type="paragraph" svg:x="1.046cm" svg:y="0.646cm" svg:width="2.9cm" svg:height="4.701cm" draw:z-index="719"><draw:image xlink:href="Pictures/10000000000000DB0000016364E893AF.png" xlink:type="simple" xlink:show="embed" xlink:actuate="onLoad"/></draw:frame>Output<text:tab/>Q0..Q7 : BOOL (Ausgangssignal)</text:p>
      <text:p text:style-name="P183"><text:soft-page-break/><text:line-break/>IRTRANS_8 überprüft wenn CMD = TRUE ob die Zeichenkette am Eingang DEV dem DEV_CODE (Device Code) entspricht und die Zeichenkette am Eingang KEY einem KEY_CODE entspricht. Wenn die Codes übereinstimmen und CMD = TRUE ist dann wird der entsprechende Ausgang Q für einen Zyklus auf TRUE gesetzt. Weitergehende Informationen zur Funktion des Bausteins befinden sich unter IRTRANS_1.</text:p>
      <text:list xml:id="list38479065" text:continue-numbering="true" text:style-name="L1">
        <text:list-item>
          <text:list>
            <text:list-item>
              <text:h text:style-name="P216" text:outline-level="2"><text:alphabetical-index-mark-start text:id="IMark225941772"/>IRTRANS_DECODE<text:alphabetical-index-mark-end text:id="IMark225941772"/></text:h>
            </text:list-item>
          </text:list>
        </text:list-item>
      </text:list>
      <text:p text:style-name="P2">Type<text:tab/><text:span text:style-name="T11">Funktionsbaustein</text:span></text:p>
      <text:p text:style-name="P66"><text:span text:style-name="T16">Input</text:span><text:span text:style-name="T21"><text:tab/>BUFFER : </text:span><text:span text:style-name="T16">Pointer</text:span><text:span text:style-name="T21"> </text:span><text:span text:style-name="T16">to</text:span><text:span text:style-name="T21"> ARRAY </text:span><text:span text:style-name="T16">of</text:span><text:span text:style-name="T21"> BYTE (Datenpuffer)</text:span></text:p>
      <text:p text:style-name="P183"><text:tab/>LENGTH : INT (Länge der Daten im Puffer)</text:p>
      <text:p text:style-name="P183">Output<text:tab/>CMD : BOOL (TRUE wenn gültige Daten am Ausgang anliegen)</text:p>
      <text:p text:style-name="P183"><text:tab/>DEV : STRING (Name der Fernsteuerung)</text:p>
      <text:p text:style-name="P183"><text:tab/>KEY : STRING (Name des Tastencodes)</text:p>
      <text:p text:style-name="P183"><draw:frame draw:style-name="fr3" draw:name="Grafik424" text:anchor-type="paragraph" svg:x="1.023cm" svg:y="0.601cm" svg:width="4.09cm" svg:height="2.709cm" draw:z-index="720"><draw:image xlink:href="Pictures/1000000000000135000000CD83D23C8D.png" xlink:type="simple" xlink:show="embed" xlink:actuate="onLoad"/></draw:frame><text:tab/>ERROR : BOOL (TRUE wenn ein ungültiges Datenpaket vorliegt)</text:p>
      <text:p text:style-name="P173"><text:span text:style-name="T21"><text:line-break/>IRTRANS_DECODE empfängt die in BUFFER vorliegenden Daten mit der Länge LENGTH, überprüft ob ein gültiges Datenpaket vorliegt und dekodiert aus dem Datenpaket den Namen der Fernsteuerung und den Namen der Taste. Wenn ein gültiges Datenpaket dekodiert wurde liegt der Name der Fernsteuerung am Ausgang DEV und der Name der Taste am Ausgang KEY. Der Ausgang CMD signalisiert das <text:s text:c="2"/>neue Ausgangsdaten vorliegen. </text:span><text:span text:style-name="T21">Der </text:span><text:soft-page-break/><text:span text:style-name="T21">Ausgang ERROR wird dann gesetzt wenn ein Datenpaket empfangen </text:span><text:span text:style-name="T21">wurde das nicht dem Format entspricht. Der Eingang BUFFER ist als </text:span><text:span text:style-name="T16">Pointer</text:span><text:span text:style-name="T21"> ausgeführt um mit unterschiedlich großen Eingangspuffern arbeiten zu können. Die Adresse des BUFFERS kann mit der Funktion ADR() ermittelt werden.</text:span></text:p>
      <text:p text:style-name="P183">Das Format ist wie folgt definiert:</text:p>
      <text:p text:style-name="P183">'Name der Fernsteuerung','Name des Tastencodes'$R$N</text:p>
      <text:p text:style-name="P173"><text:span text:style-name="T21">Ein Datenpaket besteht aus dem Namen der Fernsteuerung, gefolgt von einem Komma und anschließend der Name des Tastencodes. Das Datenpaket wird mit einem </text:span><text:span text:style-name="T16">Carriage</text:span><text:span text:style-name="T21"> </text:span><text:span text:style-name="T16">Return</text:span><text:span text:style-name="T21"> und einem </text:span><text:span text:style-name="T16">Line</text:span><text:span text:style-name="T21"> </text:span><text:span text:style-name="T16">Feed</text:span><text:span text:style-name="T21"> abgeschlossen.</text:span></text:p>
      <text:p text:style-name="P173"><text:span text:style-name="T21">Damit IRTRANS_DECODE funktioniert muss in der IRTrans Konfiguration die </text:span><text:span text:style-name="T16">Check box</text:span><text:span text:style-name="T21"> BROADCAST IR RELAY angekreuzt sein und in der entsprechenden Device Datenbank unter DEFAULT ACTION muss der </text:span><text:span text:style-name="T16">String</text:span><text:span text:style-name="T21"> '%r,%c\r\n' eingetragen sein. IRTRANS_DECODE wertet genau diesen </text:span><text:span text:style-name="T16">String</text:span><text:span text:style-name="T21"> aus und dekodiert %r als Name der Fernbedienung und %c als die gedrückte Taste.</text:span></text:p>
      <text:p text:style-name="P183"><draw:frame draw:style-name="fr3" draw:name="Grafik431" text:anchor-type="paragraph" svg:x="1.002cm" svg:y="1.175cm" svg:width="15.998cm" svg:height="8.244cm" draw:z-index="410"><draw:image xlink:href="Pictures/100000000000030C00000192B06D045D.png" xlink:type="simple" xlink:show="embed" xlink:actuate="onLoad"/></draw:frame>Das <text:s/>folgende Beispiel zeigt die Anwendung von IRTRANS_DECODE mit einem UDP Server:</text:p>
      <text:p text:style-name="P173"><text:span text:style-name="T21"><text:line-break/>Der UDP Server liefert das Empfangene Datenpaket im RECEIVE_BUFFER ab und hinterlegt in DIREC_COUNT die Länge der Empfangsdaten in Bytes. IRTRANS_DECODE wird aktiv wenn DIREC_COUNT &gt; 0 wird und überprüft dann ob die Empfangsdaten dem Format eines IRTRANS Empfangspakets entsprechen. Sind die Daten in RECEIVE_BUFFER gültige Empfangsdaten wird der Name der Fernsteuerung in DEV und der Tastencode in KEY abgespeichert, DIREC_COUNT auf 0 gesetzt und der Ausgang CMD für einen Zyklus auf TRUE gesetzt. Wenn die Eingangsdaten nicht dem vorgeschriebenen Format entsprechen wird ERROR auf TRUE gesetzt und die Länge in </text:span><text:span text:style-name="T21">DIREC_COUNT wird nicht auf 0 gesetzt damit gegebenenfalls andere Deco</text:span><text:span text:style-name="T21">der parallel die Daten im RECEIVE_BUFFER auswerten können. In der IRTRANS </text:span><text:soft-page-break/><text:span text:style-name="T21">Web Konfiguration muss als Broadcast Adresse die IP Adresse der SPS eingetragen werden.</text:span></text:p>
      <text:p text:style-name="P183"><draw:frame draw:style-name="fr3" draw:name="Grafik439" text:anchor-type="paragraph" svg:x="1.046cm" svg:y="0.631cm" svg:width="7.601cm" svg:height="5.98cm" draw:z-index="418"><draw:image xlink:href="Pictures/10000000000001BA0000015CA1438E68.png" xlink:type="simple" xlink:show="embed" xlink:actuate="onLoad"/></draw:frame>IRTRANS Web Konfiguration:</text:p>
      <text:p text:style-name="P183"/>
      <text:list xml:id="list38465735" text:continue-numbering="true" text:style-name="L1">
        <text:list-item>
          <text:h text:style-name="P210" text:outline-level="1">Netzwerk und Kommunikation</text:h>
          <text:list>
            <text:list-item>
              <text:h text:style-name="P221" text:outline-level="2"><text:alphabetical-index-mark-start text:id="IMark225941772"/>HTML_DECODE<text:alphabetical-index-mark-end text:id="IMark225941772"/></text:h>
            </text:list-item>
          </text:list>
        </text:list-item>
      </text:list>
      <text:p text:style-name="P2">Type<text:tab/><text:span text:style-name="T11">Funktion</text:span> : STRING(255)</text:p>
      <text:p text:style-name="P66"><text:span text:style-name="T16">Input</text:span><text:span text:style-name="T21"><text:tab/>IN : STRING (</text:span><text:span text:style-name="T19">Zeichenkette</text:span><text:span text:style-name="T21">)</text:span></text:p>
      <text:p text:style-name="P183"><draw:frame draw:style-name="fr3" draw:name="Grafik564" text:anchor-type="paragraph" svg:x="1.002cm" svg:y="0.667cm" svg:width="4.881cm" svg:height="0.99cm" draw:z-index="550"><draw:image xlink:href="Pictures/10000000000001710000004B390C553B.png" xlink:type="simple" xlink:show="embed" xlink:actuate="onLoad"/></draw:frame>Output<text:tab/>STRING(255) (Zeichenkette)</text:p>
      <text:p text:style-name="P183"><text:line-break/>HTML_DECODE wandelt reservierte Zeichen welche in der Form &amp;name; im HTML Code gespeichert sind in die originalen Zeichen um. Zusätzlich werden alle codierten Sonderzeichen in den entsprechenden ASCII Code umgewandelt. Sonderzeichen können in HTML durch folgende Zeichenfolge repräsentiert sein:</text:p>
      <text:p text:style-name="P183">- &amp;#NN; wobei NN die Position des Zeichens innerhalb der Zeichentabelle in dezimaler Schreibweise darstellt.</text:p>
      <text:p text:style-name="P183">- &amp;#xNN; oder &amp;#XNN wobei NN die Position des Zeichens innerhalb der Zeichentabelle in hexadezimaler Schreibweise darstellt.</text:p>
      <text:p text:style-name="P183">&amp;Name; Sonderzeichen haben Namen wie zum Beispiel &amp;euro; für €.</text:p>
      <text:p text:style-name="P183">Die reservierten Zeichen in HTML sind:</text:p>
      <text:p text:style-name="P183">&amp; wird codiert als &amp;amp;</text:p>
      <text:p text:style-name="P183">&gt; wird codiert als &amp;gt;</text:p>
      <text:p text:style-name="P183">&lt; wird codiert als &amp;lt;</text:p>
      <text:p text:style-name="P183">" wird codiert als &amp;quot;</text:p>
      <text:p text:style-name="P183">Beispiele:</text:p>
      <text:p text:style-name="P183">HTML_DECODE('1 ist &amp;gt;als 0') = '1 ist &gt; als 0';</text:p>
      <text:p text:style-name="P183">HTML_DECODE('&amp;#D79;&amp;#D83;&amp;#D67;&amp;#D65;&amp;#D84;') = 'OSCAT';</text:p>
      <text:p text:style-name="P183">HTML_DECODE('&amp;#xH4F;&amp;#xH53;&amp;#xH43;&amp;#xH41;&amp;#xH54;') = 'OSCAT';</text:p>
      <text:p text:style-name="P183">HTML_DECODE('&amp;#XH4F;&amp;#XH53;&amp;#XH43;&amp;#XH41;&amp;#XH54;') = 'OSCAT';</text:p>
      <text:list xml:id="list38467896" text:continue-numbering="true" text:style-name="L1">
        <text:list-item>
          <text:list>
            <text:list-item>
              <text:h text:style-name="P221" text:outline-level="2"><text:soft-page-break/><text:alphabetical-index-mark-start text:id="IMark225941772"/>HTML_ENCODE<text:alphabetical-index-mark-end text:id="IMark225941772"/></text:h>
            </text:list-item>
          </text:list>
        </text:list-item>
      </text:list>
      <text:p text:style-name="P2">Type<text:tab/>F<text:span text:style-name="T11">unktion</text:span> : STRING(255)</text:p>
      <text:p text:style-name="P66"><text:span text:style-name="T16">Input</text:span><text:span text:style-name="T21"><text:tab/>IN : STRING (</text:span><text:span text:style-name="T19">Zeichenkette</text:span><text:span text:style-name="T21">)</text:span></text:p>
      <text:p text:style-name="P183"><text:tab/>M : BOOL (Mode)</text:p>
      <text:p text:style-name="P183"><draw:frame draw:style-name="fr3" draw:name="Grafik565" text:anchor-type="paragraph" svg:x="1.025cm" svg:y="0.644cm" svg:width="5.87cm" svg:height="1.57cm" draw:z-index="554"><draw:image xlink:href="Pictures/10000000000001BC00000077D8B300D6.png" xlink:type="simple" xlink:show="embed" xlink:actuate="onLoad"/></draw:frame>Output<text:tab/>STRING(255) (Zeichenkette)</text:p>
      <text:p text:style-name="P183"><text:line-break/>HTML_ENCODE wandelt in HTML reservierte Zeichen um in die Form &amp;Name;. Wird der Eingang M auf TRUE gesetzt werden zusätzlich alle Zeichen mit dem Code 160-255 und 128 in die &amp;Name Konvention umgesetzt.</text:p>
      <text:p text:style-name="P183">Vorsicht ist bei der Anwendung von Zeichensätzen geboten weil diese nicht auf allen Systemen identisch sind und Abweichungen speziell bei Sonderzeichen häufig vorkommen. So ist zum Beispiel nicht bei allen Systemen das € Zeichen auf Position 128 in der Zeichentabelle.</text:p>
      <text:p text:style-name="P183">Die reservierten Zeichen in HTML sind:</text:p>
      <text:p text:style-name="P183">&amp; wird codiert als &amp;amp;</text:p>
      <text:p text:style-name="P183">&gt; wird codiert als &amp;gt;</text:p>
      <text:p text:style-name="P183">&lt; wird codiert als &amp;lt;</text:p>
      <text:p text:style-name="P183">" wird codiert als &amp;quot;</text:p>
      <text:p text:style-name="P183">HTML_ENCODE wandelt die Zeichenkette '1 ist &gt; als 0' um in '1 ist &amp;gt;als 0'.</text:p>
      <text:list xml:id="list38468778" text:continue-numbering="true" text:style-name="L1">
        <text:list-item>
          <text:list>
            <text:list-item>
              <text:h text:style-name="P221" text:outline-level="2"><text:alphabetical-index-mark-start text:id="IMark225941772"/>IP4_CHECK<text:alphabetical-index-mark-end text:id="IMark225941772"/></text:h>
            </text:list-item>
          </text:list>
        </text:list-item>
      </text:list>
      <text:p text:style-name="P2">Type<text:tab/><text:span text:style-name="T11">Funktion</text:span> : BOOL</text:p>
      <text:p text:style-name="P66"><text:span text:style-name="T16">Input</text:span><text:span text:style-name="T21"><text:tab/>NIP : DWORD (Netzwerk IP Adresse)</text:span></text:p>
      <text:p text:style-name="P183"><text:tab/>LIP : DWORD (Lokale IP Adresse)</text:p>
      <text:p text:style-name="P173"><text:span text:style-name="T21"><text:tab/>SM : DWORD (</text:span><text:span text:style-name="T16">Subnet</text:span><text:span text:style-name="T21"> Maske)<text:tab/></text:span></text:p>
      <text:p text:style-name="P173"><draw:frame draw:style-name="fr3" draw:name="Grafik498" text:anchor-type="paragraph" svg:x="1.067cm" svg:y="0.623cm" svg:width="4.521cm" svg:height="2.02cm" draw:z-index="479"><draw:image xlink:href="Pictures/100000000000015600000099811A2099.png" xlink:type="simple" xlink:show="embed" xlink:actuate="onLoad"/></draw:frame><text:span text:style-name="T21">Output<text:tab/>BOOL (TRUE wenn NIP und LIP im gleichen </text:span><text:span text:style-name="T16">Subnet</text:span><text:span text:style-name="T21"> liegen)</text:span></text:p>
      <text:p text:style-name="P173"><text:soft-page-break/><text:span text:style-name="T21"><text:line-break/>IP4_CHECK prüft ob eine Netzwerkadresse NIP und die Lokale Adresse LIP im gleichen </text:span><text:span text:style-name="T16">Subnet</text:span><text:span text:style-name="T21"> liegen. Beiden Adressen werden zuerst mit der </text:span><text:span text:style-name="T16">Subnet</text:span><text:span text:style-name="T21"> Maske Maskiert und dann auf Gleichheit geprüft. Es werden nur die Bits auf Gleichheit geprüft die in der </text:span><text:span text:style-name="T16">Subnet</text:span><text:span text:style-name="T21"> Maske TRUE sind. Die Netzwerk Adressen müssen dem Ipv4 Format entsprechen und als DWORD vorliegen. Sollen IP Adressen die als </text:span><text:span text:style-name="T16">String</text:span><text:span text:style-name="T21"> vorliegen geprüft werden müssen diese vorher in DWORD gewandelt werden.</text:span></text:p>
      <text:p text:style-name="P173"><text:span text:style-name="T21">Folgendes Beispiel zeigt 2 IP Adressen und eine </text:span><text:span text:style-name="T16">Subnet</text:span><text:span text:style-name="T21"> Maske die als </text:span><text:span text:style-name="T16">String</text:span><text:span text:style-name="T21"> vorliegen und nach entsprechender Umwandlung in DWORD geprüft werden. Der Ausgang wird TRUE weil beide Adressen im gleichen </text:span><text:span text:style-name="T16">Subnet</text:span><text:span text:style-name="T21"> liegen.</text:span></text:p>
      <text:p text:style-name="P183"><draw:frame draw:style-name="fr3" draw:name="Grafik499" text:anchor-type="paragraph" svg:x="0.979cm" svg:y="0.145cm" svg:width="15.998cm" svg:height="3.591cm" draw:z-index="480"><draw:image xlink:href="Pictures/1000000000000286000000916F2D39A2.png" xlink:type="simple" xlink:show="embed" xlink:actuate="onLoad"/></draw:frame></text:p>
      <text:list xml:id="list38451797" text:continue-numbering="true" text:style-name="L1">
        <text:list-item>
          <text:list>
            <text:list-item>
              <text:h text:style-name="P221" text:outline-level="2"><text:alphabetical-index-mark-start text:id="IMark225941772"/>IP4_DECODE<text:alphabetical-index-mark-end text:id="IMark225941772"/></text:h>
            </text:list-item>
          </text:list>
        </text:list-item>
      </text:list>
      <text:p text:style-name="P2">Type<text:tab/><text:span text:style-name="T11">Funktion</text:span> : DWORD</text:p>
      <text:p text:style-name="P66"><text:span text:style-name="T16">Input</text:span><text:span text:style-name="T21"><text:tab/>STR : BOOL (Zeichenkette die die IP Adresse enthält)<text:tab/></text:span></text:p>
      <text:p text:style-name="P183"><draw:frame draw:style-name="fr3" draw:name="Grafik496" text:anchor-type="paragraph" svg:x="0.958cm" svg:y="0.623cm" svg:width="4.971cm" svg:height="1.12cm" draw:z-index="477"><draw:image xlink:href="Pictures/1000000000000178000000554C7C3E08.png" xlink:type="simple" xlink:show="embed" xlink:actuate="onLoad"/></draw:frame>Output<text:tab/>DWORD (dekodierte IP v4 Adresse)</text:p>
      <text:p text:style-name="P173"><text:span text:style-name="T21"><text:line-break/>IP4_DECODE dekodiert die in STR enthaltene Zeichenkette als IP v4 Adresse und gibt diese als DWORD zurück. Eine Rückgabe von 0 bedeutet das eine ungültige Adresse oder die Adresse '0.0.0.0' ausgewertet wurde. IP4 kann auch zum Auswerten einer </text:span><text:span text:style-name="T16">Subnet</text:span><text:span text:style-name="T21"> Maske des IP v4 Formates verwendet werden.</text:span></text:p>
      <text:list xml:id="list38473728" text:continue-numbering="true" text:style-name="L1">
        <text:list-item>
          <text:list>
            <text:list-item>
              <text:h text:style-name="P221" text:outline-level="2"><text:soft-page-break/><text:alphabetical-index-mark-start text:id="IMark225941772"/>IP4_TO_STRING<text:alphabetical-index-mark-end text:id="IMark225941772"/></text:h>
            </text:list-item>
          </text:list>
        </text:list-item>
      </text:list>
      <text:p text:style-name="P2">Type<text:tab/><text:span text:style-name="T11">Funktion</text:span> : STRING(15)</text:p>
      <text:p text:style-name="P66"><text:span text:style-name="T16">Input</text:span><text:span text:style-name="T21"><text:tab/>STR : BOOL (Zeichenkette die die IP Adresse enthält)<text:tab/></text:span></text:p>
      <text:p text:style-name="P183"><draw:frame draw:style-name="fr3" draw:name="Grafik556" text:anchor-type="paragraph" svg:x="1.023cm" svg:y="0.688cm" svg:width="5.87cm" svg:height="1.12cm" draw:z-index="538"><draw:image xlink:href="Pictures/10000000000001BC00000055534082D0.png" xlink:type="simple" xlink:show="embed" xlink:actuate="onLoad"/></draw:frame>Output<text:tab/>DWORD (dekodierte IP v4 Adresse)</text:p>
      <text:p text:style-name="P183"><text:line-break/>IP4_TO_STRING wandelt die als DWORD gespeicherte IP4 Adresse in IN in einen STRING um. Das Format entspricht 'NNN.NNN.NNN.NNN'.</text:p>
      <text:list xml:id="list38465779" text:continue-numbering="true" text:style-name="L1">
        <text:list-item>
          <text:list>
            <text:list-item>
              <text:h text:style-name="P221" text:outline-level="2"><text:alphabetical-index-mark-start text:id="IMark225941772"/>IS_IP4<text:alphabetical-index-mark-end text:id="IMark225941772"/></text:h>
            </text:list-item>
          </text:list>
        </text:list-item>
      </text:list>
      <text:p text:style-name="P2">Type<text:tab/><text:tab/><text:span text:style-name="T11">Funktion</text:span> : BOOL</text:p>
      <text:p text:style-name="P66"><text:span text:style-name="T16">Input</text:span><text:span text:style-name="T21"><text:tab/>STR : STRING (zu prüfende Zeichenkette)</text:span></text:p>
      <text:p text:style-name="P183"><draw:frame draw:style-name="fr3" draw:name="Grafik495" text:anchor-type="paragraph" svg:x="1.025cm" svg:y="0.688cm" svg:width="3.18cm" svg:height="1.12cm" draw:z-index="476"><draw:image xlink:href="Pictures/10000000000000F000000055B641A864.png" xlink:type="simple" xlink:show="embed" xlink:actuate="onLoad"/></draw:frame>Output<text:tab/>BOOL (TRUE wenn STR eine gültige IP v4 Adresse enthält)</text:p>
      <text:p text:style-name="P183"><text:s/><text:line-break/>IS_IP4 prüft ob die Zeichenkette STR eine gültige IP v4 Adresse enthält, wenn nicht wird FALSE zurückgegeben. Ein gültige IP v4 Adresse besteht aus 4 Zahlen von 0 – 255 die mit je einem Punkt getrennt sind. Die Adresse 0.0.0.0 wird dabei als falsch eingestuft.</text:p>
      <text:p text:style-name="P183">IS_IP4(0.0.0.0) = FALSE</text:p>
      <text:p text:style-name="P183">IS_IP4(255.255.255.255) = TRUE</text:p>
      <text:p text:style-name="P183">IS_IP4(256.255.255.255) = FALSE</text:p>
      <text:p text:style-name="P183">IS_IP4(0.1.2.) = FALSE</text:p>
      <text:p text:style-name="P183">IS_IP4(0.1.2.3.) = FALSE</text:p>
      <text:p text:style-name="P183"/>
      <text:list xml:id="list38453304" text:continue-numbering="true" text:style-name="L1">
        <text:list-item>
          <text:list>
            <text:list-item>
              <text:h text:style-name="P221" text:outline-level="2"><text:soft-page-break/><text:alphabetical-index-mark-start text:id="IMark225941772"/>IS_URLCHR<text:alphabetical-index-mark-end text:id="IMark225941772"/></text:h>
            </text:list-item>
          </text:list>
        </text:list-item>
      </text:list>
      <text:p text:style-name="P2">Type<text:tab/><text:span text:style-name="T11">Funktion</text:span> : BOOL</text:p>
      <text:p text:style-name="P66"><text:span text:style-name="T16">Input</text:span><text:span text:style-name="T21"><text:tab/>STR : STRING (zu prüfende Zeichenkette)</text:span></text:p>
      <text:p text:style-name="P183"><draw:frame draw:style-name="fr3" draw:name="Grafik557" text:anchor-type="paragraph" svg:x="1.067cm" svg:y="0.667cm" svg:width="4.09cm" svg:height="0.99cm" draw:z-index="542"><draw:image xlink:href="Pictures/10000000000001350000004BCAE19C1F.png" xlink:type="simple" xlink:show="embed" xlink:actuate="onLoad"/></draw:frame>Output<text:tab/>BOOL (TRUE wenn STR eine gültige IP v4 Adresse enthält)</text:p>
      <text:p text:style-name="P183"><text:line-break/>IS_URLCHR prüft ob die Zeichenkette nur zulässige Zeichen für eine URL Kodierung enthält. Enthält die Zeichenkette reservierte Zeichen gibt Sie FALSE zurück, andernfalls TRUE.</text:p>
      <text:p text:style-name="P183">Für eine URL sind folgende Zeichen zulässig:</text:p>
      <text:p text:style-name="P183">[A..Z]<text:line-break/>[a..z]<text:line-break/>[0..9]<text:line-break/>[-._~]</text:p>
      <text:p text:style-name="P183">alle anderen Zeichen sind reserviert oder nicht zulässig.</text:p>
      <text:list xml:id="list38466896" text:continue-numbering="true" text:style-name="L1">
        <text:list-item>
          <text:list>
            <text:list-item>
              <text:h text:style-name="P221" text:outline-level="2"><text:alphabetical-index-mark-start text:id="IMark225941772"/>STRING_TO_URL<text:alphabetical-index-mark-end text:id="IMark225941772"/></text:h>
            </text:list-item>
          </text:list>
        </text:list-item>
      </text:list>
      <text:p text:style-name="P2">Type<text:tab/><text:span text:style-name="T11">Funktion</text:span> : URL</text:p>
      <text:p text:style-name="P66"><text:span text:style-name="T16">Input</text:span><text:span text:style-name="T21"><text:tab/>STR : STRING (</text:span><text:span text:style-name="T16">Unified</text:span><text:span text:style-name="T21"> </text:span><text:span text:style-name="T16">Resource</text:span><text:span text:style-name="T21"> </text:span><text:span text:style-name="T16">Locator</text:span><text:span text:style-name="T21">)</text:span></text:p>
      <text:p text:style-name="P183"><text:tab/>DEFAULT_PROTOCOL : STRING (Ersatzprotokoll)</text:p>
      <text:p text:style-name="P183"><text:tab/>DEFAULT_PATH : STRING (Ersatzpfad)<text:tab/></text:p>
      <text:p text:style-name="P183"><draw:frame draw:style-name="fr3" draw:name="Grafik552" text:anchor-type="paragraph" svg:x="1.046cm" svg:y="0.688cm" svg:width="7.669cm" svg:height="2.02cm" draw:z-index="541"><draw:image xlink:href="Pictures/10000000000002440000009974136929.png" xlink:type="simple" xlink:show="embed" xlink:actuate="onLoad"/></draw:frame>Output<text:tab/>URL (URL)</text:p>
      <text:p text:style-name="P173"><text:span text:style-name="T21"><text:line-break/>DECODE_URL zerlegt eine URL (</text:span><text:span text:style-name="T16">Uniform</text:span><text:span text:style-name="T21"> </text:span>Resource<text:span text:style-name="T21"> </text:span>Locator<text:span text:style-name="T21">) in seine Bestandteile und speichert diese in dem Datentyp URL. Wird in STR kein Pfad oder kein Protokoll spezifiziert, so setzt die Funktion die fehlenden Werte Automatisch mit den spezifizierten Ersatzwerten.</text:span></text:p>
      <text:p text:style-name="P183">Eine URL setzt sich wie folgt zusammen:</text:p>
      <text:p text:style-name="P173">protokoll<text:span text:style-name="T21">://</text:span>user<text:span text:style-name="T21">:</text:span><text:a xlink:type="simple" xlink:href="mailto:passwort@domain">passwort</text:a><text:a xlink:type="simple" xlink:href="mailto:passwort@domain">@</text:a><text:a xlink:type="simple" xlink:href="mailto:passwort@domain">domain</text:a><text:span text:style-name="T21">:</text:span>port<text:span text:style-name="T21">/</text:span>path<text:span text:style-name="T21">?</text:span>query<text:span text:style-name="T21">#</text:span>anker</text:p>
      <text:p text:style-name="P173"><text:soft-page-break/><text:span text:style-name="T21">Beispiel: </text:span><text:a xlink:type="simple" xlink:href="ftp://hugo:nono@oscat.de:1234/download/manual.html"><text:span text:style-name="T21">ftp://hugo:nono@oscat.de:1234/download/manual.html</text:span></text:a></text:p>
      <text:p text:style-name="P173"><text:span text:style-name="T21">einige Bestandteile der URL sind optional wie zum Beispiel User, Passwort, Anker, </text:span><text:span text:style-name="T16">Query</text:span><text:span text:style-name="T21"> ...</text:span></text:p>
      <text:list xml:id="list38453984" text:continue-numbering="true" text:style-name="L1">
        <text:list-item>
          <text:list>
            <text:list-item>
              <text:h text:style-name="P221" text:outline-level="2"><text:alphabetical-index-mark-start text:id="IMark225941772"/>URL_DECODE<text:alphabetical-index-mark-end text:id="IMark225941772"/></text:h>
            </text:list-item>
          </text:list>
        </text:list-item>
      </text:list>
      <text:p text:style-name="P2">Type<text:tab/><text:tab/><text:span text:style-name="T11">Funktion</text:span> : STRING(255)</text:p>
      <text:p text:style-name="P66"><text:span text:style-name="T16">Input</text:span><text:span text:style-name="T21"><text:tab/>IN : STRING (</text:span><text:span text:style-name="T19">Zeichenkette</text:span><text:span text:style-name="T21">)</text:span></text:p>
      <text:p text:style-name="P183"><draw:frame draw:style-name="fr3" draw:name="Grafik558" text:anchor-type="paragraph" svg:x="1.09cm" svg:y="0.688cm" svg:width="4.48cm" svg:height="0.99cm" draw:z-index="544"><draw:image xlink:href="Pictures/10000000000001530000004B5DB5972F.png" xlink:type="simple" xlink:show="embed" xlink:actuate="onLoad"/></draw:frame>Output<text:tab/>STRING(255) (Zeichenkette)</text:p>
      <text:p text:style-name="P173"><text:span text:style-name="T21"><text:line-break/>URL_DECODE wandelt die als %HH codierten Sonderzeichen in der Zeichenkette IN in den entsprechenden ASCII Code um. In einer URL Kodierung dürfen nur die Zeichen [A..Z, a..z, 0..9, -._~] vorkommen. Anderen Zeichen können mit einem % Zeichen gefolgt vom 2 Zeichen langen </text:span><text:span text:style-name="T19">Hexadezimalcode</text:span><text:span text:style-name="T21"> des Zeichens dargestellt werden. Das reservierte Zeichen '#' wird dabei als '%23' kodiert.</text:span></text:p>
      <text:list xml:id="list38458547" text:continue-numbering="true" text:style-name="L1">
        <text:list-item>
          <text:list>
            <text:list-item>
              <text:h text:style-name="P221" text:outline-level="2"><text:alphabetical-index-mark-start text:id="IMark225941772"/>URL_ENCODE<text:alphabetical-index-mark-end text:id="IMark225941772"/></text:h>
            </text:list-item>
          </text:list>
        </text:list-item>
      </text:list>
      <text:p text:style-name="P2">Type<text:tab/><text:span text:style-name="T11">Funktion</text:span> : STRING(255)</text:p>
      <text:p text:style-name="P66"><text:span text:style-name="T16">Input</text:span><text:span text:style-name="T21"><text:tab/>IN : STRING (</text:span><text:span text:style-name="T19">Zeichenkette</text:span><text:span text:style-name="T21">)</text:span></text:p>
      <text:p text:style-name="P183"><draw:frame draw:style-name="fr3" draw:name="Grafik559" text:anchor-type="paragraph" svg:x="1.046cm" svg:y="0.688cm" svg:width="4.48cm" svg:height="0.99cm" draw:z-index="545"><draw:image xlink:href="Pictures/10000000000001530000004B6A3C120F.png" xlink:type="simple" xlink:show="embed" xlink:actuate="onLoad"/></draw:frame>Output<text:tab/>STRING(255) (Zeichenkette)</text:p>
      <text:p text:style-name="P183"><text:line-break/>URL_ENCODE wandelt reservierte Zeichen in der Zeichenkette IN in die Zeichenkette '%HH' um. In einer URL Kodierung dürfen nur die Zeichen [A..Z, a..z, 0..9, -._~] vorkommen. Anderen Zeichen können mit einem % Zeichen gefolgt vom 2 Zeichen langen Hexadezimalcode des Zeichens dargestellt werden. Das reservierte Zeichen '#' wird dabei als '%23' kodiert.</text:p>
      <text:list xml:id="list38481678" text:continue-numbering="true" text:style-name="L1">
        <text:list-item>
          <text:list>
            <text:list-item>
              <text:h text:style-name="P221" text:outline-level="2"><text:soft-page-break/><text:alphabetical-index-mark-start text:id="IMark225941772"/>URL_TO_STRING<text:alphabetical-index-mark-end text:id="IMark225941772"/></text:h>
            </text:list-item>
          </text:list>
        </text:list-item>
      </text:list>
      <text:p text:style-name="P2">Type<text:tab/><text:span text:style-name="T11">Funktion</text:span> : STRING(255)</text:p>
      <text:p text:style-name="P66"><text:span text:style-name="T16">Input</text:span><text:span text:style-name="T21"><text:tab/>STR : STRING (</text:span><text:span text:style-name="T16">Unified</text:span><text:span text:style-name="T21"> </text:span><text:span text:style-name="T16">Resource</text:span><text:span text:style-name="T21"> </text:span><text:span text:style-name="T16">Locator</text:span><text:span text:style-name="T21">)</text:span></text:p>
      <text:p text:style-name="P183"><text:tab/>DEFAULT_PROTOCOL : STRING (Ersatzprotokoll)</text:p>
      <text:p text:style-name="P183"><text:tab/>DEFAULT_PATH : STRING (Ersatzpfad)<text:tab/></text:p>
      <text:p text:style-name="P183"><draw:frame draw:style-name="fr3" draw:name="Grafik555" text:anchor-type="paragraph" svg:x="1.046cm" svg:y="0.646cm" svg:width="6.32cm" svg:height="1.12cm" draw:z-index="543"><draw:image xlink:href="Pictures/10000000000001DE000000557404B5A9.png" xlink:type="simple" xlink:show="embed" xlink:actuate="onLoad"/></draw:frame>Output<text:tab/>URL (URL)</text:p>
      <text:p text:style-name="P173"><text:span text:style-name="T21"><text:line-break/>URL_TO_STRING erzeugt aus den in IN gespeicherten Daten vom Typ URL einen </text:span><text:span text:style-name="T16">Unified</text:span><text:span text:style-name="T21"> </text:span>Resource<text:span text:style-name="T21"> </text:span>Locator<text:span text:style-name="T21"> als </text:span><text:span text:style-name="T16">String</text:span><text:span text:style-name="T21"> zusammen.</text:span></text:p>
      <text:p text:style-name="P183">Eine URL setzt sich wie folgt zusammen:</text:p>
      <text:p text:style-name="P173">protokoll<text:span text:style-name="T21">://</text:span>user:<text:a xlink:type="simple" xlink:href="mailto:passwort@domain">passwort</text:a><text:a xlink:type="simple" xlink:href="mailto:passwort@domain">@</text:a><text:a xlink:type="simple" xlink:href="mailto:passwort@domain">domain</text:a><text:span text:style-name="T21">:</text:span>port<text:span text:style-name="T21">/</text:span>path<text:span text:style-name="T21">?</text:span>query<text:span text:style-name="T21">#</text:span>anker</text:p>
      <text:p text:style-name="P173"><text:span text:style-name="T21">Beispiel: </text:span><text:a xlink:type="simple" xlink:href="ftp://hugo:nono@oscat.de:1234/download/manual.html"><text:span text:style-name="T21">ftp://hugo:nono@oscat.de:1234/download/manual.html</text:span></text:a></text:p>
      <text:p text:style-name="P173"><text:span text:style-name="T21">einige Bestandteile der URL sind optional wie zum Beispiel User, Passwort, Anker, </text:span><text:span text:style-name="T16">Query</text:span><text:span text:style-name="T21"> ...</text:span></text:p>
      <text:list xml:id="list38483143" text:continue-numbering="true" text:style-name="L1">
        <text:list-item>
          <text:h text:style-name="P210" text:outline-level="1">BUFFER Management</text:h>
          <text:list>
            <text:list-item>
              <text:h text:style-name="P222" text:outline-level="2"><text:alphabetical-index-mark-start text:id="IMark225941772"/>_BUFFER_CLEAR<text:alphabetical-index-mark-end text:id="IMark225941772"/></text:h>
            </text:list-item>
          </text:list>
        </text:list-item>
      </text:list>
      <text:p text:style-name="P2">Type<text:tab/><text:span text:style-name="T11">Funktion</text:span> : BOOL</text:p>
      <text:p text:style-name="P66"><text:span text:style-name="T16">Input</text:span><text:span text:style-name="T21"><text:tab/>PT : POINTER TO BYTE (Adresse des </text:span><text:span text:style-name="T16">Puffers</text:span><text:span text:style-name="T21">)</text:span></text:p>
      <text:p text:style-name="P183"><text:tab/>SIZE : UINT (Größe des Puffers)</text:p>
      <text:p text:style-name="P173"><draw:frame draw:style-name="fr3" draw:name="Grafik501" text:anchor-type="paragraph" svg:x="1.046cm" svg:y="0.667cm" svg:width="6.32cm" svg:height="1.57cm" draw:z-index="482"><draw:image xlink:href="Pictures/10000000000001DE000000775F70386B.png" xlink:type="simple" xlink:show="embed" xlink:actuate="onLoad"/></draw:frame><text:span text:style-name="T21">Output<text:tab/>BOOL (</text:span><text:span text:style-name="T16">Returns</text:span><text:span text:style-name="T21"> TRUE)</text:span></text:p>
      <text:p text:style-name="P173"><text:span text:style-name="T21"><text:line-break/>Die Funktion _BUFFER</text:span>_<text:span text:style-name="T21">CLEAR initialisiert ein beliebiges Array </text:span><text:span text:style-name="T16">of</text:span><text:span text:style-name="T21"> Byte mit 0. Beim Aufruf wird der Funktion ein </text:span><text:span text:style-name="T16">Pointer</text:span><text:span text:style-name="T21"> auf das zu initialisierende Array und dessen Größe in Bytes übergeben. Unter CoDeSys lautet der Aufruf: <text:s/>_BUFFER_CLEAR(ADR(Array), SIZEOF(Array)), wobei Array der Name des zu manipulierenden Arrays ist. ADR ist eine Standardfunktion, die den </text:span><text:span text:style-name="T16">Pointer</text:span><text:span text:style-name="T21"> auf das Array ermittelt und SIZEOF ist eine Standardfunktion, die die Größe des Arrays ermittelt. Die Funktion liefert nur TRUE zurück. Das durch den </text:span><text:span text:style-name="T16">Pointer</text:span><text:span text:style-name="T21"> angegebene Array wird direkt im Speicher manipuliert. </text:span></text:p>
      <text:p text:style-name="P180">Diese Art der Bearbeitung von Arrays ist äußerst effizient, da kein zusätzlicher Speicher benötigt wird und keine Übergabewerte kopiert werden müssen.</text:p>
      <text:p text:style-name="P180">Beispiel:<text:tab/>_BUFFER_CLEAR(ADR(bigarray), SIZEOF(bigarray))</text:p>
      <text:p text:style-name="P183"><text:tab/>initialisiert bigarray mit 0.</text:p>
      <text:list xml:id="list38459879" text:continue-numbering="true" text:style-name="L1">
        <text:list-item>
          <text:list>
            <text:list-item>
              <text:h text:style-name="P221" text:outline-level="2"><text:alphabetical-index-mark-start text:id="IMark225941772"/>_BUFFER_INIT<text:alphabetical-index-mark-end text:id="IMark225941772"/></text:h>
            </text:list-item>
          </text:list>
        </text:list-item>
      </text:list>
      <text:p text:style-name="P2">Type<text:tab/><text:span text:style-name="T11">Funktion</text:span> : BOOL</text:p>
      <text:p text:style-name="P66"><text:span text:style-name="T16">Input</text:span><text:span text:style-name="T21"><text:tab/>PT : POINTER TO BYTE (Adresse des </text:span><text:span text:style-name="T16">Puffers</text:span><text:span text:style-name="T21">)</text:span></text:p>
      <text:p text:style-name="P183"><text:tab/>SIZE : UINT (Größe des Puffers)</text:p>
      <text:p text:style-name="P173"><draw:frame draw:style-name="fr3" draw:name="Grafik502" text:anchor-type="paragraph" svg:x="1.023cm" svg:y="0.69cm" svg:width="5.42cm" svg:height="2.02cm" draw:z-index="483"><draw:image xlink:href="Pictures/100000000000019A0000009981A9A7D2.png" xlink:type="simple" xlink:show="embed" xlink:actuate="onLoad"/></draw:frame><text:span text:style-name="T21">Output<text:tab/>BOOL (</text:span><text:span text:style-name="T16">Returns</text:span><text:span text:style-name="T21"> TRUE)</text:span></text:p>
      <text:p text:style-name="P173"><text:soft-page-break/><text:span text:style-name="T21"><text:line-break/>Die Funktion _BUFFER</text:span>_<text:span text:style-name="T21">INIT initialisiert ein beliebiges Array </text:span><text:span text:style-name="T16">of</text:span><text:span text:style-name="T21"> Byte mit dem Wert INIT. Beim Aufruf wird der Funktion ein </text:span><text:span text:style-name="T16">Pointer</text:span><text:span text:style-name="T21"> auf das zu initialisierende Array und dessen Größe in Bytes übergeben. Unter CoDeSys lautet der Aufruf: _BUFFER_INIT(ADR(Array), SIZEOF(Array), INIT), wobei Array der Name des zu manipulierenden Arrays ist. ADR ist eine Standardfunktion, die den </text:span><text:span text:style-name="T16">Pointer</text:span><text:span text:style-name="T21"> auf das Array ermittelt und SIZEOF ist eine Standardfunktion, die die Größe des Arrays ermittelt. Die Funktion liefert nur TRUE zurück. Das durch den </text:span><text:span text:style-name="T16">Pointer</text:span><text:span text:style-name="T21"> angegebene Array wird direkt im Speicher manipuliert.</text:span></text:p>
      <text:p text:style-name="P180">Diese Art der Bearbeitung von Arrays ist äußerst effizient, da kein zusätzlicher Speicher benötigt wird und keine Übergabewerte kopiert werden müssen.</text:p>
      <text:p text:style-name="P180">Beispiel:<text:tab/>_BUFFER_INIT(ADR(bigarray), SIZEOF(bigarray),3)</text:p>
      <text:p text:style-name="P183"><text:tab/>initialisiert bigarray mit 3.</text:p>
      <text:list xml:id="list38480811" text:continue-numbering="true" text:style-name="L1">
        <text:list-item>
          <text:list>
            <text:list-item>
              <text:h text:style-name="P221" text:outline-level="2"><text:alphabetical-index-mark-start text:id="IMark225941772"/>_BUFFER_INSERT<text:alphabetical-index-mark-end text:id="IMark225941772"/></text:h>
            </text:list-item>
          </text:list>
        </text:list-item>
      </text:list>
      <text:p text:style-name="P2">Type<text:tab/><text:span text:style-name="T11">Funktion</text:span> : BOOL</text:p>
      <text:p text:style-name="P66"><text:span text:style-name="T16">Input</text:span><text:span text:style-name="T21"><text:tab/>STR : STRING (zu kopierender </text:span><text:span text:style-name="T16">String</text:span><text:span text:style-name="T21">)</text:span></text:p>
      <text:p text:style-name="P173"><text:span text:style-name="T21"><text:tab/>POS : INT (Position ab der der </text:span><text:span text:style-name="T16">String</text:span><text:span text:style-name="T21"> in den Puffer kopiert wird)</text:span></text:p>
      <text:p text:style-name="P173"><text:span text:style-name="T21"><text:tab/>PT : POINTER TO BYTE (Adresse des </text:span><text:span text:style-name="T16">Puffers</text:span><text:span text:style-name="T21">)</text:span></text:p>
      <text:p text:style-name="P183"><text:tab/>SIZE : UINT (Größe des Puffers)</text:p>
      <text:p text:style-name="P173"><draw:frame draw:style-name="fr3" draw:name="Grafik505" text:anchor-type="paragraph" svg:x="1.002cm" svg:y="0.667cm" svg:width="6.77cm" svg:height="2.469cm" draw:z-index="496"><draw:image xlink:href="Pictures/1000000000000200000000BB09A641AF.png" xlink:type="simple" xlink:show="embed" xlink:actuate="onLoad"/></draw:frame><text:span text:style-name="T21">Output<text:tab/>BOOL (</text:span><text:span text:style-name="T16">Returns</text:span><text:span text:style-name="T21"> TRUE)</text:span></text:p>
      <text:p text:style-name="P173"><text:span text:style-name="T21"><text:line-break/>Die Funktion _BUFFER_INSERT kopiert einen </text:span><text:span text:style-name="T16">String</text:span><text:span text:style-name="T21"> in ein beliebiges Array </text:span><text:span text:style-name="T16">of</text:span><text:span text:style-name="T21"> Byte und Verschiebt den Rest des Array um die Länge des </text:span><text:span text:style-name="T16">Strings.</text:span><text:span text:style-name="T21"> Der </text:span><text:span text:style-name="T16">String</text:span><text:span text:style-name="T21"> wird ab einer beliebigen Position POS im Puffer abgelegt. Das erste Element im Array hat die Positionsnummer 0. Beim Aufruf wird der Funkti</text:span><text:span text:style-name="T21">on </text:span><text:soft-page-break/><text:span text:style-name="T21">ein </text:span><text:span text:style-name="T16">Pointer</text:span><text:span text:style-name="T21"> auf das zu bearbeitende Array und dessen Größe in Bytes übergeben. Unter CoDeSys lautet der Aufruf: _BUFFER_INSERT(STR, POS, ADR(Array), SIZEOF(Array)), wobei Array der Name des zu manipulierenden Arrays ist. ADR ist eine Standardfunktion, die den </text:span><text:span text:style-name="T16">Pointer</text:span><text:span text:style-name="T21"> auf das Array ermittelt und SIZEOF ist eine Standardfunktion, die die Größe des Arrays ermittelt. Die Funktion liefert nur TRUE zurück. Das durch den </text:span><text:span text:style-name="T16">Pointer</text:span><text:span text:style-name="T21"> angegebene Array wird direkt im Speicher manipuliert.</text:span></text:p>
      <text:p text:style-name="P180">Diese Art der Bearbeitung von Arrays ist äußerst effizient, da kein zusätzlicher Speicher benötigt wird und keine Übergabewerte kopiert werden müssen.</text:p>
      <text:p text:style-name="P180">Beispiel:<text:tab/>_BUFFER_INSERT(STR, POS, ADR(bigarray), SIZEOF(bigarray))</text:p>
      <text:list xml:id="list38471949" text:continue-numbering="true" text:style-name="L1">
        <text:list-item>
          <text:list>
            <text:list-item>
              <text:h text:style-name="P221" text:outline-level="2"><text:alphabetical-index-mark-start text:id="IMark225941772"/>BUFFER_COMP<text:alphabetical-index-mark-end text:id="IMark225941772"/></text:h>
            </text:list-item>
          </text:list>
        </text:list-item>
      </text:list>
      <text:p text:style-name="P2">Type<text:tab/><text:span text:style-name="T11">Funktion</text:span> : INT</text:p>
      <text:p text:style-name="P66"><text:span text:style-name="T16">Input</text:span><text:span text:style-name="T21"><text:tab/>PT1 : POINTER (Adresse des ersten </text:span><text:span text:style-name="T16">Puffers</text:span><text:span text:style-name="T21">)</text:span></text:p>
      <text:p text:style-name="P183"><text:tab/>SIZE1 : INT (Größe des ersten Puffers)</text:p>
      <text:p text:style-name="P54"><text:span text:style-name="T21"><text:tab/>PT2 : POINTER (Adresse des zweiten </text:span><text:span text:style-name="T16">Puffers</text:span><text:span text:style-name="T21">)</text:span></text:p>
      <text:p text:style-name="P183"><text:tab/>SIZE2 : INT (Größe des zweiten Puffers)</text:p>
      <text:p text:style-name="P183"><text:tab/>START : INT (Suchbeginn ab Start)</text:p>
      <text:p text:style-name="P173"><draw:frame draw:style-name="fr3" draw:name="Grafik741" text:anchor-type="paragraph" svg:x="1.025cm" svg:y="0.676cm" svg:width="4.881cm" svg:height="2.581cm" draw:z-index="788"><draw:image xlink:href="Pictures/1000000000000171000000C3E85896D3.png" xlink:type="simple" xlink:show="embed" xlink:actuate="onLoad"/></draw:frame><text:span text:style-name="T21">Output<text:tab/>INT (</text:span><text:span text:style-name="T19">gefundene Position</text:span><text:span text:style-name="T21">)</text:span></text:p>
      <text:p text:style-name="P183"><text:line-break/>Die Funktion BUFFER_COMP überprüft ob der Inhalt des Arrays PT2 im Array PT1 ab der Position START vorkommt. Wird PT2 in PT1 gefunden, so gibt die Funktion die Position in PT1 beginnend bei 0 an. Wird PT2 nicht in PT1 gefunden, wird -1 zurückgegeben. BUFFER_COMP kann auch zum Vergleich von 2 gleichgroßen Arrays verwendet werden.</text:p>
      <text:p text:style-name="P173"><text:span text:style-name="T21">Beim Aufruf wird der Funktion ein </text:span><text:span text:style-name="T16">Pointer</text:span><text:span text:style-name="T21"> auf das zu bearbeitende Array und dessen Größe in Bytes übergeben. Unter CoDeSys lautet der Aufruf: _STRING_TO_BUFFER(STR, POS, ADR(Array), SIZEOF(Array)), wobei Array der Name des zu manipulierenden Arrays ist. ADR ist eine Standardfunktion, die den </text:span><text:span text:style-name="T16">Pointer</text:span><text:span text:style-name="T21"> auf das Array ermittelt und SIZEOF ist eine Standardfunktion, die die Größe des Arrays ermittelt. Die Funktion liefert nur TRUE </text:span><text:soft-page-break/><text:span text:style-name="T21">zurück. Das durch den </text:span><text:span text:style-name="T16">Pointer</text:span><text:span text:style-name="T21"> angegebene Array wird direkt im Speicher manipuliert. </text:span><text:span text:style-name="T23">Diese Art der Bearbeitung von Arrays ist äußerst effizient, da </text:span><text:span text:style-name="T23">kein zusätzlicher Speicher benötigt wird und keine Übergabewerte kopiert werden müssen.</text:span></text:p>
      <text:p text:style-name="P180">Beispiel:<text:tab/></text:p>
      <text:p text:style-name="P180">BUFFER_COMP(ADR(BUF1), SIZEOF(BUF1), ADR(BUF2), SIZEOF(BUF2))</text:p>
      <text:list xml:id="list38467641" text:continue-numbering="true" text:style-name="L1">
        <text:list-item>
          <text:list>
            <text:list-item>
              <text:h text:style-name="P221" text:outline-level="2"><text:alphabetical-index-mark-start text:id="IMark225941772"/>STRING_TO_BUFFER<text:alphabetical-index-mark-end text:id="IMark225941772"/></text:h>
            </text:list-item>
          </text:list>
        </text:list-item>
      </text:list>
      <text:p text:style-name="P2">Type<text:tab/><text:span text:style-name="T11">Funktion</text:span> : BOOL</text:p>
      <text:p text:style-name="P66"><text:span text:style-name="T16">Input</text:span><text:span text:style-name="T21"><text:tab/>STR : STRING (zu kopierender </text:span><text:span text:style-name="T16">String</text:span><text:span text:style-name="T21">)</text:span></text:p>
      <text:p text:style-name="P173"><text:span text:style-name="T21"><text:tab/>POS : INT (Position ab der der </text:span><text:span text:style-name="T16">String</text:span><text:span text:style-name="T21"> in den Puffer kopiert wird)</text:span></text:p>
      <text:p text:style-name="P173"><text:span text:style-name="T21"><text:tab/>PT : POINTER TO BYTE (Adresse des </text:span><text:span text:style-name="T16">Puffers</text:span><text:span text:style-name="T21">)</text:span></text:p>
      <text:p text:style-name="P183"><text:tab/>SIZE : UINT (Größe des Puffers)</text:p>
      <text:p text:style-name="P173"><draw:frame draw:style-name="fr3" draw:name="Grafik515" text:anchor-type="paragraph" svg:x="1.002cm" svg:y="0.667cm" svg:width="8.119cm" svg:height="2.469cm" draw:z-index="495"><draw:image xlink:href="Pictures/1000000000000266000000BBC92180F7.png" xlink:type="simple" xlink:show="embed" xlink:actuate="onLoad"/></draw:frame><text:span text:style-name="T21">Output<text:tab/>BOOL (</text:span><text:span text:style-name="T16">Returns</text:span><text:span text:style-name="T21"> TRUE)</text:span></text:p>
      <text:p text:style-name="P173"><text:span text:style-name="T21"><text:line-break/>Die Funktion _STRING_TO_BUFFER kopiert einen </text:span><text:span text:style-name="T16">String</text:span><text:span text:style-name="T21"> in ein beliebiges Array </text:span><text:span text:style-name="T16">of</text:span><text:span text:style-name="T21"> Byte</text:span><text:span text:style-name="T16">.</text:span><text:span text:style-name="T21"> Der </text:span><text:span text:style-name="T16">String</text:span><text:span text:style-name="T21"> wird ab einer beliebigen Position POS im Puffer abgelegt. Das erste Element im Array hat die Positionsnummer 0. Beim Aufruf wird der Funktion ein </text:span><text:span text:style-name="T16">Pointer</text:span><text:span text:style-name="T21"> auf das zu bearbeitende Array und dessen Größe in Bytes übergeben. Unter CoDeSys lautet der Aufruf: _STRING_TO_BUFFER(STR, POS, ADR(Array), SIZEOF(Array)), wobei Array der Name des zu manipulierenden Arrays ist. ADR ist eine Standardfunktion, die den </text:span><text:span text:style-name="T16">Pointer</text:span><text:span text:style-name="T21"> auf das Array ermittelt und SIZEOF ist eine Standardfunktion, die die Größe des Arrays ermittelt. Die Funktion liefert nur TRUE zurück. Das durch den </text:span><text:span text:style-name="T16">Pointer</text:span><text:span text:style-name="T21"> angegebene Array wird direkt im Speicher manipuliert.</text:span></text:p>
      <text:p text:style-name="P180">Diese Art der Bearbeitung von Arrays ist äußerst effizient, da kein zusätzlicher Speicher benötigt wird und keine Übergabewerte kopiert werden müssen.</text:p>
      <text:p text:style-name="P180">Beispiel:<text:tab/></text:p>
      <text:p text:style-name="P180">_STRING_TO_BUFFER(STR, POS, ADR(bigarray), SIZEOF(bigarray))</text:p>
      <text:list xml:id="list38459484" text:continue-numbering="true" text:style-name="L1">
        <text:list-item>
          <text:list>
            <text:list-item>
              <text:h text:style-name="P221" text:outline-level="2"><text:soft-page-break/><text:alphabetical-index-mark-start text:id="IMark225941772"/>BUFFER_SEARCH<text:alphabetical-index-mark-end text:id="IMark225941772"/></text:h>
            </text:list-item>
          </text:list>
        </text:list-item>
      </text:list>
      <text:p text:style-name="P2">Type<text:tab/><text:span text:style-name="T11">Funktion</text:span> : INT</text:p>
      <text:p text:style-name="P173"><text:span text:style-name="T16">Input</text:span><text:span text:style-name="T21"><text:tab/>PT : POINTER (Adresse des </text:span><text:span text:style-name="T16">Puffers</text:span><text:span text:style-name="T21">)</text:span></text:p>
      <text:p text:style-name="P183"><text:tab/>SIZE : UINT (Größe des Puffers)</text:p>
      <text:p text:style-name="P183"><text:tab/>STR : STRING (Suchstring)</text:p>
      <text:p text:style-name="P183"><text:tab/>POS : INT (Position ab der gesucht wird)</text:p>
      <text:p text:style-name="P183"><text:tab/>IGN : BYTE (Dieses Zeichen wird beim Suchen ignoriert)</text:p>
      <text:p text:style-name="P183"><draw:frame draw:style-name="fr3" draw:name="Grafik504" text:anchor-type="paragraph" svg:x="1.046cm" svg:y="0.688cm" svg:width="6.77cm" svg:height="2.919cm" draw:z-index="494"><draw:image xlink:href="Pictures/1000000000000200000000DD5C40BB35.png" xlink:type="simple" xlink:show="embed" xlink:actuate="onLoad"/></draw:frame>Output<text:tab/>INT (Position an der die Zeichenkette gefunden wurde)</text:p>
      <text:p text:style-name="P173"><text:span text:style-name="T21"><text:line-break/>Die Funktion BUFFER</text:span>_<text:span text:style-name="T21">SEARCH durchsucht ein beliebiges Array </text:span><text:span text:style-name="T16">of</text:span><text:span text:style-name="T21"> Byte auf den Inhalt einer Zeichenkette und meldet die Position des ersten Zeichens der Zeichenkette im Array wenn eine </text:span><text:span text:style-name="T19">Übereinstimmung</text:span><text:span text:style-name="T21"> gefunden wird. Der </text:span><text:span text:style-name="T16">Puffer </text:span><text:span text:style-name="T21">wird ab einer beliebigen Position POS durchsucht. Das erste Element im Array hat die Positionsnummer 0. Beim Aufruf wird der Funktion ein </text:span><text:span text:style-name="T16">Pointer</text:span><text:span text:style-name="T21"> auf das zu bearbeitende Array und dessen Größe in Bytes übergeben. Unter CoDeSys lautet der Aufruf: BUFFER_SEARCH(ADR(Array), SIZEOF(ARRAY), STR, POS, IGN), wobei ARRAY der Name des Arrays ist. ADR ist eine Standardfunktion, die den </text:span><text:span text:style-name="T16">Pointer</text:span><text:span text:style-name="T21"> auf das Array ermittelt und SIZEOF ist eine Standardfunktion, die die Größe des Arrays ermittelt. Die Funktion liefert die aus dem Puffer kopierte Zeichenkette als STRING zurück. </text:span><text:span text:style-name="T23">Diese Art der Bearbeitung von Arrays ist äußerst effizient, da kein zusätzlicher Speicher benötigt wird und keine Übergabewerte kopiert werden müssen. Die Funktion BUFFER_SEARCH unterstützt Wildcard Zeichen (IGN) enthält die zu suchende Zeichenkette STR ein Zeichen mit dem Code IGN </text:span><text:span text:style-name="T23">so </text:span><text:span text:style-name="T23">wird an dieser Stelle der Zeichenkette jedes beliebige Zeichen im Puffer akzeptiert.</text:span></text:p>
      <text:p text:style-name="P173"><text:span text:style-name="T23">Beispiel: </text:span><text:span text:style-name="T21">BUFFER_SEARCH(ADR(Array), SIZEOF(ARRAY), 'FIND?0', 0, 63)</text:span></text:p>
      <text:p text:style-name="P183">Findet FIND10, FIND20, FIND30 .... im Array, aber findet keine Übereinstimmung bei FIND11, FIND 22 .... Die zu suchende Zeichenkette kann auch mehrere Wildcards enthalten. Ein Wildcard Zeichen entspricht immer exakt einem Zeichen im Puffer.</text:p>
      <text:list xml:id="list38479324" text:continue-numbering="true" text:style-name="L1">
        <text:list-item>
          <text:list>
            <text:list-item>
              <text:h text:style-name="P221" text:outline-level="2"><text:soft-page-break/><text:alphabetical-index-mark-start text:id="IMark225941772"/>BUFFER_TO_STRING<text:alphabetical-index-mark-end text:id="IMark225941772"/></text:h>
            </text:list-item>
          </text:list>
        </text:list-item>
      </text:list>
      <text:p text:style-name="P2">Type<text:tab/><text:span text:style-name="T11">Funktion</text:span> : STRING</text:p>
      <text:p text:style-name="P66"><text:span text:style-name="T16">Input</text:span><text:span text:style-name="T21"><text:tab/>PT : POINTER TO BYTE (Adresse des </text:span><text:span text:style-name="T16">Puffers</text:span><text:span text:style-name="T21">)</text:span></text:p>
      <text:p text:style-name="P183"><text:tab/>SIZE : UINT (Größe des Puffers)</text:p>
      <text:p text:style-name="P173"><text:span text:style-name="T21"><text:tab/>START : UINT (Position ab der der </text:span><text:span text:style-name="T16">String</text:span><text:span text:style-name="T21"> aus dem Puffer </text:span></text:p>
      <text:p text:style-name="P183"><text:tab/>kopiert wird)</text:p>
      <text:p text:style-name="P173"><text:span text:style-name="T21"><text:tab/>STOP : UINT (Ende des </text:span><text:span text:style-name="T16">Strings</text:span><text:span text:style-name="T21"> im Puffer)</text:span></text:p>
      <text:p text:style-name="P183"><draw:frame draw:style-name="fr3" draw:name="Grafik503" text:anchor-type="paragraph" svg:x="1.023cm" svg:y="0.644cm" svg:width="7.669cm" svg:height="2.469cm" draw:z-index="484"><draw:image xlink:href="Pictures/1000000000000244000000BBC792B1F7.png" xlink:type="simple" xlink:show="embed" xlink:actuate="onLoad"/></draw:frame>Output<text:tab/>STRING (Zeichenkette die aus dem Puffer kopiert wurde)</text:p>
      <text:p text:style-name="P173"><text:span text:style-name="T21"><text:line-break/>Die Funktion BUFFER</text:span>_<text:span text:style-name="T21">TO_STRING extrahiert einen </text:span><text:span text:style-name="T16">String</text:span><text:span text:style-name="T21"> aus einem beliebigen Array </text:span><text:span text:style-name="T16">of</text:span><text:span text:style-name="T21"> Byte. Der </text:span><text:span text:style-name="T16">String</text:span><text:span text:style-name="T21"> wird ab einer beliebigen Position START aus dem Puffer kopiert und endet an der Position STOP. Das erste Element im Array hat die Positionsnummer 0. Beim Aufruf wird der Funktion ein </text:span><text:span text:style-name="T16">Pointer</text:span><text:span text:style-name="T21"> auf das zu bearbeitende Array und dessen Größe in Bytes übergeben. Unter CoDeSys lautet der Aufruf: BUFFER</text:span>_<text:span text:style-name="T21">TO_STRING(ADR(Array), SIZEOF(ARRAY), START, STOP), wobei ARRAY der Name des Arrays ist. ADR ist eine Standardfunktion, die den </text:span><text:span text:style-name="T16">Pointer</text:span><text:span text:style-name="T21"> auf das Array ermittelt und SIZEOF ist eine Standardfunktion, die die Größe des Arrays ermittelt. Die Funktion liefert die aus dem Puffer kopierte Zeichenkette als STRING zurück. </text:span><text:span text:style-name="T23">Diese Art der Bearbeitung von Arrays ist äußerst effizient, da kein zusätzlicher Speicher benötigt wird und keine Übergabewerte kopiert werden müssen.<text:line-break/>Beispiel:<text:tab/></text:span><text:span text:style-name="T21">BUFFER</text:span>_<text:span text:style-name="T21">TO_STRING(ADR(Array), SIZEOF(ARRAY), START, STOP)</text:span></text:p>
      <text:list xml:id="list38457526" text:continue-numbering="true" text:style-name="L1">
        <text:list-item>
          <text:h text:style-name="P210" text:outline-level="1">Listen Verarbeitung</text:h>
          <text:list>
            <text:list-item>
              <text:h text:style-name="P216" text:outline-level="2">Einleitung</text:h>
            </text:list-item>
          </text:list>
        </text:list-item>
      </text:list>
      <text:p text:style-name="P154"><text:span text:style-name="T14">Die hier beschriebenen Listen sind als STRING(255) gespeicherte Listen die mit einem Separationszeichen SEP getrennte Elemente enthalten. Die Elemente können alle in </text:span><text:span text:style-name="T15">Strings</text:span><text:span text:style-name="T14"> zulässigen Zeichen enthalten und können auch eine Leere Zeichenkette sein. Da eine Leere Liste nicht von einer Liste mit einer Leeren Zeichekette (Leeres Element) unterscheidbar ist hat eine Liste mindestens immer ein Element, das auch ein Leeres Element sein kann. Die Position der Elemente einer Liste beginnt bei 0 für das erste Element. Die Länge einer Liste ist die Anzahl der Elemente die in der Liste enthalten sind, die Länge ist bei einer Leeren Liste 1 da die Leere Liste per Definition ein Leeres Element enthält. Die Funktionen zur Verarbeitung von Listen benutzen für die Listen IN_OUT Variablen, damit die unter Umständen langen Listen nicht bei jedem Funktionsaufruf erst im Speicher kopiert werden müssen. Das Separationszeichen der Listen kann vom Anwender Frei festgelegt werden und wird den Funktionen mit dem Eingang SEP mitgeteilt. Das Separationszeichen ist immer nur ein einzelnes Zeichen und kann jedes in einem STRING zulässige Zeichen sein.</text:span></text:p>
      <text:p text:style-name="P156">Liste mit einem Leeren Element : <text:tab/><text:tab/>''</text:p>
      <text:p text:style-name="P156">Liste mit 2 Elementen<text:tab/><text:tab/><text:tab/>'1,NIX'</text:p>
      <text:p text:style-name="P156">Liste mit 3 Elementen wovon eines Leer ist<text:tab/>'1,,2' / '1,2,' / ',1,2'</text:p>
      <text:list xml:id="list38453351" text:continue-numbering="true" text:style-name="L1">
        <text:list-item>
          <text:list>
            <text:list-item>
              <text:h text:style-name="P216" text:outline-level="2"><text:alphabetical-index-mark-start text:id="IMark225941772"/>LIST_CLEAN<text:alphabetical-index-mark-end text:id="IMark225941772"/></text:h>
            </text:list-item>
          </text:list>
        </text:list-item>
      </text:list>
      <text:p text:style-name="P69">Type<text:tab/>Funktion : BOOL</text:p>
      <text:p text:style-name="P66"><text:span text:style-name="T15">Input</text:span><text:span text:style-name="T14"><text:tab/>LIST : STRING(255) (Eingangsliste)</text:span></text:p>
      <text:p text:style-name="P179"><text:tab/>SEP : BYTE (Separationszeichen der Liste)</text:p>
      <text:p text:style-name="P173"><draw:frame draw:style-name="fr3" draw:name="Grafik654" text:anchor-type="paragraph" svg:x="1.067cm" svg:y="0.667cm" svg:width="4.48cm" svg:height="1.39cm" draw:z-index="642"><draw:image xlink:href="Pictures/10000000000001530000006949764F03.png" xlink:type="simple" xlink:show="embed" xlink:actuate="onLoad"/></draw:frame>Output<text:span text:style-name="T14"><text:tab/>BOOL (TRUE)</text:span></text:p>
      <text:p text:style-name="P154"><text:soft-page-break/><text:span text:style-name="T14"><text:line-break/>LIST_CLEAN bereinigt eine Liste von leeren Elementen. </text:span><text:span text:style-name="T21">Die Liste besteht aus <text:s/>Zeichenketten die mit dem Separationszeichen SEP getrennt sind.</text:span></text:p>
      <text:p text:style-name="P158">LIST_CLEAN('ABC,23,,NEXT', 44) = 'ABC,23,NEXT'</text:p>
      <text:p text:style-name="P158">LIST_CLEAN(',,23,,NEXT,', 44) = '23,NEXT'</text:p>
      <text:p text:style-name="P158">LIST_CLEAN(',,,,', 44) = ''</text:p>
      <text:list xml:id="list38462220" text:continue-numbering="true" text:style-name="L1">
        <text:list-item>
          <text:list>
            <text:list-item>
              <text:h text:style-name="P216" text:outline-level="2"><text:alphabetical-index-mark-start text:id="IMark225941772"/>LIST_GET<text:alphabetical-index-mark-end text:id="IMark225941772"/></text:h>
            </text:list-item>
          </text:list>
        </text:list-item>
      </text:list>
      <text:p text:style-name="P69">Type<text:tab/>Funktion : STRING</text:p>
      <text:p text:style-name="P66"><text:span text:style-name="T15">Input</text:span><text:span text:style-name="T14"><text:tab/>LIST : STRING(255) (Eingangsliste)</text:span></text:p>
      <text:p text:style-name="P179"><text:tab/>SEP : BYTE (Separationszeichen der Liste)</text:p>
      <text:p text:style-name="P179"><text:tab/>POS : INT (Position des Listenelements)</text:p>
      <text:p text:style-name="P183"><draw:frame draw:style-name="fr3" draw:name="Grafik649" text:anchor-type="paragraph" svg:x="0.981cm" svg:y="0.658cm" svg:width="3.69cm" svg:height="1.79cm" draw:z-index="639"><draw:image xlink:href="Pictures/100000000000011700000087B810844A.png" xlink:type="simple" xlink:show="embed" xlink:actuate="onLoad"/></draw:frame>Output<text:tab/>STRING (Ausgangsstring)</text:p>
      <text:p text:style-name="P183"><text:line-break/>LIST_GET lieferte das Element an der Stelle POS aus einer Liste. Die Liste besteht aus <text:s/>Zeichenketten die mit dem Separationszeichen SEP getrennt sind. Das erste Element der Liste hat die Position 0.</text:p>
      <text:p text:style-name="P183">Beispiel:</text:p>
      <text:p text:style-name="P183">LIST_GET('ABC,23,,NEXT', 44, 0) = 'ABC'</text:p>
      <text:p text:style-name="P183">LIST_GET('ABC,23,,NEXT', 44, 1) = '23'</text:p>
      <text:p text:style-name="P183">LIST_GET('ABC,23,,NEXT', 44, 2) = ''</text:p>
      <text:p text:style-name="P183">LIST_GET('ABC,23,,NEXT', 44, 3) = 'NEXT'</text:p>
      <text:p text:style-name="P38">LIST_GET('ABC,23,,NEXT', 44, 4) = ''</text:p>
      <text:p text:style-name="P183"/>
      <text:list xml:id="list38477715" text:continue-numbering="true" text:style-name="L1">
        <text:list-item>
          <text:list>
            <text:list-item>
              <text:h text:style-name="P216" text:outline-level="2"><text:soft-page-break/><text:alphabetical-index-mark-start text:id="IMark225941772"/>LIST_INSERT<text:alphabetical-index-mark-end text:id="IMark225941772"/></text:h>
            </text:list-item>
          </text:list>
        </text:list-item>
      </text:list>
      <text:p text:style-name="P69">Type<text:tab/>Funktion : BOOL</text:p>
      <text:p text:style-name="P66"><text:span text:style-name="T15">Input</text:span><text:span text:style-name="T14"><text:tab/>LIST : STRING(255) (Eingangsliste)</text:span></text:p>
      <text:p text:style-name="P179"><text:tab/>SEP : BYTE (Separationszeichen der Liste)</text:p>
      <text:p text:style-name="P179"><text:tab/>POS : INT (Position des Listenelements)</text:p>
      <text:p text:style-name="P179"><text:tab/>INS : STRING (Neues Element)</text:p>
      <text:p text:style-name="P183"><draw:frame draw:style-name="fr3" draw:name="Grafik655" text:anchor-type="paragraph" svg:x="1.046cm" svg:y="0.688cm" svg:width="4.881cm" svg:height="2.18cm" draw:z-index="643"><draw:image xlink:href="Pictures/1000000000000171000000A5E6453695.png" xlink:type="simple" xlink:show="embed" xlink:actuate="onLoad"/></draw:frame>Output<text:tab/>BOOL (TRUE)</text:p>
      <text:p text:style-name="P183"><text:line-break/>LIST_INSERT setzt ein Element an der Stelle POS in eine Liste ein. Die Liste besteht aus <text:s/>Zeichenketten die mit dem Separationszeichen SEP getrennt sind. Das erste Element der Liste hat die Position 0. Wird eine Position größer als das letzte Element der Liste angegeben wird INS an das Ende der Liste gehängt. Ist POS = 0 wird das neue Element an den Anfang der Liste gestellt.</text:p>
      <text:p text:style-name="P183">Beispiel:</text:p>
      <text:p text:style-name="P183">LIST_INSERT('ABC,23,,NEXT', 44, 0,'NEW') = 'NEW,ABC,23,,NEXT'</text:p>
      <text:p text:style-name="P183">LIST_INSERT('ABC,23,,NEXT', 44, 3,'NEW') = 'ABC,23,NEW,,NEXT'</text:p>
      <text:p text:style-name="P183">LIST_INSERT('ABC,23,,NEXT', 44, 255,'NEW') = 'ABC,23,,NEXT,NEW'</text:p>
      <text:list xml:id="list38457500" text:continue-numbering="true" text:style-name="L1">
        <text:list-item>
          <text:list>
            <text:list-item>
              <text:h text:style-name="P216" text:outline-level="2"><text:alphabetical-index-mark-start text:id="IMark225941772"/>LIST_LEN<text:alphabetical-index-mark-end text:id="IMark225941772"/></text:h>
            </text:list-item>
          </text:list>
        </text:list-item>
      </text:list>
      <text:p text:style-name="P69">Type<text:tab/>Funktion : INT</text:p>
      <text:p text:style-name="P173"><text:span text:style-name="T15">Input</text:span><text:span text:style-name="T14"><text:tab/>LIST : STRING(255) (Eingangsliste)</text:span></text:p>
      <text:p text:style-name="P179"><text:tab/>SEP : BYTE (Separationszeichen der Liste)</text:p>
      <text:p text:style-name="P183"><draw:frame draw:style-name="fr3" draw:name="Grafik651" text:anchor-type="paragraph" svg:x="1.025cm" svg:y="0.688cm" svg:width="3.69cm" svg:height="1.39cm" draw:z-index="640"><draw:image xlink:href="Pictures/100000000000011700000069A5FBA963.png" xlink:type="simple" xlink:show="embed" xlink:actuate="onLoad"/></draw:frame>Output<text:tab/>INT (Anzahl der Elemente in der Liste)</text:p>
      <text:p text:style-name="P183">LIST_LEN ermittelt die Anzahl der Elemente einer Liste.</text:p>
      <text:p text:style-name="P183">LIST_LEN('0,1,2,3',44) = 4<text:tab/>LIST_LEN('',44) = 0</text:p>
      <text:list xml:id="list38457057" text:continue-numbering="true" text:style-name="L1">
        <text:list-item>
          <text:list>
            <text:list-item>
              <text:h text:style-name="P216" text:outline-level="2"><text:soft-page-break/><text:alphabetical-index-mark-start text:id="IMark225941772"/>LIST_NEXT<text:alphabetical-index-mark-end text:id="IMark225941772"/></text:h>
            </text:list-item>
          </text:list>
        </text:list-item>
      </text:list>
      <text:p text:style-name="P69">Type<text:tab/>Funktion : STRING</text:p>
      <text:p text:style-name="P173"><text:span text:style-name="T15">Input</text:span><text:span text:style-name="T14"><text:tab/>LIST : STRING (Eingangsliste)</text:span></text:p>
      <text:p text:style-name="P179"><text:tab/>SEP : BYTE (Separationszeichen der Liste)</text:p>
      <text:p text:style-name="P179"><text:tab/>RST : BOOL (Asynchroner Reset)</text:p>
      <text:p text:style-name="P183">Output<text:tab/>LEL : STRING (Listenelement)</text:p>
      <text:p text:style-name="P183"><draw:frame draw:style-name="fr3" draw:name="Grafik652" text:anchor-type="paragraph" svg:x="1.002cm" svg:y="0.681cm" svg:width="3.29cm" svg:height="1.921cm" draw:z-index="641"><draw:image xlink:href="Pictures/10000000000000F900000091A70FA754.png" xlink:type="simple" xlink:show="embed" xlink:actuate="onLoad"/></draw:frame><text:tab/>NUL : BOOL (TRUE wenn Liste abgearbeitet oder Leer ist)</text:p>
      <text:p text:style-name="P183"><text:line-break/>LIST_NEXT liefert jeweils das nächste Element aus einer Liste. Die Liste ist ein STRING dessen Elemente mit den Zeichen SEP getrennt sind. <text:s/>Das erste Element der Liste hat die Position 0. Nach dem ersten Aufruf von LIST_NEXT oder einem Reset wird am Ausgang LEL das erste Element der Liste ausgegeben. Bei jedem weiteren Aufruf liefert der Baustein das nächste Element der Liste. Wenn das Ende der Liste erreicht ist wird eine Leere Zeichenkette Ausgegeben und der Ausgang NUL = TRUE gesetzt.</text:p>
      <text:p text:style-name="P183">Beispiel für die Anwendung:</text:p>
      <text:p text:style-name="P191">FUNCTION_BLOCK testll</text:p>
      <text:p text:style-name="P191">VAR_INPUT</text:p>
      <text:p text:style-name="P52"><text:tab/>s1 : STRING(255);</text:p>
      <text:p text:style-name="P191">END_VAR</text:p>
      <text:p text:style-name="P191">VAR</text:p>
      <text:p text:style-name="P52"><text:tab/>element : ARRAY[0..20] OF STRING(STRING_LENGTH;</text:p>
      <text:p text:style-name="P52"><text:tab/>list_n : LIST_NEXT;</text:p>
      <text:p text:style-name="P52"><text:tab/>pos : INT;</text:p>
      <text:p text:style-name="P191">END_VAR</text:p>
      <text:p text:style-name="P191"/>
      <text:p text:style-name="P191">pos := 0;</text:p>
      <text:p text:style-name="P191">list_n(LIST := s1, SEP := 44);</text:p>
      <text:p text:style-name="P191">WHILE NOT list_n.NUL and pos &lt;= 20 DO</text:p>
      <text:p text:style-name="P52"><text:tab/>element[pos] := list_n.LEL;</text:p>
      <text:p text:style-name="P52"><text:tab/>list_n(list := s1);</text:p>
      <text:p text:style-name="P52"><text:tab/>pos := pos + 1;</text:p>
      <text:p text:style-name="P160">END_WHILE<text:span text:style-name="T14">;</text:span></text:p>
      <text:list xml:id="list38474108" text:continue-list="list38452379" text:style-name="Outline">
        <text:list-item>
          <text:list>
            <text:list-item>
              <text:h text:style-name="P215" text:outline-level="2"><text:soft-page-break/><text:alphabetical-index-mark-start text:id="IMark225941772"/>LIST_RETRIEVE<text:alphabetical-index-mark-end text:id="IMark225941772"/></text:h>
            </text:list-item>
          </text:list>
        </text:list-item>
      </text:list>
      <text:p text:style-name="P69">Type<text:tab/>Funktion : STRING</text:p>
      <text:p text:style-name="P66"><text:span text:style-name="T15">Input</text:span><text:span text:style-name="T14"><text:tab/>LIST : STRING(255) (Eingangsliste)</text:span></text:p>
      <text:p text:style-name="P179"><text:tab/>SEP : BYTE (Separationszeichen der Liste)</text:p>
      <text:p text:style-name="P179"><text:tab/>POS : INT (Position des Listenelements)</text:p>
      <text:p text:style-name="P183"><draw:frame draw:style-name="fr3" draw:name="Grafik720" text:anchor-type="paragraph" svg:x="1.046cm" svg:y="0.667cm" svg:width="5.669cm" svg:height="1.79cm" draw:z-index="736"><draw:image xlink:href="Pictures/10000000000001AD00000087D131B291.png" xlink:type="simple" xlink:show="embed" xlink:actuate="onLoad"/></draw:frame>Output<text:tab/>STRING (Ausgangsstring)</text:p>
      <text:p text:style-name="P154"><text:span text:style-name="T14"><text:line-break/>LIS</text:span>T_RETRIEVE lieferte das Element an der Stelle POS aus einer Liste und löscht das entsprechende Element in der Liste. Die Liste besteht aus <text:s/>Zeichenketten die mit dem Separationszeichen SEP getrennt sind. Das erste Element der Liste hat die Position 0.</text:p>
      <text:p text:style-name="P154"><text:span text:style-name="T14">Beisp</text:span>iel:</text:p>
      <text:p text:style-name="P154">LIST_RETRIEVE('ABC,23,,NEXT', 44, 0) = 'ABC'<text:tab/>LIST = '23,,NEXT'</text:p>
      <text:p text:style-name="P154">LIST_RETRIEVE('ABC,23,,NEXT', 44, 1) = '23'<text:tab/>LIST = 'ABC,,NEXT'</text:p>
      <text:p text:style-name="P154">LIST_RETRIEVE('ABC,23,,NEXT', 44, 2) = ''<text:tab/><text:tab/>LIST = 'ABC,23,NEXT'</text:p>
      <text:p text:style-name="P154">LIST_RETRIEVE('ABC,23,,NEXT', 44, 3) = 'NEXT'<text:tab/>LIST = 'ABC,23,'</text:p>
      <text:p text:style-name="P154">LIST_RETRIEVE<text:span text:style-name="T14">('ABC,23,,NEXT', 44, 4) = ''<text:tab/>LIST = 'ABC,23,,NEXT'</text:span></text:p>
      <text:list xml:id="list38469190" text:continue-list="list38457057" text:style-name="L1">
        <text:list-item>
          <text:list>
            <text:list-item>
              <text:h text:style-name="P223" text:outline-level="2"><text:alphabetical-index-mark-start text:id="IMark225941772"/>LIST_RETRIEVE_MAX<text:alphabetical-index-mark-end text:id="IMark225941772"/></text:h>
            </text:list-item>
          </text:list>
        </text:list-item>
      </text:list>
      <text:p text:style-name="P69">Type<text:tab/>Funktion : STRING</text:p>
      <text:p text:style-name="P66"><text:span text:style-name="T15">Input</text:span><text:span text:style-name="T14"><text:tab/>LIST : STRING(255) (Eingangsliste)</text:span></text:p>
      <text:p text:style-name="P179"><text:tab/>SEP : BYTE (Separationszeichen der Liste)</text:p>
      <text:p text:style-name="P179"><text:tab/>POS : INT (Position des Listenelements)</text:p>
      <text:p text:style-name="P183"><draw:frame draw:style-name="fr3" draw:name="Grafik653" text:anchor-type="paragraph" svg:x="1.046cm" svg:y="0.667cm" svg:width="5.669cm" svg:height="1.79cm" draw:z-index="737"><draw:image xlink:href="Pictures/10000000000001AD00000087D131B291.png" xlink:type="simple" xlink:show="embed" xlink:actuate="onLoad"/></draw:frame>Output<text:tab/>STRING (Ausgangsstring)</text:p>
      <text:p text:style-name="P183"><text:line-break/>LIST_RETRIEVE lieferte das Element an der Stelle POS aus einer Liste und <text:soft-page-break/>löscht das entsprechende Element in der Liste. Die Liste besteht aus <text:s/>Zeichenketten die mit dem Separationszeichen SEP getrennt sind. Das erste Element der Liste hat die Position 0.</text:p>
      <text:p text:style-name="P183">Beispiel:</text:p>
      <text:p text:style-name="P183">LIST_RETRIEVE('ABC,23,,NEXT', 44, 0) = 'ABC'<text:tab/>LIST = '23,,NEXT'</text:p>
      <text:p text:style-name="P183">LIST_RETRIEVE('ABC,23,,NEXT', 44, 1) = '23'<text:tab/>LIST = 'ABC,,NEXT'</text:p>
      <text:p text:style-name="P183">LIST_RETRIEVE('ABC,23,,NEXT', 44, 2) = ''<text:tab/><text:tab/>LIST = 'ABC,23,NEXT'</text:p>
      <text:p text:style-name="P183">LIST_RETRIEVE('ABC,23,,NEXT', 44, 3) = 'NEXT'<text:tab/>LIST = 'ABC,23,'</text:p>
      <text:p text:style-name="P154"><text:span text:style-name="T22">LIST_RETRIEVE</text:span><text:span text:style-name="T14">('ABC,23,,NEXT', 44, 4) = ''<text:tab/><text:tab/>LIST = 'ABC,23,,NEXT'</text:span></text:p>
      <text:list xml:id="list38475052" text:continue-numbering="true" text:style-name="L1">
        <text:list-item>
          <text:list>
            <text:list-item>
              <text:h text:style-name="P216" text:outline-level="2"><text:alphabetical-index-mark-start text:id="IMark225941772"/>LIST_RETRIEVE_MIN<text:alphabetical-index-mark-end text:id="IMark225941772"/></text:h>
            </text:list-item>
          </text:list>
        </text:list-item>
      </text:list>
      <text:p text:style-name="P69">Type<text:tab/>Funktion : STRING</text:p>
      <text:p text:style-name="P66"><text:span text:style-name="T15">Input</text:span><text:span text:style-name="T14"><text:tab/>LIST : STRING(255) (Eingangsliste)</text:span></text:p>
      <text:p text:style-name="P179"><text:tab/>SEP : BYTE (Separationszeichen der Liste)</text:p>
      <text:p text:style-name="P183"><draw:frame draw:style-name="fr3" draw:name="Grafik718" text:anchor-type="paragraph" svg:x="1.046cm" svg:y="0.667cm" svg:width="6.87cm" svg:height="1.39cm" draw:z-index="738"><draw:image xlink:href="Pictures/100000000000020700000069BC2A6268.png" xlink:type="simple" xlink:show="embed" xlink:actuate="onLoad"/></draw:frame>Output<text:tab/>STRING (Ausgangsstring)</text:p>
      <text:p text:style-name="P183"><text:line-break/>LIST_RETRIEVE_MIN lieferte das kürzeste Element aus einer Liste und löscht das entsprechende Element in der Liste. Die Liste besteht aus <text:s/>Zeichenketten die mit dem Separationszeichen SEP getrennt sind. Sind mehrere gleichlange Elemente in der Liste wird das Element geliefert das weiter vorne in der Zeichenkette steht.</text:p>
      <text:p text:style-name="P183"/>
      <text:p text:style-name="P183"/>
      <text:p text:style-name="P183"/>
      <text:p text:style-name="P183"/>
      <text:list xml:id="list38471897" text:continue-numbering="true" text:style-name="L1">
        <text:list-item>
          <text:list>
            <text:list-item>
              <text:h text:style-name="P216" text:outline-level="2"><text:soft-page-break/><text:alphabetical-index-mark-start text:id="IMark225941772"/>LIST_SORT_L<text:alphabetical-index-mark-end text:id="IMark225941772"/></text:h>
            </text:list-item>
          </text:list>
        </text:list-item>
      </text:list>
      <text:p text:style-name="P69">Type<text:tab/>Funktion : STRING(255)</text:p>
      <text:p text:style-name="P66"><text:span text:style-name="T15">Input</text:span><text:span text:style-name="T14"><text:tab/>LIST : STRING(255) (Eingangsliste)</text:span></text:p>
      <text:p text:style-name="P179"><text:tab/>SEP : BYTE (Separationszeichen der Liste)</text:p>
      <text:p text:style-name="P183"><draw:frame draw:style-name="fr3" draw:name="Grafik719" text:anchor-type="paragraph" svg:x="1.046cm" svg:y="0.669cm" svg:width="4.881cm" svg:height="1.39cm" draw:z-index="739"><draw:image xlink:href="Pictures/1000000000000171000000692A78CAA3.png" xlink:type="simple" xlink:show="embed" xlink:actuate="onLoad"/></draw:frame>Output<text:tab/>STRING (Ausgangsstring)</text:p>
      <text:p text:style-name="P73"><text:line-break/>LIST_SORT_L liefert am Ausgang die Liste LIST sortiert zurück. Die Liste LIST wird dabei geleert, wird die LIST weiterhin im original benötigt, so muss sie vor dem Aufruf einer temporären Variable zugewiesen werden. Soll die Liste LIST direkt sortiert werden, so kann das Ergebnis wieder LIST zugeordnet werden (LIST := LIST_SORT_L(SEP, LIST). Die Liste besteht aus <text:s/>Zeichenketten die mit dem Separationszeichen SEP getrennt sind.</text:p>
      <text:alphabetical-index text:style-name="Sect2" text:protected="true" text:name="Stichwortverzeichnis1">
        <text:alphabetical-index-source text:sort-algorithm="alphanumeric" fo:language="de" fo:country="DE">
          <text:index-title-template text:style-name="Index_20_Heading">Verzeichnis der Funktionsbausteine</text:index-title-template>
          <text:alphabetical-index-entry-template text:outline-level="separator" text:style-name="Index_20_Separator">
            <text:index-entry-text/>
            <text:index-entry-tab-stop style:type="right" style:leader-char="."/>
            <text:index-entry-page-number/>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3" text:name="Stichwortverzeichnis1_Head">
            <text:p text:style-name="Index_20_Heading">Verzeichnis der Funktionsbausteine</text:p>
          </text:index-title>
          <text:p text:style-name="P227">A_TRIG<text:tab/>195</text:p>
          <text:p text:style-name="P227">ACOSH<text:tab/>42</text:p>
          <text:p text:style-name="P227">ACOTH<text:tab/>42</text:p>
          <text:p text:style-name="P227">ACTUATOR_2P<text:tab/>387</text:p>
          <text:p text:style-name="P227">ACTUATOR_3P<text:tab/>388</text:p>
          <text:p text:style-name="P227">ACTUATOR_A<text:tab/>390</text:p>
          <text:p text:style-name="P227">ACTUATOR_COIL<text:tab/>391</text:p>
          <text:p text:style-name="P227">ACTUATOR_PUMP<text:tab/>392</text:p>
          <text:p text:style-name="P227">ACTUATOR_UD<text:tab/>393</text:p>
          <text:p text:style-name="P227">AGDF<text:tab/>43</text:p>
          <text:p text:style-name="P227">AIN<text:tab/>273</text:p>
          <text:p text:style-name="P227">AIN1<text:tab/>274</text:p>
          <text:p text:style-name="P227">AIR_DENSITY<text:tab/>397</text:p>
          <text:p text:style-name="P227">AIR_ENTHALPY<text:tab/>397</text:p>
          <text:p text:style-name="P227">ALARM_2<text:tab/>319</text:p>
          <text:p text:style-name="P227">AOUT<text:tab/>276</text:p>
          <text:p text:style-name="P227">AOUT1<text:tab/>277</text:p>
          <text:p text:style-name="P227">ARRAY_AVG<text:tab/>80</text:p>
          <text:p text:style-name="P227">ARRAY_GAV<text:tab/>80</text:p>
          <text:p text:style-name="P227">ARRAY_HAV<text:tab/>81</text:p>
          <text:p text:style-name="P227">ARRAY_MAX<text:tab/>82</text:p>
          <text:p text:style-name="P227">ARRAY_MIN<text:tab/>82</text:p>
          <text:p text:style-name="P227">ARRAY_SDV<text:tab/>83</text:p>
          <text:p text:style-name="P227">ARRAY_SPR<text:tab/>84</text:p>
          <text:p text:style-name="P227">ARRAY_SUM<text:tab/>84</text:p>
          <text:p text:style-name="P227">ARRAY_TREND<text:tab/>85</text:p>
          <text:p text:style-name="P227">ARRAY_VAR<text:tab/>86</text:p>
          <text:p text:style-name="P227">ASINH<text:tab/>43</text:p>
          <text:p text:style-name="P227">ASTRO<text:tab/>336</text:p>
          <text:p text:style-name="P227">ATAN2<text:tab/>43</text:p>
          <text:p text:style-name="P227">ATANH<text:tab/>44</text:p>
          <text:p text:style-name="P227">AUTORUN<text:tab/>394</text:p>
          <text:p text:style-name="P227">B_TRIG<text:tab/>195</text:p>
          <text:p text:style-name="P227">BAND_B<text:tab/>348</text:p>
          <text:p text:style-name="P227">BAR_GRAPH<text:tab/>320</text:p>
          <text:p text:style-name="P227">BCDC_TO_INT<text:tab/>218</text:p>
          <text:p text:style-name="P227">BETA<text:tab/>44</text:p>
          <text:p text:style-name="P227">BFT_TO_MS<text:tab/>337</text:p>
          <text:p text:style-name="P227">BIN_TO_BYTE<text:tab/>149</text:p>
          <text:p text:style-name="P227">BIN_TO_DWORD<text:tab/>149</text:p>
          <text:p text:style-name="P227">BINOM<text:tab/>45</text:p>
          <text:p text:style-name="P227">BIT_COUNT<text:tab/>218</text:p>
          <text:p text:style-name="P227">BIT_LOAD_B<text:tab/>219</text:p>
          <text:p text:style-name="P227">BIT_LOAD_B2<text:tab/>219</text:p>
          <text:p text:style-name="P227">BIT_LOAD_DW<text:tab/>220</text:p>
          <text:p text:style-name="P227">BIT_LOAD_DW2<text:tab/>220</text:p>
          <text:p text:style-name="P227">BIT_LOAD_W<text:tab/>221</text:p>
          <text:p text:style-name="P227">BIT_LOAD_W2<text:tab/>221</text:p>
          <text:p text:style-name="P227">BIT_OF_DWORD<text:tab/>222</text:p>
          <text:p text:style-name="P227">BIT_TOGGLE_B<text:tab/>222</text:p>
          <text:p text:style-name="P227">BIT_TOGGLE_DW<text:tab/>223</text:p>
          <text:p text:style-name="P227">BIT_TOGGLE_W<text:tab/>223</text:p>
          <text:p text:style-name="P227">BLIND_ACTUATOR<text:tab/>445</text:p>
          <text:p text:style-name="P227">BLIND_CONTROL<text:tab/>447</text:p>
          <text:p text:style-name="P227">BLIND_INPUT<text:tab/>449</text:p>
          <text:p text:style-name="P227">BLIND_NIGHT<text:tab/>453</text:p>
          <text:p text:style-name="P227">BLIND_SCENE<text:tab/>455</text:p>
          <text:p text:style-name="P227">BLIND_SECURITY<text:tab/>457</text:p>
          <text:p text:style-name="P227">BLIND_SHADE<text:tab/>460</text:p>
          <text:p text:style-name="P227">BOILER<text:tab/>398</text:p>
          <text:p text:style-name="P227">BUFFER_COMP<text:tab/>501</text:p>
          <text:p text:style-name="P227">BUFFER_SEARCH<text:tab/>503</text:p>
          <text:p text:style-name="P227">BUFFER_TO_STRING<text:tab/>504</text:p>
          <text:p text:style-name="P227">BURNER<text:tab/>400</text:p>
          <text:p text:style-name="P227">BYTE_OF_BIT<text:tab/>224</text:p>
          <text:p text:style-name="P227">BYTE_OF_DWORD<text:tab/>224</text:p>
          <text:p text:style-name="P227">BYTE_TO_BIT<text:tab/>225</text:p>
          <text:p text:style-name="P227">BYTE_TO_RANGE<text:tab/>278</text:p>
          <text:p text:style-name="P227">BYTE_TO_STRB<text:tab/>150</text:p>
          <text:p text:style-name="P227">BYTE_TO_STRH<text:tab/>150</text:p>
          <text:p text:style-name="P227">C_TO_F<text:tab/>337</text:p>
          <text:p text:style-name="P227">C_TO_K<text:tab/>337</text:p>
          <text:p text:style-name="P227">CABS<text:tab/>88</text:p>
          <text:p text:style-name="P227">CACOS<text:tab/>89</text:p>
          <text:p text:style-name="P227">CACOSH<text:tab/>89</text:p>
          <text:p text:style-name="P227">CADD<text:tab/>89</text:p>
          <text:p text:style-name="P227">CALENDAR<text:tab/>28</text:p>
          <text:p text:style-name="P227">CALENDAR_CALC<text:tab/>121</text:p>
          <text:p text:style-name="P227">CALIBRATE<text:tab/>322</text:p>
          <text:p text:style-name="P227">CAPITALIZE<text:tab/>151</text:p>
          <text:p text:style-name="P227">CARG<text:tab/>90</text:p>
          <text:p text:style-name="P227">CASIN<text:tab/>90</text:p>
          <text:p text:style-name="P227">CASINH<text:tab/>91</text:p>
          <text:p text:style-name="P227">CATAN<text:tab/>91</text:p>
          <text:p text:style-name="P227">CATANH<text:tab/>91</text:p>
          <text:p text:style-name="P227">CAUCHY<text:tab/>45</text:p>
          <text:p text:style-name="P227">CAUCHYCD<text:tab/>46</text:p>
          <text:p text:style-name="P227">CCON<text:tab/>92</text:p>
          <text:p text:style-name="P227">CCOS<text:tab/>92</text:p>
          <text:p text:style-name="P227">CCOSH<text:tab/>93</text:p>
          <text:p text:style-name="P227">CDIV<text:tab/>93</text:p>
          <text:p text:style-name="P227">CEIL<text:tab/>46</text:p>
          <text:p text:style-name="P227">CEIL2<text:tab/>47</text:p>
          <text:p text:style-name="P227">CEXP<text:tab/>93</text:p>
          <text:p text:style-name="P227">CHARCODE<text:tab/>151</text:p>
          <text:p text:style-name="P227">CHARNAME<text:tab/>152</text:p>
          <text:p text:style-name="P227">CHECK_PARITY<text:tab/>225</text:p>
          <text:p text:style-name="P227">CHR_TO_STRING<text:tab/>153</text:p>
          <text:p text:style-name="P227">CINV<text:tab/>94</text:p>
          <text:p text:style-name="P227">CIRCLE_A<text:tab/>110</text:p>
          <text:p text:style-name="P227">CIRCLE_C<text:tab/>110</text:p>
          <text:p text:style-name="P227">CLEAN<text:tab/>153</text:p>
          <text:p text:style-name="P227">CLICK<text:tab/>420</text:p>
          <text:p text:style-name="P227">CLICK_CNT<text:tab/>196</text:p>
          <text:p text:style-name="P227"><text:soft-page-break/>CLICK_DEC<text:tab/>197</text:p>
          <text:p text:style-name="P227">CLICK_MODE<text:tab/>422</text:p>
          <text:p text:style-name="P227">CLK_DIV<text:tab/>198</text:p>
          <text:p text:style-name="P227">CLK_N<text:tab/>199</text:p>
          <text:p text:style-name="P227">CLK_PRG<text:tab/>200</text:p>
          <text:p text:style-name="P227">CLK_PULSE<text:tab/>200</text:p>
          <text:p text:style-name="P227">CLOG<text:tab/>94</text:p>
          <text:p text:style-name="P227">CMP<text:tab/>47</text:p>
          <text:p text:style-name="P227">CMUL<text:tab/>94</text:p>
          <text:p text:style-name="P227">CODE<text:tab/>154</text:p>
          <text:p text:style-name="P227">COMPLEX<text:tab/>29</text:p>
          <text:p text:style-name="P227">CONE_V<text:tab/>111</text:p>
          <text:p text:style-name="P227">CONSTANTS_LANGUAGE<text:tab/>29</text:p>
          <text:p text:style-name="P227">CONSTANTS_LOCATION<text:tab/>30</text:p>
          <text:p text:style-name="P227">CONSTANTS_MATH<text:tab/>30</text:p>
          <text:p text:style-name="P227">CONSTANTS_PHYS<text:tab/>31</text:p>
          <text:p text:style-name="P227">CONSTANTS_SETUP<text:tab/>31</text:p>
          <text:p text:style-name="P227">CONTROL_SET1<text:tab/>349</text:p>
          <text:p text:style-name="P227">CONTROL_SET2<text:tab/>350</text:p>
          <text:p text:style-name="P227">COSH<text:tab/>48</text:p>
          <text:p text:style-name="P227">COTH<text:tab/>48</text:p>
          <text:p text:style-name="P227">COUNT_BR<text:tab/>243</text:p>
          <text:p text:style-name="P227">COUNT_CHAR<text:tab/>154</text:p>
          <text:p text:style-name="P227">COUNT_DR<text:tab/>244</text:p>
          <text:p text:style-name="P227">CPOL<text:tab/>95</text:p>
          <text:p text:style-name="P227">CPOW<text:tab/>95</text:p>
          <text:p text:style-name="P227">CRC_CHECK<text:tab/>226</text:p>
          <text:p text:style-name="P227">CRC_GEN<text:tab/>227</text:p>
          <text:p text:style-name="P227">CSET<text:tab/>96</text:p>
          <text:p text:style-name="P227">CSIN<text:tab/>96</text:p>
          <text:p text:style-name="P227">CSINH<text:tab/>96</text:p>
          <text:p text:style-name="P227">CSQRT<text:tab/>97</text:p>
          <text:p text:style-name="P227">CSUB<text:tab/>97</text:p>
          <text:p text:style-name="P227">CTAN<text:tab/>97</text:p>
          <text:p text:style-name="P227">CTANH<text:tab/>98</text:p>
          <text:p text:style-name="P227">CTRL_IN<text:tab/>352</text:p>
          <text:p text:style-name="P227">CTRL_OUT<text:tab/>352</text:p>
          <text:p text:style-name="P227">CTRL_PI<text:tab/>353</text:p>
          <text:p text:style-name="P227">CTRL_PID<text:tab/>355</text:p>
          <text:p text:style-name="P227">CTRL_PWM<text:tab/>358</text:p>
          <text:p text:style-name="P227">CYCLE_4<text:tab/>202</text:p>
          <text:p text:style-name="P227">CYCLE_TIME<text:tab/>323</text:p>
          <text:p text:style-name="P227">D_TRIG<text:tab/>202</text:p>
          <text:p text:style-name="P227">D_TRUNC<text:tab/>49</text:p>
          <text:p text:style-name="P227">DATE_ADD<text:tab/>122</text:p>
          <text:p text:style-name="P227">DAY_OF_DATE<text:tab/>122</text:p>
          <text:p text:style-name="P227">DAY_OF_MONTH<text:tab/>123</text:p>
          <text:p text:style-name="P227">DAY_OF_WEEK<text:tab/>123</text:p>
          <text:p text:style-name="P227">DAY_OF_YEAR<text:tab/>124</text:p>
          <text:p text:style-name="P227">DAY_TO_TIME<text:tab/>124</text:p>
          <text:p text:style-name="P227">DAYS_DELTA<text:tab/>125</text:p>
          <text:p text:style-name="P227">DCF77<text:tab/>125</text:p>
          <text:p text:style-name="P227">DEAD_BAND<text:tab/>359</text:p>
          <text:p text:style-name="P227">DEAD_BAND_A<text:tab/>360</text:p>
          <text:p text:style-name="P227">DEAD_ZONE<text:tab/>361</text:p>
          <text:p text:style-name="P227">DEAD_ZONE2<text:tab/>361</text:p>
          <text:p text:style-name="P227">DEBOUNCE<text:tab/>422</text:p>
          <text:p text:style-name="P227">DEC_2<text:tab/>230</text:p>
          <text:p text:style-name="P227">DEC_4<text:tab/>230</text:p>
          <text:p text:style-name="P227">DEC_8<text:tab/>231</text:p>
          <text:p text:style-name="P227">DEC_TO_BYTE<text:tab/>155</text:p>
          <text:p text:style-name="P227">DEC_TO_DWORD<text:tab/>155</text:p>
          <text:p text:style-name="P227">DEC_TO_INT<text:tab/>156</text:p>
          <text:p text:style-name="P227">DEC1<text:tab/>49</text:p>
          <text:p text:style-name="P227">DEG<text:tab/>50</text:p>
          <text:p text:style-name="P227">DEG_TO_DIR<text:tab/>338</text:p>
          <text:p text:style-name="P227">DEL_CHARS<text:tab/>156</text:p>
          <text:p text:style-name="P227">DELAY<text:tab/>278</text:p>
          <text:p text:style-name="P227">DELAY_4<text:tab/>279</text:p>
          <text:p text:style-name="P227">DEW_CON<text:tab/>404</text:p>
          <text:p text:style-name="P227">DEW_RH<text:tab/>405</text:p>
          <text:p text:style-name="P227">DEW_TEMP<text:tab/>405</text:p>
          <text:p text:style-name="P227">DIFFER<text:tab/>50</text:p>
          <text:p text:style-name="P227">DIMM_I<text:tab/>423</text:p>
          <text:p text:style-name="P227">DIR_TO_DEG<text:tab/>338</text:p>
          <text:p text:style-name="P227">Diverse Funktionen<text:tab/>35</text:p>
          <text:p text:style-name="P227">DRIVER_1<text:tab/>464</text:p>
          <text:p text:style-name="P227">DRIVER_4<text:tab/>465</text:p>
          <text:p text:style-name="P227">DST<text:tab/>127</text:p>
          <text:p text:style-name="P227">DT_SIMU<text:tab/>323</text:p>
          <text:p text:style-name="P227">DT_TO_SDT<text:tab/>128</text:p>
          <text:p text:style-name="P227">DT_TO_STRF<text:tab/>157</text:p>
          <text:p text:style-name="P227">DT2_TO_SDT<text:tab/>127</text:p>
          <text:p text:style-name="P227">DW_TO_REAL<text:tab/>233</text:p>
          <text:p text:style-name="P227">DWORD_OF_BYTE<text:tab/>233</text:p>
          <text:p text:style-name="P227">DWORD_TO_STRB<text:tab/>159</text:p>
          <text:p text:style-name="P227">DWORD_TO_STRF<text:tab/>159</text:p>
          <text:p text:style-name="P227">DWORD_TO_STRH<text:tab/>160</text:p>
          <text:p text:style-name="P227">EASTER<text:tab/>128</text:p>
          <text:p text:style-name="P227">ELLIPSE_A<text:tab/>111</text:p>
          <text:p text:style-name="P227">ELLIPSE_C<text:tab/>111</text:p>
          <text:p text:style-name="P227">ENERGY<text:tab/>339</text:p>
          <text:p text:style-name="P227">ERF<text:tab/>51</text:p>
          <text:p text:style-name="P227">ERFC<text:tab/>51</text:p>
          <text:p text:style-name="P227">ESR_COLLECT<text:tab/>35</text:p>
          <text:p text:style-name="P227">ESR_DATA<text:tab/>32</text:p>
          <text:p text:style-name="P227">ESR_MON_B8<text:tab/>37</text:p>
          <text:p text:style-name="P227">ESR_MON_R4<text:tab/>38</text:p>
          <text:p text:style-name="P227">ESR_MON_X8<text:tab/>39</text:p>
          <text:p text:style-name="P227">EVEN<text:tab/>51</text:p>
          <text:p text:style-name="P227">EXEC<text:tab/>160</text:p>
          <text:p text:style-name="P227">EXP10<text:tab/>52</text:p>
          <text:p text:style-name="P227">EXPN<text:tab/>52</text:p>
          <text:p text:style-name="P227">F_LAMP<text:tab/>425</text:p>
          <text:p text:style-name="P227">F_LIN<text:tab/>102</text:p>
          <text:p text:style-name="P227">F_LIN2<text:tab/>102</text:p>
          <text:p text:style-name="P227">F_POLY<text:tab/>103</text:p>
          <text:p text:style-name="P227">F_POWER<text:tab/>103</text:p>
          <text:p text:style-name="P227">F_QUAD<text:tab/>104</text:p>
          <text:p text:style-name="P227">F_TO_C<text:tab/>340</text:p>
          <text:p text:style-name="P227">F_TO_OM<text:tab/>340</text:p>
          <text:p text:style-name="P227">F_TO_PT<text:tab/>340</text:p>
          <text:p text:style-name="P227"><text:soft-page-break/>FACT<text:tab/>53</text:p>
          <text:p text:style-name="P227">FADE<text:tab/>281</text:p>
          <text:p text:style-name="P227">FF_D2E<text:tab/>245</text:p>
          <text:p text:style-name="P227">FF_D4E<text:tab/>246</text:p>
          <text:p text:style-name="P227">FF_DRE<text:tab/>247</text:p>
          <text:p text:style-name="P227">FF_JKE<text:tab/>248</text:p>
          <text:p text:style-name="P227">FF_RSE<text:tab/>249</text:p>
          <text:p text:style-name="P227">FIB<text:tab/>53</text:p>
          <text:p text:style-name="P227">FIFO_16<text:tab/>192</text:p>
          <text:p text:style-name="P227">FIFO_32<text:tab/>193</text:p>
          <text:p text:style-name="P227">FILL<text:tab/>161</text:p>
          <text:p text:style-name="P227">FILTER_DW<text:tab/>282</text:p>
          <text:p text:style-name="P227">FILTER_I<text:tab/>282</text:p>
          <text:p text:style-name="P227">FILTER_MAV_DW<text:tab/>283</text:p>
          <text:p text:style-name="P227">FILTER_MAV_W<text:tab/>283</text:p>
          <text:p text:style-name="P227">FILTER_W<text:tab/>284</text:p>
          <text:p text:style-name="P227">FILTER_WAV<text:tab/>284</text:p>
          <text:p text:style-name="P227">FIND_CHAR<text:tab/>161</text:p>
          <text:p text:style-name="P227">FIND_CTRL<text:tab/>162</text:p>
          <text:p text:style-name="P227">FIND_NONUM<text:tab/>162</text:p>
          <text:p text:style-name="P227">FIND_NUM<text:tab/>163</text:p>
          <text:p text:style-name="P227">FINDB<text:tab/>163</text:p>
          <text:p text:style-name="P227">FINDB_NONUM<text:tab/>164</text:p>
          <text:p text:style-name="P227">FINDB_NUM<text:tab/>164</text:p>
          <text:p text:style-name="P227">FINDP<text:tab/>165</text:p>
          <text:p text:style-name="P227">FIX<text:tab/>165</text:p>
          <text:p text:style-name="P227">FLOAT_TO_REAL<text:tab/>166</text:p>
          <text:p text:style-name="P227">FLOOR<text:tab/>54</text:p>
          <text:p text:style-name="P227">FLOOR2<text:tab/>54</text:p>
          <text:p text:style-name="P227">FLOW_CONTROL<text:tab/>465</text:p>
          <text:p text:style-name="P227">FRACT<text:tab/>55</text:p>
          <text:p text:style-name="P227">FSTRING_TO_BYTE<text:tab/>167</text:p>
          <text:p text:style-name="P227">FSTRING_TO_DT<text:tab/>167</text:p>
          <text:p text:style-name="P227">FSTRING_TO_DWORD<text:tab/>168</text:p>
          <text:p text:style-name="P227">FSTRING_TO_MONTH<text:tab/>168</text:p>
          <text:p text:style-name="P227">FSTRING_TO_WEEK<text:tab/>169</text:p>
          <text:p text:style-name="P227">FSTRING_TO_WEEKDAY<text:tab/>170</text:p>
          <text:p text:style-name="P227">FT_AVG<text:tab/>104</text:p>
          <text:p text:style-name="P227">FT_DERIV<text:tab/>362</text:p>
          <text:p text:style-name="P227">FT_IMP<text:tab/>363</text:p>
          <text:p text:style-name="P227">FT_INT<text:tab/>364</text:p>
          <text:p text:style-name="P227">FT_INT2<text:tab/>365</text:p>
          <text:p text:style-name="P227">FT_MIN_MAX<text:tab/>105</text:p>
          <text:p text:style-name="P227">FT_PD<text:tab/>366</text:p>
          <text:p text:style-name="P227">FT_PDT1<text:tab/>366</text:p>
          <text:p text:style-name="P227">FT_PI<text:tab/>367</text:p>
          <text:p text:style-name="P227">FT_PID<text:tab/>369</text:p>
          <text:p text:style-name="P227">FT_PIDW<text:tab/>371</text:p>
          <text:p text:style-name="P227">FT_PIDWL<text:tab/>372</text:p>
          <text:p text:style-name="P227">FT_PIW<text:tab/>374</text:p>
          <text:p text:style-name="P227">FT_PIWL<text:tab/>375</text:p>
          <text:p text:style-name="P227">FT_PROFILE<text:tab/>467</text:p>
          <text:p text:style-name="P227">FT_PT1<text:tab/>377</text:p>
          <text:p text:style-name="P227">FT_PT2<text:tab/>378</text:p>
          <text:p text:style-name="P227">FT_RMP<text:tab/>106</text:p>
          <text:p text:style-name="P227">FT_TN16<text:tab/>379</text:p>
          <text:p text:style-name="P227">FT_TN64<text:tab/>380</text:p>
          <text:p text:style-name="P227">FT_TN8<text:tab/>381</text:p>
          <text:p text:style-name="P227">GAMMA<text:tab/>55</text:p>
          <text:p text:style-name="P227">GAUSS<text:tab/>56</text:p>
          <text:p text:style-name="P227">GAUSSCD<text:tab/>56</text:p>
          <text:p text:style-name="P227">GDF<text:tab/>57</text:p>
          <text:p text:style-name="P227">GEN_BIT<text:tab/>203</text:p>
          <text:p text:style-name="P227">GEN_PULSE<text:tab/>260</text:p>
          <text:p text:style-name="P227">GEN_PW2<text:tab/>261</text:p>
          <text:p text:style-name="P227">GEN_RDM<text:tab/>262</text:p>
          <text:p text:style-name="P227">GEN_RDT<text:tab/>263</text:p>
          <text:p text:style-name="P227">GEN_RMP<text:tab/>263</text:p>
          <text:p text:style-name="P227">GEN_SIN<text:tab/>264</text:p>
          <text:p text:style-name="P227">GEN_SQ<text:tab/>205</text:p>
          <text:p text:style-name="P227">GEN_SQR<text:tab/>266</text:p>
          <text:p text:style-name="P227">GOLD<text:tab/>57</text:p>
          <text:p text:style-name="P227">HEAT_INDEX<text:tab/>406</text:p>
          <text:p text:style-name="P227">HEAT_METER<text:tab/>406</text:p>
          <text:p text:style-name="P227">HEAT_TEMP<text:tab/>408</text:p>
          <text:p text:style-name="P227">HEX_TO_BYTE<text:tab/>170</text:p>
          <text:p text:style-name="P227">HEX_TO_DWORD<text:tab/>171</text:p>
          <text:p text:style-name="P227">HOLIDAY<text:tab/>129</text:p>
          <text:p text:style-name="P227">HOLIDAY_DATA<text:tab/>32</text:p>
          <text:p text:style-name="P227">HOUR<text:tab/>129</text:p>
          <text:p text:style-name="P227">HOUR_OF_DT<text:tab/>130</text:p>
          <text:p text:style-name="P227">HOUR_TO_TIME<text:tab/>130</text:p>
          <text:p text:style-name="P227">HOUR_TO_TOD<text:tab/>131</text:p>
          <text:p text:style-name="P227">HTML_DECODE<text:tab/>492</text:p>
          <text:p text:style-name="P227">HTML_ENCODE<text:tab/>493</text:p>
          <text:p text:style-name="P227">HYPOT<text:tab/>58</text:p>
          <text:p text:style-name="P227">HYST<text:tab/>381</text:p>
          <text:p text:style-name="P227">HYST_1<text:tab/>383</text:p>
          <text:p text:style-name="P227">HYST_2<text:tab/>384</text:p>
          <text:p text:style-name="P227">HYST_3<text:tab/>385</text:p>
          <text:p text:style-name="P227">INC<text:tab/>58</text:p>
          <text:p text:style-name="P227">INC_DEC<text:tab/>469</text:p>
          <text:p text:style-name="P227">INC1<text:tab/>59</text:p>
          <text:p text:style-name="P227">INC2<text:tab/>59</text:p>
          <text:p text:style-name="P227">INT_TO_BCDC<text:tab/>234</text:p>
          <text:p text:style-name="P227">INTEGRATE<text:tab/>386</text:p>
          <text:p text:style-name="P227">INTERLOCK<text:tab/>471</text:p>
          <text:p text:style-name="P227">INTERLOCK_4<text:tab/>472</text:p>
          <text:p text:style-name="P227">INV<text:tab/>60</text:p>
          <text:p text:style-name="P227">IP4_CHECK<text:tab/>493</text:p>
          <text:p text:style-name="P227">IP4_DECODE<text:tab/>494</text:p>
          <text:p text:style-name="P227">IP4_TO_STRING<text:tab/>495</text:p>
          <text:p text:style-name="P227">IRTRANS_1<text:tab/>486</text:p>
          <text:p text:style-name="P227">IRTRANS_4<text:tab/>488</text:p>
          <text:p text:style-name="P227">IRTRANS_8<text:tab/>488</text:p>
          <text:p text:style-name="P227">IRTRANS_DECODE<text:tab/>489</text:p>
          <text:p text:style-name="P227">IS_ALNUM<text:tab/>171</text:p>
          <text:p text:style-name="P227">IS_ALPHA<text:tab/>172</text:p>
          <text:p text:style-name="P227">IS_CC<text:tab/>172</text:p>
          <text:p text:style-name="P227">IS_CTRL<text:tab/>173</text:p>
          <text:p text:style-name="P227">IS_HEX<text:tab/>173</text:p>
          <text:p text:style-name="P227">IS_IP4<text:tab/>495</text:p>
          <text:p text:style-name="P227"><text:soft-page-break/>IS_LOWER<text:tab/>173</text:p>
          <text:p text:style-name="P227">IS_NCC<text:tab/>174</text:p>
          <text:p text:style-name="P227">IS_NUM<text:tab/>175</text:p>
          <text:p text:style-name="P227">IS_SORTED<text:tab/>86</text:p>
          <text:p text:style-name="P227">IS_UPPER<text:tab/>175</text:p>
          <text:p text:style-name="P227">IS_URLCHR<text:tab/>496</text:p>
          <text:p text:style-name="P227">ISC_ALPHA<text:tab/>176</text:p>
          <text:p text:style-name="P227">ISC_CTRL<text:tab/>177</text:p>
          <text:p text:style-name="P227">ISC_HEX<text:tab/>177</text:p>
          <text:p text:style-name="P227">ISC_LOWER<text:tab/>178</text:p>
          <text:p text:style-name="P227">ISC_NUM<text:tab/>178</text:p>
          <text:p text:style-name="P227">ISC_UPPER<text:tab/>179</text:p>
          <text:p text:style-name="P227">JD2000<text:tab/>131</text:p>
          <text:p text:style-name="P227">K_TO_C<text:tab/>343</text:p>
          <text:p text:style-name="P227">KMH_TO_MS<text:tab/>341</text:p>
          <text:p text:style-name="P227">LANGEVIN<text:tab/>61</text:p>
          <text:p text:style-name="P227">LANGUAGE<text:tab/>26</text:p>
          <text:p text:style-name="P227">LATCH<text:tab/>251</text:p>
          <text:p text:style-name="P227">LATCH4<text:tab/>251</text:p>
          <text:p text:style-name="P227">LEAP_DAY<text:tab/>132</text:p>
          <text:p text:style-name="P227">LEAP_OF_DATE<text:tab/>132</text:p>
          <text:p text:style-name="P227">LEAP_YEAR<text:tab/>133</text:p>
          <text:p text:style-name="P227">LEGIONELLA<text:tab/>410</text:p>
          <text:p text:style-name="P227">LENGTH<text:tab/>341</text:p>
          <text:p text:style-name="P227">LINEAR_INT<text:tab/>107</text:p>
          <text:p text:style-name="P227">LIST_CLEAN<text:tab/>505</text:p>
          <text:p text:style-name="P227">LIST_GET<text:tab/>506</text:p>
          <text:p text:style-name="P227">LIST_INSERT<text:tab/>507</text:p>
          <text:p text:style-name="P227">LIST_LEN<text:tab/>507</text:p>
          <text:p text:style-name="P227">LIST_NEXT<text:tab/>508</text:p>
          <text:p text:style-name="P227">LIST_RETRIEVE<text:tab/>509</text:p>
          <text:p text:style-name="P227">LIST_RETRIEVE_MAX<text:tab/>509</text:p>
          <text:p text:style-name="P227">LIST_RETRIEVE_MIN<text:tab/>510</text:p>
          <text:p text:style-name="P227">LIST_SORT_L<text:tab/>511</text:p>
          <text:p text:style-name="P227">LOCATION<text:tab/>26</text:p>
          <text:p text:style-name="P227">LOWERCASE<text:tab/>179</text:p>
          <text:p text:style-name="P227">LTIME_TO_UTC<text:tab/>133</text:p>
          <text:p text:style-name="P227">M_D<text:tab/>327</text:p>
          <text:p text:style-name="P227">M_T<text:tab/>327</text:p>
          <text:p text:style-name="P227">M_TX<text:tab/>328</text:p>
          <text:p text:style-name="P227">MANUAL<text:tab/>473</text:p>
          <text:p text:style-name="P227">MANUAL_1<text:tab/>474</text:p>
          <text:p text:style-name="P227">MANUAL_2<text:tab/>474</text:p>
          <text:p text:style-name="P227">MANUAL_4<text:tab/>476</text:p>
          <text:p text:style-name="P227">MATH<text:tab/>25</text:p>
          <text:p text:style-name="P227">MATRIX<text:tab/>234</text:p>
          <text:p text:style-name="P227">MAX3<text:tab/>61</text:p>
          <text:p text:style-name="P227">MESSAGE_4R<text:tab/>180</text:p>
          <text:p text:style-name="P227">MESSAGE_8<text:tab/>181</text:p>
          <text:p text:style-name="P227">METER<text:tab/>324</text:p>
          <text:p text:style-name="P227">METER_STAT<text:tab/>326</text:p>
          <text:p text:style-name="P227">MID3<text:tab/>62</text:p>
          <text:p text:style-name="P227">MIN3<text:tab/>62</text:p>
          <text:p text:style-name="P227">MINUTE<text:tab/>134</text:p>
          <text:p text:style-name="P227">MINUTE_OF_DT<text:tab/>134</text:p>
          <text:p text:style-name="P227">MINUTE_TO_TIME<text:tab/>134</text:p>
          <text:p text:style-name="P227">MIRROR<text:tab/>182</text:p>
          <text:p text:style-name="P227">MIX<text:tab/>285</text:p>
          <text:p text:style-name="P227">MODR<text:tab/>63</text:p>
          <text:p text:style-name="P227">MONTH_BEGIN<text:tab/>135</text:p>
          <text:p text:style-name="P227">MONTH_END<text:tab/>135</text:p>
          <text:p text:style-name="P227">MONTH_OF_DATE<text:tab/>135</text:p>
          <text:p text:style-name="P227">MONTH_TO_STRING<text:tab/>182</text:p>
          <text:p text:style-name="P227">MS_TO_BFT<text:tab/>342</text:p>
          <text:p text:style-name="P227">MS_TO_KMH<text:tab/>343</text:p>
          <text:p text:style-name="P227">MUL_ADD<text:tab/>64</text:p>
          <text:p text:style-name="P227">MULTI_IN<text:tab/>310</text:p>
          <text:p text:style-name="P227">MULTIME<text:tab/>136</text:p>
          <text:p text:style-name="P227">MUX_2<text:tab/>236</text:p>
          <text:p text:style-name="P227">MUX_4<text:tab/>237</text:p>
          <text:p text:style-name="P227">MUX_R2<text:tab/>285</text:p>
          <text:p text:style-name="P227">MUX_R4<text:tab/>286</text:p>
          <text:p text:style-name="P227">NEGX<text:tab/>64</text:p>
          <text:p text:style-name="P227">NETWORK_BUFFER<text:tab/>32</text:p>
          <text:p text:style-name="P227">NETWORK_BUFFER_SIZE<text:tab/>26</text:p>
          <text:p text:style-name="P227">OCT_TO_BYTE<text:tab/>183</text:p>
          <text:p text:style-name="P227">OCT_TO_DWORD<text:tab/>183</text:p>
          <text:p text:style-name="P227">OFFSET<text:tab/>287</text:p>
          <text:p text:style-name="P227">OFFSET2<text:tab/>288</text:p>
          <text:p text:style-name="P227">OM_TO_F<text:tab/>343</text:p>
          <text:p text:style-name="P227">ONTIME<text:tab/>329</text:p>
          <text:p text:style-name="P227">OSCAT_VERSION<text:tab/>40</text:p>
          <text:p text:style-name="P227">OVERRIDE<text:tab/>289</text:p>
          <text:p text:style-name="P227">PARITY<text:tab/>238</text:p>
          <text:p text:style-name="P227">PARSET<text:tab/>477</text:p>
          <text:p text:style-name="P227">PARSET2<text:tab/>478</text:p>
          <text:p text:style-name="P227">PERIOD<text:tab/>136</text:p>
          <text:p text:style-name="P227">PERIOD2<text:tab/>137</text:p>
          <text:p text:style-name="P227">PHYS<text:tab/>26</text:p>
          <text:p text:style-name="P227">PIN_CODE<text:tab/>238</text:p>
          <text:p text:style-name="P227">POLYNOM_INT<text:tab/>108</text:p>
          <text:p text:style-name="P227">PRESSURE<text:tab/>344</text:p>
          <text:p text:style-name="P227">PT_TO_F<text:tab/>345</text:p>
          <text:p text:style-name="P227">PULSE_LENGTH<text:tab/>427</text:p>
          <text:p text:style-name="P227">PULSE_T<text:tab/>427</text:p>
          <text:p text:style-name="P227">PWM_DC<text:tab/>267</text:p>
          <text:p text:style-name="P227">PWM_PW<text:tab/>268</text:p>
          <text:p text:style-name="P227">R2_ABS<text:tab/>99</text:p>
          <text:p text:style-name="P227">R2_ADD<text:tab/>100</text:p>
          <text:p text:style-name="P227">R2_ADD2<text:tab/>100</text:p>
          <text:p text:style-name="P227">R2_MUL<text:tab/>100</text:p>
          <text:p text:style-name="P227">R2_SET<text:tab/>101</text:p>
          <text:p text:style-name="P227">RAD<text:tab/>65</text:p>
          <text:p text:style-name="P227">RANGE_TO_BYTE<text:tab/>290</text:p>
          <text:p text:style-name="P227">RANGE_TO_WORD<text:tab/>291</text:p>
          <text:p text:style-name="P227">RDM<text:tab/>65</text:p>
          <text:p text:style-name="P227">RDM2<text:tab/>66</text:p>
          <text:p text:style-name="P227">RDMDW<text:tab/>66</text:p>
          <text:p text:style-name="P227">REAL_TO_DW<text:tab/>239</text:p>
          <text:p text:style-name="P227">REAL_TO_STRF<text:tab/>184</text:p>
          <text:p text:style-name="P227">REAL2<text:tab/>33</text:p>
          <text:p text:style-name="P227">REFRACTION<text:tab/>138</text:p>
          <text:p text:style-name="P227"><text:soft-page-break/>REPLACE_ALL<text:tab/>184</text:p>
          <text:p text:style-name="P227">REPLACE_CHARS<text:tab/>185</text:p>
          <text:p text:style-name="P227">REPLACE_UML<text:tab/>185</text:p>
          <text:p text:style-name="P227">RES_NI<text:tab/>311</text:p>
          <text:p text:style-name="P227">RES_NTC<text:tab/>312</text:p>
          <text:p text:style-name="P227">RES_PT<text:tab/>313</text:p>
          <text:p text:style-name="P227">RES_SI<text:tab/>314</text:p>
          <text:p text:style-name="P227">REVERSE<text:tab/>239</text:p>
          <text:p text:style-name="P227">RMP_B<text:tab/>268</text:p>
          <text:p text:style-name="P227">RMP_SOFT<text:tab/>271</text:p>
          <text:p text:style-name="P227">RMP_W<text:tab/>272</text:p>
          <text:p text:style-name="P227">RND<text:tab/>67</text:p>
          <text:p text:style-name="P227">ROUND<text:tab/>68</text:p>
          <text:p text:style-name="P227">RTC_2<text:tab/>138</text:p>
          <text:p text:style-name="P227">RTC_MS<text:tab/>139</text:p>
          <text:p text:style-name="P227">SCALE<text:tab/>291</text:p>
          <text:p text:style-name="P227">SCALE_B<text:tab/>292</text:p>
          <text:p text:style-name="P227">SCALE_B2<text:tab/>292</text:p>
          <text:p text:style-name="P227">SCALE_B4<text:tab/>294</text:p>
          <text:p text:style-name="P227">SCALE_B8<text:tab/>295</text:p>
          <text:p text:style-name="P227">SCALE_D<text:tab/>296</text:p>
          <text:p text:style-name="P227">SCALE_R<text:tab/>297</text:p>
          <text:p text:style-name="P227">SCALE_X2<text:tab/>298</text:p>
          <text:p text:style-name="P227">SCALE_X4<text:tab/>299</text:p>
          <text:p text:style-name="P227">SCALE_X8<text:tab/>299</text:p>
          <text:p text:style-name="P227">SCHEDULER<text:tab/>206</text:p>
          <text:p text:style-name="P227">SCHEDULER_2<text:tab/>206</text:p>
          <text:p text:style-name="P227">SDD<text:tab/>413</text:p>
          <text:p text:style-name="P227">SDT<text:tab/>33</text:p>
          <text:p text:style-name="P227">SDT_TO_DATE<text:tab/>140</text:p>
          <text:p text:style-name="P227">SDT_TO_DT<text:tab/>140</text:p>
          <text:p text:style-name="P227">SDT_TO_TOD<text:tab/>141</text:p>
          <text:p text:style-name="P227">SECOND<text:tab/>141</text:p>
          <text:p text:style-name="P227">SECOND_OF_DT<text:tab/>142</text:p>
          <text:p text:style-name="P227">SECOND_TO_TIME<text:tab/>142</text:p>
          <text:p text:style-name="P227">SEL2_OF_3<text:tab/>300</text:p>
          <text:p text:style-name="P227">SEL2_OF_3B<text:tab/>301</text:p>
          <text:p text:style-name="P227">SELECT_8<text:tab/>250</text:p>
          <text:p text:style-name="P227">SENSOR_INT<text:tab/>314</text:p>
          <text:p text:style-name="P227">SEQUENCE_4<text:tab/>207</text:p>
          <text:p text:style-name="P227">SEQUENCE_64<text:tab/>210</text:p>
          <text:p text:style-name="P227">SEQUENCE_8<text:tab/>211</text:p>
          <text:p text:style-name="P227">SET_DATE<text:tab/>142</text:p>
          <text:p text:style-name="P227">SET_DT<text:tab/>143</text:p>
          <text:p text:style-name="P227">SET_TOD<text:tab/>144</text:p>
          <text:p text:style-name="P227">SETUP<text:tab/>26</text:p>
          <text:p text:style-name="P227">SGN<text:tab/>68</text:p>
          <text:p text:style-name="P227">SH<text:tab/>302</text:p>
          <text:p text:style-name="P227">SH_1<text:tab/>303</text:p>
          <text:p text:style-name="P227">SH_2<text:tab/>304</text:p>
          <text:p text:style-name="P227">SH_T<text:tab/>305</text:p>
          <text:p text:style-name="P227">SHL1<text:tab/>240</text:p>
          <text:p text:style-name="P227">SHR_4E<text:tab/>252</text:p>
          <text:p text:style-name="P227">SHR_4UDE<text:tab/>253</text:p>
          <text:p text:style-name="P227">SHR_8PLE<text:tab/>254</text:p>
          <text:p text:style-name="P227">SHR_8UDE<text:tab/>255</text:p>
          <text:p text:style-name="P227">SHR1<text:tab/>240</text:p>
          <text:p text:style-name="P227">SIGMOID<text:tab/>69</text:p>
          <text:p text:style-name="P227">SIGN_I<text:tab/>69</text:p>
          <text:p text:style-name="P227">SIGN_R<text:tab/>70</text:p>
          <text:p text:style-name="P227">SIGNAL<text:tab/>479</text:p>
          <text:p text:style-name="P227">SIGNAL_4<text:tab/>480</text:p>
          <text:p text:style-name="P227">SINC<text:tab/>70</text:p>
          <text:p text:style-name="P227">SINH<text:tab/>70</text:p>
          <text:p text:style-name="P227">SPEED<text:tab/>345</text:p>
          <text:p text:style-name="P227">SPHERE_V<text:tab/>112</text:p>
          <text:p text:style-name="P227">SQRTN<text:tab/>71</text:p>
          <text:p text:style-name="P227">SRAMP<text:tab/>481</text:p>
          <text:p text:style-name="P227">STACK_16<text:tab/>193</text:p>
          <text:p text:style-name="P227">STACK_32<text:tab/>194</text:p>
          <text:p text:style-name="P227">STAIR<text:tab/>306</text:p>
          <text:p text:style-name="P227">STAIR2<text:tab/>307</text:p>
          <text:p text:style-name="P227">STATUS_TO_ESR<text:tab/>40</text:p>
          <text:p text:style-name="P227">STORE_8<text:tab/>256</text:p>
          <text:p text:style-name="P227">STRING_LENGTH<text:tab/>26</text:p>
          <text:p text:style-name="P227">STRING_TO_BUFFER<text:tab/>502</text:p>
          <text:p text:style-name="P227">STRING_TO_URL<text:tab/>496</text:p>
          <text:p text:style-name="P227">SUN_POS<text:tab/>144</text:p>
          <text:p text:style-name="P227">SUN_TIME<text:tab/>145</text:p>
          <text:p text:style-name="P227">SW_RECONFIG<text:tab/>428</text:p>
          <text:p text:style-name="P227">SWAP_BYTE<text:tab/>241</text:p>
          <text:p text:style-name="P227">SWAP_BYTE2<text:tab/>241</text:p>
          <text:p text:style-name="P227">SWITCH_I<text:tab/>429</text:p>
          <text:p text:style-name="P227">SWITCH_X<text:tab/>430</text:p>
          <text:p text:style-name="P227">T_AVG24<text:tab/>414</text:p>
          <text:p text:style-name="P227">T_PLC_MS<text:tab/>331</text:p>
          <text:p text:style-name="P227">T_PLC_US<text:tab/>332</text:p>
          <text:p text:style-name="P227">TANC<text:tab/>71</text:p>
          <text:p text:style-name="P227">TANH<text:tab/>72</text:p>
          <text:p text:style-name="P227">TANK_LEVEL<text:tab/>482</text:p>
          <text:p text:style-name="P227">TC_MS<text:tab/>334</text:p>
          <text:p text:style-name="P227">TC_S<text:tab/>334</text:p>
          <text:p text:style-name="P227">TC_US<text:tab/>335</text:p>
          <text:p text:style-name="P227">TEMP_EXT<text:tab/>415</text:p>
          <text:p text:style-name="P227">TEMP_NI<text:tab/>315</text:p>
          <text:p text:style-name="P227">TEMP_NTC<text:tab/>316</text:p>
          <text:p text:style-name="P227">TEMP_PT<text:tab/>317</text:p>
          <text:p text:style-name="P227">TEMP_SI<text:tab/>318</text:p>
          <text:p text:style-name="P227">TEMPERATURE<text:tab/>346</text:p>
          <text:p text:style-name="P227">TICKER<text:tab/>186</text:p>
          <text:p text:style-name="P227">TIMER_1<text:tab/>431</text:p>
          <text:p text:style-name="P227">TIMER_2<text:tab/>432</text:p>
          <text:p text:style-name="P227">TIMER_EVENT<text:tab/>33</text:p>
          <text:p text:style-name="P227">TIMER_EVENT_DECODE<text:tab/>433</text:p>
          <text:p text:style-name="P227">TIMER_EXT<text:tab/>434</text:p>
          <text:p text:style-name="P227">TIMER_P4<text:tab/>436</text:p>
          <text:p text:style-name="P227">TMAX<text:tab/>212</text:p>
          <text:p text:style-name="P227">TMIN<text:tab/>213</text:p>
          <text:p text:style-name="P227">TO_LOWER<text:tab/>187</text:p>
          <text:p text:style-name="P227">TO_UML<text:tab/>187</text:p>
          <text:p text:style-name="P227">TO_UPPER<text:tab/>188</text:p>
          <text:p text:style-name="P227">TOF_1<text:tab/>214</text:p>
          <text:p text:style-name="P227"><text:soft-page-break/>TOGGLE<text:tab/>257</text:p>
          <text:p text:style-name="P227">TONOF<text:tab/>215</text:p>
          <text:p text:style-name="P227">TP_1<text:tab/>215</text:p>
          <text:p text:style-name="P227">TP_1D<text:tab/>216</text:p>
          <text:p text:style-name="P227">TP_X<text:tab/>217</text:p>
          <text:p text:style-name="P227">TREND_DW<text:tab/>309</text:p>
          <text:p text:style-name="P227">TRIANGLE_A<text:tab/>112</text:p>
          <text:p text:style-name="P227">TRIM<text:tab/>189</text:p>
          <text:p text:style-name="P227">TRIM1<text:tab/>189</text:p>
          <text:p text:style-name="P227">TRIME<text:tab/>189</text:p>
          <text:p text:style-name="P227">TUNE<text:tab/>483</text:p>
          <text:p text:style-name="P227">TUNE2<text:tab/>484</text:p>
          <text:p text:style-name="P227">UPPERCASE<text:tab/>190</text:p>
          <text:p text:style-name="P227">URL<text:tab/>34</text:p>
          <text:p text:style-name="P227">URL_DECODE<text:tab/>497</text:p>
          <text:p text:style-name="P227">URL_ENCODE<text:tab/>497</text:p>
          <text:p text:style-name="P227">URL_TO_STRING<text:tab/>498</text:p>
          <text:p text:style-name="P227">UTC_TO_LTIME<text:tab/>146</text:p>
          <text:p text:style-name="P227">V3_ABS<text:tab/>114</text:p>
          <text:p text:style-name="P227">V3_ADD<text:tab/>115</text:p>
          <text:p text:style-name="P227">V3_ANG<text:tab/>115</text:p>
          <text:p text:style-name="P227">V3_DPRO<text:tab/>115</text:p>
          <text:p text:style-name="P227">V3_NORM<text:tab/>116</text:p>
          <text:p text:style-name="P227">V3_NUL<text:tab/>116</text:p>
          <text:p text:style-name="P227">V3_PAR<text:tab/>117</text:p>
          <text:p text:style-name="P227">V3_REV<text:tab/>117</text:p>
          <text:p text:style-name="P227">V3_SMUL<text:tab/>118</text:p>
          <text:p text:style-name="P227">V3_SUB<text:tab/>118</text:p>
          <text:p text:style-name="P227">V3_XANG<text:tab/>118</text:p>
          <text:p text:style-name="P227">V3_XPRO<text:tab/>119</text:p>
          <text:p text:style-name="P227">V3_YANG<text:tab/>119</text:p>
          <text:p text:style-name="P227">V3_ZANG<text:tab/>120</text:p>
          <text:p text:style-name="P227">VEKTOR_3<text:tab/>34</text:p>
          <text:p text:style-name="P227">WATER_CP<text:tab/>416</text:p>
          <text:p text:style-name="P227">WATER_DENSITY<text:tab/>417</text:p>
          <text:p text:style-name="P227">WATER_ENTHALPY<text:tab/>418</text:p>
          <text:p text:style-name="P227">WCT<text:tab/>418</text:p>
          <text:p text:style-name="P227">WEEKDAY_TO_STRING<text:tab/>190</text:p>
          <text:p text:style-name="P227">WINDOW<text:tab/>72</text:p>
          <text:p text:style-name="P227">WINDOW2<text:tab/>73</text:p>
          <text:p text:style-name="P227">WORD_OF_BYTE<text:tab/>241</text:p>
          <text:p text:style-name="P227">WORD_OF_DWORD<text:tab/>242</text:p>
          <text:p text:style-name="P227">WORD_TO_RANGE<text:tab/>309</text:p>
          <text:p text:style-name="P227">WORK_WEEK<text:tab/>147</text:p>
          <text:p text:style-name="P227">YEAR_BEGIN<text:tab/>147</text:p>
          <text:p text:style-name="P227">YEAR_END<text:tab/>148</text:p>
          <text:p text:style-name="P227">YEAR_OF_DATE<text:tab/>148</text:p>
          <text:p text:style-name="P227"><text:s/><text:tab/>312</text:p>
          <text:p text:style-name="P227">_ARRAY_ABS<text:tab/>74</text:p>
          <text:p text:style-name="P227">_ARRAY_ADD<text:tab/>75</text:p>
          <text:p text:style-name="P227">_ARRAY_INIT<text:tab/>75</text:p>
          <text:p text:style-name="P227">_ARRAY_MEDIAN<text:tab/>76</text:p>
          <text:p text:style-name="P227">_ARRAY_MUL<text:tab/>77</text:p>
          <text:p text:style-name="P227">_ARRAY_SHUFFLE<text:tab/>78</text:p>
          <text:p text:style-name="P227">_ARRAY_SORT<text:tab/>79</text:p>
          <text:p text:style-name="P227">_BUFFER_CLEAR<text:tab/>499</text:p>
          <text:p text:style-name="P227">_BUFFER_INIT<text:tab/>499</text:p>
          <text:p text:style-name="P227">_BUFFER_INSERT<text:tab/>500</text:p>
          <text:p text:style-name="P227">_RMP_B<text:tab/>258</text:p>
          <text:p text:style-name="P227">_RMP_NEXT<text:tab/>258</text:p>
          <text:p text:style-name="P227">_RMP_W<text:tab/>260</text:p>
        </text:index-body>
      </text:alphabetical-index>
      <text:p text:style-name="P50"><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font-face-decls>
    <style:font-face style:name="StarSymbol" svg:font-family="StarSymbol" style:font-charset="x-symbol"/>
    <style:font-face style:name="OpenSymbol1" svg:font-family="OpenSymbol" style:font-pitch="variable" style:font-charset="x-symbol"/>
    <style:font-face style:name="OpenSymbol" svg:font-family="OpenSymbol" style:font-adornments="Regular" style:font-pitch="variable" style:font-charset="x-symbol"/>
    <style:font-face style:name="Wingdings" svg:font-family="Wingdings" style:font-pitch="variable" style:font-charset="x-symbol"/>
    <style:font-face style:name="Wingdings1" svg:font-family="Wingdings" style:font-adornments="Roman" style:font-pitch="variable" style:font-charset="x-symbol"/>
    <style:font-face style:name="StarSymbol1" svg:font-family="StarSymbol"/>
    <style:font-face style:name="Helv" svg:font-family="Helv" style:font-family-generic="swiss"/>
    <style:font-face style:name="Courier New" svg:font-family="'Courier New'" style:font-family-generic="modern" style:font-pitch="fixed"/>
    <style:font-face style:name="Courier" svg:font-family="Courier" style:font-adornments="Regular" style:font-family-generic="roman" style:font-pitch="fixed"/>
    <style:font-face style:name="Arial Unicode MS1" svg:font-family="'Arial Unicode MS'" style:font-pitch="variable"/>
    <style:font-face style:name="HG Mincho Light J" svg:font-family="'HG Mincho Light J'" style:font-pitch="variable"/>
    <style:font-face style:name="Arial3" svg:font-family="Arial" style:font-family-generic="roman" style:font-pitch="variable"/>
    <style:font-face style:name="Bookman Old Style" svg:font-family="'Bookman Old Style'" style:font-adornments="Normale" style:font-family-generic="roman" style:font-pitch="variable"/>
    <style:font-face style:name="Thorndale" svg:font-family="Thorndale" style:font-family-generic="roman" style:font-pitch="variable"/>
    <style:font-face style:name="Times" svg:font-family="Times" style:font-adornments="Regular" style:font-family-generic="roman" style:font-pitch="variable"/>
    <style:font-face style:name="Arial2" svg:font-family="Arial" style:font-family-generic="swiss" style:font-pitch="variable"/>
    <style:font-face style:name="Arial1" svg:font-family="Arial" style:font-adornments="Normale" style:font-family-generic="swiss" style:font-pitch="variable"/>
    <style:font-face style:name="Arial" svg:font-family="Arial" style:font-adornments="Standard" style:font-family-generic="swiss" style:font-pitch="variable"/>
    <style:font-face style:name="Bitstream Vera Sans2" svg:font-family="'Bitstream Vera Sans'" style:font-family-generic="swiss" style:font-pitch="variable"/>
    <style:font-face style:name="Bitstream Vera Sans" svg:font-family="'Bitstream Vera Sans'" style:font-adornments="Fett" style:font-family-generic="swiss" style:font-pitch="variable"/>
    <style:font-face style:name="Bitstream Vera Sans1" svg:font-family="'Bitstream Vera Sans'" style:font-adornments="Roman" style:font-family-generic="swiss" style:font-pitch="variable"/>
    <style:font-face style:name="Arial Unicode MS" svg:font-family="'Arial Unicode MS'" style:font-family-generic="system" style:font-pitch="variable"/>
    <style:font-face style:name="HG Mincho Light J1" svg:font-family="'HG Mincho Light J'"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imension_20_Lines" draw:display-name="Dimension Lines" svg:viewBox="0 0 836 110" svg:d="m0 0h278 278 280v36 36 38h-278-278-280v-36-36z"/>
    <draw:stroke-dash draw:name="Fine_20_Dashed" draw:display-name="Fine Dashed" draw:style="rect" draw:dots1="1" draw:dots1-length="0.288cm" draw:dots2="1" draw:dots2-length="0.288cm" draw:distance="0.288cm"/>
    <draw:stroke-dash draw:name="Ultrafine_20_Dashed" draw:display-name="Ultrafine Dashed" draw:style="rect" draw:dots1="1" draw:dots1-length="0.029cm" draw:dots2="1" draw:dots2-length="0.029cm" draw:distance="0.029cm"/>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05cm" style:writing-mode="page"/>
      <style:text-properties fo:color="#000000" style:font-name="Thorndale" fo:font-size="12pt" fo:language="de" fo:country="DE" style:font-name-asian="HG Mincho Light J" style:font-size-asian="12pt" style:language-asian="zxx" style:country-asian="none" style:font-name-complex="Arial Unicode MS1"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master-page-name="">
      <style:paragraph-properties fo:margin-left="1cm" fo:margin-right="0cm" fo:margin-top="0cm" fo:margin-bottom="0.21cm" fo:orphans="2" fo:widows="2" fo:text-indent="0cm" style:auto-text-indent="false" style:page-number="auto" fo:background-color="transparent" style:shadow="none" fo:keep-with-next="auto">
        <style:tab-stops/>
        <style:background-image/>
      </style:paragraph-properties>
      <style:text-properties style:font-name="Arial"/>
    </style:style>
    <style:style style:name="Text_20_body" style:display-name="Text body" style:family="paragraph" style:parent-style-name="Standard" style:class="text">
      <style:paragraph-properties fo:margin-top="0cm" fo:margin-bottom="0.212cm"/>
    </style:style>
    <style:style style:name="Signature" style:family="paragraph" style:parent-style-name="Default_20_Text" style:class="text">
      <style:paragraph-properties text:number-lines="false" text:line-number="0"/>
    </style:style>
    <style:style style:name="Marginalia" style:family="paragraph" style:parent-style-name="Text_20_Body_20_Single" style:class="text">
      <style:paragraph-properties fo:margin-left="4.001cm" fo:margin-right="0cm" fo:text-indent="0cm" style:auto-text-indent="false"/>
      <style:text-properties fo:language="en" fo:country="US"/>
    </style:style>
    <style:style style:name="Heading" style:family="paragraph" style:parent-style-name="Default_20_Text" style:next-style-name="Text_20_Body_20_Single" style:class="text" style:master-page-name="">
      <style:paragraph-properties fo:margin-left="0.499cm" fo:margin-right="0cm" fo:margin-top="0.423cm" fo:margin-bottom="0.212cm" fo:text-indent="0cm" style:auto-text-indent="false" style:page-number="auto" fo:background-color="#ffffcc" fo:padding="0.199cm" fo:border-left="none" fo:border-right="0.002cm solid #000000" fo:border-top="none" fo:border-bottom="0.002cm solid #000000" style:shadow="#e6e6ff 0.18cm 0.18cm" fo:keep-with-next="always">
        <style:background-image/>
      </style:paragraph-properties>
      <style:text-properties style:font-name="Arial1" fo:font-size="18pt" fo:language="de" fo:country="DE" fo:font-weight="bold" style:font-name-asian="HG Mincho Light J" style:font-size-asian="14pt" style:font-name-complex="Arial Unicode MS1" style:font-size-complex="14pt"/>
    </style:style>
    <style:style style:name="Heading_20_1" style:display-name="Heading 1" style:family="paragraph" style:parent-style-name="Heading" style:next-style-name="Text_20_body_20_1" style:auto-update="true" style:list-style-name="Outline" style:class="text" style:master-page-name="" style:default-outline-level="1">
      <style:paragraph-properties fo:margin-left="0.499cm" fo:margin-right="0cm" fo:margin-top="0.42cm" fo:margin-bottom="0.21cm" fo:text-indent="0cm" style:auto-text-indent="false" style:page-number="auto" fo:break-before="page" fo:background-color="transparent" fo:padding="0cm" fo:border="none" style:shadow="none">
        <style:tab-stops/>
        <style:drop-cap/>
        <style:background-image/>
      </style:paragraph-properties>
      <style:text-properties fo:color="#000080" style:font-name="Bitstream Vera Sans" fo:font-size="18pt" fo:language="de" fo:country="DE" fo:font-weight="bold" style:font-size-asian="115%" style:font-weight-asian="bold" style:font-size-complex="115%" style:font-weight-complex="bold"/>
    </style:style>
    <style:style style:name="Heading_20_2" style:display-name="Heading 2" style:family="paragraph" style:parent-style-name="Heading_20_1" style:next-style-name="Text_20_body_20_2" style:auto-update="true" style:list-style-name="Outline" style:class="text" style:master-page-name="" style:default-outline-level="2">
      <style:paragraph-properties fo:margin-left="0.499cm" fo:margin-right="0cm" fo:margin-top="2.499cm" fo:margin-bottom="0.499cm" fo:text-align="start" style:justify-single-word="true" fo:keep-together="auto" fo:orphans="5" fo:widows="5" style:register-true="false" fo:text-indent="0cm" style:auto-text-indent="false" style:page-number="auto" fo:break-before="auto" fo:break-after="auto" fo:background-color="transparent" fo:padding="0cm" fo:border="none" style:shadow="none" fo:keep-with-next="always">
        <style:tab-stops/>
        <style:background-image/>
      </style:paragraph-properties>
      <style:text-properties fo:color="#000080" style:font-name="Bitstream Vera Sans" fo:font-size="16pt" fo:language="de" fo:country="DE" fo:font-style="normal" fo:font-weight="bold" style:font-name-asian="HG Mincho Light J" style:font-size-asian="14pt" style:font-style-asian="italic" style:font-weight-asian="bold" style:font-name-complex="Arial Unicode MS1" style:font-size-complex="14pt" style:font-style-complex="italic" style:font-weight-complex="bold" style:font-relief="none"/>
    </style:style>
    <style:style style:name="Heading_20_3" style:display-name="Heading 3" style:family="paragraph" style:parent-style-name="Heading_20_1" style:next-style-name="Text_20_body_20_3" style:list-style-name="Outline" style:class="text" style:default-outline-level="3">
      <style:paragraph-properties fo:margin-left="2cm" fo:margin-right="0cm" fo:text-indent="0cm" style:auto-text-indent="false" fo:padding="0.049cm" fo:border-left="0.002cm solid #ffffff" fo:border-right="0.002cm solid #000000" fo:border-top="0.002cm solid #ffffff" fo:border-bottom="0.002cm solid #000000"/>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_20_Single" style:class="text">
      <style:paragraph-properties fo:background-color="#ffffcc">
        <style:background-image/>
      </style:paragraph-properties>
      <style:text-properties fo:font-size="85%" fo:language="en" fo:country="US" fo:font-style="italic" fo:font-weight="bold" style:font-size-asian="85%" style:font-style-asian="italic" style:font-weight-asian="bold" style:font-size-complex="85%" style:font-style-complex="italic" style:font-weight-complex="bold"/>
    </style:style>
    <style:style style:name="Header" style:family="paragraph" style:parent-style-name="Default_20_Text" style:class="extra">
      <style:paragraph-properties fo:background-color="transparent" fo:padding="0.199cm" fo:border-left="none" fo:border-right="none" fo:border-top="none" fo:border-bottom="0.002cm solid #000000" text:number-lines="false" text:line-number="0">
        <style:tab-stops>
          <style:tab-stop style:position="8.498cm" style:type="center"/>
          <style:tab-stop style:position="16.999cm" style:type="right"/>
        </style:tab-stops>
        <style:background-image/>
      </style:paragraph-properties>
      <style:text-properties style:font-name="Bookman Old Style" fo:font-size="10pt" fo:language="en" fo:country="US" fo:font-weight="250"/>
    </style:style>
    <style:style style:name="Footer" style:family="paragraph" style:parent-style-name="Default_20_Text" style:class="extra">
      <style:paragraph-properties fo:padding="0.049cm" fo:border-left="none" fo:border-right="none" fo:border-top="0.002cm solid #000000" fo:border-bottom="none" text:number-lines="false" text:line-number="0">
        <style:tab-stops>
          <style:tab-stop style:position="8.498cm" style:type="center"/>
          <style:tab-stop style:position="16.999cm" style:type="right"/>
        </style:tab-stops>
      </style:paragraph-properties>
      <style:text-properties style:font-name="Bitstream Vera Sans1" fo:font-size="10pt" fo:font-weight="normal"/>
    </style:style>
    <style:style style:name="Table_20_Contents" style:display-name="Table Contents" style:family="paragraph" style:parent-style-name="Text_20_Body_20_Single" style:class="extra" style:master-page-name="">
      <style:paragraph-properties style:page-number="auto" text:number-lines="false" text:line-number="0"/>
      <style:text-properties style:font-name="Bitstream Vera Sans1" fo:font-size="10pt" fo:language="de" fo:country="DE" fo:font-weight="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Default_20_Text" style:class="extra">
      <style:paragraph-properties fo:margin-top="0.212cm" fo:margin-bottom="0.212cm" fo:text-align="center" style:justify-single-word="false" text:number-lines="false" text:line-number="0"/>
      <style:text-properties fo:font-size="10pt" fo:font-style="italic" fo:font-weight="bold" style:font-size-asian="10pt" style:font-style-asian="italic" style:font-size-complex="10pt" style:font-style-complex="italic"/>
    </style:style>
    <style:style style:name="Text" style:family="paragraph" style:parent-style-name="Caption" style:class="extra"/>
    <style:style style:name="Frame_20_contents" style:display-name="Frame contents" style:family="paragraph" style:parent-style-name="Text_20_Body_20_Single" style:class="extra"/>
    <style:style style:name="Drawing" style:family="paragraph" style:parent-style-name="Caption" style:class="extra"/>
    <style:style style:name="Index" style:family="paragraph" style:parent-style-name="Default_20_Text" style:class="index">
      <style:paragraph-properties text:number-lines="false" text:line-number="0"/>
    </style:style>
    <style:style style:name="Index_20_Heading" style:display-name="Index Heading" style:family="paragraph" style:parent-style-name="Heading" style:class="index" style:master-page-name="">
      <style:paragraph-properties fo:margin-left="0.499cm" fo:margin-right="0cm" fo:margin-top="0.42cm" fo:margin-bottom="0.3cm" fo:text-indent="0cm" style:auto-text-indent="false" style:page-number="auto" fo:break-before="page" fo:background-color="transparent" fo:padding="0cm" fo:border="none" style:shadow="none" text:number-lines="false" text:line-number="0">
        <style:background-image/>
      </style:paragraph-properties>
      <style:text-properties fo:color="#000080" fo:font-size="18pt" fo:font-weight="bold" style:font-size-asian="16pt" style:font-weight-asian="bold" style:font-size-complex="16pt" style:font-weight-complex="bold"/>
    </style:style>
    <style:style style:name="Index_20_1" style:display-name="Index 1" style:family="paragraph" style:parent-style-name="Index" style:class="index" style:master-page-name="">
      <style:paragraph-properties fo:margin-left="0.499cm" fo:margin-right="0cm" fo:text-indent="0cm" style:auto-text-indent="false" style:page-number="auto"/>
      <style:text-properties fo:color="#000000" style:font-name="Bitstream Vera Sans1" fo:font-size="10pt"/>
    </style:style>
    <style:style style:name="Index_20_2" style:display-name="Index 2" style:family="paragraph" style:parent-style-name="Index" style:class="index">
      <style:paragraph-properties fo:margin-left="0.499cm" fo:margin-right="0cm" fo:text-indent="0cm" style:auto-text-indent="false"/>
    </style:style>
    <style:style style:name="Contents_20_Heading" style:display-name="Contents Heading" style:family="paragraph" style:parent-style-name="Heading" style:auto-update="true" style:class="index" style:master-page-name="">
      <style:paragraph-properties fo:margin-left="1cm" fo:margin-right="0cm" fo:text-align="start" style:justify-single-word="false" fo:text-indent="0cm" style:auto-text-indent="false" style:page-number="auto" fo:break-before="page" fo:background-color="transparent" fo:padding="0cm" fo:border="none" style:shadow="none" text:number-lines="false" text:line-number="0">
        <style:tab-stops/>
        <style:background-image/>
      </style:paragraph-properties>
      <style:text-properties style:font-name="Bitstream Vera Sans" fo:font-size="18pt" fo:font-weight="bold" style:font-size-asian="16pt" style:font-weight-asian="bold" style:font-size-complex="16pt" style:font-weight-complex="bold"/>
    </style:style>
    <style:style style:name="Contents_20_1" style:display-name="Contents 1" style:family="paragraph" style:parent-style-name="Signature" style:next-style-name="Heading_20_1" style:auto-update="true" style:class="index" style:master-page-name="">
      <style:paragraph-properties fo:margin-left="0.499cm" fo:margin-right="0cm" fo:margin-top="1cm" fo:margin-bottom="0.101cm" fo:orphans="2" fo:widows="6" fo:text-indent="0cm" style:auto-text-indent="false" style:page-number="auto" fo:background-color="transparent" style:shadow="none" fo:keep-with-next="always">
        <style:tab-stops>
          <style:tab-stop style:position="0cm" style:leader-style="dotted" style:leader-text="."/>
          <style:tab-stop style:position="2cm" style:leader-style="dotted" style:leader-text="."/>
          <style:tab-stop style:position="16.999cm" style:leader-style="dotted" style:leader-text="."/>
        </style:tab-stops>
        <style:background-image/>
      </style:paragraph-properties>
      <style:text-properties fo:color="#000080" style:font-name="Bitstream Vera Sans" fo:font-size="12pt" fo:font-weight="bold"/>
    </style:style>
    <style:style style:name="Contents_20_2" style:display-name="Contents 2" style:family="paragraph" style:parent-style-name="Heading" style:next-style-name="Heading_20_2" style:auto-update="true" style:class="index" style:master-page-name="">
      <style:paragraph-properties fo:margin-left="1cm" fo:margin-right="0cm" fo:margin-top="0cm" fo:margin-bottom="0.101cm" fo:line-height="100%" fo:text-indent="0cm" style:auto-text-indent="false" style:page-number="auto" fo:background-color="transparent" fo:padding="0cm" fo:border="none" style:shadow="none" fo:keep-with-next="auto">
        <style:tab-stops>
          <style:tab-stop style:position="0cm"/>
          <style:tab-stop style:position="2cm"/>
          <style:tab-stop style:position="16cm"/>
        </style:tab-stops>
        <style:background-image/>
      </style:paragraph-properties>
      <style:text-properties fo:color="#000000" style:font-name="Bitstream Vera Sans1" fo:font-size="10pt" fo:language="de" fo:country="DE" fo:font-weight="normal"/>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Subtitle" style:family="paragraph" style:parent-style-name="Heading" style:next-style-name="Text_20_Body_20_Single" style:class="chapter">
      <style:paragraph-properties fo:text-align="center" style:justify-single-word="false"/>
      <style:text-properties fo:font-size="14pt" fo:font-style="italic" style:font-size-asian="14pt" style:font-style-asian="italic" style:font-size-complex="14pt" style:font-style-complex="italic"/>
    </style:style>
    <style:style style:name="Default_20_Text" style:display-name="Default Text" style:family="paragraph" style:class="text"/>
    <style:style style:name="Text_20_Body_20_Single" style:display-name="Text Body Single" style:family="paragraph" style:parent-style-name="Default_20_Text" style:master-page-name="">
      <style:paragraph-properties fo:margin-top="0cm" fo:margin-bottom="0.212cm" fo:text-align="justify" style:justify-single-word="false" fo:orphans="2" fo:widows="2" fo:hyphenation-ladder-count="no-limit" style:page-number="auto">
        <style:tab-stops/>
        <style:drop-cap/>
      </style:paragraph-properties>
      <style:text-properties style:font-name="Bookman Old Style" fo:language="it" fo:country="IT" fo:font-weight="250" fo:hyphenate="true" fo:hyphenation-remain-char-count="2" fo:hyphenation-push-char-count="2"/>
    </style:style>
    <style:style style:name="Text_20_body_20_1" style:display-name="Text body 1" style:family="paragraph" style:parent-style-name="Text_20_Body_20_Single" style:master-page-name="">
      <style:paragraph-properties fo:margin-left="0.499cm" fo:margin-right="0cm" fo:text-indent="0cm" style:auto-text-indent="false" style:page-number="auto"/>
      <style:text-properties style:font-name="Times" fo:language="en" fo:country="US" fo:font-weight="normal"/>
    </style:style>
    <style:style style:name="Text_20_body_20_2" style:display-name="Text body 2" style:family="paragraph" style:parent-style-name="Text_20_body_20_1" style:auto-update="true" style:master-page-name="">
      <style:paragraph-properties fo:margin-left="1.058cm" fo:margin-right="0cm" fo:keep-together="auto" fo:orphans="2" fo:widows="2" fo:text-indent="0cm" style:auto-text-indent="false" style:page-number="auto" fo:background-color="transparent" fo:keep-with-next="auto">
        <style:background-image/>
      </style:paragraph-properties>
      <style:text-properties style:font-name="Bitstream Vera Sans1" fo:language="de" fo:country="DE"/>
    </style:style>
    <style:style style:name="Text_20_body_20_3" style:display-name="Text body 3" style:family="paragraph" style:parent-style-name="Text_20_body_20_1">
      <style:paragraph-properties fo:margin-left="2cm" fo:margin-right="0cm" fo:text-indent="0cm" style:auto-text-indent="false"/>
      <style:text-properties fo:language="en" fo:country="US"/>
    </style:style>
    <style:style style:name="Cover_20_Title" style:display-name="Cover Title" style:family="paragraph" style:parent-style-name="Text_20_body_20_1" style:master-page-name="">
      <style:paragraph-properties fo:margin-left="1cm" fo:margin-right="1cm" fo:margin-top="0.21cm" fo:margin-bottom="0.21cm" fo:text-align="center" style:justify-single-word="false" fo:text-indent="0cm" style:auto-text-indent="false" style:page-number="auto" fo:background-color="transparent">
        <style:background-image/>
      </style:paragraph-properties>
      <style:text-properties fo:text-transform="capitalize" fo:color="#000080" style:font-name="Times" fo:font-size="32pt" fo:language="de" fo:country="DE" fo:font-weight="normal" style:font-relief="engraved"/>
    </style:style>
    <style:style style:name="Outlined_20_text" style:display-name="Outlined text" style:family="paragraph" style:parent-style-name="Default_20_Text">
      <style:paragraph-properties fo:padding="0.15cm" fo:border="0.002cm solid #000000" style:shadow="#808080 0.18cm 0.18cm"/>
      <style:text-properties fo:color="#000080" style:font-name="Courier" fo:font-size="14pt" fo:language="en" fo:country="U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Heading_20_5" style:display-name="Heading 5" style:family="paragraph" style:parent-style-name="Heading" style:next-style-name="Text_20_body" style:list-style-name="Outline"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list-style-name="Outline" style:class="text" style:default-outline-level="6">
      <style:text-properties fo:font-size="75%" fo:font-weight="bold" style:font-size-asian="75%" style:font-weight-asian="bold" style:font-size-complex="75%"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 style:family="paragraph" style:parent-style-name="Text_20_body" style:class="list"/>
    <style:style style:name="Heading_20_7" style:display-name="Heading 7" style:family="paragraph" style:parent-style-name="Heading" style:next-style-name="Text_20_body" style:list-style-name="Outline"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list-style-name="Outline"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list-style-name="Outline"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list-style-name="Outline" style:class="text" style:default-outline-level="10">
      <style:text-properties fo:font-size="75%" fo:font-weight="bold" style:font-size-asian="75%" style:font-weight-asian="bold" style:font-size-complex="75%" style:font-weight-complex="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parent-style-name="Index_20_Link">
      <style:text-properties fo:color="#800000" style:text-underline-style="solid" style:text-underline-width="auto" style:text-underline-color="font-color"/>
    </style:style>
    <style:style style:name="Index_20_Link" style:display-name="Index Link" style:family="text"/>
    <style:style style:name="Endnote_20_Symbol" style:display-name="Endnote Symbol" style:family="text"/>
    <style:style style:name="Main_20_index_20_entry" style:display-name="Main index entry" style:family="text">
      <style:text-properties fo:font-weight="normal" fo:background-color="transparent" style:font-weight-asian="bold" style:font-weight-complex="bold"/>
    </style:style>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User_20_Entry" style:display-name="User Entry" style:family="text">
      <style:text-properties style:font-name="Arial" fo:font-size="8pt" style:font-name-asian="Courier New" style:font-name-complex="Courier New"/>
    </style:style>
    <style:style style:name="Variable" style:family="text">
      <style:text-properties fo:font-style="italic" style:font-style-asian="italic" style:font-style-complex="italic"/>
    </style:style>
    <style:style style:name="RTF_5f_Num_20_2_20_1" style:display-name="RTF_Num 2 1" style:family="text">
      <style:text-properties style:font-name="Helv"/>
    </style:style>
    <style:style style:name="Teletype" style:family="text">
      <style:text-properties style:font-name="Courier New" style:font-name-asian="Courier New" style:font-name-complex="Courier New"/>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svg:width="3.18cm" fo:min-height="0.041cm" text:anchor-type="paragraph" svg:x="1.355cm" svg:y="1.035cm" fo:margin-left="0.101cm" fo:margin-right="0.101cm" fo:margin-top="0.101cm" fo:margin-bottom="0.101cm" style:wrap="none" style:vertical-pos="from-top" style:vertical-rel="paragraph" style:horizontal-pos="from-left"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text:style-name="Numbering_20_Symbols" style:num-prefix=" " style:num-suffix="." style:num-format="1">
        <style:list-level-properties text:min-label-width="1cm" text:min-label-distance="0.379cm"/>
      </text:outline-level-style>
      <text:outline-level-style text:level="2" text:style-name="Numbering_20_Symbols" style:num-suffix="." style:num-format="1" text:display-levels="2">
        <style:list-level-properties text:space-before="0.499cm" text:min-label-width="1cm" text:min-label-distance="0.379cm"/>
      </text:outline-level-style>
      <text:outline-level-style text:level="3" text:style-name="Numbering_20_Symbols" style:num-prefix=" " style:num-suffix=")" style:num-format="">
        <style:list-level-properties text:min-label-distance="0.381cm"/>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ist_20_1" style:display-name="List 1">
      <text:list-level-style-bullet text:level="1" text:style-name="Numbering_20_Symbols" text:bullet-char="•">
        <style:list-level-properties text:min-label-width="0.4cm"/>
        <style:text-properties fo:font-family="Tahoma" style:font-family-generic="swiss" style:font-charset="x-symbol"/>
      </text:list-level-style-bullet>
      <text:list-level-style-bullet text:level="2" text:style-name="Numbering_20_Symbols" text:bullet-char="•">
        <style:list-level-properties text:space-before="0.401cm" text:min-label-width="0.4cm"/>
        <style:text-properties fo:font-family="Tahoma" style:font-family-generic="swiss" style:font-charset="x-symbol"/>
      </text:list-level-style-bullet>
      <text:list-level-style-bullet text:level="3" text:style-name="Numbering_20_Symbols" text:bullet-char="•">
        <style:list-level-properties text:space-before="0.799cm" text:min-label-width="0.4cm"/>
        <style:text-properties fo:font-family="Tahoma" style:font-family-generic="swiss" style:font-charset="x-symbol"/>
      </text:list-level-style-bullet>
      <text:list-level-style-bullet text:level="4" text:style-name="Numbering_20_Symbols" text:bullet-char="•">
        <style:list-level-properties text:space-before="1.2cm" text:min-label-width="0.4cm"/>
        <style:text-properties fo:font-family="Tahoma" style:font-family-generic="swiss" style:font-charset="x-symbol"/>
      </text:list-level-style-bullet>
      <text:list-level-style-bullet text:level="5" text:style-name="Numbering_20_Symbols" text:bullet-char="•">
        <style:list-level-properties text:space-before="1.6cm" text:min-label-width="0.4cm"/>
        <style:text-properties fo:font-family="Tahoma" style:font-family-generic="swiss" style:font-charset="x-symbol"/>
      </text:list-level-style-bullet>
      <text:list-level-style-bullet text:level="6" text:style-name="Numbering_20_Symbols" text:bullet-char="•">
        <style:list-level-properties text:space-before="2.001cm" text:min-label-width="0.4cm"/>
        <style:text-properties fo:font-family="Tahoma" style:font-family-generic="swiss" style:font-charset="x-symbol"/>
      </text:list-level-style-bullet>
      <text:list-level-style-bullet text:level="7" text:style-name="Numbering_20_Symbols" text:bullet-char="•">
        <style:list-level-properties text:space-before="2.399cm" text:min-label-width="0.4cm"/>
        <style:text-properties fo:font-family="Tahoma" style:font-family-generic="swiss" style:font-charset="x-symbol"/>
      </text:list-level-style-bullet>
      <text:list-level-style-bullet text:level="8" text:style-name="Numbering_20_Symbols" text:bullet-char="•">
        <style:list-level-properties text:space-before="2.8cm" text:min-label-width="0.4cm"/>
        <style:text-properties fo:font-family="Tahoma" style:font-family-generic="swiss" style:font-charset="x-symbol"/>
      </text:list-level-style-bullet>
      <text:list-level-style-bullet text:level="9" text:style-name="Numbering_20_Symbols" text:bullet-char="•">
        <style:list-level-properties text:space-before="3.2cm" text:min-label-width="0.4cm"/>
        <style:text-properties fo:font-family="Tahoma" style:font-family-generic="swiss" style:font-charset="x-symbol"/>
      </text:list-level-style-bullet>
      <text:list-level-style-bullet text:level="10" text:style-name="Numbering_20_Symbols" text:bullet-char="•">
        <style:list-level-properties text:space-before="3.601cm" text:min-label-width="0.4cm"/>
        <style:text-properties fo:font-family="Tahoma" style:font-family-generic="swiss" style:font-charset="x-symbol"/>
      </text:list-level-style-bullet>
    </text:list-style>
    <text:list-style style:name="RTF_5f_Num_20_2" style:display-name="RTF_Num 2" text:consecutive-numbering="true">
      <text:list-level-style-number text:level="1" text:style-name="RTF_5f_Num_20_2_20_1" style:num-prefix="•"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Footer">
      <style:text-properties style:font-name="Arial2"/>
    </style:style>
    <style:style style:name="MT1" style:family="text">
      <style:text-properties style:font-name="Arial2"/>
    </style:style>
    <style:style style:name="MT2" style:family="text">
      <style:text-properties fo:language="en" fo:country="US"/>
    </style:style>
    <style:page-layout style:name="Mpm1">
      <style:page-layout-properties fo:page-width="20.999cm" fo:page-height="29.699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6cm" fo:margin-left="0cm" fo:margin-right="0cm" fo:margin-top="0.499cm" style:dynamic-spacing="fals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header-style>
      <style:footer-style>
        <style:header-footer-properties fo:min-height="0.998cm" fo:margin-left="0cm" fo:margin-right="0cm" fo:margin-top="0.499cm"/>
      </style:footer-style>
    </style:page-layout>
    <style:page-layout style:name="Mpm4">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header-style>
      <style:footer-style>
        <style:header-footer-properties fo:min-height="0.998cm" fo:margin-left="0cm" fo:margin-right="0cm" fo:margin-top="0.499cm"/>
      </style:footer-style>
    </style:page-layout>
    <style:page-layout style:name="Mpm7">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text:tab/><text:chapter text:display="name" text:outline-level="1">Logik Bausteine</text:chapter></text:p>
      </style:header>
      <style:header-left>
        <text:p text:style-name="Header"><text:tab/><text:chapter text:display="name" text:outline-level="1">Diverse Funktionen</text:chapter></text:p>
      </style:header-left>
      <style:footer>
        <text:p text:style-name="MP1"><text:page-number text:select-page="current">372</text:page-number><text:tab/><text:tab/>Version 3.03</text:p>
      </style:footer>
      <style:footer-left>
        <text:p text:style-name="MP1"><text:s/><text:page-number text:select-page="current">372</text:page-number><text:tab/><text:tab/>Version 3.03</text:p>
      </style:footer-left>
    </style:master-page>
    <style:master-page style:name="First_20_Page" style:display-name="First Page" style:page-layout-name="Mpm2" style:next-style-name="Standard"/>
    <style:master-page style:name="Index" style:page-layout-name="Mpm3">
      <style:header>
        <text:p text:style-name="Header"/>
      </style:header>
      <style:footer>
        <text:p text:style-name="Footer"/>
      </style:footer>
    </style:master-page>
    <style:master-page style:name="HTML" style:page-layout-name="Mpm4"/>
    <style:master-page style:name="Footnote" style:page-layout-name="Mpm5"/>
    <style:master-page style:name="Endnote" style:page-layout-name="Mpm5"/>
    <style:master-page style:name="Destra" style:page-layout-name="Mpm6" style:next-style-name="Sinistra">
      <style:header>
        <text:p text:style-name="Header"><text:span text:style-name="MT1">Version 2.00<text:tab/><text:tab/></text:span><text:chapter text:display="name" text:outline-level="1"/></text:p>
      </style:header>
      <style:footer>
        <text:p text:style-name="Footer"><text:span text:style-name="MT1">OSCAT Library Referenz<text:tab/><text:tab/></text:span><text:span text:style-name="MT1"><text:page-number style:num-format="1" text:select-page="current">372</text:page-number></text:span></text:p>
      </style:footer>
    </style:master-page>
    <style:master-page style:name="Sinistra" style:page-layout-name="Mpm7" style:next-style-name="Destra">
      <style:header>
        <text:p text:style-name="Header"><text:span text:style-name="MT1"><text:chapter text:display="name" text:outline-level="1"/></text:span><text:span text:style-name="MT1"><text:tab/><text:tab/>Version 2.00</text:span></text:p>
      </style:header>
      <style:footer>
        <text:p text:style-name="Footer"><text:page-number style:num-format="1" text:select-page="current">372</text:page-number><text:tab/><text:tab/>OSCAT <text:span text:style-name="MT2">Library</text:span> Referenz</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meta:creation-date>2008-02-24T20:10:03</meta:creation-date>
    <dc:date>2008-09-11T17:22:13</dc:date>
    <meta:editing-cycles>1</meta:editing-cycles>
    <meta:editing-duration>PT0S</meta:editing-duration>
    <meta:print-date>2008-10-26T23:16:25.36</meta:print-date>
    <meta:document-statistic meta:table-count="51" meta:image-count="754" meta:object-count="21" meta:page-count="517" meta:paragraph-count="8851" meta:word-count="81945" meta:character-count="526961"/>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0.787cm"/>
    </style:style>
    <style:style style:name="co3" style:family="table-column">
      <style:table-column-properties fo:break-before="auto" style:column-width="1.207cm"/>
    </style:style>
    <style:style style:name="co4" style:family="table-column">
      <style:table-column-properties fo:break-before="auto" style:column-width="1.73cm"/>
    </style:style>
    <style:style style:name="ro1" style:family="table-row">
      <style:table-row-properties style:row-height="0.453cm" fo:break-before="auto" style:use-optimal-row-height="true"/>
    </style:style>
    <style:style style:name="ro2" style:family="table-row">
      <style:table-row-properties style:row-height="0.473c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style="italic" fo:font-weight="bold" style:font-style-asian="italic" style:font-weight-asian="bold" style:font-style-complex="italic" style:font-weight-complex="bold"/>
    </style:style>
    <style:style style:name="ce2" style:family="table-cell" style:parent-style-name="Default">
      <style:table-cell-properties style:text-align-source="fix" style:repeat-content="false"/>
      <style:paragraph-properties fo:text-align="start" fo:margin-left="0cm"/>
    </style:style>
  </office:automatic-styles>
  <office:body>
    <office:spreadsheet>
      <table:calculation-settings>
        <table:iteration table:status="enable" table:steps="1000" table:maximum-difference="0.01"/>
      </table:calculation-settings>
      <table:table table:name="Tabelle1" table:style-name="ta1" table:print="false">
        <table:table-column table:style-name="co1" table:default-cell-style-name="Default"/>
        <table:table-column table:style-name="co2" table:default-cell-style-name="Default"/>
        <table:table-column table:style-name="co3" table:default-cell-style-name="ce2"/>
        <table:table-column table:style-name="co4" table:default-cell-style-name="Default"/>
        <table:table-column table:style-name="co2" table:number-columns-repeated="2" table:default-cell-style-name="Default"/>
        <table:table-column table:style-name="co3" table:default-cell-style-name="ce2"/>
        <table:table-column table:style-name="co4" table:default-cell-style-name="Default"/>
        <table:table-column table:style-name="co2" table:number-columns-repeated="2" table:default-cell-style-name="Default"/>
        <table:table-column table:style-name="co3" table:default-cell-style-name="ce2"/>
        <table:table-column table:style-name="co4" table:default-cell-style-name="Default"/>
        <table:table-column table:style-name="co1" table:number-columns-repeated="244" table:default-cell-style-name="Default"/>
        <table:table-row table:style-name="ro1">
          <table:table-cell table:style-name="ce1"/>
          <table:table-cell table:style-name="ce1" office:value-type="string">
            <text:p>char</text:p>
          </table:table-cell>
          <table:table-cell table:style-name="ce1" office:value-type="string">
            <text:p>code</text:p>
          </table:table-cell>
          <table:table-cell table:style-name="ce1" office:value-type="string">
            <text:p>name</text:p>
          </table:table-cell>
          <table:table-cell table:style-name="ce1"/>
          <table:table-cell table:style-name="ce1" office:value-type="string">
            <text:p>char</text:p>
          </table:table-cell>
          <table:table-cell table:style-name="ce1" office:value-type="string">
            <text:p>code</text:p>
          </table:table-cell>
          <table:table-cell table:style-name="ce1" office:value-type="string">
            <text:p>name</text:p>
          </table:table-cell>
          <table:table-cell table:style-name="ce1"/>
          <table:table-cell table:style-name="ce1" office:value-type="string">
            <text:p>char</text:p>
          </table:table-cell>
          <table:table-cell table:style-name="ce1" office:value-type="string">
            <text:p>code</text:p>
          </table:table-cell>
          <table:table-cell table:style-name="ce1" office:value-type="string">
            <text:p>name</text:p>
          </table:table-cell>
          <table:table-cell table:style-name="ce1" table:number-columns-repeated="244"/>
        </table:table-row>
        <table:table-row table:style-name="ro1">
          <table:table-cell table:number-columns-repeated="2"/>
          <table:table-cell table:style-name="Default"/>
          <table:table-cell table:number-columns-repeated="3"/>
          <table:table-cell table:style-name="Default"/>
          <table:table-cell table:number-columns-repeated="3"/>
          <table:table-cell table:style-name="Default"/>
          <table:table-cell table:number-columns-repeated="245"/>
        </table:table-row>
        <table:table-row table:style-name="ro2">
          <table:table-cell/>
          <table:table-cell office:value-type="string">
            <text:p>"</text:p>
          </table:table-cell>
          <table:table-cell office:value-type="float" office:value="34">
            <text:p>34</text:p>
          </table:table-cell>
          <table:table-cell office:value-type="string">
            <text:p>quot</text:p>
          </table:table-cell>
          <table:table-cell/>
          <table:table-cell office:value-type="string">
            <text:p>½</text:p>
          </table:table-cell>
          <table:table-cell office:value-type="float" office:value="189">
            <text:p>189</text:p>
          </table:table-cell>
          <table:table-cell office:value-type="string">
            <text:p>frac12</text:p>
          </table:table-cell>
          <table:table-cell/>
          <table:table-cell office:value-type="string">
            <text:p>ß</text:p>
          </table:table-cell>
          <table:table-cell office:value-type="float" office:value="223">
            <text:p>223</text:p>
          </table:table-cell>
          <table:table-cell office:value-type="string">
            <text:p>szlig</text:p>
          </table:table-cell>
          <table:table-cell table:number-columns-repeated="244"/>
        </table:table-row>
        <table:table-row table:style-name="ro2">
          <table:table-cell/>
          <table:table-cell office:value-type="string">
            <text:p>&amp;</text:p>
          </table:table-cell>
          <table:table-cell office:value-type="float" office:value="38">
            <text:p>38</text:p>
          </table:table-cell>
          <table:table-cell office:value-type="string">
            <text:p>amp</text:p>
          </table:table-cell>
          <table:table-cell/>
          <table:table-cell office:value-type="string">
            <text:p>¾</text:p>
          </table:table-cell>
          <table:table-cell office:value-type="float" office:value="190">
            <text:p>190</text:p>
          </table:table-cell>
          <table:table-cell office:value-type="string">
            <text:p>frac34</text:p>
          </table:table-cell>
          <table:table-cell/>
          <table:table-cell office:value-type="string">
            <text:p>à</text:p>
          </table:table-cell>
          <table:table-cell office:value-type="float" office:value="224">
            <text:p>224</text:p>
          </table:table-cell>
          <table:table-cell office:value-type="string">
            <text:p>agrave</text:p>
          </table:table-cell>
          <table:table-cell table:number-columns-repeated="244"/>
        </table:table-row>
        <table:table-row table:style-name="ro2">
          <table:table-cell/>
          <table:table-cell office:value-type="string">
            <text:p>&lt;</text:p>
          </table:table-cell>
          <table:table-cell office:value-type="float" office:value="60">
            <text:p>60</text:p>
          </table:table-cell>
          <table:table-cell office:value-type="string">
            <text:p>lt</text:p>
          </table:table-cell>
          <table:table-cell/>
          <table:table-cell office:value-type="string">
            <text:p>¿</text:p>
          </table:table-cell>
          <table:table-cell office:value-type="float" office:value="191">
            <text:p>191</text:p>
          </table:table-cell>
          <table:table-cell office:value-type="string">
            <text:p>iquest</text:p>
          </table:table-cell>
          <table:table-cell/>
          <table:table-cell office:value-type="string">
            <text:p>á</text:p>
          </table:table-cell>
          <table:table-cell office:value-type="float" office:value="225">
            <text:p>225</text:p>
          </table:table-cell>
          <table:table-cell office:value-type="string">
            <text:p>aacute</text:p>
          </table:table-cell>
          <table:table-cell table:number-columns-repeated="244"/>
        </table:table-row>
        <table:table-row table:style-name="ro2">
          <table:table-cell/>
          <table:table-cell office:value-type="string">
            <text:p>&gt;</text:p>
          </table:table-cell>
          <table:table-cell office:value-type="float" office:value="62">
            <text:p>62</text:p>
          </table:table-cell>
          <table:table-cell office:value-type="string">
            <text:p>gt</text:p>
          </table:table-cell>
          <table:table-cell/>
          <table:table-cell office:value-type="string">
            <text:p>À</text:p>
          </table:table-cell>
          <table:table-cell office:value-type="float" office:value="192">
            <text:p>192</text:p>
          </table:table-cell>
          <table:table-cell office:value-type="string">
            <text:p>Agrave</text:p>
          </table:table-cell>
          <table:table-cell/>
          <table:table-cell office:value-type="string">
            <text:p>â</text:p>
          </table:table-cell>
          <table:table-cell office:value-type="float" office:value="226">
            <text:p>226</text:p>
          </table:table-cell>
          <table:table-cell office:value-type="string">
            <text:p>acirc</text:p>
          </table:table-cell>
          <table:table-cell table:number-columns-repeated="244"/>
        </table:table-row>
        <table:table-row table:style-name="ro2">
          <table:table-cell/>
          <table:table-cell office:value-type="string">
            <text:p>€</text:p>
          </table:table-cell>
          <table:table-cell office:value-type="float" office:value="128">
            <text:p>128</text:p>
          </table:table-cell>
          <table:table-cell office:value-type="string">
            <text:p>euro</text:p>
          </table:table-cell>
          <table:table-cell/>
          <table:table-cell office:value-type="string">
            <text:p>Á</text:p>
          </table:table-cell>
          <table:table-cell office:value-type="float" office:value="193">
            <text:p>193</text:p>
          </table:table-cell>
          <table:table-cell office:value-type="string">
            <text:p>Aacute</text:p>
          </table:table-cell>
          <table:table-cell/>
          <table:table-cell office:value-type="string">
            <text:p>ã</text:p>
          </table:table-cell>
          <table:table-cell office:value-type="float" office:value="227">
            <text:p>227</text:p>
          </table:table-cell>
          <table:table-cell office:value-type="string">
            <text:p>atilde</text:p>
          </table:table-cell>
          <table:table-cell table:number-columns-repeated="244"/>
        </table:table-row>
        <table:table-row table:style-name="ro2">
          <table:table-cell/>
          <table:table-cell office:value-type="string">
            <text:p> </text:p>
          </table:table-cell>
          <table:table-cell office:value-type="float" office:value="160">
            <text:p>160</text:p>
          </table:table-cell>
          <table:table-cell office:value-type="string">
            <text:p>nbsp</text:p>
          </table:table-cell>
          <table:table-cell/>
          <table:table-cell office:value-type="string">
            <text:p>Â</text:p>
          </table:table-cell>
          <table:table-cell office:value-type="float" office:value="194">
            <text:p>194</text:p>
          </table:table-cell>
          <table:table-cell office:value-type="string">
            <text:p>Acirc</text:p>
          </table:table-cell>
          <table:table-cell/>
          <table:table-cell office:value-type="string">
            <text:p>ä</text:p>
          </table:table-cell>
          <table:table-cell office:value-type="float" office:value="228">
            <text:p>228</text:p>
          </table:table-cell>
          <table:table-cell office:value-type="string">
            <text:p>auml</text:p>
          </table:table-cell>
          <table:table-cell table:number-columns-repeated="244"/>
        </table:table-row>
        <table:table-row table:style-name="ro2">
          <table:table-cell/>
          <table:table-cell office:value-type="string">
            <text:p>¡</text:p>
          </table:table-cell>
          <table:table-cell office:value-type="float" office:value="161">
            <text:p>161</text:p>
          </table:table-cell>
          <table:table-cell office:value-type="string">
            <text:p>iexcl</text:p>
          </table:table-cell>
          <table:table-cell/>
          <table:table-cell office:value-type="string">
            <text:p>Ã</text:p>
          </table:table-cell>
          <table:table-cell office:value-type="float" office:value="195">
            <text:p>195</text:p>
          </table:table-cell>
          <table:table-cell office:value-type="string">
            <text:p>Atilde</text:p>
          </table:table-cell>
          <table:table-cell/>
          <table:table-cell office:value-type="string">
            <text:p>å</text:p>
          </table:table-cell>
          <table:table-cell office:value-type="float" office:value="229">
            <text:p>229</text:p>
          </table:table-cell>
          <table:table-cell office:value-type="string">
            <text:p>aring</text:p>
          </table:table-cell>
          <table:table-cell table:number-columns-repeated="244"/>
        </table:table-row>
        <table:table-row table:style-name="ro2">
          <table:table-cell/>
          <table:table-cell office:value-type="string">
            <text:p>¢</text:p>
          </table:table-cell>
          <table:table-cell office:value-type="float" office:value="162">
            <text:p>162</text:p>
          </table:table-cell>
          <table:table-cell office:value-type="string">
            <text:p>cent</text:p>
          </table:table-cell>
          <table:table-cell/>
          <table:table-cell office:value-type="string">
            <text:p>Ä</text:p>
          </table:table-cell>
          <table:table-cell office:value-type="float" office:value="196">
            <text:p>196</text:p>
          </table:table-cell>
          <table:table-cell office:value-type="string">
            <text:p>Auml</text:p>
          </table:table-cell>
          <table:table-cell/>
          <table:table-cell office:value-type="string">
            <text:p>æ</text:p>
          </table:table-cell>
          <table:table-cell office:value-type="float" office:value="230">
            <text:p>230</text:p>
          </table:table-cell>
          <table:table-cell office:value-type="string">
            <text:p>aelig</text:p>
          </table:table-cell>
          <table:table-cell table:number-columns-repeated="244"/>
        </table:table-row>
        <table:table-row table:style-name="ro2">
          <table:table-cell/>
          <table:table-cell office:value-type="string">
            <text:p>£</text:p>
          </table:table-cell>
          <table:table-cell office:value-type="float" office:value="163">
            <text:p>163</text:p>
          </table:table-cell>
          <table:table-cell office:value-type="string">
            <text:p>pound</text:p>
          </table:table-cell>
          <table:table-cell/>
          <table:table-cell office:value-type="string">
            <text:p>Å</text:p>
          </table:table-cell>
          <table:table-cell office:value-type="float" office:value="197">
            <text:p>197</text:p>
          </table:table-cell>
          <table:table-cell office:value-type="string">
            <text:p>Aring</text:p>
          </table:table-cell>
          <table:table-cell/>
          <table:table-cell office:value-type="string">
            <text:p>ç</text:p>
          </table:table-cell>
          <table:table-cell office:value-type="float" office:value="231">
            <text:p>231</text:p>
          </table:table-cell>
          <table:table-cell office:value-type="string">
            <text:p>ccedil</text:p>
          </table:table-cell>
          <table:table-cell table:number-columns-repeated="244"/>
        </table:table-row>
        <table:table-row table:style-name="ro2">
          <table:table-cell/>
          <table:table-cell office:value-type="string">
            <text:p>¤</text:p>
          </table:table-cell>
          <table:table-cell office:value-type="float" office:value="164">
            <text:p>164</text:p>
          </table:table-cell>
          <table:table-cell office:value-type="string">
            <text:p>curren</text:p>
          </table:table-cell>
          <table:table-cell/>
          <table:table-cell office:value-type="string">
            <text:p>Æ</text:p>
          </table:table-cell>
          <table:table-cell office:value-type="float" office:value="198">
            <text:p>198</text:p>
          </table:table-cell>
          <table:table-cell office:value-type="string">
            <text:p>AElig</text:p>
          </table:table-cell>
          <table:table-cell/>
          <table:table-cell office:value-type="string">
            <text:p>è</text:p>
          </table:table-cell>
          <table:table-cell office:value-type="float" office:value="232">
            <text:p>232</text:p>
          </table:table-cell>
          <table:table-cell office:value-type="string">
            <text:p>egrave</text:p>
          </table:table-cell>
          <table:table-cell table:number-columns-repeated="244"/>
        </table:table-row>
        <table:table-row table:style-name="ro2">
          <table:table-cell/>
          <table:table-cell office:value-type="string">
            <text:p>¥</text:p>
          </table:table-cell>
          <table:table-cell office:value-type="float" office:value="165">
            <text:p>165</text:p>
          </table:table-cell>
          <table:table-cell office:value-type="string">
            <text:p>yen</text:p>
          </table:table-cell>
          <table:table-cell/>
          <table:table-cell office:value-type="string">
            <text:p>Ç</text:p>
          </table:table-cell>
          <table:table-cell office:value-type="float" office:value="199">
            <text:p>199</text:p>
          </table:table-cell>
          <table:table-cell office:value-type="string">
            <text:p>Ccedil</text:p>
          </table:table-cell>
          <table:table-cell/>
          <table:table-cell office:value-type="string">
            <text:p>é</text:p>
          </table:table-cell>
          <table:table-cell office:value-type="float" office:value="233">
            <text:p>233</text:p>
          </table:table-cell>
          <table:table-cell office:value-type="string">
            <text:p>eacute</text:p>
          </table:table-cell>
          <table:table-cell table:number-columns-repeated="244"/>
        </table:table-row>
        <table:table-row table:style-name="ro2">
          <table:table-cell/>
          <table:table-cell office:value-type="string">
            <text:p>¦</text:p>
          </table:table-cell>
          <table:table-cell office:value-type="float" office:value="166">
            <text:p>166</text:p>
          </table:table-cell>
          <table:table-cell office:value-type="string">
            <text:p>brvbar</text:p>
          </table:table-cell>
          <table:table-cell/>
          <table:table-cell office:value-type="string">
            <text:p>È</text:p>
          </table:table-cell>
          <table:table-cell office:value-type="float" office:value="200">
            <text:p>200</text:p>
          </table:table-cell>
          <table:table-cell office:value-type="string">
            <text:p>Egrave</text:p>
          </table:table-cell>
          <table:table-cell/>
          <table:table-cell office:value-type="string">
            <text:p>ê</text:p>
          </table:table-cell>
          <table:table-cell office:value-type="float" office:value="234">
            <text:p>234</text:p>
          </table:table-cell>
          <table:table-cell office:value-type="string">
            <text:p>ecirc</text:p>
          </table:table-cell>
          <table:table-cell table:number-columns-repeated="244"/>
        </table:table-row>
        <table:table-row table:style-name="ro2">
          <table:table-cell/>
          <table:table-cell office:value-type="string">
            <text:p>§</text:p>
          </table:table-cell>
          <table:table-cell office:value-type="float" office:value="167">
            <text:p>167</text:p>
          </table:table-cell>
          <table:table-cell office:value-type="string">
            <text:p>sect</text:p>
          </table:table-cell>
          <table:table-cell/>
          <table:table-cell office:value-type="string">
            <text:p>É</text:p>
          </table:table-cell>
          <table:table-cell office:value-type="float" office:value="201">
            <text:p>201</text:p>
          </table:table-cell>
          <table:table-cell office:value-type="string">
            <text:p>Eacute</text:p>
          </table:table-cell>
          <table:table-cell/>
          <table:table-cell office:value-type="string">
            <text:p>ë</text:p>
          </table:table-cell>
          <table:table-cell office:value-type="float" office:value="235">
            <text:p>235</text:p>
          </table:table-cell>
          <table:table-cell office:value-type="string">
            <text:p>euml</text:p>
          </table:table-cell>
          <table:table-cell table:number-columns-repeated="244"/>
        </table:table-row>
        <table:table-row table:style-name="ro2">
          <table:table-cell/>
          <table:table-cell office:value-type="string">
            <text:p>¨</text:p>
          </table:table-cell>
          <table:table-cell office:value-type="float" office:value="168">
            <text:p>168</text:p>
          </table:table-cell>
          <table:table-cell office:value-type="string">
            <text:p>uml</text:p>
          </table:table-cell>
          <table:table-cell/>
          <table:table-cell office:value-type="string">
            <text:p>Ê</text:p>
          </table:table-cell>
          <table:table-cell office:value-type="float" office:value="202">
            <text:p>202</text:p>
          </table:table-cell>
          <table:table-cell office:value-type="string">
            <text:p>Ecirc</text:p>
          </table:table-cell>
          <table:table-cell/>
          <table:table-cell office:value-type="string">
            <text:p>ì</text:p>
          </table:table-cell>
          <table:table-cell office:value-type="float" office:value="236">
            <text:p>236</text:p>
          </table:table-cell>
          <table:table-cell office:value-type="string">
            <text:p>igrave</text:p>
          </table:table-cell>
          <table:table-cell table:number-columns-repeated="244"/>
        </table:table-row>
        <table:table-row table:style-name="ro2">
          <table:table-cell/>
          <table:table-cell office:value-type="string">
            <text:p>©</text:p>
          </table:table-cell>
          <table:table-cell office:value-type="float" office:value="169">
            <text:p>169</text:p>
          </table:table-cell>
          <table:table-cell office:value-type="string">
            <text:p>copy</text:p>
          </table:table-cell>
          <table:table-cell/>
          <table:table-cell office:value-type="string">
            <text:p>Ë</text:p>
          </table:table-cell>
          <table:table-cell office:value-type="float" office:value="203">
            <text:p>203</text:p>
          </table:table-cell>
          <table:table-cell office:value-type="string">
            <text:p>Euml</text:p>
          </table:table-cell>
          <table:table-cell/>
          <table:table-cell office:value-type="string">
            <text:p>í</text:p>
          </table:table-cell>
          <table:table-cell office:value-type="float" office:value="237">
            <text:p>237</text:p>
          </table:table-cell>
          <table:table-cell office:value-type="string">
            <text:p>iacute</text:p>
          </table:table-cell>
          <table:table-cell table:number-columns-repeated="244"/>
        </table:table-row>
        <table:table-row table:style-name="ro2">
          <table:table-cell/>
          <table:table-cell office:value-type="string">
            <text:p>ª</text:p>
          </table:table-cell>
          <table:table-cell office:value-type="float" office:value="170">
            <text:p>170</text:p>
          </table:table-cell>
          <table:table-cell office:value-type="string">
            <text:p>ordf</text:p>
          </table:table-cell>
          <table:table-cell/>
          <table:table-cell office:value-type="string">
            <text:p>Ì</text:p>
          </table:table-cell>
          <table:table-cell office:value-type="float" office:value="204">
            <text:p>204</text:p>
          </table:table-cell>
          <table:table-cell office:value-type="string">
            <text:p>Igrave</text:p>
          </table:table-cell>
          <table:table-cell/>
          <table:table-cell office:value-type="string">
            <text:p>î</text:p>
          </table:table-cell>
          <table:table-cell office:value-type="float" office:value="238">
            <text:p>238</text:p>
          </table:table-cell>
          <table:table-cell office:value-type="string">
            <text:p>icirc</text:p>
          </table:table-cell>
          <table:table-cell table:number-columns-repeated="244"/>
        </table:table-row>
        <table:table-row table:style-name="ro2">
          <table:table-cell/>
          <table:table-cell office:value-type="string">
            <text:p>«</text:p>
          </table:table-cell>
          <table:table-cell office:value-type="float" office:value="171">
            <text:p>171</text:p>
          </table:table-cell>
          <table:table-cell office:value-type="string">
            <text:p>laquo</text:p>
          </table:table-cell>
          <table:table-cell/>
          <table:table-cell office:value-type="string">
            <text:p>Í</text:p>
          </table:table-cell>
          <table:table-cell office:value-type="float" office:value="205">
            <text:p>205</text:p>
          </table:table-cell>
          <table:table-cell office:value-type="string">
            <text:p>Iacute</text:p>
          </table:table-cell>
          <table:table-cell/>
          <table:table-cell office:value-type="string">
            <text:p>ï</text:p>
          </table:table-cell>
          <table:table-cell office:value-type="float" office:value="239">
            <text:p>239</text:p>
          </table:table-cell>
          <table:table-cell office:value-type="string">
            <text:p>iuml</text:p>
          </table:table-cell>
          <table:table-cell table:number-columns-repeated="244"/>
        </table:table-row>
        <table:table-row table:style-name="ro2">
          <table:table-cell/>
          <table:table-cell office:value-type="string">
            <text:p>¬</text:p>
          </table:table-cell>
          <table:table-cell office:value-type="float" office:value="172">
            <text:p>172</text:p>
          </table:table-cell>
          <table:table-cell office:value-type="string">
            <text:p>not</text:p>
          </table:table-cell>
          <table:table-cell/>
          <table:table-cell office:value-type="string">
            <text:p>Î</text:p>
          </table:table-cell>
          <table:table-cell office:value-type="float" office:value="206">
            <text:p>206</text:p>
          </table:table-cell>
          <table:table-cell office:value-type="string">
            <text:p>Icirc</text:p>
          </table:table-cell>
          <table:table-cell/>
          <table:table-cell office:value-type="string">
            <text:p>ð</text:p>
          </table:table-cell>
          <table:table-cell office:value-type="float" office:value="240">
            <text:p>240</text:p>
          </table:table-cell>
          <table:table-cell office:value-type="string">
            <text:p>eth</text:p>
          </table:table-cell>
          <table:table-cell table:number-columns-repeated="244"/>
        </table:table-row>
        <table:table-row table:style-name="ro2">
          <table:table-cell/>
          <table:table-cell office:value-type="string">
            <text:p>­</text:p>
          </table:table-cell>
          <table:table-cell office:value-type="float" office:value="173">
            <text:p>173</text:p>
          </table:table-cell>
          <table:table-cell office:value-type="string">
            <text:p>shy</text:p>
          </table:table-cell>
          <table:table-cell/>
          <table:table-cell office:value-type="string">
            <text:p>Ï</text:p>
          </table:table-cell>
          <table:table-cell office:value-type="float" office:value="207">
            <text:p>207</text:p>
          </table:table-cell>
          <table:table-cell office:value-type="string">
            <text:p>Iuml</text:p>
          </table:table-cell>
          <table:table-cell/>
          <table:table-cell office:value-type="string">
            <text:p>ñ</text:p>
          </table:table-cell>
          <table:table-cell office:value-type="float" office:value="241">
            <text:p>241</text:p>
          </table:table-cell>
          <table:table-cell office:value-type="string">
            <text:p>ntilde</text:p>
          </table:table-cell>
          <table:table-cell table:number-columns-repeated="244"/>
        </table:table-row>
        <table:table-row table:style-name="ro2">
          <table:table-cell/>
          <table:table-cell office:value-type="string">
            <text:p>®</text:p>
          </table:table-cell>
          <table:table-cell office:value-type="float" office:value="174">
            <text:p>174</text:p>
          </table:table-cell>
          <table:table-cell office:value-type="string">
            <text:p>reg</text:p>
          </table:table-cell>
          <table:table-cell/>
          <table:table-cell office:value-type="string">
            <text:p>Ð</text:p>
          </table:table-cell>
          <table:table-cell office:value-type="float" office:value="208">
            <text:p>208</text:p>
          </table:table-cell>
          <table:table-cell office:value-type="string">
            <text:p>ETH</text:p>
          </table:table-cell>
          <table:table-cell/>
          <table:table-cell office:value-type="string">
            <text:p>ò</text:p>
          </table:table-cell>
          <table:table-cell office:value-type="float" office:value="242">
            <text:p>242</text:p>
          </table:table-cell>
          <table:table-cell office:value-type="string">
            <text:p>ograve</text:p>
          </table:table-cell>
          <table:table-cell table:number-columns-repeated="244"/>
        </table:table-row>
        <table:table-row table:style-name="ro2">
          <table:table-cell/>
          <table:table-cell office:value-type="string">
            <text:p>¯</text:p>
          </table:table-cell>
          <table:table-cell office:value-type="float" office:value="175">
            <text:p>175</text:p>
          </table:table-cell>
          <table:table-cell office:value-type="string">
            <text:p>macr</text:p>
          </table:table-cell>
          <table:table-cell/>
          <table:table-cell office:value-type="string">
            <text:p>Ñ</text:p>
          </table:table-cell>
          <table:table-cell office:value-type="float" office:value="209">
            <text:p>209</text:p>
          </table:table-cell>
          <table:table-cell office:value-type="string">
            <text:p>Ntilde</text:p>
          </table:table-cell>
          <table:table-cell/>
          <table:table-cell office:value-type="string">
            <text:p>ó</text:p>
          </table:table-cell>
          <table:table-cell office:value-type="float" office:value="243">
            <text:p>243</text:p>
          </table:table-cell>
          <table:table-cell office:value-type="string">
            <text:p>oacute</text:p>
          </table:table-cell>
          <table:table-cell table:number-columns-repeated="244"/>
        </table:table-row>
        <table:table-row table:style-name="ro2">
          <table:table-cell/>
          <table:table-cell office:value-type="string">
            <text:p>°</text:p>
          </table:table-cell>
          <table:table-cell office:value-type="float" office:value="176">
            <text:p>176</text:p>
          </table:table-cell>
          <table:table-cell office:value-type="string">
            <text:p>deg</text:p>
          </table:table-cell>
          <table:table-cell/>
          <table:table-cell office:value-type="string">
            <text:p>Ò</text:p>
          </table:table-cell>
          <table:table-cell office:value-type="float" office:value="210">
            <text:p>210</text:p>
          </table:table-cell>
          <table:table-cell office:value-type="string">
            <text:p>Ograve</text:p>
          </table:table-cell>
          <table:table-cell/>
          <table:table-cell office:value-type="string">
            <text:p>ô</text:p>
          </table:table-cell>
          <table:table-cell office:value-type="float" office:value="244">
            <text:p>244</text:p>
          </table:table-cell>
          <table:table-cell office:value-type="string">
            <text:p>ocirc</text:p>
          </table:table-cell>
          <table:table-cell table:number-columns-repeated="244"/>
        </table:table-row>
        <table:table-row table:style-name="ro2">
          <table:table-cell/>
          <table:table-cell office:value-type="string">
            <text:p>±</text:p>
          </table:table-cell>
          <table:table-cell office:value-type="float" office:value="177">
            <text:p>177</text:p>
          </table:table-cell>
          <table:table-cell office:value-type="string">
            <text:p>plusmn</text:p>
          </table:table-cell>
          <table:table-cell/>
          <table:table-cell office:value-type="string">
            <text:p>Ó</text:p>
          </table:table-cell>
          <table:table-cell office:value-type="float" office:value="211">
            <text:p>211</text:p>
          </table:table-cell>
          <table:table-cell office:value-type="string">
            <text:p>Oacute</text:p>
          </table:table-cell>
          <table:table-cell/>
          <table:table-cell office:value-type="string">
            <text:p>õ</text:p>
          </table:table-cell>
          <table:table-cell office:value-type="float" office:value="245">
            <text:p>245</text:p>
          </table:table-cell>
          <table:table-cell office:value-type="string">
            <text:p>otilde</text:p>
          </table:table-cell>
          <table:table-cell table:number-columns-repeated="244"/>
        </table:table-row>
        <table:table-row table:style-name="ro2">
          <table:table-cell/>
          <table:table-cell office:value-type="string">
            <text:p>²</text:p>
          </table:table-cell>
          <table:table-cell office:value-type="float" office:value="178">
            <text:p>178</text:p>
          </table:table-cell>
          <table:table-cell office:value-type="string">
            <text:p>sup2</text:p>
          </table:table-cell>
          <table:table-cell/>
          <table:table-cell office:value-type="string">
            <text:p>Ô</text:p>
          </table:table-cell>
          <table:table-cell office:value-type="float" office:value="212">
            <text:p>212</text:p>
          </table:table-cell>
          <table:table-cell office:value-type="string">
            <text:p>Ocirc</text:p>
          </table:table-cell>
          <table:table-cell/>
          <table:table-cell office:value-type="string">
            <text:p>ö</text:p>
          </table:table-cell>
          <table:table-cell office:value-type="float" office:value="246">
            <text:p>246</text:p>
          </table:table-cell>
          <table:table-cell office:value-type="string">
            <text:p>ouml</text:p>
          </table:table-cell>
          <table:table-cell table:number-columns-repeated="244"/>
        </table:table-row>
        <table:table-row table:style-name="ro2">
          <table:table-cell/>
          <table:table-cell office:value-type="string">
            <text:p>³</text:p>
          </table:table-cell>
          <table:table-cell office:value-type="float" office:value="179">
            <text:p>179</text:p>
          </table:table-cell>
          <table:table-cell office:value-type="string">
            <text:p>sup3</text:p>
          </table:table-cell>
          <table:table-cell/>
          <table:table-cell office:value-type="string">
            <text:p>Õ</text:p>
          </table:table-cell>
          <table:table-cell office:value-type="float" office:value="213">
            <text:p>213</text:p>
          </table:table-cell>
          <table:table-cell office:value-type="string">
            <text:p>Otilde</text:p>
          </table:table-cell>
          <table:table-cell/>
          <table:table-cell office:value-type="string">
            <text:p>÷</text:p>
          </table:table-cell>
          <table:table-cell office:value-type="float" office:value="247">
            <text:p>247</text:p>
          </table:table-cell>
          <table:table-cell office:value-type="string">
            <text:p>divide</text:p>
          </table:table-cell>
          <table:table-cell table:number-columns-repeated="244"/>
        </table:table-row>
        <table:table-row table:style-name="ro2">
          <table:table-cell/>
          <table:table-cell office:value-type="string">
            <text:p>´</text:p>
          </table:table-cell>
          <table:table-cell office:value-type="float" office:value="180">
            <text:p>180</text:p>
          </table:table-cell>
          <table:table-cell office:value-type="string">
            <text:p>acute</text:p>
          </table:table-cell>
          <table:table-cell/>
          <table:table-cell office:value-type="string">
            <text:p>Ö</text:p>
          </table:table-cell>
          <table:table-cell office:value-type="float" office:value="214">
            <text:p>214</text:p>
          </table:table-cell>
          <table:table-cell office:value-type="string">
            <text:p>Ouml</text:p>
          </table:table-cell>
          <table:table-cell/>
          <table:table-cell office:value-type="string">
            <text:p>ø</text:p>
          </table:table-cell>
          <table:table-cell office:value-type="float" office:value="248">
            <text:p>248</text:p>
          </table:table-cell>
          <table:table-cell office:value-type="string">
            <text:p>oslash</text:p>
          </table:table-cell>
          <table:table-cell table:number-columns-repeated="244"/>
        </table:table-row>
        <table:table-row table:style-name="ro2">
          <table:table-cell/>
          <table:table-cell office:value-type="string">
            <text:p>µ</text:p>
          </table:table-cell>
          <table:table-cell office:value-type="float" office:value="181">
            <text:p>181</text:p>
          </table:table-cell>
          <table:table-cell office:value-type="string">
            <text:p>micro</text:p>
          </table:table-cell>
          <table:table-cell/>
          <table:table-cell office:value-type="string">
            <text:p>×</text:p>
          </table:table-cell>
          <table:table-cell office:value-type="float" office:value="215">
            <text:p>215</text:p>
          </table:table-cell>
          <table:table-cell office:value-type="string">
            <text:p>times</text:p>
          </table:table-cell>
          <table:table-cell/>
          <table:table-cell office:value-type="string">
            <text:p>ù</text:p>
          </table:table-cell>
          <table:table-cell office:value-type="float" office:value="249">
            <text:p>249</text:p>
          </table:table-cell>
          <table:table-cell office:value-type="string">
            <text:p>ugrave</text:p>
          </table:table-cell>
          <table:table-cell table:number-columns-repeated="244"/>
        </table:table-row>
        <table:table-row table:style-name="ro2">
          <table:table-cell/>
          <table:table-cell office:value-type="string">
            <text:p>¶</text:p>
          </table:table-cell>
          <table:table-cell office:value-type="float" office:value="182">
            <text:p>182</text:p>
          </table:table-cell>
          <table:table-cell office:value-type="string">
            <text:p>para</text:p>
          </table:table-cell>
          <table:table-cell/>
          <table:table-cell office:value-type="string">
            <text:p>Ø</text:p>
          </table:table-cell>
          <table:table-cell office:value-type="float" office:value="216">
            <text:p>216</text:p>
          </table:table-cell>
          <table:table-cell office:value-type="string">
            <text:p>Oslash</text:p>
          </table:table-cell>
          <table:table-cell/>
          <table:table-cell office:value-type="string">
            <text:p>ú</text:p>
          </table:table-cell>
          <table:table-cell office:value-type="float" office:value="250">
            <text:p>250</text:p>
          </table:table-cell>
          <table:table-cell office:value-type="string">
            <text:p>uacute</text:p>
          </table:table-cell>
          <table:table-cell table:number-columns-repeated="244"/>
        </table:table-row>
        <table:table-row table:style-name="ro2">
          <table:table-cell/>
          <table:table-cell office:value-type="string">
            <text:p>·</text:p>
          </table:table-cell>
          <table:table-cell office:value-type="float" office:value="183">
            <text:p>183</text:p>
          </table:table-cell>
          <table:table-cell office:value-type="string">
            <text:p>middot</text:p>
          </table:table-cell>
          <table:table-cell/>
          <table:table-cell office:value-type="string">
            <text:p>Ù</text:p>
          </table:table-cell>
          <table:table-cell office:value-type="float" office:value="217">
            <text:p>217</text:p>
          </table:table-cell>
          <table:table-cell office:value-type="string">
            <text:p>Ugrave</text:p>
          </table:table-cell>
          <table:table-cell/>
          <table:table-cell office:value-type="string">
            <text:p>û</text:p>
          </table:table-cell>
          <table:table-cell office:value-type="float" office:value="251">
            <text:p>251</text:p>
          </table:table-cell>
          <table:table-cell office:value-type="string">
            <text:p>ucirc</text:p>
          </table:table-cell>
          <table:table-cell table:number-columns-repeated="244"/>
        </table:table-row>
        <table:table-row table:style-name="ro2">
          <table:table-cell/>
          <table:table-cell office:value-type="string">
            <text:p>¸</text:p>
          </table:table-cell>
          <table:table-cell office:value-type="float" office:value="184">
            <text:p>184</text:p>
          </table:table-cell>
          <table:table-cell office:value-type="string">
            <text:p>cedil</text:p>
          </table:table-cell>
          <table:table-cell/>
          <table:table-cell office:value-type="string">
            <text:p>Ú</text:p>
          </table:table-cell>
          <table:table-cell office:value-type="float" office:value="218">
            <text:p>218</text:p>
          </table:table-cell>
          <table:table-cell office:value-type="string">
            <text:p>Uacute</text:p>
          </table:table-cell>
          <table:table-cell/>
          <table:table-cell office:value-type="string">
            <text:p>ü</text:p>
          </table:table-cell>
          <table:table-cell office:value-type="float" office:value="252">
            <text:p>252</text:p>
          </table:table-cell>
          <table:table-cell office:value-type="string">
            <text:p>uuml</text:p>
          </table:table-cell>
          <table:table-cell table:number-columns-repeated="244"/>
        </table:table-row>
        <table:table-row table:style-name="ro2">
          <table:table-cell/>
          <table:table-cell office:value-type="string">
            <text:p>¹</text:p>
          </table:table-cell>
          <table:table-cell office:value-type="float" office:value="185">
            <text:p>185</text:p>
          </table:table-cell>
          <table:table-cell office:value-type="string">
            <text:p>sup1</text:p>
          </table:table-cell>
          <table:table-cell/>
          <table:table-cell office:value-type="string">
            <text:p>Û</text:p>
          </table:table-cell>
          <table:table-cell office:value-type="float" office:value="219">
            <text:p>219</text:p>
          </table:table-cell>
          <table:table-cell office:value-type="string">
            <text:p>Ucirc</text:p>
          </table:table-cell>
          <table:table-cell/>
          <table:table-cell office:value-type="string">
            <text:p>ý</text:p>
          </table:table-cell>
          <table:table-cell office:value-type="float" office:value="253">
            <text:p>253</text:p>
          </table:table-cell>
          <table:table-cell office:value-type="string">
            <text:p>yacute</text:p>
          </table:table-cell>
          <table:table-cell table:number-columns-repeated="244"/>
        </table:table-row>
        <table:table-row table:style-name="ro2">
          <table:table-cell/>
          <table:table-cell office:value-type="string">
            <text:p>º</text:p>
          </table:table-cell>
          <table:table-cell office:value-type="float" office:value="186">
            <text:p>186</text:p>
          </table:table-cell>
          <table:table-cell office:value-type="string">
            <text:p>ordm</text:p>
          </table:table-cell>
          <table:table-cell/>
          <table:table-cell office:value-type="string">
            <text:p>Ü</text:p>
          </table:table-cell>
          <table:table-cell office:value-type="float" office:value="220">
            <text:p>220</text:p>
          </table:table-cell>
          <table:table-cell office:value-type="string">
            <text:p>Uuml</text:p>
          </table:table-cell>
          <table:table-cell/>
          <table:table-cell office:value-type="string">
            <text:p>þ</text:p>
          </table:table-cell>
          <table:table-cell office:value-type="float" office:value="254">
            <text:p>254</text:p>
          </table:table-cell>
          <table:table-cell office:value-type="string">
            <text:p>thorn</text:p>
          </table:table-cell>
          <table:table-cell table:number-columns-repeated="244"/>
        </table:table-row>
        <table:table-row table:style-name="ro2">
          <table:table-cell/>
          <table:table-cell office:value-type="string">
            <text:p>»</text:p>
          </table:table-cell>
          <table:table-cell office:value-type="float" office:value="187">
            <text:p>187</text:p>
          </table:table-cell>
          <table:table-cell office:value-type="string">
            <text:p>raquo</text:p>
          </table:table-cell>
          <table:table-cell/>
          <table:table-cell office:value-type="string">
            <text:p>Ý</text:p>
          </table:table-cell>
          <table:table-cell office:value-type="float" office:value="221">
            <text:p>221</text:p>
          </table:table-cell>
          <table:table-cell office:value-type="string">
            <text:p>Yacute</text:p>
          </table:table-cell>
          <table:table-cell/>
          <table:table-cell office:value-type="string">
            <text:p>ÿ</text:p>
          </table:table-cell>
          <table:table-cell office:value-type="float" office:value="255">
            <text:p>255</text:p>
          </table:table-cell>
          <table:table-cell office:value-type="string">
            <text:p>yuml</text:p>
          </table:table-cell>
          <table:table-cell table:number-columns-repeated="244"/>
        </table:table-row>
        <table:table-row table:style-name="ro1">
          <table:table-cell/>
          <table:table-cell office:value-type="string">
            <text:p>¼</text:p>
          </table:table-cell>
          <table:table-cell office:value-type="float" office:value="188">
            <text:p>188</text:p>
          </table:table-cell>
          <table:table-cell office:value-type="string">
            <text:p>frac14</text:p>
          </table:table-cell>
          <table:table-cell/>
          <table:table-cell office:value-type="string">
            <text:p>Þ</text:p>
          </table:table-cell>
          <table:table-cell office:value-type="float" office:value="222">
            <text:p>222</text:p>
          </table:table-cell>
          <table:table-cell office:value-type="string">
            <text:p>THORN</text:p>
          </table:table-cell>
          <table:table-cell table:number-columns-repeated="2"/>
          <table:table-cell table:style-name="Default"/>
          <table:table-cell table:number-columns-repeated="245"/>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Arial Unicode MS" style:language-asian="zxx" style:country-asian="none" style:font-name-complex="Tahoma" style:language-complex="zxx" style:country-complex="none"/>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de" number:country="DE">€</number:currency-symbol>
    </number:currency-style>
    <number:currency-style style:name="N106">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6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Seit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8-05-14">14.05.2008</text:date>, <text:time>23:37:00</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Object 10/content.xml><?xml version="1.0" encoding="utf-8"?>
<!DOCTYPE math  PUBLIC '-//OpenOffice.org//DTD Modified W3C MathML 1.01//EN'  'math.dtd'>
<math:math xmlns:math="http://www.w3.org/1998/Math/MathML">
  <math:semantics>
    <math:mrow>
      <math:mrow>
        <math:mi math:fontstyle="italic">differ</math:mi>
        <math:mo math:stretchy="false">=</math:mo>
        <math:mfenced math:open="∣" math:close="∣">
          <math:mrow>
            <math:mo math:stretchy="false">(</math:mo>
            <math:mrow>
              <math:mi math:fontstyle="italic">in1</math:mi>
              <math:mo math:stretchy="false">−</math:mo>
              <math:mi math:fontstyle="italic">in2</math:mi>
            </math:mrow>
            <math:mo math:stretchy="false">)</math:mo>
          </math:mrow>
        </math:mfenced>
      </math:mrow>
      <math:mo math:stretchy="false">&gt;</math:mo>
      <math:mi>X</math:mi>
    </math:mrow>
    <math:annotation math:encoding="StarMath 5.0">differ = abs(in1 - in2) &gt; X</math:annotation>
  </math:semantics>
</math:math>
</file>

<file path=Object 11/content.xml><?xml version="1.0" encoding="utf-8"?>
<!DOCTYPE math  PUBLIC '-//OpenOffice.org//DTD Modified W3C MathML 1.01//EN'  'math.dtd'>
<math:math xmlns:math="http://www.w3.org/1998/Math/MathML">
  <math:semantics>
    <math:mrow>
      <math:mi math:fontstyle="italic">gauss</math:mi>
      <math:mo math:stretchy="false">=</math:mo>
      <math:mrow>
        <math:mfrac>
          <math:mn>1</math:mn>
          <math:msqrt>
            <math:mrow>
              <math:mn>2</math:mn>
              <math:mo math:stretchy="false">π</math:mo>
            </math:mrow>
          </math:msqrt>
        </math:mfrac>
        <math:mo math:stretchy="false">∗</math:mo>
        <math:msup>
          <math:mi math:fontstyle="normal">e</math:mi>
          <math:mrow>
            <math:mfrac>
              <math:mn>1</math:mn>
              <math:mn>2</math:mn>
            </math:mfrac>
            <math:mo math:stretchy="false">∗</math:mo>
            <math:msup>
              <math:mfenced math:open="" math:close="">
                <math:mfrac>
                  <math:mrow>
                    <math:mi>X</math:mi>
                    <math:mo math:stretchy="false">−</math:mo>
                    <math:mi>U</math:mi>
                  </math:mrow>
                  <math:mi math:fontstyle="italic">SI</math:mi>
                </math:mfrac>
              </math:mfenced>
              <math:mn>2</math:mn>
            </math:msup>
          </math:mrow>
        </math:msup>
      </math:mrow>
    </math:mrow>
    <math:annotation math:encoding="StarMath 5.0">gauss = {1} over {sqrt{2%pi} } * func e^{{1} over {2} * left({X - U } over {SI}right)^{2}  } </math:annotation>
  </math:semantics>
</math:math>
</file>

<file path=Object 12/content.xml><?xml version="1.0" encoding="utf-8"?>
<!DOCTYPE math  PUBLIC '-//OpenOffice.org//DTD Modified W3C MathML 1.01//EN'  'math.dtd'>
<math:math xmlns:math="http://www.w3.org/1998/Math/MathML">
  <math:semantics>
    <math:mrow>
      <math:mrow>
        <math:mi math:fontstyle="italic">gausscd</math:mi>
        <math:mo math:stretchy="false">=</math:mo>
        <math:mfrac>
          <math:mn>1</math:mn>
          <math:mn>2</math:mn>
        </math:mfrac>
      </math:mrow>
      <math:mi math:fontstyle="italic">erf</math:mi>
      <math:mrow>
        <math:mo math:stretchy="false">(</math:mo>
        <math:mrow>
          <math:mrow>
            <math:mrow>
              <math:mo math:stretchy="false">(</math:mo>
              <math:mrow>
                <math:mi>X</math:mi>
                <math:mo math:stretchy="false">−</math:mo>
                <math:mi>U</math:mi>
              </math:mrow>
              <math:mo math:stretchy="false">)</math:mo>
            </math:mrow>
            <math:mo math:stretchy="false">∗</math:mo>
            <math:mi math:fontstyle="italic">SI</math:mi>
          </math:mrow>
          <math:mo math:stretchy="false">∗</math:mo>
          <math:msqrt>
            <math:mo math:stretchy="false">π</math:mo>
          </math:msqrt>
        </math:mrow>
        <math:mo math:stretchy="false">)</math:mo>
      </math:mrow>
    </math:mrow>
    <math:annotation math:encoding="StarMath 5.0">gausscd = {1} over {2} erf((X - U )* SI * sqrt{%pi}  ) </math:annotation>
  </math:semantics>
</math:math>
</file>

<file path=Object 13/content.xml><?xml version="1.0" encoding="utf-8"?>
<!DOCTYPE math  PUBLIC '-//OpenOffice.org//DTD Modified W3C MathML 1.01//EN'  'math.dtd'>
<math:math xmlns:math="http://www.w3.org/1998/Math/MathML">
  <math:semantics>
    <math:mrow>
      <math:mrow>
        <math:mi math:fontstyle="italic">gdf</math:mi>
        <math:mo math:stretchy="false">=</math:mo>
        <math:mn>2</math:mn>
      </math:mrow>
      <math:mi math:fontstyle="italic">atan</math:mi>
      <math:mrow>
        <math:mrow>
          <math:mo math:stretchy="false">(</math:mo>
          <math:msup>
            <math:mi math:fontstyle="normal">e</math:mi>
            <math:mi>X</math:mi>
          </math:msup>
          <math:mo math:stretchy="false">)</math:mo>
        </math:mrow>
        <math:mo math:stretchy="false">−</math:mo>
        <math:mfrac>
          <math:mo math:stretchy="false">π</math:mo>
          <math:mn>2</math:mn>
        </math:mfrac>
      </math:mrow>
    </math:mrow>
    <math:annotation math:encoding="StarMath 5.0">gdf = 2 atan(func e^{X} ) - {%pi} over {2} </math:annotation>
  </math:semantics>
</math:math>
</file>

<file path=Object 14/content.xml><?xml version="1.0" encoding="utf-8"?>
<!DOCTYPE math  PUBLIC '-//OpenOffice.org//DTD Modified W3C MathML 1.01//EN'  'math.dtd'>
<math:math xmlns:math="http://www.w3.org/1998/Math/MathML">
  <math:semantics>
    <math:mrow>
      <math:mi math:fontstyle="italic">gold</math:mi>
      <math:mo math:stretchy="false">=</math:mo>
      <math:mfrac>
        <math:mrow>
          <math:mo math:stretchy="false">(</math:mo>
          <math:mrow>
            <math:mi>X</math:mi>
            <math:mo math:stretchy="false">+</math:mo>
            <math:msqrt>
              <math:mrow>
                <math:msup>
                  <math:mi>X</math:mi>
                  <math:mn>2</math:mn>
                </math:msup>
                <math:mo math:stretchy="false">+</math:mo>
                <math:mn>4</math:mn>
              </math:mrow>
            </math:msqrt>
          </math:mrow>
          <math:mo math:stretchy="false">)</math:mo>
        </math:mrow>
        <math:mn>2</math:mn>
      </math:mfrac>
    </math:mrow>
    <math:annotation math:encoding="StarMath 5.0">gold = (X + sqrt{X^{2}+ 4}) over 2</math:annotation>
  </math:semantics>
</math:math>
</file>

<file path=Object 15/content.xml><?xml version="1.0" encoding="utf-8"?>
<!DOCTYPE math  PUBLIC '-//OpenOffice.org//DTD Modified W3C MathML 1.01//EN'  'math.dtd'>
<math:math xmlns:math="http://www.w3.org/1998/Math/MathML">
  <math:semantics>
    <math:mrow>
      <math:mi math:fontstyle="italic">hypot</math:mi>
      <math:mo math:stretchy="false">=</math:mo>
      <math:msqrt>
        <math:mrow>
          <math:msup>
            <math:mi>x</math:mi>
            <math:mn>2</math:mn>
          </math:msup>
          <math:mo math:stretchy="false">+</math:mo>
          <math:msup>
            <math:mi>Y</math:mi>
            <math:mn>2</math:mn>
          </math:msup>
        </math:mrow>
      </math:msqrt>
    </math:mrow>
    <math:annotation math:encoding="StarMath 5.0">hypot =sqrt{x^2 + Y^2} </math:annotation>
  </math:semantics>
</math:math>
</file>

<file path=Object 16/content.xml><?xml version="1.0" encoding="utf-8"?>
<!DOCTYPE math  PUBLIC '-//OpenOffice.org//DTD Modified W3C MathML 1.01//EN'  'math.dtd'>
<math:math xmlns:math="http://www.w3.org/1998/Math/MathML">
  <math:semantics>
    <math:mrow>
      <math:mi math:fontstyle="italic">INV</math:mi>
      <math:mo math:stretchy="false">=</math:mo>
      <math:mfrac>
        <math:mn>1</math:mn>
        <math:mi>X</math:mi>
      </math:mfrac>
    </math:mrow>
    <math:annotation math:encoding="StarMath 5.0">INV = 1 over X</math:annotation>
  </math:semantics>
</math:math>
</file>

<file path=Object 17/content.xml><?xml version="1.0" encoding="utf-8"?>
<!DOCTYPE math  PUBLIC '-//OpenOffice.org//DTD Modified W3C MathML 1.01//EN'  'math.dtd'>
<math:math xmlns:math="http://www.w3.org/1998/Math/MathML">
  <math:semantics>
    <math:mrow>
      <math:mi math:fontstyle="italic">sinc</math:mi>
      <math:mo math:stretchy="false">=</math:mo>
      <math:mfrac>
        <math:mrow>
          <math:mi>sin</math:mi>
          <math:mrow>
            <math:mo math:stretchy="false">(</math:mo>
            <math:mi>x</math:mi>
            <math:mo math:stretchy="false">)</math:mo>
          </math:mrow>
        </math:mrow>
        <math:mi>x</math:mi>
      </math:mfrac>
    </math:mrow>
    <math:annotation math:encoding="StarMath 5.0">sinc = {sin(x) } over {x} </math:annotation>
  </math:semantics>
</math:math>
</file>

<file path=Object 18/content.xml><?xml version="1.0" encoding="utf-8"?>
<!DOCTYPE math  PUBLIC '-//OpenOffice.org//DTD Modified W3C MathML 1.01//EN'  'math.dtd'>
<math:math xmlns:math="http://www.w3.org/1998/Math/MathML">
  <math:semantics>
    <math:mrow>
      <math:mi>sinh</math:mi>
      <math:mo math:stretchy="false">=</math:mo>
      <math:mfrac>
        <math:mrow>
          <math:mo math:stretchy="false">(</math:mo>
          <math:mrow>
            <math:msup>
              <math:mi>e</math:mi>
              <math:mi>X</math:mi>
            </math:msup>
            <math:mo math:stretchy="false">−</math:mo>
            <math:msup>
              <math:mi>e</math:mi>
              <math:mrow>
                <math:mo math:stretchy="false">−</math:mo>
                <math:mi>X</math:mi>
              </math:mrow>
            </math:msup>
          </math:mrow>
          <math:mo math:stretchy="false">)</math:mo>
        </math:mrow>
        <math:mn>2</math:mn>
      </math:mfrac>
    </math:mrow>
    <math:annotation math:encoding="StarMath 5.0">sinh = (e^X - e^-X) over 2</math:annotation>
  </math:semantics>
</math:math>
</file>

<file path=Object 19/content.xml><?xml version="1.0" encoding="utf-8"?>
<!DOCTYPE math  PUBLIC '-//OpenOffice.org//DTD Modified W3C MathML 1.01//EN'  'math.dtd'>
<math:math xmlns:math="http://www.w3.org/1998/Math/MathML">
  <math:semantics>
    <math:mrow>
      <math:mi math:fontstyle="italic">sqrtn</math:mi>
      <math:mo math:stretchy="false">=</math:mo>
      <math:mroot>
        <math:mi>X</math:mi>
        <math:mi>N</math:mi>
      </math:mroot>
    </math:mrow>
    <math:annotation math:encoding="StarMath 5.0">sqrtn =nroot{N}{X} </math:annotation>
  </math:semantics>
</math:math>
</file>

<file path=Object 2/content.xml><?xml version="1.0" encoding="utf-8"?>
<!DOCTYPE math  PUBLIC '-//OpenOffice.org//DTD Modified W3C MathML 1.01//EN'  'math.dtd'>
<math:math xmlns:math="http://www.w3.org/1998/Math/MathML">
  <math:semantics>
    <math:mrow>
      <math:mrow>
        <math:mi math:fontstyle="italic">ACOSH</math:mi>
        <math:mo math:stretchy="false">=</math:mo>
        <math:mi>ln</math:mi>
      </math:mrow>
      <math:mrow>
        <math:mo math:stretchy="false">(</math:mo>
        <math:mrow>
          <math:mi>X</math:mi>
          <math:mo math:stretchy="false">+</math:mo>
          <math:msqrt>
            <math:mrow>
              <math:msup>
                <math:mi>X</math:mi>
                <math:mn>2</math:mn>
              </math:msup>
              <math:mo math:stretchy="false">−</math:mo>
              <math:mn>1</math:mn>
            </math:mrow>
          </math:msqrt>
        </math:mrow>
        <math:mo math:stretchy="false">)</math:mo>
      </math:mrow>
    </math:mrow>
    <math:annotation math:encoding="StarMath 5.0">ACOSH = ln(X + sqrt{X^2-1}  ) </math:annotation>
  </math:semantics>
</math:math>
</file>

<file path=Object 20/content.xml><?xml version="1.0" encoding="utf-8"?>
<!DOCTYPE math  PUBLIC '-//OpenOffice.org//DTD Modified W3C MathML 1.01//EN'  'math.dtd'>
<math:math xmlns:math="http://www.w3.org/1998/Math/MathML">
  <math:semantics>
    <math:mrow>
      <math:mi math:fontstyle="italic">tanc</math:mi>
      <math:mo math:stretchy="false">=</math:mo>
      <math:mfrac>
        <math:mrow>
          <math:mi>tan</math:mi>
          <math:mrow>
            <math:mo math:stretchy="false">(</math:mo>
            <math:mi>X</math:mi>
            <math:mo math:stretchy="false">)</math:mo>
          </math:mrow>
        </math:mrow>
        <math:mi>X</math:mi>
      </math:mfrac>
    </math:mrow>
    <math:annotation math:encoding="StarMath 5.0">tanc =  {tan(X)} over {X} </math:annotation>
  </math:semantics>
</math:math>
</file>

<file path=Object 21/content.xml><?xml version="1.0" encoding="utf-8"?>
<!DOCTYPE math  PUBLIC '-//OpenOffice.org//DTD Modified W3C MathML 1.01//EN'  'math.dtd'>
<math:math xmlns:math="http://www.w3.org/1998/Math/MathML">
  <math:semantics>
    <math:mrow>
      <math:mi>tanh</math:mi>
      <math:mo math:stretchy="false">=</math:mo>
      <math:mrow>
        <math:mn>1</math:mn>
        <math:mo math:stretchy="false">−</math:mo>
        <math:mfrac>
          <math:mn>2</math:mn>
          <math:mrow>
            <math:msup>
              <math:mi math:fontstyle="normal">e</math:mi>
              <math:mrow>
                <math:mo math:stretchy="false">−</math:mo>
                <math:mn>2</math:mn>
              </math:mrow>
            </math:msup>
            <math:mo math:stretchy="false">+</math:mo>
            <math:mn>1</math:mn>
          </math:mrow>
        </math:mfrac>
      </math:mrow>
    </math:mrow>
    <math:annotation math:encoding="StarMath 5.0">tanh = 1 - {2} over {func e^{-2}  + 1 }  </math:annotation>
  </math:semantics>
</math:math>
</file>

<file path=Object 3/content.xml><?xml version="1.0" encoding="utf-8"?>
<!DOCTYPE math  PUBLIC '-//OpenOffice.org//DTD Modified W3C MathML 1.01//EN'  'math.dtd'>
<math:math xmlns:math="http://www.w3.org/1998/Math/MathML">
  <math:semantics>
    <math:mrow>
      <math:mrow>
        <math:mi math:fontstyle="italic">acoth</math:mi>
        <math:mo math:stretchy="false">=</math:mo>
        <math:mfrac>
          <math:mn>1</math:mn>
          <math:mn>2</math:mn>
        </math:mfrac>
      </math:mrow>
      <math:mi>ln</math:mi>
      <math:mfenced math:open="" math:close="">
        <math:mfrac>
          <math:mrow>
            <math:mo math:stretchy="false">(</math:mo>
            <math:mrow>
              <math:mi>x</math:mi>
              <math:mo math:stretchy="false">+</math:mo>
              <math:mn>1</math:mn>
            </math:mrow>
            <math:mo math:stretchy="false">)</math:mo>
          </math:mrow>
          <math:mrow>
            <math:mo math:stretchy="false">(</math:mo>
            <math:mrow>
              <math:mi>x</math:mi>
              <math:mo math:stretchy="false">−</math:mo>
              <math:mn>1</math:mn>
            </math:mrow>
            <math:mo math:stretchy="false">)</math:mo>
          </math:mrow>
        </math:mfrac>
      </math:mfenced>
    </math:mrow>
    <math:annotation math:encoding="StarMath 5.0">acoth = {1} over {2} ln left({(x+1)} over {(x-1)} right)
</math:annotation>
  </math:semantics>
</math:math>
</file>

<file path=Object 4/content.xml><?xml version="1.0" encoding="utf-8"?>
<!DOCTYPE math  PUBLIC '-//OpenOffice.org//DTD Modified W3C MathML 1.01//EN'  'math.dtd'>
<math:math xmlns:math="http://www.w3.org/1998/Math/MathML">
  <math:semantics>
    <math:mrow>
      <math:mrow>
        <math:mi math:fontstyle="italic">agdf</math:mi>
        <math:mo math:stretchy="false">=</math:mo>
        <math:mi>ln</math:mi>
      </math:mrow>
      <math:mfenced math:open="" math:close="">
        <math:mfrac>
          <math:mrow>
            <math:mrow>
              <math:mn>1</math:mn>
              <math:mo math:stretchy="false">+</math:mo>
              <math:mi>sin</math:mi>
            </math:mrow>
            <math:mrow>
              <math:mo math:stretchy="false">(</math:mo>
              <math:mi>X</math:mi>
              <math:mo math:stretchy="false">)</math:mo>
            </math:mrow>
          </math:mrow>
          <math:mrow>
            <math:mi>cos</math:mi>
            <math:mrow>
              <math:mo math:stretchy="false">(</math:mo>
              <math:mi>X</math:mi>
              <math:mo math:stretchy="false">)</math:mo>
            </math:mrow>
          </math:mrow>
        </math:mfrac>
      </math:mfenced>
    </math:mrow>
    <math:annotation math:encoding="StarMath 5.0">agdf = ln left({1 + sin(X)  } over {cos(X) } right) </math:annotation>
  </math:semantics>
</math:math>
</file>

<file path=Object 5/content.xml><?xml version="1.0" encoding="utf-8"?>
<!DOCTYPE math  PUBLIC '-//OpenOffice.org//DTD Modified W3C MathML 1.01//EN'  'math.dtd'>
<math:math xmlns:math="http://www.w3.org/1998/Math/MathML">
  <math:semantics>
    <math:mrow>
      <math:mrow>
        <math:mi math:fontstyle="italic">asinh</math:mi>
        <math:mo math:stretchy="false">=</math:mo>
        <math:mi>ln</math:mi>
      </math:mrow>
      <math:mrow>
        <math:mo math:stretchy="false">(</math:mo>
        <math:mrow>
          <math:mi>X</math:mi>
          <math:mo math:stretchy="false">+</math:mo>
          <math:msqrt>
            <math:mrow>
              <math:msup>
                <math:mi>X</math:mi>
                <math:mn>2</math:mn>
              </math:msup>
              <math:mo math:stretchy="false">+</math:mo>
              <math:mn>1</math:mn>
            </math:mrow>
          </math:msqrt>
        </math:mrow>
        <math:mo math:stretchy="false">)</math:mo>
      </math:mrow>
    </math:mrow>
    <math:annotation math:encoding="StarMath 5.0">asinh = ln(X + sqrt{X^{2} + 1} ) </math:annotation>
  </math:semantics>
</math:math>
</file>

<file path=Object 6/content.xml><?xml version="1.0" encoding="utf-8"?>
<!DOCTYPE math  PUBLIC '-//OpenOffice.org//DTD Modified W3C MathML 1.01//EN'  'math.dtd'>
<math:math xmlns:math="http://www.w3.org/1998/Math/MathML">
  <math:semantics>
    <math:mrow>
      <math:mrow>
        <math:mi math:fontstyle="italic">atanh</math:mi>
        <math:mo math:stretchy="false">=</math:mo>
        <math:mfrac>
          <math:mn>1</math:mn>
          <math:mn>2</math:mn>
        </math:mfrac>
      </math:mrow>
      <math:mi>ln</math:mi>
      <math:mfenced math:open="" math:close="">
        <math:mfrac>
          <math:mrow>
            <math:mo math:stretchy="false">(</math:mo>
            <math:mrow>
              <math:mn>1</math:mn>
              <math:mo math:stretchy="false">+</math:mo>
              <math:mi>x</math:mi>
            </math:mrow>
            <math:mo math:stretchy="false">)</math:mo>
          </math:mrow>
          <math:mrow>
            <math:mo math:stretchy="false">(</math:mo>
            <math:mrow>
              <math:mn>1</math:mn>
              <math:mo math:stretchy="false">−</math:mo>
              <math:mi>X</math:mi>
            </math:mrow>
            <math:mo math:stretchy="false">)</math:mo>
          </math:mrow>
        </math:mfrac>
      </math:mfenced>
    </math:mrow>
    <math:annotation math:encoding="StarMath 5.0">atanh = {1} over {2} ln left ((1 + x) over (1 - X)right ) 
</math:annotation>
  </math:semantics>
</math:math>
</file>

<file path=Object 7/content.xml><?xml version="1.0" encoding="utf-8"?>
<!DOCTYPE math  PUBLIC '-//OpenOffice.org//DTD Modified W3C MathML 1.01//EN'  'math.dtd'>
<math:math xmlns:math="http://www.w3.org/1998/Math/MathML">
  <math:semantics>
    <math:mrow>
      <math:mi math:fontstyle="italic">GAMMA</math:mi>
      <math:mrow>
        <math:mrow>
          <math:mo math:stretchy="false">(</math:mo>
          <math:mi>x</math:mi>
          <math:mo math:stretchy="false">)</math:mo>
        </math:mrow>
        <math:mo math:stretchy="false">=</math:mo>
        <math:mrow>
          <math:msqrt>
            <math:mfrac>
              <math:mrow>
                <math:mn>2</math:mn>
                <math:mi></math:mi>
              </math:mrow>
              <math:mi>x</math:mi>
            </math:mfrac>
          </math:msqrt>
          <math:mo math:stretchy="false">∗</math:mo>
          <math:mfenced math:open="" math:close="">
            <math:mrow>
              <math:mfrac>
                <math:mn>1</math:mn>
                <math:mi>e</math:mi>
              </math:mfrac>
              <math:mfenced math:open="" math:close="">
                <math:mrow>
                  <math:mi>x</math:mi>
                  <math:mo math:stretchy="false">+</math:mo>
                  <math:mfrac>
                    <math:mn>1</math:mn>
                    <math:mrow>
                      <math:mn>12x</math:mn>
                      <math:mo math:stretchy="false">−</math:mo>
                      <math:mfrac>
                        <math:mn>1</math:mn>
                        <math:mn>10x</math:mn>
                      </math:mfrac>
                    </math:mrow>
                  </math:mfrac>
                </math:mrow>
              </math:mfenced>
            </math:mrow>
          </math:mfenced>
        </math:mrow>
      </math:mrow>
    </math:mrow>
    <math:annotation math:encoding="StarMath 5.0">GAMMA(x) = sqrt{{2} over {x} } * left({1} over {e}  left(x + {1} over {12x - {1} over {10x}  }  right) right) </math:annotation>
  </math:semantics>
</math:math>
</file>

<file path=Object 8/content.xml><?xml version="1.0" encoding="utf-8"?>
<!DOCTYPE math  PUBLIC '-//OpenOffice.org//DTD Modified W3C MathML 1.01//EN'  'math.dtd'>
<math:math xmlns:math="http://www.w3.org/1998/Math/MathML">
  <math:semantics>
    <math:mrow>
      <math:mi>cosh</math:mi>
      <math:mo math:stretchy="false">=</math:mo>
      <math:mfrac>
        <math:mrow>
          <math:msup>
            <math:mi math:fontstyle="normal">e</math:mi>
            <math:mi>X</math:mi>
          </math:msup>
          <math:mo math:stretchy="false">+</math:mo>
          <math:msup>
            <math:mi math:fontstyle="normal">e</math:mi>
            <math:mrow>
              <math:mo math:stretchy="false">−</math:mo>
              <math:mi>X</math:mi>
            </math:mrow>
          </math:msup>
        </math:mrow>
        <math:mn>2</math:mn>
      </math:mfrac>
    </math:mrow>
    <math:annotation math:encoding="StarMath 5.0">cosh = {func e^{X}  + func e^{-X}  } over {2} </math:annotation>
  </math:semantics>
</math:math>
</file>

<file path=Object 9/content.xml><?xml version="1.0" encoding="utf-8"?>
<!DOCTYPE math  PUBLIC '-//OpenOffice.org//DTD Modified W3C MathML 1.01//EN'  'math.dtd'>
<math:math xmlns:math="http://www.w3.org/1998/Math/MathML">
  <math:semantics>
    <math:mrow>
      <math:mi>coth</math:mi>
      <math:mo math:stretchy="false">=</math:mo>
      <math:mfrac>
        <math:mrow>
          <math:msup>
            <math:mi math:fontstyle="normal">e</math:mi>
            <math:mn>2X</math:mn>
          </math:msup>
          <math:mo math:stretchy="false">+</math:mo>
          <math:mn>1</math:mn>
        </math:mrow>
        <math:mrow>
          <math:msup>
            <math:mi math:fontstyle="normal">e</math:mi>
            <math:mn>2X</math:mn>
          </math:msup>
          <math:mo math:stretchy="false">−</math:mo>
          <math:mn>1</math:mn>
        </math:mrow>
      </math:mfrac>
    </math:mrow>
    <math:annotation math:encoding="StarMath 5.0">coth = {func e^{2X} + 1} over {func e^{2X} - 1}</math:annotation>
  </math:semantics>
</math:math>
</file>
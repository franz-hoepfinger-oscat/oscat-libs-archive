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0AC000000A63F7C5BE8.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120000021C4A31700C.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19A0000005543E02C22.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117000001458DE1C1C1.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060000004B5A55B9DE.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E9000000696DFF8DA7.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207000000870B815ACF.png"/>
  <manifest:file-entry manifest:media-type="image/png" manifest:full-path="Pictures/10000000000000AC00000062EF71D149.png"/>
  <manifest:file-entry manifest:media-type="image/png" manifest:full-path="Pictures/10000000000001710000004BDAF08181.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84640D4D8C.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CE0000007794680276.png"/>
  <manifest:file-entry manifest:media-type="image/png" manifest:full-path="Pictures/10000000000000F000000055D6C68C48.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BD000000CDB3FE0E25.png"/>
  <manifest:file-entry manifest:media-type="image/png" manifest:full-path="Pictures/10000000000000DB00000069689B5570.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112000000A61160D7F2.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0BD0000019FF2C2AAC6.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0BD0000009103A4D141.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1AD0000004B1C9725D1.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0847719227B.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13500000163EB0BE201.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0DB00000127FA2AC2F8.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BD00000181C1E0984C.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19A00000055C3088950.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2250000004BEBC2B313.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17000000AF7273437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112000000A693B15969.png"/>
  <manifest:file-entry manifest:media-type="image/png" manifest:full-path="Pictures/10000000000000AC000000A680FBA7F6.png"/>
  <manifest:file-entry manifest:media-type="image/png" manifest:full-path="Pictures/10000000000001AD00000087E5252AB9.png"/>
  <manifest:file-entry manifest:media-type="image/png" manifest:full-path="Pictures/10000000000001560000005500DC9585.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43B000001BAF6D56643.png"/>
  <manifest:file-entry manifest:media-type="image/png" manifest:full-path="Pictures/10000000000000CE0000010C823042AB.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112000000C820785077.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0AC00000084BB0592B8.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0BD000000EB796DA5A3.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1530000004B33643117.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2C80000012BC57AB450.png"/>
  <manifest:file-entry manifest:media-type="image/png" manifest:full-path="Pictures/10000000000000E80000004BFB7A376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CE000000847B8082B2.png"/>
  <manifest:file-entry manifest:media-type="image/png" manifest:full-path="Pictures/10000000000000F0000000C8E80E7EE5.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3B1B35D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8F0000004B21F6D762.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BD000000CDA93EE1A9.png"/>
  <manifest:file-entry manifest:media-type="image/png" manifest:full-path="Pictures/10000000000000AC000000EAA0684FB4.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E900000087F30A52B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117000000CD9AB8CE8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F0000000A6812CBE1D.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2250000004B875AE37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AD0000006921359A14.png"/>
  <manifest:file-entry manifest:media-type="image/png" manifest:full-path="Pictures/1000000000000138000001B68BC2A1A3.png"/>
  <manifest:file-entry manifest:media-type="image/png" manifest:full-path="Pictures/10000000000002D80000014850FDB20C.png"/>
  <manifest:file-entry manifest:media-type="image/png" manifest:full-path="Pictures/1000000000000178000000DDB59A5580.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1170000014511C380CE.png"/>
  <manifest:file-entry manifest:media-type="image/png" manifest:full-path="Pictures/10000000000000F9000000AFD41AB5F8.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0F00000007781C6A3ED.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1E90000004B95327156.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image/png" manifest:full-path="Pictures/100000000000009F000000AF2391DAA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Wingdings" svg:font-family="Wingdings" style:font-adornments="Normale"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Normale" style:font-family-generic="swiss" style:font-pitch="variable"/>
    <style:font-face style:name="Arial1"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49" style:family="table">
      <style:table-properties style:width="15.942cm" fo:margin-left="1.065cm" fo:margin-right="-0.009cm" table:align="margins"/>
    </style:style>
    <style:style style:name="Tabelle49.A" style:family="table-column">
      <style:table-column-properties style:column-width="3.969cm" style:rel-column-width="16314*"/>
    </style:style>
    <style:style style:name="Tabelle49.B" style:family="table-column">
      <style:table-column-properties style:column-width="3.992cm" style:rel-column-width="16409*"/>
    </style:style>
    <style:style style:name="Tabelle49.C" style:family="table-column">
      <style:table-column-properties style:column-width="4.034cm" style:rel-column-width="16583*"/>
    </style:style>
    <style:style style:name="Tabelle49.D" style:family="table-column">
      <style:table-column-properties style:column-width="3.948cm" style:rel-column-width="16229*"/>
    </style:style>
    <style:style style:name="Tabelle49.A1" style:family="table-cell">
      <style:table-cell-properties fo:padding="0.097cm" fo:border-left="0.002cm solid #000000" fo:border-right="none" fo:border-top="0.002cm solid #000000" fo:border-bottom="0.002cm solid #000000"/>
    </style:style>
    <style:style style:name="Tabelle49.D1" style:family="table-cell">
      <style:table-cell-properties fo:padding="0.097cm" fo:border="0.002cm solid #000000"/>
    </style:style>
    <style:style style:name="Tabelle49.A2" style:family="table-cell">
      <style:table-cell-properties fo:padding="0.097cm" fo:border-left="0.002cm solid #000000" fo:border-right="none" fo:border-top="none" fo:border-bottom="0.002cm solid #000000"/>
    </style:style>
    <style:style style:name="Tabelle49.B2" style:family="table-cell" style:data-style-name="N0">
      <style:table-cell-properties fo:padding="0.097cm" fo:border-left="0.002cm solid #000000" fo:border-right="none" fo:border-top="none" fo:border-bottom="0.002cm solid #000000"/>
    </style:style>
    <style:style style:name="Tabelle49.D2" style:family="table-cell" style:data-style-name="N0">
      <style:table-cell-properties fo:padding="0.097cm" fo:border-left="0.002cm solid #000000" fo:border-right="0.002cm solid #000000" fo:border-top="none" fo:border-bottom="0.002cm solid #000000"/>
    </style:style>
    <style:style style:name="Tabelle48" style:family="table">
      <style:table-properties style:width="15.942cm" fo:margin-left="1.065cm" fo:margin-right="-0.009cm" table:align="margins"/>
    </style:style>
    <style:style style:name="Tabelle48.A" style:family="table-column">
      <style:table-column-properties style:column-width="3.969cm" style:rel-column-width="16314*"/>
    </style:style>
    <style:style style:name="Tabelle48.B" style:family="table-column">
      <style:table-column-properties style:column-width="3.992cm" style:rel-column-width="16409*"/>
    </style:style>
    <style:style style:name="Tabelle48.C" style:family="table-column">
      <style:table-column-properties style:column-width="4.034cm" style:rel-column-width="16583*"/>
    </style:style>
    <style:style style:name="Tabelle48.D" style:family="table-column">
      <style:table-column-properties style:column-width="3.948cm" style:rel-column-width="16229*"/>
    </style:style>
    <style:style style:name="Tabelle48.A1" style:family="table-cell">
      <style:table-cell-properties fo:padding="0.097cm" fo:border-left="0.002cm solid #000000" fo:border-right="none" fo:border-top="0.002cm solid #000000" fo:border-bottom="0.002cm solid #000000"/>
    </style:style>
    <style:style style:name="Tabelle48.D1" style:family="table-cell">
      <style:table-cell-properties fo:padding="0.097cm" fo:border="0.002cm solid #000000"/>
    </style:style>
    <style:style style:name="Tabelle48.A2" style:family="table-cell">
      <style:table-cell-properties fo:padding="0.097cm" fo:border-left="0.002cm solid #000000" fo:border-right="none" fo:border-top="none" fo:border-bottom="0.002cm solid #000000"/>
    </style:style>
    <style:style style:name="Tabelle48.B2" style:family="table-cell" style:data-style-name="N0">
      <style:table-cell-properties fo:padding="0.097cm" fo:border-left="0.002cm solid #000000" fo:border-right="none" fo:border-top="none" fo:border-bottom="0.002cm solid #000000"/>
    </style:style>
    <style:style style:name="Tabelle48.D2" style:family="table-cell" style:data-style-name="N0">
      <style:table-cell-properties fo:padding="0.097cm" fo:border-left="0.002cm solid #000000" fo:border-right="0.002cm solid #000000" fo:border-top="none" fo:border-bottom="0.002cm solid #000000"/>
    </style:style>
    <style:style style:name="Tabelle41" style:family="table">
      <style:table-properties style:width="15.986cm" fo:margin-left="1.021cm" fo:margin-right="-0.009cm" table:align="margins"/>
    </style:style>
    <style:style style:name="Tabelle41.A" style:family="table-column">
      <style:table-column-properties style:column-width="1.764cm" style:rel-column-width="7231*"/>
    </style:style>
    <style:style style:name="Tabelle41.B" style:family="table-column">
      <style:table-column-properties style:column-width="14.222cm" style:rel-column-width="58304*"/>
    </style:style>
    <style:style style:name="Tabelle41.A1" style:family="table-cell">
      <style:table-cell-properties fo:padding="0.097cm" fo:border-left="0.002cm solid #000000" fo:border-right="none" fo:border-top="0.002cm solid #000000" fo:border-bottom="0.002cm solid #000000"/>
    </style:style>
    <style:style style:name="Tabelle41.B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B2" style:family="table-cell">
      <style:table-cell-properties fo:padding="0.097cm" fo:border-left="0.002cm solid #000000" fo:border-right="0.002cm solid #000000" fo:border-top="none" fo:border-bottom="0.002cm solid #000000"/>
    </style:style>
    <style:style style:name="Tabelle45" style:family="table">
      <style:table-properties style:width="15.986cm" fo:margin-left="1.021cm" fo:margin-right="-0.009cm" table:align="margins"/>
    </style:style>
    <style:style style:name="Tabelle45.A" style:family="table-column">
      <style:table-column-properties style:column-width="1.258cm" style:rel-column-width="5155*"/>
    </style:style>
    <style:style style:name="Tabelle45.B" style:family="table-column">
      <style:table-column-properties style:column-width="14.728cm" style:rel-column-width="60380*"/>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5.963cm" fo:margin-left="1.042cm" fo:margin-right="-0.007cm" table:align="margins" style:may-break-between-rows="false"/>
    </style:style>
    <style:style style:name="Tabelle34.A" style:family="table-column">
      <style:table-column-properties style:column-width="5.071cm" style:rel-column-width="20819*"/>
    </style:style>
    <style:style style:name="Tabelle34.B" style:family="table-column">
      <style:table-column-properties style:column-width="5.336cm" style:rel-column-width="21905*"/>
    </style:style>
    <style:style style:name="Tabelle34.C" style:family="table-column">
      <style:table-column-properties style:column-width="5.556cm" style:rel-column-width="22811*"/>
    </style:style>
    <style:style style:name="Tabelle34.1" style:family="table-row">
      <style:table-row-properties style:row-height="0.7cm"/>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fals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42" style:family="table">
      <style:table-properties style:width="15.965cm" fo:margin-left="1.042cm" fo:margin-right="-0.009cm" table:align="margins"/>
    </style:style>
    <style:style style:name="Tabelle42.A" style:family="table-column">
      <style:table-column-properties style:column-width="1.122cm" style:rel-column-width="4602*"/>
    </style:style>
    <style:style style:name="Tabelle42.B" style:family="table-column">
      <style:table-column-properties style:column-width="1.12cm" style:rel-column-width="4595*"/>
    </style:style>
    <style:style style:name="Tabelle42.C" style:family="table-column">
      <style:table-column-properties style:column-width="1.101cm" style:rel-column-width="4519*"/>
    </style:style>
    <style:style style:name="Tabelle42.D" style:family="table-column">
      <style:table-column-properties style:column-width="1.101cm" style:rel-column-width="4518*"/>
    </style:style>
    <style:style style:name="Tabelle42.E" style:family="table-column">
      <style:table-column-properties style:column-width="1.651cm" style:rel-column-width="6777*"/>
    </style:style>
    <style:style style:name="Tabelle42.F" style:family="table-column">
      <style:table-column-properties style:column-width="6.408cm" style:rel-column-width="26305*"/>
    </style:style>
    <style:style style:name="Tabelle42.G" style:family="table-column">
      <style:table-column-properties style:column-width="1.732cm" style:rel-column-width="7110*"/>
    </style:style>
    <style:style style:name="Tabelle42.H" style:family="table-column">
      <style:table-column-properties style:column-width="1.732cm" style:rel-column-width="7109*"/>
    </style:style>
    <style:style style:name="Tabelle42.A1" style:family="table-cell">
      <style:table-cell-properties fo:padding="0.097cm" fo:border-left="0.002cm solid #000000" fo:border-right="none" fo:border-top="0.002cm solid #000000" fo:border-bottom="0.002cm solid #000000"/>
    </style:style>
    <style:style style:name="Tabelle42.H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H2" style:family="table-cell" style:data-style-name="N0">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2cm" style:rel-column-width="4156*"/>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847cm" style:rel-column-width="11687*"/>
    </style:style>
    <style:style style:name="Tabelle38.E" style:family="table-column">
      <style:table-column-properties style:column-width="2.667cm" style:rel-column-width="10951*"/>
    </style:style>
    <style:style style:name="Tabelle38.A1" style:family="table-cell">
      <style:table-cell-properties fo:padding="0.097cm" fo:border-left="0.002cm solid #000000" fo:border-right="none" fo:border-top="0.002cm solid #000000" fo:border-bottom="0.002cm solid #000000"/>
    </style:style>
    <style:style style:name="Tabelle38.E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E2" style:family="table-cell">
      <style:table-cell-properties fo:padding="0.097cm" fo:border-left="0.002cm solid #000000" fo:border-right="0.002cm solid #000000" fo:border-top="none" fo:border-bottom="0.002cm solid #000000"/>
    </style:style>
    <style:style style:name="Tabelle38.C14" style:family="table-cell" style:data-style-name="N0">
      <style:table-cell-properties fo:padding="0.097cm" fo:border-left="0.002cm solid #000000" fo:border-right="none"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46" style:family="table">
      <style:table-properties style:width="15.963cm" fo:margin-left="1.042cm" fo:margin-right="-0.007cm" table:align="margins"/>
    </style:style>
    <style:style style:name="Tabelle46.A" style:family="table-column">
      <style:table-column-properties style:column-width="1.279cm" style:rel-column-width="5250*"/>
    </style:style>
    <style:style style:name="Tabelle46.B" style:family="table-column">
      <style:table-column-properties style:column-width="1.214cm" style:rel-column-width="4982*"/>
    </style:style>
    <style:style style:name="Tabelle46.C" style:family="table-column">
      <style:table-column-properties style:column-width="1.256cm" style:rel-column-width="5155*"/>
    </style:style>
    <style:style style:name="Tabelle46.D" style:family="table-column">
      <style:table-column-properties style:column-width="1.235cm" style:rel-column-width="5069*"/>
    </style:style>
    <style:style style:name="Tabelle46.F" style:family="table-column">
      <style:table-column-properties style:column-width="1.258cm" style:rel-column-width="5163*"/>
    </style:style>
    <style:style style:name="Tabelle46.G" style:family="table-column">
      <style:table-column-properties style:column-width="8.444cm" style:rel-column-width="34666*"/>
    </style:style>
    <style:style style:name="Tabelle46.A1" style:family="table-cell">
      <style:table-cell-properties fo:padding="0.097cm" fo:border-left="0.002cm solid #000000" fo:border-right="none" fo:border-top="0.002cm solid #000000" fo:border-bottom="0.002cm solid #000000"/>
    </style:style>
    <style:style style:name="Tabelle46.G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G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may-break-between-rows="false"/>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data-style-name="N0">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6.A3" style:family="table-cell">
      <style:table-cell-properties style:vertical-align="middle" fo:padding="0.097cm" fo:border-left="0.002cm solid #000000" fo:border-right="none" fo:border-top="none" fo:border-bottom="0.002cm solid #000000"/>
    </style:style>
    <style:style style:name="Tabelle47" style:family="table">
      <style:table-properties style:width="15.963cm" fo:margin-left="1.042cm" fo:margin-right="-0.007cm" table:align="margins"/>
    </style:style>
    <style:style style:name="Tabelle47.A" style:family="table-column">
      <style:table-column-properties style:column-width="0.97cm" style:rel-column-width="3982*"/>
    </style:style>
    <style:style style:name="Tabelle47.B" style:family="table-column">
      <style:table-column-properties style:column-width="1.014cm" style:rel-column-width="4163*"/>
    </style:style>
    <style:style style:name="Tabelle47.C" style:family="table-column">
      <style:table-column-properties style:column-width="0.993cm" style:rel-column-width="4076*"/>
    </style:style>
    <style:style style:name="Tabelle47.F" style:family="table-column">
      <style:table-column-properties style:column-width="0.991cm" style:rel-column-width="4069*"/>
    </style:style>
    <style:style style:name="Tabelle47.K" style:family="table-column">
      <style:table-column-properties style:column-width="5.976cm" style:rel-column-width="24535*"/>
    </style:style>
    <style:style style:name="Tabelle47.A1" style:family="table-cell">
      <style:table-cell-properties fo:padding="0.097cm" fo:border-left="0.002cm solid #000000" fo:border-right="none" fo:border-top="0.002cm solid #000000" fo:border-bottom="0.002cm solid #000000"/>
    </style:style>
    <style:style style:name="Tabelle47.K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K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43" style:family="table">
      <style:table-properties style:width="16.007cm" fo:margin-left="0.998cm" fo:margin-right="-0.007cm" table:align="margins"/>
    </style:style>
    <style:style style:name="Tabelle43.A" style:family="table-column">
      <style:table-column-properties style:column-width="1.235cm" style:rel-column-width="5055*"/>
    </style:style>
    <style:style style:name="Tabelle43.B" style:family="table-column">
      <style:table-column-properties style:column-width="1.279cm" style:rel-column-width="5235*"/>
    </style:style>
    <style:style style:name="Tabelle43.E" style:family="table-column">
      <style:table-column-properties style:column-width="1.258cm" style:rel-column-width="5148*"/>
    </style:style>
    <style:style style:name="Tabelle43.F" style:family="table-column">
      <style:table-column-properties style:column-width="1.256cm" style:rel-column-width="5141*"/>
    </style:style>
    <style:style style:name="Tabelle43.G" style:family="table-column">
      <style:table-column-properties style:column-width="1.808cm" style:rel-column-width="7402*"/>
    </style:style>
    <style:style style:name="Tabelle43.H" style:family="table-column">
      <style:table-column-properties style:column-width="6.703cm" style:rel-column-width="27444*"/>
    </style:style>
    <style:style style:name="Tabelle43.1" style:family="table-row">
      <style:table-row-properties style:min-row-height="0.993cm"/>
    </style:style>
    <style:style style:name="Tabelle43.A1" style:family="table-cell">
      <style:table-cell-properties fo:padding="0.097cm" fo:border-left="0.002cm solid #000000" fo:border-right="none" fo:border-top="0.002cm solid #000000" fo:border-bottom="0.002cm solid #000000"/>
    </style:style>
    <style:style style:name="Tabelle43.H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G2" style:family="table-cell" style:data-style-name="N0">
      <style:table-cell-properties fo:padding="0.097cm" fo:border-left="0.002cm solid #000000" fo:border-right="none" fo:border-top="none" fo:border-bottom="0.002cm solid #000000"/>
    </style:style>
    <style:style style:name="Tabelle43.H2" style:family="table-cell">
      <style:table-cell-properties fo:padding="0.097cm" fo:border-left="0.002cm solid #000000" fo:border-right="0.002cm solid #000000" fo:border-top="none" fo:border-bottom="0.002cm solid #000000"/>
    </style:style>
    <style:style style:name="Tabelle44" style:family="table">
      <style:table-properties style:width="15.986cm" fo:margin-left="1.021cm" fo:margin-right="-0.009cm" table:align="margins"/>
    </style:style>
    <style:style style:name="Tabelle44.A" style:family="table-column">
      <style:table-column-properties style:column-width="2.69cm" style:rel-column-width="11027*"/>
    </style:style>
    <style:style style:name="Tabelle44.B" style:family="table-column">
      <style:table-column-properties style:column-width="13.296cm" style:rel-column-width="54508*"/>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data-style-name="N0">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4.A4" style:family="table-cell">
      <style:table-cell-properties fo:padding="0.097cm" fo:border-left="0.002cm solid #000000" fo:border-right="none"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font-style="normal" style:font-name-asian="OpenSymbol1" style:font-size-asian="10pt" style:font-style-asian="normal" style:font-name-complex="OpenSymbol1" style:font-size-complex="10pt" style:font-style-complex="normal"/>
    </style:style>
    <style:style style:name="P8"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P9"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language="en" fo:country="US" fo:font-style="normal" style:font-name-asian="OpenSymbol1" style:font-size-asian="10pt" style:font-style-asian="normal" style:font-name-complex="OpenSymbol1" style:font-size-complex="10pt" style:font-style-complex="normal"/>
    </style:style>
    <style:style style:name="P10" style:family="paragraph" style:parent-style-name="Text_20_body_20_2">
      <style:paragraph-properties fo:margin-left="0cm" fo:margin-right="0cm" fo:orphans="2" fo:widows="2" fo:text-indent="0cm" style:auto-text-indent="false"/>
      <style:text-properties fo:color="#800080" style:font-name="Bitstream Vera Sans Mono" fo:font-size="10pt" fo:font-style="normal" style:font-name-asian="OpenSymbol1" style:font-size-asian="10pt" style:font-style-asian="normal" style:font-name-complex="OpenSymbol1" style:font-size-complex="10pt" style:font-style-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4" style:family="paragraph" style:parent-style-name="Standard">
      <style:paragraph-properties fo:margin-left="0cm" fo:margin-right="0cm" fo:text-align="justify" style:justify-single-word="false" fo:orphans="2" fo:widows="2" fo:text-indent="0cm" style:auto-text-indent="false"/>
      <style:text-properties style:font-name="Arial" fo:font-size="10pt" fo:font-style="normal" style:font-name-asian="OpenSymbol1" style:font-size-asian="10pt" style:font-style-asian="normal" style:font-name-complex="OpenSymbol1" style:font-size-complex="10pt" style:font-style-complex="normal"/>
    </style:style>
    <style:style style:name="P15" style:family="paragraph" style:parent-style-name="Text_20_body_20_1">
      <style:text-properties style:font-name="Arial"/>
    </style:style>
    <style:style style:name="P16" style:family="paragraph" style:parent-style-name="Text_20_body_20_1">
      <style:paragraph-properties fo:orphans="2" fo:widows="2"/>
      <style:text-properties style:font-name="Arial"/>
    </style:style>
    <style:style style:name="P17" style:family="paragraph" style:parent-style-name="Text_20_body_20_1">
      <style:paragraph-properties fo:orphans="2" fo:widows="2"/>
      <style:text-properties style:font-name="Arial" style:font-size-asian="16.1000003814697pt" style:font-size-complex="16.1000003814697pt"/>
    </style:style>
    <style:style style:name="P18" style:family="paragraph" style:parent-style-name="Text_20_body_20_1">
      <style:paragraph-properties fo:orphans="2" fo:widows="2"/>
      <style:text-properties style:font-name="Arial" fo:font-style="normal" style:font-name-asian="OpenSymbol1" style:font-style-asian="normal" style:font-name-complex="OpenSymbol1" style:font-style-complex="normal"/>
    </style:style>
    <style:style style:name="P19" style:family="paragraph" style:parent-style-name="Text_20_body_20_1">
      <style:paragraph-properties fo:orphans="2" fo:widows="2"/>
      <style:text-properties style:font-name="Arial" style:font-name-asian="OpenSymbol1" style:font-name-complex="OpenSymbol1"/>
    </style:style>
    <style:style style:name="P20" style:family="paragraph" style:parent-style-name="Text_20_body_20_1">
      <style:paragraph-properties fo:orphans="2" fo:widows="2" fo:keep-with-next="auto"/>
      <style:text-properties style:font-name="Arial"/>
    </style:style>
    <style:style style:name="P21" style:family="paragraph" style:parent-style-name="Text_20_body_20_1">
      <style:paragraph-properties fo:orphans="2" fo:widows="2" fo:keep-with-next="auto"/>
      <style:text-properties style:font-name="Arial" fo:language="de" fo:country="DE" style:font-name-asian="OpenSymbol1" style:font-name-complex="OpenSymbol1"/>
    </style:style>
    <style:style style:name="P22" style:family="paragraph" style:parent-style-name="Text_20_body_20_2">
      <style:paragraph-properties fo:orphans="2" fo:widows="2" fo:keep-with-next="auto"/>
      <style:text-properties style:font-name="Arial"/>
    </style:style>
    <style:style style:name="P23" style:family="paragraph" style:parent-style-name="Text_20_body_20_2">
      <style:paragraph-properties fo:orphans="2" fo:widows="2" fo:keep-with-next="auto"/>
      <style:text-properties style:font-name="Arial" style:font-name-asian="OpenSymbol1" style:font-name-complex="OpenSymbol1"/>
    </style:style>
    <style:style style:name="P24"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25"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26"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27"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28"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9" style:family="paragraph" style:parent-style-name="Text_20_body_20_2">
      <style:paragraph-properties fo:orphans="2" fo:widows="2" fo:keep-with-next="auto"/>
      <style:text-properties style:font-name="Arial" fo:font-style="normal" style:font-name-asian="Arial" style:font-style-asian="normal" style:font-name-complex="Arial" style:font-style-complex="normal"/>
    </style:style>
    <style:style style:name="P30" style:family="paragraph" style:parent-style-name="Text_20_body_20_2">
      <style:paragraph-properties fo:orphans="0" fo:widows="0" fo:keep-with-next="auto"/>
      <style:text-properties style:font-name="Arial" fo:font-style="normal" style:font-name-asian="OpenSymbol" style:font-style-asian="normal" style:font-name-complex="OpenSymbol" style:font-style-complex="normal"/>
    </style:style>
    <style:style style:name="P31"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32" style:family="paragraph" style:parent-style-name="Text_20_body_20_2">
      <style:paragraph-properties fo:orphans="2" fo:widows="2" fo:keep-with-next="auto"/>
      <style:text-properties style:font-name="Arial" fo:language="de" fo:country="DE" fo:font-style="normal" style:font-name-asian="OpenSymbol1" style:font-style-asian="normal" style:font-name-complex="OpenSymbol1" style:font-style-complex="normal"/>
    </style:style>
    <style:style style:name="P33" style:family="paragraph" style:parent-style-name="Text_20_body_20_2">
      <style:paragraph-properties fo:orphans="2" fo:widows="2" fo:keep-with-next="auto"/>
      <style:text-properties style:font-name="Arial" fo:language="de" fo:country="DE"/>
    </style:style>
    <style:style style:name="P34" style:family="paragraph" style:parent-style-name="Text_20_body_20_2">
      <style:paragraph-properties fo:text-align="start" style:justify-single-word="false" fo:orphans="2" fo:widows="2" fo:keep-with-next="auto"/>
      <style:text-properties style:font-name="Arial"/>
    </style:style>
    <style:style style:name="P35" style:family="paragraph" style:parent-style-name="Text_20_body_20_2">
      <style:paragraph-properties fo:orphans="2" fo:widows="2" fo:keep-with-next="auto"/>
      <style:text-properties style:font-name="Arial" fo:language="eu" fo:country="none"/>
    </style:style>
    <style:style style:name="P36" style:family="paragraph" style:parent-style-name="Text_20_body_20_2">
      <style:paragraph-properties fo:text-align="justify" style:justify-single-word="false" fo:orphans="2" fo:widows="2" fo:keep-with-next="auto"/>
      <style:text-properties style:font-name="Arial"/>
    </style:style>
    <style:style style:name="P37" style:family="paragraph" style:parent-style-name="Text_20_body_20_2">
      <style:paragraph-properties fo:orphans="2" fo:widows="2" fo:keep-with-next="auto"/>
      <style:text-properties style:font-name="Arial" fo:language="en" fo:country="US"/>
    </style:style>
    <style:style style:name="P38" style:family="paragraph" style:parent-style-name="Text_20_body_20_2">
      <style:paragraph-properties fo:orphans="2" fo:widows="2" fo:keep-with-next="auto"/>
      <style:text-properties style:font-name="OpenSymbol" style:font-name-asian="OpenSymbol1" style:font-name-complex="OpenSymbol1"/>
    </style:style>
    <style:style style:name="P39" style:family="paragraph" style:parent-style-name="Text_20_body_20_2">
      <style:paragraph-properties fo:orphans="2" fo:widows="2" fo:keep-with-next="auto"/>
      <style:text-properties fo:color="#800000" style:font-name="Arial"/>
    </style:style>
    <style:style style:name="P40"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41"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42" style:family="paragraph" style:parent-style-name="Text_20_body_20_2">
      <style:paragraph-properties fo:orphans="2" fo:widows="2" fo:keep-with-next="auto"/>
    </style:style>
    <style:style style:name="P43" style:family="paragraph" style:parent-style-name="Table_20_Contents">
      <style:paragraph-properties fo:keep-with-next="auto"/>
    </style:style>
    <style:style style:name="P44" style:family="paragraph" style:parent-style-name="Table_20_Contents">
      <style:paragraph-properties fo:orphans="2" fo:widows="2" fo:keep-with-next="auto"/>
    </style:style>
    <style:style style:name="P45"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46"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47"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48" style:family="paragraph" style:parent-style-name="Table_20_Contents">
      <style:paragraph-properties fo:keep-with-next="auto"/>
      <style:text-properties fo:language="de" fo:country="DE" fo:font-weight="normal" style:font-name-asian="OpenSymbol1" style:font-name-complex="OpenSymbol1"/>
    </style:style>
    <style:style style:name="P49"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50"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51" style:family="paragraph" style:parent-style-name="Standard">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52" style:family="paragraph" style:parent-style-name="Text_20_body_20_2">
      <style:paragraph-properties fo:orphans="2" fo:widows="2"/>
      <style:text-properties style:font-name="Arial"/>
    </style:style>
    <style:style style:name="P53" style:family="paragraph" style:parent-style-name="Text_20_body_20_2">
      <style:paragraph-properties fo:orphans="2" fo:widows="2"/>
      <style:text-properties style:font-name="Arial" style:font-name-asian="OpenSymbol1" style:font-name-complex="OpenSymbol1"/>
    </style:style>
    <style:style style:name="P54"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55"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56"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57"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58"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59"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60"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61" style:family="paragraph" style:parent-style-name="Text_20_body_20_2">
      <style:paragraph-properties fo:orphans="0" fo:widows="0"/>
      <style:text-properties style:font-name="Arial" fo:font-style="normal" style:font-name-asian="OpenSymbol" style:font-style-asian="normal" style:font-name-complex="OpenSymbol" style:font-style-complex="normal"/>
    </style:style>
    <style:style style:name="P62" style:family="paragraph" style:parent-style-name="Text_20_body_20_2">
      <style:paragraph-properties fo:orphans="2" fo:widows="2"/>
      <style:text-properties style:font-name="Arial" fo:font-style="normal" style:font-name-asian="Arial" style:font-style-asian="normal" style:font-name-complex="Arial" style:font-style-complex="normal"/>
    </style:style>
    <style:style style:name="P63"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64" style:family="paragraph" style:parent-style-name="Text_20_body_20_2">
      <style:paragraph-properties fo:orphans="2" fo:widows="2"/>
      <style:text-properties style:font-name="Arial" fo:language="de" fo:country="DE"/>
    </style:style>
    <style:style style:name="P65" style:family="paragraph" style:parent-style-name="Text_20_body_20_2">
      <style:paragraph-properties fo:orphans="2" fo:widows="2"/>
      <style:text-properties style:font-name="Arial" fo:language="de" fo:country="DE" style:font-name-asian="OpenSymbol1" style:font-name-complex="OpenSymbol1"/>
    </style:style>
    <style:style style:name="P66" style:family="paragraph" style:parent-style-name="Text_20_body_20_2">
      <style:paragraph-properties fo:text-align="start" style:justify-single-word="false" fo:orphans="2" fo:widows="2"/>
      <style:text-properties style:font-name="Arial"/>
    </style:style>
    <style:style style:name="P67" style:family="paragraph" style:parent-style-name="Text_20_body_20_2">
      <style:paragraph-properties fo:orphans="2" fo:widows="2"/>
      <style:text-properties style:font-name="Arial" style:font-name-asian="ArialMT" style:font-name-complex="ArialMT"/>
    </style:style>
    <style:style style:name="P68" style:family="paragraph" style:parent-style-name="Text_20_body_20_2">
      <style:paragraph-properties fo:text-align="justify" style:justify-single-word="false" fo:orphans="2" fo:widows="2"/>
      <style:text-properties style:font-name="Arial"/>
    </style:style>
    <style:style style:name="P69"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70" style:family="paragraph" style:parent-style-name="Text_20_body_20_2">
      <style:paragraph-properties fo:orphans="2" fo:widows="2"/>
      <style:text-properties style:font-name="Arial" fo:font-weight="normal" style:font-name-asian="OpenSymbol1" style:font-weight-asian="normal" style:font-name-complex="OpenSymbol1" style:font-weight-complex="normal"/>
    </style:style>
    <style:style style:name="P71" style:family="paragraph" style:parent-style-name="Text_20_body_20_2">
      <style:paragraph-properties fo:orphans="0" fo:widows="0"/>
      <style:text-properties style:font-name="Arial"/>
    </style:style>
    <style:style style:name="P72" style:family="paragraph" style:parent-style-name="Text_20_body_20_2">
      <style:paragraph-properties fo:orphans="2" fo:widows="2"/>
      <style:text-properties style:font-name="OpenSymbol" style:font-name-asian="OpenSymbol1" style:font-name-complex="OpenSymbol1"/>
    </style:style>
    <style:style style:name="P73" style:family="paragraph" style:parent-style-name="Text_20_body_20_2">
      <style:paragraph-properties fo:orphans="2" fo:widows="2"/>
      <style:text-properties fo:color="#800080" style:font-name="Bitstream Vera Sans Mono1" fo:font-size="10pt" fo:font-style="normal" style:font-name-asian="OpenSymbol1" style:font-style-asian="normal" style:font-name-complex="OpenSymbol1" style:font-style-complex="normal"/>
    </style:style>
    <style:style style:name="P74" style:family="paragraph" style:parent-style-name="Text_20_body_20_2">
      <style:paragraph-properties fo:orphans="2" fo:widows="2"/>
      <style:text-properties fo:color="#800080" style:font-name="Bitstream Vera Sans Mono" fo:font-size="10pt" fo:font-style="normal" style:font-name-asian="OpenSymbol1" style:font-size-asian="10pt" style:font-style-asian="normal" style:font-name-complex="OpenSymbol1" style:font-size-complex="10pt" style:font-style-complex="normal"/>
    </style:style>
    <style:style style:name="P75"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76" style:family="paragraph" style:parent-style-name="Text_20_body_20_2">
      <style:paragraph-properties fo:text-align="start" style:justify-single-word="false" fo:orphans="2" fo:widows="2"/>
    </style:style>
    <style:style style:name="P77" style:family="paragraph" style:parent-style-name="Text_20_body_20_2">
      <style:paragraph-properties fo:orphans="2" fo:widows="2"/>
    </style:style>
    <style:style style:name="P78"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79"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80" style:family="paragraph" style:parent-style-name="Text_20_body_20_2">
      <style:paragraph-properties fo:keep-together="auto" fo:orphans="2" fo:widows="2" fo:keep-with-next="always"/>
      <style:text-properties style:font-name="Arial"/>
    </style:style>
    <style:style style:name="P81" style:family="paragraph" style:parent-style-name="Text_20_body_20_2">
      <style:paragraph-properties fo:keep-together="auto" fo:orphans="0" fo:widows="0" fo:keep-with-next="always"/>
      <style:text-properties style:font-name="Arial"/>
    </style:style>
    <style:style style:name="P82"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83"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84"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85"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86"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87"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88"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89"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90" style:family="paragraph" style:parent-style-name="Text_20_body_20_2">
      <style:paragraph-properties fo:keep-together="auto" fo:orphans="2" fo:widows="2" fo:keep-with-next="always"/>
      <style:text-properties style:font-name="Arial" fo:font-style="normal" style:font-name-asian="OpenSymbol1" style:font-style-asian="normal" style:font-name-complex="OpenSymbol1" style:font-style-complex="normal"/>
    </style:style>
    <style:style style:name="P91" style:family="paragraph" style:parent-style-name="Text_20_body_20_2">
      <style:paragraph-properties fo:orphans="0" fo:widows="0" fo:keep-with-next="always"/>
      <style:text-properties style:font-name="Arial" fo:font-style="normal" style:font-name-asian="OpenSymbol" style:font-style-asian="normal" style:font-name-complex="OpenSymbol" style:font-style-complex="normal"/>
    </style:style>
    <style:style style:name="P92" style:family="paragraph" style:parent-style-name="Text_20_body_20_2">
      <style:paragraph-properties fo:orphans="0" fo:widows="0" fo:keep-with-next="always"/>
      <style:text-properties style:font-name="Arial"/>
    </style:style>
    <style:style style:name="P93" style:family="paragraph" style:parent-style-name="Text_20_body_20_2">
      <style:paragraph-properties fo:keep-together="always" fo:orphans="0" fo:widows="0" fo:keep-with-next="always"/>
      <style:text-properties style:font-name="Arial"/>
    </style:style>
    <style:style style:name="P94"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95"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96" style:family="paragraph" style:parent-style-name="Table_20_Contents">
      <style:paragraph-properties fo:orphans="0" fo:widows="0" fo:keep-with-next="always"/>
      <style:text-properties fo:font-size="12pt" fo:language="de" fo:country="DE" fo:font-weight="normal" fo:background-color="transparent" style:font-name-asian="OpenSymbol1" style:font-size-asian="12pt" style:font-name-complex="OpenSymbol1" style:font-size-complex="12pt"/>
    </style:style>
    <style:style style:name="P97" style:family="paragraph" style:parent-style-name="Standard">
      <style:paragraph-properties fo:orphans="0" fo:widows="0" fo:keep-with-next="always"/>
      <style:text-properties style:font-name="Arial" fo:font-style="normal" style:font-name-asian="OpenSymbol1" style:font-style-asian="normal" style:font-name-complex="OpenSymbol1" style:font-style-complex="normal"/>
    </style:style>
    <style:style style:name="P98" style:family="paragraph" style:parent-style-name="Table_20_Contents">
      <style:text-properties fo:font-size="9pt" style:font-size-asian="9pt" style:font-size-complex="9pt"/>
    </style:style>
    <style:style style:name="P99" style:family="paragraph" style:parent-style-name="Table_20_Contents">
      <style:paragraph-properties fo:text-align="center" style:justify-single-word="false"/>
      <style:text-properties fo:font-size="9pt" style:font-size-asian="9pt" style:font-size-complex="9pt"/>
    </style:style>
    <style:style style:name="P100" style:family="paragraph" style:parent-style-name="Table_20_Contents">
      <style:paragraph-properties fo:text-align="start" style:justify-single-word="false"/>
      <style:text-properties fo:font-size="9pt" style:font-size-asian="9pt" style:font-size-complex="9pt"/>
    </style:style>
    <style:style style:name="P101"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102" style:family="paragraph" style:parent-style-name="Table_20_Contents">
      <style:paragraph-properties fo:text-align="center" style:justify-single-word="false"/>
      <style:text-properties fo:font-size="9pt" fo:language="de" fo:country="DE" style:font-name-asian="OpenSymbol1" style:font-size-asian="9pt" style:font-name-complex="OpenSymbol1" style:font-size-complex="9pt"/>
    </style:style>
    <style:style style:name="P103" style:family="paragraph" style:parent-style-name="Table_20_Contents">
      <style:paragraph-properties fo:text-align="start" style:justify-single-word="false"/>
      <style:text-properties fo:font-size="9pt" fo:language="de" fo:country="DE" style:font-name-asian="OpenSymbol1" style:font-size-asian="9pt" style:font-name-complex="OpenSymbol1" style:font-size-complex="9pt"/>
    </style:style>
    <style:style style:name="P104"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105"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106" style:family="paragraph" style:parent-style-name="Table_20_Contents">
      <style:text-properties fo:font-size="9pt" fo:language="de" fo:country="DE" fo:font-weight="normal" style:font-name-asian="OpenSymbol1" style:font-size-asian="9pt" style:font-name-complex="OpenSymbol1" style:font-size-complex="9pt"/>
    </style:style>
    <style:style style:name="P107" style:family="paragraph" style:parent-style-name="Table_20_Contents">
      <style:paragraph-properties fo:line-height="0.349cm"/>
      <style:text-properties fo:font-size="9pt" fo:language="de" fo:country="DE" fo:font-weight="normal" style:font-name-asian="OpenSymbol1" style:font-size-asian="9pt" style:font-name-complex="OpenSymbol1" style:font-size-complex="9pt"/>
    </style:style>
    <style:style style:name="P108" style:family="paragraph" style:parent-style-name="Table_20_Contents">
      <style:text-properties fo:font-size="9pt" fo:language="de" fo:country="DE" fo:font-weight="normal" style:font-name-asian="OpenSymbol1" style:font-name-complex="OpenSymbol1"/>
    </style:style>
    <style:style style:name="P109" style:family="paragraph" style:parent-style-name="Table_20_Contents">
      <style:text-properties fo:font-size="9pt" fo:language="de" fo:country="DE" fo:font-weight="normal" style:font-size-asian="9pt" style:font-size-complex="9pt"/>
    </style:style>
    <style:style style:name="P110" style:family="paragraph" style:parent-style-name="Table_20_Contents">
      <style:paragraph-properties fo:text-align="center" style:justify-single-word="false"/>
      <style:text-properties fo:font-size="9pt" fo:language="de" fo:country="DE" fo:font-weight="normal" style:font-size-asian="9pt" style:font-size-complex="9pt"/>
    </style:style>
    <style:style style:name="P111" style:family="paragraph" style:parent-style-name="Table_20_Contents">
      <style:text-properties fo:font-size="9pt" fo:language="de" fo:country="DE" style:font-size-asian="9pt" style:font-size-complex="9pt"/>
    </style:style>
    <style:style style:name="P112" style:family="paragraph" style:parent-style-name="Table_20_Contents">
      <style:text-properties fo:font-size="9pt" fo:language="de" fo:country="DE" fo:font-weight="bold" style:font-name-asian="OpenSymbol1" style:font-size-asian="9pt" style:font-weight-asian="bold" style:font-name-complex="OpenSymbol1" style:font-size-complex="9pt" style:font-weight-complex="bold"/>
    </style:style>
    <style:style style:name="P113" style:family="paragraph" style:parent-style-name="Table_20_Contents">
      <style:paragraph-properties fo:text-align="center" style:justify-single-word="false"/>
      <style:text-properties fo:font-size="9pt" fo:language="de" fo:country="DE" fo:font-weight="bold" style:font-name-asian="OpenSymbol1" style:font-size-asian="9pt" style:font-weight-asian="bold" style:font-name-complex="OpenSymbol1" style:font-size-complex="9pt" style:font-weight-complex="bold"/>
    </style:style>
    <style:style style:name="P114" style:family="paragraph" style:parent-style-name="Table_20_Contents">
      <style:paragraph-properties fo:line-height="0.349cm"/>
      <style:text-properties fo:font-size="9pt" fo:language="de" fo:country="DE" fo:font-weight="bold" style:font-name-asian="OpenSymbol1" style:font-size-asian="9pt" style:font-weight-asian="bold" style:font-name-complex="OpenSymbol1" style:font-size-complex="9pt" style:font-weight-complex="bold"/>
    </style:style>
    <style:style style:name="P115" style:family="paragraph" style:parent-style-name="Table_20_Contents">
      <style:text-properties fo:font-size="9pt" fo:language="de" fo:country="DE" fo:font-weight="bold" style:font-name-asian="OpenSymbol1" style:font-weight-asian="bold" style:font-name-complex="OpenSymbol1" style:font-weight-complex="bold"/>
    </style:style>
    <style:style style:name="P116" style:family="paragraph" style:parent-style-name="Table_20_Contents">
      <style:text-properties fo:font-size="9pt" fo:language="de" fo:country="DE" fo:font-weight="bold"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fo:font-size="9pt" fo:language="de" fo:country="DE" fo:font-weight="bold" style:font-size-asian="9pt" style:font-weight-asian="bold" style:font-size-complex="9pt" style:font-weight-complex="bold"/>
    </style:style>
    <style:style style:name="P118"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119"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120" style:family="paragraph" style:parent-style-name="Table_20_Contents">
      <style:text-properties fo:font-size="9pt" fo:language="en" fo:country="US" fo:font-weight="normal" style:font-size-asian="9pt" style:font-size-complex="9pt"/>
    </style:style>
    <style:style style:name="P121" style:family="paragraph" style:parent-style-name="Table_20_Contents">
      <style:text-properties fo:font-size="9pt" fo:language="en" fo:country="GB" fo:font-weight="normal" style:font-name-asian="OpenSymbol1" style:font-size-asian="9pt" style:font-name-complex="OpenSymbol1" style:font-size-complex="9pt"/>
    </style:style>
    <style:style style:name="P122" style:family="paragraph" style:parent-style-name="Table_20_Contents">
      <style:text-properties style:font-name-asian="OpenSymbol1" style:font-name-complex="OpenSymbol1"/>
    </style:style>
    <style:style style:name="P123" style:family="paragraph" style:parent-style-name="Table_20_Contents">
      <style:paragraph-properties fo:text-align="center" style:justify-single-word="false"/>
      <style:text-properties style:font-name-asian="OpenSymbol1" style:font-name-complex="OpenSymbol1"/>
    </style:style>
    <style:style style:name="P124" style:family="paragraph" style:parent-style-name="Table_20_Contents">
      <style:paragraph-properties fo:text-align="start" style:justify-single-word="false"/>
      <style:text-properties style:font-name-asian="OpenSymbol1" style:font-name-complex="OpenSymbol1"/>
    </style:style>
    <style:style style:name="P125"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126" style:family="paragraph" style:parent-style-name="Table_20_Contents">
      <style:text-properties fo:language="en" fo:country="US"/>
    </style:style>
    <style:style style:name="P127" style:family="paragraph" style:parent-style-name="Table_20_Contents">
      <style:text-properties fo:language="en" fo:country="US" fo:font-weight="normal" style:font-name-asian="OpenSymbol1" style:font-name-complex="OpenSymbol1"/>
    </style:style>
    <style:style style:name="P128" style:family="paragraph" style:parent-style-name="Table_20_Contents">
      <style:text-properties fo:language="en" fo:country="US" style:font-name-asian="OpenSymbol1" style:font-name-complex="OpenSymbol1"/>
    </style:style>
    <style:style style:name="P129" style:family="paragraph" style:parent-style-name="Table_20_Contents">
      <style:text-properties fo:language="de" fo:country="DE" fo:font-weight="normal" style:font-name-asian="OpenSymbol1" style:font-name-complex="OpenSymbol1"/>
    </style:style>
    <style:style style:name="P130"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131" style:family="paragraph" style:parent-style-name="Table_20_Contents">
      <style:text-properties fo:language="de" fo:country="DE" style:font-name-asian="OpenSymbol1" style:font-name-complex="OpenSymbol1"/>
    </style:style>
    <style:style style:name="P132" style:family="paragraph" style:parent-style-name="Table_20_Contents">
      <style:text-properties fo:language="de" fo:country="DE" fo:font-style="normal" fo:font-weight="bold" style:font-name-asian="OpenSymbol1" style:font-style-asian="normal" style:font-weight-asian="bold" style:font-name-complex="OpenSymbol1" style:font-style-complex="normal" style:font-weight-complex="bold"/>
    </style:style>
    <style:style style:name="P133" style:family="paragraph" style:parent-style-name="Table_20_Contents">
      <style:text-properties style:font-name="Arial2" style:font-name-asian="OpenSymbol1" style:font-name-complex="OpenSymbol1"/>
    </style:style>
    <style:style style:name="P134" style:family="paragraph" style:parent-style-name="Table_20_Contents">
      <style:text-properties style:font-name="Arial2" fo:font-weight="bold" style:font-name-asian="OpenSymbol1" style:font-weight-asian="bold" style:font-name-complex="OpenSymbol1" style:font-weight-complex="bold"/>
    </style:style>
    <style:style style:name="P135" style:family="paragraph" style:parent-style-name="Table_20_Contents">
      <style:text-properties style:font-name="Arial2" fo:font-size="10pt" style:font-name-asian="OpenSymbol1" style:font-size-asian="12pt" style:font-style-asian="normal" style:font-weight-asian="normal" style:font-name-complex="OpenSymbol1" style:font-size-complex="12pt" style:font-style-complex="normal" style:font-weight-complex="normal"/>
    </style:style>
    <style:style style:name="P136"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137"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138"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139" style:family="paragraph" style:parent-style-name="Table_20_Contents">
      <style:text-properties style:font-name="Arial" fo:font-size="8pt" fo:language="de" fo:country="DE" style:font-name-asian="OpenSymbol1" style:font-size-asian="8pt" style:font-name-complex="OpenSymbol1" style:font-size-complex="8pt"/>
    </style:style>
    <style:style style:name="P140" style:family="paragraph" style:parent-style-name="Table_20_Contents">
      <style:text-properties style:font-name="Arial" fo:font-size="10pt" style:font-name-asian="OpenSymbol1" style:font-size-asian="10pt" style:font-name-complex="OpenSymbol1" style:font-size-complex="10pt"/>
    </style:style>
    <style:style style:name="P141" style:family="paragraph" style:parent-style-name="Table_20_Contents">
      <style:text-properties style:font-name="Arial" fo:font-size="10pt" fo:language="de" fo:country="DE" style:font-name-asian="OpenSymbol1" style:font-size-asian="10pt" style:font-name-complex="OpenSymbol1" style:font-size-complex="10pt"/>
    </style:style>
    <style:style style:name="P142" style:family="paragraph" style:parent-style-name="Table_20_Contents">
      <style:text-properties style:font-name="Arial" fo:font-size="10pt" fo:language="de" fo:country="DE" fo:font-weight="bold" style:font-name-asian="OpenSymbol1" style:font-size-asian="10pt" style:font-weight-asian="bold" style:font-name-complex="OpenSymbol1" style:font-size-complex="10pt" style:font-weight-complex="bold"/>
    </style:style>
    <style:style style:name="P143" style:family="paragraph" style:parent-style-name="Table_20_Contents">
      <style:text-properties style:font-name="Arial" fo:font-size="10pt" fo:language="de" fo:country="DE"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P144" style:family="paragraph" style:parent-style-name="Table_20_Contents">
      <style:paragraph-properties fo:text-align="center" style:justify-single-word="false"/>
      <style:text-properties style:font-name="Wingdings" fo:font-size="9pt" style:font-name-asian="Wingdings" style:font-size-asian="9pt" style:font-name-complex="Wingdings" style:font-size-complex="9pt"/>
    </style:style>
    <style:style style:name="P145" style:family="paragraph" style:parent-style-name="Table_20_Contents">
      <style:text-properties fo:font-weight="bold" style:font-name-asian="OpenSymbol1" style:font-weight-asian="bold" style:font-name-complex="OpenSymbol1" style:font-weight-complex="bold"/>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text-properties fo:font-size="8.5pt" fo:language="de" fo:country="DE" fo:font-weight="normal" style:font-name-asian="OpenSymbol1" style:font-size-asian="8.5pt" style:font-name-complex="OpenSymbol1" style:font-size-complex="8.5pt"/>
    </style:style>
    <style:style style:name="P148" style:family="paragraph" style:parent-style-name="Table_20_Contents">
      <style:text-properties fo:font-size="8.5pt" fo:language="de" fo:country="DE" fo:font-weight="normal" style:font-name-asian="OpenSymbol1" style:font-name-complex="OpenSymbol1"/>
    </style:style>
    <style:style style:name="P149" style:family="paragraph" style:parent-style-name="Table_20_Contents">
      <style:paragraph-properties fo:text-align="center" style:justify-single-word="false"/>
    </style:style>
    <style:style style:name="P150"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51"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52"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53"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54" style:family="paragraph" style:parent-style-name="Text_20_body_20_2">
      <style:paragraph-properties fo:margin-left="0.3cm" fo:margin-right="0.009cm" fo:orphans="2" fo:widows="2" fo:text-indent="0cm" style:auto-text-indent="false" fo:keep-with-next="auto"/>
    </style:style>
    <style:style style:name="P155"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56"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57"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58"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59"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60" style:family="paragraph" style:parent-style-name="Text_20_body_20_2">
      <style:paragraph-properties fo:margin-left="0.979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61" style:family="paragraph" style:parent-style-name="Text_20_body_20_2">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62" style:family="paragraph" style:parent-style-name="Marginalia">
      <style:text-properties fo:font-size="8pt"/>
    </style:style>
    <style:style style:name="P163" style:family="paragraph" style:parent-style-name="Table_20_Heading">
      <style:paragraph-properties fo:text-align="center" style:justify-single-word="false"/>
      <style:text-properties fo:language="en" fo:country="US" style:font-name-asian="OpenSymbol1" style:font-name-complex="OpenSymbol1"/>
    </style:style>
    <style:style style:name="P164" style:family="paragraph" style:parent-style-name="Table_20_Heading">
      <style:paragraph-properties fo:text-align="center" style:justify-single-word="false"/>
      <style:text-properties style:font-name-asian="OpenSymbol1" style:font-name-complex="OpenSymbol1"/>
    </style:style>
    <style:style style:name="P165"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66"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67" style:family="paragraph" style:parent-style-name="Text_20_body_20_2">
      <style:paragraph-properties fo:margin-left="1cm" fo:margin-right="0cm" fo:text-indent="0cm" style:auto-text-indent="false"/>
    </style:style>
    <style:style style:name="P168"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69" style:family="paragraph" style:parent-style-name="Text_20_body_20_2">
      <style:paragraph-properties fo:margin-left="1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70" style:family="paragraph" style:parent-style-name="Text_20_body_20_2" style:master-page-name="">
      <style:paragraph-properties fo:keep-together="auto" fo:orphans="2" fo:widows="2" style:page-number="auto" fo:keep-with-next="auto"/>
      <style:text-properties style:font-name="Arial"/>
    </style:style>
    <style:style style:name="P171"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72"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73"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74"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75"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76" style:family="paragraph" style:parent-style-name="Text_20_body_20_2" style:master-page-name="">
      <style:paragraph-properties fo:orphans="0" fo:widows="0" style:page-number="auto" fo:keep-with-next="auto"/>
      <style:text-properties style:font-name="Arial" fo:font-style="normal" style:font-name-asian="OpenSymbol" style:font-style-asian="normal" style:font-name-complex="OpenSymbol" style:font-style-complex="normal"/>
    </style:style>
    <style:style style:name="P177"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78" style:family="paragraph" style:parent-style-name="Text_20_body_20_2" style:master-page-name="">
      <style:paragraph-properties fo:keep-together="auto" fo:orphans="2" fo:widows="2" style:page-number="auto"/>
      <style:text-properties style:font-name="Arial"/>
    </style:style>
    <style:style style:name="P179"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80"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81"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82"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83" style:family="paragraph" style:parent-style-name="Text_20_body_20_2" style:master-page-name="">
      <style:paragraph-properties fo:keep-together="auto" fo:orphans="2" fo:widows="2" style:page-number="auto" fo:keep-with-next="always"/>
      <style:text-properties style:font-name="Arial"/>
    </style:style>
    <style:style style:name="P184" style:family="paragraph" style:parent-style-name="Text_20_body_20_2" style:master-page-name="">
      <style:paragraph-properties fo:keep-together="auto" fo:orphans="0" fo:widows="0" style:page-number="auto" fo:keep-with-next="always"/>
      <style:text-properties style:font-name="Arial"/>
    </style:style>
    <style:style style:name="P185"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86"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87"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88" style:family="paragraph" style:parent-style-name="Text_20_body_20_2" style:master-page-name="">
      <style:paragraph-properties fo:orphans="0" fo:widows="0" style:page-number="auto" fo:keep-with-next="always"/>
      <style:text-properties style:font-name="Arial" fo:font-style="normal" style:font-name-asian="OpenSymbol1" style:font-style-asian="normal" style:font-name-complex="OpenSymbol1" style:font-style-complex="normal"/>
    </style:style>
    <style:style style:name="P189" style:family="paragraph" style:parent-style-name="Text_20_body_20_2" style:master-page-name="">
      <style:paragraph-properties fo:orphans="2" fo:widows="2" style:page-number="auto" fo:keep-with-next="always"/>
      <style:text-properties style:font-name="Arial" fo:font-style="normal" style:font-name-asian="OpenSymbol1" style:font-style-asian="normal" style:font-name-complex="OpenSymbol1" style:font-style-complex="normal"/>
    </style:style>
    <style:style style:name="P190"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91" style:family="paragraph" style:parent-style-name="Text_20_body_20_2" style:master-page-name="">
      <style:paragraph-properties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92" style:family="paragraph" style:parent-style-name="Text_20_body_20_2" style:master-page-name="">
      <style:paragraph-properties fo:orphans="2" fo:widows="2" style:page-number="auto" fo:keep-with-next="always"/>
      <style:text-properties style:font-name="Arial" fo:font-style="normal" style:font-name-asian="OpenSymbol" style:font-style-asian="normal" style:font-name-complex="OpenSymbol" style:font-style-complex="normal"/>
    </style:style>
    <style:style style:name="P193" style:family="paragraph" style:parent-style-name="Standard" style:master-page-name="">
      <style:paragraph-properties style:page-number="auto" fo:keep-with-next="always"/>
    </style:style>
    <style:style style:name="P194" style:family="paragraph" style:parent-style-name="Standard" style:master-page-name="">
      <style:paragraph-properties style:page-number="auto"/>
    </style:style>
    <style:style style:name="P195" style:family="paragraph" style:parent-style-name="Standard" style:master-page-name="">
      <style:paragraph-properties fo:orphans="2" fo:widows="2" style:page-number="auto"/>
      <style:text-properties style:font-name="Arial" fo:font-style="normal" style:font-name-asian="OpenSymbol" style:font-style-asian="normal" style:font-name-complex="OpenSymbol" style:font-style-complex="normal"/>
    </style:style>
    <style:style style:name="P196"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97"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98" style:family="paragraph" style:parent-style-name="Standard">
      <style:text-properties style:font-name="Arial" fo:font-style="normal" style:font-name-asian="OpenSymbol1" style:font-style-asian="normal" style:font-name-complex="OpenSymbol1" style:font-style-complex="normal"/>
    </style:style>
    <style:style style:name="P199"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200" style:family="paragraph" style:parent-style-name="Standard">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201" style:family="paragraph" style:parent-style-name="Text_20_Body_20_Single">
      <style:text-properties style:font-name="OpenSymbol"/>
    </style:style>
    <style:style style:name="P202"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fo:hyphenate="true" fo:hyphenation-remain-char-count="2" fo:hyphenation-push-char-count="2"/>
    </style:style>
    <style:style style:name="P203"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204"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205"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Arial" fo:font-style="normal" style:font-name-asian="OpenSymbol1" style:font-style-asian="normal" style:font-name-complex="OpenSymbol1" style:font-style-complex="normal" fo:hyphenate="true" fo:hyphenation-remain-char-count="2" fo:hyphenation-push-char-count="2"/>
    </style:style>
    <style:style style:name="P206"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Arial" fo:font-style="normal" fo:font-weight="normal" style:font-name-asian="OpenSymbol1" style:font-style-asian="normal" style:font-name-complex="OpenSymbol1" style:font-style-complex="normal" fo:hyphenate="true" fo:hyphenation-remain-char-count="2" fo:hyphenation-push-char-count="2"/>
    </style:style>
    <style:style style:name="P207" style:family="paragraph" style:parent-style-name="Text_20_body_20_2">
      <style:paragraph-properties fo:margin-top="0cm" fo:margin-bottom="0.212cm" fo:text-align="justify" style:justify-single-word="false" fo:keep-together="auto" fo:orphans="2" fo:widows="2" fo:hyphenation-ladder-count="no-limit" fo:keep-with-next="always">
        <style:tab-stops/>
        <style:drop-cap/>
      </style:paragraph-properties>
      <style:text-properties style:font-name="Arial" fo:font-style="normal" style:font-name-asian="OpenSymbol1" style:font-style-asian="normal" style:font-name-complex="OpenSymbol1" style:font-style-complex="normal" fo:hyphenate="true" fo:hyphenation-remain-char-count="2" fo:hyphenation-push-char-count="2"/>
    </style:style>
    <style:style style:name="P208" style:family="paragraph" style:parent-style-name="Text_20_body_20_2" style:master-page-name="">
      <style:paragraph-properties fo:margin-top="0cm" fo:margin-bottom="0.212cm" fo:text-align="justify" style:justify-single-word="false" fo:keep-together="auto" fo:orphans="2" fo:widows="2" fo:hyphenation-ladder-count="no-limit" style:page-number="auto" fo:keep-with-next="always">
        <style:tab-stops/>
        <style:drop-cap/>
      </style:paragraph-properties>
      <style:text-properties fo:hyphenate="true" fo:hyphenation-remain-char-count="2" fo:hyphenation-push-char-count="2"/>
    </style:style>
    <style:style style:name="P209"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210"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211" style:family="paragraph" style:parent-style-name="Heading_20_1" style:list-style-name="L1" style:master-page-name="">
      <style:paragraph-properties fo:orphans="2" fo:widows="2" style:page-number="auto" fo:break-before="page" fo:keep-with-next="auto"/>
      <style:text-properties style:font-name="Arial"/>
    </style:style>
    <style:style style:name="P212"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13"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214"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215" style:family="paragraph" style:parent-style-name="Heading_20_1" style:list-style-name="L1" style:master-page-name="">
      <style:paragraph-properties fo:orphans="2" fo:widows="2" style:page-number="auto" fo:break-before="page" fo:keep-with-next="auto"/>
      <style:text-properties style:font-name="Arial" fo:language="en" fo:country="US" style:font-size-asian="16.1000003814697pt" style:font-size-complex="16.1000003814697pt"/>
    </style:style>
    <style:style style:name="P216" style:family="paragraph" style:parent-style-name="Heading_20_1" style:list-style-name="L1">
      <style:paragraph-properties fo:orphans="2" fo:widows="2" fo:keep-with-next="auto"/>
      <style:text-properties style:font-name="Arial"/>
    </style:style>
    <style:style style:name="P217" style:family="paragraph" style:parent-style-name="Heading_20_2" style:list-style-name="L1"/>
    <style:style style:name="P218" style:family="paragraph" style:parent-style-name="Heading_20_2" style:list-style-name="L1">
      <style:text-properties style:font-name="Arial"/>
    </style:style>
    <style:style style:name="P219" style:family="paragraph" style:parent-style-name="Heading_20_2" style:list-style-name="L1">
      <style:text-properties style:font-name="Arial" fo:language="de" fo:country="DE" fo:font-style="normal" style:font-name-asian="HG Mincho Light J" style:font-name-complex="Arial Unicode MS1"/>
    </style:style>
    <style:style style:name="P220" style:family="paragraph" style:parent-style-name="Heading_20_2" style:list-style-name="L1">
      <style:paragraph-properties fo:orphans="2" fo:widows="2"/>
      <style:text-properties style:font-name="Arial" fo:language="de" fo:country="DE" style:font-name-asian="OpenSymbol1" style:font-name-complex="OpenSymbol1"/>
    </style:style>
    <style:style style:name="P221" style:family="paragraph" style:parent-style-name="Heading_20_2" style:list-style-name="L1">
      <style:paragraph-properties fo:orphans="2" fo:widows="2"/>
      <style:text-properties style:font-name="Arial"/>
    </style:style>
    <style:style style:name="P222" style:family="paragraph" style:parent-style-name="Heading_20_2" style:list-style-name="L1" style:master-page-name="">
      <style:paragraph-properties style:page-number="auto"/>
    </style:style>
    <style:style style:name="P223" style:family="paragraph" style:parent-style-name="Heading_20_2" style:list-style-name="L1">
      <style:paragraph-properties fo:margin-left="1cm" fo:margin-right="0cm" fo:text-indent="0cm" style:auto-text-indent="false"/>
    </style:style>
    <style:style style:name="P224"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225"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26" style:family="paragraph" style:parent-style-name="Heading_20_2" style:list-style-name="L1">
      <style:paragraph-properties fo:margin-top="2cm" fo:margin-bottom="0.499cm" fo:text-align="start" style:justify-single-word="true" fo:orphans="0" fo:widows="2"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227" style:family="paragraph" style:parent-style-name="Heading_20_2" style:list-style-name="L1">
      <style:paragraph-properties fo:orphans="0" fo:widows="0" fo:keep-with-next="always"/>
    </style:style>
    <style:style style:name="P228" style:family="paragraph" style:parent-style-name="Index_20_1">
      <style:paragraph-properties>
        <style:tab-stops>
          <style:tab-stop style:position="16.999cm" style:type="right" style:leader-style="dotted" style:leader-text="."/>
        </style:tab-stops>
      </style:paragraph-properties>
    </style:style>
    <style:style style:name="P229"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230"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231" style:family="paragraph" style:parent-style-name="Text_20_body_20_2" style:list-style-name="L4">
      <style:paragraph-properties fo:text-align="start" style:justify-single-word="false" fo:orphans="2" fo:widows="2"/>
      <style:text-properties style:font-name="Arial"/>
    </style:style>
    <style:style style:name="P232" style:family="paragraph" style:parent-style-name="Text_20_body_20_2">
      <style:paragraph-properties fo:orphans="2" fo:widows="2"/>
      <style:text-properties style:font-name="Arial"/>
    </style:style>
    <style:style style:name="P233" style:family="paragraph" style:parent-style-name="Text_20_body_20_2" style:list-style-name="L4">
      <style:paragraph-properties fo:orphans="2" fo:widows="2"/>
      <style:text-properties style:font-name="Arial"/>
    </style:style>
    <style:style style:name="P234" style:family="paragraph" style:parent-style-name="Text_20_body_20_2" style:list-style-name="L5">
      <style:paragraph-properties fo:orphans="2" fo:widows="2"/>
      <style:text-properties style:font-name="Arial"/>
    </style:style>
    <style:style style:name="P235"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236"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237"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238" style:family="paragraph" style:parent-style-name="Text_20_body_20_2">
      <style:paragraph-properties fo:orphans="2" fo:widows="2"/>
      <style:text-properties style:font-name="Arial" style:font-name-asian="ArialMT" style:font-name-complex="ArialMT"/>
    </style:style>
    <style:style style:name="P239"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240" style:family="paragraph" style:parent-style-name="Text_20_body_20_2" style:list-style-name="L5">
      <style:paragraph-properties fo:text-align="justify" style:justify-single-word="false"/>
    </style:style>
    <style:style style:name="P241" style:family="paragraph" style:parent-style-name="Text_20_body_20_2" style:list-style-name="L2">
      <style:paragraph-properties fo:orphans="2" fo:widows="2" fo:keep-with-next="auto"/>
      <style:text-properties style:font-name="Arial"/>
    </style:style>
    <style:style style:name="P242" style:family="paragraph" style:parent-style-name="Text_20_body_20_2" style:list-style-name="L4">
      <style:paragraph-properties fo:orphans="2" fo:widows="2" fo:keep-with-next="auto"/>
      <style:text-properties style:font-name="Arial"/>
    </style:style>
    <style:style style:name="P243" style:family="paragraph" style:parent-style-name="Text_20_body_20_2" style:list-style-name="L3">
      <style:paragraph-properties fo:text-align="start" style:justify-single-word="false" fo:orphans="2" fo:widows="2" fo:keep-with-next="auto"/>
      <style:text-properties style:font-name="Arial"/>
    </style:style>
    <style:style style:name="P244" style:family="paragraph" style:parent-style-name="Text_20_body_20_2" style:list-style-name="L4">
      <style:paragraph-properties fo:text-align="start" style:justify-single-word="false" fo:orphans="2" fo:widows="2" fo:keep-with-next="auto"/>
      <style:text-properties style:font-name="Arial"/>
    </style:style>
    <style:style style:name="P245"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246" style:family="paragraph" style:parent-style-name="Text_20_body_20_2" style:list-style-name="L2">
      <style:paragraph-properties fo:margin-left="0cm" fo:margin-right="0cm" fo:orphans="2" fo:widows="2" fo:text-indent="0cm" style:auto-text-indent="false"/>
      <style:text-properties style:font-name="Arial"/>
    </style:style>
    <style:style style:name="P247"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248"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249"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250" style:family="paragraph" style:parent-style-name="Cover_20_Title" style:master-page-name="First_20_Page">
      <style:paragraph-properties style:page-number="auto"/>
      <style:text-properties style:font-name="Arial"/>
    </style:style>
    <style:style style:name="P251"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2" style:family="paragraph">
      <style:paragraph-properties text:enable-numbering="false" fo:margin-left="0cm" fo:margin-right="0cm" fo:margin-top="0cm" fo:margin-bottom="0cm" fo:line-height="100%" fo:text-indent="0cm"/>
    </style:style>
    <style:style style:name="P253"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4"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5"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6" style:family="paragraph">
      <style:paragraph-properties fo:text-align="center" style:writing-mode="lr-tb"/>
    </style:style>
    <style:style style:name="P257" style:family="paragraph">
      <style:paragraph-properties style:writing-mode="lr-tb"/>
    </style:style>
    <style:style style:name="P258"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5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6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1" style:family="paragraph">
      <style:paragraph-properties text:enable-numbering="false" fo:margin-left="0cm" fo:margin-right="0cm" fo:margin-top="0cm" fo:margin-bottom="0cm" fo:line-height="100%" fo:text-align="center" fo:text-indent="0cm"/>
    </style:style>
    <style:style style:name="P26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3"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64"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5"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6" style:family="paragraph">
      <style:paragraph-properties text:enable-numbering="false" fo:margin-left="0cm" fo:margin-right="0cm" fo:margin-top="0cm" fo:margin-bottom="0cm" fo:line-height="100%"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7" style:family="paragraph">
      <style:paragraph-properties text:enable-numbering="false" fo:margin-left="0cm" fo:margin-right="0cm" fo:margin-top="0cm" fo:margin-bottom="0cm" fo:line-height="100%"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8" style:family="paragraph">
      <style:paragraph-properties text:enable-numbering="false" fo:margin-left="0cm" fo:margin-right="0cm" fo:margin-top="0cm" fo:margin-bottom="0cm" fo:line-height="100%"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font-style="normal" fo:font-weight="normal" style:font-name-asian="OpenSymbol1" style:font-style-asian="normal" style:font-name-complex="OpenSymbol1" style:font-style-complex="normal"/>
    </style:style>
    <style:style style:name="T7" style:family="text">
      <style:text-properties style:font-name="Arial" fo:language="en" fo:country="US"/>
    </style:style>
    <style:style style:name="T8" style:family="text">
      <style:text-properties style:font-name="Arial" fo:language="en" fo:country="US" fo:font-style="normal" style:font-name-asian="OpenSymbol1" style:font-style-asian="normal" style:font-name-complex="OpenSymbol1" style:font-style-complex="normal"/>
    </style:style>
    <style:style style:name="T9" style:family="text">
      <style:text-properties style:font-name="Arial" fo:language="en" fo:country="US" fo:font-style="normal" style:font-name-asian="OpenSymbol" style:font-style-asian="normal" style:font-name-complex="OpenSymbol" style:font-style-complex="normal"/>
    </style:style>
    <style:style style:name="T10" style:family="text">
      <style:text-properties style:font-name="Arial" style:font-name-asian="OpenSymbol1" style:font-name-complex="OpenSymbol1"/>
    </style:style>
    <style:style style:name="T11"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2" style:family="text">
      <style:text-properties style:font-name="Arial" style:font-name-asian="Arial" style:font-name-complex="Arial"/>
    </style:style>
    <style:style style:name="T13" style:family="text">
      <style:text-properties style:font-name="Arial" fo:language="en" fo:country="GB" fo:font-style="normal" style:font-name-asian="OpenSymbol1" style:font-style-asian="normal" style:font-name-complex="OpenSymbol1" style:font-style-complex="normal"/>
    </style:style>
    <style:style style:name="T14" style:family="text">
      <style:text-properties style:font-name="Arial" fo:language="de" fo:country="DE" fo:font-style="normal" style:font-name-asian="OpenSymbol1" style:font-style-asian="normal" style:font-name-complex="OpenSymbol1" style:font-style-complex="normal"/>
    </style:style>
    <style:style style:name="T15" style:family="text">
      <style:text-properties style:font-name="Arial" fo:font-weight="normal"/>
    </style:style>
    <style:style style:name="T16" style:family="text">
      <style:text-properties fo:language="en" fo:country="US"/>
    </style:style>
    <style:style style:name="T17" style:family="text">
      <style:text-properties fo:language="en" fo:country="US" fo:background-color="transparent"/>
    </style:style>
    <style:style style:name="T18" style:family="text">
      <style:text-properties fo:language="en" fo:country="US" style:font-name-asian="OpenSymbol1" style:font-name-complex="OpenSymbol1"/>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style:font-name-asian="OpenSymbol1" style:font-style-asian="normal" style:font-name-complex="OpenSymbol1" style:font-style-complex="normal"/>
    </style:style>
    <style:style style:name="T21" style:family="text">
      <style:text-properties fo:language="en" fo:country="US" fo:font-style="normal" fo:font-weight="normal" style:font-name-asian="OpenSymbol1" style:font-style-asian="normal" style:font-name-complex="OpenSymbol1" style:font-style-complex="normal"/>
    </style:style>
    <style:style style:name="T22" style:family="text">
      <style:text-properties fo:language="en" fo:country="US" fo:font-weight="normal"/>
    </style:style>
    <style:style style:name="T23" style:family="text">
      <style:text-properties fo:language="en" fo:country="US" fo:font-style="italic" style:font-style-asian="italic" style:font-style-complex="italic"/>
    </style:style>
    <style:style style:name="T24" style:family="text">
      <style:text-properties fo:language="de" fo:country="DE"/>
    </style:style>
    <style:style style:name="T25" style:family="text">
      <style:text-properties fo:language="de" fo:country="DE" fo:font-style="normal" style:font-name-asian="OpenSymbol1" style:font-style-asian="normal" style:font-name-complex="OpenSymbol1" style:font-style-complex="normal"/>
    </style:style>
    <style:style style:name="T26" style:family="text">
      <style:text-properties fo:language="de" fo:country="DE" fo:font-style="normal" style:font-style-asian="normal" style:font-style-complex="normal"/>
    </style:style>
    <style:style style:name="T27" style:family="text">
      <style:text-properties fo:language="de" fo:country="DE" fo:font-style="italic" style:font-style-asian="italic" style:font-style-complex="italic"/>
    </style:style>
    <style:style style:name="T28" style:family="text">
      <style:text-properties fo:language="en" fo:country="GB"/>
    </style:style>
    <style:style style:name="T29" style:family="text">
      <style:text-properties fo:language="en" fo:country="GB" style:font-size-asian="16.1000003814697pt" style:font-size-complex="16.1000003814697pt"/>
    </style:style>
    <style:style style:name="T30" style:family="text">
      <style:text-properties fo:language="en" fo:country="GB" fo:font-style="italic" style:font-style-asian="italic" style:font-style-complex="italic"/>
    </style:style>
    <style:style style:name="T31" style:family="text">
      <style:text-properties style:font-name-asian="OpenSymbol1" style:font-name-complex="OpenSymbol1"/>
    </style:style>
    <style:style style:name="T32" style:family="text">
      <style:text-properties style:text-position="0% 100%"/>
    </style:style>
    <style:style style:name="T33" style:family="text">
      <style:text-properties style:text-underline-style="solid" style:text-underline-width="auto" style:text-underline-color="font-color"/>
    </style:style>
    <style:style style:name="T34" style:family="text">
      <style:text-properties fo:font-style="normal" style:font-style-asian="normal" style:font-style-complex="normal"/>
    </style:style>
    <style:style style:name="T35" style:family="text">
      <style:text-properties fo:font-style="normal" style:font-name-asian="OpenSymbol1" style:font-style-asian="normal" style:font-name-complex="OpenSymbol1" style:font-style-complex="normal"/>
    </style:style>
    <style:style style:name="T36" style:family="text">
      <style:text-properties fo:font-style="normal" style:font-name-asian="OpenSymbol" style:font-style-asian="normal" style:font-name-complex="OpenSymbol" style:font-style-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fo:font-weight="normal" style:font-name-asian="OpenSymbol1" style:font-style-asian="normal" style:font-name-complex="OpenSymbol1" style:font-style-complex="normal"/>
    </style:style>
    <style:style style:name="T39" style:family="text">
      <style:text-properties style:text-position="super 58%"/>
    </style:style>
    <style:style style:name="T40" style:family="text">
      <style:text-properties style:text-position="super 58%" fo:font-weight="bold" style:font-weight-asian="bold" style:font-weight-complex="bold"/>
    </style:style>
    <style:style style:name="T41" style:family="text">
      <style:text-properties style:font-name-asian="OpenSymbol" style:font-name-complex="OpenSymbol"/>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style:text-underline-style="none"/>
    </style:style>
    <style:style style:name="T46" style:family="text">
      <style:text-properties fo:font-weight="normal"/>
    </style:style>
    <style:style style:name="T47" style:family="text">
      <style:text-properties fo:font-weight="normal" style:font-name-asian="OpenSymbol1" style:font-name-complex="OpenSymbol1"/>
    </style:style>
    <style:style style:name="T48" style:family="text">
      <style:text-properties fo:color="#800080" style:font-name="Bitstream Vera Sans Mono" fo:font-size="10pt" fo:font-style="normal" fo:font-weight="normal" style:font-name-asian="OpenSymbol1" style:font-size-asian="10pt" style:font-style-asian="normal" style:font-name-complex="OpenSymbol1" style:font-size-complex="10pt" style:font-style-complex="normal"/>
    </style:style>
    <style:style style:name="T49" style:family="text">
      <style:text-properties style:text-position="sub 58%"/>
    </style:style>
    <style:style style:name="T50"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3" style:family="text">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4"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6"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57"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60"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0.788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787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fo:min-height="0.67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9"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0"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6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5"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none" svg:stroke-color="#000000" draw:fill="none" draw:fill-color="#ffffff" fo:min-height="0.422cm" style:run-through="foreground"/>
    </style:style>
    <style:style style:name="gr67" style:family="graphic">
      <style:graphic-properties draw:stroke="none" svg:stroke-color="#000000" draw:fill="none" draw:fill-color="#ffffff" fo:min-height="0.42cm" style:run-through="foreground"/>
    </style:style>
    <style:style style:name="gr68"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69" style:family="graphic">
      <style:graphic-properties svg:stroke-color="#ffffff" draw:fill="solid" draw:fill-color="#ffffff" draw:textarea-horizontal-align="center" draw:textarea-vertical-align="middle" style:run-through="foreground"/>
    </style:style>
    <style:style style:name="gr70"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406cm" style:run-through="foreground"/>
    </style:style>
    <style:style style:name="gr83" style:family="graphic">
      <style:graphic-properties draw:stroke="none" svg:stroke-color="#000000" draw:fill="none" draw:fill-color="#ffffff" fo:min-height="0.407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
      <text:p text:style-name="P2"/>
      <text:p text:style-name="P2">OSCAT</text:p>
      <text:p text:style-name="P2">LIBRARY</text:p>
      <text:p text:style-name="P2">Dokumentation</text:p>
      <text:p text:style-name="P2"><text:s/></text:p>
      <text:p text:style-name="P3">by</text:p>
      <text:p text:style-name="P4"><text:span text:style-name="T16">The</text:span> WWW.OSCAT.DE <text:span text:style-name="T16">Documentation</text:span> <text:span text:style-name="T16">Project</text:span></text:p>
      <text:p text:style-name="P5"/>
      <text:p text:style-name="P5"><text:span text:style-name="T24">Bibliothek</text:span> Version 2.77</text:p>
      <text:p text:style-name="P15"/>
      <text:p text:style-name="P15"/>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62"><text:tab/></text:p>
      <text:table-of-content text:style-name="Sect1" text:protected="true" text:name="Table of Contents2">
        <text:table-of-content-source text:outline-level="10" text:relative-tab-stop-position="false">
          <text:index-title-template text:style-name="Contents_20_Heading">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229"><text:tab/>1 <text:s/><text:tab/><text:a xlink:type="simple" xlink:href="#1.Rechtsgrundlagen|outline">Rechtsgrundlagen</text:a><text:tab/>17</text:p>
          <text:p text:style-name="P230"><text:tab/>1.1 <text:s/><text:tab/><text:a xlink:type="simple" xlink:href="#1.1.Haftungsausschluss|outline">Haftungsausschluss</text:a><text:tab/>17</text:p>
          <text:p text:style-name="P230"><text:tab/>1.2 <text:s/><text:tab/><text:a xlink:type="simple" xlink:href="#1.2.Lizenzbedingungen|outline">Lizenzbedingungen</text:a><text:tab/>17</text:p>
          <text:p text:style-name="P230"><text:tab/>1.3 <text:s/><text:tab/><text:a xlink:type="simple" xlink:href="#1.3.Eingetragene Markenzeichen|outline">Eingetragene Markenzeichen</text:a><text:tab/>18</text:p>
          <text:p text:style-name="P230"><text:tab/>1.4 <text:s/><text:tab/><text:a xlink:type="simple" xlink:href="#1.4.Bestimmungsgemäßer Gebrauch|outline">Bestimmungsgemäßer Gebrauch</text:a><text:tab/>18</text:p>
          <text:p text:style-name="P230"><text:tab/>1.5 <text:s/><text:tab/><text:a xlink:type="simple" xlink:href="#1.5.Sonstiges|outline">Sonstiges</text:a><text:tab/>18</text:p>
          <text:p text:style-name="P229"><text:tab/>2 <text:s/><text:tab/><text:a xlink:type="simple" xlink:href="#2.Einleitung|outline">Einleitung</text:a><text:tab/>19</text:p>
          <text:p text:style-name="P230"><text:tab/>2.1 <text:s/><text:tab/><text:a xlink:type="simple" xlink:href="#2.1.Ziele|outline">Ziele</text:a><text:tab/>19</text:p>
          <text:p text:style-name="P230"><text:tab/>2.2 <text:s/><text:tab/><text:a xlink:type="simple" xlink:href="#2.2.Konventionen|outline">Konventionen</text:a><text:tab/>20</text:p>
          <text:p text:style-name="P230"><text:tab/>2.3 <text:s/><text:tab/><text:a xlink:type="simple" xlink:href="#2.3.Testumgebung|outline">Testumgebung</text:a><text:tab/>21</text:p>
          <text:p text:style-name="P230"><text:tab/>2.4 <text:s/><text:tab/><text:a xlink:type="simple" xlink:href="#2.4.Globale Konstanten|outline">Globale Konstanten</text:a><text:tab/>22</text:p>
          <text:p text:style-name="P230"><text:tab/>2.5 <text:s/><text:tab/><text:a xlink:type="simple" xlink:href="#2.5.Aktualität|outline">Aktualität</text:a><text:tab/>25</text:p>
          <text:p text:style-name="P230"><text:tab/>2.6 <text:s/><text:tab/><text:a xlink:type="simple" xlink:href="#2.6.Support|outline">Support</text:a><text:tab/>26</text:p>
          <text:p text:style-name="P229"><text:tab/>3 <text:s/><text:tab/><text:a xlink:type="simple" xlink:href="#3.Diverse Funktionen|outline">Diverse Funktionen</text:a><text:tab/>27</text:p>
          <text:p text:style-name="P230"><text:tab/>3.1 <text:s/><text:tab/><text:a xlink:type="simple" xlink:href="#3.1.ESR_COLLECT|outline">ESR_COLLECT</text:a><text:tab/>27</text:p>
          <text:p text:style-name="P230"><text:tab/>3.2 <text:s/><text:tab/><text:a xlink:type="simple" xlink:href="#3.2.ESR_MON_B8|outline">ESR_MON_B8</text:a><text:tab/>29</text:p>
          <text:p text:style-name="P230"><text:tab/>3.3 <text:s/><text:tab/><text:a xlink:type="simple" xlink:href="#3.3.ESR_MON_R4|outline">ESR_MON_R4</text:a><text:tab/>30</text:p>
          <text:p text:style-name="P230"><text:tab/>3.4 <text:s/><text:tab/><text:a xlink:type="simple" xlink:href="#3.4.ESR_MON_X8|outline">ESR_MON_X8</text:a><text:tab/>31</text:p>
          <text:p text:style-name="P230"><text:tab/>3.5 <text:s/><text:tab/><text:a xlink:type="simple" xlink:href="#3.5.OSCAT_VERSION|outline">OSCAT_VERSION</text:a><text:tab/>32</text:p>
          <text:p text:style-name="P230"><text:tab/>3.6 <text:s/><text:tab/><text:a xlink:type="simple" xlink:href="#3.6.STATUS_TO_ESR|outline">STATUS_TO_ESR</text:a><text:tab/>32</text:p>
          <text:p text:style-name="P229"><text:tab/>4 <text:s/><text:tab/><text:a xlink:type="simple" xlink:href="#4.Mathematik|outline">Mathematik</text:a><text:tab/>34</text:p>
          <text:p text:style-name="P230"><text:tab/>4.1 <text:s/><text:tab/><text:a xlink:type="simple" xlink:href="#4.1._DEC1|outline">_DEC1</text:a><text:tab/>34</text:p>
          <text:p text:style-name="P230"><text:tab/>4.2 <text:s/><text:tab/><text:a xlink:type="simple" xlink:href="#4.2._INC1|outline">_INC1</text:a><text:tab/>35</text:p>
          <text:p text:style-name="P230"><text:tab/>4.3 <text:s/><text:tab/><text:a xlink:type="simple" xlink:href="#4.3.ACOSH|outline">ACOSH</text:a><text:tab/>36</text:p>
          <text:p text:style-name="P230"><text:tab/>4.4 <text:s/><text:tab/><text:a xlink:type="simple" xlink:href="#4.4.ACOTH|outline">ACOTH</text:a><text:tab/>36</text:p>
          <text:p text:style-name="P230"><text:tab/>4.5 <text:s/><text:tab/><text:a xlink:type="simple" xlink:href="#4.5.AGDF|outline">AGDF</text:a><text:tab/>36</text:p>
          <text:p text:style-name="P230"><text:tab/>4.6 <text:s/><text:tab/><text:a xlink:type="simple" xlink:href="#4.6.ASINH|outline">ASINH</text:a><text:tab/>37</text:p>
          <text:p text:style-name="P230"><text:tab/>4.7 <text:s/><text:tab/><text:a xlink:type="simple" xlink:href="#4.7.ATAN2|outline">ATAN2</text:a><text:tab/>37</text:p>
          <text:p text:style-name="P230"><text:tab/>4.8 <text:s/><text:tab/><text:a xlink:type="simple" xlink:href="#4.8.ATANH|outline">ATANH</text:a><text:tab/>37</text:p>
          <text:p text:style-name="P230"><text:tab/>4.9 <text:s/><text:tab/><text:a xlink:type="simple" xlink:href="#4.9.CEIL|outline">CEIL</text:a><text:tab/>38</text:p>
          <text:p text:style-name="P230"><text:tab/>4.10 <text:s/><text:tab/><text:a xlink:type="simple" xlink:href="#4.10.CEIL2|outline">CEIL2</text:a><text:tab/>38</text:p>
          <text:p text:style-name="P230"><text:tab/>4.11 <text:s/><text:tab/><text:a xlink:type="simple" xlink:href="#4.11.CMP|outline">CMP</text:a><text:tab/>39</text:p>
          <text:p text:style-name="P230"><text:tab/>4.12 <text:s/><text:tab/><text:a xlink:type="simple" xlink:href="#4.12.COSH|outline">COSH</text:a><text:tab/>39</text:p>
          <text:p text:style-name="P230"><text:tab/>4.13 <text:s/><text:tab/><text:a xlink:type="simple" xlink:href="#4.13.COTH|outline">COTH</text:a><text:tab/>40</text:p>
          <text:p text:style-name="P230"><text:soft-page-break/><text:tab/>4.14 <text:s/><text:tab/><text:a xlink:type="simple" xlink:href="#4.14.D_TRUNC|outline">D_TRUNC</text:a><text:tab/>40</text:p>
          <text:p text:style-name="P230"><text:tab/>4.15 <text:s/><text:tab/><text:a xlink:type="simple" xlink:href="#4.15.DEG|outline">DEG</text:a><text:tab/>41</text:p>
          <text:p text:style-name="P230"><text:tab/>4.16 <text:s/><text:tab/><text:a xlink:type="simple" xlink:href="#4.16.DIFFER|outline">DIFFER</text:a><text:tab/>41</text:p>
          <text:p text:style-name="P230"><text:tab/>4.17 <text:s/><text:tab/><text:a xlink:type="simple" xlink:href="#4.17.ERF|outline">ERF</text:a><text:tab/>42</text:p>
          <text:p text:style-name="P230"><text:tab/>4.18 <text:s/><text:tab/><text:a xlink:type="simple" xlink:href="#4.18.ERFC|outline">ERFC</text:a><text:tab/>42</text:p>
          <text:p text:style-name="P230"><text:tab/>4.19 <text:s/><text:tab/><text:a xlink:type="simple" xlink:href="#4.19.EVEN|outline">EVEN</text:a><text:tab/>42</text:p>
          <text:p text:style-name="P230"><text:tab/>4.20 <text:s/><text:tab/><text:a xlink:type="simple" xlink:href="#4.20.EXP10|outline">EXP10</text:a><text:tab/>43</text:p>
          <text:p text:style-name="P230"><text:tab/>4.21 <text:s/><text:tab/><text:a xlink:type="simple" xlink:href="#4.21.EXPN|outline">EXPN</text:a><text:tab/>43</text:p>
          <text:p text:style-name="P230"><text:tab/>4.22 <text:s/><text:tab/><text:a xlink:type="simple" xlink:href="#4.22.FACT|outline">FACT</text:a><text:tab/>44</text:p>
          <text:p text:style-name="P230"><text:tab/>4.23 <text:s/><text:tab/><text:a xlink:type="simple" xlink:href="#4.23.FIB|outline">FIB</text:a><text:tab/>44</text:p>
          <text:p text:style-name="P230"><text:tab/>4.24 <text:s/><text:tab/><text:a xlink:type="simple" xlink:href="#4.24.FLOOR|outline">FLOOR</text:a><text:tab/>45</text:p>
          <text:p text:style-name="P230"><text:tab/>4.25 <text:s/><text:tab/><text:a xlink:type="simple" xlink:href="#4.25.FLOOR2|outline">FLOOR2</text:a><text:tab/>45</text:p>
          <text:p text:style-name="P230"><text:tab/>4.26 <text:s/><text:tab/><text:a xlink:type="simple" xlink:href="#4.26.FRACT|outline">FRACT</text:a><text:tab/>46</text:p>
          <text:p text:style-name="P230"><text:tab/>4.27 <text:s/><text:tab/><text:a xlink:type="simple" xlink:href="#4.27.GAMMA|outline">GAMMA</text:a><text:tab/>46</text:p>
          <text:p text:style-name="P230"><text:tab/>4.28 <text:s/><text:tab/><text:a xlink:type="simple" xlink:href="#4.28.GAUSS|outline">GAUSS</text:a><text:tab/>47</text:p>
          <text:p text:style-name="P230"><text:tab/>4.29 <text:s/><text:tab/><text:a xlink:type="simple" xlink:href="#4.29.GAUSSCD|outline">GAUSSCD</text:a><text:tab/>47</text:p>
          <text:p text:style-name="P230"><text:tab/>4.30 <text:s/><text:tab/><text:a xlink:type="simple" xlink:href="#4.30.GDF|outline">GDF</text:a><text:tab/>48</text:p>
          <text:p text:style-name="P230"><text:tab/>4.31 <text:s/><text:tab/><text:a xlink:type="simple" xlink:href="#4.31.GOLD|outline">GOLD</text:a><text:tab/>48</text:p>
          <text:p text:style-name="P230"><text:tab/>4.32 <text:s/><text:tab/><text:a xlink:type="simple" xlink:href="#4.32.HYPOT|outline">HYPOT</text:a><text:tab/>49</text:p>
          <text:p text:style-name="P230"><text:tab/>4.33 <text:s/><text:tab/><text:a xlink:type="simple" xlink:href="#4.33.INC|outline">INC</text:a><text:tab/>49</text:p>
          <text:p text:style-name="P230"><text:tab/>4.34 <text:s/><text:tab/><text:a xlink:type="simple" xlink:href="#4.34.INC2|outline">INC2</text:a><text:tab/>50</text:p>
          <text:p text:style-name="P230"><text:tab/>4.35 <text:s/><text:tab/><text:a xlink:type="simple" xlink:href="#4.35.LANGEVIN|outline">LANGEVIN</text:a><text:tab/>51</text:p>
          <text:p text:style-name="P230"><text:tab/>4.36 <text:s/><text:tab/><text:a xlink:type="simple" xlink:href="#4.36.MAX3|outline">MAX3</text:a><text:tab/>51</text:p>
          <text:p text:style-name="P230"><text:tab/>4.37 <text:s/><text:tab/><text:a xlink:type="simple" xlink:href="#4.37.MIN3|outline">MIN3</text:a><text:tab/>52</text:p>
          <text:p text:style-name="P230"><text:tab/>4.38 <text:s/><text:tab/><text:a xlink:type="simple" xlink:href="#4.38.MID3|outline">MID3</text:a><text:tab/>53</text:p>
          <text:p text:style-name="P230"><text:tab/>4.39 <text:s/><text:tab/><text:a xlink:type="simple" xlink:href="#4.39.MODR|outline">MODR</text:a><text:tab/>53</text:p>
          <text:p text:style-name="P230"><text:tab/>4.40 <text:s/><text:tab/><text:a xlink:type="simple" xlink:href="#4.40.MUL_ADD|outline">MUL_ADD</text:a><text:tab/>54</text:p>
          <text:p text:style-name="P230"><text:tab/>4.41 <text:s/><text:tab/><text:a xlink:type="simple" xlink:href="#4.41.NEG|outline">NEG</text:a><text:tab/>54</text:p>
          <text:p text:style-name="P230"><text:tab/>4.42 <text:s/><text:tab/><text:a xlink:type="simple" xlink:href="#4.42.RAD|outline">RAD</text:a><text:tab/>55</text:p>
          <text:p text:style-name="P230"><text:tab/>4.43 <text:s/><text:tab/><text:a xlink:type="simple" xlink:href="#4.43.RDM|outline">RDM</text:a><text:tab/>55</text:p>
          <text:p text:style-name="P230"><text:tab/>4.44 <text:s/><text:tab/><text:a xlink:type="simple" xlink:href="#4.44.RDM2|outline">RDM2</text:a><text:tab/>56</text:p>
          <text:p text:style-name="P230"><text:tab/>4.45 <text:s/><text:tab/><text:a xlink:type="simple" xlink:href="#4.45.RDMDW|outline">RDMDW</text:a><text:tab/>56</text:p>
          <text:p text:style-name="P230"><text:tab/>4.46 <text:s/><text:tab/><text:a xlink:type="simple" xlink:href="#4.46.RND|outline">RND</text:a><text:tab/>57</text:p>
          <text:p text:style-name="P230"><text:tab/>4.47 <text:s/><text:tab/><text:a xlink:type="simple" xlink:href="#4.47.ROUND|outline">ROUND</text:a><text:tab/>58</text:p>
          <text:p text:style-name="P230"><text:tab/>4.48 <text:s/><text:tab/><text:a xlink:type="simple" xlink:href="#4.48.SGN|outline">SGN</text:a><text:tab/>58</text:p>
          <text:p text:style-name="P230"><text:tab/>4.49 <text:s/><text:tab/><text:a xlink:type="simple" xlink:href="#4.49.SIGMOID|outline">SIGMOID</text:a><text:tab/>59</text:p>
          <text:p text:style-name="P230"><text:tab/>4.50 <text:s/><text:tab/><text:a xlink:type="simple" xlink:href="#4.50.SIGN_I|outline">SIGN_I</text:a><text:tab/>59</text:p>
          <text:p text:style-name="P230"><text:tab/>4.51 <text:s/><text:tab/><text:a xlink:type="simple" xlink:href="#4.51.SIGN_R|outline">SIGN_R</text:a><text:tab/>60</text:p>
          <text:p text:style-name="P230"><text:tab/>4.52 <text:s/><text:tab/><text:a xlink:type="simple" xlink:href="#4.52.SINC|outline">SINC</text:a><text:tab/>60</text:p>
          <text:p text:style-name="P230"><text:tab/>4.53 <text:s/><text:tab/><text:a xlink:type="simple" xlink:href="#4.53.SINH|outline">SINH</text:a><text:tab/>60</text:p>
          <text:p text:style-name="P230"><text:tab/>4.54 <text:s/><text:tab/><text:a xlink:type="simple" xlink:href="#4.54.SQRTN|outline">SQRTN</text:a><text:tab/>61</text:p>
          <text:p text:style-name="P230"><text:tab/>4.55 <text:s/><text:tab/><text:a xlink:type="simple" xlink:href="#4.55.TANH|outline">TANH</text:a><text:tab/>61</text:p>
          <text:p text:style-name="P230"><text:tab/>4.56 <text:s/><text:tab/><text:a xlink:type="simple" xlink:href="#4.56.WINDOW|outline">WINDOW</text:a><text:tab/>62</text:p>
          <text:p text:style-name="P230"><text:tab/>4.57 <text:s/><text:tab/><text:a xlink:type="simple" xlink:href="#4.57.WINDOW2|outline">WINDOW2</text:a><text:tab/>62</text:p>
          <text:p text:style-name="P229"><text:soft-page-break/><text:tab/>5 <text:s/><text:tab/><text:a xlink:type="simple" xlink:href="#5.Array|outline">Array</text:a><text:tab/>63</text:p>
          <text:p text:style-name="P230"><text:tab/>5.1 <text:s/><text:tab/><text:a xlink:type="simple" xlink:href="#5.1._ARRAY_ABS|outline">_ARRAY_ABS</text:a><text:tab/>63</text:p>
          <text:p text:style-name="P230"><text:tab/>5.2 <text:s/><text:tab/><text:a xlink:type="simple" xlink:href="#5.2._ARRAY_ADD|outline">_ARRAY_ADD</text:a><text:tab/>64</text:p>
          <text:p text:style-name="P230"><text:tab/>5.3 <text:s/><text:tab/><text:a xlink:type="simple" xlink:href="#5.3._ARRAY_INIT|outline">_ARRAY_INIT</text:a><text:tab/>64</text:p>
          <text:p text:style-name="P230"><text:tab/>5.4 <text:s/><text:tab/><text:a xlink:type="simple" xlink:href="#5.4._ARRAY_MEDIAN|outline">_ARRAY_MEDIAN</text:a><text:tab/>65</text:p>
          <text:p text:style-name="P230"><text:tab/>5.5 <text:s/><text:tab/><text:a xlink:type="simple" xlink:href="#5.5._ARRAY_MUL|outline">_ARRAY_MUL</text:a><text:tab/>66</text:p>
          <text:p text:style-name="P230"><text:tab/>5.6 <text:s/><text:tab/><text:a xlink:type="simple" xlink:href="#5.6._ARRAY_SHUFFLE|outline">_ARRAY_SHUFFLE</text:a><text:tab/>67</text:p>
          <text:p text:style-name="P230"><text:tab/>5.7 <text:s/><text:tab/><text:a xlink:type="simple" xlink:href="#5.7._ARRAY_SORT|outline">_ARRAY_SORT</text:a><text:tab/>68</text:p>
          <text:p text:style-name="P230"><text:tab/>5.8 <text:s/><text:tab/><text:a xlink:type="simple" xlink:href="#5.8.ARRAY_AVG|outline">ARRAY_AVG</text:a><text:tab/>68</text:p>
          <text:p text:style-name="P230"><text:tab/>5.9 <text:s/><text:tab/><text:a xlink:type="simple" xlink:href="#5.9.ARRAY_GAV|outline">ARRAY_GAV</text:a><text:tab/>69</text:p>
          <text:p text:style-name="P230"><text:tab/>5.10 <text:s/><text:tab/><text:a xlink:type="simple" xlink:href="#5.10.ARRAY_HAV|outline">ARRAY_HAV</text:a><text:tab/>70</text:p>
          <text:p text:style-name="P230"><text:tab/>5.11 <text:s/><text:tab/><text:a xlink:type="simple" xlink:href="#5.11.ARRAY_MAX|outline">ARRAY_MAX</text:a><text:tab/>70</text:p>
          <text:p text:style-name="P230"><text:tab/>5.12 <text:s/><text:tab/><text:a xlink:type="simple" xlink:href="#5.12.ARRAY_MIN|outline">ARRAY_MIN</text:a><text:tab/>71</text:p>
          <text:p text:style-name="P230"><text:tab/>5.13 <text:s/><text:tab/><text:a xlink:type="simple" xlink:href="#5.13.ARRAY_SDV|outline">ARRAY_SDV</text:a><text:tab/>72</text:p>
          <text:p text:style-name="P230"><text:tab/>5.14 <text:s/><text:tab/><text:a xlink:type="simple" xlink:href="#5.14.ARRAY_SPR|outline">ARRAY_SPR</text:a><text:tab/>72</text:p>
          <text:p text:style-name="P230"><text:tab/>5.15 <text:s/><text:tab/><text:a xlink:type="simple" xlink:href="#5.15.ARRAY_SUM|outline">ARRAY_SUM</text:a><text:tab/>73</text:p>
          <text:p text:style-name="P230"><text:tab/>5.16 <text:s/><text:tab/><text:a xlink:type="simple" xlink:href="#5.16.ARRAY_TREND|outline">ARRAY_TREND</text:a><text:tab/>74</text:p>
          <text:p text:style-name="P230"><text:tab/>5.17 <text:s/><text:tab/><text:a xlink:type="simple" xlink:href="#5.17.ARRAY_VAR|outline">ARRAY_VAR</text:a><text:tab/>74</text:p>
          <text:p text:style-name="P230"><text:tab/>5.18 <text:s/><text:tab/><text:a xlink:type="simple" xlink:href="#5.18.IS_SORTED|outline">IS_SORTED</text:a><text:tab/>75</text:p>
          <text:p text:style-name="P229"><text:tab/>6 <text:s/><text:tab/><text:a xlink:type="simple" xlink:href="#6.Komplexe Mathematik|outline">Komplexe Mathematik</text:a><text:tab/>76</text:p>
          <text:p text:style-name="P230"><text:tab/>6.1 <text:s/><text:tab/><text:a xlink:type="simple" xlink:href="#6.1.EINLEITUNG|outline">EINLEITUNG</text:a><text:tab/>76</text:p>
          <text:p text:style-name="P230"><text:tab/>6.2 <text:s/><text:tab/><text:a xlink:type="simple" xlink:href="#6.2.CABS|outline">CABS</text:a><text:tab/>76</text:p>
          <text:p text:style-name="P230"><text:tab/>6.3 <text:s/><text:tab/><text:a xlink:type="simple" xlink:href="#6.3.CACOS|outline">CACOS</text:a><text:tab/>77</text:p>
          <text:p text:style-name="P230"><text:tab/>6.4 <text:s/><text:tab/><text:a xlink:type="simple" xlink:href="#6.4.CACOSH|outline">CACOSH</text:a><text:tab/>77</text:p>
          <text:p text:style-name="P230"><text:tab/>6.5 <text:s/><text:tab/><text:a xlink:type="simple" xlink:href="#6.5.CADD|outline">CADD</text:a><text:tab/>77</text:p>
          <text:p text:style-name="P230"><text:tab/>6.6 <text:s/><text:tab/><text:a xlink:type="simple" xlink:href="#6.6.CARG|outline">CARG</text:a><text:tab/>78</text:p>
          <text:p text:style-name="P230"><text:tab/>6.7 <text:s/><text:tab/><text:a xlink:type="simple" xlink:href="#6.7.CASIN|outline">CASIN</text:a><text:tab/>78</text:p>
          <text:p text:style-name="P230"><text:tab/>6.8 <text:s/><text:tab/><text:a xlink:type="simple" xlink:href="#6.8.CASINH|outline">CASINH</text:a><text:tab/>79</text:p>
          <text:p text:style-name="P230"><text:tab/>6.9 <text:s/><text:tab/><text:a xlink:type="simple" xlink:href="#6.9.CATAN|outline">CATAN</text:a><text:tab/>79</text:p>
          <text:p text:style-name="P230"><text:tab/>6.10 <text:s/><text:tab/><text:a xlink:type="simple" xlink:href="#6.10.CATANH|outline">CATANH</text:a><text:tab/>79</text:p>
          <text:p text:style-name="P230"><text:tab/>6.11 <text:s/><text:tab/><text:a xlink:type="simple" xlink:href="#6.11.CCON|outline">CCON</text:a><text:tab/>80</text:p>
          <text:p text:style-name="P230"><text:tab/>6.12 <text:s/><text:tab/><text:a xlink:type="simple" xlink:href="#6.12.CCOS|outline">CCOS</text:a><text:tab/>80</text:p>
          <text:p text:style-name="P230"><text:tab/>6.13 <text:s/><text:tab/><text:a xlink:type="simple" xlink:href="#6.13.CCOSH|outline">CCOSH</text:a><text:tab/>80</text:p>
          <text:p text:style-name="P230"><text:tab/>6.14 <text:s/><text:tab/><text:a xlink:type="simple" xlink:href="#6.14.CDIV|outline">CDIV</text:a><text:tab/>81</text:p>
          <text:p text:style-name="P230"><text:tab/>6.15 <text:s/><text:tab/><text:a xlink:type="simple" xlink:href="#6.15.CEXP|outline">CEXP</text:a><text:tab/>81</text:p>
          <text:p text:style-name="P230"><text:tab/>6.16 <text:s/><text:tab/><text:a xlink:type="simple" xlink:href="#6.16.CINV|outline">CINV</text:a><text:tab/>81</text:p>
          <text:p text:style-name="P230"><text:tab/>6.17 <text:s/><text:tab/><text:a xlink:type="simple" xlink:href="#6.17.CLOG|outline">CLOG</text:a><text:tab/>82</text:p>
          <text:p text:style-name="P230"><text:tab/>6.18 <text:s/><text:tab/><text:a xlink:type="simple" xlink:href="#6.18.CMUL|outline">CMUL</text:a><text:tab/>82</text:p>
          <text:p text:style-name="P230"><text:tab/>6.19 <text:s/><text:tab/><text:a xlink:type="simple" xlink:href="#6.19.CPOL|outline">CPOL</text:a><text:tab/>82</text:p>
          <text:p text:style-name="P230"><text:tab/>6.20 <text:s/><text:tab/><text:a xlink:type="simple" xlink:href="#6.20.CPOW|outline">CPOW</text:a><text:tab/>83</text:p>
          <text:p text:style-name="P230"><text:tab/>6.21 <text:s/><text:tab/><text:a xlink:type="simple" xlink:href="#6.21.CSET|outline">CSET</text:a><text:tab/>83</text:p>
          <text:p text:style-name="P230"><text:tab/>6.22 <text:s/><text:tab/><text:a xlink:type="simple" xlink:href="#6.22.CSIN|outline">CSIN</text:a><text:tab/>84</text:p>
          <text:p text:style-name="P230"><text:tab/>6.23 <text:s/><text:tab/><text:a xlink:type="simple" xlink:href="#6.23.CSINH|outline">CSINH</text:a><text:tab/>84</text:p>
          <text:p text:style-name="P230"><text:tab/>6.24 <text:s/><text:tab/><text:a xlink:type="simple" xlink:href="#6.24.CSQRT|outline">CSQRT</text:a><text:tab/>84</text:p>
          <text:p text:style-name="P230"><text:tab/>6.25 <text:s/><text:tab/><text:a xlink:type="simple" xlink:href="#6.25.CSUB|outline">CSUB</text:a><text:tab/>85</text:p>
          <text:p text:style-name="P230"><text:soft-page-break/><text:tab/>6.26 <text:s/><text:tab/><text:a xlink:type="simple" xlink:href="#6.26.CTAN|outline">CTAN</text:a><text:tab/>85</text:p>
          <text:p text:style-name="P230"><text:tab/>6.27 <text:s/><text:tab/><text:a xlink:type="simple" xlink:href="#6.27.CTANH|outline">CTANH</text:a><text:tab/>85</text:p>
          <text:p text:style-name="P229"><text:tab/>7 <text:s/><text:tab/><text:a xlink:type="simple" xlink:href="#7.Arithmetik doppelter Genauigkeit|outline">Arithmetik doppelter Genauigkeit</text:a><text:tab/>86</text:p>
          <text:p text:style-name="P230"><text:tab/>7.1 <text:s/><text:tab/><text:a xlink:type="simple" xlink:href="#7.1.Einleitung|outline">Einleitung</text:a><text:tab/>86</text:p>
          <text:p text:style-name="P230"><text:tab/>7.2 <text:s/><text:tab/><text:a xlink:type="simple" xlink:href="#7.2.R2_ABS|outline">R2_ABS</text:a><text:tab/>86</text:p>
          <text:p text:style-name="P230"><text:tab/>7.3 <text:s/><text:tab/><text:a xlink:type="simple" xlink:href="#7.3.R2_ADD|outline">R2_ADD</text:a><text:tab/>87</text:p>
          <text:p text:style-name="P230"><text:tab/>7.4 <text:s/><text:tab/><text:a xlink:type="simple" xlink:href="#7.4.R2_ADD2|outline">R2_ADD2</text:a><text:tab/>87</text:p>
          <text:p text:style-name="P230"><text:tab/>7.5 <text:s/><text:tab/><text:a xlink:type="simple" xlink:href="#7.5.R2_MUL|outline">R2_MUL</text:a><text:tab/>88</text:p>
          <text:p text:style-name="P230"><text:tab/>7.6 <text:s/><text:tab/><text:a xlink:type="simple" xlink:href="#7.6.R2_SET|outline">R2_SET</text:a><text:tab/>88</text:p>
          <text:p text:style-name="P229"><text:tab/>8 <text:s/><text:tab/><text:a xlink:type="simple" xlink:href="#8.Arithmetische Funktionen|outline">Arithmetische Funktionen</text:a><text:tab/>89</text:p>
          <text:p text:style-name="P230"><text:tab/>8.1 <text:s/><text:tab/><text:a xlink:type="simple" xlink:href="#8.1.F_LIN|outline">F_LIN</text:a><text:tab/>89</text:p>
          <text:p text:style-name="P230"><text:tab/>8.2 <text:s/><text:tab/><text:a xlink:type="simple" xlink:href="#8.2.F_LIN2|outline">F_LIN2</text:a><text:tab/>89</text:p>
          <text:p text:style-name="P230"><text:tab/>8.3 <text:s/><text:tab/><text:a xlink:type="simple" xlink:href="#8.3.F_POLY|outline">F_POLY</text:a><text:tab/>90</text:p>
          <text:p text:style-name="P230"><text:tab/>8.4 <text:s/><text:tab/><text:a xlink:type="simple" xlink:href="#8.4.F_POWER|outline">F_POWER</text:a><text:tab/>90</text:p>
          <text:p text:style-name="P230"><text:tab/>8.5 <text:s/><text:tab/><text:a xlink:type="simple" xlink:href="#8.5.F_QUAD|outline">F_QUAD</text:a><text:tab/>91</text:p>
          <text:p text:style-name="P230"><text:tab/>8.6 <text:s/><text:tab/><text:a xlink:type="simple" xlink:href="#8.6.FT_AVG|outline">FT_AVG</text:a><text:tab/>91</text:p>
          <text:p text:style-name="P230"><text:tab/>8.7 <text:s/><text:tab/><text:a xlink:type="simple" xlink:href="#8.7.FT_MIN_MAX|outline">FT_MIN_MAX</text:a><text:tab/>92</text:p>
          <text:p text:style-name="P230"><text:tab/>8.8 <text:s/><text:tab/><text:a xlink:type="simple" xlink:href="#8.8.FT_RMP|outline">FT_RMP</text:a><text:tab/>93</text:p>
          <text:p text:style-name="P230"><text:tab/>8.9 <text:s/><text:tab/><text:a xlink:type="simple" xlink:href="#8.9.LINEAR_INT|outline">LINEAR_INT</text:a><text:tab/>94</text:p>
          <text:p text:style-name="P230"><text:tab/>8.10 <text:s/><text:tab/><text:a xlink:type="simple" xlink:href="#8.10.POLYNOM_INT|outline">POLYNOM_INT</text:a><text:tab/>95</text:p>
          <text:p text:style-name="P229"><text:tab/>9 <text:s/><text:tab/><text:a xlink:type="simple" xlink:href="#9.Geometrische Funktionen|outline">Geometrische Funktionen</text:a><text:tab/>97</text:p>
          <text:p text:style-name="P230"><text:tab/>9.1 <text:s/><text:tab/><text:a xlink:type="simple" xlink:href="#9.1.CIRCLE_A|outline">CIRCLE_A</text:a><text:tab/>97</text:p>
          <text:p text:style-name="P230"><text:tab/>9.2 <text:s/><text:tab/><text:a xlink:type="simple" xlink:href="#9.2.CIRCLE_C|outline">CIRCLE_C</text:a><text:tab/>97</text:p>
          <text:p text:style-name="P230"><text:tab/>9.3 <text:s/><text:tab/><text:a xlink:type="simple" xlink:href="#9.3.CONE_V|outline">CONE_V</text:a><text:tab/>98</text:p>
          <text:p text:style-name="P230"><text:tab/>9.4 <text:s/><text:tab/><text:a xlink:type="simple" xlink:href="#9.4.ELLIPSE_A|outline">ELLIPSE_A</text:a><text:tab/>98</text:p>
          <text:p text:style-name="P230"><text:tab/>9.5 <text:s/><text:tab/><text:a xlink:type="simple" xlink:href="#9.5.ELLIPSE_C|outline">ELLIPSE_C</text:a><text:tab/>99</text:p>
          <text:p text:style-name="P230"><text:tab/>9.6 <text:s/><text:tab/><text:a xlink:type="simple" xlink:href="#9.6.SPHERE_V|outline">SPHERE_V</text:a><text:tab/>99</text:p>
          <text:p text:style-name="P230"><text:tab/>9.7 <text:s/><text:tab/><text:a xlink:type="simple" xlink:href="#9.7.TRIANGLE_A|outline">TRIANGLE_A</text:a><text:tab/>100</text:p>
          <text:p text:style-name="P229"><text:tab/>10 <text:s/><text:tab/><text:a xlink:type="simple" xlink:href="#10.Vektor Mathematik|outline">Vektor Mathematik</text:a><text:tab/>101</text:p>
          <text:p text:style-name="P230"><text:tab/>10.1 <text:s/><text:tab/><text:a xlink:type="simple" xlink:href="#10.1.Einleitung|outline">Einleitung</text:a><text:tab/>101</text:p>
          <text:p text:style-name="P230"><text:tab/>10.2 <text:s/><text:tab/><text:a xlink:type="simple" xlink:href="#10.2.V3_ABS|outline">V3_ABS</text:a><text:tab/>101</text:p>
          <text:p text:style-name="P230"><text:tab/>10.3 <text:s/><text:tab/><text:a xlink:type="simple" xlink:href="#10.3.V3_ADD|outline">V3_ADD</text:a><text:tab/>102</text:p>
          <text:p text:style-name="P230"><text:tab/>10.4 <text:s/><text:tab/><text:a xlink:type="simple" xlink:href="#10.4.V3_ANG|outline">V3_ANG</text:a><text:tab/>102</text:p>
          <text:p text:style-name="P230"><text:tab/>10.5 <text:s/><text:tab/><text:a xlink:type="simple" xlink:href="#10.5.V3_DPRO|outline">V3_DPRO</text:a><text:tab/>102</text:p>
          <text:p text:style-name="P230"><text:tab/>10.6 <text:s/><text:tab/><text:a xlink:type="simple" xlink:href="#10.6.V3_NORM|outline">V3_NORM</text:a><text:tab/>103</text:p>
          <text:p text:style-name="P230"><text:tab/>10.7 <text:s/><text:tab/><text:a xlink:type="simple" xlink:href="#10.7.V3_NUL|outline">V3_NUL</text:a><text:tab/>103</text:p>
          <text:p text:style-name="P230"><text:tab/>10.8 <text:s/><text:tab/><text:a xlink:type="simple" xlink:href="#10.8.V3_PAR|outline">V3_PAR</text:a><text:tab/>104</text:p>
          <text:p text:style-name="P230"><text:soft-page-break/><text:tab/>10.9 <text:s/><text:tab/><text:a xlink:type="simple" xlink:href="#10.9.V3_REV|outline">V3_REV</text:a><text:tab/>104</text:p>
          <text:p text:style-name="P230"><text:tab/>10.10 <text:s/><text:tab/><text:a xlink:type="simple" xlink:href="#10.10.V3_SMUL|outline">V3_SMUL</text:a><text:tab/>105</text:p>
          <text:p text:style-name="P230"><text:tab/>10.11 <text:s/><text:tab/><text:a xlink:type="simple" xlink:href="#10.11.V3_SUB|outline">V3_SUB</text:a><text:tab/>105</text:p>
          <text:p text:style-name="P230"><text:tab/>10.12 <text:s/><text:tab/><text:a xlink:type="simple" xlink:href="#10.12.V3_XANG|outline">V3_XANG</text:a><text:tab/>106</text:p>
          <text:p text:style-name="P230"><text:tab/>10.13 <text:s/><text:tab/><text:a xlink:type="simple" xlink:href="#10.13.V3_XPRO|outline">V3_XPRO</text:a><text:tab/>106</text:p>
          <text:p text:style-name="P230"><text:tab/>10.14 <text:s/><text:tab/><text:a xlink:type="simple" xlink:href="#10.14.V3_YANG|outline">V3_YANG</text:a><text:tab/>106</text:p>
          <text:p text:style-name="P230"><text:tab/>10.15 <text:s/><text:tab/><text:a xlink:type="simple" xlink:href="#10.15.V3_ZANG|outline">V3_ZANG</text:a><text:tab/>107</text:p>
          <text:p text:style-name="P229"><text:tab/>11 <text:s/><text:tab/><text:a xlink:type="simple" xlink:href="#11.Time &amp; Date|outline">Time &amp; Date</text:a><text:tab/>108</text:p>
          <text:p text:style-name="P230"><text:tab/>11.1 <text:s/><text:tab/><text:a xlink:type="simple" xlink:href="#11.1.DATE_ADD|outline">DATE_ADD</text:a><text:tab/>108</text:p>
          <text:p text:style-name="P230"><text:tab/>11.2 <text:s/><text:tab/><text:a xlink:type="simple" xlink:href="#11.2.DAY_OF_DATE|outline">DAY_OF_DATE</text:a><text:tab/>109</text:p>
          <text:p text:style-name="P230"><text:tab/>11.3 <text:s/><text:tab/><text:a xlink:type="simple" xlink:href="#11.3.DAY_OF_MONTH|outline">DAY_OF_MONTH</text:a><text:tab/>109</text:p>
          <text:p text:style-name="P230"><text:tab/>11.4 <text:s/><text:tab/><text:a xlink:type="simple" xlink:href="#11.4.DAY_OF_WEEK|outline">DAY_OF_WEEK</text:a><text:tab/>109</text:p>
          <text:p text:style-name="P230"><text:tab/>11.5 <text:s/><text:tab/><text:a xlink:type="simple" xlink:href="#11.5.DAY_OF_YEAR|outline">DAY_OF_YEAR</text:a><text:tab/>110</text:p>
          <text:p text:style-name="P230"><text:tab/>11.6 <text:s/><text:tab/><text:a xlink:type="simple" xlink:href="#11.6.DAY_TO_TIME|outline">DAY_TO_TIME</text:a><text:tab/>110</text:p>
          <text:p text:style-name="P230"><text:tab/>11.7 <text:s/><text:tab/><text:a xlink:type="simple" xlink:href="#11.7.DAYS_DELTA|outline">DAYS_DELTA</text:a><text:tab/>111</text:p>
          <text:p text:style-name="P230"><text:tab/>11.8 <text:s/><text:tab/><text:a xlink:type="simple" xlink:href="#11.8.DCF77|outline">DCF77</text:a><text:tab/>111</text:p>
          <text:p text:style-name="P230"><text:tab/>11.9 <text:s/><text:tab/><text:a xlink:type="simple" xlink:href="#11.9.DST|outline">DST</text:a><text:tab/>113</text:p>
          <text:p text:style-name="P230"><text:tab/>11.10 <text:s/><text:tab/><text:a xlink:type="simple" xlink:href="#11.10.EASTER|outline">EASTER</text:a><text:tab/>113</text:p>
          <text:p text:style-name="P230"><text:tab/>11.11 <text:s/><text:tab/><text:a xlink:type="simple" xlink:href="#11.11.HOLIDAY|outline">HOLIDAY</text:a><text:tab/>114</text:p>
          <text:p text:style-name="P230"><text:tab/>11.12 <text:s/><text:tab/><text:a xlink:type="simple" xlink:href="#11.12.HOUR|outline">HOUR</text:a><text:tab/>114</text:p>
          <text:p text:style-name="P230"><text:tab/>11.13 <text:s/><text:tab/><text:a xlink:type="simple" xlink:href="#11.13.HOUR_OF_DT|outline">HOUR_OF_DT</text:a><text:tab/>115</text:p>
          <text:p text:style-name="P230"><text:tab/>11.14 <text:s/><text:tab/><text:a xlink:type="simple" xlink:href="#11.14.HOUR_TO_TIME|outline">HOUR_TO_TIME</text:a><text:tab/>115</text:p>
          <text:p text:style-name="P230"><text:tab/>11.15 <text:s/><text:tab/><text:a xlink:type="simple" xlink:href="#11.15.HOUR_TO_TOD|outline">HOUR_TO_TOD</text:a><text:tab/>116</text:p>
          <text:p text:style-name="P230"><text:tab/>11.16 <text:s/><text:tab/><text:a xlink:type="simple" xlink:href="#11.16.JD2000|outline">JD2000</text:a><text:tab/>116</text:p>
          <text:p text:style-name="P230"><text:tab/>11.17 <text:s/><text:tab/><text:a xlink:type="simple" xlink:href="#11.17.LEAP_DAY|outline">LEAP_DAY</text:a><text:tab/>117</text:p>
          <text:p text:style-name="P230"><text:tab/>11.18 <text:s/><text:tab/><text:a xlink:type="simple" xlink:href="#11.18.LEAP_OF_DATE|outline">LEAP_OF_DATE</text:a><text:tab/>117</text:p>
          <text:p text:style-name="P230"><text:tab/>11.19 <text:s/><text:tab/><text:a xlink:type="simple" xlink:href="#11.19.LEAP_YEAR|outline">LEAP_YEAR</text:a><text:tab/>118</text:p>
          <text:p text:style-name="P230"><text:tab/>11.20 <text:s/><text:tab/><text:a xlink:type="simple" xlink:href="#11.20.LOCAL_TIME|outline">LOCAL_TIME</text:a><text:tab/>118</text:p>
          <text:p text:style-name="P230"><text:tab/>11.21 <text:s/><text:tab/><text:a xlink:type="simple" xlink:href="#11.21.LTIME_TO_UTC|outline">LTIME_TO_UTC</text:a><text:tab/>119</text:p>
          <text:p text:style-name="P230"><text:tab/>11.22 <text:s/><text:tab/><text:a xlink:type="simple" xlink:href="#11.22.MINUTE|outline">MINUTE</text:a><text:tab/>119</text:p>
          <text:p text:style-name="P230"><text:tab/>11.23 <text:s/><text:tab/><text:a xlink:type="simple" xlink:href="#11.23.MINUTE_OF_DT|outline">MINUTE_OF_DT</text:a><text:tab/>120</text:p>
          <text:p text:style-name="P230"><text:tab/>11.24 <text:s/><text:tab/><text:a xlink:type="simple" xlink:href="#11.24.MINUTE_TO_TIME|outline">MINUTE_TO_TIME</text:a><text:tab/>120</text:p>
          <text:p text:style-name="P230"><text:tab/>11.25 <text:s/><text:tab/><text:a xlink:type="simple" xlink:href="#11.25.MONTH_BEGIN|outline">MONTH_BEGIN</text:a><text:tab/>120</text:p>
          <text:p text:style-name="P230"><text:tab/>11.26 <text:s/><text:tab/><text:a xlink:type="simple" xlink:href="#11.26.MONTH_END|outline">MONTH_END</text:a><text:tab/>121</text:p>
          <text:p text:style-name="P230"><text:tab/>11.27 <text:s/><text:tab/><text:a xlink:type="simple" xlink:href="#11.27.MONTH_OF_DATE|outline">MONTH_OF_DATE</text:a><text:tab/>121</text:p>
          <text:p text:style-name="P230"><text:tab/>11.28 <text:s/><text:tab/><text:a xlink:type="simple" xlink:href="#11.28.MULTIME|outline">MULTIME</text:a><text:tab/>122</text:p>
          <text:p text:style-name="P230"><text:tab/>11.29 <text:s/><text:tab/><text:a xlink:type="simple" xlink:href="#11.29.PERIOD|outline">PERIOD</text:a><text:tab/>122</text:p>
          <text:p text:style-name="P230"><text:tab/>11.30 <text:s/><text:tab/><text:a xlink:type="simple" xlink:href="#11.30.PERIOD2|outline">PERIOD2</text:a><text:tab/>123</text:p>
          <text:p text:style-name="P230"><text:tab/>11.31 <text:s/><text:tab/><text:a xlink:type="simple" xlink:href="#11.31.REFRACTION|outline">REFRACTION</text:a><text:tab/>123</text:p>
          <text:p text:style-name="P230"><text:tab/>11.32 <text:s/><text:tab/><text:a xlink:type="simple" xlink:href="#11.32.RTC_2|outline">RTC_2</text:a><text:tab/>124</text:p>
          <text:p text:style-name="P230"><text:tab/>11.33 <text:s/><text:tab/><text:a xlink:type="simple" xlink:href="#11.33.RTC_MS|outline">RTC_MS</text:a><text:tab/>125</text:p>
          <text:p text:style-name="P230"><text:tab/>11.34 <text:s/><text:tab/><text:a xlink:type="simple" xlink:href="#11.34.SECOND|outline">SECOND</text:a><text:tab/>126</text:p>
          <text:p text:style-name="P230"><text:tab/>11.35 <text:s/><text:tab/><text:a xlink:type="simple" xlink:href="#11.35.SECOND_OF_DT|outline">SECOND_OF_DT</text:a><text:tab/>126</text:p>
          <text:p text:style-name="P230"><text:tab/>11.36 <text:s/><text:tab/><text:a xlink:type="simple" xlink:href="#11.36.SECOND_TO_TIME|outline">SECOND_TO_TIME</text:a><text:tab/>126</text:p>
          <text:p text:style-name="P230"><text:tab/>11.37 <text:s/><text:tab/><text:a xlink:type="simple" xlink:href="#11.37.SET_DATE|outline">SET_DATE</text:a><text:tab/>127</text:p>
          <text:p text:style-name="P230"><text:soft-page-break/><text:tab/>11.38 <text:s/><text:tab/><text:a xlink:type="simple" xlink:href="#11.38.SET_DT|outline">SET_DT</text:a><text:tab/>128</text:p>
          <text:p text:style-name="P230"><text:tab/>11.39 <text:s/><text:tab/><text:a xlink:type="simple" xlink:href="#11.39.SET_TOD|outline">SET_TOD</text:a><text:tab/>128</text:p>
          <text:p text:style-name="P230"><text:tab/>11.40 <text:s/><text:tab/><text:a xlink:type="simple" xlink:href="#11.40.SUN_POS|outline">SUN_POS</text:a><text:tab/>129</text:p>
          <text:p text:style-name="P230"><text:tab/>11.41 <text:s/><text:tab/><text:a xlink:type="simple" xlink:href="#11.41.SUN_TIME|outline">SUN_TIME</text:a><text:tab/>130</text:p>
          <text:p text:style-name="P230"><text:tab/>11.42 <text:s/><text:tab/><text:a xlink:type="simple" xlink:href="#11.42.UTC_TO_LTIME|outline">UTC_TO_LTIME</text:a><text:tab/>131</text:p>
          <text:p text:style-name="P230"><text:tab/>11.43 <text:s/><text:tab/><text:a xlink:type="simple" xlink:href="#11.43.WORK_WEEK|outline">WORK_WEEK</text:a><text:tab/>132</text:p>
          <text:p text:style-name="P230"><text:tab/>11.44 <text:s/><text:tab/><text:a xlink:type="simple" xlink:href="#11.44.YEAR_BEGIN|outline">YEAR_BEGIN</text:a><text:tab/>132</text:p>
          <text:p text:style-name="P230"><text:tab/>11.45 <text:s/><text:tab/><text:a xlink:type="simple" xlink:href="#11.45.YEAR_END|outline">YEAR_END</text:a><text:tab/>133</text:p>
          <text:p text:style-name="P230"><text:tab/>11.46 <text:s/><text:tab/><text:a xlink:type="simple" xlink:href="#11.46.YEAR_OF_DATE|outline">YEAR_OF_DATE</text:a><text:tab/>133</text:p>
          <text:p text:style-name="P229"><text:tab/>12 <text:s/><text:tab/><text:a xlink:type="simple" xlink:href="#12.String Funktionen|outline">String Funktionen</text:a><text:tab/>134</text:p>
          <text:p text:style-name="P230"><text:tab/>12.1 <text:s/><text:tab/><text:a xlink:type="simple" xlink:href="#12.1.BIN_TO_BYTE|outline">BIN_TO_BYTE</text:a><text:tab/>134</text:p>
          <text:p text:style-name="P230"><text:tab/>12.2 <text:s/><text:tab/><text:a xlink:type="simple" xlink:href="#12.2.BIN_TO_DWORD|outline">BIN_TO_DWORD</text:a><text:tab/>134</text:p>
          <text:p text:style-name="P230"><text:tab/>12.3 <text:s/><text:tab/><text:a xlink:type="simple" xlink:href="#12.3.BYTE_TO_STRB|outline">BYTE_TO_STRB</text:a><text:tab/>135</text:p>
          <text:p text:style-name="P230"><text:tab/>12.4 <text:s/><text:tab/><text:a xlink:type="simple" xlink:href="#12.4.BYTE_TO_STRH|outline">BYTE_TO_STRH</text:a><text:tab/>135</text:p>
          <text:p text:style-name="P230"><text:tab/>12.5 <text:s/><text:tab/><text:a xlink:type="simple" xlink:href="#12.5.CAPITALIZE|outline">CAPITALIZE</text:a><text:tab/>136</text:p>
          <text:p text:style-name="P230"><text:tab/>12.6 <text:s/><text:tab/><text:a xlink:type="simple" xlink:href="#12.6.CHARCODE|outline">CHARCODE</text:a><text:tab/>136</text:p>
          <text:p text:style-name="P230"><text:tab/>12.7 <text:s/><text:tab/><text:a xlink:type="simple" xlink:href="#12.7.CHARNAME|outline">CHARNAME</text:a><text:tab/>137</text:p>
          <text:p text:style-name="P230"><text:tab/>12.8 <text:s/><text:tab/><text:a xlink:type="simple" xlink:href="#12.8.CHR|outline">CHR</text:a><text:tab/>138</text:p>
          <text:p text:style-name="P230"><text:tab/>12.9 <text:s/><text:tab/><text:a xlink:type="simple" xlink:href="#12.9.CLEAN|outline">CLEAN</text:a><text:tab/>138</text:p>
          <text:p text:style-name="P230"><text:tab/>12.10 <text:s/><text:tab/><text:a xlink:type="simple" xlink:href="#12.10.CODE|outline">CODE</text:a><text:tab/>139</text:p>
          <text:p text:style-name="P230"><text:tab/>12.11 <text:s/><text:tab/><text:a xlink:type="simple" xlink:href="#12.11.COUNT_CHAR|outline">COUNT_CHAR</text:a><text:tab/>139</text:p>
          <text:p text:style-name="P230"><text:tab/>12.12 <text:s/><text:tab/><text:a xlink:type="simple" xlink:href="#12.12.DEC_TO_BYTE|outline">DEC_TO_BYTE</text:a><text:tab/>140</text:p>
          <text:p text:style-name="P230"><text:tab/>12.13 <text:s/><text:tab/><text:a xlink:type="simple" xlink:href="#12.13.DEC_TO_DWORD|outline">DEC_TO_DWORD</text:a><text:tab/>140</text:p>
          <text:p text:style-name="P230"><text:tab/>12.14 <text:s/><text:tab/><text:a xlink:type="simple" xlink:href="#12.14.DEC_TO_INT|outline">DEC_TO_INT</text:a><text:tab/>141</text:p>
          <text:p text:style-name="P230"><text:tab/>12.15 <text:s/><text:tab/><text:a xlink:type="simple" xlink:href="#12.15.DEL_CHARS|outline">DEL_CHARS</text:a><text:tab/>141</text:p>
          <text:p text:style-name="P230"><text:tab/>12.16 <text:s/><text:tab/><text:a xlink:type="simple" xlink:href="#12.16.DT_TO_STRF|outline">DT_TO_STRF</text:a><text:tab/>142</text:p>
          <text:p text:style-name="P230"><text:tab/>12.17 <text:s/><text:tab/><text:a xlink:type="simple" xlink:href="#12.17.DWORD_TO_STRB|outline">DWORD_TO_STRB</text:a><text:tab/>143</text:p>
          <text:p text:style-name="P230"><text:tab/>12.18 <text:s/><text:tab/><text:a xlink:type="simple" xlink:href="#12.18.DWORD_TO_STRF|outline">DWORD_TO_STRF</text:a><text:tab/>144</text:p>
          <text:p text:style-name="P230"><text:tab/>12.19 <text:s/><text:tab/><text:a xlink:type="simple" xlink:href="#12.19.DWORD_TO_STRH|outline">DWORD_TO_STRH</text:a><text:tab/>145</text:p>
          <text:p text:style-name="P230"><text:tab/>12.20 <text:s/><text:tab/><text:a xlink:type="simple" xlink:href="#12.20.EXEC|outline">EXEC</text:a><text:tab/>145</text:p>
          <text:p text:style-name="P230"><text:tab/>12.21 <text:s/><text:tab/><text:a xlink:type="simple" xlink:href="#12.21.FILL|outline">FILL</text:a><text:tab/>146</text:p>
          <text:p text:style-name="P230"><text:tab/>12.22 <text:s/><text:tab/><text:a xlink:type="simple" xlink:href="#12.22.FIND_CHAR|outline">FIND_CHAR</text:a><text:tab/>146</text:p>
          <text:p text:style-name="P230"><text:tab/>12.23 <text:s/><text:tab/><text:a xlink:type="simple" xlink:href="#12.23.FIND_CTRL|outline">FIND_CTRL</text:a><text:tab/>147</text:p>
          <text:p text:style-name="P230"><text:tab/>12.24 <text:s/><text:tab/><text:a xlink:type="simple" xlink:href="#12.24.FIND_NONUM|outline">FIND_NONUM</text:a><text:tab/>147</text:p>
          <text:p text:style-name="P230"><text:tab/>12.25 <text:s/><text:tab/><text:a xlink:type="simple" xlink:href="#12.25.FIND_NUM|outline">FIND_NUM</text:a><text:tab/>148</text:p>
          <text:p text:style-name="P230"><text:tab/>12.26 <text:s/><text:tab/><text:a xlink:type="simple" xlink:href="#12.26.FINDB|outline">FINDB</text:a><text:tab/>148</text:p>
          <text:p text:style-name="P230"><text:tab/>12.27 <text:s/><text:tab/><text:a xlink:type="simple" xlink:href="#12.27.FINDB_NONUM|outline">FINDB_NONUM</text:a><text:tab/>149</text:p>
          <text:p text:style-name="P230"><text:tab/>12.28 <text:s/><text:tab/><text:a xlink:type="simple" xlink:href="#12.28.FINDB_NUM|outline">FINDB_NUM</text:a><text:tab/>149</text:p>
          <text:p text:style-name="P230"><text:tab/>12.29 <text:s/><text:tab/><text:a xlink:type="simple" xlink:href="#12.29.FINDP|outline">FINDP</text:a><text:tab/>150</text:p>
          <text:p text:style-name="P230"><text:tab/>12.30 <text:s/><text:tab/><text:a xlink:type="simple" xlink:href="#12.30.FIX|outline">FIX</text:a><text:tab/>150</text:p>
          <text:p text:style-name="P230"><text:tab/>12.31 <text:s/><text:tab/><text:a xlink:type="simple" xlink:href="#12.31.FLOAT_TO_REAL|outline">FLOAT_TO_REAL</text:a><text:tab/>151</text:p>
          <text:p text:style-name="P230"><text:tab/>12.32 <text:s/><text:tab/><text:a xlink:type="simple" xlink:href="#12.32.FSTRING_TO_BYTE|outline">FSTRING_TO_BYTE</text:a><text:tab/>151</text:p>
          <text:p text:style-name="P230"><text:tab/>12.33 <text:s/><text:tab/><text:a xlink:type="simple" xlink:href="#12.33.FSTRING_TO_DT|outline">FSTRING_TO_DT</text:a><text:tab/>152</text:p>
          <text:p text:style-name="P230"><text:tab/>12.34 <text:s/><text:tab/><text:a xlink:type="simple" xlink:href="#12.34.FSTRING_TO_DWORD|outline">FSTRING_TO_DWORD</text:a><text:tab/>152</text:p>
          <text:p text:style-name="P230"><text:tab/>12.35 <text:s/><text:tab/><text:a xlink:type="simple" xlink:href="#12.35.FSTRING_TO_MONTH|outline">FSTRING_TO_MONTH</text:a><text:tab/>153</text:p>
          <text:p text:style-name="P230"><text:soft-page-break/><text:tab/>12.36 <text:s/><text:tab/><text:a xlink:type="simple" xlink:href="#12.36.FSTRING_TO_WEEK|outline">FSTRING_TO_WEEK</text:a><text:tab/>153</text:p>
          <text:p text:style-name="P230"><text:tab/>12.37 <text:s/><text:tab/><text:a xlink:type="simple" xlink:href="#12.37.FSTRING_TO_WEEKDAY|outline">FSTRING_TO_WEEKDAY</text:a><text:tab/>154</text:p>
          <text:p text:style-name="P230"><text:tab/>12.38 <text:s/><text:tab/><text:a xlink:type="simple" xlink:href="#12.38.HEX_TO_BYTE|outline">HEX_TO_BYTE</text:a><text:tab/>155</text:p>
          <text:p text:style-name="P230"><text:tab/>12.39 <text:s/><text:tab/><text:a xlink:type="simple" xlink:href="#12.39.HEX_TO_DWORD|outline">HEX_TO_DWORD</text:a><text:tab/>155</text:p>
          <text:p text:style-name="P230"><text:tab/>12.40 <text:s/><text:tab/><text:a xlink:type="simple" xlink:href="#12.40.IS_ALNUM|outline">IS_ALNUM</text:a><text:tab/>156</text:p>
          <text:p text:style-name="P230"><text:tab/>12.41 <text:s/><text:tab/><text:a xlink:type="simple" xlink:href="#12.41.IS_ALPHA|outline">IS_ALPHA</text:a><text:tab/>156</text:p>
          <text:p text:style-name="P230"><text:tab/>12.42 <text:s/><text:tab/><text:a xlink:type="simple" xlink:href="#12.42.IS_CC|outline">IS_CC</text:a><text:tab/>157</text:p>
          <text:p text:style-name="P230"><text:tab/>12.43 <text:s/><text:tab/><text:a xlink:type="simple" xlink:href="#12.43.IS_CTRL|outline">IS_CTRL</text:a><text:tab/>157</text:p>
          <text:p text:style-name="P230"><text:tab/>12.44 <text:s/><text:tab/><text:a xlink:type="simple" xlink:href="#12.44.IS_HEX|outline">IS_HEX</text:a><text:tab/>158</text:p>
          <text:p text:style-name="P230"><text:tab/>12.45 <text:s/><text:tab/><text:a xlink:type="simple" xlink:href="#12.45.IS_LOWER|outline">IS_LOWER</text:a><text:tab/>158</text:p>
          <text:p text:style-name="P230"><text:tab/>12.46 <text:s/><text:tab/><text:a xlink:type="simple" xlink:href="#12.46.IS_NCC|outline">IS_NCC</text:a><text:tab/>159</text:p>
          <text:p text:style-name="P230"><text:tab/>12.47 <text:s/><text:tab/><text:a xlink:type="simple" xlink:href="#12.47.IS_NUM|outline">IS_NUM</text:a><text:tab/>159</text:p>
          <text:p text:style-name="P230"><text:tab/>12.48 <text:s/><text:tab/><text:a xlink:type="simple" xlink:href="#12.48.IS_UPPER|outline">IS_UPPER</text:a><text:tab/>160</text:p>
          <text:p text:style-name="P230"><text:tab/>12.49 <text:s/><text:tab/><text:a xlink:type="simple" xlink:href="#12.49.ISC_ALPHA|outline">ISC_ALPHA</text:a><text:tab/>160</text:p>
          <text:p text:style-name="P230"><text:tab/>12.50 <text:s/><text:tab/><text:a xlink:type="simple" xlink:href="#12.50.ISC_CTRL|outline">ISC_CTRL</text:a><text:tab/>161</text:p>
          <text:p text:style-name="P230"><text:tab/>12.51 <text:s/><text:tab/><text:a xlink:type="simple" xlink:href="#12.51.ISC_HEX|outline">ISC_HEX</text:a><text:tab/>161</text:p>
          <text:p text:style-name="P230"><text:tab/>12.52 <text:s/><text:tab/><text:a xlink:type="simple" xlink:href="#12.52.ISC_LOWER|outline">ISC_LOWER</text:a><text:tab/>162</text:p>
          <text:p text:style-name="P230"><text:tab/>12.53 <text:s/><text:tab/><text:a xlink:type="simple" xlink:href="#12.53.ISC_NUM|outline">ISC_NUM</text:a><text:tab/>163</text:p>
          <text:p text:style-name="P230"><text:tab/>12.54 <text:s/><text:tab/><text:a xlink:type="simple" xlink:href="#12.54.ISC_UPPER|outline">ISC_UPPER</text:a><text:tab/>163</text:p>
          <text:p text:style-name="P230"><text:tab/>12.55 <text:s/><text:tab/><text:a xlink:type="simple" xlink:href="#12.55.LOWERCASE|outline">LOWERCASE</text:a><text:tab/>164</text:p>
          <text:p text:style-name="P230"><text:tab/>12.56 <text:s/><text:tab/><text:a xlink:type="simple" xlink:href="#12.56.MESSAGE_4R|outline">MESSAGE_4R</text:a><text:tab/>164</text:p>
          <text:p text:style-name="P230"><text:tab/>12.57 <text:s/><text:tab/><text:a xlink:type="simple" xlink:href="#12.57.MESSAGE_8|outline">MESSAGE_8</text:a><text:tab/>165</text:p>
          <text:p text:style-name="P230"><text:tab/>12.58 <text:s/><text:tab/><text:a xlink:type="simple" xlink:href="#12.58.MIRROR|outline">MIRROR</text:a><text:tab/>166</text:p>
          <text:p text:style-name="P230"><text:tab/>12.59 <text:s/><text:tab/><text:a xlink:type="simple" xlink:href="#12.59.MONTH_TO_STRING|outline">MONTH_TO_STRING</text:a><text:tab/>166</text:p>
          <text:p text:style-name="P230"><text:tab/>12.60 <text:s/><text:tab/><text:a xlink:type="simple" xlink:href="#12.60.OCT_TO_BYTE|outline">OCT_TO_BYTE</text:a><text:tab/>167</text:p>
          <text:p text:style-name="P230"><text:tab/>12.61 <text:s/><text:tab/><text:a xlink:type="simple" xlink:href="#12.61.OCT_TO_DWORD|outline">OCT_TO_DWORD</text:a><text:tab/>168</text:p>
          <text:p text:style-name="P230"><text:tab/>12.62 <text:s/><text:tab/><text:a xlink:type="simple" xlink:href="#12.62.REAL_TO_STRF|outline">REAL_TO_STRF</text:a><text:tab/>168</text:p>
          <text:p text:style-name="P230"><text:tab/>12.63 <text:s/><text:tab/><text:a xlink:type="simple" xlink:href="#12.63.REPLACE_ALL|outline">REPLACE_ALL</text:a><text:tab/>169</text:p>
          <text:p text:style-name="P230"><text:tab/>12.64 <text:s/><text:tab/><text:a xlink:type="simple" xlink:href="#12.64.REPLACE_CHARS|outline">REPLACE_CHARS</text:a><text:tab/>169</text:p>
          <text:p text:style-name="P230"><text:tab/>12.65 <text:s/><text:tab/><text:a xlink:type="simple" xlink:href="#12.65.REPLACE_UML|outline">REPLACE_UML</text:a><text:tab/>170</text:p>
          <text:p text:style-name="P230"><text:tab/>12.66 <text:s/><text:tab/><text:a xlink:type="simple" xlink:href="#12.66.TICKER|outline">TICKER</text:a><text:tab/>170</text:p>
          <text:p text:style-name="P230"><text:tab/>12.67 <text:s/><text:tab/><text:a xlink:type="simple" xlink:href="#12.67.TO_LOWER|outline">TO_LOWER</text:a><text:tab/>171</text:p>
          <text:p text:style-name="P230"><text:tab/>12.68 <text:s/><text:tab/><text:a xlink:type="simple" xlink:href="#12.68.TO_UML|outline">TO_UML</text:a><text:tab/>171</text:p>
          <text:p text:style-name="P230"><text:tab/>12.69 <text:s/><text:tab/><text:a xlink:type="simple" xlink:href="#12.69.TO_UPPER|outline">TO_UPPER</text:a><text:tab/>172</text:p>
          <text:p text:style-name="P230"><text:tab/>12.70 <text:s/><text:tab/><text:a xlink:type="simple" xlink:href="#12.70.TRIM|outline">TRIM</text:a><text:tab/>173</text:p>
          <text:p text:style-name="P230"><text:tab/>12.71 <text:s/><text:tab/><text:a xlink:type="simple" xlink:href="#12.71.TRIM1|outline">TRIM1</text:a><text:tab/>173</text:p>
          <text:p text:style-name="P230"><text:tab/>12.72 <text:s/><text:tab/><text:a xlink:type="simple" xlink:href="#12.72.TRIME|outline">TRIME</text:a><text:tab/>173</text:p>
          <text:p text:style-name="P230"><text:tab/>12.73 <text:s/><text:tab/><text:a xlink:type="simple" xlink:href="#12.73.UPPERCASE|outline">UPPERCASE</text:a><text:tab/>174</text:p>
          <text:p text:style-name="P230"><text:tab/>12.74 <text:s/><text:tab/><text:a xlink:type="simple" xlink:href="#12.74.WEEKDAY_TO_STRING|outline">WEEKDAY_TO_STRING</text:a><text:tab/>174</text:p>
          <text:p text:style-name="P229"><text:tab/>13 <text:s/><text:tab/><text:a xlink:type="simple" xlink:href="#13.Speicherbausteine|outline">Speicherbausteine</text:a><text:tab/>176</text:p>
          <text:p text:style-name="P230"><text:tab/>13.1 <text:s/><text:tab/><text:a xlink:type="simple" xlink:href="#13.1.FIFO_16|outline">FIFO_16</text:a><text:tab/>176</text:p>
          <text:p text:style-name="P230"><text:tab/>13.2 <text:s/><text:tab/><text:a xlink:type="simple" xlink:href="#13.2.FIFO_32|outline">FIFO_32</text:a><text:tab/>177</text:p>
          <text:p text:style-name="P230"><text:tab/>13.3 <text:s/><text:tab/><text:a xlink:type="simple" xlink:href="#13.3.STACK_16|outline">STACK_16</text:a><text:tab/>177</text:p>
          <text:p text:style-name="P230"><text:tab/>13.4 <text:s/><text:tab/><text:a xlink:type="simple" xlink:href="#13.4.STACK_32|outline">STACK_32</text:a><text:tab/>178</text:p>
          <text:p text:style-name="P229"><text:soft-page-break/><text:tab/>14 <text:s/><text:tab/><text:a xlink:type="simple" xlink:href="#14.Takt Generatoren|outline">Takt Generatoren</text:a><text:tab/>179</text:p>
          <text:p text:style-name="P230"><text:tab/>14.1 <text:s/><text:tab/><text:a xlink:type="simple" xlink:href="#14.1.A_TRIG|outline">A_TRIG</text:a><text:tab/>179</text:p>
          <text:p text:style-name="P230"><text:tab/>14.2 <text:s/><text:tab/><text:a xlink:type="simple" xlink:href="#14.2.B_TRIG|outline">B_TRIG</text:a><text:tab/>179</text:p>
          <text:p text:style-name="P230"><text:tab/>14.3 <text:s/><text:tab/><text:a xlink:type="simple" xlink:href="#14.3.CLICK_CNT|outline">CLICK_CNT</text:a><text:tab/>180</text:p>
          <text:p text:style-name="P230"><text:tab/>14.4 <text:s/><text:tab/><text:a xlink:type="simple" xlink:href="#14.4.CLICK_DEC|outline">CLICK_DEC</text:a><text:tab/>181</text:p>
          <text:p text:style-name="P230"><text:tab/>14.5 <text:s/><text:tab/><text:a xlink:type="simple" xlink:href="#14.5.CLK_1MS|outline">CLK_1MS</text:a><text:tab/>181</text:p>
          <text:p text:style-name="P230"><text:tab/>14.6 <text:s/><text:tab/><text:a xlink:type="simple" xlink:href="#14.6.CLK_2MS|outline">CLK_2MS</text:a><text:tab/>182</text:p>
          <text:p text:style-name="P230"><text:tab/>14.7 <text:s/><text:tab/><text:a xlink:type="simple" xlink:href="#14.7.CLK_4MS|outline">CLK_4MS</text:a><text:tab/>182</text:p>
          <text:p text:style-name="P230"><text:tab/>14.8 <text:s/><text:tab/><text:a xlink:type="simple" xlink:href="#14.8.CLK_8MS|outline">CLK_8MS</text:a><text:tab/>182</text:p>
          <text:p text:style-name="P230"><text:tab/>14.9 <text:s/><text:tab/><text:a xlink:type="simple" xlink:href="#14.9.CLK_DIV|outline">CLK_DIV</text:a><text:tab/>182</text:p>
          <text:p text:style-name="P230"><text:tab/>14.10 <text:s/><text:tab/><text:a xlink:type="simple" xlink:href="#14.10.CLK_N|outline">CLK_N</text:a><text:tab/>184</text:p>
          <text:p text:style-name="P230"><text:tab/>14.11 <text:s/><text:tab/><text:a xlink:type="simple" xlink:href="#14.11.CLK_PRG|outline">CLK_PRG</text:a><text:tab/>185</text:p>
          <text:p text:style-name="P230"><text:tab/>14.12 <text:s/><text:tab/><text:a xlink:type="simple" xlink:href="#14.12.CLK_PULSE|outline">CLK_PULSE</text:a><text:tab/>185</text:p>
          <text:p text:style-name="P230"><text:tab/>14.13 <text:s/><text:tab/><text:a xlink:type="simple" xlink:href="#14.13.D_TRIG|outline">D_TRIG</text:a><text:tab/>186</text:p>
          <text:p text:style-name="P230"><text:tab/>14.14 <text:s/><text:tab/><text:a xlink:type="simple" xlink:href="#14.14.GEN_BIT|outline">GEN_BIT</text:a><text:tab/>187</text:p>
          <text:p text:style-name="P230"><text:tab/>14.15 <text:s/><text:tab/><text:a xlink:type="simple" xlink:href="#14.15.GEN_SQ|outline">GEN_SQ</text:a><text:tab/>189</text:p>
          <text:p text:style-name="P230"><text:tab/>14.16 <text:s/><text:tab/><text:a xlink:type="simple" xlink:href="#14.16.SCHEDULER|outline">SCHEDULER</text:a><text:tab/>190</text:p>
          <text:p text:style-name="P230"><text:tab/>14.17 <text:s/><text:tab/><text:a xlink:type="simple" xlink:href="#14.17.SCHEDULER_2|outline">SCHEDULER_2</text:a><text:tab/>190</text:p>
          <text:p text:style-name="P230"><text:tab/>14.18 <text:s/><text:tab/><text:a xlink:type="simple" xlink:href="#14.18.SEQUENCE_4|outline">SEQUENCE_4</text:a><text:tab/>191</text:p>
          <text:p text:style-name="P230"><text:tab/>14.19 <text:s/><text:tab/><text:a xlink:type="simple" xlink:href="#14.19.SEQUENCE_64|outline">SEQUENCE_64</text:a><text:tab/>194</text:p>
          <text:p text:style-name="P230"><text:tab/>14.20 <text:s/><text:tab/><text:a xlink:type="simple" xlink:href="#14.20.SEQUENCE_8|outline">SEQUENCE_8</text:a><text:tab/>195</text:p>
          <text:p text:style-name="P230"><text:tab/>14.21 <text:s/><text:tab/><text:a xlink:type="simple" xlink:href="#14.21.TMAX|outline">TMAX</text:a><text:tab/>196</text:p>
          <text:p text:style-name="P230"><text:tab/>14.22 <text:s/><text:tab/><text:a xlink:type="simple" xlink:href="#14.22.TMIN|outline">TMIN</text:a><text:tab/>197</text:p>
          <text:p text:style-name="P230"><text:tab/>14.23 <text:s/><text:tab/><text:a xlink:type="simple" xlink:href="#14.23.TOF_1|outline">TOF_1</text:a><text:tab/>197</text:p>
          <text:p text:style-name="P230"><text:tab/>14.24 <text:s/><text:tab/><text:a xlink:type="simple" xlink:href="#14.24.TONOF|outline">TONOF</text:a><text:tab/>198</text:p>
          <text:p text:style-name="P230"><text:tab/>14.25 <text:s/><text:tab/><text:a xlink:type="simple" xlink:href="#14.25.TP_1|outline">TP_1</text:a><text:tab/>199</text:p>
          <text:p text:style-name="P230"><text:tab/>14.26 <text:s/><text:tab/><text:a xlink:type="simple" xlink:href="#14.26.TP_1D|outline">TP_1D</text:a><text:tab/>199</text:p>
          <text:p text:style-name="P230"><text:tab/>14.27 <text:s/><text:tab/><text:a xlink:type="simple" xlink:href="#14.27.TP_R|outline">TP_R</text:a><text:tab/>200</text:p>
          <text:p text:style-name="P229"><text:tab/>15 <text:s/><text:tab/><text:a xlink:type="simple" xlink:href="#15.Logik Bausteine|outline">Logik Bausteine</text:a><text:tab/>202</text:p>
          <text:p text:style-name="P230"><text:tab/>15.1 <text:s/><text:tab/><text:a xlink:type="simple" xlink:href="#15.1.BCDC_TO_INT|outline">BCDC_TO_INT</text:a><text:tab/>202</text:p>
          <text:p text:style-name="P230"><text:tab/>15.2 <text:s/><text:tab/><text:a xlink:type="simple" xlink:href="#15.2.BIT_COUNT|outline">BIT_COUNT</text:a><text:tab/>202</text:p>
          <text:p text:style-name="P230"><text:tab/>15.3 <text:s/><text:tab/><text:a xlink:type="simple" xlink:href="#15.3.BIT_LOAD_B|outline">BIT_LOAD_B</text:a><text:tab/>203</text:p>
          <text:p text:style-name="P230"><text:tab/>15.4 <text:s/><text:tab/><text:a xlink:type="simple" xlink:href="#15.4.BIT_LOAD_DW|outline">BIT_LOAD_DW</text:a><text:tab/>203</text:p>
          <text:p text:style-name="P230"><text:tab/>15.5 <text:s/><text:tab/><text:a xlink:type="simple" xlink:href="#15.5.BIT_LOAD_W|outline">BIT_LOAD_W</text:a><text:tab/>204</text:p>
          <text:p text:style-name="P230"><text:tab/>15.6 <text:s/><text:tab/><text:a xlink:type="simple" xlink:href="#15.6.BIT_OF_DWORD|outline">BIT_OF_DWORD</text:a><text:tab/>204</text:p>
          <text:p text:style-name="P230"><text:tab/>15.7 <text:s/><text:tab/><text:a xlink:type="simple" xlink:href="#15.7.BYTE_OF_BIT|outline">BYTE_OF_BIT</text:a><text:tab/>205</text:p>
          <text:p text:style-name="P230"><text:tab/>15.8 <text:s/><text:tab/><text:a xlink:type="simple" xlink:href="#15.8.BYTE_OF_DWORD|outline">BYTE_OF_DWORD</text:a><text:tab/>205</text:p>
          <text:p text:style-name="P230"><text:tab/>15.9 <text:s/><text:tab/><text:a xlink:type="simple" xlink:href="#15.9.BYTE_TO_BIT|outline">BYTE_TO_BIT</text:a><text:tab/>206</text:p>
          <text:p text:style-name="P230"><text:tab/>15.10 <text:s/><text:tab/><text:a xlink:type="simple" xlink:href="#15.10.CHECK_PARITY|outline">CHECK_PARITY</text:a><text:tab/>206</text:p>
          <text:p text:style-name="P230"><text:tab/>15.11 <text:s/><text:tab/><text:a xlink:type="simple" xlink:href="#15.11.CRC_CHECK|outline">CRC_CHECK</text:a><text:tab/>207</text:p>
          <text:p text:style-name="P230"><text:tab/>15.12 <text:s/><text:tab/><text:a xlink:type="simple" xlink:href="#15.12.CRC_GEN|outline">CRC_GEN</text:a><text:tab/>208</text:p>
          <text:p text:style-name="P230"><text:tab/>15.13 <text:s/><text:tab/><text:a xlink:type="simple" xlink:href="#15.13.DEC_2 |outline">DEC_2 </text:a><text:tab/>210</text:p>
          <text:p text:style-name="P230"><text:tab/>15.14 <text:s/><text:tab/><text:a xlink:type="simple" xlink:href="#15.14.DEC_4|outline">DEC_4</text:a><text:tab/>211</text:p>
          <text:p text:style-name="P230"><text:tab/>15.15 <text:s/><text:tab/><text:a xlink:type="simple" xlink:href="#15.15.DEC_8|outline">DEC_8</text:a><text:tab/>212</text:p>
          <text:p text:style-name="P230"><text:tab/>15.16 <text:s/><text:tab/><text:a xlink:type="simple" xlink:href="#15.16.DW_TO_REAL|outline">DW_TO_REAL</text:a><text:tab/>213</text:p>
          <text:p text:style-name="P230"><text:soft-page-break/><text:tab/>15.17 <text:s/><text:tab/><text:a xlink:type="simple" xlink:href="#15.17.DWORD_OF_BYTE|outline">DWORD_OF_BYTE</text:a><text:tab/>214</text:p>
          <text:p text:style-name="P230"><text:tab/>15.18 <text:s/><text:tab/><text:a xlink:type="simple" xlink:href="#15.18.INT_TO_BCDC|outline">INT_TO_BCDC</text:a><text:tab/>214</text:p>
          <text:p text:style-name="P230"><text:tab/>15.19 <text:s/><text:tab/><text:a xlink:type="simple" xlink:href="#15.19.MATRIX|outline">MATRIX</text:a><text:tab/>215</text:p>
          <text:p text:style-name="P230"><text:tab/>15.20 <text:s/><text:tab/><text:a xlink:type="simple" xlink:href="#15.20.MUX_2|outline">MUX_2</text:a><text:tab/>217</text:p>
          <text:p text:style-name="P230"><text:tab/>15.21 <text:s/><text:tab/><text:a xlink:type="simple" xlink:href="#15.21.MUX_4|outline">MUX_4</text:a><text:tab/>217</text:p>
          <text:p text:style-name="P230"><text:tab/>15.22 <text:s/><text:tab/><text:a xlink:type="simple" xlink:href="#15.22.PARITY|outline">PARITY</text:a><text:tab/>218</text:p>
          <text:p text:style-name="P230"><text:tab/>15.23 <text:s/><text:tab/><text:a xlink:type="simple" xlink:href="#15.23.REAL_TO_DW|outline">REAL_TO_DW</text:a><text:tab/>219</text:p>
          <text:p text:style-name="P230"><text:tab/>15.24 <text:s/><text:tab/><text:a xlink:type="simple" xlink:href="#15.24.REVERSE|outline">REVERSE</text:a><text:tab/>219</text:p>
          <text:p text:style-name="P230"><text:tab/>15.25 <text:s/><text:tab/><text:a xlink:type="simple" xlink:href="#15.25.SHL1|outline">SHL1</text:a><text:tab/>220</text:p>
          <text:p text:style-name="P230"><text:tab/>15.26 <text:s/><text:tab/><text:a xlink:type="simple" xlink:href="#15.26.SHR1|outline">SHR1</text:a><text:tab/>220</text:p>
          <text:p text:style-name="P230"><text:tab/>15.27 <text:s/><text:tab/><text:a xlink:type="simple" xlink:href="#15.27.SWAP_BYTE|outline">SWAP_BYTE</text:a><text:tab/>221</text:p>
          <text:p text:style-name="P230"><text:tab/>15.28 <text:s/><text:tab/><text:a xlink:type="simple" xlink:href="#15.28.SWAP_BYTE2|outline">SWAP_BYTE2</text:a><text:tab/>221</text:p>
          <text:p text:style-name="P230"><text:tab/>15.29 <text:s/><text:tab/><text:a xlink:type="simple" xlink:href="#15.29.WORD_OF_BYTE|outline">WORD_OF_BYTE</text:a><text:tab/>222</text:p>
          <text:p text:style-name="P230"><text:tab/>15.30 <text:s/><text:tab/><text:a xlink:type="simple" xlink:href="#15.30.WORD_OF_DWORD|outline">WORD_OF_DWORD</text:a><text:tab/>222</text:p>
          <text:p text:style-name="P229"><text:tab/>16 <text:s/><text:tab/><text:a xlink:type="simple" xlink:href="#16.Latches, Flip-Flop und Schieberegister|outline">Latches, Flip-Flop und Schieberegister</text:a><text:tab/>223</text:p>
          <text:p text:style-name="P230"><text:tab/>16.1 <text:s/><text:tab/><text:a xlink:type="simple" xlink:href="#16.1.COUNT_BR|outline">COUNT_BR</text:a><text:tab/>223</text:p>
          <text:p text:style-name="P230"><text:tab/>16.2 <text:s/><text:tab/><text:a xlink:type="simple" xlink:href="#16.2.COUNT_DR|outline">COUNT_DR</text:a><text:tab/>224</text:p>
          <text:p text:style-name="P230"><text:tab/>16.3 <text:s/><text:tab/><text:a xlink:type="simple" xlink:href="#16.3.FF_D2E|outline">FF_D2E</text:a><text:tab/>225</text:p>
          <text:p text:style-name="P230"><text:tab/>16.4 <text:s/><text:tab/><text:a xlink:type="simple" xlink:href="#16.4.FF_D4E|outline">FF_D4E</text:a><text:tab/>226</text:p>
          <text:p text:style-name="P230"><text:tab/>16.5 <text:s/><text:tab/><text:a xlink:type="simple" xlink:href="#16.5.FF_DRE|outline">FF_DRE</text:a><text:tab/>227</text:p>
          <text:p text:style-name="P230"><text:tab/>16.6 <text:s/><text:tab/><text:a xlink:type="simple" xlink:href="#16.6.FF_JKE|outline">FF_JKE</text:a><text:tab/>228</text:p>
          <text:p text:style-name="P230"><text:tab/>16.7 <text:s/><text:tab/><text:a xlink:type="simple" xlink:href="#16.7.FF_RSE|outline">FF_RSE</text:a><text:tab/>229</text:p>
          <text:p text:style-name="P230"><text:tab/>16.8 <text:s/><text:tab/><text:a xlink:type="simple" xlink:href="#16.8.SELECT_8|outline">SELECT_8</text:a><text:tab/>230</text:p>
          <text:p text:style-name="P230"><text:tab/>16.9 <text:s/><text:tab/><text:a xlink:type="simple" xlink:href="#16.9.LATCH|outline">LATCH</text:a><text:tab/>231</text:p>
          <text:p text:style-name="P230"><text:tab/>16.10 <text:s/><text:tab/><text:a xlink:type="simple" xlink:href="#16.10.LATCH4|outline">LATCH4</text:a><text:tab/>231</text:p>
          <text:p text:style-name="P230"><text:tab/>16.11 <text:s/><text:tab/><text:a xlink:type="simple" xlink:href="#16.11.SHR_4E|outline">SHR_4E</text:a><text:tab/>232</text:p>
          <text:p text:style-name="P230"><text:tab/>16.12 <text:s/><text:tab/><text:a xlink:type="simple" xlink:href="#16.12.SHR_4UDE|outline">SHR_4UDE</text:a><text:tab/>233</text:p>
          <text:p text:style-name="P230"><text:tab/>16.13 <text:s/><text:tab/><text:a xlink:type="simple" xlink:href="#16.13.SHR_8PLE|outline">SHR_8PLE</text:a><text:tab/>234</text:p>
          <text:p text:style-name="P230"><text:tab/>16.14 <text:s/><text:tab/><text:a xlink:type="simple" xlink:href="#16.14.SHR_8UDE|outline">SHR_8UDE</text:a><text:tab/>235</text:p>
          <text:p text:style-name="P230"><text:tab/>16.15 <text:s/><text:tab/><text:a xlink:type="simple" xlink:href="#16.15.STORE_8|outline">STORE_8</text:a><text:tab/>236</text:p>
          <text:p text:style-name="P230"><text:tab/>16.16 <text:s/><text:tab/><text:a xlink:type="simple" xlink:href="#16.16.TOGGLE|outline">TOGGLE</text:a><text:tab/>237</text:p>
          <text:p text:style-name="P229"><text:tab/>17 <text:s/><text:tab/><text:a xlink:type="simple" xlink:href="#17.Signalgeneratoren|outline">Signalgeneratoren</text:a><text:tab/>238</text:p>
          <text:p text:style-name="P230"><text:tab/>17.1 <text:s/><text:tab/><text:a xlink:type="simple" xlink:href="#17.1.GEN_PULSE|outline">GEN_PULSE</text:a><text:tab/>238</text:p>
          <text:p text:style-name="P230"><text:tab/>17.2 <text:s/><text:tab/><text:a xlink:type="simple" xlink:href="#17.2.GEN_PW2|outline">GEN_PW2</text:a><text:tab/>239</text:p>
          <text:p text:style-name="P230"><text:tab/>17.3 <text:s/><text:tab/><text:a xlink:type="simple" xlink:href="#17.3.GEN_RDM|outline">GEN_RDM</text:a><text:tab/>239</text:p>
          <text:p text:style-name="P230"><text:tab/>17.4 <text:s/><text:tab/><text:a xlink:type="simple" xlink:href="#17.4.GEN_RDT|outline">GEN_RDT</text:a><text:tab/>240</text:p>
          <text:p text:style-name="P230"><text:tab/>17.5 <text:s/><text:tab/><text:a xlink:type="simple" xlink:href="#17.5.GEN_RMP|outline">GEN_RMP</text:a><text:tab/>241</text:p>
          <text:p text:style-name="P230"><text:tab/>17.6 <text:s/><text:tab/><text:a xlink:type="simple" xlink:href="#17.6.GEN_SIN|outline">GEN_SIN</text:a><text:tab/>242</text:p>
          <text:p text:style-name="P230"><text:tab/>17.7 <text:s/><text:tab/><text:a xlink:type="simple" xlink:href="#17.7.GEN_SQR|outline">GEN_SQR</text:a><text:tab/>243</text:p>
          <text:p text:style-name="P230"><text:tab/>17.8 <text:s/><text:tab/><text:a xlink:type="simple" xlink:href="#17.8.PWM_DC|outline">PWM_DC</text:a><text:tab/>245</text:p>
          <text:p text:style-name="P230"><text:tab/>17.9 <text:s/><text:tab/><text:a xlink:type="simple" xlink:href="#17.9.PWM_PW|outline">PWM_PW</text:a><text:tab/>245</text:p>
          <text:p text:style-name="P230"><text:tab/>17.10 <text:s/><text:tab/><text:a xlink:type="simple" xlink:href="#17.10.RMP_B|outline">RMP_B</text:a><text:tab/>246</text:p>
          <text:p text:style-name="P230"><text:tab/>17.11 <text:s/><text:tab/><text:a xlink:type="simple" xlink:href="#17.11.RMP_SOFT|outline">RMP_SOFT</text:a><text:tab/>248</text:p>
          <text:p text:style-name="P230"><text:soft-page-break/><text:tab/>17.12 <text:s/><text:tab/><text:a xlink:type="simple" xlink:href="#17.12.RMP_W|outline">RMP_W</text:a><text:tab/>249</text:p>
          <text:p text:style-name="P229"><text:tab/>18 <text:s/><text:tab/><text:a xlink:type="simple" xlink:href="#18.Signalverarbeitung|outline">Signalverarbeitung</text:a><text:tab/>250</text:p>
          <text:p text:style-name="P230"><text:tab/>18.1 <text:s/><text:tab/><text:a xlink:type="simple" xlink:href="#18.1.AIN|outline">AIN</text:a><text:tab/>250</text:p>
          <text:p text:style-name="P230"><text:tab/>18.2 <text:s/><text:tab/><text:a xlink:type="simple" xlink:href="#18.2.AIN1|outline">AIN1</text:a><text:tab/>251</text:p>
          <text:p text:style-name="P230"><text:tab/>18.3 <text:s/><text:tab/><text:a xlink:type="simple" xlink:href="#18.3.AOUT|outline">AOUT</text:a><text:tab/>253</text:p>
          <text:p text:style-name="P230"><text:tab/>18.4 <text:s/><text:tab/><text:a xlink:type="simple" xlink:href="#18.4.AOUT1|outline">AOUT1</text:a><text:tab/>254</text:p>
          <text:p text:style-name="P230"><text:tab/>18.5 <text:s/><text:tab/><text:a xlink:type="simple" xlink:href="#18.5.BYTE_TO_RANGE|outline">BYTE_TO_RANGE</text:a><text:tab/>255</text:p>
          <text:p text:style-name="P230"><text:tab/>18.6 <text:s/><text:tab/><text:a xlink:type="simple" xlink:href="#18.6.DELAY|outline">DELAY</text:a><text:tab/>255</text:p>
          <text:p text:style-name="P230"><text:tab/>18.7 <text:s/><text:tab/><text:a xlink:type="simple" xlink:href="#18.7.DELAY_4|outline">DELAY_4</text:a><text:tab/>256</text:p>
          <text:p text:style-name="P230"><text:tab/>18.8 <text:s/><text:tab/><text:a xlink:type="simple" xlink:href="#18.8.FADE|outline">FADE</text:a><text:tab/>257</text:p>
          <text:p text:style-name="P230"><text:tab/>18.9 <text:s/><text:tab/><text:a xlink:type="simple" xlink:href="#18.9.FILTER_DW|outline">FILTER_DW</text:a><text:tab/>258</text:p>
          <text:p text:style-name="P230"><text:tab/>18.10 <text:s/><text:tab/><text:a xlink:type="simple" xlink:href="#18.10.FILTER_MAV_DW|outline">FILTER_MAV_DW</text:a><text:tab/>259</text:p>
          <text:p text:style-name="P230"><text:tab/>18.11 <text:s/><text:tab/><text:a xlink:type="simple" xlink:href="#18.11.FILTER_MAV_W|outline">FILTER_MAV_W</text:a><text:tab/>260</text:p>
          <text:p text:style-name="P230"><text:tab/>18.12 <text:s/><text:tab/><text:a xlink:type="simple" xlink:href="#18.12.FILTER_W|outline">FILTER_W</text:a><text:tab/>260</text:p>
          <text:p text:style-name="P230"><text:tab/>18.13 <text:s/><text:tab/><text:a xlink:type="simple" xlink:href="#18.13.FILTER_WAV|outline">FILTER_WAV</text:a><text:tab/>261</text:p>
          <text:p text:style-name="P230"><text:tab/>18.14 <text:s/><text:tab/><text:a xlink:type="simple" xlink:href="#18.14.MIX|outline">MIX</text:a><text:tab/>261</text:p>
          <text:p text:style-name="P230"><text:tab/>18.15 <text:s/><text:tab/><text:a xlink:type="simple" xlink:href="#18.15.MUX_R2|outline">MUX_R2</text:a><text:tab/>262</text:p>
          <text:p text:style-name="P230"><text:tab/>18.16 <text:s/><text:tab/><text:a xlink:type="simple" xlink:href="#18.16.MUX_R4|outline">MUX_R4</text:a><text:tab/>262</text:p>
          <text:p text:style-name="P230"><text:tab/>18.17 <text:s/><text:tab/><text:a xlink:type="simple" xlink:href="#18.17.OFFSET|outline">OFFSET</text:a><text:tab/>263</text:p>
          <text:p text:style-name="P230"><text:tab/>18.18 <text:s/><text:tab/><text:a xlink:type="simple" xlink:href="#18.18.OFFSET2|outline">OFFSET2</text:a><text:tab/>265</text:p>
          <text:p text:style-name="P230"><text:tab/>18.19 <text:s/><text:tab/><text:a xlink:type="simple" xlink:href="#18.19.OVERRIDE|outline">OVERRIDE</text:a><text:tab/>266</text:p>
          <text:p text:style-name="P230"><text:tab/>18.20 <text:s/><text:tab/><text:a xlink:type="simple" xlink:href="#18.20.RANGE_TO_BYTE|outline">RANGE_TO_BYTE</text:a><text:tab/>267</text:p>
          <text:p text:style-name="P230"><text:tab/>18.21 <text:s/><text:tab/><text:a xlink:type="simple" xlink:href="#18.21.RANGE_TO_WORD|outline">RANGE_TO_WORD</text:a><text:tab/>267</text:p>
          <text:p text:style-name="P230"><text:tab/>18.22 <text:s/><text:tab/><text:a xlink:type="simple" xlink:href="#18.22.SCALE|outline">SCALE</text:a><text:tab/>268</text:p>
          <text:p text:style-name="P230"><text:tab/>18.23 <text:s/><text:tab/><text:a xlink:type="simple" xlink:href="#18.23.SCALE_B|outline">SCALE_B</text:a><text:tab/>268</text:p>
          <text:p text:style-name="P230"><text:tab/>18.24 <text:s/><text:tab/><text:a xlink:type="simple" xlink:href="#18.24.SCALE_B2|outline">SCALE_B2</text:a><text:tab/>269</text:p>
          <text:p text:style-name="P230"><text:tab/>18.25 <text:s/><text:tab/><text:a xlink:type="simple" xlink:href="#18.25.SCALE_B4|outline">SCALE_B4</text:a><text:tab/>271</text:p>
          <text:p text:style-name="P230"><text:tab/>18.26 <text:s/><text:tab/><text:a xlink:type="simple" xlink:href="#18.26.SCALE_B8|outline">SCALE_B8</text:a><text:tab/>272</text:p>
          <text:p text:style-name="P230"><text:tab/>18.27 <text:s/><text:tab/><text:a xlink:type="simple" xlink:href="#18.27.SCALE_D|outline">SCALE_D</text:a><text:tab/>273</text:p>
          <text:p text:style-name="P230"><text:tab/>18.28 <text:s/><text:tab/><text:a xlink:type="simple" xlink:href="#18.28.SCALE_R|outline">SCALE_R</text:a><text:tab/>273</text:p>
          <text:p text:style-name="P230"><text:tab/>18.29 <text:s/><text:tab/><text:a xlink:type="simple" xlink:href="#18.29.SCALE_X2|outline">SCALE_X2</text:a><text:tab/>274</text:p>
          <text:p text:style-name="P230"><text:tab/>18.30 <text:s/><text:tab/><text:a xlink:type="simple" xlink:href="#18.30.SCALE_X4|outline">SCALE_X4</text:a><text:tab/>275</text:p>
          <text:p text:style-name="P230"><text:tab/>18.31 <text:s/><text:tab/><text:a xlink:type="simple" xlink:href="#18.31.SCALE_X8|outline">SCALE_X8</text:a><text:tab/>276</text:p>
          <text:p text:style-name="P230"><text:tab/>18.32 <text:s/><text:tab/><text:a xlink:type="simple" xlink:href="#18.32.SEL2_OF_3|outline">SEL2_OF_3</text:a><text:tab/>277</text:p>
          <text:p text:style-name="P230"><text:tab/>18.33 <text:s/><text:tab/><text:a xlink:type="simple" xlink:href="#18.33.SEL2_OF_3B|outline">SEL2_OF_3B</text:a><text:tab/>277</text:p>
          <text:p text:style-name="P230"><text:tab/>18.34 <text:s/><text:tab/><text:a xlink:type="simple" xlink:href="#18.34.SH|outline">SH</text:a><text:tab/>278</text:p>
          <text:p text:style-name="P230"><text:tab/>18.35 <text:s/><text:tab/><text:a xlink:type="simple" xlink:href="#18.35.SH_1|outline">SH_1</text:a><text:tab/>279</text:p>
          <text:p text:style-name="P230"><text:tab/>18.36 <text:s/><text:tab/><text:a xlink:type="simple" xlink:href="#18.36.SH_2|outline">SH_2</text:a><text:tab/>280</text:p>
          <text:p text:style-name="P230"><text:tab/>18.37 <text:s/><text:tab/><text:a xlink:type="simple" xlink:href="#18.37.SH_T|outline">SH_T</text:a><text:tab/>282</text:p>
          <text:p text:style-name="P230"><text:tab/>18.38 <text:s/><text:tab/><text:a xlink:type="simple" xlink:href="#18.38.STAIR|outline">STAIR</text:a><text:tab/>283</text:p>
          <text:p text:style-name="P230"><text:tab/>18.39 <text:s/><text:tab/><text:a xlink:type="simple" xlink:href="#18.39.STAIR2|outline">STAIR2</text:a><text:tab/>284</text:p>
          <text:p text:style-name="P230"><text:tab/>18.40 <text:s/><text:tab/><text:a xlink:type="simple" xlink:href="#18.40.WORD_TO_RANGE|outline">WORD_TO_RANGE</text:a><text:tab/>285</text:p>
          <text:p text:style-name="P229"><text:soft-page-break/><text:tab/>19 <text:s/><text:tab/><text:a xlink:type="simple" xlink:href="#19.Sensorik|outline">Sensorik</text:a><text:tab/>286</text:p>
          <text:p text:style-name="P230"><text:tab/>19.1 <text:s/><text:tab/><text:a xlink:type="simple" xlink:href="#19.1.MULTI_IN|outline">MULTI_IN</text:a><text:tab/>286</text:p>
          <text:p text:style-name="P230"><text:tab/>19.2 <text:s/><text:tab/><text:a xlink:type="simple" xlink:href="#19.2.RES_NI|outline">RES_NI</text:a><text:tab/>287</text:p>
          <text:p text:style-name="P230"><text:tab/>19.3 <text:s/><text:tab/><text:a xlink:type="simple" xlink:href="#19.3.RES_PT|outline">RES_PT</text:a><text:tab/>288</text:p>
          <text:p text:style-name="P230"><text:tab/>19.4 <text:s/><text:tab/><text:a xlink:type="simple" xlink:href="#19.4.RES_SI|outline">RES_SI</text:a><text:tab/>289</text:p>
          <text:p text:style-name="P230"><text:tab/>19.5 <text:s/><text:tab/><text:a xlink:type="simple" xlink:href="#19.5.SENSOR_INT|outline">SENSOR_INT</text:a><text:tab/>290</text:p>
          <text:p text:style-name="P230"><text:tab/>19.6 <text:s/><text:tab/><text:a xlink:type="simple" xlink:href="#19.6.TEMP_NI|outline">TEMP_NI</text:a><text:tab/>291</text:p>
          <text:p text:style-name="P230"><text:tab/>19.7 <text:s/><text:tab/><text:a xlink:type="simple" xlink:href="#19.7.TEMP_PT|outline">TEMP_PT</text:a><text:tab/>292</text:p>
          <text:p text:style-name="P230"><text:tab/>19.8 <text:s/><text:tab/><text:a xlink:type="simple" xlink:href="#19.8.TEMP_SI|outline">TEMP_SI</text:a><text:tab/>293</text:p>
          <text:p text:style-name="P229"><text:tab/>20 <text:s/><text:tab/><text:a xlink:type="simple" xlink:href="#20.Messbausteine|outline">Messbausteine</text:a><text:tab/>294</text:p>
          <text:p text:style-name="P230"><text:tab/>20.1 <text:s/><text:tab/><text:a xlink:type="simple" xlink:href="#20.1.ALARM_2|outline">ALARM_2</text:a><text:tab/>294</text:p>
          <text:p text:style-name="P230"><text:tab/>20.2 <text:s/><text:tab/><text:a xlink:type="simple" xlink:href="#20.2.BAR_GRAPH|outline">BAR_GRAPH</text:a><text:tab/>295</text:p>
          <text:p text:style-name="P230"><text:tab/>20.3 <text:s/><text:tab/><text:a xlink:type="simple" xlink:href="#20.3.CALIBRATE|outline">CALIBRATE</text:a><text:tab/>297</text:p>
          <text:p text:style-name="P230"><text:tab/>20.4 <text:s/><text:tab/><text:a xlink:type="simple" xlink:href="#20.4.CYCLE_TIME|outline">CYCLE_TIME</text:a><text:tab/>298</text:p>
          <text:p text:style-name="P230"><text:tab/>20.5 <text:s/><text:tab/><text:a xlink:type="simple" xlink:href="#20.5.DT_SIMU|outline">DT_SIMU</text:a><text:tab/>298</text:p>
          <text:p text:style-name="P230"><text:tab/>20.6 <text:s/><text:tab/><text:a xlink:type="simple" xlink:href="#20.6.METER|outline">METER</text:a><text:tab/>299</text:p>
          <text:p text:style-name="P230"><text:tab/>20.7 <text:s/><text:tab/><text:a xlink:type="simple" xlink:href="#20.7.METER_STAT|outline">METER_STAT</text:a><text:tab/>301</text:p>
          <text:p text:style-name="P230"><text:tab/>20.8 <text:s/><text:tab/><text:a xlink:type="simple" xlink:href="#20.8.M_D|outline">M_D</text:a><text:tab/>302</text:p>
          <text:p text:style-name="P230"><text:tab/>20.9 <text:s/><text:tab/><text:a xlink:type="simple" xlink:href="#20.9.M_T|outline">M_T</text:a><text:tab/>303</text:p>
          <text:p text:style-name="P230"><text:tab/>20.10 <text:s/><text:tab/><text:a xlink:type="simple" xlink:href="#20.10.M_TX|outline">M_TX</text:a><text:tab/>303</text:p>
          <text:p text:style-name="P230"><text:tab/>20.11 <text:s/><text:tab/><text:a xlink:type="simple" xlink:href="#20.11.ONTIME|outline">ONTIME</text:a><text:tab/>304</text:p>
          <text:p text:style-name="P230"><text:tab/>20.12 <text:s/><text:tab/><text:a xlink:type="simple" xlink:href="#20.12.T_PLC_MS|outline">T_PLC_MS</text:a><text:tab/>305</text:p>
          <text:p text:style-name="P230"><text:tab/>20.13 <text:s/><text:tab/><text:a xlink:type="simple" xlink:href="#20.13.T_PLC_US|outline">T_PLC_US</text:a><text:tab/>307</text:p>
          <text:p text:style-name="P230"><text:tab/>20.14 <text:s/><text:tab/><text:a xlink:type="simple" xlink:href="#20.14.TC_MS|outline">TC_MS</text:a><text:tab/>308</text:p>
          <text:p text:style-name="P230"><text:tab/>20.15 <text:s/><text:tab/><text:a xlink:type="simple" xlink:href="#20.15.TC_S|outline">TC_S</text:a><text:tab/>309</text:p>
          <text:p text:style-name="P230"><text:tab/>20.16 <text:s/><text:tab/><text:a xlink:type="simple" xlink:href="#20.16.TC_US|outline">TC_US</text:a><text:tab/>309</text:p>
          <text:p text:style-name="P229"><text:tab/>21 <text:s/><text:tab/><text:a xlink:type="simple" xlink:href="#21.Umrechnungen|outline">Umrechnungen</text:a><text:tab/>310</text:p>
          <text:p text:style-name="P230"><text:tab/>21.1 <text:s/><text:tab/><text:a xlink:type="simple" xlink:href="#21.1.ASTRO|outline">ASTRO</text:a><text:tab/>310</text:p>
          <text:p text:style-name="P230"><text:tab/>21.2 <text:s/><text:tab/><text:a xlink:type="simple" xlink:href="#21.2.BFT_TO_MS|outline">BFT_TO_MS</text:a><text:tab/>311</text:p>
          <text:p text:style-name="P230"><text:tab/>21.3 <text:s/><text:tab/><text:a xlink:type="simple" xlink:href="#21.3.C_TO_F|outline">C_TO_F</text:a><text:tab/>311</text:p>
          <text:p text:style-name="P230"><text:tab/>21.4 <text:s/><text:tab/><text:a xlink:type="simple" xlink:href="#21.4.C_TO_K|outline">C_TO_K</text:a><text:tab/>311</text:p>
          <text:p text:style-name="P230"><text:tab/>21.5 <text:s/><text:tab/><text:a xlink:type="simple" xlink:href="#21.5.DEG_TO_DIR|outline">DEG_TO_DIR</text:a><text:tab/>312</text:p>
          <text:p text:style-name="P230"><text:tab/>21.6 <text:s/><text:tab/><text:a xlink:type="simple" xlink:href="#21.6.DIR_TO_DEG|outline">DIR_TO_DEG</text:a><text:tab/>312</text:p>
          <text:p text:style-name="P230"><text:tab/>21.7 <text:s/><text:tab/><text:a xlink:type="simple" xlink:href="#21.7.ENERGY|outline">ENERGY</text:a><text:tab/>313</text:p>
          <text:p text:style-name="P230"><text:tab/>21.8 <text:s/><text:tab/><text:a xlink:type="simple" xlink:href="#21.8.F_TO_C|outline">F_TO_C</text:a><text:tab/>314</text:p>
          <text:p text:style-name="P230"><text:tab/>21.9 <text:s/><text:tab/><text:a xlink:type="simple" xlink:href="#21.9.F_TO_OM|outline">F_TO_OM</text:a><text:tab/>314</text:p>
          <text:p text:style-name="P230"><text:tab/>21.10 <text:s/><text:tab/><text:a xlink:type="simple" xlink:href="#21.10.F_TO_PT|outline">F_TO_PT</text:a><text:tab/>314</text:p>
          <text:p text:style-name="P230"><text:tab/>21.11 <text:s/><text:tab/><text:a xlink:type="simple" xlink:href="#21.11.KMH_TO_MS|outline">KMH_TO_MS</text:a><text:tab/>315</text:p>
          <text:p text:style-name="P230"><text:tab/>21.12 <text:s/><text:tab/><text:a xlink:type="simple" xlink:href="#21.12.LENGTH|outline">LENGTH</text:a><text:tab/>315</text:p>
          <text:p text:style-name="P230"><text:tab/>21.13 <text:s/><text:tab/><text:a xlink:type="simple" xlink:href="#21.13.MS_TO_BFT|outline">MS_TO_BFT</text:a><text:tab/>316</text:p>
          <text:p text:style-name="P230"><text:tab/>21.14 <text:s/><text:tab/><text:a xlink:type="simple" xlink:href="#21.14.MS_TO_KMH|outline">MS_TO_KMH</text:a><text:tab/>317</text:p>
          <text:p text:style-name="P230"><text:tab/>21.15 <text:s/><text:tab/><text:a xlink:type="simple" xlink:href="#21.15.K_TO_C|outline">K_TO_C</text:a><text:tab/>317</text:p>
          <text:p text:style-name="P230"><text:soft-page-break/><text:tab/>21.16 <text:s/><text:tab/><text:a xlink:type="simple" xlink:href="#21.16.OM_TO_F|outline">OM_TO_F</text:a><text:tab/>318</text:p>
          <text:p text:style-name="P230"><text:tab/>21.17 <text:s/><text:tab/><text:a xlink:type="simple" xlink:href="#21.17.PRESSURE|outline">PRESSURE</text:a><text:tab/>318</text:p>
          <text:p text:style-name="P230"><text:tab/>21.18 <text:s/><text:tab/><text:a xlink:type="simple" xlink:href="#21.18.PT_TO_F|outline">PT_TO_F</text:a><text:tab/>319</text:p>
          <text:p text:style-name="P230"><text:tab/>21.19 <text:s/><text:tab/><text:a xlink:type="simple" xlink:href="#21.19.SPEED|outline">SPEED</text:a><text:tab/>319</text:p>
          <text:p text:style-name="P230"><text:tab/>21.20 <text:s/><text:tab/><text:a xlink:type="simple" xlink:href="#21.20.TEMPERATURE|outline">TEMPERATURE</text:a><text:tab/>320</text:p>
          <text:p text:style-name="P229"><text:tab/>22 <text:s/><text:tab/><text:a xlink:type="simple" xlink:href="#22.Regelungstechnik|outline">Regelungstechnik</text:a><text:tab/>322</text:p>
          <text:p text:style-name="P230"><text:tab/>22.1 <text:s/><text:tab/><text:a xlink:type="simple" xlink:href="#22.1.Einleitung|outline">Einleitung</text:a><text:tab/>322</text:p>
          <text:p text:style-name="P230"><text:tab/>22.2 <text:s/><text:tab/><text:a xlink:type="simple" xlink:href="#22.2.CONTROL_SET1|outline">CONTROL_SET1</text:a><text:tab/>323</text:p>
          <text:p text:style-name="P230"><text:tab/>22.3 <text:s/><text:tab/><text:a xlink:type="simple" xlink:href="#22.3.CONTROL_SET2|outline">CONTROL_SET2</text:a><text:tab/>325</text:p>
          <text:p text:style-name="P230"><text:tab/>22.4 <text:s/><text:tab/><text:a xlink:type="simple" xlink:href="#22.4.CTRL_IN|outline">CTRL_IN</text:a><text:tab/>326</text:p>
          <text:p text:style-name="P230"><text:tab/>22.5 <text:s/><text:tab/><text:a xlink:type="simple" xlink:href="#22.5.CTRL_OUT|outline">CTRL_OUT</text:a><text:tab/>327</text:p>
          <text:p text:style-name="P230"><text:tab/>22.6 <text:s/><text:tab/><text:a xlink:type="simple" xlink:href="#22.6.CTRL_PI|outline">CTRL_PI</text:a><text:tab/>328</text:p>
          <text:p text:style-name="P230"><text:tab/>22.7 <text:s/><text:tab/><text:a xlink:type="simple" xlink:href="#22.7.CTRL_PID|outline">CTRL_PID</text:a><text:tab/>330</text:p>
          <text:p text:style-name="P230"><text:tab/>22.8 <text:s/><text:tab/><text:a xlink:type="simple" xlink:href="#22.8.CTRL_PWM|outline">CTRL_PWM</text:a><text:tab/>333</text:p>
          <text:p text:style-name="P230"><text:tab/>22.9 <text:s/><text:tab/><text:a xlink:type="simple" xlink:href="#22.9.DEAD_BAND|outline">DEAD_BAND</text:a><text:tab/>334</text:p>
          <text:p text:style-name="P230"><text:tab/>22.10 <text:s/><text:tab/><text:a xlink:type="simple" xlink:href="#22.10.DEAD_BAND_A|outline">DEAD_BAND_A</text:a><text:tab/>335</text:p>
          <text:p text:style-name="P230"><text:tab/>22.11 <text:s/><text:tab/><text:a xlink:type="simple" xlink:href="#22.11.DEAD_ZONE|outline">DEAD_ZONE</text:a><text:tab/>336</text:p>
          <text:p text:style-name="P230"><text:tab/>22.12 <text:s/><text:tab/><text:a xlink:type="simple" xlink:href="#22.12.DEAD_ZONE2|outline">DEAD_ZONE2</text:a><text:tab/>336</text:p>
          <text:p text:style-name="P230"><text:tab/>22.13 <text:s/><text:tab/><text:a xlink:type="simple" xlink:href="#22.13.FT_DERIV|outline">FT_DERIV</text:a><text:tab/>337</text:p>
          <text:p text:style-name="P230"><text:tab/>22.14 <text:s/><text:tab/><text:a xlink:type="simple" xlink:href="#22.14.FT_IMP|outline">FT_IMP</text:a><text:tab/>338</text:p>
          <text:p text:style-name="P230"><text:tab/>22.15 <text:s/><text:tab/><text:a xlink:type="simple" xlink:href="#22.15.FT_INT|outline">FT_INT</text:a><text:tab/>339</text:p>
          <text:p text:style-name="P230"><text:tab/>22.16 <text:s/><text:tab/><text:a xlink:type="simple" xlink:href="#22.16.FT_INT2|outline">FT_INT2</text:a><text:tab/>340</text:p>
          <text:p text:style-name="P230"><text:tab/>22.17 <text:s/><text:tab/><text:a xlink:type="simple" xlink:href="#22.17.FT_PD|outline">FT_PD</text:a><text:tab/>341</text:p>
          <text:p text:style-name="P230"><text:tab/>22.18 <text:s/><text:tab/><text:a xlink:type="simple" xlink:href="#22.18.FT_PDT1|outline">FT_PDT1</text:a><text:tab/>341</text:p>
          <text:p text:style-name="P230"><text:tab/>22.19 <text:s/><text:tab/><text:a xlink:type="simple" xlink:href="#22.19.FT_PI|outline">FT_PI</text:a><text:tab/>342</text:p>
          <text:p text:style-name="P230"><text:tab/>22.20 <text:s/><text:tab/><text:a xlink:type="simple" xlink:href="#22.20.FT_PID|outline">FT_PID</text:a><text:tab/>344</text:p>
          <text:p text:style-name="P230"><text:tab/>22.21 <text:s/><text:tab/><text:a xlink:type="simple" xlink:href="#22.21.FT_PIDW|outline">FT_PIDW</text:a><text:tab/>346</text:p>
          <text:p text:style-name="P230"><text:tab/>22.22 <text:s/><text:tab/><text:a xlink:type="simple" xlink:href="#22.22.FT_PIDWL|outline">FT_PIDWL</text:a><text:tab/>347</text:p>
          <text:p text:style-name="P230"><text:tab/>22.23 <text:s/><text:tab/><text:a xlink:type="simple" xlink:href="#22.23.FT_PIW|outline">FT_PIW</text:a><text:tab/>349</text:p>
          <text:p text:style-name="P230"><text:tab/>22.24 <text:s/><text:tab/><text:a xlink:type="simple" xlink:href="#22.24.FT_PIWL|outline">FT_PIWL</text:a><text:tab/>350</text:p>
          <text:p text:style-name="P230"><text:tab/>22.25 <text:s/><text:tab/><text:a xlink:type="simple" xlink:href="#22.25.FT_PT1|outline">FT_PT1</text:a><text:tab/>352</text:p>
          <text:p text:style-name="P230"><text:tab/>22.26 <text:s/><text:tab/><text:a xlink:type="simple" xlink:href="#22.26.FT_PT2|outline">FT_PT2</text:a><text:tab/>353</text:p>
          <text:p text:style-name="P230"><text:tab/>22.27 <text:s/><text:tab/><text:a xlink:type="simple" xlink:href="#22.27.FT_TN16|outline">FT_TN16</text:a><text:tab/>354</text:p>
          <text:p text:style-name="P230"><text:tab/>22.28 <text:s/><text:tab/><text:a xlink:type="simple" xlink:href="#22.28.FT_TN64|outline">FT_TN64</text:a><text:tab/>355</text:p>
          <text:p text:style-name="P230"><text:tab/>22.29 <text:s/><text:tab/><text:a xlink:type="simple" xlink:href="#22.29.FT_TN8|outline">FT_TN8</text:a><text:tab/>356</text:p>
          <text:p text:style-name="P230"><text:tab/>22.30 <text:s/><text:tab/><text:a xlink:type="simple" xlink:href="#22.30.HYST|outline">HYST</text:a><text:tab/>356</text:p>
          <text:p text:style-name="P230"><text:tab/>22.31 <text:s/><text:tab/><text:a xlink:type="simple" xlink:href="#22.31.HYST_1|outline">HYST_1</text:a><text:tab/>358</text:p>
          <text:p text:style-name="P230"><text:tab/>22.32 <text:s/><text:tab/><text:a xlink:type="simple" xlink:href="#22.32.HYST_2|outline">HYST_2</text:a><text:tab/>359</text:p>
          <text:p text:style-name="P230"><text:tab/>22.33 <text:s/><text:tab/><text:a xlink:type="simple" xlink:href="#22.33.HYST_3|outline">HYST_3</text:a><text:tab/>360</text:p>
          <text:p text:style-name="P229"><text:tab/>23 <text:s/><text:tab/><text:a xlink:type="simple" xlink:href="#23.Stellglieder|outline">Stellglieder</text:a><text:tab/>362</text:p>
          <text:p text:style-name="P230"><text:tab/>23.1 <text:s/><text:tab/><text:a xlink:type="simple" xlink:href="#23.1.ACTUATOR_2P|outline">ACTUATOR_2P</text:a><text:tab/>362</text:p>
          <text:p text:style-name="P230"><text:tab/>23.2 <text:s/><text:tab/><text:a xlink:type="simple" xlink:href="#23.2.ACTUATOR_3P|outline">ACTUATOR_3P</text:a><text:tab/>363</text:p>
          <text:p text:style-name="P230"><text:tab/>23.3 <text:s/><text:tab/><text:a xlink:type="simple" xlink:href="#23.3.ACTUATOR_COIL|outline">ACTUATOR_COIL</text:a><text:tab/>365</text:p>
          <text:p text:style-name="P230"><text:soft-page-break/><text:tab/>23.4 <text:s/><text:tab/><text:a xlink:type="simple" xlink:href="#23.4.ACTUATOR_PUMP|outline">ACTUATOR_PUMP</text:a><text:tab/>366</text:p>
          <text:p text:style-name="P230"><text:tab/>23.5 <text:s/><text:tab/><text:a xlink:type="simple" xlink:href="#23.5.ACTUATOR_UD|outline">ACTUATOR_UD</text:a><text:tab/>367</text:p>
          <text:p text:style-name="P229"><text:tab/>24 <text:s/><text:tab/><text:a xlink:type="simple" xlink:href="#24.Heizung Lüftung und Klima|outline">Heizung Lüftung und Klima</text:a><text:tab/>369</text:p>
          <text:p text:style-name="P230"><text:tab/>24.1 <text:s/><text:tab/><text:a xlink:type="simple" xlink:href="#24.1.AIR_DENSITY|outline">AIR_DENSITY</text:a><text:tab/>369</text:p>
          <text:p text:style-name="P230"><text:tab/>24.2 <text:s/><text:tab/><text:a xlink:type="simple" xlink:href="#24.2.AIR_ENTHALPY|outline">AIR_ENTHALPY</text:a><text:tab/>369</text:p>
          <text:p text:style-name="P230"><text:tab/>24.3 <text:s/><text:tab/><text:a xlink:type="simple" xlink:href="#24.3.BOILER|outline">BOILER</text:a><text:tab/>370</text:p>
          <text:p text:style-name="P230"><text:tab/>24.4 <text:s/><text:tab/><text:a xlink:type="simple" xlink:href="#24.4.BURNER|outline">BURNER</text:a><text:tab/>372</text:p>
          <text:p text:style-name="P230"><text:tab/>24.5 <text:s/><text:tab/><text:a xlink:type="simple" xlink:href="#24.5.DEW_CON|outline">DEW_CON</text:a><text:tab/>376</text:p>
          <text:p text:style-name="P230"><text:tab/>24.6 <text:s/><text:tab/><text:a xlink:type="simple" xlink:href="#24.6.DEW_RH|outline">DEW_RH</text:a><text:tab/>376</text:p>
          <text:p text:style-name="P230"><text:tab/>24.7 <text:s/><text:tab/><text:a xlink:type="simple" xlink:href="#24.7.DEW_TEMP|outline">DEW_TEMP</text:a><text:tab/>377</text:p>
          <text:p text:style-name="P230"><text:tab/>24.8 <text:s/><text:tab/><text:a xlink:type="simple" xlink:href="#24.8.HEAT_INDEX|outline">HEAT_INDEX</text:a><text:tab/>378</text:p>
          <text:p text:style-name="P230"><text:tab/>24.9 <text:s/><text:tab/><text:a xlink:type="simple" xlink:href="#24.9.HEAT_METER|outline">HEAT_METER</text:a><text:tab/>378</text:p>
          <text:p text:style-name="P230"><text:tab/>24.10 <text:s/><text:tab/><text:a xlink:type="simple" xlink:href="#24.10.HEAT_TEMP|outline">HEAT_TEMP</text:a><text:tab/>380</text:p>
          <text:p text:style-name="P230"><text:tab/>24.11 <text:s/><text:tab/><text:a xlink:type="simple" xlink:href="#24.11.LEGIONELLA|outline">LEGIONELLA</text:a><text:tab/>382</text:p>
          <text:p text:style-name="P230"><text:tab/>24.12 <text:s/><text:tab/><text:a xlink:type="simple" xlink:href="#24.12.SDD|outline">SDD</text:a><text:tab/>385</text:p>
          <text:p text:style-name="P230"><text:tab/>24.13 <text:s/><text:tab/><text:a xlink:type="simple" xlink:href="#24.13.TEMP_EXT|outline">TEMP_EXT</text:a><text:tab/>385</text:p>
          <text:p text:style-name="P230"><text:tab/>24.14 <text:s/><text:tab/><text:a xlink:type="simple" xlink:href="#24.14.WATER_CP|outline">WATER_CP</text:a><text:tab/>387</text:p>
          <text:p text:style-name="P230"><text:tab/>24.15 <text:s/><text:tab/><text:a xlink:type="simple" xlink:href="#24.15.WATER_DENSITY|outline">WATER_DENSITY</text:a><text:tab/>387</text:p>
          <text:p text:style-name="P230"><text:tab/>24.16 <text:s/><text:tab/><text:a xlink:type="simple" xlink:href="#24.16.WATER_ENTHALPY|outline">WATER_ENTHALPY</text:a><text:tab/>388</text:p>
          <text:p text:style-name="P230"><text:tab/>24.17 <text:s/><text:tab/><text:a xlink:type="simple" xlink:href="#24.17.WCT|outline">WCT</text:a><text:tab/>389</text:p>
          <text:p text:style-name="P229"><text:tab/>25 <text:s/><text:tab/><text:a xlink:type="simple" xlink:href="#25.Elektrotechnik|outline">Elektrotechnik</text:a><text:tab/>390</text:p>
          <text:p text:style-name="P230"><text:tab/>25.1 <text:s/><text:tab/><text:a xlink:type="simple" xlink:href="#25.1.CLICK|outline">CLICK</text:a><text:tab/>390</text:p>
          <text:p text:style-name="P230"><text:tab/>25.2 <text:s/><text:tab/><text:a xlink:type="simple" xlink:href="#25.2.DEBOUNCE|outline">DEBOUNCE</text:a><text:tab/>392</text:p>
          <text:p text:style-name="P230"><text:tab/>25.3 <text:s/><text:tab/><text:a xlink:type="simple" xlink:href="#25.3.DIMM_I|outline">DIMM_I</text:a><text:tab/>392</text:p>
          <text:p text:style-name="P230"><text:tab/>25.4 <text:s/><text:tab/><text:a xlink:type="simple" xlink:href="#25.4.F_LAMP|outline">F_LAMP</text:a><text:tab/>393</text:p>
          <text:p text:style-name="P230"><text:tab/>25.5 <text:s/><text:tab/><text:a xlink:type="simple" xlink:href="#25.5.PULSE_LENGTH|outline">PULSE_LENGTH</text:a><text:tab/>395</text:p>
          <text:p text:style-name="P230"><text:tab/>25.6 <text:s/><text:tab/><text:a xlink:type="simple" xlink:href="#25.6.PULSE_T|outline">PULSE_T</text:a><text:tab/>395</text:p>
          <text:p text:style-name="P230"><text:tab/>25.7 <text:s/><text:tab/><text:a xlink:type="simple" xlink:href="#25.7.SWITCH_I|outline">SWITCH_I</text:a><text:tab/>396</text:p>
          <text:p text:style-name="P230"><text:tab/>25.8 <text:s/><text:tab/><text:a xlink:type="simple" xlink:href="#25.8.SWITCH_X|outline">SWITCH_X</text:a><text:tab/>397</text:p>
          <text:p text:style-name="P230"><text:tab/>25.9 <text:s/><text:tab/><text:a xlink:type="simple" xlink:href="#25.9.TIMER_1|outline">TIMER_1</text:a><text:tab/>398</text:p>
          <text:p text:style-name="P230"><text:tab/>25.10 <text:s/><text:tab/><text:a xlink:type="simple" xlink:href="#25.10.TIMER_2|outline">TIMER_2</text:a><text:tab/>398</text:p>
          <text:p text:style-name="P230"><text:tab/>25.11 <text:s/><text:tab/><text:a xlink:type="simple" xlink:href="#25.11.TIMER_EVENT_DECODE|outline">TIMER_EVENT_DECODE</text:a><text:tab/>400</text:p>
          <text:p text:style-name="P230"><text:tab/>25.12 <text:s/><text:tab/><text:a xlink:type="simple" xlink:href="#25.12.TIMER_EXT|outline">TIMER_EXT</text:a><text:tab/>401</text:p>
          <text:p text:style-name="P230"><text:tab/>25.13 <text:s/><text:tab/><text:a xlink:type="simple" xlink:href="#25.13.TIMER_P4|outline">TIMER_P4</text:a><text:tab/>403</text:p>
          <text:p text:style-name="P229"><text:tab/>26 <text:s/><text:tab/><text:a xlink:type="simple" xlink:href="#26.Jalousiesteuerung|outline">Jalousiesteuerung</text:a><text:tab/>410</text:p>
          <text:p text:style-name="P230"><text:tab/>26.1 <text:s/><text:tab/><text:a xlink:type="simple" xlink:href="#26.1.Einleitung|outline">Einleitung</text:a><text:tab/>410</text:p>
          <text:p text:style-name="P230"><text:tab/>26.2 <text:s/><text:tab/><text:a xlink:type="simple" xlink:href="#26.2.BLIND_ACTUATOR|outline">BLIND_ACTUATOR</text:a><text:tab/>411</text:p>
          <text:p text:style-name="P230"><text:tab/>26.3 <text:s/><text:tab/><text:a xlink:type="simple" xlink:href="#26.3.BLIND_CONTROL|outline">BLIND_CONTROL</text:a><text:tab/>413</text:p>
          <text:p text:style-name="P230"><text:tab/>26.4 <text:s/><text:tab/><text:a xlink:type="simple" xlink:href="#26.4.BLIND_INPUT|outline">BLIND_INPUT</text:a><text:tab/>415</text:p>
          <text:p text:style-name="P230"><text:tab/>26.5 <text:s/><text:tab/><text:a xlink:type="simple" xlink:href="#26.5.BLIND_NIGHT|outline">BLIND_NIGHT</text:a><text:tab/>419</text:p>
          <text:p text:style-name="P230"><text:soft-page-break/><text:tab/>26.6 <text:s/><text:tab/><text:a xlink:type="simple" xlink:href="#26.6.BLIND_SCENE|outline">BLIND_SCENE</text:a><text:tab/>421</text:p>
          <text:p text:style-name="P230"><text:tab/>26.7 <text:s/><text:tab/><text:a xlink:type="simple" xlink:href="#26.7.BLIND_SECURITY|outline">BLIND_SECURITY</text:a><text:tab/>423</text:p>
          <text:p text:style-name="P230"><text:tab/>26.8 <text:s/><text:tab/><text:a xlink:type="simple" xlink:href="#26.8.BLIND_SHADE|outline">BLIND_SHADE</text:a><text:tab/>425</text:p>
          <text:p text:style-name="P229"><text:tab/>27 <text:s/><text:tab/><text:a xlink:type="simple" xlink:href="#27.Automation|outline">Automation</text:a><text:tab/>429</text:p>
          <text:p text:style-name="P230"><text:tab/>27.1 <text:s/><text:tab/><text:a xlink:type="simple" xlink:href="#27.1.DRIVER_1|outline">DRIVER_1</text:a><text:tab/>429</text:p>
          <text:p text:style-name="P230"><text:tab/>27.2 <text:s/><text:tab/><text:a xlink:type="simple" xlink:href="#27.2.DRIVER_4|outline">DRIVER_4</text:a><text:tab/>430</text:p>
          <text:p text:style-name="P230"><text:tab/>27.3 <text:s/><text:tab/><text:a xlink:type="simple" xlink:href="#27.3.FLOW_CONTROL|outline">FLOW_CONTROL</text:a><text:tab/>430</text:p>
          <text:p text:style-name="P230"><text:tab/>27.4 <text:s/><text:tab/><text:a xlink:type="simple" xlink:href="#27.4.FT_PROFILE|outline">FT_PROFILE</text:a><text:tab/>432</text:p>
          <text:p text:style-name="P230"><text:tab/>27.5 <text:s/><text:tab/><text:a xlink:type="simple" xlink:href="#27.5.INC_DEC|outline">INC_DEC</text:a><text:tab/>434</text:p>
          <text:p text:style-name="P230"><text:tab/>27.6 <text:s/><text:tab/><text:a xlink:type="simple" xlink:href="#27.6.INTERLOCK|outline">INTERLOCK</text:a><text:tab/>436</text:p>
          <text:p text:style-name="P230"><text:tab/>27.7 <text:s/><text:tab/><text:a xlink:type="simple" xlink:href="#27.7.MANUAL_1|outline">MANUAL_1</text:a><text:tab/>437</text:p>
          <text:p text:style-name="P230"><text:tab/>27.8 <text:s/><text:tab/><text:a xlink:type="simple" xlink:href="#27.8.MANUAL_2|outline">MANUAL_2</text:a><text:tab/>437</text:p>
          <text:p text:style-name="P230"><text:tab/>27.9 <text:s/><text:tab/><text:a xlink:type="simple" xlink:href="#27.9.MANUAL_4|outline">MANUAL_4</text:a><text:tab/>439</text:p>
          <text:p text:style-name="P230"><text:tab/>27.10 <text:s/><text:tab/><text:a xlink:type="simple" xlink:href="#27.10.PARSET|outline">PARSET</text:a><text:tab/>440</text:p>
          <text:p text:style-name="P230"><text:tab/>27.11 <text:s/><text:tab/><text:a xlink:type="simple" xlink:href="#27.11.PARSET2|outline">PARSET2</text:a><text:tab/>441</text:p>
          <text:p text:style-name="P230"><text:tab/>27.12 <text:s/><text:tab/><text:a xlink:type="simple" xlink:href="#27.12.SIGNAL|outline">SIGNAL</text:a><text:tab/>442</text:p>
          <text:p text:style-name="P230"><text:tab/>27.13 <text:s/><text:tab/><text:a xlink:type="simple" xlink:href="#27.13.SIGNAL_4|outline">SIGNAL_4</text:a><text:tab/>443</text:p>
          <text:p text:style-name="P230"><text:tab/>27.14 <text:s/><text:tab/><text:a xlink:type="simple" xlink:href="#27.14.SRAMP|outline">SRAMP</text:a><text:tab/>444</text:p>
          <text:p text:style-name="P230"><text:tab/>27.15 <text:s/><text:tab/><text:a xlink:type="simple" xlink:href="#27.15.TANK_LEVEL|outline">TANK_LEVEL</text:a><text:tab/>445</text:p>
          <text:p text:style-name="P230"><text:tab/>27.16 <text:s/><text:tab/><text:a xlink:type="simple" xlink:href="#27.16.TUNE|outline">TUNE</text:a><text:tab/>446</text:p>
          <text:p text:style-name="P230"><text:tab/>27.17 <text:s/><text:tab/><text:a xlink:type="simple" xlink:href="#27.17.TUNE2|outline">TUNE2</text:a><text:tab/>447</text:p>
          <text:p text:style-name="P229"><text:tab/>28 <text:s/><text:tab/><text:a xlink:type="simple" xlink:href="#28.Geräte Treiber|outline">Geräte Treiber</text:a><text:tab/>449</text:p>
          <text:p text:style-name="P230"><text:tab/>28.1 <text:s/><text:tab/><text:a xlink:type="simple" xlink:href="#28.1.IRTRANS|outline">IRTRANS</text:a><text:tab/>449</text:p>
          <text:p text:style-name="P230"><text:tab/>28.1.1 <text:s/><text:tab/><text:a xlink:type="simple" xlink:href="#28.1.1.IRTRANS_1|outline">IRTRANS_1</text:a><text:tab/>449</text:p>
          <text:p text:style-name="P230"><text:tab/>28.1.2 <text:s/><text:tab/><text:a xlink:type="simple" xlink:href="#28.1.2.IRTRANS_4|outline">IRTRANS_4</text:a><text:tab/>451</text:p>
          <text:p text:style-name="P230"><text:tab/>28.1.3 <text:s/><text:tab/><text:a xlink:type="simple" xlink:href="#28.1.3.IRTRANS_8|outline">IRTRANS_8</text:a><text:tab/>451</text:p>
          <text:p text:style-name="P230"><text:tab/>28.1.4 <text:s/><text:tab/><text:a xlink:type="simple" xlink:href="#28.1.4.IRTRANS_DECODE|outline">IRTRANS_DECODE</text:a><text:tab/>452</text:p>
          <text:p text:style-name="P229"><text:tab/>29 <text:s/><text:tab/><text:a xlink:type="simple" xlink:href="#29.Netzwerk und Kommunikation|outline">Netzwerk und Kommunikation</text:a><text:tab/>455</text:p>
          <text:p text:style-name="P230"><text:tab/>29.1 <text:s/><text:tab/><text:a xlink:type="simple" xlink:href="#29.1.HTML_DECODE|outline">HTML_DECODE</text:a><text:tab/>455</text:p>
          <text:p text:style-name="P230"><text:tab/>29.2 <text:s/><text:tab/><text:a xlink:type="simple" xlink:href="#29.2.HTML_ENCODE|outline">HTML_ENCODE</text:a><text:tab/>456</text:p>
          <text:p text:style-name="P230"><text:tab/>29.3 <text:s/><text:tab/><text:a xlink:type="simple" xlink:href="#29.3.IP4_CHECK|outline">IP4_CHECK</text:a><text:tab/>456</text:p>
          <text:p text:style-name="P230"><text:tab/>29.4 <text:s/><text:tab/><text:a xlink:type="simple" xlink:href="#29.4.IP4_DECODE|outline">IP4_DECODE</text:a><text:tab/>457</text:p>
          <text:p text:style-name="P230"><text:tab/>29.5 <text:s/><text:tab/><text:a xlink:type="simple" xlink:href="#29.5.IP4_TO_STRING|outline">IP4_TO_STRING</text:a><text:tab/>458</text:p>
          <text:p text:style-name="P230"><text:tab/>29.6 <text:s/><text:tab/><text:a xlink:type="simple" xlink:href="#29.6.IS_IP4|outline">IS_IP4</text:a><text:tab/>458</text:p>
          <text:p text:style-name="P230"><text:tab/>29.7 <text:s/><text:tab/><text:a xlink:type="simple" xlink:href="#29.7.IS_URLCHR|outline">IS_URLCHR</text:a><text:tab/>459</text:p>
          <text:p text:style-name="P230"><text:tab/>29.8 <text:s/><text:tab/><text:a xlink:type="simple" xlink:href="#29.8.STRING_TO_URL|outline">STRING_TO_URL</text:a><text:tab/>459</text:p>
          <text:p text:style-name="P230"><text:tab/>29.9 <text:s/><text:tab/><text:a xlink:type="simple" xlink:href="#29.9.URL_DECODE|outline">URL_DECODE</text:a><text:tab/>460</text:p>
          <text:p text:style-name="P230"><text:tab/>29.10 <text:s/><text:tab/><text:a xlink:type="simple" xlink:href="#29.10.URL_ENCODE|outline">URL_ENCODE</text:a><text:tab/>460</text:p>
          <text:p text:style-name="P230"><text:tab/>29.11 <text:s/><text:tab/><text:a xlink:type="simple" xlink:href="#29.11.URL_TO_STRING|outline">URL_TO_STRING</text:a><text:tab/>461</text:p>
          <text:p text:style-name="P229"><text:soft-page-break/><text:tab/>30 <text:s/><text:tab/><text:a xlink:type="simple" xlink:href="#30.BUFFER Management|outline">BUFFER Management</text:a><text:tab/>462</text:p>
          <text:p text:style-name="P230"><text:tab/>30.1 <text:s/><text:tab/><text:a xlink:type="simple" xlink:href="#30.1._BUFFER_CLEAR|outline">_BUFFER_CLEAR</text:a><text:tab/>462</text:p>
          <text:p text:style-name="P230"><text:tab/>30.2 <text:s/><text:tab/><text:a xlink:type="simple" xlink:href="#30.2._BUFFER_INIT|outline">_BUFFER_INIT</text:a><text:tab/>463</text:p>
          <text:p text:style-name="P230"><text:tab/>30.3 <text:s/><text:tab/><text:a xlink:type="simple" xlink:href="#30.3._BUFFER_INSERT|outline">_BUFFER_INSERT</text:a><text:tab/>463</text:p>
          <text:p text:style-name="P230"><text:tab/>30.4 <text:s/><text:tab/><text:a xlink:type="simple" xlink:href="#30.4.STRING_TO_BUFFER|outline">STRING_TO_BUFFER</text:a><text:tab/>464</text:p>
          <text:p text:style-name="P230"><text:tab/>30.5 <text:s/><text:tab/><text:a xlink:type="simple" xlink:href="#30.5.BUFFER_SEARCH|outline">BUFFER_SEARCH</text:a><text:tab/>465</text:p>
          <text:p text:style-name="P230"><text:tab/>30.6 <text:s/><text:tab/><text:a xlink:type="simple" xlink:href="#30.6.BUFFER_TO_STRING|outline">BUFFER_TO_STRING</text:a><text:tab/>466</text:p>
          <text:p text:style-name="P229"><text:tab/>31 <text:s/><text:tab/><text:a xlink:type="simple" xlink:href="#31.Listen Verarbeitung|outline">Listen Verarbeitung</text:a><text:tab/>467</text:p>
          <text:p text:style-name="P230"><text:tab/>31.1 <text:s/><text:tab/><text:a xlink:type="simple" xlink:href="#31.1.Einleitung|outline">Einleitung</text:a><text:tab/>467</text:p>
          <text:p text:style-name="P230"><text:tab/>31.2 <text:s/><text:tab/><text:a xlink:type="simple" xlink:href="#31.2.LIST_CLEAN|outline">LIST_CLEAN</text:a><text:tab/>467</text:p>
          <text:p text:style-name="P230"><text:tab/>31.3 <text:s/><text:tab/><text:a xlink:type="simple" xlink:href="#31.3.LIST_GET|outline">LIST_GET</text:a><text:tab/>468</text:p>
          <text:p text:style-name="P230"><text:tab/>31.4 <text:s/><text:tab/><text:a xlink:type="simple" xlink:href="#31.4.LIST_INSERT|outline">LIST_INSERT</text:a><text:tab/>469</text:p>
          <text:p text:style-name="P230"><text:tab/>31.5 <text:s/><text:tab/><text:a xlink:type="simple" xlink:href="#31.5.LIST_LEN|outline">LIST_LEN</text:a><text:tab/>469</text:p>
          <text:p text:style-name="P230"><text:tab/>31.6 <text:s/><text:tab/><text:a xlink:type="simple" xlink:href="#31.6.LIST_NEXT|outline">LIST_NEXT</text:a><text:tab/>470</text:p>
          <text:p text:style-name="P230"><text:tab/>31.7 <text:s/><text:tab/><text:a xlink:type="simple" xlink:href="#31.7.LIST_RETRIEVE|outline">LIST_RETRIEVE</text:a><text:tab/>471</text:p>
        </text:index-body>
      </text:table-of-content>
      <text:p text:style-name="P201"/>
      <text:list xml:id="list33338327" text:style-name="L1">
        <text:list-item>
          <text:h text:style-name="P210" text:outline-level="1">Rechtsgrundlagen</text:h>
        </text:list-item>
      </text:list>
      <text:p text:style-name="P17"/>
      <text:list xml:id="list33638360" text:continue-numbering="true" text:style-name="L1">
        <text:list-item>
          <text:list>
            <text:list-item>
              <text:h text:style-name="P217" text:outline-level="2">Haftungsausschluss</text:h>
            </text:list-item>
          </text:list>
        </text:list-item>
      </text:list>
      <text:p text:style-name="P33">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xml:id="list33632985" text:continue-numbering="true" text:style-name="L1">
        <text:list-item>
          <text:list>
            <text:list-item>
              <text:h text:style-name="P217" text:outline-level="2">Lizenzbedingungen</text:h>
            </text:list-item>
          </text:list>
        </text:list-item>
      </text:list>
      <text:p text:style-name="P33">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xml:id="list33649532" text:continue-numbering="true" text:style-name="L1">
        <text:list-item>
          <text:list>
            <text:list-item>
              <text:h text:style-name="P217" text:outline-level="2">Eingetragene<text:span text:style-name="T1"> Markenzeichen</text:span></text:h>
            </text:list-item>
          </text:list>
        </text:list-item>
      </text:list>
      <text:p text:style-name="P33">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xml:id="list33634846" text:continue-numbering="true" text:style-name="L1">
        <text:list-item>
          <text:list>
            <text:list-item>
              <text:h text:style-name="P217" text:outline-level="2"><text:span text:style-name="T1">Bestimmungsgemäßer </text:span>Gebrauch</text:h>
            </text:list-item>
          </text:list>
        </text:list-item>
      </text:list>
      <text:p text:style-name="P33">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xml:id="list33645666" text:continue-numbering="true" text:style-name="L1">
        <text:list-item>
          <text:list>
            <text:list-item>
              <text:h text:style-name="P217" text:outline-level="2">Sonstiges</text:h>
            </text:list-item>
          </text:list>
        </text:list-item>
      </text:list>
      <text:p text:style-name="P33">Alle Rechtsverbindlichen Regelungen befinden sich ausschließlich im Kapitel 1 dieses Handbuchs. Eine Ableitung oder Bezug von rechtlichen Ansprüchen aufgrund des Inhalts dieses Manuals außer den Bestimmungen in Kapitel 1 ist gänzlich ausgeschlossen.</text:p>
      <text:list xml:id="list33645580" text:continue-numbering="true" text:style-name="L1">
        <text:list-item>
          <text:h text:style-name="P210" text:outline-level="1">Einleitung</text:h>
        </text:list-item>
      </text:list>
      <text:p text:style-name="P20"/>
      <text:list xml:id="list33636066" text:continue-numbering="true" text:style-name="L1">
        <text:list-item>
          <text:list>
            <text:list-item>
              <text:h text:style-name="P217" text:outline-level="2">Ziele</text:h>
            </text:list-item>
          </text:list>
        </text:list-item>
      </text:list>
      <text:p text:style-name="P22">OSCAT steht für "<text:span text:style-name="T28">Open Source Community for Automation Technology".</text:span></text:p>
      <text:p text:style-name="P22">OSCAT erstellt eine <text:span text:style-name="T16">Open</text:span> <text:span text:style-name="T16">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xml:id="list33338513" text:style-name="L2">
        <text:list-item>
          <text:p text:style-name="P241">Die Bibliotheken der Hersteller sind praktisch alle geschützt und der <text:span text:style-name="T16">Source</text:span> Code ist nicht frei zugänglich, was im Fehlerfall eine Fehlersuche und auch die Behebung des Fehlers enorm schwierig, oft sogar unmöglich macht.</text:p>
        </text:list-item>
        <text:list-item>
          <text:p text:style-name="P241">Die grafische Erstellung von Programmen kann mit herstellerspezifischen Bibliotheken schnell unübersichtlich, ineffizient und fehleranfällig werden, weil vorhandene Funktionen wegen des fehlenden <text:span text:style-name="T16">Source C</text:span>odes den eigentlichen Bedürfnissen <text:span text:style-name="T1">nicht</text:span> angepasst und erweitert werden können.</text:p>
        </text:list-item>
        <text:list-item>
          <text:p text:style-name="P241">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41">Das Verständnis komplexer Module ist ohne einen Einblick in den Sourcecode oft sehr schwierig. Dadurch werden Programme ineffizient und fehleranfällig.</text:p>
          <text:p text:style-name="P246"><text:span text:style-name="T1">OSCAT will </text:span><text:span text:style-name="T24">mit</text:span><text:span text:style-name="T7"> </text:span><text:span text:style-name="T24">der</text:span><text:span text:style-name="T7"> </text:span><text:span text:style-name="T24">quelloffenen</text:span><text:span text:style-name="T7"> OSCAT </text:span><text:span text:style-name="T24">Bibliothek</text:span><text:span text:style-name="T1"> einen mächtigen und umfassenden Standard für die Programmierung von SPS schaffen, der im </text:span><text:span text:style-name="T7">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ext:span><text:soft-page-break/><text:span text:style-name="T1">tät zu verifizie</text:span><text:span text:style-name="T1">ren. An dieser Stelle sei </text:span><text:span text:style-name="T1">noch einmal auf die Lizenzbedingungen und den Haftungsausschluss in dieser Dokumentation hingewiesen.</text:span></text:p>
        </text:list-item>
      </text:list>
      <text:list xml:id="list33644879" text:continue-list="list33636066" text:style-name="L1">
        <text:list-item>
          <text:list>
            <text:list-item>
              <text:h text:style-name="P217" text:outline-level="2">Konventionen</text:h>
            </text:list-item>
          </text:list>
        </text:list-item>
      </text:list>
      <text:list xml:id="list33344629" text:style-name="L3">
        <text:list-item>
          <text:p text:style-name="P243">Direkte Manipulationen im Speicher:<text:line-break/>Funktionen, die Eingangswerte über <text:span text:style-name="T16">Pointer</text:span> verändern, <text:span text:style-name="T1">wie zum Beispiel _Array_</text:span><text:span text:style-name="T7">Sort,</text:span> beginnen alle mit einem Unterstrich „_“<text:span text:style-name="T16">.</text:span> _Array_<text:span text:style-name="T16">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43">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243">Logische Gleichungen:<text:line-break/>Innerhalb dieses Handbuchs werden die logischen Verknüpfungen &amp; für UND bzw. AND, + für ODER bzw. OR, /A für ein negiertes A und # für XOR (exklusives ODER) verwendet.</text:p>
        </text:list-item>
        <text:list-item>
          <text:p text:style-name="P243"><draw:frame draw:style-name="fr3" draw:name="Grafik340" text:anchor-type="paragraph" svg:x="8.278cm" svg:y="0.277cm" svg:width="8.68cm" svg:height="7.879cm" draw:z-index="323"><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text:soft-page-break/>beitung 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47"><text:span text:style-name="T16">Error- </text:span>und Status-<text:span text:style-name="T16">Reporting</text:span> (ESR):</text:p>
          <text:p text:style-name="P248">Komplexere Bausteine erhalten zum großen Teil einen <text:span text:style-name="T16">Error-</text:span> oder Status-Ausgang. Ein <text:span text:style-name="T16">Error-</text:span>Ausgang ist 0, falls kein Fehler bei der Ausführung auftritt. Tritt jedoch im Baustein ein Fehler auf, so nimmt dieser Ausgang einen Wert im Bereich 1 .. 99 an und meldet somit einen Fehler mit Fehlernummer. Ein Status- oder <text:span text:style-name="T16">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7">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7">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xml:id="list33644522" text:continue-list="list33644879" text:style-name="L1">
        <text:list-item>
          <text:list>
            <text:list-item>
              <text:h text:style-name="P217" text:outline-level="2">Testumgebung</text:h>
            </text:list-item>
          </text:list>
        </text:list-item>
      </text:list>
      <text:p text:style-name="P22">Die <text:span text:style-name="T1">OSCAT Bibliothek</text:span> wird unter CoDeSys entwickelt und auf verschiedenen Systemen getestet.</text:p>
      <text:p text:style-name="P22">Die Testumgebung umfasst folgende Systeme:</text:p>
      <text:list xml:id="list33349388" text:style-name="L4">
        <text:list-item text:start-value="1">
          <text:p text:style-name="P244">Beckhoff BX 9000<text:line-break/>mit TwinCAT PLC <text:span text:style-name="T16">Control</text:span> Version 2.10.0</text:p>
        </text:list-item>
        <text:list-item>
          <text:p text:style-name="P244">Beckhoff CX 9001-1001<text:line-break/>mit TwinCAT PLC <text:span text:style-name="T16">Control</text:span> Version 2.10.0</text:p>
        </text:list-item>
        <text:list-item>
          <text:p text:style-name="P244">Wago 750-841 <text:line-break/>mit Wago CoDeSys Version 2.3.8.1</text:p>
        </text:list-item>
        <text:list-item>
          <text:p text:style-name="P231"><text:soft-page-break/>Möller EC4P222<text:line-break/>mit CoDeSys Version 2.3.9.5</text:p>
        </text:list-item>
        <text:list-item>
          <text:p text:style-name="P242">CoDeSys Simulation auf I386 mit CoDeSys 2.3.9.9</text:p>
        </text:list-item>
        <text:list-item>
          <text:p text:style-name="P233">CoDeSys Simulation auf i386 mit Codesys 3.2 mit SP WIN V3</text:p>
        </text:list-item>
        <text:list-item>
          <text:p text:style-name="P233">S7 und STEP7: Die OSCAT Bibliothek wird seit Version 1.5 auf STEP7 übersetzt und auch verifiziert.</text:p>
        </text:list-item>
        <text:list-item>
          <text:p text:style-name="P239">PCWORX / MULTIPROG: Die OSCAT Bibliothek wird seit Version 2.6 auf MULTIPROG übersetzt und verifiziert.</text:p>
        </text:list-item>
      </text:list>
      <text:p text:style-name="P22">Wir sind stetig darum bemüht die OSCAT Bibliothek auch auf weiteren Testumgebungen zu testen.</text:p>
      <text:list xml:id="list33650288" text:continue-list="list33644522" text:style-name="L1">
        <text:list-item>
          <text:list>
            <text:list-item>
              <text:h text:style-name="P218" text:outline-level="2">Globale Konstanten</text:h>
            </text:list-item>
          </text:list>
        </text:list-item>
      </text:list>
      <text:p text:style-name="P170">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22">Mathematische Konstanten:</text:p>
      <text:p text:style-name="P22"><text:alphabetical-index-mark-start text:id="IMark112348168"/><text:span text:style-name="T42">PI1</text:span><text:alphabetical-index-mark-end text:id="IMark112348168"/> : REAL (Kreiszahl <text:span text:style-name="T31"> 3.1415...)</text:span></text:p>
      <text:p text:style-name="P23"><text:alphabetical-index-mark-start text:id="IMark112348168"/><text:span text:style-name="T42">PI2</text:span><text:alphabetical-index-mark-end text:id="IMark112348168"/> : REAL (Kreiszahl PI * 2 = 6.283185...)</text:p>
      <text:p text:style-name="P23"><text:alphabetical-index-mark-start text:id="IMark112348168"/><text:span text:style-name="T42">PI05</text:span><text:alphabetical-index-mark-end text:id="IMark112348168"/> : REAL (Kreiszahl PI / 2 = 1.5707963267949...)</text:p>
      <text:p text:style-name="P23"><text:alphabetical-index-mark-start text:id="IMark112348168"/><text:span text:style-name="T42">E1</text:span><text:alphabetical-index-mark-end text:id="IMark112348168"/> : REAL (Eulersche Zahl 2.71828...)</text:p>
      <text:p text:style-name="P53"/>
      <text:p text:style-name="P23">Physikalische Konstanten:</text:p>
      <text:p text:style-name="P23"><text:alphabetical-index-mark-start text:id="IMark112348168"/><text:span text:style-name="T42">C0</text:span><text:alphabetical-index-mark-end text:id="IMark112348168"/><text:span text:style-name="T42"> </text:span>: REAL (Lichtgeschwindigkeit 299792458<text:span text:style-name="T32"> m/s)</text:span></text:p>
      <text:p text:style-name="P23"><text:alphabetical-index-mark-start text:id="IMark112348168"/><text:span text:style-name="T42">EL</text:span><text:alphabetical-index-mark-end text:id="IMark112348168"/> : REAL (Elementarladung in Coulomb = A * s )</text:p>
      <text:p text:style-name="P23"><text:alphabetical-index-mark-start text:id="IMark112348168"/><text:span text:style-name="T42">GN</text:span><text:alphabetical-index-mark-end text:id="IMark112348168"/> : REAL (Erdbeschleunigung 9.80665 m / s² )</text:p>
      <text:p text:style-name="P23"><text:alphabetical-index-mark-start text:id="IMark112348168"/><text:span text:style-name="T42">TK</text:span><text:alphabetical-index-mark-end text:id="IMark112348168"/> : REAL (absoluter Nullpunkt -273.15 °C )</text:p>
      <text:p text:style-name="P23"><text:alphabetical-index-mark-start text:id="IMark112348168"/><text:alphabetical-index-mark-start text:id="IMark96860128"/><text:span text:style-name="T42">UG</text:span><text:alphabetical-index-mark-end text:id="IMark96860128"/><text:alphabetical-index-mark-end text:id="IMark112348168"/><text:span text:style-name="T42"> </text:span>: REAL (Universelle Gaskonstante = 8.314472 J/Mol/K)</text:p>
      <text:p text:style-name="P23"><text:alphabetical-index-mark-start text:id="IMark112348168"/><text:alphabetical-index-mark-start text:id="IMark96860128"/><text:span text:style-name="T42">PN</text:span><text:alphabetical-index-mark-end text:id="IMark96860128"/><text:alphabetical-index-mark-end text:id="IMark112348168"/><text:span text:style-name="T42"> </text:span>: REAL (Normaldruck = 101325 Pa)</text:p>
      <text:p text:style-name="P53"/>
      <text:p text:style-name="P52"><text:soft-page-break/>Setup Parameter:</text:p>
      <text:p text:style-name="P23"><text:alphabetical-index-mark-start text:id="IMark112348168"/><text:span text:style-name="T42">EXTENDED_ASCII</text:span><text:alphabetical-index-mark-end text:id="IMark112348168"/> : BOOL := TRUE.</text:p>
      <text:p text:style-name="P53">EXTENDED_ASCII ist per <text:span text:style-name="T16">Default</text:span> auf TRUE gesetzt und erlaubt es den <text:span text:style-name="T16">String</text:span> Funktionen einen erweiterten Zeichensatz zu berücksichtigen. Im Erweiterten Zeichensatz <text:s/>sind zum Beispiel Umlaute wie Ä,Ö,Ü zu finden. Wird EXTENDED_ASCII = FALSE gesetzt so ignorieren die <text:span text:style-name="T16">String</text:span> Funktionen den erweiterten Zeichensatz. EXTENDED_ASCII berücksichtigt den Zeichensatz nach ISO 8859-1 (Latin1).</text:p>
      <text:p text:style-name="P53">Als Beispiel die Funktion UPPERCASE():</text:p>
      <text:p text:style-name="P53">UPPERCASE('abcäöü') = 'ABCÄÖÜ' wenn EXTENDED_ASCII = TRUE </text:p>
      <text:p text:style-name="P53">UPPERCASE('abcäöü') = 'ABCäöü' wenn EXTENDED_ASCII = FALSE</text:p>
      <text:p text:style-name="P53"/>
      <text:p text:style-name="P23"><text:alphabetical-index-mark-start text:id="IMark112348168"/><text:span text:style-name="T42">STRING_LENGTH</text:span><text:alphabetical-index-mark-end text:id="IMark112348168"/> : INT := 80.</text:p>
      <text:p text:style-name="P53">STRING_LENGTH ist per <text:span text:style-name="T16">Default</text:span> 80,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 Werden längere STRINGS als 80 Zeichen zur Verarbeitung nötig kann diese Konstante auf Werte bis 255 erhöht werden. <text:s/></text:p>
      <text:p text:style-name="P53">NEUER_STRING : STRING(STRING_LENGTH).</text:p>
      <text:p text:style-name="P53">Durch diese Definition ist auch der neu definierte STRING automatisch auf die Länge von STRING_LENGTH definiert und kann wenn nötig global geändert werden.</text:p>
      <text:p text:style-name="P53"/>
      <text:p text:style-name="P23"><text:alphabetical-index-mark-start text:id="IMark112348168"/><text:span text:style-name="T42">CHAR_NAME_1</text:span><text:alphabetical-index-mark-end text:id="IMark112348168"/> : STRING(255).</text:p>
      <text:p text:style-name="P23"><text:alphabetical-index-mark-start text:id="IMark112348168"/><text:span text:style-name="T42">CHAR_NAME_2</text:span><text:alphabetical-index-mark-end text:id="IMark112348168"/> : STRING(255).</text:p>
      <text:p text:style-name="P23"><text:alphabetical-index-mark-start text:id="IMark112348168"/><text:span text:style-name="T42">CHAR_NAME_3</text:span><text:alphabetical-index-mark-end text:id="IMark112348168"/> : STRING(255).</text:p>
      <text:p text:style-name="P23"><text:alphabetical-index-mark-start text:id="IMark112348168"/><text:span text:style-name="T42">CHAR_NAME_4</text:span><text:alphabetical-index-mark-end text:id="IMark112348168"/> : STRING(255).</text:p>
      <text:p text:style-name="P70">CHARNMAME_1 .. 4 hinterlegen die HTML Zeichennamen und den zugehörigen Code.</text:p>
      <text:p text:style-name="P70"/>
      <text:p text:style-name="P23"><text:alphabetical-index-mark-start text:id="IMark112348168"/><text:span text:style-name="T42">NETWORK_BUFFER_SIZE</text:span><text:alphabetical-index-mark-end text:id="IMark112348168"/> : UINT := 4000.</text:p>
      <text:p text:style-name="P53">Mit Hilfe des Setup Parameters NETWORK_BUFFER_SIZE wird die Obergrenze der Datenstruktur NETWORK_BUFFER festgelegt. Die Vorgabewert kann bei Bedarf durch diese Konstante geändert werden. </text:p>
      <text:p text:style-name="P70"/>
      <text:p text:style-name="P70"/>
      <text:p text:style-name="P70"><text:soft-page-break/>Sprachdefinitionen:</text:p>
      <text:p text:style-name="P23"><text:alphabetical-index-mark-start text:id="IMark112348168"/><text:span text:style-name="T42">LANGUAGE_DEFAULT</text:span><text:alphabetical-index-mark-end text:id="IMark112348168"/> : INT := 1 (Englisch)</text:p>
      <text:p text:style-name="P53">Mithilfe des LANGUAGE_DEFAULT wird die Sprache gewählt die als Vorgabe im System Verwendung findet. Wird eine Sprachabhängige Funktion mit dem Parameter LANG = 0 aufgerufen so wird die unter LANGUAGE_DEFAULT definierte Sprache benutzt. Wird der Funktion jedoch ein LANG Wert &gt; 0 übergeben wird die damit spezifizierte Sprache benutzt.</text:p>
      <text:p text:style-name="P53">Wird der LANGUAGE_DEFAULT auf 2 gesetzt so wird anstatt Englisch Deutsch als <text:span text:style-name="T16">Default</text:span> Sprache verwendet.</text:p>
      <text:p text:style-name="P53">Die per <text:span text:style-name="T16">Default</text:span> im System definierten Sprachen sind:</text:p>
      <text:p text:style-name="P53"><text:tab/>1 = Englisch</text:p>
      <text:p text:style-name="P53"><text:tab/>2 = Deutsch</text:p>
      <text:p text:style-name="P53">weitere Sprachen können in diesem Abschnitt der Globalen Konstanten definiert werden.</text:p>
      <text:p text:style-name="P53"/>
      <text:p text:style-name="P23"><text:alphabetical-index-mark-start text:id="IMark112348168"/><text:span text:style-name="T42">LANGUAGE_MAX</text:span><text:alphabetical-index-mark-end text:id="IMark112348168"/> : INT := 2.</text:p>
      <text:p text:style-name="P53">Die Konstante LANGUAGE_MAX gibt an wie viele Sprachen im System definiert sind. Werden in diesem Abschnitt der Globalen Konstanten weitere Sprachen definiert, so muss dieser Wert entsprechend erhöht werden.</text:p>
      <text:p text:style-name="P53"/>
      <text:p text:style-name="P23"><text:alphabetical-index-mark-start text:id="IMark112348168"/><text:span text:style-name="T42">WEEKDAYS</text:span><text:alphabetical-index-mark-end text:id="IMark112348168"/> : ARRAY[1..7, 1..LANGUAGE_MAX] of STRING(10).</text:p>
      <text:p text:style-name="P53">Dieses mehrdimensionale Array definiert die Wochentage in verschiedenen Sprachen.</text:p>
      <text:p text:style-name="P53"/>
      <text:p text:style-name="P23"><text:alphabetical-index-mark-start text:id="IMark112348168"/><text:span text:style-name="T42">WEEKDAYS2</text:span><text:alphabetical-index-mark-end text:id="IMark112348168"/> : ARRAY[1..7, 1..LANGUAGE_MAX] of STRING(2).</text:p>
      <text:p text:style-name="P53">Dieses mehrdimensionale Array definiert die abgekürzten Wochentage in verschiedenen Sprachen.</text:p>
      <text:p text:style-name="P53"/>
      <text:p text:style-name="P23"><text:alphabetical-index-mark-start text:id="IMark112348168"/><text:span text:style-name="T42">MONTHS</text:span><text:alphabetical-index-mark-end text:id="IMark112348168"/> : ARRAY[1..12, 1..LANGUAGE_MAX] of STRING(10).</text:p>
      <text:p text:style-name="P53">Dieses mehrdimensionale Array definiert die Monate in verschiedenen Sprachen.</text:p>
      <text:p text:style-name="P53"/>
      <text:p text:style-name="P23"><text:alphabetical-index-mark-start text:id="IMark112348168"/><text:span text:style-name="T42">MONTHS3</text:span><text:alphabetical-index-mark-end text:id="IMark112348168"/> : ARRAY[1..12, 1..LANGUAGE_MAX] of STRING(3).</text:p>
      <text:p text:style-name="P53">Dieses mehrdimensionale Array definiert die abgekürzten Monate in verschiedenen Sprachen.</text:p>
      <text:p text:style-name="P53"/>
      <text:p text:style-name="P53"/>
      <text:p text:style-name="P53"/>
      <text:p text:style-name="P70"><text:soft-page-break/>Landesspezifische Voreinstellungen:</text:p>
      <text:p text:style-name="P23"><text:alphabetical-index-mark-start text:id="IMark112348168"/><text:span text:style-name="T42">COUNTRY_DEFAULT</text:span><text:alphabetical-index-mark-end text:id="IMark112348168"/> : INT := 1 (Deutsch)</text:p>
      <text:p text:style-name="P53">Mithilfe des COUNTRY_DEFAULT wird das Land gewählt das als Vorgabe im System Verwendung findet. Wird eine landesspezifische Funktion mit dem Parameter COUNTRY = 0 aufgerufen so wird das unter COUNTRY_DEFAULT definierte Land verwendet. Wird der Funktion jedoch ein COUNTRY Wert &gt; 0 übergeben wird das damit spezifizierte Land benutzt.</text:p>
      <text:p text:style-name="P53">Wird der COUNTRY_DEFAULT auf 2 gesetzt so wird anstatt Deutschland Österreich als <text:span text:style-name="T16">Default</text:span> Land verwendet.</text:p>
      <text:p text:style-name="P53">Die per <text:span text:style-name="T16">Default</text:span> im System definierten Sprachen sind:</text:p>
      <text:p text:style-name="P53"><text:tab/>1 = Deutschland</text:p>
      <text:p text:style-name="P53"><text:tab/>2 = Österreich</text:p>
      <text:p text:style-name="P53">weitere Länder können in diesem Abschnitt der Globalen Konstanten definiert werden.</text:p>
      <text:p text:style-name="P53"/>
      <text:p text:style-name="P23"><text:alphabetical-index-mark-start text:id="IMark112348168"/><text:span text:style-name="T42">COUNTRY_MAX</text:span><text:alphabetical-index-mark-end text:id="IMark112348168"/> : INT := 2.</text:p>
      <text:p text:style-name="P53">Die Konstante COUNTRY_MAX gibt an wie viele Länder im System definiert sind. Werden in diesem Abschnitt der Globalen Konstanten weitere Länder definiert, so muss dieser Wert entsprechend erhöht werden.</text:p>
      <text:p text:style-name="P53"/>
      <text:p text:style-name="P23"><text:alphabetical-index-mark-start text:id="IMark112348168"/><text:span text:style-name="T42">HOLYDAY_SETUP</text:span><text:alphabetical-index-mark-end text:id="IMark112348168"/> : ARRAY[0..29, 1..COUNTRY_MAX] of HOLIDAY_DATA.</text:p>
      <text:p text:style-name="P53">In diesem Abschnitt werden die landesabhängigen Feiertage vorgegeben. Weitere Länder und deren Feiertage können durch Erweiterung dieses Abschnitts vordefiniert werden.</text:p>
      <text:list xml:id="list33648677" text:continue-numbering="true" text:style-name="L1">
        <text:list-item>
          <text:list>
            <text:list-item>
              <text:h text:style-name="P217" text:outline-level="2">Aktualität</text:h>
            </text:list-item>
          </text:list>
        </text:list-item>
      </text:list>
      <text:p text:style-name="P38"><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7">History</text:span><text:span text:style-name="T1">" listet alle Revisionen der einzelnen Bausteine mit Änderungen und ab welcher </text:span><text:span text:style-name="T7">Release</text:span><text:span text:style-name="T1"> der Bibliothek dieser Baustein enthalten ist.</text:span></text:p>
      <text:list xml:id="list33631925" text:continue-numbering="true" text:style-name="L1">
        <text:list-item>
          <text:list>
            <text:list-item>
              <text:h text:style-name="P217" text:outline-level="2"><text:soft-page-break/>Support</text:h>
            </text:list-item>
          </text:list>
        </text:list-item>
      </text:list>
      <text:p text:style-name="P38"><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72"><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53">Bitte senden Sie bei Support Anfragen keine email an OSCAT. Anfragen können schneller und effektiver bearbeitet werden wenn die Anfragen in unserem Forum gestellt werden.</text:p>
      <text:list xml:id="list33654206" text:continue-numbering="true" text:style-name="L1">
        <text:list-item>
          <text:h text:style-name="P211" text:outline-level="1">Diverse Funktionen</text:h>
        </text:list-item>
      </text:list>
      <text:p text:style-name="P16"/>
      <text:list xml:id="list33638274" text:continue-numbering="true" text:style-name="L1">
        <text:list-item>
          <text:list>
            <text:list-item>
              <text:h text:style-name="P217" text:outline-level="2"><text:alphabetical-index-mark-start text:id="IMark112348168"/>ESR_COLLECT<text:alphabetical-index-mark-end text:id="IMark112348168"/></text:h>
            </text:list-item>
          </text:list>
        </text:list-item>
      </text:list>
      <text:p text:style-name="P22">Type<text:tab/>Funktionsbaustein</text:p>
      <text:p text:style-name="Standard"><text:span text:style-name="T16">Input</text:span><text:tab/><text:span text:style-name="T46">ESR_0</text:span>..7 : ESR_DATA (ESR_Eingänge)</text:p>
      <text:p text:style-name="P52"><text:tab/>RST : BOOL (Asynchroner Reset Eingang)</text:p>
      <text:p text:style-name="Standard"><text:span text:style-name="T46">Output</text:span><text:tab/><text:span text:style-name="T46">ESR_OUT</text:span> : <text:span text:style-name="T46">ESR_DATA</text:span> (Array mit dem ESR-Protokoll)</text:p>
      <text:p text:style-name="Standard"><draw:frame draw:style-name="fr4" draw:name="Grafik254" text:anchor-type="paragraph" svg:x="1.222cm" svg:y="0.621cm" svg:width="3.69cm" svg:height="4.3cm" draw:z-index="387"><draw:image xlink:href="Pictures/10000000000001170000014511C380CE.png" xlink:type="simple" xlink:show="embed" xlink:actuate="onLoad"/></draw:frame><text:tab/>POS : <text:span text:style-name="T46">INT</text:span> (<text:span text:style-name="T46">Position</text:span> des <text:span text:style-name="T46">neusten</text:span> ESR Protokolls im Array)</text:p>
      <text:p text:style-name="P178"><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84"><draw:frame draw:style-name="fr4" draw:name="Grafik256" text:anchor-type="paragraph" svg:x="1.078cm" svg:y="1.087cm" svg:width="11.15cm" svg:height="8.059cm" draw:z-index="225"><draw:image xlink:href="Pictures/100000000000023200000196069C2F5F.png" xlink:type="simple" xlink:show="embed" xlink:actuate="onLoad"/></draw:frame><text:soft-page-break/>Das folgende Beispiel demonstriert, wie ESR_COLLECT mit ESR-Bausteinen zusammen geschaltet wird.</text:p>
      <text:p text:style-name="P81"><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12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6">Error</text:span></text:p>
          </table:table-cell>
        </table:table-row>
        <table:table-row>
          <table:table-cell table:style-name="Tabelle27.A2" office:value-type="string">
            <text:p text:style-name="Table_20_Contents">2</text:p>
          </table:table-cell>
          <table:table-cell table:style-name="Tabelle27.A2" office:value-type="string">
            <text:p text:style-name="P12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12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6">Debug</text:span></text:p>
          </table:table-cell>
        </table:table-row>
        <table:table-row>
          <table:table-cell table:style-name="Tabelle27.A2" office:value-type="string">
            <text:p text:style-name="Table_20_Contents">10</text:p>
          </table:table-cell>
          <table:table-cell table:style-name="Tabelle27.A2" office:value-type="string">
            <text:p text:style-name="P12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6">not</text:span> <text:span text:style-name="T16">used</text:span></text:p>
          </table:table-cell>
          <table:table-cell table:style-name="Tabelle27.F2" office:value-type="string">
            <text:p text:style-name="Table_20_Contents"><text:span text:style-name="T16">Boolean</text:span> input <text:span text:style-name="T16">low</text:span> <text:span text:style-name="T16">transition</text:span></text:p>
          </table:table-cell>
        </table:table-row>
        <table:table-row>
          <table:table-cell table:style-name="Tabelle27.A2" office:value-type="string">
            <text:p text:style-name="Table_20_Contents">11</text:p>
          </table:table-cell>
          <table:table-cell table:style-name="Tabelle27.A2" office:value-type="string">
            <text:p text:style-name="P12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6">not</text:span> <text:span text:style-name="T16">used</text:span></text:p>
          </table:table-cell>
          <table:table-cell table:style-name="Tabelle27.F2" office:value-type="string">
            <text:p text:style-name="Table_20_Contents"><text:span text:style-name="T16">Boolean</text:span> input <text:span text:style-name="T16">high</text:span> <text:span text:style-name="T16">transition</text:span></text:p>
          </table:table-cell>
        </table:table-row>
        <table:table-row>
          <table:table-cell table:style-name="Tabelle27.A2" office:value-type="string">
            <text:p text:style-name="Table_20_Contents">20</text:p>
          </table:table-cell>
          <table:table-cell table:style-name="Tabelle27.A2" office:value-type="string">
            <text:p text:style-name="P12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6">Value</text:span></text:p>
          </table:table-cell>
          <table:table-cell table:style-name="Tabelle27.F2" office:value-type="string">
            <text:p text:style-name="Table_20_Contents">Real <text:span text:style-name="T16">Value</text:span> <text:span text:style-name="T16">change</text:span></text:p>
          </table:table-cell>
        </table:table-row>
      </table:table>
      <text:p text:style-name="P52"/>
      <text:p text:style-name="P52">Die ESR Daten enthalten folgende Informationen:</text:p>
      <text:p text:style-name="P52">ESR_DATA.TYP<text:tab/>Datentyp siehe vorstehende Tabelle</text:p>
      <text:p text:style-name="P52">ESR_DATA.ADRESS<text:tab/>bis zu 10 Zeichen langer <text:span text:style-name="T16">String</text:span> der die Datenquelle </text:p>
      <text:p text:style-name="P52"><text:tab/><text:tab/>Bezeichnet</text:p>
      <text:p text:style-name="P52">ESR_DATA.DS<text:tab/>Datums Stempel von Typ DATATIME</text:p>
      <text:p text:style-name="P52">ESR_DATA.TS<text:tab/>Zeitstempel vom Typ TIME (SPS <text:span text:style-name="T16">Timer</text:span>)</text:p>
      <text:p text:style-name="P52">ESR_DATA.DATA<text:tab/>bis zu 8 Byte Datenblock</text:p>
      <text:list xml:id="list33648872" text:continue-numbering="true" text:style-name="L1">
        <text:list-item>
          <text:list>
            <text:list-item>
              <text:h text:style-name="P217" text:outline-level="2"><text:soft-page-break/><text:alphabetical-index-mark-start text:id="IMark112348168"/>ESR_MON_B8<text:alphabetical-index-mark-end text:id="IMark112348168"/></text:h>
            </text:list-item>
          </text:list>
        </text:list-item>
      </text:list>
      <text:p text:style-name="P22">Type<text:tab/>Funktionsbaustein</text:p>
      <text:p text:style-name="P52"><text:span text:style-name="T16">Input</text:span><text:tab/>S0..7 : BOOL (Signaleingänge)</text:p>
      <text:p text:style-name="P52"><text:tab/>DT_IN : DATE_TIME (Zeit- Datum-Eingang für Zeitstempel)</text:p>
      <text:p text:style-name="P52">Output<text:tab/>ESR_OUT : ESR_Data (ESR_Datenausgang)</text:p>
      <text:p text:style-name="P52"><text:tab/>ESR_FLAG : BOOL (TRUE, wenn ESR-Daten vorhanden sind<text:span text:style-name="T1">)</text:span></text:p>
      <text:p text:style-name="P52"><draw:frame draw:style-name="fr4" draw:name="Grafik255" text:anchor-type="paragraph" svg:x="1.175cm" svg:y="0.757cm" svg:width="4.069cm" svg:height="4.89cm" draw:z-index="264"><draw:image xlink:href="Pictures/100000000000013400000172E4A36C0D.png" xlink:type="simple" xlink:show="embed" xlink:actuate="onLoad"/></draw:frame><text:span text:style-name="T24">Config</text:span><text:tab/>A0..7 : STRING(10) (Bezeichnung der Eingänge)</text:p>
      <text:p text:style-name="P52"><text:line-break/>ESR_MON_B8 überwacht bis zu 8 Binäre Signale auf Änderungen, und versieht sie mit einem <text:span text:style-name="T16">Zeitstempel</text:span> und einer Bezeichnung. Die gesammelten Meldungen werden gepuffert und an einen Protokollbaustein über ESR_OUT weitergereicht. Der Ausgang ESR_FLAG wird auf TRUE gesetzt, wenn Meldungen vorhanden sind.</text:p>
      <text:p text:style-name="P66">Die ESR-Daten am Ausgang setzen sich wie folgt zusammen:</text:p>
      <text:p text:style-name="P22">.TYP<text:tab/><text:span text:style-name="T16">11 </text:span><text:span text:style-name="T24">steigende</text:span><text:span text:style-name="T16"> </text:span><text:span text:style-name="T24">Flanke</text:span><text:span text:style-name="T16">, 10 </text:span><text:span text:style-name="T24">fallende</text:span><text:span text:style-name="T16"> </text:span><text:span text:style-name="T24">Flanke</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ext:span text:style-name="T16">Timer</text:span>)</text:p>
      <text:p text:style-name="P36">.Data<text:tab/>Datenblock von 8 Byte unbelegt</text:p>
      <text:p text:style-name="P68"/>
      <text:p text:style-name="P68"/>
      <text:list xml:id="list33627951" text:continue-numbering="true" text:style-name="L1">
        <text:list-item>
          <text:list>
            <text:list-item>
              <text:h text:style-name="P217" text:outline-level="2"><text:soft-page-break/><text:alphabetical-index-mark-start text:id="IMark112348168"/>ESR_MON_R4<text:alphabetical-index-mark-end text:id="IMark112348168"/></text:h>
            </text:list-item>
          </text:list>
        </text:list-item>
      </text:list>
      <text:p text:style-name="Standard"><text:span text:style-name="T46">Type</text:span><text:tab/><text:span text:style-name="T46">Funktionsbaustein</text:span></text:p>
      <text:p text:style-name="P22"><text:span text:style-name="T16">Input</text:span><text:tab/>R0..3 : REAL (Signaleingänge)</text:p>
      <text:p text:style-name="P22"><text:tab/>DT_IN : DATE_TIME (Zeit- Datum-Eingang für Zeitstempel)</text:p>
      <text:p text:style-name="P22">Output<text:tab/>ESR_OUT : ESR_Data (ESR_Datenausgang)</text:p>
      <text:p text:style-name="P22"><text:tab/>ESR_FLAG : BOOL (TRUE, wenn ESR-Daten vorhanden sind)</text:p>
      <text:p text:style-name="P22">Config<text:tab/>A0..3 : STRING(10) (Signaladresse der Eingänge)</text:p>
      <text:p text:style-name="P22"><draw:frame draw:style-name="fr4" draw:name="Grafik259" text:anchor-type="paragraph" svg:x="1.166cm" svg:y="0.665cm" svg:width="4.069cm" svg:height="3.099cm" draw:z-index="228"><draw:image xlink:href="Pictures/1000000000000134000000EA867DD4FA.png" xlink:type="simple" xlink:show="embed" xlink:actuate="onLoad"/></draw:frame><text:tab/>S0..3 : REAL (Schwellenwerte für Signaländerung)</text:p>
      <text:p text:style-name="P52"><text:line-break/>ESR_MON_R4 überwacht bis zu 4 Analoge Signale auf Änderungen und versieht sie mit einem <text:span text:style-name="T24">Zeit</text:span><text:span text:style-name="T16">s</text:span><text:span text:style-name="T24">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22">.TYP<text:tab/>20<text:span text:style-name="T16"> </text:span><text:span text:style-name="T24">Gleitpunktwert</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ext:span text:style-name="T16">Timer</text:span>)</text:p>
      <text:p text:style-name="P36">.Data<text:tab/>Datenblock 4 Byte Real Wert</text:p>
      <text:p text:style-name="P68"/>
      <text:p text:style-name="P68"/>
      <text:p text:style-name="P68"/>
      <text:list xml:id="list33649088" text:continue-numbering="true" text:style-name="L1">
        <text:list-item>
          <text:list>
            <text:list-item>
              <text:h text:style-name="P217" text:outline-level="2"><text:soft-page-break/><text:alphabetical-index-mark-start text:id="IMark112348168"/>ESR_MON_X8<text:alphabetical-index-mark-end text:id="IMark112348168"/></text:h>
            </text:list-item>
          </text:list>
        </text:list-item>
      </text:list>
      <text:p text:style-name="P22">Type<text:tab/>Funktionsbaustein</text:p>
      <text:p text:style-name="Standard"><text:span text:style-name="T22">Input</text:span><text:tab/>S0..7 : <text:span text:style-name="T46">Byte</text:span> (Statuseingänge)</text:p>
      <text:p text:style-name="P22"><text:tab/>DT_IN : DATE_TIME (Zeit-Datum-Eingang für Zeitstempel)</text:p>
      <text:p text:style-name="P22"><text:tab/>Mode : Byte (legt die zu verarbeitende Art von Meldungen fest)</text:p>
      <text:p text:style-name="P22">Output<text:tab/>ESR_OUT : Array[0..7] <text:span text:style-name="T16">of</text:span> ESR_DATA (gesammelte Meldungen)</text:p>
      <text:p text:style-name="P22"><text:tab/>ESR_FLAG : BOOL (TRUE, wenn Meldungen vorhanden sind)</text:p>
      <text:p text:style-name="P22"><draw:frame draw:style-name="fr4" draw:name="Grafik234" text:anchor-type="paragraph" svg:x="1.081cm" svg:y="0.69cm" svg:width="4.069cm" svg:height="5.339cm" draw:z-index="265"><draw:image xlink:href="Pictures/1000000000000134000001940DB60963.png" xlink:type="simple" xlink:show="embed" xlink:actuate="onLoad"/></draw:frame>Config<text:tab/>A0..7 : <text:span text:style-name="T16">STRING</text:span>(10) (Signaladresse der Eingänge)</text:p>
      <text:p text:style-name="P77"><text:line-break/>ESR_MON_X8 sammelt Status-Meldungen von bis zu 8 ESR kompatiblen Bausteinen ein, versieht sie mit einem <text:span text:style-name="T16">Zeitstempel</text:span>, <text:span text:style-name="T16">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xml:id="list33349432" text:style-name="L5">
        <text:list-item>
          <text:p text:style-name="P240">Mode = 1, nur Fehlermeldungen werden verarbeitet.</text:p>
        </text:list-item>
        <text:list-item>
          <text:p text:style-name="P234">Mode = 2, Status- und Fehlermeldungen werden verarbeitet.</text:p>
        </text:list-item>
        <text:list-item>
          <text:p text:style-name="P234">Mode = 3, Fehler, Status und <text:span text:style-name="T16">Debug-</text:span>Meldungen werden verarbeitet.</text:p>
        </text:list-item>
      </text:list>
      <text:p text:style-name="P52">Wenn der Eingang MODE nicht beschaltet wird, werden automatisch alle Meldungen verarbeitet.</text:p>
      <text:p text:style-name="P66">Die ESR-Daten am Ausgang setzen sich wie folgt zusammen:<text:line-break/>.TYP<text:tab/>1=Fehler, 2=Status, 3=<text:span text:style-name="T16">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list xml:id="list33655774" text:continue-list="list33649088" text:style-name="L1">
        <text:list-item>
          <text:list>
            <text:list-item>
              <text:h text:style-name="P217" text:outline-level="2"><text:soft-page-break/><text:alphabetical-index-mark-start text:id="IMark112348168"/><text:alphabetical-index-mark-start text:id="IMark112345448"/>OSCAT_VERSION<text:alphabetical-index-mark-end text:id="IMark112345448"/><text:alphabetical-index-mark-end text:id="IMark112348168"/></text:h>
            </text:list-item>
          </text:list>
        </text:list-item>
      </text:list>
      <text:p text:style-name="P22">Type<text:tab/>Funktion : DWORD</text:p>
      <text:p text:style-name="P52"><text:span text:style-name="T16">Input</text:span><text:tab/>IN : BOOL (wenn TRUE liefert der Baustein das <text:span text:style-name="T16">Release</text:span> Datum)</text:p>
      <text:p text:style-name="P22">Output<text:tab/>(Version der Bibliothek)</text:p>
      <text:p text:style-name="P22"><draw:frame draw:style-name="fr4" draw:name="Grafik52" text:anchor-type="paragraph" svg:x="1.067cm" svg:y="0.259cm" svg:width="5.669cm" svg:height="0.99cm" draw:z-index="426"><draw:image xlink:href="Pictures/10000000000001AD0000004B7ADB2812.png" xlink:type="simple" xlink:show="embed" xlink:actuate="onLoad"/></draw:frame><text:line-break/>OSCAT_VERSION gibt wenn IN = FALSE die aktuelle Versionsnummer als DWORD zurück. Wird IN auf TRUE gesetzt so wird das <text:span text:style-name="T16">Release</text:span> Datum der aktuellen Version als DWORD zurückgegeben.</text:p>
      <text:p text:style-name="P52">Beispiel: <text:tab/>OSCAT_VERSION(FALSE) = 201 für Version 2.60</text:p>
      <text:p text:style-name="P52"><text:tab/>DWORD_TO_DATE(OSCAT_VERSION(TRUE)) = 2008-1-1</text:p>
      <text:list xml:id="list33639001" text:continue-numbering="true" text:style-name="L1">
        <text:list-item>
          <text:list>
            <text:list-item>
              <text:h text:style-name="P217" text:outline-level="2"><text:alphabetical-index-mark-start text:id="IMark112348168"/>STATUS_TO_ESR<text:alphabetical-index-mark-end text:id="IMark112348168"/></text:h>
            </text:list-item>
          </text:list>
        </text:list-item>
      </text:list>
      <text:p text:style-name="P22">Type<text:tab/>Funktion : ESR_DATA</text:p>
      <text:p text:style-name="Standard"><text:span text:style-name="T22">Input</text:span><text:tab/><text:span text:style-name="T46">STATUS</text:span> : BYTE (Status Byte)</text:p>
      <text:p text:style-name="P22"><text:tab/>ADRESS : Byte (Adresse, Byte)</text:p>
      <text:p text:style-name="P22"><text:tab/>LINE : Byte (Eingangsnummer)</text:p>
      <text:p text:style-name="P22"><text:tab/>DT_IN : DATE_TIME (Zeit-Datum-Eingang)</text:p>
      <text:p text:style-name="P22"><text:tab/>TS : TIME (Zeit für Zeitstempel)</text:p>
      <text:p text:style-name="P22"><draw:frame draw:style-name="fr4" draw:name="Grafik233" text:anchor-type="paragraph" svg:x="1.035cm" svg:y="0.64cm" svg:width="5.42cm" svg:height="2.919cm" draw:z-index="206"><draw:image xlink:href="Pictures/100000000000019A000000DDF47B9A49.png" xlink:type="simple" xlink:show="embed" xlink:actuate="onLoad"/></draw:frame>Output<text:tab/>ESR_DATA (ESR-Datenblock)</text:p>
      <text:p text:style-name="Standard"><text:line-break/><text:span text:style-name="T22">STATUS_TO_ESR</text:span> erzeugt einen ESR Datensatz aus den Eingangswerten.</text:p>
      <text:p text:style-name="P22">Ein STATUS im Bereich zwischen 1 .. 99 ist eine Fehlermeldung und wird als Typ 1 gekennzeichnet.</text:p>
      <text:p text:style-name="P52"><text:soft-page-break/>Status 100 .. 199 wird als Typ 2 gekennzeichnet und 200 .. 255 wird als Typ 3 gekennzeichnet (<text:span text:style-name="T16">Debug-I</text:span>nformation).</text:p>
      <text:p text:style-name="P66">Die ESR-Daten am Ausgang setzen sich wie folgt zusammen:</text:p>
      <text:p text:style-name="P22">.TYP<text:tab/>1=Fehler, 2=Status, 3=<text:span text:style-name="T16">Debug</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imer)</text:p>
      <text:p text:style-name="P22">.Data<text:tab/>Datenblock von 8 Byte</text:p>
      <text:list xml:id="list33645037" text:continue-numbering="true" text:style-name="L1">
        <text:list-item>
          <text:h text:style-name="P216" text:outline-level="1">Mathematik</text:h>
        </text:list-item>
      </text:list>
      <text:p text:style-name="P16"/>
      <text:list xml:id="list33650149" text:continue-numbering="true" text:style-name="L1">
        <text:list-item>
          <text:list>
            <text:list-item>
              <text:h text:style-name="P217" text:outline-level="2"><text:alphabetical-index-mark-start text:id="IMark112348168"/>_DEC1<text:alphabetical-index-mark-end text:id="IMark112348168"/></text:h>
            </text:list-item>
          </text:list>
        </text:list-item>
      </text:list>
      <text:p text:style-name="P22">Type<text:tab/>Funktion : INT</text:p>
      <text:p text:style-name="P52"><text:span text:style-name="T16">Input</text:span><text:tab/>N :UINT ( Anzahl der Werte die X einnehmen kann)</text:p>
      <text:p text:style-name="P52"><text:span text:style-name="T16">IN_OUT</text:span><text:tab/>X : INT (Variable die Hochgezählt wird)</text:p>
      <text:p text:style-name="P22"><draw:frame draw:style-name="fr4" draw:name="Grafik695" text:anchor-type="paragraph" svg:x="1.023cm" svg:y="0.699cm" svg:width="3.18cm" svg:height="1.57cm" draw:z-index="736"><draw:image xlink:href="Pictures/10000000000000F00000007781C6A3ED.png" xlink:type="simple" xlink:show="embed" xlink:actuate="onLoad"/></draw:frame>Output<text:tab/>INT (Dummy Wert ist immer 0)</text:p>
      <text:p text:style-name="P52"><text:line-break/>_DEC1 zählt die Variable X von M-1 bis 0 und beginnt dann wieder bei M-1, so dass genau M verschiedene Werte beginnend bei M-1 bis einschließlich 0 erzeugt werden.</text:p>
      <text:p text:style-name="P52">die Variable X wird direkt im Speicher bearbeitet, so dass das Ergebnis nicht zugewiesen werden muss. Der Ausgang _DEC1 ist nur zur besseren Kompatibilität vorhanden und liefert immer 0.</text:p>
      <text:p text:style-name="P52">Ein typischer Aufruf von _DEC1 unter ST ist:</text:p>
      <text:p text:style-name="P52">_DEC1(16,X)</text:p>
      <text:p text:style-name="P52">dieses Statement zählt bei jedem Aufruf X um eins herab bis 0 und beginnt dann wieder bei M.</text:p>
      <text:p text:style-name="P52">Der Aufruf Y := _DEC1(16,X) ist sinnlos und wird Y immer auf 0 setzen, Die Variable X wird trotzdem herab gezählt.</text:p>
      <text:p text:style-name="P52">Beispiele:</text:p>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116">Aufruf</text:p>
          </table:table-cell>
          <table:table-cell table:style-name="Tabelle49.A1" office:value-type="string">
            <text:p text:style-name="P117">X vor Aufruf</text:p>
          </table:table-cell>
          <table:table-cell table:style-name="Tabelle49.A1" office:value-type="string">
            <text:p text:style-name="P117">X nach Aufruf</text:p>
          </table:table-cell>
          <table:table-cell table:style-name="Tabelle49.D1" office:value-type="string">
            <text:p text:style-name="P146">_INC1</text:p>
          </table:table-cell>
        </table:table-row>
        <table:table-row>
          <table:table-cell table:style-name="Tabelle49.A2" office:value-type="string">
            <text:p text:style-name="P109">_DEC1(3,X)</text:p>
          </table:table-cell>
          <table:table-cell table:style-name="Tabelle49.B2" office:value-type="float" office:value="1">
            <text:p text:style-name="P110">1</text:p>
          </table:table-cell>
          <table:table-cell table:style-name="Tabelle49.B2" office:value-type="float" office:value="0">
            <text:p text:style-name="P110">0</text:p>
          </table:table-cell>
          <table:table-cell table:style-name="Tabelle49.D2" office:value-type="float" office:value="0">
            <text:p text:style-name="P149">0</text:p>
          </table:table-cell>
        </table:table-row>
        <table:table-row>
          <table:table-cell table:style-name="Tabelle49.A2" office:value-type="string">
            <text:p text:style-name="P109">_DEC1(3,X)</text:p>
          </table:table-cell>
          <table:table-cell table:style-name="Tabelle49.B2" office:value-type="float" office:value="0">
            <text:p text:style-name="P110">0</text:p>
          </table:table-cell>
          <table:table-cell table:style-name="Tabelle49.B2" office:value-type="float" office:value="2">
            <text:p text:style-name="P110">2</text:p>
          </table:table-cell>
          <table:table-cell table:style-name="Tabelle49.D2" office:value-type="float" office:value="0">
            <text:p text:style-name="P110">0</text:p>
          </table:table-cell>
        </table:table-row>
      </table:table>
      <text:p text:style-name="P52"/>
      <text:list xml:id="list33648360" text:continue-numbering="true" text:style-name="L1">
        <text:list-item>
          <text:list>
            <text:list-item>
              <text:h text:style-name="P217" text:outline-level="2"><text:soft-page-break/><text:alphabetical-index-mark-start text:id="IMark112348168"/>_INC1<text:alphabetical-index-mark-end text:id="IMark112348168"/></text:h>
            </text:list-item>
          </text:list>
        </text:list-item>
      </text:list>
      <text:p text:style-name="P22">Type<text:tab/>Funktion : INT</text:p>
      <text:p text:style-name="P52"><text:span text:style-name="T16">Input</text:span><text:tab/>N : UINT ( Anzahl der Werte die X einnehmen kann)</text:p>
      <text:p text:style-name="P52"><text:span text:style-name="T16">IN_OUT</text:span><text:tab/>X : INT (Variable die Hochgezählt wird)</text:p>
      <text:p text:style-name="P22"><draw:frame draw:style-name="fr4" draw:name="Grafik623" text:anchor-type="paragraph" svg:x="1.046cm" svg:y="0.631cm" svg:width="2.731cm" svg:height="1.57cm" draw:z-index="737"><draw:image xlink:href="Pictures/10000000000000CE0000007794680276.png" xlink:type="simple" xlink:show="embed" xlink:actuate="onLoad"/></draw:frame>Output<text:tab/>INT (Dummy Wert ist immer 0)</text:p>
      <text:p text:style-name="P52"><text:line-break/>_INC1 zählt die Variable X von 0 .. M-1 und beginnt dann wieder bei 0, so dass genau M verschiedene Werte beginnend bei 0 erzeugt werden.</text:p>
      <text:p text:style-name="P52">die Variable X wird direkt im Speicher hochgezählt, so dass das Ergebnis nicht zugewiesen werden muss. Der Ausgang _INC1 ist nur zur besseren Kompatibilität vorhanden und liefert immer 0.</text:p>
      <text:p text:style-name="P52">Ein typischer Aufruf von _INC1 unter ST ist:</text:p>
      <text:p text:style-name="P52">_INC1(16,X)</text:p>
      <text:p text:style-name="P52">dieses Statement zählt bei jedem Aufruf X um eins hoch bis maximal M-1 und beginnt dann wieder bei 0.</text:p>
      <text:p text:style-name="P52">Der Aufruf Y := _INC1(16,X) ist sinnlos und wird Y immer auf 0 setzen, Die Variable X wird trotzdem hochgezählt.</text:p>
      <text:p text:style-name="P52">Beispiele:</text:p>
      <table:table table:name="Tabelle48" table:style-name="Tabelle48">
        <table:table-column table:style-name="Tabelle48.A"/>
        <table:table-column table:style-name="Tabelle48.B"/>
        <table:table-column table:style-name="Tabelle48.C"/>
        <table:table-column table:style-name="Tabelle48.D"/>
        <table:table-row>
          <table:table-cell table:style-name="Tabelle48.A1" office:value-type="string">
            <text:p text:style-name="P116">Aufruf</text:p>
          </table:table-cell>
          <table:table-cell table:style-name="Tabelle48.A1" office:value-type="string">
            <text:p text:style-name="P117">X vor Aufruf</text:p>
          </table:table-cell>
          <table:table-cell table:style-name="Tabelle48.A1" office:value-type="string">
            <text:p text:style-name="P117">X nach Aufruf</text:p>
          </table:table-cell>
          <table:table-cell table:style-name="Tabelle48.D1" office:value-type="string">
            <text:p text:style-name="P146">_INC1</text:p>
          </table:table-cell>
        </table:table-row>
        <table:table-row>
          <table:table-cell table:style-name="Tabelle48.A2" office:value-type="string">
            <text:p text:style-name="P109">_INC1(3,X)</text:p>
          </table:table-cell>
          <table:table-cell table:style-name="Tabelle48.B2" office:value-type="float" office:value="2">
            <text:p text:style-name="P110">2</text:p>
          </table:table-cell>
          <table:table-cell table:style-name="Tabelle48.B2" office:value-type="float" office:value="0">
            <text:p text:style-name="P110">0</text:p>
          </table:table-cell>
          <table:table-cell table:style-name="Tabelle48.D2" office:value-type="float" office:value="0">
            <text:p text:style-name="P149">0</text:p>
          </table:table-cell>
        </table:table-row>
        <table:table-row>
          <table:table-cell table:style-name="Tabelle48.A2" office:value-type="string">
            <text:p text:style-name="P109">_INC1(3,X)</text:p>
          </table:table-cell>
          <table:table-cell table:style-name="Tabelle48.B2" office:value-type="float" office:value="1">
            <text:p text:style-name="P110">1</text:p>
          </table:table-cell>
          <table:table-cell table:style-name="Tabelle48.B2" office:value-type="float" office:value="2">
            <text:p text:style-name="P110">2</text:p>
          </table:table-cell>
          <table:table-cell table:style-name="Tabelle48.D2" office:value-type="float" office:value="0">
            <text:p text:style-name="P110">0</text:p>
          </table:table-cell>
        </table:table-row>
      </table:table>
      <text:p text:style-name="P52"/>
      <text:p text:style-name="P52"/>
      <text:p text:style-name="P52"/>
      <text:p text:style-name="P52"/>
      <text:p text:style-name="P52"/>
      <text:list xml:id="list33642069" text:continue-numbering="true" text:style-name="L1">
        <text:list-item>
          <text:list>
            <text:list-item>
              <text:h text:style-name="P217" text:outline-level="2"><text:soft-page-break/><text:alphabetical-index-mark-start text:id="IMark112348168"/>ACOS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35" text:anchor-type="paragraph" svg:x="1.085cm" svg:y="0.665cm" svg:width="2.731cm" svg:height="1.12cm" draw:z-index="207"><draw:image xlink:href="Pictures/10000000000000CE00000055726D026D.png" xlink:type="simple" xlink:show="embed" xlink:actuate="onLoad"/></draw:frame>Output<text:tab/>REAL (Ausgangswert)</text:p>
      <text:p text:style-name="Standard"><text:line-break/><text:span text:style-name="T46">ACOSH</text:span> <text:span text:style-name="T46">Berechnet</text:span> den Arcus Cosinus Hyperbolicus nach folgender Formel:</text:p>
      <text:p text:style-name="P22">ACOSH = LN(X + SQRT(EXPT(X,2)-1))</text:p>
      <text:list xml:id="list33625396" text:continue-numbering="true" text:style-name="L1">
        <text:list-item>
          <text:list>
            <text:list-item>
              <text:h text:style-name="P217" text:outline-level="2"><text:alphabetical-index-mark-start text:id="IMark112348168"/>ACOT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36" text:anchor-type="paragraph" svg:x="1.198cm" svg:y="0.669cm" svg:width="2.731cm" svg:height="1.12cm" draw:z-index="208"><draw:image xlink:href="Pictures/10000000000000CE00000055C50D2A74.png" xlink:type="simple" xlink:show="embed" xlink:actuate="onLoad"/></draw:frame>Output<text:tab/>REAL (Ausgangswert)</text:p>
      <text:p text:style-name="Standard"><text:span text:style-name="T46">ACOTH</text:span> <text:span text:style-name="T46">Berechnet</text:span> den Arcus Cotangens Hyperbolicus nach folgender Formel:</text:p>
      <text:p text:style-name="P22">ACOTH = LN((X+1)/(X-1))/2</text:p>
      <text:list xml:id="list33649646" text:continue-numbering="true" text:style-name="L1">
        <text:list-item>
          <text:list>
            <text:list-item>
              <text:h text:style-name="P217" text:outline-level="2"><text:alphabetical-index-mark-start text:id="IMark112348168"/>AGDF<text:alphabetical-index-mark-end text:id="IMark112348168"/></text:h>
            </text:list-item>
          </text:list>
        </text:list-item>
      </text:list>
      <text:p text:style-name="P22">Type<text:tab/>Funktion : REAL</text:p>
      <text:p text:style-name="P22"><text:span text:style-name="T16">Input</text:span><text:tab/>X : REAL (Eingangswert)</text:p>
      <text:p text:style-name="P53"><draw:frame draw:style-name="fr4" draw:name="Grafik562" text:anchor-type="paragraph" svg:x="1.069cm" svg:y="0.69cm" svg:width="2.499cm" svg:height="0.99cm" draw:z-index="573"><draw:image xlink:href="Pictures/10000000000000BD0000004B10EE126F.png" xlink:type="simple" xlink:show="embed" xlink:actuate="onLoad"/></draw:frame>Output<text:tab/>REAL (Inverse Gundermannfunktion)</text:p>
      <text:p text:style-name="P53">AGDF berechnet die Inverse Gundermannfunktion.</text:p>
      <text:p text:style-name="P53">Die Berechnung erfolgt nach der Formel GDF := LN((1+SIN(X))/COS(X)).</text:p>
      <text:list xml:id="list33641913" text:continue-numbering="true" text:style-name="L1">
        <text:list-item>
          <text:list>
            <text:list-item>
              <text:h text:style-name="P217" text:outline-level="2"><text:soft-page-break/><text:alphabetical-index-mark-start text:id="IMark112348168"/>ASIN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37" text:anchor-type="paragraph" svg:x="1.113cm" svg:y="0.69cm" svg:width="2.731cm" svg:height="1.12cm" draw:z-index="209"><draw:image xlink:href="Pictures/10000000000000CE00000055444AFE56.png" xlink:type="simple" xlink:show="embed" xlink:actuate="onLoad"/></draw:frame>Output<text:tab/>REAL (Ausgangswert)</text:p>
      <text:p text:style-name="Standard"><text:span text:style-name="T46">ASINH</text:span> <text:span text:style-name="T46">Berechnet</text:span> den Arcus Sinus Hyperbolicus nach folgender Formel:</text:p>
      <text:p text:style-name="P22">ASINH = LN(X + SQRT(EXPT(X,2)+1))</text:p>
      <text:list xml:id="list33654442" text:continue-numbering="true" text:style-name="L1">
        <text:list-item>
          <text:list>
            <text:list-item>
              <text:h text:style-name="P217" text:outline-level="2"><text:alphabetical-index-mark-start text:id="IMark112348168"/>ATAN2<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553" text:anchor-type="paragraph" svg:x="1.046cm" svg:y="0.69cm" svg:width="3.18cm" svg:height="1.57cm" draw:z-index="561"><draw:image xlink:href="Pictures/10000000000000F00000007740E60F88.png" xlink:type="simple" xlink:show="embed" xlink:actuate="onLoad"/></draw:frame>Output<text:tab/>REAL (Ausgangswert)</text:p>
      <text:p text:style-name="Standard">ATAN2 <text:span text:style-name="T46">Berechnet</text:span> den <text:span text:style-name="T1">Winkel von Koordinaten (Y, X) in RAD. Das Ergebnis liegt zwischen -</text:span><text:span text:style-name="T10"> und +</text:span></text:p>
      <text:list xml:id="list33636452" text:continue-numbering="true" text:style-name="L1">
        <text:list-item>
          <text:list>
            <text:list-item>
              <text:h text:style-name="P217" text:outline-level="2"><text:alphabetical-index-mark-start text:id="IMark112348168"/>ATAN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38" text:anchor-type="paragraph" svg:x="1.113cm" svg:y="0.672cm" svg:width="2.731cm" svg:height="1.12cm" draw:z-index="210"><draw:image xlink:href="Pictures/10000000000000CE00000055D2A10C58.png" xlink:type="simple" xlink:show="embed" xlink:actuate="onLoad"/></draw:frame>Output<text:tab/>REAL (Ausgangswert)</text:p>
      <text:p text:style-name="Standard"><text:span text:style-name="T46">ATANH</text:span> <text:span text:style-name="T46">Berechnet</text:span> den Arcus Tangens Hyperbolicus nach folgender Formel:</text:p>
      <text:p text:style-name="P22">ATANH = LN((1+X)/(1-X)) / 2</text:p>
      <text:list xml:id="list33652564" text:continue-numbering="true" text:style-name="L1">
        <text:list-item>
          <text:list>
            <text:list-item>
              <text:h text:style-name="P217" text:outline-level="2"><text:soft-page-break/><text:alphabetical-index-mark-start text:id="IMark112348168"/>CEIL<text:alphabetical-index-mark-end text:id="IMark112348168"/></text:h>
            </text:list-item>
          </text:list>
        </text:list-item>
      </text:list>
      <text:p text:style-name="P22">Type<text:tab/>Funktion : INT</text:p>
      <text:p text:style-name="P52"><text:span text:style-name="T16">Input</text:span><text:tab/>X : REAL (Eingangswert)</text:p>
      <text:p text:style-name="P22"><draw:frame draw:style-name="fr4" draw:name="Grafik267" text:anchor-type="paragraph" svg:x="1.074cm" svg:y="0.665cm" svg:width="2.281cm" svg:height="1.12cm" draw:z-index="235"><draw:image xlink:href="Pictures/10000000000000AC00000055C10B2B8F.png" xlink:type="simple" xlink:show="embed" xlink:actuate="onLoad"/></draw:frame>Output<text:tab/>INT (Ausgangswert)</text:p>
      <text:p text:style-name="P52"><text:line-break/>Die Funktion CEIL gibt den kleinsten ganzzahligen Wert größer gleich X zurück.</text:p>
      <text:p text:style-name="P52">Beispiel:<text:tab/>CEIL(3.14) = 4</text:p>
      <text:p text:style-name="P52"><text:tab/>CEIL(-3.14) = -3</text:p>
      <text:p text:style-name="P52"><text:tab/>CEIL(2) = 2</text:p>
      <text:list xml:id="list33638710" text:continue-numbering="true" text:style-name="L1">
        <text:list-item>
          <text:list>
            <text:list-item>
              <text:h text:style-name="P217" text:outline-level="2"><text:alphabetical-index-mark-start text:id="IMark112348168"/>CEIL2<text:alphabetical-index-mark-end text:id="IMark112348168"/></text:h>
            </text:list-item>
          </text:list>
        </text:list-item>
      </text:list>
      <text:p text:style-name="P22">Type<text:tab/>Funktion : DINT</text:p>
      <text:p text:style-name="P52"><text:span text:style-name="T16">Input</text:span><text:tab/>X : REAL (Eingangswert)</text:p>
      <text:p text:style-name="P22"><draw:frame draw:style-name="fr4" draw:name="Grafik533" text:anchor-type="paragraph" svg:x="1.023cm" svg:y="0.688cm" svg:width="2.799cm" svg:height="0.99cm" draw:z-index="542"><draw:image xlink:href="Pictures/10000000000000D40000004B4CA67AA2.png" xlink:type="simple" xlink:show="embed" xlink:actuate="onLoad"/></draw:frame>Output<text:tab/>DINT (Ausgangswert)</text:p>
      <text:p text:style-name="P52"><text:line-break/>Die Funktion CEIL2 gibt den kleinsten ganzzahligen Wert größer gleich X zurück.</text:p>
      <text:p text:style-name="P52">Beispiel:<text:tab/>CEIL2(3.14) = 4</text:p>
      <text:p text:style-name="P52"><text:tab/>CEIL2(-3.14) = -3</text:p>
      <text:p text:style-name="P52"><text:tab/>CEIL2(2) = 2</text:p>
      <text:p text:style-name="P52"/>
      <text:p text:style-name="P52"/>
      <text:list xml:id="list33633977" text:continue-numbering="true" text:style-name="L1">
        <text:list-item>
          <text:list>
            <text:list-item>
              <text:h text:style-name="P217" text:outline-level="2"><text:soft-page-break/><text:alphabetical-index-mark-start text:id="IMark112348168"/>CMP<text:alphabetical-index-mark-end text:id="IMark112348168"/></text:h>
            </text:list-item>
          </text:list>
        </text:list-item>
      </text:list>
      <text:p text:style-name="P22">Type<text:tab/>Funktion : BOOL</text:p>
      <text:p text:style-name="P52"><text:span text:style-name="T16">Input</text:span><text:tab/>X, Y : REAL (Eingangswerte)</text:p>
      <text:p text:style-name="P52"><text:tab/>N : INT (Anzahl der Stellen die verglichen werden sollen)</text:p>
      <text:p text:style-name="P22"><draw:frame draw:style-name="fr4" draw:name="Grafik518" text:anchor-type="paragraph" svg:x="1.023cm" svg:y="0.69cm" svg:width="2.731cm" svg:height="2.02cm" draw:z-index="524"><draw:image xlink:href="Pictures/10000000000000CE00000099E8BFF303.png" xlink:type="simple" xlink:show="embed" xlink:actuate="onLoad"/></draw:frame>Output<text:tab/>BOOL (Ergebnis)</text:p>
      <text:p text:style-name="P52"><text:line-break/>CMP vergleicht 2 REAL Werte ob die ersten N Stellen gleich Sind.</text:p>
      <text:p text:style-name="P52">Beispiele:</text:p>
      <text:p text:style-name="P52">CMP(3.140,3.149,3) = TRUE<text:tab/>CMP(3.140,3.149,4) = FALSE</text:p>
      <text:p text:style-name="P52">CMP(0.015,0,016,1) = TRUE<text:tab/>CMP(0.015,0,016,2) = FALSE</text:p>
      <text:p text:style-name="P52">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xml:id="list33632052" text:continue-numbering="true" text:style-name="L1">
        <text:list-item>
          <text:list>
            <text:list-item>
              <text:h text:style-name="P217" text:outline-level="2"><text:alphabetical-index-mark-start text:id="IMark112348168"/>COS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39" text:anchor-type="paragraph" svg:x="1.104cm" svg:y="0.67cm" svg:width="2.731cm" svg:height="1.12cm" draw:z-index="211"><draw:image xlink:href="Pictures/10000000000000CE00000055DD9CC6D2.png" xlink:type="simple" xlink:show="embed" xlink:actuate="onLoad"/></draw:frame>Output<text:tab/>REAL (Ausgangswert)</text:p>
      <text:p text:style-name="P203"><text:line-break/><text:span text:style-name="T46">COSH</text:span> Berechnet den Cosinus Hyperbolicus nach folgender Formel:</text:p>
      <text:p text:style-name="P34">COSH = (EXPT(E,X) + EXPT(E,-X))/2</text:p>
      <text:list xml:id="list33643387" text:continue-numbering="true" text:style-name="L1">
        <text:list-item>
          <text:list>
            <text:list-item>
              <text:h text:style-name="P217" text:outline-level="2"><text:soft-page-break/><text:alphabetical-index-mark-start text:id="IMark112348168"/>COT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40" text:anchor-type="paragraph" svg:x="1.039cm" svg:y="0.67cm" svg:width="2.281cm" svg:height="1.12cm" draw:z-index="212"><draw:image xlink:href="Pictures/10000000000000AC00000055FA2996C0.png" xlink:type="simple" xlink:show="embed" xlink:actuate="onLoad"/></draw:frame>Output<text:tab/>REAL (Ausgangswert)</text:p>
      <text:p text:style-name="Standard"><text:line-break/><text:span text:style-name="T46">COTH</text:span> <text:span text:style-name="T46">Berechnet</text:span> den Cotangens Hyperbolicus nach folgender Formel:</text:p>
      <text:p text:style-name="P22">COTH = (EXPT(E, 2 * X) + 1) / (EXPT(E, 2 * X) – 1)</text:p>
      <text:p text:style-name="P52">für Eingangswerte größer 20 oder kleiner als -20 liefert COTH den Näherungswert +1 beziehungsweise -1 was einer Genauigkeit besser 8 Stellen entspricht und somit unterhalb der Auflösung des Typs REAL liegt.</text:p>
      <text:p text:style-name="P52"/>
      <text:p text:style-name="P52"/>
      <text:p text:style-name="P52"/>
      <text:list xml:id="list33639291" text:continue-numbering="true" text:style-name="L1">
        <text:list-item>
          <text:list>
            <text:list-item>
              <text:h text:style-name="P217" text:outline-level="2"><text:alphabetical-index-mark-start text:id="IMark112348168"/>D_TRUNC<text:alphabetical-index-mark-end text:id="IMark112348168"/></text:h>
            </text:list-item>
          </text:list>
        </text:list-item>
      </text:list>
      <text:p text:style-name="P22">Type<text:tab/>Funktion : DINT</text:p>
      <text:p text:style-name="P22"><text:span text:style-name="T16">Input</text:span><text:tab/>X : REAL (Eingangswert)</text:p>
      <text:p text:style-name="P22">Output<text:tab/>DINT (Ausgangswert)</text:p>
      <text:p text:style-name="Standard"><draw:frame draw:style-name="fr4" draw:name="Grafik532" text:anchor-type="paragraph" svg:x="0.979cm" svg:y="0cm" svg:width="3.99cm" svg:height="0.99cm" draw:z-index="541"><draw:image xlink:href="Pictures/100000000000012E0000004BCA441158.png" xlink:type="simple" xlink:show="embed" xlink:actuate="onLoad"/></draw:frame><text:line-break/>D<text:span text:style-name="T46">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52">D_TRUNC(1.6) = 1</text:p>
      <text:p text:style-name="P52">D_TRUNC(-1.6) = -1</text:p>
      <text:list xml:id="list33635133" text:continue-numbering="true" text:style-name="L1">
        <text:list-item>
          <text:list>
            <text:list-item>
              <text:h text:style-name="P217" text:outline-level="2"><text:soft-page-break/><text:alphabetical-index-mark-start text:id="IMark112348168"/>DEG<text:alphabetical-index-mark-end text:id="IMark112348168"/></text:h>
            </text:list-item>
          </text:list>
        </text:list-item>
      </text:list>
      <text:p text:style-name="P22">Type<text:tab/>Funktion : REAL</text:p>
      <text:p text:style-name="P22"><text:span text:style-name="T16">Input</text:span><text:tab/>Rad : REAL (Winkel in Bogenmaß)</text:p>
      <text:p text:style-name="P22">Output<text:tab/>REAL (Winkel in Grad)</text:p>
      <text:p text:style-name="P22"><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31"> sein darf. Wenn RAD größer als 2 ist wird entsprechend 2 abgezogen bis der Eingang RAD zwischen 0 und 2 liegt.</text:span></text:p>
      <text:p text:style-name="P22">DEG(<text:span text:style-name="T31">) = 180 Grad,<text:tab/>DEG(3) = 180 Grad</text:span></text:p>
      <text:p text:style-name="P53">DEG(0) = 0 Grad,<text:tab/>DEG(2) = 0 Grad</text:p>
      <text:list xml:id="list33624637" text:continue-numbering="true" text:style-name="L1">
        <text:list-item>
          <text:list>
            <text:list-item>
              <text:h text:style-name="P217" text:outline-level="2"><text:alphabetical-index-mark-start text:id="IMark112348168"/>DIFFER<text:alphabetical-index-mark-end text:id="IMark112348168"/></text:h>
            </text:list-item>
          </text:list>
        </text:list-item>
      </text:list>
      <text:p text:style-name="P22">Type<text:tab/>Funktion : BOOL</text:p>
      <text:p text:style-name="P22"><text:span text:style-name="T16">Input</text:span><text:tab/>In1 : REAL (Wert 1)</text:p>
      <text:p text:style-name="P22"><text:tab/>In2 : REAL (Wert 2)</text:p>
      <text:p text:style-name="P22"><text:tab/>X : REAL (Mindestunterschied in1 zu in2)</text:p>
      <text:p text:style-name="P22"><draw:frame draw:style-name="fr4" draw:name="Grafik3" text:anchor-type="paragraph" svg:x="0.99cm" svg:y="1.159cm" svg:width="2.731cm" svg:height="2.02cm" draw:z-index="213"><draw:image xlink:href="Pictures/10000000000000CE000000991839EDB4.png" xlink:type="simple" xlink:show="embed" xlink:actuate="onLoad"/></draw:frame>Output<text:tab/>BOOL (TRUE, wenn sich in1 und in2 um mehr als x voneinander <text:tab/>unterscheiden)</text:p>
      <text:p text:style-name="P22"><text:line-break/>Die Funktion DIFFER wird TRUE, wenn in1 und in2 sich durch mehr als X voneinander unterscheiden.</text:p>
      <text:p text:style-name="P52">DIFFER = ABS(IN1-IN2) &gt; X;</text:p>
      <text:p text:style-name="P22">Beispiel: <text:tab/><text:span text:style-name="T16">Differ</text:span>(100, 120, 10) ergibt TRUE</text:p>
      <text:p text:style-name="P22"><text:tab/><text:span text:style-name="T16">Differ</text:span>(100,110,15) ergibt FALSE</text:p>
      <text:list xml:id="list33630768" text:continue-numbering="true" text:style-name="L1">
        <text:list-item>
          <text:list>
            <text:list-item>
              <text:h text:style-name="P217" text:outline-level="2"><text:soft-page-break/><text:alphabetical-index-mark-start text:id="IMark112348168"/>ERF<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547" text:anchor-type="paragraph" svg:x="1.067cm" svg:y="0.667cm" svg:width="2.101cm" svg:height="0.99cm" draw:z-index="557"><draw:image xlink:href="Pictures/100000000000009F0000004B962FDC81.png" xlink:type="simple" xlink:show="embed" xlink:actuate="onLoad"/></draw:frame>Output<text:tab/>REAL (Ergebnis)</text:p>
      <text:p text:style-name="P52"><text:line-break/>Die Funktion ERF berechnet die Fehlerfunktion von X.</text:p>
      <text:list xml:id="list33627260" text:continue-numbering="true" text:style-name="L1">
        <text:list-item>
          <text:list>
            <text:list-item>
              <text:h text:style-name="P217" text:outline-level="2"><text:alphabetical-index-mark-start text:id="IMark112348168"/>ERFC<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548" text:anchor-type="paragraph" svg:x="1.046cm" svg:y="0.688cm" svg:width="2.499cm" svg:height="0.99cm" draw:z-index="558"><draw:image xlink:href="Pictures/10000000000000BD0000004B72567121.png" xlink:type="simple" xlink:show="embed" xlink:actuate="onLoad"/></draw:frame>Output<text:tab/>REAL (Ergebnis)</text:p>
      <text:p text:style-name="P52"><text:line-break/>Die Funktion ERFC berechnet die inverse Fehlerfunktion von X.</text:p>
      <text:list xml:id="list33629287" text:continue-numbering="true" text:style-name="L1">
        <text:list-item>
          <text:list>
            <text:list-item>
              <text:h text:style-name="P217" text:outline-level="2"><text:alphabetical-index-mark-start text:id="IMark112348168"/>EVEN<text:alphabetical-index-mark-end text:id="IMark112348168"/></text:h>
            </text:list-item>
          </text:list>
        </text:list-item>
      </text:list>
      <text:p text:style-name="P22">Type<text:tab/>Funktion : BOOL</text:p>
      <text:p text:style-name="P22"><text:span text:style-name="T16">Input</text:span><text:tab/>in : DINT (Eingangswert)</text:p>
      <text:p text:style-name="P22"><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22">Die Funktion <text:span text:style-name="T31">EVEN wird TRUE, wenn der Eingang in gerade ist und FALSE für ungerade in.</text:span></text:p>
      <text:p text:style-name="P22">Beispiel: <text:tab/>EVEN(2) ergibt TRUE</text:p>
      <text:p text:style-name="P53"><text:tab/>EVEN(3) ergibt FALSE</text:p>
      <text:list xml:id="list33654968" text:continue-numbering="true" text:style-name="L1">
        <text:list-item>
          <text:list>
            <text:list-item>
              <text:h text:style-name="P217" text:outline-level="2"><text:soft-page-break/><text:alphabetical-index-mark-start text:id="IMark112348168"/>EXP10<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389" text:anchor-type="paragraph" svg:x="1.046cm" svg:y="0.69cm" svg:width="2.9cm" svg:height="0.99cm" draw:z-index="384"><draw:image xlink:href="Pictures/10000000000000DB0000004B28084D9C.png" xlink:type="simple" xlink:show="embed" xlink:actuate="onLoad"/></draw:frame>Output<text:tab/>REAL (Exponentialfaktor zur Basis 10)</text:p>
      <text:p text:style-name="P22"><text:line-break/>Die Funktion <text:span text:style-name="T31">EXP10 liefert den Exponentialwert zur Basis 10.</text:span></text:p>
      <text:p text:style-name="P53">EXP10(2) = 100</text:p>
      <text:p text:style-name="P53">EXP10(0) = 1</text:p>
      <text:p text:style-name="P53">EXP10(3.14) = 1380.384265</text:p>
      <text:list xml:id="list33644111" text:continue-numbering="true" text:style-name="L1">
        <text:list-item>
          <text:list>
            <text:list-item>
              <text:h text:style-name="P217" text:outline-level="2"><text:alphabetical-index-mark-start text:id="IMark112348168"/>EXPN<text:alphabetical-index-mark-end text:id="IMark112348168"/></text:h>
            </text:list-item>
          </text:list>
        </text:list-item>
      </text:list>
      <text:p text:style-name="P22">Type<text:tab/>Funktion : REAL</text:p>
      <text:p text:style-name="P22"><text:span text:style-name="T16">Input</text:span><text:tab/>X : REAL (Eingangswert)</text:p>
      <text:p text:style-name="P52"><text:tab/>N : INT (Exponentialwert)</text:p>
      <text:p text:style-name="P23"><draw:frame draw:style-name="fr4" draw:name="Grafik391" text:anchor-type="paragraph" svg:x="1.023cm" svg:y="0.688cm" svg:width="2.499cm" svg:height="1.39cm" draw:z-index="386"><draw:image xlink:href="Pictures/10000000000000BD0000006984436BBF.png" xlink:type="simple" xlink:show="embed" xlink:actuate="onLoad"/></draw:frame>Output<text:tab/>REAL (Ergebnis X^N)</text:p>
      <text:p text:style-name="P53"><text:line-break/>EXPN berechnet den Exponentialwert von X^N für Ganzzahlige N. EXPN ist speziell für SPS ohne <text:span text:style-name="T16">Floating</text:span> <text:span text:style-name="T16">Point</text:span> <text:span text:style-name="T24">Einheit</text:span> geschrieben und ist ca. 30 mal schneller als die IEC Standard Funktion EXPT(). Zu beachten ist der Sonderfall das 0^0 wie mathematisch definiert eine 1 ergibt und nicht eine 0.</text:p>
      <text:p text:style-name="P53">EXPN(10,-2) = 0.01</text:p>
      <text:p text:style-name="P53">EXPN(1.5,2) = 2.25</text:p>
      <text:p text:style-name="P53">EXPN(0,0) = 1</text:p>
      <text:list xml:id="list33632748" text:continue-numbering="true" text:style-name="L1">
        <text:list-item>
          <text:list>
            <text:list-item>
              <text:h text:style-name="P217" text:outline-level="2"><text:soft-page-break/><text:alphabetical-index-mark-start text:id="IMark112348168"/>FACT<text:alphabetical-index-mark-end text:id="IMark112348168"/></text:h>
            </text:list-item>
          </text:list>
        </text:list-item>
      </text:list>
      <text:p text:style-name="P22">Type<text:tab/>Funktion : DINT</text:p>
      <text:p text:style-name="P22"><text:span text:style-name="T16">Input</text:span><text:tab/>X : INT (Eingangswert)</text:p>
      <text:p text:style-name="P22"><draw:frame draw:style-name="fr4"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22"><text:line-break/>Die Funktion <text:span text:style-name="T31">FACT berechnet die Fakultät von X.</text:span></text:p>
      <text:p text:style-name="P23">Sie ist definiert für Eingangswerte von 0 .. 12. Für Werte kleiner Null und größer 12 wird das Ergebnis -1. für die Fakultät von größeren Zahlen ist die Funktion GAMMA geeignet.</text:p>
      <text:p text:style-name="P23">Für natürliche Zahlen X ist: <text:tab/>X! = 1*2*3...*(X-1)*X, <text:tab/>0! = 1</text:p>
      <text:p text:style-name="P22">Fakultäten für negative oder nicht ganze Zahlen sind nicht definiert.</text:p>
      <text:p text:style-name="P22">Beispiel:<text:tab/>1! = 1</text:p>
      <text:p text:style-name="P22"><text:tab/>2! = 1*2 = 2</text:p>
      <text:p text:style-name="P22"><text:tab/>5! = 1*2*3*4*5 = 120</text:p>
      <text:list xml:id="list33646132" text:continue-numbering="true" text:style-name="L1">
        <text:list-item>
          <text:list>
            <text:list-item>
              <text:h text:style-name="P217" text:outline-level="2"><text:alphabetical-index-mark-start text:id="IMark112348168"/>FIB<text:alphabetical-index-mark-end text:id="IMark112348168"/></text:h>
            </text:list-item>
          </text:list>
        </text:list-item>
      </text:list>
      <text:p text:style-name="P22">Type<text:tab/>Funktion : DINT</text:p>
      <text:p text:style-name="P52"><text:span text:style-name="T16">Input</text:span><text:tab/>X : INT (Eingangswert)</text:p>
      <text:p text:style-name="P22">Output<text:tab/>DINT (Fibonacci Zahl)</text:p>
      <text:p text:style-name="P52"><draw:frame draw:style-name="fr4" draw:name="Grafik422" text:anchor-type="paragraph" svg:x="1.046cm" svg:y="0.034cm" svg:width="2.101cm" svg:height="0.99cm" draw:z-index="425"><draw:image xlink:href="Pictures/100000000000009F0000004BCC45FD77.png" xlink:type="simple" xlink:show="embed" xlink:actuate="onLoad"/></draw:frame><text:line-break/>FIB berechnet die Fibonacci Zahl. Die Fibonacci Zahl ist wie folgt definiert:</text:p>
      <text:p text:style-name="P52">FIB(0) = 0, FIB(1) = 1, FIB(2) = 1, FIB(3) = 2, FIB(4) = 3, FIB(5) = 5 .....</text:p>
      <text:p text:style-name="P52">Die Fibonacci Zahl von X ist gleich der Summe der Fibonacci Zahlen von X-1 und X-2. Die Funktion kann die Fibonacci Zahlen bis 46 berechnen, ist X &lt; 0 oder Größer als 46 gibt die Funktion -1 zurück.</text:p>
      <text:list xml:id="list33650570" text:continue-numbering="true" text:style-name="L1">
        <text:list-item>
          <text:list>
            <text:list-item>
              <text:h text:style-name="P217" text:outline-level="2"><text:soft-page-break/><text:alphabetical-index-mark-start text:id="IMark112348168"/>FLOOR<text:alphabetical-index-mark-end text:id="IMark112348168"/></text:h>
            </text:list-item>
          </text:list>
        </text:list-item>
      </text:list>
      <text:p text:style-name="P22">Type<text:tab/>Funktion : INT</text:p>
      <text:p text:style-name="P52"><text:span text:style-name="T16">Input</text:span><text:tab/>X : REAL (Eingangswert)</text:p>
      <text:p text:style-name="P22"><draw:frame draw:style-name="fr4" draw:name="Grafik268" text:anchor-type="paragraph" svg:x="1.014cm" svg:y="0.693cm" svg:width="2.281cm" svg:height="1.12cm" draw:z-index="236"><draw:image xlink:href="Pictures/10000000000000AC00000055C21CD1DF.png" xlink:type="simple" xlink:show="embed" xlink:actuate="onLoad"/></draw:frame>Output<text:tab/>INT (Ausgangswert)</text:p>
      <text:p text:style-name="P52"><text:line-break/>Die Funktion FLOOR gibt den größten ganzzahligen Wert kleiner gleich X zurück.</text:p>
      <text:p text:style-name="P22">Beispiel:<text:tab/>FLOOR(3.14) = 3</text:p>
      <text:p text:style-name="P22"><text:tab/>FLOOR(-3.14) = -4</text:p>
      <text:p text:style-name="P52"><text:tab/>FLOOR(2) = 2</text:p>
      <text:list xml:id="list33638084" text:continue-numbering="true" text:style-name="L1">
        <text:list-item>
          <text:list>
            <text:list-item>
              <text:h text:style-name="P217" text:outline-level="2"><text:alphabetical-index-mark-start text:id="IMark112348168"/>FLOOR2<text:alphabetical-index-mark-end text:id="IMark112348168"/></text:h>
            </text:list-item>
          </text:list>
        </text:list-item>
      </text:list>
      <text:p text:style-name="P22">Type<text:tab/>Funktion : DINT</text:p>
      <text:p text:style-name="P52"><text:span text:style-name="T16">Input</text:span><text:tab/>X : REAL (Eingangswert)</text:p>
      <text:p text:style-name="P22"><draw:frame draw:style-name="fr4" draw:name="Grafik534" text:anchor-type="paragraph" svg:x="1.046cm" svg:y="0.667cm" svg:width="3.6cm" svg:height="0.99cm" draw:z-index="543"><draw:image xlink:href="Pictures/10000000000001100000004B1CC1A5BB.png" xlink:type="simple" xlink:show="embed" xlink:actuate="onLoad"/></draw:frame>Output<text:tab/>DINT (Ausgangswert)</text:p>
      <text:p text:style-name="P52"><text:line-break/>Die Funktion FLOOR2 gibt den größten ganzzahligen Wert kleiner gleich X zurück.</text:p>
      <text:p text:style-name="P22">Beispiel:<text:tab/>FLOOR2(3.14) = 3</text:p>
      <text:p text:style-name="P22"><text:tab/>FLOOR2(-3.14) = -4</text:p>
      <text:p text:style-name="P52"><text:tab/>FLOOR2(2) = 2</text:p>
      <text:p text:style-name="P52"/>
      <text:p text:style-name="P52"/>
      <text:list xml:id="list33646174" text:continue-numbering="true" text:style-name="L1">
        <text:list-item>
          <text:list>
            <text:list-item>
              <text:h text:style-name="P217" text:outline-level="2"><text:soft-page-break/><text:alphabetical-index-mark-start text:id="IMark112348168"/>FRACT<text:alphabetical-index-mark-end text:id="IMark112348168"/></text:h>
            </text:list-item>
          </text:list>
        </text:list-item>
      </text:list>
      <text:p text:style-name="P22">Type<text:tab/>Funktion : REAL</text:p>
      <text:p text:style-name="P22"><text:span text:style-name="T16">Input</text:span><text:tab/><text:span text:style-name="T16">X</text:span> : REAL (Eingangswert)</text:p>
      <text:p text:style-name="P22"><draw:frame draw:style-name="fr4" draw:name="Grafik525" text:anchor-type="paragraph" svg:x="1.046cm" svg:y="0.644cm" svg:width="3.2cm" svg:height="0.99cm" draw:z-index="532"><draw:image xlink:href="Pictures/10000000000000F20000004B2EC51BEC.png" xlink:type="simple" xlink:show="embed" xlink:actuate="onLoad"/></draw:frame>Output<text:tab/>REAL (Nachkommateil von X)</text:p>
      <text:p text:style-name="P52"><text:line-break/>Die Funktion <text:span text:style-name="T31">FRACT liefert den Nachkommateil von X</text:span><text:span text:style-name="T18">.</text:span></text:p>
      <text:p text:style-name="P23">Beispiel:<text:tab/>FRACT(3.14) ergibt 0.14. </text:p>
      <text:p text:style-name="P53">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xml:id="list33643255" text:continue-numbering="true" text:style-name="L1">
        <text:list-item>
          <text:list>
            <text:list-item>
              <text:h text:style-name="P217" text:outline-level="2"><text:alphabetical-index-mark-start text:id="IMark112348168"/>GAMMA<text:alphabetical-index-mark-end text:id="IMark112348168"/></text:h>
            </text:list-item>
          </text:list>
        </text:list-item>
      </text:list>
      <text:p text:style-name="P22">Type<text:tab/>Funktion : REAL</text:p>
      <text:p text:style-name="P22"><text:span text:style-name="T16">Input</text:span><text:tab/>X : REAL (Eingangswert)</text:p>
      <text:p text:style-name="P23"><draw:frame draw:style-name="fr4" draw:name="Grafik394" text:anchor-type="paragraph" svg:x="1.067cm" svg:y="0.69cm" svg:width="2.9cm" svg:height="0.99cm" draw:z-index="390"><draw:image xlink:href="Pictures/10000000000000DB0000004BA1D74E86.png" xlink:type="simple" xlink:show="embed" xlink:actuate="onLoad"/></draw:frame>Output<text:tab/>REAL (Gamma Funktion)</text:p>
      <text:p text:style-name="P53"><text:line-break/>Die Funktion GAMMA berechnet die Gamma Funktion nach der Näherungsformel von Stirling.</text:p>
      <text:p text:style-name="P53">GAMMA := SQRT(2*PI*X) * EXPT( X / E, X).</text:p>
      <text:p text:style-name="P53">Die Gamma Funktion kann für Ganzzahlige X als Ersatz für Die Fakultät verwendet werden. Der Relative Fehler der <text:span text:style-name="T16">Stirling</text:span> Funktion ist für X &gt; 9 kleiner als 1% und für X &gt; 84 kleiner als 0.1%</text:p>
      <text:list xml:id="list33640830" text:continue-numbering="true" text:style-name="L1">
        <text:list-item>
          <text:list>
            <text:list-item>
              <text:h text:style-name="P217" text:outline-level="2"><text:soft-page-break/><text:alphabetical-index-mark-start text:id="IMark112348168"/>GAUSS<text:alphabetical-index-mark-end text:id="IMark112348168"/></text:h>
            </text:list-item>
          </text:list>
        </text:list-item>
      </text:list>
      <text:p text:style-name="P22">Type<text:tab/>Funktion : REAL</text:p>
      <text:p text:style-name="P22"><text:span text:style-name="T16">Input</text:span><text:tab/>X : REAL (Eingangswert)</text:p>
      <text:p text:style-name="P52"><text:tab/>U : REAL (Lokalität der Funktion)</text:p>
      <text:p text:style-name="P52"><text:tab/>SI : REAL (Sigma, Spreizung der Funktion)</text:p>
      <text:p text:style-name="P23"><draw:frame draw:style-name="fr4" draw:name="Grafik546" text:anchor-type="paragraph" svg:x="1.025cm" svg:y="0.667cm" svg:width="3.069cm" svg:height="1.79cm" draw:z-index="556"><draw:image xlink:href="Pictures/10000000000000E800000087585A583F.png" xlink:type="simple" xlink:show="embed" xlink:actuate="onLoad"/></draw:frame>Output<text:tab/>REAL (Gauss Funktion)</text:p>
      <text:p text:style-name="P53"><text:line-break/>Die Funktion GAUSS berechnet die Normalverteilung nach folgender Formel:</text:p>
      <text:p text:style-name="P53">GAUSS := 1/(SI*SQRT(2*PI)) * EXP(1/2 * ((x-u)/SI)²).</text:p>
      <text:p text:style-name="P53">Die Normalverteilung ist die Dichtefunktion Normalverteilter Zufallsgrößen. Mit den Parameter U = 0 und SI = 1 entspricht sie der Standard Normalverteilung.</text:p>
      <text:list xml:id="list33637814" text:continue-numbering="true" text:style-name="L1">
        <text:list-item>
          <text:list>
            <text:list-item>
              <text:h text:style-name="P217" text:outline-level="2"><text:alphabetical-index-mark-start text:id="IMark112348168"/>GAUSSCD<text:alphabetical-index-mark-end text:id="IMark112348168"/></text:h>
            </text:list-item>
          </text:list>
        </text:list-item>
      </text:list>
      <text:p text:style-name="P22">Type<text:tab/>Funktion : REAL</text:p>
      <text:p text:style-name="P22"><text:span text:style-name="T16">Input</text:span><text:tab/>X : REAL (Eingangswert)</text:p>
      <text:p text:style-name="P52"><text:tab/>U : REAL (Lokalität der Funktion)</text:p>
      <text:p text:style-name="P52"><text:tab/>SI : REAL (Sigma, Spreizung der Funktion)</text:p>
      <text:p text:style-name="P23"><draw:frame draw:style-name="fr4" draw:name="Grafik549" text:anchor-type="paragraph" svg:x="0.979cm" svg:y="0.688cm" svg:width="3.69cm" svg:height="1.79cm" draw:z-index="559"><draw:image xlink:href="Pictures/100000000000011700000087591522CC.png" xlink:type="simple" xlink:show="embed" xlink:actuate="onLoad"/></draw:frame>Output<text:tab/>REAL (Gauss Verteilungsfunktion)</text:p>
      <text:p text:style-name="P53"><text:line-break/>Die Funktion GAUSSCD berechnet die Verteilungsfunktion zur Normalverteilung nach folgender Formel:</text:p>
      <text:p text:style-name="P53">GAUSSCD := 1/2 * (1 + ERF((X-U)((SI*SQRT(PI))).</text:p>
      <text:p text:style-name="P53">Die Normalverteilung ist die Dichtefunktion Normalverteilter Zufallsgrößen. Mit den Parameter U = 0 und SI = 1 entspricht sie der Standard Normalverteilung. Die Verteilungsfunktion (<text:span text:style-name="T16">Cumulative</text:span> Distribution <text:span text:style-name="T16">Function</text:span>).</text:p>
      <text:list xml:id="list33629098" text:continue-numbering="true" text:style-name="L1">
        <text:list-item>
          <text:list>
            <text:list-item>
              <text:h text:style-name="P217" text:outline-level="2"><text:soft-page-break/><text:alphabetical-index-mark-start text:id="IMark112348168"/>GDF<text:alphabetical-index-mark-end text:id="IMark112348168"/></text:h>
            </text:list-item>
          </text:list>
        </text:list-item>
      </text:list>
      <text:p text:style-name="P22">Type<text:tab/>Funktion : REAL</text:p>
      <text:p text:style-name="P22"><text:span text:style-name="T16">Input</text:span><text:tab/>X : REAL (Eingangswert)</text:p>
      <text:p text:style-name="P53"><draw:frame draw:style-name="fr4" draw:name="Grafik561" text:anchor-type="paragraph" svg:x="1.067cm" svg:y="0.69cm" svg:width="2.101cm" svg:height="0.99cm" draw:z-index="572"><draw:image xlink:href="Pictures/100000000000009F0000004BC72D259E.png" xlink:type="simple" xlink:show="embed" xlink:actuate="onLoad"/></draw:frame>Output<text:tab/>REAL (Gundermannfunktion)</text:p>
      <text:p text:style-name="P53"><text:line-break/>GDF berechnet die Gundermannfunktion.</text:p>
      <text:p text:style-name="P53">Die Berechnung erfolgt nach der Formel GDF := 2 * ATAN(E^X) - /2.</text:p>
      <text:p text:style-name="P53">Das Ergebnis von GDF liegt zwischen -/2 und +/2.</text:p>
      <text:p text:style-name="P53">GDF(0) = 0</text:p>
      <text:list xml:id="list33641528" text:continue-numbering="true" text:style-name="L1">
        <text:list-item>
          <text:list>
            <text:list-item>
              <text:h text:style-name="P217" text:outline-level="2"><text:alphabetical-index-mark-start text:id="IMark112348168"/>GOLD<text:alphabetical-index-mark-end text:id="IMark112348168"/></text:h>
            </text:list-item>
          </text:list>
        </text:list-item>
      </text:list>
      <text:p text:style-name="P22">Type<text:tab/>Funktion : REAL</text:p>
      <text:p text:style-name="P22"><text:span text:style-name="T16">Input</text:span><text:tab/>X : REAL (Eingangswert)</text:p>
      <text:p text:style-name="P53"><draw:frame draw:style-name="fr4" draw:name="Grafik563" text:anchor-type="paragraph" svg:x="1.067cm" svg:y="0.679cm" svg:width="2.499cm" svg:height="0.99cm" draw:z-index="574"><draw:image xlink:href="Pictures/10000000000000BD0000004B957390A6.png" xlink:type="simple" xlink:show="embed" xlink:actuate="onLoad"/></draw:frame>Output<text:tab/>REAL (Ergebnis der Goldenen Funktion)</text:p>
      <text:p text:style-name="P53"><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53">Die Berechnung erfolgt nach der Formel GOLD := (X + SQRT(X² + 4)) / 2.</text:p>
      <text:p text:style-name="P53"/>
      <text:p text:style-name="P53"/>
      <text:p text:style-name="P53"/>
      <text:p text:style-name="P53"/>
      <text:list xml:id="list33633489" text:continue-numbering="true" text:style-name="L1">
        <text:list-item>
          <text:list>
            <text:list-item>
              <text:h text:style-name="P217" text:outline-level="2"><text:soft-page-break/><text:alphabetical-index-mark-start text:id="IMark112348168"/>HYPOT<text:alphabetical-index-mark-end text:id="IMark112348168"/></text:h>
            </text:list-item>
          </text:list>
        </text:list-item>
      </text:list>
      <text:p text:style-name="P22">Type<text:tab/>Funktion : REAL</text:p>
      <text:p text:style-name="P22"><text:span text:style-name="T16">Input</text:span><text:tab/>X : REAL (X - Wert)</text:p>
      <text:p text:style-name="P52"><text:tab/>Y : REAL (Y - Wert)</text:p>
      <text:p text:style-name="P23"><draw:frame draw:style-name="fr4" draw:name="Grafik450" text:anchor-type="paragraph" svg:x="1.069cm" svg:y="0.69cm" svg:width="3.069cm" svg:height="1.39cm" draw:z-index="457"><draw:image xlink:href="Pictures/10000000000000E8000000695ECE4886.png" xlink:type="simple" xlink:show="embed" xlink:actuate="onLoad"/></draw:frame>Output<text:tab/>REAL (Länge der Hypotenuse)</text:p>
      <text:p text:style-name="P53"><text:line-break/>Die Funktion HYPOT berechnet die Hypotenuse eines Rechtwinkeligen Dreiecks nach dem Satz des Pythagoras.</text:p>
      <text:p text:style-name="P53">HYPOT = SQRT(X² + Y²)</text:p>
      <text:list xml:id="list33654782" text:continue-numbering="true" text:style-name="L1">
        <text:list-item>
          <text:list>
            <text:list-item>
              <text:h text:style-name="P217" text:outline-level="2"><text:alphabetical-index-mark-start text:id="IMark112348168"/>INC<text:alphabetical-index-mark-end text:id="IMark112348168"/></text:h>
            </text:list-item>
          </text:list>
        </text:list-item>
      </text:list>
      <text:p text:style-name="P22">Type<text:tab/>Funktion : INT</text:p>
      <text:p text:style-name="P22"><text:span text:style-name="T16">Input</text:span><text:tab/>X : INT (Eingangswert)</text:p>
      <text:p text:style-name="P52"><text:tab/>D : INT (Wert, der zum Eingangswert addiert wird)</text:p>
      <text:p text:style-name="P52"><text:tab/>M : INT (Maximalwert für den Ausgang)</text:p>
      <text:p text:style-name="P23"><draw:frame draw:style-name="fr4" draw:name="Grafik266" text:anchor-type="paragraph" svg:x="1.088cm" svg:y="0.699cm" svg:width="1.829cm" svg:height="2.02cm" draw:z-index="234"><draw:image xlink:href="Pictures/100000000000008A000000999067DF01.png" xlink:type="simple" xlink:show="embed" xlink:actuate="onLoad"/></draw:frame>Output<text:tab/>INT (Ausgangswert)</text:p>
      <text:p text:style-name="P171"><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53">INC := X + D, weil D maximal den Wert M annehmen kann.</text:p>
      <text:p text:style-name="P53">Wird INC &gt; M so beginnt INC wieder bei 0.</text:p>
      <text:p text:style-name="P53"><text:soft-page-break/>Wird INC &lt; 0 so beginnt INC wieder bei M</text:p>
      <text:p text:style-name="P23">Beispiel:<text:tab/>INC(3, 2, 5) ergibt 5</text:p>
      <text:p text:style-name="P23"><text:tab/>INC(4, 2, 5) ergibt 0</text:p>
      <text:p text:style-name="P53"><text:tab/>INC(0,-1,7) ergibt 7</text:p>
      <text:list xml:id="list33655955" text:continue-numbering="true" text:style-name="L1">
        <text:list-item>
          <text:list>
            <text:list-item>
              <text:h text:style-name="P217" text:outline-level="2"><text:alphabetical-index-mark-start text:id="IMark112348168"/>INC2<text:alphabetical-index-mark-end text:id="IMark112348168"/></text:h>
            </text:list-item>
          </text:list>
        </text:list-item>
      </text:list>
      <text:p text:style-name="P22">Type<text:tab/>Funktion : INT</text:p>
      <text:p text:style-name="P22"><text:span text:style-name="T16">Input</text:span><text:tab/>X : INT (Eingangswert)</text:p>
      <text:p text:style-name="P52"><text:tab/>D : INT (Wert, der zum Eingangswert addiert wird)</text:p>
      <text:p text:style-name="P52"><text:tab/>L : INT (unterer Grenzwert)</text:p>
      <text:p text:style-name="P52"><text:tab/>U : INT (oberer Grenzwert)</text:p>
      <text:p text:style-name="P23"><draw:frame draw:style-name="fr4" draw:name="Grafik661" text:anchor-type="paragraph" svg:x="1.002cm" svg:y="0.667cm" svg:width="2.499cm" svg:height="2.18cm" draw:z-index="681"><draw:image xlink:href="Pictures/10000000000000BD000000A5E0633009.png" xlink:type="simple" xlink:show="embed" xlink:actuate="onLoad"/></draw:frame>Output<text:tab/>INT (Ausgangswert)</text:p>
      <text:p text:style-name="P171"><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53">INC2 := X + D, wobei L &lt;= INC2 &lt;= U gilt. </text:p>
      <text:p text:style-name="P53">Beispiel:<text:tab/>INC2(2, 2, -1, 3) ergibt -1</text:p>
      <text:p text:style-name="P23"><text:tab/>INC2(2, -2, -1, 3) ergibt 0</text:p>
      <text:p text:style-name="P53"><text:tab/>INC2(2, 1, -1, 3) ergibt 3</text:p>
      <text:p text:style-name="P53"><text:tab/>INC2(0, -2, -1, 3) ergibt 3</text:p>
      <text:list xml:id="list33631683" text:continue-numbering="true" text:style-name="L1">
        <text:list-item>
          <text:list>
            <text:list-item>
              <text:h text:style-name="P217" text:outline-level="2"><text:soft-page-break/><text:alphabetical-index-mark-start text:id="IMark112348168"/>LANGEVIN<text:alphabetical-index-mark-end text:id="IMark112348168"/></text:h>
            </text:list-item>
          </text:list>
        </text:list-item>
      </text:list>
      <text:p text:style-name="P22">Type<text:tab/>Funktion : REAL</text:p>
      <text:p text:style-name="P52"><text:span text:style-name="T16">Input</text:span><text:tab/>X : REAL (Eingangswert)</text:p>
      <text:p text:style-name="P53"><draw:frame draw:style-name="fr4" draw:name="Grafik397" text:anchor-type="paragraph" svg:x="1.069cm" svg:y="0.69cm" svg:width="3.69cm" svg:height="0.99cm" draw:z-index="393"><draw:image xlink:href="Pictures/10000000000001170000004B30B6B040.png" xlink:type="simple" xlink:show="embed" xlink:actuate="onLoad"/></draw:frame>Output<text:tab/>REAL (Ausgangswert)</text:p>
      <text:p text:style-name="P53"><text:line-break/>Die <text:span text:style-name="T24">Langevin</text:span> Funktion ist der Sigmoidfunktion sehr ähnlich, nähert sich aber langsamer den Grenzwerten an. Im Gegensatz zur Sigmoidfunktion <text:s/>liegen die Grenzwerte bei -1 und +1. Die Langevin Funktion ist vor allem auf CPUs ohne Gleitkommaeinheit deutlich schneller als die <text:span text:style-name="T24">Sigmoidfunktion.</text:span></text:p>
      <text:p text:style-name="P53"><draw:frame draw:style-name="fr4" draw:name="Grafik398" text:anchor-type="paragraph" svg:x="1.046cm" svg:y="0.667cm" svg:width="7.92cm" svg:height="4.74cm" draw:z-index="394"><draw:image xlink:href="Pictures/100000000000018F000000EF2DA25492.png" xlink:type="simple" xlink:show="embed" xlink:actuate="onLoad"/></draw:frame>Die folgende Grafik verdeutlicht den Verlauf der Langevin Funktion:</text:p>
      <text:p text:style-name="P53"/>
      <text:list xml:id="list33653237" text:continue-numbering="true" text:style-name="L1">
        <text:list-item>
          <text:list>
            <text:list-item>
              <text:h text:style-name="P217" text:outline-level="2"><text:alphabetical-index-mark-start text:id="IMark112348168"/>MAX3<text:alphabetical-index-mark-end text:id="IMark112348168"/></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7" text:anchor-type="paragraph" svg:x="1.004cm" svg:y="0.688cm" svg:width="2.731cm" svg:height="2.02cm" draw:z-index="3"><draw:image xlink:href="Pictures/10000000000000CE0000009977E41C54.png" xlink:type="simple" xlink:show="embed" xlink:actuate="onLoad"/></draw:frame>Output<text:tab/>REAL (Maximalwert der 3 Eingänge in1, in2, in3)</text:p>
      <text:p text:style-name="P22"><text:soft-page-break/><text:line-break/>Die Funktion <text:span text:style-name="T31">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23">Beispiel:<text:tab/>MAX3(1,3,2) = 3.</text:p>
      <text:list xml:id="list33640672" text:continue-numbering="true" text:style-name="L1">
        <text:list-item>
          <text:list>
            <text:list-item>
              <text:h text:style-name="P217" text:outline-level="2"><text:alphabetical-index-mark-start text:id="IMark112348168"/>MIN3<text:alphabetical-index-mark-end text:id="IMark112348168"/></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8" text:anchor-type="paragraph" svg:x="0.988cm" svg:y="0.663cm" svg:width="2.731cm" svg:height="2.02cm" draw:z-index="4"><draw:image xlink:href="Pictures/10000000000000CE00000099EEC65A2D.png" xlink:type="simple" xlink:show="embed" xlink:actuate="onLoad"/></draw:frame>Output<text:tab/>REAL (Minimalwert der 3 Eingänge in1, in2, in3)</text:p>
      <text:p text:style-name="P22"><text:line-break/>Die Funktion <text:span text:style-name="T31">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23">Beispiel:<text:tab/>MIN3(1,3,2) = 1.</text:p>
      <text:p text:style-name="P53"/>
      <text:p text:style-name="P53"/>
      <text:p text:style-name="P53"/>
      <text:p text:style-name="P53"/>
      <text:p text:style-name="P53"/>
      <text:list xml:id="list33647016" text:continue-numbering="true" text:style-name="L1">
        <text:list-item>
          <text:list>
            <text:list-item>
              <text:h text:style-name="P217" text:outline-level="2"><text:soft-page-break/><text:alphabetical-index-mark-start text:id="IMark112348168"/>MID3<text:alphabetical-index-mark-end text:id="IMark112348168"/></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9" text:anchor-type="paragraph" svg:x="1.016cm" svg:y="0.607cm" svg:width="2.731cm" svg:height="2.02cm" draw:z-index="5"><draw:image xlink:href="Pictures/10000000000000CE000000998E173767.png" xlink:type="simple" xlink:show="embed" xlink:actuate="onLoad"/></draw:frame>Output<text:tab/>REAL (Mittlerer Wert der 3 Eingänge in1, in2, in3)</text:p>
      <text:p text:style-name="P22"><text:line-break/>Die Funktion <text:span text:style-name="T31">MID3 liefert den mittleren Wert von 3 Eingängen, nicht aber den Mathematischen Mittelwert.</text:span></text:p>
      <text:p text:style-name="P23">Beispiel:<text:tab/>MID3(1,5,2) = 2.</text:p>
      <text:list xml:id="list33625850" text:continue-numbering="true" text:style-name="L1">
        <text:list-item>
          <text:list>
            <text:list-item>
              <text:h text:style-name="P217" text:outline-level="2"><text:alphabetical-index-mark-start text:id="IMark112348168"/>MODR<text:alphabetical-index-mark-end text:id="IMark112348168"/></text:h>
            </text:list-item>
          </text:list>
        </text:list-item>
      </text:list>
      <text:p text:style-name="P22">Type<text:tab/>Funktion : REAL</text:p>
      <text:p text:style-name="P22"><text:span text:style-name="T16">Input</text:span><text:tab/>IN : REAL (Dividend)</text:p>
      <text:p text:style-name="P22"><text:tab/>DIVI : REAL (Divisor)</text:p>
      <text:p text:style-name="P22"><draw:frame draw:style-name="fr4"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22"><text:line-break/>Die Funktion <text:span text:style-name="T31">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23">Beispiel:<text:tab/>MODR(5.5, 2.5) ergibt 0.5.</text:p>
      <text:list xml:id="list33640334" text:continue-numbering="true" text:style-name="L1">
        <text:list-item>
          <text:list>
            <text:list-item>
              <text:h text:style-name="P217" text:outline-level="2"><text:soft-page-break/><text:alphabetical-index-mark-start text:id="IMark112348168"/>MUL_ADD<text:alphabetical-index-mark-end text:id="IMark112348168"/></text:h>
            </text:list-item>
          </text:list>
        </text:list-item>
      </text:list>
      <text:p text:style-name="P22">Type<text:tab/>Funktion : REAL</text:p>
      <text:p text:style-name="P22"><text:span text:style-name="T16">Input</text:span><text:tab/>X : REAL (Eingangswert)</text:p>
      <text:p text:style-name="P22"><text:tab/>K : REAL (Multiplikator)</text:p>
      <text:p text:style-name="P52"><text:tab/>O : REAL (Offset)</text:p>
      <text:p text:style-name="P23"><draw:frame draw:style-name="fr4" draw:name="Grafik288" text:anchor-type="paragraph" svg:x="1.108cm" svg:y="0.676cm" svg:width="4.069cm" svg:height="2.02cm" draw:z-index="257"><draw:image xlink:href="Pictures/1000000000000134000000997A29038C.png" xlink:type="simple" xlink:show="embed" xlink:actuate="onLoad"/></draw:frame>Output<text:tab/>: REAL (Ausgangswert)</text:p>
      <text:p text:style-name="P171"><text:line-break/>MUL_ADD multipliziert den Eingangswert X mit K und addiert O hinzu.</text:p>
      <text:p text:style-name="P24">MUL_ADD = X * K + O.<text:line-break/>MUL_ADD(0.5, 10, 2) ergibt 0.5 * 10 + 2 = 7.</text:p>
      <text:list xml:id="list33631730" text:continue-numbering="true" text:style-name="L1">
        <text:list-item>
          <text:list>
            <text:list-item>
              <text:h text:style-name="P217" text:outline-level="2"><text:alphabetical-index-mark-start text:id="IMark112348168"/>NEG<text:alphabetical-index-mark-end text:id="IMark112348168"/></text:h>
            </text:list-item>
          </text:list>
        </text:list-item>
      </text:list>
      <text:p text:style-name="P22">Type<text:tab/>Funktion : INT</text:p>
      <text:p text:style-name="P52"><text:span text:style-name="T16">Input</text:span><text:tab/>IN : INT (Eingangswert)</text:p>
      <text:p text:style-name="P22"><draw:frame draw:style-name="fr4" draw:name="Grafik385" text:anchor-type="paragraph" svg:x="1.067cm" svg:y="0.667cm" svg:width="2.101cm" svg:height="0.99cm" draw:z-index="379"><draw:image xlink:href="Pictures/100000000000009F0000004B357436C6.png" xlink:type="simple" xlink:show="embed" xlink:actuate="onLoad"/></draw:frame>Output<text:tab/>INT (Ausgangswert)</text:p>
      <text:p text:style-name="P24"><text:line-break/>NEG liefert am Ausgang den Eingangswert IN multipliziert mit -1.</text:p>
      <text:p text:style-name="P54">NEG(-3) = 3</text:p>
      <text:p text:style-name="P54">NEG(15) = -15</text:p>
      <text:p text:style-name="P54">NEG(0) = 0</text:p>
      <text:list xml:id="list33643878" text:continue-numbering="true" text:style-name="L1">
        <text:list-item>
          <text:list>
            <text:list-item>
              <text:h text:style-name="P217" text:outline-level="2"><text:soft-page-break/><text:alphabetical-index-mark-start text:id="IMark112348168"/>RAD<text:alphabetical-index-mark-end text:id="IMark112348168"/></text:h>
            </text:list-item>
          </text:list>
        </text:list-item>
      </text:list>
      <text:p text:style-name="P22">Type<text:tab/>Funktion : REAL</text:p>
      <text:p text:style-name="P22"><text:span text:style-name="T16">Input</text:span><text:tab/>DEG : REAL (Winkel in Grad)</text:p>
      <text:p text:style-name="P22"><draw:frame draw:style-name="fr4" draw:name="Grafik2" text:anchor-type="paragraph" svg:x="1.065cm" svg:y="0.674cm" svg:width="2.281cm" svg:height="1.12cm" draw:z-index="137"><draw:image xlink:href="Pictures/10000000000000AC0000005599DCB18F.png" xlink:type="simple" xlink:show="embed" xlink:actuate="onLoad"/></draw:frame>Output<text:tab/>REAL (Winkel in Bogenmaß)</text:p>
      <text:p text:style-name="P23"><text:line-break/>Die Funktion RAD konvertiert einen Winkelwert von Gradmaß in Bogenmaß. Dabei wird berücksichtigt das DEG nicht größer als 360 sein darf. Wenn DEG größer als 360 ist wird solange 360 abgezogen bis DEG zwischen 0 und 360 liegt.</text:p>
      <text:p text:style-name="P54">Rad(0) = 0<text:line-break/>RAD(180) = <text:line-break/>RAD(360) = 0<text:line-break/>RAD(540) = </text:p>
      <text:list xml:id="list33654378" text:continue-numbering="true" text:style-name="L1">
        <text:list-item>
          <text:list>
            <text:list-item>
              <text:h text:style-name="P217" text:outline-level="2"><text:alphabetical-index-mark-start text:id="IMark112348168"/>RDM<text:alphabetical-index-mark-end text:id="IMark112348168"/></text:h>
            </text:list-item>
          </text:list>
        </text:list-item>
      </text:list>
      <text:p text:style-name="P22">Type<text:tab/>Funktion : REAL</text:p>
      <text:p text:style-name="P22"><text:span text:style-name="T16">Input</text:span><text:tab/>LAST : REAL (Letzter berechneter Wert)</text:p>
      <text:p text:style-name="P23"><draw:frame draw:style-name="fr4" draw:name="Grafik229" text:anchor-type="paragraph" svg:x="1.101cm" svg:y="0.651cm" svg:width="2.78cm" svg:height="1.12cm" draw:z-index="202"><draw:image xlink:href="Pictures/10000000000000D200000055326C5BC3.png" xlink:type="simple" xlink:show="embed" xlink:actuate="onLoad"/></draw:frame>Output<text:tab/>REAL (Zufallszahl zwischen 0 und 1)</text:p>
      <text:p text:style-name="P171"><text:line-break/>RDM berechnet eine P<text:span text:style-name="T16">seudo-</text:span>Zufallszahl. Dazu wird der SPS-interne <text:span text:style-name="T16">Timer</text:span>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6">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xml:id="list33644480" text:continue-numbering="true" text:style-name="L1">
        <text:list-item>
          <text:list>
            <text:list-item>
              <text:h text:style-name="P217" text:outline-level="2"><text:soft-page-break/><text:alphabetical-index-mark-start text:id="IMark112348168"/>RDM2<text:alphabetical-index-mark-end text:id="IMark112348168"/></text:h>
            </text:list-item>
          </text:list>
        </text:list-item>
      </text:list>
      <text:p text:style-name="P22">Type<text:tab/>Funktion : INT</text:p>
      <text:p text:style-name="P52"><text:span text:style-name="T16">Input</text:span><text:tab/>LAST : INT (Letzter berechneter Wert)</text:p>
      <text:p text:style-name="P52"><text:tab/>LOW : INT (niedrigster generierter Wert)</text:p>
      <text:p text:style-name="P52"><text:tab/>HIGH : INT (höchster generierter Wert)</text:p>
      <text:p text:style-name="P23"><draw:frame draw:style-name="fr4" draw:name="Grafik481" text:anchor-type="paragraph" svg:x="1.046cm" svg:y="0.688cm" svg:width="2.731cm" svg:height="2.02cm" draw:z-index="488"><draw:image xlink:href="Pictures/10000000000000CE00000099FFFB0EE6.png" xlink:type="simple" xlink:show="embed" xlink:actuate="onLoad"/></draw:frame>Output<text:tab/>INT (Zufallszahl zwischen LOW und HIGH)</text:p>
      <text:p text:style-name="P53"><text:line-break/>RDM2 erzeugt einen Integer <text:span text:style-name="T16">Random</text:span>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 text:style-name="T16">Timer</text:span>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text:span text:style-name="T16">Range</text:span> für das Ergebnis ist. Man kann diesen Effekt leicht umgehen indem man als Startwert einen Schleifenzähler verwendet der definitiv bei jedem Aufruf einen neuen Wert aufweist, oder noch besser einen Schleifenzähler addiert mit dem letzten Ergebnis als Startwert verwendet.</text:p>
      <text:list xml:id="list33630047" text:continue-numbering="true" text:style-name="L1">
        <text:list-item>
          <text:list>
            <text:list-item>
              <text:h text:style-name="P222" text:outline-level="2"><text:alphabetical-index-mark-start text:id="IMark112348168"/>RDMDW<text:alphabetical-index-mark-end text:id="IMark112348168"/></text:h>
            </text:list-item>
          </text:list>
        </text:list-item>
      </text:list>
      <text:p text:style-name="P22">Type<text:tab/>Funktion : DWORD</text:p>
      <text:p text:style-name="P22"><text:span text:style-name="T16">Input</text:span><text:tab/>LAST : DWORD (Letzter berechneter Wert)</text:p>
      <text:p text:style-name="P23"><draw:frame draw:style-name="fr4" draw:name="Grafik6" text:anchor-type="paragraph" svg:x="1.025cm" svg:y="0.69cm" svg:width="3.6cm" svg:height="0.99cm" draw:z-index="531"><draw:image xlink:href="Pictures/10000000000001100000004B82CDD7C2.png" xlink:type="simple" xlink:show="embed" xlink:actuate="onLoad"/></draw:frame>Output<text:tab/>DWORD (Zufälliges Bitmuster)</text:p>
      <text:p text:style-name="P23"><text:line-break/>RDMDW berechnet eine P<text:span text:style-name="T16">seudo-</text:span>Zufallszahl mit 32 Bit Länge im Format DWORD. Dazu wird der SPS-interne <text:span text:style-name="T16">Timer</text:span> ausgelesen und in eine Pseudo-Zufallszahl über<text:soft-page-break/>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 text:style-name="T16">Timer</text:span>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p>
      <text:list xml:id="list33629094" text:continue-numbering="true" text:style-name="L1">
        <text:list-item>
          <text:list>
            <text:list-item>
              <text:h text:style-name="P217" text:outline-level="2"><text:alphabetical-index-mark-start text:id="IMark112348168"/>RND<text:alphabetical-index-mark-end text:id="IMark112348168"/></text:h>
            </text:list-item>
          </text:list>
        </text:list-item>
      </text:list>
      <text:p text:style-name="P22">Type<text:tab/>Funktion : REAL</text:p>
      <text:p text:style-name="P22"><text:span text:style-name="T16">Input</text:span><text:tab/>X : REAL (Eingangswert)</text:p>
      <text:p text:style-name="P22"><text:tab/>N : Integer (Anzahl der Stellen)</text:p>
      <text:p text:style-name="P22"><draw:frame draw:style-name="fr4" draw:name="Grafik516" text:anchor-type="paragraph" svg:x="1.046cm" svg:y="0.667cm" svg:width="2.731cm" svg:height="1.57cm" draw:z-index="522"><draw:image xlink:href="Pictures/10000000000000CE0000007711D3F601.png" xlink:type="simple" xlink:show="embed" xlink:actuate="onLoad"/></draw:frame>Output<text:tab/>REAL (Gerundeter Wert)</text:p>
      <text:p text:style-name="P22"><text:line-break/>Die Funktion R<text:span text:style-name="T31">ND rundet den Eingangswert IN auf N Stellen. Folgt der letzten Stelle ein </text:span><text:span text:style-name="T18">Digit</text:span><text:span text:style-name="T31">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53">Beispiel:<text:tab/>RND(355.55, 2) = 360</text:p>
      <text:p text:style-name="P53"><text:tab/>RND(3.555, 2) = 3.6</text:p>
      <text:p text:style-name="P53"><text:tab/>ROUND(3.555, 2) = 3.56</text:p>
      <text:p text:style-name="P53"/>
      <text:list xml:id="list33655717" text:continue-numbering="true" text:style-name="L1">
        <text:list-item>
          <text:list>
            <text:list-item>
              <text:h text:style-name="P217" text:outline-level="2"><text:soft-page-break/><text:alphabetical-index-mark-start text:id="IMark112348168"/>ROUND<text:alphabetical-index-mark-end text:id="IMark112348168"/></text:h>
            </text:list-item>
          </text:list>
        </text:list-item>
      </text:list>
      <text:p text:style-name="P22">Type<text:tab/>Funktion : REAL</text:p>
      <text:p text:style-name="P22"><text:span text:style-name="T16">Input</text:span><text:tab/>IN : REAL (Eingangswert)</text:p>
      <text:p text:style-name="P22"><text:tab/>N : Integer (Anzahl der Nachkommastellen)</text:p>
      <text:p text:style-name="P22"><draw:frame draw:style-name="fr4"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22"><text:line-break/>Die Funktion R<text:span text:style-name="T31">OUND rundet den Eingangswert in auf N Nachkommastellen. Folgt </text:span><text:span text:style-name="T31">der letzten Stelle ein </text:span><text:span text:style-name="T18">Digit</text:span><text:span text:style-name="T31"> größer 5 wird die letzte Stelle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23">Beispiel:<text:tab/>ROUND(3.555, 2) = 3.56</text:p>
      <text:list xml:id="list33651371" text:continue-numbering="true" text:style-name="L1">
        <text:list-item>
          <text:list>
            <text:list-item>
              <text:h text:style-name="P217" text:outline-level="2"><text:alphabetical-index-mark-start text:id="IMark112348168"/>SGN<text:alphabetical-index-mark-end text:id="IMark112348168"/></text:h>
            </text:list-item>
          </text:list>
        </text:list-item>
      </text:list>
      <text:p text:style-name="P22">Type<text:tab/>Funktion : INT</text:p>
      <text:p text:style-name="P52"><text:span text:style-name="T16">Input</text:span><text:tab/>X : REAL (Eingangswert)</text:p>
      <text:p text:style-name="P22"><draw:frame draw:style-name="fr4" draw:name="Grafik351" text:anchor-type="paragraph" svg:x="1.09cm" svg:y="0.688cm" svg:width="2.101cm" svg:height="0.99cm" draw:z-index="348"><draw:image xlink:href="Pictures/100000000000009F0000004B75C35190.png" xlink:type="simple" xlink:show="embed" xlink:actuate="onLoad"/></draw:frame>Output<text:tab/>INT (Signum des Eingangs X)</text:p>
      <text:p text:style-name="P22"><text:line-break/>Die Funktion SGN<text:span text:style-name="T31"> berechnet das Signum von X.</text:span></text:p>
      <text:p text:style-name="P53">SGN = +1 wenn X &gt; 0</text:p>
      <text:p text:style-name="P53">SGN = 0 wenn X = 0</text:p>
      <text:p text:style-name="P53">SGN = -1 wenn X &lt; 0</text:p>
      <text:list xml:id="list33636433" text:continue-numbering="true" text:style-name="L1">
        <text:list-item>
          <text:list>
            <text:list-item>
              <text:h text:style-name="P217" text:outline-level="2"><text:soft-page-break/><text:alphabetical-index-mark-start text:id="IMark112348168"/>SIGMOID<text:alphabetical-index-mark-end text:id="IMark112348168"/></text:h>
            </text:list-item>
          </text:list>
        </text:list-item>
      </text:list>
      <text:p text:style-name="P22">Type<text:tab/>Funktion : INT</text:p>
      <text:p text:style-name="P52"><text:span text:style-name="T16">Input</text:span><text:tab/>X : REAL (Eingangswert)</text:p>
      <text:p text:style-name="P22"><draw:frame draw:style-name="fr4" draw:name="Grafik395" text:anchor-type="paragraph" svg:x="1.069cm" svg:y="0.688cm" svg:width="3.69cm" svg:height="0.99cm" draw:z-index="391"><draw:image xlink:href="Pictures/10000000000001170000004BD297ADBD.png" xlink:type="simple" xlink:show="embed" xlink:actuate="onLoad"/></draw:frame>Output<text:tab/>REAL (Ergebnis der Sigmoidfunktion)</text:p>
      <text:p text:style-name="P52"><text:line-break/>Die <text:span text:style-name="T24">Sigmoidfunktion</text:span> wird auch <text:span text:style-name="T24">Schwanenhals</text:span>- Funktion genannt und wird durch die folgende Gleichung beschrieben:</text:p>
      <text:p text:style-name="P52">SIGMOID = 1 / (1 + EXP(-X))</text:p>
      <text:p text:style-name="P52">Die Sigmoidfunktion wird häufig als Aktivierungsfunktion verwendet. Durch seinen Verlauf eignet sich die Sigmoidfunktion für weiche Schaltübergänge.</text:p>
      <text:p text:style-name="P52"><draw:frame draw:style-name="fr4" draw:name="Grafik396" text:anchor-type="paragraph" svg:x="1.111cm" svg:y="0.688cm" svg:width="8.169cm" svg:height="2.87cm" draw:z-index="392"><draw:image xlink:href="Pictures/10000000000001A0000000B5346B6230.png" xlink:type="simple" xlink:show="embed" xlink:actuate="onLoad"/></draw:frame>Die folgende Grafik veranschaulicht den Verlauf der Sigmoidfunktion:</text:p>
      <text:p text:style-name="P52"/>
      <text:list xml:id="list33644599" text:continue-numbering="true" text:style-name="L1">
        <text:list-item>
          <text:list>
            <text:list-item>
              <text:h text:style-name="P217" text:outline-level="2"><text:alphabetical-index-mark-start text:id="IMark112348168"/>SIGN_I<text:alphabetical-index-mark-end text:id="IMark112348168"/></text:h>
            </text:list-item>
          </text:list>
        </text:list-item>
      </text:list>
      <text:p text:style-name="P22">Type<text:tab/>Funktion : BOOL</text:p>
      <text:p text:style-name="P22"><text:span text:style-name="T16">Input</text:span><text:tab/>IN : INT (Eingangswert)</text:p>
      <text:p text:style-name="P22"><draw:frame draw:style-name="fr4"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22"><text:line-break/>Die Funktion <text:span text:style-name="T31">SIGN_I liefert TRUE zurück, wenn der Eingangswert negativ ist. Die Eingangswerte sind vom Typ INT.</text:span></text:p>
      <text:list xml:id="list33649486" text:continue-numbering="true" text:style-name="L1">
        <text:list-item>
          <text:list>
            <text:list-item>
              <text:h text:style-name="P217" text:outline-level="2"><text:soft-page-break/><text:alphabetical-index-mark-start text:id="IMark112348168"/>SIGN_R<text:alphabetical-index-mark-end text:id="IMark112348168"/></text:h>
            </text:list-item>
          </text:list>
        </text:list-item>
      </text:list>
      <text:p text:style-name="P22">Type<text:tab/>Funktion : BOOL</text:p>
      <text:p text:style-name="P22"><text:span text:style-name="T16">Input</text:span><text:tab/>IN : REAL(Eingangswert)</text:p>
      <text:p text:style-name="P22"><draw:frame draw:style-name="fr4"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23"><text:line-break/>Die Funktion SIGN_R liefert TRUE zurück, wenn der Eingangswert negativ ist. Die Eingangswerte sind vom Typ REAL.</text:p>
      <text:list xml:id="list33641016" text:continue-numbering="true" text:style-name="L1">
        <text:list-item>
          <text:list>
            <text:list-item>
              <text:h text:style-name="P217" text:outline-level="2"><text:alphabetical-index-mark-start text:id="IMark112348168"/>SINC<text:alphabetical-index-mark-end text:id="IMark112348168"/></text:h>
            </text:list-item>
          </text:list>
        </text:list-item>
      </text:list>
      <text:p text:style-name="P22">Type<text:tab/>Funktion : REAL</text:p>
      <text:p text:style-name="P22"><text:span text:style-name="T16">Input</text:span><text:tab/>X : REAL (Eingangswert)</text:p>
      <text:p text:style-name="P23"><draw:frame draw:style-name="fr4" draw:name="Grafik517" text:anchor-type="paragraph" svg:x="1.002cm" svg:y="0.667cm" svg:width="2.731cm" svg:height="1.12cm" draw:z-index="523"><draw:image xlink:href="Pictures/10000000000000CE00000055459FC0E5.png" xlink:type="simple" xlink:show="embed" xlink:actuate="onLoad"/></draw:frame>Output<text:tab/>REAL (Ausgangswert)</text:p>
      <text:p text:style-name="P53">SINC berechnet den Sinus Cardinalis oder die Spaltfunktion.</text:p>
      <text:p text:style-name="P53">SINC = SIN(X) / X.<text:tab/>Mit SINC(0) = 1.</text:p>
      <text:list xml:id="list33643435" text:continue-numbering="true" text:style-name="L1">
        <text:list-item>
          <text:list>
            <text:list-item>
              <text:h text:style-name="P217" text:outline-level="2"><text:alphabetical-index-mark-start text:id="IMark112348168"/>SIN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41" text:anchor-type="paragraph" svg:x="1.067cm" svg:y="0.67cm" svg:width="2.281cm" svg:height="1.12cm" draw:z-index="214"><draw:image xlink:href="Pictures/10000000000000AC00000055B7D3663F.png" xlink:type="simple" xlink:show="embed" xlink:actuate="onLoad"/></draw:frame>Output<text:tab/>REAL (Ausgangswert)</text:p>
      <text:p text:style-name="Standard"><text:span text:style-name="T47">SINH</text:span> <text:span text:style-name="T47">Berechnet</text:span> den Sinus Hyperbolicus nach folgender Formel:</text:p>
      <text:p text:style-name="P23">SINH = (EXPT(E,X) – EXPT(E,-X))/2</text:p>
      <text:list xml:id="list33636546" text:continue-numbering="true" text:style-name="L1">
        <text:list-item>
          <text:list>
            <text:list-item>
              <text:h text:style-name="P217" text:outline-level="2"><text:soft-page-break/><text:alphabetical-index-mark-start text:id="IMark112348168"/>SQRTN<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57" text:anchor-type="paragraph" svg:x="0.984cm" svg:y="0.64cm" svg:width="2.731cm" svg:height="1.57cm" draw:z-index="226"><draw:image xlink:href="Pictures/10000000000000CE00000077C147416B.png" xlink:type="simple" xlink:show="embed" xlink:actuate="onLoad"/></draw:frame>Output<text:tab/>REAL (Ausgangswert)</text:p>
      <text:p text:style-name="P52"><text:line-break/>SQRTN Berechnet die N-fache Wurzel aus X nach folgender Formel:</text:p>
      <text:p text:style-name="P53">SQRTN = EXPT(X, 1/N)</text:p>
      <text:list xml:id="list33649008" text:continue-numbering="true" text:style-name="L1">
        <text:list-item>
          <text:list>
            <text:list-item>
              <text:h text:style-name="P217" text:outline-level="2"><text:alphabetical-index-mark-start text:id="IMark112348168"/>TANH<text:alphabetical-index-mark-end text:id="IMark112348168"/></text:h>
            </text:list-item>
          </text:list>
        </text:list-item>
      </text:list>
      <text:p text:style-name="P22">Type<text:tab/>Funktion : REAL</text:p>
      <text:p text:style-name="P22"><text:span text:style-name="T16">Input</text:span><text:tab/>X : REAL (Eingangswert)</text:p>
      <text:p text:style-name="P22"><draw:frame draw:style-name="fr4" draw:name="Grafik242" text:anchor-type="paragraph" svg:x="1.087cm" svg:y="0.651cm" svg:width="2.731cm" svg:height="1.12cm" draw:z-index="215"><draw:image xlink:href="Pictures/10000000000000CE000000556003E833.png" xlink:type="simple" xlink:show="embed" xlink:actuate="onLoad"/></draw:frame>Output<text:tab/>REAL (Ausgangswert)</text:p>
      <text:p text:style-name="Standard"><text:line-break/><text:span text:style-name="T47">TANH</text:span> Berechnet den <text:span text:style-name="T47">Tangens</text:span> Hyperbolicus nach folgender Formel:</text:p>
      <text:p text:style-name="P23">TANH = -2 / (EXPT(E, -2 * X) + 1) + 1</text:p>
      <text:p text:style-name="P53"/>
      <text:p text:style-name="P53"/>
      <text:p text:style-name="P53"/>
      <text:p text:style-name="P53"/>
      <text:p text:style-name="P53"/>
      <text:list xml:id="list33641231" text:continue-numbering="true" text:style-name="L1">
        <text:list-item>
          <text:list>
            <text:list-item>
              <text:h text:style-name="P217" text:outline-level="2"><text:soft-page-break/><text:alphabetical-index-mark-start text:id="IMark112348168"/>WINDOW<text:alphabetical-index-mark-end text:id="IMark112348168"/></text:h>
            </text:list-item>
          </text:list>
        </text:list-item>
      </text:list>
      <text:p text:style-name="P22">Type<text:tab/>Funktion : BOOL</text:p>
      <text:p text:style-name="P22"><text:span text:style-name="T16">Input</text:span><text:tab/>LOW : REAL (unterer Grenzwert)</text:p>
      <text:p text:style-name="P22"><text:tab/>IN : REAL (Eingangswert)</text:p>
      <text:p text:style-name="P22"><text:tab/>HIGH : REAL (oberer Grenzwert)</text:p>
      <text:p text:style-name="P22"><draw:frame draw:style-name="fr4" draw:name="Grafik171" text:anchor-type="paragraph" svg:x="1.111cm" svg:y="0.695cm" svg:width="3.18cm" svg:height="2.02cm" draw:z-index="161"><draw:image xlink:href="Pictures/10000000000000F00000009985533CAB.png" xlink:type="simple" xlink:show="embed" xlink:actuate="onLoad"/></draw:frame>Output<text:tab/>BOOL (TRUE, wenn in &lt; HIGH und in &gt; LOW)</text:p>
      <text:p text:style-name="P23"><text:line-break/>Die Funktion WINDOW testet, ob der Eingangswert IN innerhalb der Grenzen, die durch LOW und HIGH definiert sind, liegt.</text:p>
      <text:p text:style-name="P53">WINDOW ist genau dann TRUE, wenn IN &lt; HIGH und IN &gt; LOW ist.</text:p>
      <text:list xml:id="list33642744" text:continue-numbering="true" text:style-name="L1">
        <text:list-item>
          <text:list>
            <text:list-item>
              <text:h text:style-name="P217" text:outline-level="2"><text:alphabetical-index-mark-start text:id="IMark112348168"/>WINDOW2<text:alphabetical-index-mark-end text:id="IMark112348168"/></text:h>
            </text:list-item>
          </text:list>
        </text:list-item>
      </text:list>
      <text:p text:style-name="P22">Type<text:tab/>Funktion : BOOL</text:p>
      <text:p text:style-name="P22"><text:span text:style-name="T16">Input</text:span><text:tab/>LOW : REAL (unterer Grenzwert)</text:p>
      <text:p text:style-name="P22"><text:tab/>IN : REAL (Eingangswert)</text:p>
      <text:p text:style-name="P22"><text:tab/>HIGH : REAL (oberer Grenzwert)</text:p>
      <text:p text:style-name="P22"><draw:frame draw:style-name="fr4" draw:name="Grafik371" text:anchor-type="paragraph" svg:x="1.023cm" svg:y="0.69cm" svg:width="3.62cm" svg:height="2.02cm" draw:z-index="366"><draw:image xlink:href="Pictures/100000000000011200000099D81DA8B6.png" xlink:type="simple" xlink:show="embed" xlink:actuate="onLoad"/></draw:frame>Output<text:tab/>BOOL (TRUE, wenn in &lt;= HIGH und in &gt;= LOW)</text:p>
      <text:p text:style-name="P23"><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xml:id="list33650166" text:continue-numbering="true" text:style-name="L1">
        <text:list-item>
          <text:h text:style-name="P212" text:outline-level="1">Array</text:h>
        </text:list-item>
      </text:list>
      <text:p text:style-name="P19"/>
      <text:list xml:id="list33637908" text:continue-numbering="true" text:style-name="L1">
        <text:list-item>
          <text:list>
            <text:list-item>
              <text:h text:style-name="P217" text:outline-level="2"><text:alphabetical-index-mark-start text:id="IMark112348168"/>_ARRAY_ABS<text:alphabetical-index-mark-end text:id="IMark112348168"/></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23"><draw:frame draw:style-name="fr4" draw:name="Grafik541" text:anchor-type="paragraph" svg:x="1.069cm" svg:y="0.667cm" svg:width="4.48cm" svg:height="1.39cm" draw:z-index="551"><draw:image xlink:href="Pictures/100000000000015300000069C7EC64D3.png" xlink:type="simple" xlink:show="embed" xlink:actuate="onLoad"/></draw:frame>Output<text:tab/>BOOL (TRUE)</text:p>
      <text:p text:style-name="P23"><text:line-break/>Die Funktion _ARRAY<text:span text:style-name="T33">_</text:span>ABS rechnet die Elemente eines beliebigen Array <text:span text:style-name="T16">of</text:span> REAL in den Absolutwert um. Beim Aufruf wird der Funktion ein <text:span text:style-name="T16">Pointer</text:span> auf das zu initialisierende Array und dessen Größe in Bytes übergeben. Unter CoDeSys lautet der Aufruf: _ARRAY_ABS(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Aufruf:<text:tab/>_ARRAY_ABS(ADR(bigarray), SIZEOF(bigarray))</text:p>
      <text:p text:style-name="P23">Beipiel:<text:tab/>[0,-2,3,-1-5]<text:tab/> wird umgewandelt in [0,2,3,1,5]</text:p>
      <text:p text:style-name="P53"/>
      <text:p text:style-name="P53"/>
      <text:list xml:id="list33654504" text:continue-numbering="true" text:style-name="L1">
        <text:list-item>
          <text:list>
            <text:list-item>
              <text:h text:style-name="P217" text:outline-level="2"><text:soft-page-break/><text:alphabetical-index-mark-start text:id="IMark112348168"/>_ARRAY_ADD<text:alphabetical-index-mark-end text:id="IMark112348168"/></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52"><text:tab/>X : REAL (zu addierender Wert)</text:p>
      <text:p text:style-name="P23"><draw:frame draw:style-name="fr4" draw:name="Grafik542" text:anchor-type="paragraph" svg:x="1.025cm" svg:y="0.69cm" svg:width="4.48cm" svg:height="1.79cm" draw:z-index="552"><draw:image xlink:href="Pictures/100000000000015300000087506ED3FA.png" xlink:type="simple" xlink:show="embed" xlink:actuate="onLoad"/></draw:frame>Output<text:tab/>BOOL (TRUE)</text:p>
      <text:p text:style-name="P23"><text:line-break/>Die Funktion _ARRAY<text:span text:style-name="T33">_</text:span>ADD addiert zu jedem Element eines beliebigen Array <text:span text:style-name="T16">of</text:span> REAL den Wert X. Beim Aufruf wird der Funktion ein <text:span text:style-name="T16">Pointer</text:span> auf das zu initialisierende Array und dessen Größe in Bytes übergeben. Unter CoDeSys lautet der Aufruf: _ARRAY_ADD(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Aufruf:<text:tab/>_ARRAY_ADD(ADR(bigarray), SIZEOF(bigarray), X)</text:p>
      <text:p text:style-name="P23">Beipiel:<text:tab/>[0,-2,3,-1-5]<text:tab/> ; X = 3 wird umgewandelt in [3,1,6,2,-2]</text:p>
      <text:list xml:id="list33652127" text:continue-numbering="true" text:style-name="L1">
        <text:list-item>
          <text:list>
            <text:list-item>
              <text:h text:style-name="P217" text:outline-level="2"><text:alphabetical-index-mark-start text:id="IMark112348168"/>_ARRAY_INIT<text:alphabetical-index-mark-end text:id="IMark112348168"/></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22"><text:tab/>INIT : REAL (Initialwert)</text:p>
      <text:p text:style-name="P23"><draw:frame draw:style-name="fr4" draw:name="Grafik56" text:anchor-type="paragraph" svg:x="1.021cm" svg:y="0.661cm" svg:width="4.069cm" svg:height="2.02cm" draw:z-index="39"><draw:image xlink:href="Pictures/100000000000013400000099EA740595.png" xlink:type="simple" xlink:show="embed" xlink:actuate="onLoad"/></draw:frame>Output<text:tab/>BOOL (TRUE)</text:p>
      <text:p text:style-name="P23"><text:soft-page-break/><text:line-break/>Die Funktion _ARRAY<text:span text:style-name="T33">_</text:span>INIT initialisiert ein beliebiges Array <text:span text:style-name="T16">of</text:span> REAL mit einem Initialwert. Beim Aufruf wird der Funktion ein <text:span text:style-name="T16">Pointer</text:span> auf das zu initialisierende Array und dessen Größe in Bytes übergeben. Unter CoDeSys lautet der Aufruf: _ARRAY_INIT(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Beispiel:<text:tab/>_ARRAY_INIT(ADR(bigarray), SIZEOF(bigarray), 0)</text:p>
      <text:p text:style-name="P23"><text:tab/>initialisiert bigarray mit 0.</text:p>
      <text:list xml:id="list33638373" text:continue-numbering="true" text:style-name="L1">
        <text:list-item>
          <text:list>
            <text:list-item>
              <text:h text:style-name="P217" text:outline-level="2"><text:alphabetical-index-mark-start text:id="IMark112348168"/>_ARRAY_MEDIAN<text:alphabetical-index-mark-end text:id="IMark112348168"/></text:h>
            </text:list-item>
          </text:list>
        </text:list-item>
      </text:list>
      <text:p text:style-name="P166">Type<text:tab/>Funktion : REAL</text:p>
      <text:p text:style-name="P166"><text:span text:style-name="T16">Input</text:span><text:tab/>PT : <text:span text:style-name="T16">Pointer</text:span> (Zeiger auf das Array)</text:p>
      <text:p text:style-name="P166"><text:tab/>SIZE : UINT (Größe des Arrays)</text:p>
      <text:p text:style-name="P166"><draw:frame draw:style-name="fr4" draw:name="Grafik54" text:anchor-type="paragraph" svg:x="0.995cm" svg:y="0.669cm" svg:width="5.42cm" svg:height="1.57cm" draw:z-index="37"><draw:image xlink:href="Pictures/100000000000019A00000077C58E8F4A.png" xlink:type="simple" xlink:show="embed" xlink:actuate="onLoad"/></draw:frame>Output<text:tab/>REAL (Medianwert des Arrays)</text:p>
      <text:p text:style-name="P23"><text:line-break/>Die Funktion _ARRAY<text:span text:style-name="T33">_</text:span>MEDIAN ermittelt den Medianwert eines beliebigen Arrays <text:span text:style-name="T16">of</text:span> REAL. Beim Aufruf wird der Funktion ein <text:span text:style-name="T16">Pointer</text:span> auf das Array und dessen Größe in Bytes übergeben. Unter CoDeSys lautet der Aufruf: _ARRAY_MEDIAN(ADR(Array), SIZEOF(Array)), wobei Array der Name des zu manipulierenden Arrays ist. ADR() ist eine Standardfunktion, die den <text:span text:style-name="T16">Pointer</text:span> auf das Array ermittelt und SIZEOF() ist eine Standardfunktion, die die Größe des Arrays ermittelt. Um den Medianwert zu ermitteln wird das durch den <text:span text:style-name="T16">Pointer</text:span> referenzierte Array direkt im Speicher sortiert und bleibt nach beenden der Funktion sortiert. Die Funktion _ARRAY_MEDIAN verändert also den Inhalt des Arrays.</text:p>
      <text:p text:style-name="P53"><text:soft-page-break/><text:span text:style-name="T10">Diese Art der Bearbeitung von Arrays</text:span> ist äußerst effizient, da kein zusätzlicher Speicher benötigt wird und keine Übergabewerte kopiert werden müssen.</text:p>
      <text:p text:style-name="P23">Sollte ein Array bearbeitet werden, das nicht verändert werden darf, so ist es vor Übergabe des <text:span text:style-name="T16">Pointer</text:span> und Aufruf der Funktion in ein temporäres Array zu kopieren.</text:p>
      <text:p text:style-name="P53"><text:line-break/>Beispiel:<text:tab/>_ARRAY_MEDIAN(ADR(bigarray), SIZEOF(bigarray))</text:p>
      <text:p text:style-name="P23">Medianwert: <text:line-break/>Der Medianwert ist der Mittlere Wert einer sortierten Wertemenge.<text:line-break/><text:span text:style-name="T16">Median</text:span> von (12, 0, 4, 7, 1) ist 4. Nach dem Ausführen der Funktion bleibt das Array sortiert im Speicher zurück (0, 1, 4, 7, 12).</text:p>
      <text:p text:style-name="P53">Wenn das Array eine gerade Anzahl von Elementen enthält ist der Medianwert der Mittelwert aus den beiden mittleren Werten des Arrays.</text:p>
      <text:list xml:id="list33624084" text:continue-numbering="true" text:style-name="L1">
        <text:list-item>
          <text:list>
            <text:list-item>
              <text:h text:style-name="P217" text:outline-level="2"><text:alphabetical-index-mark-start text:id="IMark112348168"/>_ARRAY_MUL<text:alphabetical-index-mark-end text:id="IMark112348168"/></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52"><text:tab/>X : REAL (Multiplikator)</text:p>
      <text:p text:style-name="P23"><draw:frame draw:style-name="fr4" draw:name="Grafik543" text:anchor-type="paragraph" svg:x="1.046cm" svg:y="0.667cm" svg:width="4.48cm" svg:height="1.79cm" draw:z-index="553"><draw:image xlink:href="Pictures/1000000000000153000000873B9DB8C5.png" xlink:type="simple" xlink:show="embed" xlink:actuate="onLoad"/></draw:frame>Output<text:tab/>BOOL (TRUE)</text:p>
      <text:p text:style-name="P23"><text:line-break/>Die Funktion _ARRAY<text:span text:style-name="T33">_</text:span>MUL multipliziert jedes Element eines beliebigen Array <text:span text:style-name="T16">of</text:span> REAL mit den Wert X. Beim Aufruf wird der Funktion ein <text:span text:style-name="T16">Pointer</text:span> auf das zu initialisierende Array und dessen Größe in Bytes übergeben. Unter CoDeSys lautet der Aufruf: _ARRAY_MUL(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Aufruf:<text:tab/>_ARRAY_MUL(ADR(bigarray), SIZEOF(bigarray), X)</text:p>
      <text:p text:style-name="P23">Beispiel:<text:tab/>[0,-2,3,-1-5]<text:tab/> ; X = 3 wird umgewandelt in [0,-6,9,-3,-15]</text:p>
      <text:list xml:id="list33647628" text:continue-numbering="true" text:style-name="L1">
        <text:list-item>
          <text:list>
            <text:list-item>
              <text:h text:style-name="P217" text:outline-level="2"><text:soft-page-break/><text:alphabetical-index-mark-start text:id="IMark112348168"/>_ARRAY_SHUFFLE<text:alphabetical-index-mark-end text:id="IMark112348168"/></text:h>
            </text:list-item>
          </text:list>
        </text:list-item>
      </text:list>
      <text:p text:style-name="P166">Type<text:tab/>Funktion : BOOL</text:p>
      <text:p text:style-name="P166"><text:span text:style-name="T16">Input</text:span><text:tab/>PT : <text:span text:style-name="T16">Pointer</text:span> (Zeiger auf das Array)</text:p>
      <text:p text:style-name="P166"><text:tab/>SIZE : UINT (Größe des Arrays)</text:p>
      <text:p text:style-name="P166"><draw:frame draw:style-name="fr4" draw:name="Grafik500" text:anchor-type="paragraph" svg:x="1.046cm" svg:y="0.69cm" svg:width="6.77cm" svg:height="1.57cm" draw:z-index="506"><draw:image xlink:href="Pictures/10000000000002000000007758CE69F6.png" xlink:type="simple" xlink:show="embed" xlink:actuate="onLoad"/></draw:frame>Output<text:tab/>BOOL (<text:span text:style-name="T16">Returns</text:span> TRUE)</text:p>
      <text:p text:style-name="P23"><text:line-break/>Die Funktion _ARRAY<text:span text:style-name="T33">_</text:span>SHUFFLE vertauscht die Elemente eines beliebigen Arrays <text:span text:style-name="T16">of</text:span> REAL nach einem Zufallsprinzip. Beim Aufruf wird der Funktion ein <text:span text:style-name="T16">Pointer</text:span> auf das Array und dessen Größe in Bytes übergeben. Unter CoDeSys lautet der Aufruf: _ARRAY_SHUFFLE(ADR(Array), SIZEOF(Array)), wobei Array der Name des zu manipulierenden Arrays ist. ADR() ist eine Standardfunktion, die den <text:span text:style-name="T16">Pointer</text:span> auf das Array ermittelt und SIZEOF() ist eine Standardfunktion, die die Größe des Arrays ermittelt. Das durch den <text:span text:style-name="T16">Pointer</text:span> referenzierte Array wird direkt im Speicher manipuliert und steht nach beenden der Funktion direkt zur Verfügung. Die Funktion _ARRAY_SHUFFLE verändert also den Inhalt des Arrays.</text:p>
      <text:p text:style-name="P53">Diese Art der Bearbeitung von Arrays ist äußerst effizient, da kein zusätzlicher Speicher benötigt wird und keine Übergabewerte kopiert werden müssen.</text:p>
      <text:p text:style-name="P23">Sollte ein Array bearbeitet werden, das nicht verändert werden darf, so ist es vor Übergabe des <text:span text:style-name="T16">Pointer</text:span> und Aufruf der Funktion in ein temporäres Array zu kopieren.</text:p>
      <text:p text:style-name="P53"><text:line-break/>Beispiel:<text:tab/>_ARRAY_SHUFFLE(ADR(bigarray), SIZEOF(bigarray))</text:p>
      <text:p text:style-name="P23">Ein Aufruf der Funktion _ARRAY_SHUFFLE könnte ein Array wie folgt verändern. Da die Funktion einen <text:span text:style-name="T16">Pseudo</text:span> <text:span text:style-name="T16">Random</text:span> Algorithmus verwendet wird das Ergebnis bei jedem Aufruf ein anderes sein, die Ergebnisse sind nicht reproduzierbar, auch nicht durch einen Neustart des Programms oder der Steuerung.</text:p>
      <text:p text:style-name="P53">Ausgangsarray: <text:tab/>(0,1,2,3,4,5,6,7,8,9)</text:p>
      <text:p text:style-name="P53">Ergebnis:<text:tab/><text:tab/>(5,0,3,9,7,2,1,8,4,6)</text:p>
      <text:p text:style-name="P53">Das Ergebnis ist aber nicht wiederholbar, die Funktion liefert nach jedem Aufruf oder Auch Neustart eine neue Reihenfolge.</text:p>
      <text:list xml:id="list33652321" text:continue-numbering="true" text:style-name="L1">
        <text:list-item>
          <text:list>
            <text:list-item>
              <text:h text:style-name="P219" text:outline-level="2"><text:soft-page-break/><text:alphabetical-index-mark-start text:id="IMark112348168"/>_ARRAY_SORT<text:alphabetical-index-mark-end text:id="IMark112348168"/></text:h>
            </text:list-item>
          </text:list>
        </text:list-item>
      </text:list>
      <text:p text:style-name="P165">Type<text:tab/>Funktion : BOOL</text:p>
      <text:p text:style-name="P165"><text:span text:style-name="T16">Input</text:span><text:tab/>PT : <text:span text:style-name="T16">Pointer</text:span> (Zeiger auf das Array)</text:p>
      <text:p text:style-name="P165"><text:tab/>SIZE : UINT (Größe des Arrays)</text:p>
      <text:p text:style-name="P165"><draw:frame draw:style-name="fr4" draw:name="Grafik55" text:anchor-type="paragraph" svg:x="1.108cm" svg:y="0.614cm" svg:width="4.521cm" svg:height="1.57cm" draw:z-index="38"><draw:image xlink:href="Pictures/100000000000015600000077819AAEF4.png" xlink:type="simple" xlink:show="embed" xlink:actuate="onLoad"/></draw:frame>Output<text:tab/>BOOL (TRUE)</text:p>
      <text:p text:style-name="P23"><text:line-break/>Die Funktion _ARRAY<text:span text:style-name="T33">_</text:span>SORT sortiert ein beliebiges Array <text:span text:style-name="T16">of</text:span> REAL in aufsteigender Reihenfolge. Beim Aufruf wird der Funktion ein <text:span text:style-name="T16">Pointer</text:span> auf das zu sortierende Array und dessen Größe in Bytes übergeben. Unter CoDeSys lautet der Aufruf: _ARRAY_SORT(ADR(Array), SIZEOF(Array)), wobei Array der Name des zu sortierenden Arrays ist. ADR ist eine Standardfunktion, die den <text:span text:style-name="T16">Pointer</text:span> auf das Array ermittelt und SIZEOF ist eine Standardfunktion, die die Größe des Arrays ermittelt.</text:p>
      <text:p text:style-name="P53">Die Funktion liefert nur TRUE zurück. Das durch den <text:span text:style-name="T16">Pointer</text:span> angegebene Array wird direkt im Speicher Manipuliert.</text:p>
      <text:p text:style-name="P23"><text:span text:style-name="T10">Diese Art der Bearbeitung von Arrays</text:span> ist äußerst effizient, da kein zusätzlicher Speicher benötigt wird und keine Übergabewerte kopiert werden müssen.<text:line-break/><text:line-break/>Beispiel:<text:tab/>_ARRAY_SORT(ADR(bigarray), SIZEOF(bigarray))</text:p>
      <text:list xml:id="list33638829" text:continue-numbering="true" text:style-name="L1">
        <text:list-item>
          <text:list>
            <text:list-item>
              <text:h text:style-name="P217" text:outline-level="2"><text:alphabetical-index-mark-start text:id="IMark112348168"/>ARRAY_AVG<text:alphabetical-index-mark-end text:id="IMark112348168"/></text:h>
            </text:list-item>
          </text:list>
        </text:list-item>
      </text:list>
      <text:p text:style-name="P166">Type<text:tab/>Funktion : REAL</text:p>
      <text:p text:style-name="P166"><text:span text:style-name="T16">Input</text:span><text:tab/>PT : <text:span text:style-name="T16">Pointer</text:span> (Zeiger auf das Array)</text:p>
      <text:p text:style-name="P166"><text:tab/>SIZE : UINT (Größe des Arrays)</text:p>
      <text:p text:style-name="P166"><draw:frame draw:style-name="fr4" draw:name="Grafik53" text:anchor-type="paragraph" svg:x="1cm" svg:y="0.658cm" svg:width="4.069cm" svg:height="1.57cm" draw:z-index="40"><draw:image xlink:href="Pictures/100000000000013400000077D3895A4B.png" xlink:type="simple" xlink:show="embed" xlink:actuate="onLoad"/></draw:frame>Output<text:tab/>REAL (Mittelwert des Arrays)</text:p>
      <text:p text:style-name="P23"><text:line-break/>Die Funktion ARRAY<text:span text:style-name="T33">_</text:span>AVG ermittelt den Mittelwert eines beliebigen Arrays <text:span text:style-name="T16">of</text:span> REAL. Bei Aufruf wird der Funktion ein <text:span text:style-name="T16">Pointer</text:span> auf das Array und dessen Größe in Bytes übergeben. Unter CoDeSys lautet der Aufruf: ARRAY_AVG(ADR(Array), SIZEOF(Ar<text:soft-page-break/>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AVG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AVG(ADR(bigarray), SIZEOF(bigarray))</text:p>
      <text:list xml:id="list33636907" text:continue-numbering="true" text:style-name="L1">
        <text:list-item>
          <text:list>
            <text:list-item>
              <text:h text:style-name="P217" text:outline-level="2"><text:alphabetical-index-mark-start text:id="IMark112348168"/>ARRAY_GAV<text:alphabetical-index-mark-end text:id="IMark112348168"/></text:h>
            </text:list-item>
          </text:list>
        </text:list-item>
      </text:list>
      <text:p text:style-name="P166">Type<text:tab/>Funktion : REAL</text:p>
      <text:p text:style-name="P166"><text:span text:style-name="T16">Input</text:span><text:tab/>PT : <text:span text:style-name="T16">Pointer</text:span> (Zeiger auf das Array)</text:p>
      <text:p text:style-name="P166"><text:tab/>SIZE : UINT (Größe des Arrays)</text:p>
      <text:p text:style-name="P166"><draw:frame draw:style-name="fr4" draw:name="Grafik544" text:anchor-type="paragraph" svg:x="1.002cm" svg:y="0.667cm" svg:width="4.09cm" svg:height="1.39cm" draw:z-index="554"><draw:image xlink:href="Pictures/100000000000013500000069C6796EE1.png" xlink:type="simple" xlink:show="embed" xlink:actuate="onLoad"/></draw:frame>Output<text:tab/>REAL (Mittelwert des Arrays)</text:p>
      <text:p text:style-name="P23"><text:line-break/>Die Funktion ARRAY<text:span text:style-name="T33">_</text:span>GAV ermittelt den geometrischen Mittelwert eines beliebigen Arrays <text:span text:style-name="T16">of</text:span> REAL. Bei Aufruf wird der Funktion ein <text:span text:style-name="T16">Pointer</text:span> auf das Array und dessen Größe in Bytes übergeben. Unter CoDeSys lautet der Aufruf: ARRAY_GA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GAV verändert den Inhalt des Arrays nicht.</text:p>
      <text:p text:style-name="P53">Diese Art der Bearbeitung von Arrays ist äußerst effizient, da kein zusätzlicher Speicher benötigt wird und keine Übergabewerte kopiert werden müssen.</text:p>
      <text:p text:style-name="P23">Beispiel:<text:tab/>ARRAY_GAV(ADR(bigarray), SIZEOF(bigarray))</text:p>
      <text:p text:style-name="P53"/>
      <text:list xml:id="list33646099" text:continue-numbering="true" text:style-name="L1">
        <text:list-item>
          <text:list>
            <text:list-item>
              <text:h text:style-name="P217" text:outline-level="2"><text:soft-page-break/><text:alphabetical-index-mark-start text:id="IMark112348168"/>ARRAY_HAV<text:alphabetical-index-mark-end text:id="IMark112348168"/></text:h>
            </text:list-item>
          </text:list>
        </text:list-item>
      </text:list>
      <text:p text:style-name="P166">Type<text:tab/>Funktion : REAL</text:p>
      <text:p text:style-name="P166"><text:span text:style-name="T16">Input</text:span><text:tab/>PT : <text:span text:style-name="T16">Pointer</text:span> (Zeiger auf das Array)</text:p>
      <text:p text:style-name="P166"><text:tab/>SIZE : UINT (Größe des Arrays)</text:p>
      <text:p text:style-name="P166"><draw:frame draw:style-name="fr4" draw:name="Grafik545" text:anchor-type="paragraph" svg:x="1.025cm" svg:y="0.667cm" svg:width="4.09cm" svg:height="1.39cm" draw:z-index="555"><draw:image xlink:href="Pictures/1000000000000135000000698E514B3C.png" xlink:type="simple" xlink:show="embed" xlink:actuate="onLoad"/></draw:frame>Output<text:tab/>REAL (Mittelwert des Arrays)</text:p>
      <text:p text:style-name="P23"><text:line-break/>Die Funktion ARRAY<text:span text:style-name="T33">_</text:span>HAV ermittelt den harmonischen Mittelwert eines beliebigen Arrays <text:span text:style-name="T16">of</text:span> REAL. Bei Aufruf wird der Funktion ein <text:span text:style-name="T16">Pointer</text:span> auf das Array und dessen Größe in Bytes übergeben. Unter CoDeSys lautet der Aufruf: ARRAY_HA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HAV verändert den Inhalt des Arrays nicht.</text:p>
      <text:p text:style-name="P53">Diese Art der Bearbeitung von Arrays ist äußerst effizient, da kein zusätzlicher Speicher benötigt wird und keine Übergabewerte kopiert werden müssen.</text:p>
      <text:p text:style-name="P23">Beispiel:<text:tab/>ARRAY_HAV(ADR(bigarray), SIZEOF(bigarray))</text:p>
      <text:list xml:id="list33635581" text:continue-numbering="true" text:style-name="L1">
        <text:list-item>
          <text:list>
            <text:list-item>
              <text:h text:style-name="P217" text:outline-level="2"><text:alphabetical-index-mark-start text:id="IMark112348168"/>ARRAY_MAX<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78" text:anchor-type="paragraph" svg:x="1.05cm" svg:y="0.688cm" svg:width="4.069cm" svg:height="1.57cm" draw:z-index="45"><draw:image xlink:href="Pictures/100000000000013400000077D47641F7.png" xlink:type="simple" xlink:show="embed" xlink:actuate="onLoad"/></draw:frame>Output<text:tab/>REAL (Maximalwert des Arrays)</text:p>
      <text:p text:style-name="P23"><text:line-break/>Die Funktion ARRAY<text:span text:style-name="T33">_</text:span>MAX ermittelt den Maximalwert eines beliebigen Arrays <text:span text:style-name="T16">of</text:span> REAL. Bei Aufruf wird der Funktion ein <text:span text:style-name="T16">Pointer</text:span> auf das Array und dessen Größe in Bytes übergeben. Unter CoDeSys lautet der Aufruf: Array_MAX(ADR(Array), SIZEOF(Array)), wobei Array der Name des zu durchsuchenden Arrays ist. ADR ist eine Standard Funktion die den <text:span text:style-name="T16">Pointer</text:span> auf das Array ermittelt und SIZEOF ist eine <text:soft-page-break/>Standard Funktion die die Größe des Arrays ermittelt. Um den Maximalwert zu ermitteln wird das durch den <text:span text:style-name="T16">Pointer</text:span> referenzierte Array direkt im Speicher durchsucht. Die Funktion ARRAY_MAX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53">Beispiel:<text:tab/>ARRAY_MAX(ADR(bigarray), SIZEOF(bigarray))</text:p>
      <text:list xml:id="list33648724" text:continue-numbering="true" text:style-name="L1">
        <text:list-item>
          <text:list>
            <text:list-item>
              <text:h text:style-name="P217" text:outline-level="2"><text:alphabetical-index-mark-start text:id="IMark112348168"/>ARRAY_MIN<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7" text:anchor-type="paragraph" svg:x="1.023cm" svg:y="0.661cm" svg:width="4.069cm" svg:height="1.57cm" draw:z-index="41"><draw:image xlink:href="Pictures/10000000000001340000007765BD2321.png" xlink:type="simple" xlink:show="embed" xlink:actuate="onLoad"/></draw:frame>Output<text:tab/>REAL (Minimalwert des Arrays)</text:p>
      <text:p text:style-name="P23"><text:line-break/>Die Funktion ARRAY<text:span text:style-name="T33">_</text:span>MIN ermittelt den Minimalwert eines beliebigen Arrays <text:span text:style-name="T16">of</text:span> REAL. Beim Aufruf wird der Funktion ein <text:span text:style-name="T16">Pointer</text:span> auf das Array und dessen Größe in Bytes übergeben. Unter CoDeSys lautet der Aufruf: ARRAY<text:span text:style-name="T33">_</text:span>MIN(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text:span text:style-name="T33">_</text:span>MIN verändert den Inhalt des Arrays nicht.</text:p>
      <text:p text:style-name="P53"><text:span text:style-name="T10">Diese Art der Bearbeitung von Arrays ist</text:span> äußerst effizient, da kein zusätzlicher Speicher benötigt wird und keine Übergabewerte kopiert werden müssen.</text:p>
      <text:p text:style-name="P23">Beispiel:<text:tab/>ARRAY_MIN(ADR(bigarray), SIZEOF(bigarray))</text:p>
      <text:p text:style-name="P53"/>
      <text:p text:style-name="P53"/>
      <text:list xml:id="list33648205" text:continue-numbering="true" text:style-name="L1">
        <text:list-item>
          <text:list>
            <text:list-item>
              <text:h text:style-name="P217" text:outline-level="2"><text:soft-page-break/><text:alphabetical-index-mark-start text:id="IMark112348168"/>ARRAY_SDV<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297" text:anchor-type="paragraph" svg:x="0.974cm" svg:y="0.653cm" svg:width="4.069cm" svg:height="1.57cm" draw:z-index="270"><draw:image xlink:href="Pictures/100000000000013400000077749EF1C2.png" xlink:type="simple" xlink:show="embed" xlink:actuate="onLoad"/></draw:frame>Output<text:tab/>REAL (Standardabweichung des Arrays)</text:p>
      <text:p text:style-name="P23"><text:line-break/>Die Funktion ARRAY<text:span text:style-name="T33">_</text:span>SDV ermittelt die Standardabweichung (Standard <text:span text:style-name="T16">Deviation</text:span>) eines beliebigen Arrays <text:span text:style-name="T16">of</text:span> REAL. Beim Aufruf wird der Funktion ein <text:span text:style-name="T16">Pointer</text:span> auf das Array und dessen Größe in Bytes übergeben. Unter CoDeSys lautet der Aufruf: ARRAY_SD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text:span text:style-name="T33">_</text:span>SDV verändert den Inhalt des Arrays nicht.</text:p>
      <text:p text:style-name="P53"><text:span text:style-name="T10">Diese Art der Bearbeitung von Arrays ist</text:span> äußerst effizient, da kein zusätzlicher Speicher benötigt wird und keine Übergabewerte kopiert werden müssen.</text:p>
      <text:p text:style-name="P23">Beispiel:<text:tab/>ARRAY_SDV(ADR(bigarray), SIZEOF(bigarray))</text:p>
      <text:list xml:id="list33631214" text:continue-numbering="true" text:style-name="L1">
        <text:list-item>
          <text:list>
            <text:list-item>
              <text:h text:style-name="P217" text:outline-level="2"><text:alphabetical-index-mark-start text:id="IMark112348168"/>ARRAY_SPR<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8" text:anchor-type="paragraph" svg:x="0.998cm" svg:y="0.658cm" svg:width="3.62cm" svg:height="1.57cm" draw:z-index="42"><draw:image xlink:href="Pictures/100000000000011200000077B9CF2C5C.png" xlink:type="simple" xlink:show="embed" xlink:actuate="onLoad"/></draw:frame>Output<text:tab/>REAL (Streuung des Arrays)</text:p>
      <text:p text:style-name="P23"><text:line-break/>Die Funktion ARRAY<text:span text:style-name="T33">_</text:span>SPR ermittelt die Streuung eines beliebigen Arrays <text:span text:style-name="T16">of</text:span> REAL. Die Streuung ist der Maximalwert im Array minus dem Minimalwert des Arrays. Beim Aufruf wird der Funktion ein <text:span text:style-name="T16">Pointer</text:span> auf das Array und dessen Größe in Bytes über<text:soft-page-break/>geben. Unter CoDeSys lautet der Aufruf: ARRAY_SPR(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SPR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SPR(ADR(bigarray), SIZEOF(bigarray)) =</text:p>
      <text:p text:style-name="P23"><text:tab/>Maximalwert(bigarray) - Minimalwert(bigarray)</text:p>
      <text:list xml:id="list33656369" text:continue-numbering="true" text:style-name="L1">
        <text:list-item>
          <text:list>
            <text:list-item>
              <text:h text:style-name="P217" text:outline-level="2"><text:alphabetical-index-mark-start text:id="IMark112348168"/>ARRAY_SUM<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9" text:anchor-type="paragraph" svg:x="1.053cm" svg:y="0.594cm" svg:width="4.069cm" svg:height="1.57cm" draw:z-index="43"><draw:image xlink:href="Pictures/10000000000001340000007766F9E5F4.png" xlink:type="simple" xlink:show="embed" xlink:actuate="onLoad"/></draw:frame>Output<text:tab/>REAL (Summe aller Werte des Arrays)</text:p>
      <text:p text:style-name="P23"><text:line-break/>Die Funktion ARRAY<text:span text:style-name="T33">_</text:span>SUM ermittelt die Summe aller Werte eines beliebigen Arrays <text:span text:style-name="T16">of</text:span> REAL. Beim Aufruf wird der Funktion ein <text:span text:style-name="T16">Pointer</text:span> auf das Array und dessen Größe in Bytes übergeben. Unter CoDeSys lautet der Aufruf: ARRAY_SUM(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SUM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SUM(ADR(bigarray), SIZEOF(bigarray))</text:p>
      <text:list xml:id="list33624312" text:continue-numbering="true" text:style-name="L1">
        <text:list-item>
          <text:list>
            <text:list-item>
              <text:h text:style-name="P218" text:outline-level="2"><text:soft-page-break/><text:alphabetical-index-mark-start text:id="IMark112348168"/>ARRAY_TREND<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60" text:anchor-type="paragraph" svg:x="1.078cm" svg:y="0.672cm" svg:width="4.521cm" svg:height="1.57cm" draw:z-index="44"><draw:image xlink:href="Pictures/1000000000000156000000772337FB00.png" xlink:type="simple" xlink:show="embed" xlink:actuate="onLoad"/></draw:frame>Output<text:tab/>REAL (Trendentwicklung des Arrays)</text:p>
      <text:p text:style-name="P23"><text:line-break/>Die Funktion ARRAY<text:span text:style-name="T33">_</text:span>TREND ermittelt den Trend der Werte eines beliebigen Arrays <text:span text:style-name="T16">of</text:span> REAL. Beim Aufruf wird der Funktion ein <text:span text:style-name="T16">Pointer</text:span> auf das Array und dessen Größe in Bytes übergeben. Unter CoDeSys lautet der Aufruf: ARRAY_TREND(ADR(Array), SIZEOF(Array)), wobei Array der Name des zu durchsuchenden Arrays ist. ADR() ist eine Standardfunktion, die den <text:span text:style-name="T16">Pointer</text:span> auf das Array ermittelt und SIZEOF() ist eine Standardfunktion, die die Größe des Arrays ermittelt. Um den Trend zu ermitteln wird das durch den <text:span text:style-name="T16">Pointer</text:span> referenzierte Array direkt im Speicher durchsucht. Die Funktion ARRAY_TREND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53">Der Trend wird ermittelt, indem der Durchschnitt der unteren Hälfte der Werte des Arrays vom Durchschnitt der Werte der oberen Hälfte des Arrays abgezogen wird.</text:p>
      <text:p text:style-name="P23">Beispiel:<text:tab/>ARRAY_TREND(ADR(bigarray), SIZEOF(bigarray))</text:p>
      <text:list xml:id="list33643325" text:continue-numbering="true" text:style-name="L1">
        <text:list-item>
          <text:list>
            <text:list-item>
              <text:h text:style-name="P217" text:outline-level="2"><text:alphabetical-index-mark-start text:id="IMark112348168"/>ARRAY_VAR<text:alphabetical-index-mark-end text:id="IMark112348168"/></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298" text:anchor-type="paragraph" svg:x="1.113cm" svg:y="0.693cm" svg:width="3.62cm" svg:height="1.57cm" draw:z-index="271"><draw:image xlink:href="Pictures/100000000000011200000077FE7BD5D4.png" xlink:type="simple" xlink:show="embed" xlink:actuate="onLoad"/></draw:frame>Output<text:tab/>REAL (Varianz des Arrays)</text:p>
      <text:p text:style-name="P23"><text:line-break/>Die Funktion ARRAY<text:span text:style-name="T33">_</text:span>VAR ermittelt die Varianz eines beliebigen Arrays <text:span text:style-name="T16">of</text:span> REAL. Beim Aufruf wird der Funktion ein <text:span text:style-name="T16">Pointer</text:span> auf das Array und dessen Größe in Bytes <text:soft-page-break/>übergeben. Unter CoDeSys lautet der Aufruf: ARRAY_VAR(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VAR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VAR(ADR(bigarray), SIZEOF(bigarray))</text:p>
      <text:list xml:id="list33642283" text:continue-numbering="true" text:style-name="L1">
        <text:list-item>
          <text:list>
            <text:list-item>
              <text:h text:style-name="P219" text:outline-level="2"><text:alphabetical-index-mark-start text:id="IMark112348168"/>IS_SORTED<text:alphabetical-index-mark-end text:id="IMark112348168"/></text:h>
            </text:list-item>
          </text:list>
        </text:list-item>
      </text:list>
      <text:p text:style-name="P165">Type<text:tab/>Funktion : BOOL</text:p>
      <text:p text:style-name="P165"><text:span text:style-name="T16">Input</text:span><text:tab/>PT : <text:span text:style-name="T16">Pointer</text:span> (Zeiger auf das Array)</text:p>
      <text:p text:style-name="P165"><text:tab/>SIZE : UINT (Größe des Arrays)</text:p>
      <text:p text:style-name="P165">Output<text:tab/>BOOL (TRUE)</text:p>
      <text:p text:style-name="P23"><draw:frame draw:style-name="fr4" draw:name="Grafik538" text:anchor-type="paragraph" svg:x="1.046cm" svg:y="0.012cm" svg:width="4.551cm" svg:height="1.76cm" draw:z-index="547"><draw:image xlink:href="Pictures/100000000000015800000085C262DFD3.png" xlink:type="simple" xlink:show="embed" xlink:actuate="onLoad"/></draw:frame><text:line-break/>Die Funktion IS<text:span text:style-name="T33">_</text:span>SORTED prüft ob ein beliebiges Array <text:span text:style-name="T16">of</text:span> REAL in aufsteigender Reihenfolge sortiert ist. Beim Aufruf wird der Funktion ein <text:span text:style-name="T16">Pointer</text:span> auf das zu sortierende Array und dessen Größe in Bytes übergeben. Unter CoDeSys lautet der Aufruf: _ARRAY_SORT(ADR(Array), SIZEOF(Array)), wobei Array der Name des zu sortierenden Arrays ist. ADR ist eine Standardfunktion, die den <text:span text:style-name="T16">Pointer</text:span> auf das Array ermittelt und SIZEOF ist eine Standardfunktion, die die Größe des Arrays ermittelt.</text:p>
      <text:p text:style-name="P53">Die Funktion liefert TRUE zurück wenn das Array in aufsteigender Reihenfolge sortiert ist.</text:p>
      <text:p text:style-name="P23">Diese Art der Bearbeitung von Arrays ist äußerst effizient, da kein zusätzlicher Speicher benötigt wird und keine Übergabewerte kopiert werden müssen.<text:line-break/><text:line-break/>Beispiel:<text:tab/>IS_SORTED(ADR(bigarray), SIZEOF(bigarray))</text:p>
      <text:p text:style-name="P53"/>
      <text:list xml:id="list33627111" text:continue-numbering="true" text:style-name="L1">
        <text:list-item>
          <text:h text:style-name="P212" text:outline-level="1">Komplexe Mathematik</text:h>
        </text:list-item>
      </text:list>
      <text:p text:style-name="P21"/>
      <text:list xml:id="list33655330" text:continue-numbering="true" text:style-name="L1">
        <text:list-item>
          <text:list>
            <text:list-item>
              <text:h text:style-name="P220" text:outline-level="2">EINLEITUNG</text:h>
            </text:list-item>
          </text:list>
        </text:list-item>
      </text:list>
      <text:p text:style-name="P65">Komplexe Zahlen werden mit dem definierten Typ COMPLEX abgebildet.</text:p>
      <text:p text:style-name="P65">Der Typ COMPLEX setzt sich aus einem Realteil und einem Imaginärteil zusammen, beide Komponenten sind vom Typ REAL.</text:p>
      <text:p text:style-name="P65">Die komplexe Zahl Z vom Typ COMPLEX besteht aus:</text:p>
      <text:p text:style-name="P65">Z.RE<text:tab/>Realteil vom Typ REAL.</text:p>
      <text:p text:style-name="P65">Z.IM<text:tab/>Imaginärteil vom Typ REAL.</text:p>
      <text:list xml:id="list33626202" text:continue-numbering="true" text:style-name="L1">
        <text:list-item>
          <text:list>
            <text:list-item>
              <text:h text:style-name="P217" text:outline-level="2"><text:alphabetical-index-mark-start text:id="IMark112348168"/>CABS<text:alphabetical-index-mark-end text:id="IMark112348168"/></text:h>
            </text:list-item>
          </text:list>
        </text:list-item>
      </text:list>
      <text:p text:style-name="P22">Type<text:tab/>Funktion : REAL</text:p>
      <text:p text:style-name="P52"><text:span text:style-name="T16">Input</text:span><text:tab/>X : <text:span text:style-name="T16">COMPLEX</text:span> (Eingangswert)</text:p>
      <text:p text:style-name="P23"><draw:frame draw:style-name="fr4" draw:name="Grafik451" text:anchor-type="paragraph" svg:x="1.046cm" svg:y="0.667cm" svg:width="2.499cm" svg:height="0.99cm" draw:z-index="458"><draw:image xlink:href="Pictures/10000000000000BD0000004B47D289CA.png" xlink:type="simple" xlink:show="embed" xlink:actuate="onLoad"/></draw:frame>Output<text:tab/>REAL (Ergebnis)</text:p>
      <text:p text:style-name="P55"><text:line-break/>CABS berechnet die Länge des Vektors einer komplexen Zahl. Der Absolutwert wird auch Modul oder <text:span text:style-name="T16">Magnitude</text:span> genannt.</text:p>
      <text:p text:style-name="P55">CABS = SQRT(X.RE² + X.IM²)</text:p>
      <text:list xml:id="list33650801" text:continue-numbering="true" text:style-name="L1">
        <text:list-item>
          <text:list>
            <text:list-item>
              <text:h text:style-name="P217" text:outline-level="2"><text:soft-page-break/><text:alphabetical-index-mark-start text:id="IMark112348168"/>CACOS<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2" text:anchor-type="paragraph" svg:x="1.046cm" svg:y="0.667cm" svg:width="3.069cm" svg:height="0.99cm" draw:z-index="459"><draw:image xlink:href="Pictures/10000000000000E80000004BFB7A3760.png" xlink:type="simple" xlink:show="embed" xlink:actuate="onLoad"/></draw:frame>Output<text:tab/>COMPLEX (Ergebnis)</text:p>
      <text:p text:style-name="P55"><text:line-break/>CACOS berechnet den Arcus Kosinus einer Komplexen Zahl.</text:p>
      <text:p text:style-name="P55">Der Wertebereich des Ergebnisses liegt zwischen [0,] für den Realteil und [-<text:span text:style-name="T12">∞,+∞] für den Imaginärteil.</text:span></text:p>
      <text:list xml:id="list33634219" text:continue-numbering="true" text:style-name="L1">
        <text:list-item>
          <text:list>
            <text:list-item>
              <text:h text:style-name="P217" text:outline-level="2"><text:alphabetical-index-mark-start text:id="IMark112348168"/>CACOSH<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3" text:anchor-type="paragraph" svg:x="1.023cm" svg:y="0.688cm" svg:width="3.47cm" svg:height="0.99cm" draw:z-index="460"><draw:image xlink:href="Pictures/10000000000001060000004BE367B82E.png" xlink:type="simple" xlink:show="embed" xlink:actuate="onLoad"/></draw:frame>Output<text:tab/>COMPLEX (Ergebnis)</text:p>
      <text:p text:style-name="P55"><text:line-break/>CACOSH berechnet den Arcus Kosinus Hyperbolicus einer Komplexen Zahl.</text:p>
      <text:p text:style-name="P55">Der Wertebereich des Ergebnisses liegt zwischen [-<text:span text:style-name="T12">,+</text:span><text:span text:style-name="T12">] für den Imaginärteil.</text:span></text:p>
      <text:list xml:id="list33627264" text:continue-numbering="true" text:style-name="L1">
        <text:list-item>
          <text:list>
            <text:list-item>
              <text:h text:style-name="P217" text:outline-level="2"><text:alphabetical-index-mark-start text:id="IMark112348168"/>CADD<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54" text:anchor-type="paragraph" svg:x="1.046cm" svg:y="0.667cm" svg:width="2.499cm" svg:height="1.39cm" draw:z-index="461"><draw:image xlink:href="Pictures/10000000000000BD0000006970DE4401.png" xlink:type="simple" xlink:show="embed" xlink:actuate="onLoad"/></draw:frame>Output<text:tab/>COMPLEX (Ergebnis)</text:p>
      <text:p text:style-name="P55"><text:soft-page-break/><text:line-break/>CADD addiert zwei Komplexe Zahlen X und Y.</text:p>
      <text:list xml:id="list33653693" text:continue-numbering="true" text:style-name="L1">
        <text:list-item>
          <text:list>
            <text:list-item>
              <text:h text:style-name="P217" text:outline-level="2"><text:alphabetical-index-mark-start text:id="IMark112348168"/>CARG<text:alphabetical-index-mark-end text:id="IMark112348168"/></text:h>
            </text:list-item>
          </text:list>
        </text:list-item>
      </text:list>
      <text:p text:style-name="P22">Type<text:tab/>Funktion : REAL</text:p>
      <text:p text:style-name="P52"><text:span text:style-name="T16">Input</text:span><text:tab/>X : <text:span text:style-name="T16">COMPLEX</text:span> (Eingangswert)<text:tab/></text:p>
      <text:p text:style-name="P25"><draw:frame draw:style-name="fr4" draw:name="Grafik474" text:anchor-type="paragraph" svg:x="1.046cm" svg:y="0.667cm" svg:width="2.499cm" svg:height="0.99cm" draw:z-index="481"><draw:image xlink:href="Pictures/10000000000000BD0000004B584A85A4.png" xlink:type="simple" xlink:show="embed" xlink:actuate="onLoad"/></draw:frame>Output<text:tab/>REAL (Ergebnis)</text:p>
      <text:p text:style-name="P55"><text:line-break/>CARG berechnet den Winkel einer Komplexen Zahl im Koordinatensystem.</text:p>
      <text:p text:style-name="P55">Der Wertebereich des Ergebnisses liegt zwischen [-<text:span text:style-name="T12">,+</text:span><text:span text:style-name="T12">].</text:span></text:p>
      <text:list xml:id="list33641813" text:continue-numbering="true" text:style-name="L1">
        <text:list-item>
          <text:list>
            <text:list-item>
              <text:h text:style-name="P217" text:outline-level="2"><text:alphabetical-index-mark-start text:id="IMark112348168"/>CASIN<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5" text:anchor-type="paragraph" svg:x="1.069cm" svg:y="0.667cm" svg:width="3.069cm" svg:height="0.99cm" draw:z-index="462"><draw:image xlink:href="Pictures/10000000000000E80000004B48080954.png" xlink:type="simple" xlink:show="embed" xlink:actuate="onLoad"/></draw:frame>Output<text:tab/>COMPLEX (Ergebnis)</text:p>
      <text:p text:style-name="P55"><text:line-break/>CASIN berechnet den Arcus Sinus einer Komplexen Zahl.</text:p>
      <text:p text:style-name="P55">Der Wertebereich des Ergebnisses liegt zwischen [-<text:span text:style-name="T1">/2</text:span><text:span text:style-name="T12">,+</text:span><text:span text:style-name="T12">/2] für den Realteil.</text:span></text:p>
      <text:list xml:id="list33632611" text:continue-numbering="true" text:style-name="L1">
        <text:list-item>
          <text:list>
            <text:list-item>
              <text:h text:style-name="P217" text:outline-level="2"><text:soft-page-break/><text:alphabetical-index-mark-start text:id="IMark112348168"/>CASINH<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6" text:anchor-type="paragraph" svg:x="1.025cm" svg:y="0.667cm" svg:width="3.47cm" svg:height="0.99cm" draw:z-index="463"><draw:image xlink:href="Pictures/10000000000001060000004B5A55B9DE.png" xlink:type="simple" xlink:show="embed" xlink:actuate="onLoad"/></draw:frame>Output<text:tab/>COMPLEX (Ergebnis)</text:p>
      <text:p text:style-name="P55"><text:line-break/>CASINH berechnet den Arcus Sinus Hyperbolicus einer Komplexen Zahl.</text:p>
      <text:p text:style-name="P55">Der Wertebereich des Ergebnisses liegt zwischen [-<text:span text:style-name="T12">,+</text:span><text:span text:style-name="T12">] für den Imaginärteil.</text:span></text:p>
      <text:list xml:id="list33633976" text:continue-numbering="true" text:style-name="L1">
        <text:list-item>
          <text:list>
            <text:list-item>
              <text:h text:style-name="P217" text:outline-level="2"><text:alphabetical-index-mark-start text:id="IMark112348168"/>CATAN<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7" text:anchor-type="paragraph" svg:x="1.023cm" svg:y="0.667cm" svg:width="3.069cm" svg:height="0.99cm" draw:z-index="464"><draw:image xlink:href="Pictures/10000000000000E80000004B303591AB.png" xlink:type="simple" xlink:show="embed" xlink:actuate="onLoad"/></draw:frame>Output<text:tab/>COMPLEX (Ergebnis)</text:p>
      <text:p text:style-name="P55">CATAN berechnet den Arcus Tangens einer Komplexen Zahl.</text:p>
      <text:p text:style-name="P55">Der Wertebereich des Ergebnisses liegt zwischen [-<text:span text:style-name="T1">/2</text:span><text:span text:style-name="T12">,+</text:span><text:span text:style-name="T12">/2] für den Realteil.</text:span></text:p>
      <text:list xml:id="list33650306" text:continue-numbering="true" text:style-name="L1">
        <text:list-item>
          <text:list>
            <text:list-item>
              <text:h text:style-name="P217" text:outline-level="2"><text:alphabetical-index-mark-start text:id="IMark112348168"/>CATANH<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8" text:anchor-type="paragraph" svg:x="1.023cm" svg:y="0.69cm" svg:width="3.47cm" svg:height="0.99cm" draw:z-index="465"><draw:image xlink:href="Pictures/10000000000001060000004B76DD456D.png" xlink:type="simple" xlink:show="embed" xlink:actuate="onLoad"/></draw:frame>Output<text:tab/>COMPLEX (Ergebnis)</text:p>
      <text:p text:style-name="P55">CATANH berechnet den Arcus Tangens Hyperbolicus einer Komplexen Zahl.</text:p>
      <text:p text:style-name="P55">Der Wertebereich des Ergebnisses liegt zwischen [-<text:span text:style-name="T1">/2</text:span><text:span text:style-name="T12">,+</text:span><text:span text:style-name="T12">/2] für den Imaginärteil.</text:span></text:p>
      <text:list xml:id="list33633099" text:continue-numbering="true" text:style-name="L1">
        <text:list-item>
          <text:list>
            <text:list-item>
              <text:h text:style-name="P217" text:outline-level="2"><text:soft-page-break/><text:alphabetical-index-mark-start text:id="IMark112348168"/>CCON<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9"><draw:frame draw:style-name="fr4" draw:name="Grafik475" text:anchor-type="paragraph" svg:x="1.046cm" svg:y="0.623cm" svg:width="2.499cm" svg:height="0.99cm" draw:z-index="482"><draw:image xlink:href="Pictures/10000000000000BD0000004B644EC334.png" xlink:type="simple" xlink:show="embed" xlink:actuate="onLoad"/></draw:frame>Output<text:tab/>COMPLEX (Ergebnis)</text:p>
      <text:p text:style-name="P62"><text:line-break/>CCON berechnet die Konjugation einer komplexen Zahl.</text:p>
      <text:p text:style-name="P62">CCON.RE = X.RE</text:p>
      <text:p text:style-name="P62">CCON.IM = -X.IM</text:p>
      <text:list xml:id="list33654331" text:continue-numbering="true" text:style-name="L1">
        <text:list-item>
          <text:list>
            <text:list-item>
              <text:h text:style-name="P217" text:outline-level="2"><text:alphabetical-index-mark-start text:id="IMark112348168"/>CCOS<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9" text:anchor-type="paragraph" svg:x="1.025cm" svg:y="0.688cm" svg:width="2.671cm" svg:height="0.99cm" draw:z-index="466"><draw:image xlink:href="Pictures/10000000000000CA0000004B9B792AE6.png" xlink:type="simple" xlink:show="embed" xlink:actuate="onLoad"/></draw:frame>Output<text:tab/>COMPLEX (Ergebnis)</text:p>
      <text:p text:style-name="P55"><text:line-break/>CCOS berechnet den Kosinus einer Komplexen Zahl.</text:p>
      <text:list xml:id="list33634447" text:continue-numbering="true" text:style-name="L1">
        <text:list-item>
          <text:list>
            <text:list-item>
              <text:h text:style-name="P217" text:outline-level="2"><text:alphabetical-index-mark-start text:id="IMark112348168"/>CCOSH<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0" text:anchor-type="paragraph" svg:x="1.046cm" svg:y="0.667cm" svg:width="2.9cm" svg:height="0.99cm" draw:z-index="467"><draw:image xlink:href="Pictures/10000000000000DB0000004BB5A0614D.png" xlink:type="simple" xlink:show="embed" xlink:actuate="onLoad"/></draw:frame>Output<text:tab/>COMPLEX (Ergebnis)</text:p>
      <text:p text:style-name="P55"><text:line-break/>CCOSH berechnet den Kosinus Hyperbolicus einer Komplexen Zahl.</text:p>
      <text:list xml:id="list33655653" text:continue-numbering="true" text:style-name="L1">
        <text:list-item>
          <text:list>
            <text:list-item>
              <text:h text:style-name="P217" text:outline-level="2"><text:soft-page-break/><text:alphabetical-index-mark-start text:id="IMark112348168"/>CDIV<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61" text:anchor-type="paragraph" svg:x="1.046cm" svg:y="0.69cm" svg:width="2.499cm" svg:height="1.39cm" draw:z-index="468"><draw:image xlink:href="Pictures/10000000000000BD0000006905B42262.png" xlink:type="simple" xlink:show="embed" xlink:actuate="onLoad"/></draw:frame>Output<text:tab/>COMPLEX (Ergebnis)</text:p>
      <text:p text:style-name="P55"><text:line-break/>CDIV dividiert zwei komplexe Zahlen X / Y.</text:p>
      <text:list xml:id="list33641459" text:continue-numbering="true" text:style-name="L1">
        <text:list-item>
          <text:list>
            <text:list-item>
              <text:h text:style-name="P217" text:outline-level="2"><text:alphabetical-index-mark-start text:id="IMark112348168"/>CEXP<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2" text:anchor-type="paragraph" svg:x="1.067cm" svg:y="0.667cm" svg:width="2.499cm" svg:height="0.99cm" draw:z-index="469"><draw:image xlink:href="Pictures/10000000000000BD0000004BF8922481.png" xlink:type="simple" xlink:show="embed" xlink:actuate="onLoad"/></draw:frame>Output<text:tab/>COMPLEX (Ergebnis)</text:p>
      <text:p text:style-name="P55"><text:line-break/>CEXP berechnet den komplexen Exponent zur Basis E, CEXP = E^X.</text:p>
      <text:list xml:id="list33651680" text:continue-numbering="true" text:style-name="L1">
        <text:list-item>
          <text:list>
            <text:list-item>
              <text:h text:style-name="P217" text:outline-level="2"><text:alphabetical-index-mark-start text:id="IMark112348168"/>CINV<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3" text:anchor-type="paragraph" svg:x="1.002cm" svg:y="0.654cm" svg:width="2.671cm" svg:height="0.99cm" draw:z-index="470"><draw:image xlink:href="Pictures/10000000000000CA0000004B60446FF9.png" xlink:type="simple" xlink:show="embed" xlink:actuate="onLoad"/></draw:frame>Output<text:tab/>COMPLEX (Ergebnis)</text:p>
      <text:p text:style-name="P55"><text:line-break/>CINV berechnet der Kehrwert einer Komplexen Zahl, CINV = 1/X</text:p>
      <text:list xml:id="list33648980" text:continue-numbering="true" text:style-name="L1">
        <text:list-item>
          <text:list>
            <text:list-item>
              <text:h text:style-name="P217" text:outline-level="2"><text:soft-page-break/><text:alphabetical-index-mark-start text:id="IMark112348168"/>CLOG<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4" text:anchor-type="paragraph" svg:x="1.046cm" svg:y="0.667cm" svg:width="2.499cm" svg:height="0.99cm" draw:z-index="471"><draw:image xlink:href="Pictures/10000000000000BD0000004BE4FE7252.png" xlink:type="simple" xlink:show="embed" xlink:actuate="onLoad"/></draw:frame>Output<text:tab/>COMPLEX(Ergebnis)</text:p>
      <text:p text:style-name="P55"><text:line-break/>CLOG berechnet den natürlichen Logarithmus einer Komplexen Zahl zur Basis E.</text:p>
      <text:p text:style-name="P55">CLOG(X) = LOG(e)(X).</text:p>
      <text:p text:style-name="P55">Der Wertebereich des Ergebnisses liegt zwischen [-<text:span text:style-name="T12">,+</text:span><text:span text:style-name="T12">] für den Imaginärteil.</text:span></text:p>
      <text:list xml:id="list33633165" text:continue-numbering="true" text:style-name="L1">
        <text:list-item>
          <text:list>
            <text:list-item>
              <text:h text:style-name="P217" text:outline-level="2"><text:alphabetical-index-mark-start text:id="IMark112348168"/>CMUL<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65" text:anchor-type="paragraph" svg:x="1.025cm" svg:y="0.667cm" svg:width="2.499cm" svg:height="1.39cm" draw:z-index="472"><draw:image xlink:href="Pictures/10000000000000BD000000699EAEDCD1.png" xlink:type="simple" xlink:show="embed" xlink:actuate="onLoad"/></draw:frame>Output<text:tab/>COMPLEX (Ergebnis)</text:p>
      <text:p text:style-name="P55"><text:line-break/>CMUL Multipliziert zwei Komplexe Zahlen X und Y.</text:p>
      <text:list xml:id="list33654431" text:continue-numbering="true" text:style-name="L1">
        <text:list-item>
          <text:list>
            <text:list-item>
              <text:h text:style-name="P217" text:outline-level="2"><text:alphabetical-index-mark-start text:id="IMark112348168"/>CPOL<text:alphabetical-index-mark-end text:id="IMark112348168"/></text:h>
            </text:list-item>
          </text:list>
        </text:list-item>
      </text:list>
      <text:p text:style-name="P22">Type<text:tab/>Funktion : COMPLEX</text:p>
      <text:p text:style-name="P52"><text:span text:style-name="T16">Input</text:span><text:tab/>L : <text:span text:style-name="T16">REAL </text:span>(Länge oder Raduis)</text:p>
      <text:p text:style-name="P52"><text:tab/>A : <text:span text:style-name="T16">REAL </text:span>(Winkelwert)</text:p>
      <text:p text:style-name="P25"><draw:frame draw:style-name="fr4" draw:name="Grafik476" text:anchor-type="paragraph" svg:x="1.025cm" svg:y="0.688cm" svg:width="2.499cm" svg:height="1.39cm" draw:z-index="483"><draw:image xlink:href="Pictures/10000000000000BD000000694E970513.png" xlink:type="simple" xlink:show="embed" xlink:actuate="onLoad"/></draw:frame>Output<text:tab/>COMPLEX (Ergebnis)</text:p>
      <text:p text:style-name="P55"><text:soft-page-break/><text:line-break/>CPOL erzeugt eine Komplexe Zahl aus der Polarform. Die Eingangswerte L und A spezifizieren die Länge (Radius) und den Winkel.</text:p>
      <text:list xml:id="list33651695" text:continue-numbering="true" text:style-name="L1">
        <text:list-item>
          <text:list>
            <text:list-item>
              <text:h text:style-name="P217" text:outline-level="2"><text:alphabetical-index-mark-start text:id="IMark112348168"/>CPOW<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52"><text:tab/>Y : COMPLEX (Eingangswert 2)</text:p>
      <text:p text:style-name="P25"><draw:frame draw:style-name="fr4" draw:name="Grafik466" text:anchor-type="paragraph" svg:x="1.069cm" svg:y="0.683cm" svg:width="2.499cm" svg:height="1.39cm" draw:z-index="473"><draw:image xlink:href="Pictures/10000000000000BD00000069D528B387.png" xlink:type="simple" xlink:show="embed" xlink:actuate="onLoad"/></draw:frame>Output<text:tab/>COMPLEX (Ergebnis)</text:p>
      <text:p text:style-name="P55"><text:line-break/>CPOW berechnet die Potenz zweier Komplexer Zahlen, CPOW = X^Y.</text:p>
      <text:list xml:id="list33643899" text:continue-numbering="true" text:style-name="L1">
        <text:list-item>
          <text:list>
            <text:list-item>
              <text:h text:style-name="P217" text:outline-level="2"><text:alphabetical-index-mark-start text:id="IMark112348168"/>CSET<text:alphabetical-index-mark-end text:id="IMark112348168"/></text:h>
            </text:list-item>
          </text:list>
        </text:list-item>
      </text:list>
      <text:p text:style-name="P22">Type<text:tab/>Funktion : COMPLEX</text:p>
      <text:p text:style-name="P52"><text:span text:style-name="T16">Input</text:span><text:tab/>RE : <text:span text:style-name="T16">COMPLEX</text:span> (Realer Eingangswert)</text:p>
      <text:p text:style-name="P52"><text:tab/>IM : REAL (Imaginärer Eingangswert)</text:p>
      <text:p text:style-name="P25"><draw:frame draw:style-name="fr4" draw:name="Grafik467" text:anchor-type="paragraph" svg:x="1.067cm" svg:y="0.681cm" svg:width="2.499cm" svg:height="1.39cm" draw:z-index="474"><draw:image xlink:href="Pictures/10000000000000BD000000692BFA81EF.png" xlink:type="simple" xlink:show="embed" xlink:actuate="onLoad"/></draw:frame>Output<text:tab/>COMPLEX (Ergebnis)</text:p>
      <text:p text:style-name="P55"><text:line-break/>CSET erzeugt aus den beiden Eingangskomponenten RE und IM eine komplexe Zahl vom Typ COMPLEX.</text:p>
      <text:list xml:id="list33656237" text:continue-numbering="true" text:style-name="L1">
        <text:list-item>
          <text:list>
            <text:list-item>
              <text:h text:style-name="P217" text:outline-level="2"><text:soft-page-break/><text:alphabetical-index-mark-start text:id="IMark112348168"/>CSIN<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8" text:anchor-type="paragraph" svg:x="1.002cm" svg:y="0.688cm" svg:width="2.499cm" svg:height="0.99cm" draw:z-index="475"><draw:image xlink:href="Pictures/10000000000000BD0000004BF5BC599C.png" xlink:type="simple" xlink:show="embed" xlink:actuate="onLoad"/></draw:frame>Output<text:tab/>COMPLEX (Ergebnis)</text:p>
      <text:p text:style-name="P55"><text:line-break/>CSIN berechnet den Sinus einer Komplexen Zahl.</text:p>
      <text:list xml:id="list33649427" text:continue-numbering="true" text:style-name="L1">
        <text:list-item>
          <text:list>
            <text:list-item>
              <text:h text:style-name="P217" text:outline-level="2"><text:alphabetical-index-mark-start text:id="IMark112348168"/>CSINH<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9" text:anchor-type="paragraph" svg:x="1.046cm" svg:y="0.69cm" svg:width="2.9cm" svg:height="0.99cm" draw:z-index="476"><draw:image xlink:href="Pictures/10000000000000DB0000004B60DCB7CC.png" xlink:type="simple" xlink:show="embed" xlink:actuate="onLoad"/></draw:frame>Output<text:tab/>COMPLEX (Ergebnis)</text:p>
      <text:p text:style-name="P55"><text:line-break/>CSINH berechnet den Sinus Hyperbolicus einer Komplexen Zahl.</text:p>
      <text:list xml:id="list33637291" text:continue-numbering="true" text:style-name="L1">
        <text:list-item>
          <text:list>
            <text:list-item>
              <text:h text:style-name="P217" text:outline-level="2"><text:alphabetical-index-mark-start text:id="IMark112348168"/>CSQRT<text:alphabetical-index-mark-end text:id="IMark112348168"/></text:h>
            </text:list-item>
          </text:list>
        </text:list-item>
      </text:list>
      <text:p text:style-name="P22">Type<text:tab/>Funktion : REAL</text:p>
      <text:p text:style-name="P52"><text:span text:style-name="T16">Input</text:span><text:tab/>X : <text:span text:style-name="T16">COMPLEX</text:span> (Eingangswert)</text:p>
      <text:p text:style-name="P25"><draw:frame draw:style-name="fr4" draw:name="Grafik470" text:anchor-type="paragraph" svg:x="1.069cm" svg:y="0.69cm" svg:width="3.069cm" svg:height="0.99cm" draw:z-index="477"><draw:image xlink:href="Pictures/10000000000000E80000004BB12BC871.png" xlink:type="simple" xlink:show="embed" xlink:actuate="onLoad"/></draw:frame>Output<text:tab/>REAL (Ergebnis)</text:p>
      <text:p text:style-name="P55"><text:line-break/>CSQRT berechnet die Quadratwurzel aus einer Komplexen Zahl.</text:p>
      <text:list xml:id="list33646470" text:continue-numbering="true" text:style-name="L1">
        <text:list-item>
          <text:list>
            <text:list-item>
              <text:h text:style-name="P217" text:outline-level="2"><text:soft-page-break/><text:alphabetical-index-mark-start text:id="IMark112348168"/>CSUB<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71" text:anchor-type="paragraph" svg:x="1.025cm" svg:y="0.688cm" svg:width="2.499cm" svg:height="1.39cm" draw:z-index="478"><draw:image xlink:href="Pictures/10000000000000BD00000069D8AEC336.png" xlink:type="simple" xlink:show="embed" xlink:actuate="onLoad"/></draw:frame>Output<text:tab/>COMPLEX (Ergebnis)</text:p>
      <text:p text:style-name="P55"><text:line-break/>CSUB Subtrahiert zwei komplexe Zahlen, CSUB = X - Y.</text:p>
      <text:list xml:id="list33633097" text:continue-numbering="true" text:style-name="L1">
        <text:list-item>
          <text:list>
            <text:list-item>
              <text:h text:style-name="P217" text:outline-level="2"><text:alphabetical-index-mark-start text:id="IMark112348168"/>CTAN<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72" text:anchor-type="paragraph" svg:x="1.046cm" svg:y="0.69cm" svg:width="2.671cm" svg:height="0.99cm" draw:z-index="479"><draw:image xlink:href="Pictures/10000000000000CA0000004BE20CA863.png" xlink:type="simple" xlink:show="embed" xlink:actuate="onLoad"/></draw:frame>Output<text:tab/>COMPLEX (Ergebnis)</text:p>
      <text:p text:style-name="P55"><text:line-break/>CTAN berechnet den Tangens einer Komplexen Zahl.</text:p>
      <text:list xml:id="list33653129" text:continue-numbering="true" text:style-name="L1">
        <text:list-item>
          <text:list>
            <text:list-item>
              <text:h text:style-name="P217" text:outline-level="2"><text:alphabetical-index-mark-start text:id="IMark112348168"/>CTANH<text:alphabetical-index-mark-end text:id="IMark112348168"/></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73" text:anchor-type="paragraph" svg:x="1.046cm" svg:y="0.69cm" svg:width="2.9cm" svg:height="0.99cm" draw:z-index="480"><draw:image xlink:href="Pictures/10000000000000DB0000004B6B9236A4.png" xlink:type="simple" xlink:show="embed" xlink:actuate="onLoad"/></draw:frame>Output<text:tab/>COMPLEX (Ergebnis)</text:p>
      <text:p text:style-name="P55"><text:line-break/>CTANH berechnet den Tangens Hyperbolicus einer Komplexen Zahl.</text:p>
      <text:list xml:id="list33635318" text:continue-numbering="true" text:style-name="L1">
        <text:list-item>
          <text:h text:style-name="P212" text:outline-level="1">Arithmetik doppelter Genauigkeit</text:h>
        </text:list-item>
      </text:list>
      <text:p text:style-name="P21"/>
      <text:list xml:id="list33632299" text:continue-numbering="true" text:style-name="L1">
        <text:list-item>
          <text:list>
            <text:list-item>
              <text:h text:style-name="P220" text:outline-level="2">Einleitung</text:h>
            </text:list-item>
          </text:list>
        </text:list-item>
      </text:list>
      <text:p text:style-name="P65">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65">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xml:id="list33648723" text:continue-numbering="true" text:style-name="L1">
        <text:list-item>
          <text:list>
            <text:list-item>
              <text:h text:style-name="P217" text:outline-level="2"><text:alphabetical-index-mark-start text:id="IMark112348168"/>R2_ABS<text:alphabetical-index-mark-end text:id="IMark112348168"/></text:h>
            </text:list-item>
          </text:list>
        </text:list-item>
      </text:list>
      <text:p text:style-name="P22">Type<text:tab/>Funktion : REAL2</text:p>
      <text:p text:style-name="P52"><text:span text:style-name="T16">Input</text:span><text:tab/>X : <text:span text:style-name="T16">REAL2</text:span> (Eingangswert)<text:tab/></text:p>
      <text:p text:style-name="P25"><draw:frame draw:style-name="fr4" draw:name="Grafik535" text:anchor-type="paragraph" svg:x="1.025cm" svg:y="0.751cm" svg:width="3.2cm" svg:height="0.99cm" draw:z-index="545"><draw:image xlink:href="Pictures/10000000000000F20000004B426DB2C5.png" xlink:type="simple" xlink:show="embed" xlink:actuate="onLoad"/></draw:frame>Output<text:tab/>REAL2 (Ergebnis mit Doppelter Genauigkeit)</text:p>
      <text:p text:style-name="P63"><text:line-break/>R2_ABS liefert den Absolutwert von X in doppelter Genauigkeit.</text:p>
      <text:list xml:id="list33653750" text:continue-numbering="true" text:style-name="L1">
        <text:list-item>
          <text:list>
            <text:list-item>
              <text:h text:style-name="P217" text:outline-level="2"><text:soft-page-break/><text:alphabetical-index-mark-start text:id="IMark112348168"/>R2_ADD<text:alphabetical-index-mark-end text:id="IMark112348168"/></text:h>
            </text:list-item>
          </text:list>
        </text:list-item>
      </text:list>
      <text:p text:style-name="P22">Type<text:tab/>Funktion : REAL2</text:p>
      <text:p text:style-name="P52"><text:span text:style-name="T16">Input</text:span><text:tab/>X : <text:span text:style-name="T16">REAL2</text:span> (Eingangswert)</text:p>
      <text:p text:style-name="P52"><text:tab/>Y : REAL (zu Addierender Wert)</text:p>
      <text:p text:style-name="P25"><draw:frame draw:style-name="fr4" draw:name="Grafik529" text:anchor-type="paragraph" svg:x="1.046cm" svg:y="0.667cm" svg:width="3.6cm" svg:height="1.39cm" draw:z-index="539"><draw:image xlink:href="Pictures/1000000000000110000000693CA33BB7.png" xlink:type="simple" xlink:show="embed" xlink:actuate="onLoad"/></draw:frame>Output<text:tab/>REAL2 (Ergebnis mit Doppelter Genauigkeit)</text:p>
      <text:p text:style-name="P55"><text:line-break/>R2_ADD addiert zu einem Wert mit doppelter Genauigkeit X einen Wert einfacher Genauigkeit Y. Das Ergebnis hat wieder Doppelte Genauigkeit.</text:p>
      <text:list xml:id="list33656183" text:continue-numbering="true" text:style-name="L1">
        <text:list-item>
          <text:list>
            <text:list-item>
              <text:h text:style-name="P217" text:outline-level="2"><text:alphabetical-index-mark-start text:id="IMark112348168"/>R2_ADD2<text:alphabetical-index-mark-end text:id="IMark112348168"/></text:h>
            </text:list-item>
          </text:list>
        </text:list-item>
      </text:list>
      <text:p text:style-name="P22">Type<text:tab/>Funktion : REAL2</text:p>
      <text:p text:style-name="P52"><text:span text:style-name="T16">Input</text:span><text:tab/>X : <text:span text:style-name="T16">REAL2</text:span> (Eingangswert)</text:p>
      <text:p text:style-name="P52"><text:tab/>Y : REAL2 (zu Addierender Wert)</text:p>
      <text:p text:style-name="P25"><draw:frame draw:style-name="fr4" draw:name="Grafik531" text:anchor-type="paragraph" svg:x="1.046cm" svg:y="0.69cm" svg:width="3.99cm" svg:height="1.39cm" draw:z-index="544"><draw:image xlink:href="Pictures/100000000000012E000000695BCD19FA.png" xlink:type="simple" xlink:show="embed" xlink:actuate="onLoad"/></draw:frame>Output<text:tab/>REAL2 (Ergebnis mit Doppelter Genauigkeit)</text:p>
      <text:p text:style-name="P55"><text:line-break/>R2_ADD2 addiert zu einem Wert doppelter Genauigkeit X einen anderen Wert doppelter Genauigkeit Y. Das Ergebnis hat wieder doppelte Genauigkeit.</text:p>
      <text:p text:style-name="P55"/>
      <text:p text:style-name="P55"/>
      <text:p text:style-name="P55"/>
      <text:list xml:id="list33628595" text:continue-numbering="true" text:style-name="L1">
        <text:list-item>
          <text:list>
            <text:list-item>
              <text:h text:style-name="P217" text:outline-level="2"><text:soft-page-break/><text:alphabetical-index-mark-start text:id="IMark112348168"/>R2_MUL<text:alphabetical-index-mark-end text:id="IMark112348168"/></text:h>
            </text:list-item>
          </text:list>
        </text:list-item>
      </text:list>
      <text:p text:style-name="P22">Type<text:tab/>Funktion : REAL2</text:p>
      <text:p text:style-name="P52"><text:span text:style-name="T16">Input</text:span><text:tab/>X : <text:span text:style-name="T16">REAL2</text:span> (Eingangswert)</text:p>
      <text:p text:style-name="P52"><text:tab/>Y : REAL (Multiplikator)</text:p>
      <text:p text:style-name="P25"><draw:frame draw:style-name="fr4" draw:name="Grafik530" text:anchor-type="paragraph" svg:x="1.046cm" svg:y="0.688cm" svg:width="3.6cm" svg:height="1.39cm" draw:z-index="540"><draw:image xlink:href="Pictures/1000000000000110000000693FA39E01.png" xlink:type="simple" xlink:show="embed" xlink:actuate="onLoad"/></draw:frame>Output<text:tab/>REAL2 (Ergebnis mit Doppelter Genauigkeit)</text:p>
      <text:p text:style-name="P55"><text:line-break/>R2_MUL Multipliziert einen Wert Doppelter Genauigkeit X mit einem Wert einfacher Genauigkeit Y. Das Ergebnis hat wieder Doppelte Genauigkeit.</text:p>
      <text:list xml:id="list33626370" text:continue-numbering="true" text:style-name="L1">
        <text:list-item>
          <text:list>
            <text:list-item>
              <text:h text:style-name="P217" text:outline-level="2"><text:alphabetical-index-mark-start text:id="IMark112348168"/>R2_SET<text:alphabetical-index-mark-end text:id="IMark112348168"/></text:h>
            </text:list-item>
          </text:list>
        </text:list-item>
      </text:list>
      <text:p text:style-name="P22">Type<text:tab/>Funktion : REAL2</text:p>
      <text:p text:style-name="P52"><text:span text:style-name="T16">Input</text:span><text:tab/>X : <text:span text:style-name="T16">REAL</text:span> (Eingangswert)<text:tab/></text:p>
      <text:p text:style-name="P25"><draw:frame draw:style-name="fr4" draw:name="Grafik580" text:anchor-type="paragraph" svg:x="1.023cm" svg:y="0.688cm" svg:width="3.62cm" svg:height="1.12cm" draw:z-index="599"><draw:image xlink:href="Pictures/1000000000000112000000554FF0BA69.png" xlink:type="simple" xlink:show="embed" xlink:actuate="onLoad"/></draw:frame>Output<text:tab/>REAL2 (Ergebnis mit Doppelter Genauigkeit)</text:p>
      <text:p text:style-name="P55"><text:line-break/>R2_SET setzt einen Wert Doppelter Genauigkeit auf den Eingangswert X mit einfacher Genauigkeit.</text:p>
      <text:list xml:id="list33653908" text:continue-numbering="true" text:style-name="L1">
        <text:list-item>
          <text:h text:style-name="P211" text:outline-level="1">Arithmetische Funktionen</text:h>
        </text:list-item>
      </text:list>
      <text:p text:style-name="P20"/>
      <text:list xml:id="list33637668" text:continue-numbering="true" text:style-name="L1">
        <text:list-item>
          <text:list>
            <text:list-item>
              <text:h text:style-name="P217" text:outline-level="2"><text:alphabetical-index-mark-start text:id="IMark112348168"/>F_LIN<text:alphabetical-index-mark-end text:id="IMark112348168"/></text:h>
            </text:list-item>
          </text:list>
        </text:list-item>
      </text:list>
      <text:p text:style-name="P22">Type<text:tab/>Funktion : REAL</text:p>
      <text:p text:style-name="P22"><text:span text:style-name="T16">Input</text:span><text:tab/>X : REAL</text:p>
      <text:p text:style-name="P22"><text:tab/>A : REAL</text:p>
      <text:p text:style-name="P22"><text:tab/>B : REAL</text:p>
      <text:p text:style-name="P25"><draw:frame draw:style-name="fr4" draw:name="Grafik61" text:anchor-type="paragraph" svg:x="1.108cm" svg:y="0.619cm" svg:width="2.731cm" svg:height="2.02cm" draw:z-index="332"><draw:image xlink:href="Pictures/10000000000000CE000000998D7045F1.png" xlink:type="simple" xlink:show="embed" xlink:actuate="onLoad"/></draw:frame>Output<text:tab/>REAL (F_LIN = A*X + B)</text:p>
      <text:p text:style-name="P25"><text:line-break/>Die Funktion F_LIN Berechnet den Y-Wert einer linearen Gleichung.</text:p>
      <text:p text:style-name="P25">F_LIN = A*X + B</text:p>
      <text:list xml:id="list33641121" text:continue-numbering="true" text:style-name="L1">
        <text:list-item>
          <text:list>
            <text:list-item>
              <text:h text:style-name="P217" text:outline-level="2"><text:alphabetical-index-mark-start text:id="IMark112348168"/>F_LIN2<text:alphabetical-index-mark-end text:id="IMark112348168"/></text:h>
            </text:list-item>
          </text:list>
        </text:list-item>
      </text:list>
      <text:p text:style-name="P22">Type<text:tab/>Funktion : REAL</text:p>
      <text:p text:style-name="P22"><text:span text:style-name="T16">Input</text:span><text:tab/>X : REAL</text:p>
      <text:p text:style-name="P22"><text:tab/>X1, Y1 : REAL (erste Koordinate)</text:p>
      <text:p text:style-name="P22"><text:tab/>X2, Y2 : REAL (zweite Koordinate)</text:p>
      <text:p text:style-name="P25"><draw:frame draw:style-name="fr4" draw:name="Grafik62" text:anchor-type="paragraph" svg:x="1.208cm" svg:y="1.191cm" svg:width="3.18cm" svg:height="2.919cm" draw:z-index="333"><draw:image xlink:href="Pictures/10000000000000F0000000DDC0EF1FAA.png" xlink:type="simple" xlink:show="embed" xlink:actuate="onLoad"/></draw:frame>Output<text:tab/>REAL (Wert auf der Geraden, die durch die obigen 2 Punkte <text:s text:c="6"/><text:tab/>definiert ist.)</text:p>
      <text:p text:style-name="P25"><text:soft-page-break/><text:line-break/>Die Funktion F_LIN2 Berechnet den Y-Wert einer linearen Gleichung.</text:p>
      <text:p text:style-name="P25">Die Gerade ist dabei durch die Spezifikation zweier Koordinatenpunkte (X1,Y1; X2,Y2) definiert.</text:p>
      <text:list xml:id="list33649115" text:continue-numbering="true" text:style-name="L1">
        <text:list-item>
          <text:list>
            <text:list-item>
              <text:h text:style-name="P217" text:outline-level="2"><text:alphabetical-index-mark-start text:id="IMark112348168"/>F_POLY<text:alphabetical-index-mark-end text:id="IMark112348168"/></text:h>
            </text:list-item>
          </text:list>
        </text:list-item>
      </text:list>
      <text:p text:style-name="P22">Type<text:tab/>Funktion : REAL</text:p>
      <text:p text:style-name="P22"><text:span text:style-name="T16">Input</text:span><text:tab/>X : REAL (Eingang)</text:p>
      <text:p text:style-name="P22"><text:tab/>C : ARRAY[0..7] <text:span text:style-name="T16">of</text:span> REAL (Polynomkoeffizienten)</text:p>
      <text:p text:style-name="P25"><draw:frame draw:style-name="fr4" draw:name="Grafik576" text:anchor-type="paragraph" svg:x="1.025cm" svg:y="0.667cm" svg:width="3.62cm" svg:height="1.57cm" draw:z-index="589"><draw:image xlink:href="Pictures/10000000000001120000007780B092A3.png" xlink:type="simple" xlink:show="embed" xlink:actuate="onLoad"/></draw:frame>Output<text:tab/>REAL (Ergebnis der Polynomgleichung)</text:p>
      <text:p text:style-name="P55"><text:line-break/>F_POLY errechnet ein Polynom 7ten Grades.</text:p>
      <text:p text:style-name="P55">F_POLY = C[0] + C[1] * X^1 + C[2] * X^2 + ...C[7] * X^7</text:p>
      <text:list xml:id="list33643928" text:continue-numbering="true" text:style-name="L1">
        <text:list-item>
          <text:list>
            <text:list-item>
              <text:h text:style-name="P217" text:outline-level="2"><text:alphabetical-index-mark-start text:id="IMark112348168"/>F_POWER<text:alphabetical-index-mark-end text:id="IMark112348168"/></text:h>
            </text:list-item>
          </text:list>
        </text:list-item>
      </text:list>
      <text:p text:style-name="P22">Type<text:tab/>Funktion : REAL</text:p>
      <text:p text:style-name="P22"><text:span text:style-name="T16">Input</text:span><text:tab/>A : REAL</text:p>
      <text:p text:style-name="P22"><text:tab/>X : REAL </text:p>
      <text:p text:style-name="P22"><text:tab/>N : REAL </text:p>
      <text:p text:style-name="P25"><draw:frame draw:style-name="fr4" draw:name="Grafik63" text:anchor-type="paragraph" svg:x="1.025cm" svg:y="0.637cm" svg:width="3.62cm" svg:height="2.02cm" draw:z-index="334"><draw:image xlink:href="Pictures/1000000000000112000000999EE15A3D.png" xlink:type="simple" xlink:show="embed" xlink:actuate="onLoad"/></draw:frame>Output<text:tab/>REAL (Ergebnis der Gleichung F_POWER = A * X^N)</text:p>
      <text:p text:style-name="P25"><text:soft-page-break/><text:line-break/>F_Power berechnet die Potenzfunktion nach der Gleichung F_POWER = A * X<text:span text:style-name="T40">n</text:span>.</text:p>
      <text:list xml:id="list33627360" text:continue-numbering="true" text:style-name="L1">
        <text:list-item>
          <text:list>
            <text:list-item>
              <text:h text:style-name="P217" text:outline-level="2"><text:alphabetical-index-mark-start text:id="IMark112348168"/><text:alphabetical-index-mark-start text:id="IMark101577260"/>F_QUAD<text:alphabetical-index-mark-end text:id="IMark101577260"/><text:alphabetical-index-mark-end text:id="IMark112348168"/></text:h>
            </text:list-item>
          </text:list>
        </text:list-item>
      </text:list>
      <text:p text:style-name="P22">Type<text:tab/>Funktion : REAL</text:p>
      <text:p text:style-name="P22"><text:span text:style-name="T16">Input</text:span><text:tab/>X : REAL</text:p>
      <text:p text:style-name="P22"><text:tab/>X : REAL</text:p>
      <text:p text:style-name="P22"><text:tab/>A, B, C : REAL</text:p>
      <text:p text:style-name="P25"><draw:frame draw:style-name="fr4" draw:name="Grafik64" text:anchor-type="paragraph" svg:x="1.139cm" svg:y="0.598cm" svg:width="3.18cm" svg:height="2.469cm" draw:z-index="335"><draw:image xlink:href="Pictures/10000000000000F0000000BB061BCE6D.png" xlink:type="simple" xlink:show="embed" xlink:actuate="onLoad"/></draw:frame>Output<text:tab/>REAL (F_QUAD = A * X² + B * X + C)</text:p>
      <text:p text:style-name="P25"><text:line-break/>F_QUAD berechnet das Ergebnis einer quadratischen Gleichung nach der Formel f_QUAD = A * X² + B * X + C.</text:p>
      <text:list xml:id="list33651606" text:continue-numbering="true" text:style-name="L1">
        <text:list-item>
          <text:list>
            <text:list-item>
              <text:h text:style-name="P217" text:outline-level="2"><text:alphabetical-index-mark-start text:id="IMark112348168"/>FT_AVG<text:alphabetical-index-mark-end text:id="IMark112348168"/></text:h>
            </text:list-item>
          </text:list>
        </text:list-item>
      </text:list>
      <text:p text:style-name="P22">Type<text:tab/>Funktionsbaustein</text:p>
      <text:p text:style-name="P22"><text:span text:style-name="T16">Input</text:span><text:tab/>IN : REAL (Eingangssignal)</text:p>
      <text:p text:style-name="P22"><text:tab/>EN : BOOL (Freigabe Eingang)</text:p>
      <text:p text:style-name="P22"><text:tab/>N : INT (Anzahl der Werte über die der Mittelwert gebildet wird)</text:p>
      <text:p text:style-name="P22"><text:tab/>RST : BOOL (Reset Eingang)</text:p>
      <text:p text:style-name="P25"><draw:frame draw:style-name="fr4" draw:name="Grafik65" text:anchor-type="paragraph" svg:x="1.109cm" svg:y="0.676cm" svg:width="2.281cm" svg:height="2.649cm" draw:z-index="336"><draw:image xlink:href="Pictures/10000000000000AC000000C8BDD9CA2A.png" xlink:type="simple" xlink:show="embed" xlink:actuate="onLoad"/></draw:frame>Output<text:tab/>REAL (Gleitender Mittelwert über die letzten N Werte)</text:p>
      <text:p text:style-name="P25"><text:soft-page-break/><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6">Sample</text:span> und Hold Baustein wie zum Beispiel SH_1 mit FT_AVG verknüpft werden. Beim ersten Aufruf von FT_AVG wird der Puffer mit dem Eingangssignal geladen, um zu vermeiden dass ein <text:span text:style-name="T16">Ramp</text:span>-<text:span text:style-name="T16">up</text:span> stattfindet.</text:p>
      <text:p text:style-name="P55"><draw:frame draw:style-name="fr5" draw:name="Grafik67" text:anchor-type="paragraph" svg:x="1.111cm" svg:y="1.628cm" svg:width="11.18cm" svg:height="2.649cm" draw:z-index="340"><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55"/>
      <text:list xml:id="list33644050" text:continue-numbering="true" text:style-name="L1">
        <text:list-item>
          <text:list>
            <text:list-item>
              <text:h text:style-name="P217" text:outline-level="2"><text:alphabetical-index-mark-start text:id="IMark112348168"/>FT_MIN_MAX<text:alphabetical-index-mark-end text:id="IMark112348168"/></text:h>
            </text:list-item>
          </text:list>
        </text:list-item>
      </text:list>
      <text:p text:style-name="P22">Type<text:tab/>Funktionsbaustein</text:p>
      <text:p text:style-name="P22"><text:span text:style-name="T16">Input</text:span><text:tab/>IN : REAL (Eingangssignal)</text:p>
      <text:p text:style-name="P25"><text:tab/>RST : BOOL (Reset Eingang)</text:p>
      <text:p text:style-name="P25">Output<text:tab/>MX : REAL (Maximalwert des Eingangssignal)</text:p>
      <text:p text:style-name="P25"><draw:frame draw:style-name="fr4" draw:name="Grafik70" text:anchor-type="paragraph" svg:x="0.91cm" svg:y="0.635cm" svg:width="3.18cm" svg:height="1.75cm" draw:z-index="337"><draw:image xlink:href="Pictures/10000000000000F00000008491601B3B.png" xlink:type="simple" xlink:show="embed" xlink:actuate="onLoad"/></draw:frame><text:tab/>MN : REAL (Minimalwert des Eingangssignal)</text:p>
      <text:p text:style-name="P25"><text:line-break/>FT_MIN_MAX Speichert den Minimal- und Maximalwert eines Eingangssignals IN und stellt diese beiden Werte an den Ausgängen MN und MX zur Verfügung bis er <text:soft-page-break/>durch einen Reset wieder gelöscht wird. Ein Reset setzt MN und MX auf den zum Zeitpunkt des Resets anliegenden Eingangswert zurück.</text:p>
      <text:list xml:id="list33652295" text:continue-numbering="true" text:style-name="L1">
        <text:list-item>
          <text:list>
            <text:list-item>
              <text:h text:style-name="P217" text:outline-level="2"><text:alphabetical-index-mark-start text:id="IMark112348168"/>FT_RMP<text:alphabetical-index-mark-end text:id="IMark112348168"/></text:h>
            </text:list-item>
          </text:list>
        </text:list-item>
      </text:list>
      <text:p text:style-name="P22">Type<text:tab/>Funktionsbaustein</text:p>
      <text:p text:style-name="P22"><text:span text:style-name="T16">Input</text:span><text:tab/>IN : REAL (Eingangssignal)</text:p>
      <text:p text:style-name="P25"><text:tab/>KR : REAL (Geschwindigkeit des Anstiegs in 1 / Sekunden)</text:p>
      <text:p text:style-name="P25"><text:tab/>KF : REAL (Geschwindigkeit des Abfalls in 1 / Sekunden)</text:p>
      <text:p text:style-name="P25">Output<text:tab/>OUT : REAL (Ausgangssignal)</text:p>
      <text:p text:style-name="P25"><text:tab/>BUSY : BOOL (Zeigt an ob Ausgang Steigt oder Fällt)</text:p>
      <text:p text:style-name="P25"><draw:frame draw:style-name="fr4" draw:name="Grafik73" text:anchor-type="paragraph" svg:x="1.046cm" svg:y="1.08cm" svg:width="2.731cm" svg:height="2.649cm" draw:z-index="338"><draw:image xlink:href="Pictures/10000000000000CE000000C88B5155A1.png" xlink:type="simple" xlink:show="embed" xlink:actuate="onLoad"/></draw:frame><text:tab/>UD : BOOL (TRUE, wenn Ausgang steigt und FALSE, wenn <text:s text:c="7"/><text:tab/>Ausgang fällt)</text:p>
      <text:p text:style-name="P25"><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55">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208"><text:soft-page-break/>Die folgende Grafik zeigt den Verlauf des Ausgangs in Abhängigkeit eines Eingangssignals:</text:p>
      <text:p text:style-name="P207"><draw:g text:anchor-type="paragraph" draw:z-index="339" draw:style-name="gr1"><draw:line draw:style-name="gr59" draw:text-style-name="P251" svg:x1="1.66cm" svg:y1="3.768cm" svg:x2="1.665cm" svg:y2="0.014cm"><text:p/></draw:line><draw:line draw:style-name="gr59" draw:text-style-name="P251" svg:x1="1.452cm" svg:y1="3.672cm" svg:x2="11.707cm" svg:y2="3.672cm"><text:p/></draw:line><draw:line draw:style-name="gr60" draw:text-style-name="P251" svg:x1="1.66cm" svg:y1="3.672cm" svg:x2="3.503cm" svg:y2="1.942cm"><text:p/></draw:line><draw:frame draw:style-name="gr61" draw:text-style-name="P255" svg:width="0.96cm" svg:height="0.994cm" svg:x="11.707cm" svg:y="3.411cm"><draw:text-box><text:p text:style-name="P252"><text:span text:style-name="T52">T</text:span></text:p></draw:text-box></draw:frame><draw:frame draw:style-name="gr62" draw:text-style-name="P267" svg:width="0.884cm" svg:height="0.779cm" svg:x="2.221cm" svg:y="1.45cm"><draw:text-box><text:p text:style-name="P252"><text:span text:style-name="T59">IN</text:span></text:p></draw:text-box></draw:frame><draw:frame draw:style-name="gr63" draw:text-style-name="P268" svg:width="1.415cm" svg:height="0.675cm" svg:x="5.678cm" svg:y="2.288cm"><draw:text-box><text:p text:style-name="P252"><text:span text:style-name="T60">OUT</text:span></text:p></draw:text-box></draw:frame><draw:line draw:style-name="gr3" draw:text-style-name="P251" svg:x1="4.53cm" svg:y1="1.778cm" svg:x2="2.48cm" svg:y2="2.103cm"><text:p/></draw:line><draw:line draw:style-name="gr3" draw:text-style-name="P251" svg:x1="1.665cm" svg:y1="3.671cm" svg:x2="2.478cm" svg:y2="2.101cm"><text:p/></draw:line><draw:line draw:style-name="gr3" draw:text-style-name="P251" svg:x1="4.528cm" svg:y1="1.778cm" svg:x2="4.83cm" svg:y2="3.672cm"><text:p/></draw:line><draw:line draw:style-name="gr3" draw:text-style-name="P251" svg:x1="7.109cm" svg:y1="3.672cm" svg:x2="4.83cm" svg:y2="3.672cm"><text:p/></draw:line><draw:line draw:style-name="gr3" draw:text-style-name="P251" svg:x1="7.112cm" svg:y1="3.669cm" svg:x2="9.656cm" svg:y2="3.244cm"><text:p/></draw:line><draw:line draw:style-name="gr3" draw:text-style-name="P251" svg:x1="9.654cm" svg:y1="1.617cm" svg:x2="9.656cm" svg:y2="3.25cm"><text:p/></draw:line><draw:line draw:style-name="gr3" draw:text-style-name="P251" svg:x1="9.656cm" svg:y1="1.617cm" svg:x2="12.221cm" svg:y2="1.617cm"><text:p/></draw:line><draw:line draw:style-name="gr60" draw:text-style-name="P251" svg:x1="4.528cm" svg:y1="1.778cm" svg:x2="3.503cm" svg:y2="1.942cm"><text:p/></draw:line><draw:line draw:style-name="gr60" draw:text-style-name="P251" svg:x1="4.528cm" svg:y1="1.778cm" svg:x2="6.096cm" svg:y2="3.672cm"><text:p/></draw:line><draw:line draw:style-name="gr60" draw:text-style-name="P251" svg:x1="6.096cm" svg:y1="3.672cm" svg:x2="7.216cm" svg:y2="3.672cm"><text:p/></draw:line><draw:line draw:style-name="gr60" draw:text-style-name="P251" svg:x1="9.654cm" svg:y1="3.244cm" svg:x2="7.216cm" svg:y2="3.669cm"><text:p/></draw:line><draw:line draw:style-name="gr60" draw:text-style-name="P251" svg:x1="9.654cm" svg:y1="3.249cm" svg:x2="11.451cm" svg:y2="1.617cm"><text:p/></draw:line><draw:line draw:style-name="gr60" draw:text-style-name="P251" svg:x1="11.963cm" svg:y1="1.617cm" svg:x2="11.451cm" svg:y2="1.617cm"><text:p/></draw:line></draw:g></text:p>
      <text:list xml:id="list33635452" text:continue-numbering="true" text:style-name="L1">
        <text:list-item>
          <text:list>
            <text:list-item>
              <text:h text:style-name="P217" text:outline-level="2"><text:alphabetical-index-mark-start text:id="IMark112348168"/>LINEAR<text:span text:style-name="T1">_INT</text:span><text:alphabetical-index-mark-end text:id="IMark112348168"/></text:h>
            </text:list-item>
          </text:list>
        </text:list-item>
      </text:list>
      <text:p text:style-name="P22">Type<text:tab/>Funktion</text:p>
      <text:p text:style-name="P22"><text:span text:style-name="T16">Input</text:span><text:tab/>X : REAL (Eingangssignal)</text:p>
      <text:p text:style-name="P25"><text:tab/>XY : ARRAY[1..20,0..1] (Aufsteigend sortierte Wertepaare)</text:p>
      <text:p text:style-name="P25"><text:tab/>PTS : INT (Anzahl der Wertepaare)</text:p>
      <text:p text:style-name="P25"><draw:frame draw:style-name="fr4" draw:name="Grafik337" text:anchor-type="paragraph" svg:x="1.046cm" svg:y="0.667cm" svg:width="4.48cm" svg:height="1.79cm" draw:z-index="341"><draw:image xlink:href="Pictures/100000000000015300000087B6D18086.png" xlink:type="simple" xlink:show="embed" xlink:actuate="onLoad"/></draw:frame>Output<text:tab/>REAL (Ausgangssignal)</text:p>
      <text:p text:style-name="P55"><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55">Das folgende Beispiel zeigt die Definition für das Array XY und einige Werte:</text:p>
      <text:p text:style-name="P55">VAR</text:p>
      <text:p text:style-name="P55"><text:s text:c="5"/>BEISPIEL : ARRAY[1..4,0..1] := -10,-0.53, 10,0.53, 100,88.3, 200,122.2;</text:p>
      <text:p text:style-name="P55">END_VAR</text:p>
      <text:p text:style-name="P55"><text:soft-page-break/>für obige Definition ergeben sich folgende Ergebnisse:</text:p>
      <text:p text:style-name="P55">LINEAR_INT(0, Beispiel, 4) = 0;</text:p>
      <text:p text:style-name="P55">LINEAR_INT(30.0, Beispiel, 4) = 20.0344;</text:p>
      <text:p text:style-name="P55">LINEAR_INT(66.41, Beispiel, 4) = 55.54229;</text:p>
      <text:p text:style-name="P55">LINEAR_INT(800.0, Beispiel, 4) = 325.6;</text:p>
      <text:list xml:id="list33653877" text:continue-numbering="true" text:style-name="L1">
        <text:list-item>
          <text:list>
            <text:list-item>
              <text:h text:style-name="P217" text:outline-level="2"><text:alphabetical-index-mark-start text:id="IMark112348168"/>POLYNOM<text:span text:style-name="T1">_INT</text:span><text:alphabetical-index-mark-end text:id="IMark112348168"/></text:h>
            </text:list-item>
          </text:list>
        </text:list-item>
      </text:list>
      <text:p text:style-name="P22">Type<text:tab/>Funktion</text:p>
      <text:p text:style-name="P22"><text:span text:style-name="T16">Input</text:span><text:tab/>X : REAL (Eingangssignal)</text:p>
      <text:p text:style-name="P25"><text:tab/>XY : ARRAY[1..5,0..1] (Aufsteigend sortierte Wertepaare)</text:p>
      <text:p text:style-name="P25"><text:tab/>PTS : INT (Anzahl der Wertepaare)</text:p>
      <text:p text:style-name="P25"><draw:frame draw:style-name="fr4" draw:name="Grafik338" text:anchor-type="paragraph" svg:x="1.09cm" svg:y="0.688cm" svg:width="4.881cm" svg:height="1.79cm" draw:z-index="342"><draw:image xlink:href="Pictures/1000000000000171000000874EEE3D15.png" xlink:type="simple" xlink:show="embed" xlink:actuate="onLoad"/></draw:frame>Output<text:tab/>REAL (Ausgangssignal)</text:p>
      <text:p text:style-name="P55"><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24">Polynominterpolation</text:span> mit mehr als 5 Punkten führt zu erhöhter Schwingneigung und ist aus diesem Grunde abzulehnen.</text:p>
      <text:p text:style-name="P55">Das folgende Beispiel zeigt die Definition für das Array XY und einige Werte:</text:p>
      <text:p text:style-name="P55">VAR</text:p>
      <text:p text:style-name="P55"><text:s text:c="5"/>BEISPIEL : ARRAY[1..5,0..1] := -10,-0.53, 10,0.53, 100,88.3, 200,122.2;</text:p>
      <text:p text:style-name="P55"><text:soft-page-break/>END_VAR</text:p>
      <text:p text:style-name="P55">für obige Definition ergeben sich folgende Ergebnisse:</text:p>
      <text:p text:style-name="P55">POLYNOM_INT(0, Beispiel, 4) = -1.397069;</text:p>
      <text:p text:style-name="P55">POLYNOM_INT(30.0, Beispiel, 4) = 11.4257;</text:p>
      <text:p text:style-name="P55">POLYNOM_INT(66.41, Beispiel, 4) = 47.74527;</text:p>
      <text:p text:style-name="P55">POLYNOM_INT(800.0, Beispiel, 4) = -19617.94;</text:p>
      <text:p text:style-name="P55">Bei den Ergebnissen im Beispiel ist deutlich zu erkennen das der Wert von -19617.94 für den Eingang X = 800 keinen Sinn macht, da er außerhalb des definierten Bereichs von -10 bis +200 liegt.</text:p>
      <text:p text:style-name="P55"><draw:frame draw:style-name="fr4" draw:name="Grafik339" text:anchor-type="paragraph" svg:x="0.981cm" svg:y="2.152cm" svg:width="15.998cm" svg:height="11.277cm" draw:z-index="343"><draw:image xlink:href="Pictures/100000000000030F00000228FBA36C26.png" xlink:type="simple" xlink:show="embed" xlink:actuate="onLoad"/></draw:frame>Die folgende <text:span text:style-name="T16">Trace</text:span> Aufzeichnung zeigt den Verlauf des Ausgangs zum Eingang. Hierbei sind deutlich die Überschwinger des Polygons gegenüber einer linearen Interpolation zu erkennen. Grün = Eingang X, Rot = lineare Interpolation, Blau = Polynom Interpolation.</text:p>
      <text:p text:style-name="P55"/>
      <text:list xml:id="list33638419" text:continue-numbering="true" text:style-name="L1">
        <text:list-item>
          <text:h text:style-name="P213" text:outline-level="1">Geometrische Funktionen</text:h>
        </text:list-item>
      </text:list>
      <text:p text:style-name="P20"/>
      <text:list xml:id="list33653033" text:continue-numbering="true" text:style-name="L1">
        <text:list-item>
          <text:list>
            <text:list-item>
              <text:h text:style-name="P217" text:outline-level="2"><text:alphabetical-index-mark-start text:id="IMark112348168"/>CIRCLE_A<text:alphabetical-index-mark-end text:id="IMark112348168"/></text:h>
            </text:list-item>
          </text:list>
        </text:list-item>
      </text:list>
      <text:p text:style-name="P25">Type<text:tab/>Funktion</text:p>
      <text:p text:style-name="P22"><text:span text:style-name="T16">Input</text:span><text:tab/>RX : REAL (Kreisradius)</text:p>
      <text:p text:style-name="P52"><text:tab/>AX : REAL (Winkelsegment, 360 = gesamter Kreis)</text:p>
      <text:p text:style-name="P25"><draw:frame draw:style-name="fr4" draw:name="Grafik347" text:anchor-type="paragraph" svg:x="1.002cm" svg:y="0.688cm" svg:width="3.69cm" svg:height="1.39cm" draw:z-index="344"><draw:image xlink:href="Pictures/10000000000001170000006934D17BAA.png" xlink:type="simple" xlink:show="embed" xlink:actuate="onLoad"/></draw:frame>Output<text:tab/>REAL (Fläche des Kreissegments)</text:p>
      <text:p text:style-name="P55"><draw:frame draw:style-name="fr6" draw:name="Grafik355" text:anchor-type="paragraph" svg:x="12.465cm" svg:y="0.473cm" svg:width="3.32cm" svg:height="3.251cm" draw:z-index="352"><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xml:id="list33654499" text:continue-numbering="true" text:style-name="L1">
        <text:list-item>
          <text:list>
            <text:list-item>
              <text:h text:style-name="P217" text:outline-level="2"><text:alphabetical-index-mark-start text:id="IMark112348168"/>CIRCLE_C<text:alphabetical-index-mark-end text:id="IMark112348168"/></text:h>
            </text:list-item>
          </text:list>
        </text:list-item>
      </text:list>
      <text:p text:style-name="P25">Type<text:tab/>Funktion</text:p>
      <text:p text:style-name="P22"><text:span text:style-name="T16">Input</text:span><text:tab/>RX : REAL (Kreisradius)</text:p>
      <text:p text:style-name="P52"><text:tab/>AX : REAL (Winkelsegment, 360 = gesamter Kreis)</text:p>
      <text:p text:style-name="P25"><draw:frame draw:style-name="fr4" draw:name="Grafik348" text:anchor-type="paragraph" svg:x="1.046cm" svg:y="0.693cm" svg:width="3.69cm" svg:height="1.39cm" draw:z-index="345"><draw:image xlink:href="Pictures/100000000000011700000069037AE6EF.png" xlink:type="simple" xlink:show="embed" xlink:actuate="onLoad"/></draw:frame>Output<text:tab/>REAL (Kreisbogenlänge bzw. Kreisumfang)</text:p>
      <text:p text:style-name="P55"><draw:frame draw:style-name="fr7" draw:name="Grafik356" text:anchor-type="paragraph" svg:x="12.398cm" svg:y="0.404cm" svg:width="3.32cm" svg:height="3.27cm" draw:z-index="354"><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xml:id="list33647810" text:continue-numbering="true" text:style-name="L1">
        <text:list-item>
          <text:list>
            <text:list-item>
              <text:h text:style-name="P217" text:outline-level="2"><text:soft-page-break/><text:alphabetical-index-mark-start text:id="IMark112348168"/>CONE<text:span text:style-name="T1">_V</text:span><text:alphabetical-index-mark-end text:id="IMark112348168"/></text:h>
            </text:list-item>
          </text:list>
        </text:list-item>
      </text:list>
      <text:p text:style-name="P25">Type<text:tab/>Funktion</text:p>
      <text:p text:style-name="P22"><text:span text:style-name="T16">Input</text:span><text:tab/>RX : REAL (Kreisradius der Grundfläche)</text:p>
      <text:p text:style-name="P52"><text:tab/>HX : REAL (Höhe des Kegels)</text:p>
      <text:p text:style-name="P25"><draw:frame draw:style-name="fr4" draw:name="Grafik354" text:anchor-type="paragraph" svg:x="1.069cm" svg:y="0.69cm" svg:width="3.29cm" svg:height="1.39cm" draw:z-index="351"><draw:image xlink:href="Pictures/10000000000000F9000000690604D8EF.png" xlink:type="simple" xlink:show="embed" xlink:actuate="onLoad"/></draw:frame><draw:frame draw:style-name="fr7" draw:name="Grafik357" text:anchor-type="paragraph" svg:x="11.762cm" svg:y="0.236cm" svg:width="3.54cm" svg:height="3.521cm" draw:z-index="353"><draw:image xlink:href="Pictures/100000000000010C0000010A2FE17E7C.png" xlink:type="simple" xlink:show="embed" xlink:actuate="onLoad"/></draw:frame>Output<text:tab/>REAL (Volumen des Kegels)</text:p>
      <text:p text:style-name="P55"><text:line-break/>KONE_V berechnet das Volumen eines Kegels mit dem Radius RX und der Höhe HX.</text:p>
      <text:list xml:id="list33650774" text:continue-numbering="true" text:style-name="L1">
        <text:list-item>
          <text:list>
            <text:list-item>
              <text:h text:style-name="P217" text:outline-level="2"><text:alphabetical-index-mark-start text:id="IMark100005640"/>ELLIPSE_A<text:alphabetical-index-mark-end text:id="IMark100005640"/></text:h>
            </text:list-item>
          </text:list>
        </text:list-item>
      </text:list>
      <text:p text:style-name="P25">Type<text:tab/>Funktion</text:p>
      <text:p text:style-name="P22"><text:span text:style-name="T16">Input</text:span><text:tab/>R1 : REAL (Radius 1)</text:p>
      <text:p text:style-name="P52"><text:tab/>R2 : REAL (Radius 2)</text:p>
      <text:p text:style-name="P25"><draw:frame draw:style-name="fr4" draw:name="Grafik349" text:anchor-type="paragraph" svg:x="1.046cm" svg:y="0.69cm" svg:width="4.09cm" svg:height="1.39cm" draw:z-index="346"><draw:image xlink:href="Pictures/100000000000013500000069D218990B.png" xlink:type="simple" xlink:show="embed" xlink:actuate="onLoad"/></draw:frame>Output<text:tab/>REAL (Fläche der Ellipse)</text:p>
      <text:p text:style-name="P55"><draw:frame draw:style-name="fr7" draw:name="Grafik358" text:anchor-type="paragraph" svg:x="11.299cm" svg:y="0.979cm" svg:width="4.02cm" svg:height="2.041cm" draw:z-index="355"><draw:image xlink:href="Pictures/10000000000001300000009A4CCE2EC8.png" xlink:type="simple" xlink:show="embed" xlink:actuate="onLoad"/></draw:frame><text:line-break/>ELLIPSE_A berechnet die Fläche einer Ellipse die durch die Radien R1 und R2 definiert ist.</text:p>
      <text:p text:style-name="P55"/>
      <text:p text:style-name="P55"/>
      <text:p text:style-name="P55"/>
      <text:list xml:id="list33650588" text:continue-numbering="true" text:style-name="L1">
        <text:list-item>
          <text:list>
            <text:list-item>
              <text:h text:style-name="P217" text:outline-level="2"><text:soft-page-break/><text:alphabetical-index-mark-start text:id="IMark100005640"/>ELLIPSE_C<text:alphabetical-index-mark-end text:id="IMark100005640"/></text:h>
            </text:list-item>
          </text:list>
        </text:list-item>
      </text:list>
      <text:p text:style-name="P25">Type<text:tab/>Funktion</text:p>
      <text:p text:style-name="P22"><text:span text:style-name="T16">Input</text:span><text:tab/>R1 : REAL (Radius 1)</text:p>
      <text:p text:style-name="P52"><text:tab/>R2 : REAL (Radius 2)</text:p>
      <text:p text:style-name="P25"><draw:frame draw:style-name="fr4" draw:name="Grafik350" text:anchor-type="paragraph" svg:x="1.046cm" svg:y="0.688cm" svg:width="4.09cm" svg:height="1.39cm" draw:z-index="347"><draw:image xlink:href="Pictures/10000000000001350000006932DBCE2F.png" xlink:type="simple" xlink:show="embed" xlink:actuate="onLoad"/></draw:frame>Output<text:tab/>REAL (Umfang der Ellipse)</text:p>
      <text:p text:style-name="P55"><draw:frame draw:style-name="fr7" draw:name="Grafik359" text:anchor-type="paragraph" svg:x="12.291cm" svg:y="0.882cm" svg:width="4.02cm" svg:height="2.041cm" draw:z-index="356"><draw:image xlink:href="Pictures/10000000000001300000009A4CCE2EC8.png" xlink:type="simple" xlink:show="embed" xlink:actuate="onLoad"/></draw:frame><text:line-break/>ELLIPSE_C berechnet den Umfang einer Ellipse die durch die Radien R1 und R2 definiert ist.</text:p>
      <text:list xml:id="list33638296" text:continue-numbering="true" text:style-name="L1">
        <text:list-item>
          <text:list>
            <text:list-item>
              <text:h text:style-name="P217" text:outline-level="2"><text:alphabetical-index-mark-start text:id="IMark100005640"/>SPHERE_V<text:alphabetical-index-mark-end text:id="IMark100005640"/></text:h>
            </text:list-item>
          </text:list>
        </text:list-item>
      </text:list>
      <text:p text:style-name="P25">Type<text:tab/>Funktion</text:p>
      <text:p text:style-name="P22"><text:span text:style-name="T16">Input</text:span><text:tab/>RX : REAL (Radius )</text:p>
      <text:p text:style-name="P55"><draw:frame draw:style-name="fr4" draw:name="Grafik352" text:anchor-type="paragraph" svg:x="1.067cm" svg:y="0.769cm" svg:width="3.69cm" svg:height="0.99cm" draw:z-index="349"><draw:image xlink:href="Pictures/10000000000001170000004B59ABAFAF.png" xlink:type="simple" xlink:show="embed" xlink:actuate="onLoad"/></draw:frame>Output<text:tab/>REAL (Volumen der Kugel)</text:p>
      <text:p text:style-name="P55"><text:line-break/>SPHERE_V berechnet das Volumen einer Kugel mit dem Radius RX.</text:p>
      <text:p text:style-name="P55"/>
      <text:p text:style-name="P55"/>
      <text:p text:style-name="P55"/>
      <text:p text:style-name="P55"/>
      <text:p text:style-name="P55"/>
      <text:p text:style-name="P55"/>
      <text:list xml:id="list33624908" text:continue-numbering="true" text:style-name="L1">
        <text:list-item>
          <text:list>
            <text:list-item>
              <text:h text:style-name="P217" text:outline-level="2"><text:soft-page-break/><text:alphabetical-index-mark-start text:id="IMark100005640"/>TRIANGLE_A<text:alphabetical-index-mark-end text:id="IMark100005640"/></text:h>
            </text:list-item>
          </text:list>
        </text:list-item>
      </text:list>
      <text:p text:style-name="P25">Type<text:tab/>Funktion</text:p>
      <text:p text:style-name="P22"><text:span text:style-name="T16">Input</text:span><text:tab/>S1 : REAL (Seitenlänge 1)</text:p>
      <text:p text:style-name="P52"><text:tab/>A : REAL (Winkel zwischen Seite 1 und Seite 2)</text:p>
      <text:p text:style-name="P52"><text:tab/>S2 : REAL (Seitenlänge 2)</text:p>
      <text:p text:style-name="P22"><text:tab/>S3 : REAL (Seitenlänge 3)</text:p>
      <text:p text:style-name="P55"><draw:frame draw:style-name="fr4" draw:name="Grafik353" text:anchor-type="paragraph" svg:x="1.002cm" svg:y="0.688cm" svg:width="4.48cm" svg:height="2.18cm" draw:z-index="350"><draw:image xlink:href="Pictures/1000000000000153000000A54817C519.png" xlink:type="simple" xlink:show="embed" xlink:actuate="onLoad"/></draw:frame><draw:frame draw:style-name="fr4" draw:name="Grafik360" text:anchor-type="paragraph" svg:x="12.137cm" svg:y="0.672cm" svg:width="3.5cm" svg:height="2.341cm" draw:z-index="357"><draw:image xlink:href="Pictures/1000000000000109000000B1502364E8.png" xlink:type="simple" xlink:show="embed" xlink:actuate="onLoad"/></draw:frame>Output<text:tab/>REAL (Fläche des Dreiecks)</text:p>
      <text:p text:style-name="P55"><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xml:id="list33640062" text:continue-numbering="true" text:style-name="L1">
        <text:list-item>
          <text:h text:style-name="P213" text:outline-level="1">Vektor Mathematik</text:h>
        </text:list-item>
      </text:list>
      <text:p text:style-name="P20"/>
      <text:list xml:id="list33656453" text:continue-numbering="true" text:style-name="L1">
        <text:list-item>
          <text:list>
            <text:list-item>
              <text:h text:style-name="P223" text:outline-level="2">Einleitung</text:h>
            </text:list-item>
          </text:list>
        </text:list-item>
      </text:list>
      <text:p text:style-name="P65">Vektoren werden mit dem definierten Typ VEKTOR_3 abgebildet.</text:p>
      <text:p text:style-name="P65">Der Typ VEKTOR_3 setzt sich aus 3 Komponenten X, Y und Z zusammen, alle Komponenten sind vom Typ REAL.</text:p>
      <text:p text:style-name="P65">Der Vektor V vom Typ Vektor besteht aus:</text:p>
      <text:p text:style-name="P65">V.X<text:tab/>X Komponente vom Typ REAL.</text:p>
      <text:p text:style-name="P169">V.Y<text:tab/>Y Komponente vom Typ REAL.</text:p>
      <text:p text:style-name="P169">V.Z<text:tab/>Z Komponente vom Typ REAL.</text:p>
      <text:list xml:id="list33641562" text:continue-numbering="true" text:style-name="L1">
        <text:list-item>
          <text:list>
            <text:list-item>
              <text:h text:style-name="P217" text:outline-level="2"><text:alphabetical-index-mark-start text:id="IMark100843576"/>V3_ABS<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5"><draw:frame draw:style-name="fr4" draw:name="Grafik411" text:anchor-type="paragraph" svg:x="1.046cm" svg:y="0.667cm" svg:width="3.29cm" svg:height="0.99cm" draw:z-index="407"><draw:image xlink:href="Pictures/10000000000000F90000004B69237409.png" xlink:type="simple" xlink:show="embed" xlink:actuate="onLoad"/></draw:frame>Output<text:tab/>REAL (Absolute Länge des Vektors)</text:p>
      <text:p text:style-name="P55"><text:line-break/>V3_ABS berechnet den Absolutwert (Länge) eines Vektors in einen dreidimensionalen Koordinatensystem.</text:p>
      <text:p text:style-name="P55">V3_ABS(3,4,5) = 7.071...</text:p>
      <text:list xml:id="list33628428" text:continue-numbering="true" text:style-name="L1">
        <text:list-item>
          <text:list>
            <text:list-item>
              <text:h text:style-name="P217" text:outline-level="2"><text:soft-page-break/><text:alphabetical-index-mark-start text:id="IMark100843576"/>V3_ADD<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10" text:anchor-type="paragraph" svg:x="1.069cm" svg:y="0.688cm" svg:width="3.29cm" svg:height="1.39cm" draw:z-index="406"><draw:image xlink:href="Pictures/10000000000000F90000006921776C3F.png" xlink:type="simple" xlink:show="embed" xlink:actuate="onLoad"/></draw:frame>Output<text:tab/>VECTOR_3 (Vektor mit den Koordinaten X, Y, Z)</text:p>
      <text:p text:style-name="P55"><text:line-break/>V3_ADD addiert 2 dreidimensionale Vektoren.</text:p>
      <text:p text:style-name="P55">V3_ADD([3,4,5],[1,2,3]) = (4,6,8)</text:p>
      <text:list xml:id="list33624223" text:continue-numbering="true" text:style-name="L1">
        <text:list-item>
          <text:list>
            <text:list-item>
              <text:h text:style-name="P217" text:outline-level="2"><text:alphabetical-index-mark-start text:id="IMark100843576"/>V3_ANG<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9" text:anchor-type="paragraph" svg:x="1.046cm" svg:y="0.683cm" svg:width="3.29cm" svg:height="1.39cm" draw:z-index="405"><draw:image xlink:href="Pictures/10000000000000F900000069B13991B5.png" xlink:type="simple" xlink:show="embed" xlink:actuate="onLoad"/></draw:frame>Output<text:tab/>REAL (Winkel in Bogenmaß)</text:p>
      <text:p text:style-name="P55"><text:line-break/>V3_ANG berechnet den Winkel zwischen 2 dreidimensionalen Vektoren</text:p>
      <text:p text:style-name="P55">V3_ANG([1,0,0],[0,1,0]) = 1,57.. ( PI / 2)</text:p>
      <text:list xml:id="list33648751" text:continue-numbering="true" text:style-name="L1">
        <text:list-item>
          <text:list>
            <text:list-item>
              <text:h text:style-name="P217" text:outline-level="2"><text:alphabetical-index-mark-start text:id="IMark100843576"/>V3_DPRO<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8" text:anchor-type="paragraph" svg:x="1.067cm" svg:y="0.69cm" svg:width="3.69cm" svg:height="1.39cm" draw:z-index="404"><draw:image xlink:href="Pictures/1000000000000117000000697ED0B366.png" xlink:type="simple" xlink:show="embed" xlink:actuate="onLoad"/></draw:frame><text:soft-page-break/>Output<text:tab/>REAL (Skalares Produkt)</text:p>
      <text:p text:style-name="P55"><text:line-break/>V3_DPRO berechnet das Skalare Produkt zweier dreidimensionaler Vektoren.</text:p>
      <text:p text:style-name="P55">V3_DPRO([1,2,3],[3,1,2]) = 11</text:p>
      <text:p text:style-name="P55">Das Skalare Produkt berechnet sich aus A.X*B.X + A.Y*B.Y + A.Z*B.Z</text:p>
      <text:list xml:id="list33650480" text:continue-numbering="true" text:style-name="L1">
        <text:list-item>
          <text:list>
            <text:list-item>
              <text:h text:style-name="P217" text:outline-level="2"><text:alphabetical-index-mark-start text:id="IMark100843576"/>V3_NORM<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5"><draw:frame draw:style-name="fr4" draw:name="Grafik407" text:anchor-type="paragraph" svg:x="1.046cm" svg:y="0.667cm" svg:width="3.69cm" svg:height="0.99cm" draw:z-index="403"><draw:image xlink:href="Pictures/10000000000001170000004B7D8268FE.png" xlink:type="simple" xlink:show="embed" xlink:actuate="onLoad"/></draw:frame>Output<text:tab/>VECTOR_3 (Vektor mit den Koordinaten X, Y, Z)</text:p>
      <text:p text:style-name="P55"><text:line-break/>V3_NORM erzeugt aus einen beliebigen dreidimensionalen Vektor einen auf die Länge 1 Normierten Vektor mit gleicher Richtung. Ein Vektor mit der Länge 1 wird Einheitsvektor genannt</text:p>
      <text:p text:style-name="P55">V3_NORM(3,0,0) = (1,0,0)</text:p>
      <text:list xml:id="list33626967" text:continue-numbering="true" text:style-name="L1">
        <text:list-item>
          <text:list>
            <text:list-item>
              <text:h text:style-name="P217" text:outline-level="2"><text:alphabetical-index-mark-start text:id="IMark100843576"/>V3_NUL<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5"><draw:frame draw:style-name="fr4" draw:name="Grafik412" text:anchor-type="paragraph" svg:x="1.046cm" svg:y="0.69cm" svg:width="3.29cm" svg:height="0.99cm" draw:z-index="408"><draw:image xlink:href="Pictures/10000000000000F90000004B78E7F143.png" xlink:type="simple" xlink:show="embed" xlink:actuate="onLoad"/></draw:frame>Output<text:tab/>BOOL (TRUE wenn Vektor ein Nullvektor ist)</text:p>
      <text:p text:style-name="P55">V3_NUL prüft ob der Vektor A ein Nullvektor ist. Ein Vektor ist dann ein Nullvektor wenn alle Komponenten (X, Y, Z) gleich Null sind.</text:p>
      <text:p text:style-name="P55">V3_NUL(0,0,0) = TRUE</text:p>
      <text:list xml:id="list33637603" text:continue-numbering="true" text:style-name="L1">
        <text:list-item>
          <text:list>
            <text:list-item>
              <text:h text:style-name="P217" text:outline-level="2"><text:soft-page-break/><text:alphabetical-index-mark-start text:id="IMark100843576"/>V3_PAR<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6" text:anchor-type="paragraph" svg:x="1.09cm" svg:y="0.688cm" svg:width="3.29cm" svg:height="1.39cm" draw:z-index="402"><draw:image xlink:href="Pictures/10000000000000F90000006944ADD1BC.png" xlink:type="simple" xlink:show="embed" xlink:actuate="onLoad"/></draw:frame>Output<text:tab/>BOOL (TRUE wenn die beiden Vektoren parallel sind)</text:p>
      <text:p text:style-name="P55"><text:line-break/>V3_PAR wird dann TRUE wenn die beiden Vektoren A und B Parallel sind. Ein Nullvektor ist Parallel zu jedem Vektor da er keine Richtung hat. Zwei Vektoren A und B die in Gegensätzliche Richtung zeigen sind Parallel.</text:p>
      <text:p text:style-name="P55">V3_PAR([1,1,1],[2,2,2]) = TRUE</text:p>
      <text:p text:style-name="P55">V3_PAR([1,1,1],[-1,-1,-1]) = TRUE</text:p>
      <text:p text:style-name="P55">V3_PAR([1,2,3],[0,0,0]) = TRUE</text:p>
      <text:p text:style-name="P55">V3_PAR([1,2,3],[1,0,0]) = FALSE</text:p>
      <text:list xml:id="list33654970" text:continue-numbering="true" text:style-name="L1">
        <text:list-item>
          <text:list>
            <text:list-item>
              <text:h text:style-name="P217" text:outline-level="2"><text:alphabetical-index-mark-start text:id="IMark100843576"/>V3_REV<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25">Output<text:tab/>VECTOR_3 (Vektor mit den Koordinaten X, Y, Z)</text:p>
      <text:p text:style-name="P55"><draw:frame draw:style-name="fr4" draw:name="Grafik405" text:anchor-type="paragraph" svg:x="1.046cm" svg:y="0.039cm" svg:width="3.29cm" svg:height="0.99cm" draw:z-index="401"><draw:image xlink:href="Pictures/10000000000000F90000004B49AC343D.png" xlink:type="simple" xlink:show="embed" xlink:actuate="onLoad"/></draw:frame><text:line-break/>V3_REV erzeugt einen Vektor mit dem identischen Betrag von A aber mit entgegengesetzter Richtung. A - V3_REV(A) = 0.</text:p>
      <text:p text:style-name="P55">V3_REV(1,2,3) = (-1,-2,-3)</text:p>
      <text:list xml:id="list33633416" text:continue-numbering="true" text:style-name="L1">
        <text:list-item>
          <text:list>
            <text:list-item>
              <text:h text:style-name="P217" text:outline-level="2"><text:soft-page-break/><text:alphabetical-index-mark-start text:id="IMark100843576"/>V3_SMUL<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M : REAL (Skalarer Multiplikator)</text:p>
      <text:p text:style-name="P25"><draw:frame draw:style-name="fr4" draw:name="Grafik404" text:anchor-type="paragraph" svg:x="1.046cm" svg:y="0.667cm" svg:width="3.69cm" svg:height="1.39cm" draw:z-index="400"><draw:image xlink:href="Pictures/100000000000011700000069E5B6B284.png" xlink:type="simple" xlink:show="embed" xlink:actuate="onLoad"/></draw:frame>Output<text:tab/>VECTOR_3 (Vektor mit den Koordinaten X, Y, Z)</text:p>
      <text:p text:style-name="P55"><text:line-break/>V3_SMUL Multipliziert einen dreidimensionalen Vektor A mit dem Skalar M.</text:p>
      <text:p text:style-name="P55">V3_SMUL([1,2,3],10) = (10,20,30)</text:p>
      <text:list xml:id="list33644847" text:continue-numbering="true" text:style-name="L1">
        <text:list-item>
          <text:list>
            <text:list-item>
              <text:h text:style-name="P217" text:outline-level="2"><text:alphabetical-index-mark-start text:id="IMark100843576"/>V3_SUB<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3" text:anchor-type="paragraph" svg:x="1.067cm" svg:y="0.69cm" svg:width="3.29cm" svg:height="1.39cm" draw:z-index="399"><draw:image xlink:href="Pictures/10000000000000F900000069F2733006.png" xlink:type="simple" xlink:show="embed" xlink:actuate="onLoad"/></draw:frame>Output<text:tab/>VECTOR_3 (Vektor mit den Koordinaten X, Y, Z)</text:p>
      <text:p text:style-name="P55"><text:line-break/>V3_SUB Subtrahiert den Vektor B von A</text:p>
      <text:p text:style-name="P55">V3_SUB([3,3,3],[1,2,3]) = (2,1,0)</text:p>
      <text:p text:style-name="P55">V3_SUB([1,2,3],[1,-2,-3]) = (0,4,6)</text:p>
      <text:p text:style-name="P55"/>
      <text:p text:style-name="P55"/>
      <text:list xml:id="list33638737" text:continue-numbering="true" text:style-name="L1">
        <text:list-item>
          <text:list>
            <text:list-item>
              <text:h text:style-name="P217" text:outline-level="2"><text:soft-page-break/><text:alphabetical-index-mark-start text:id="IMark100843576"/>V3_XANG<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5"><draw:frame draw:style-name="fr4" draw:name="Grafik402" text:anchor-type="paragraph" svg:x="1.067cm" svg:y="0.69cm" svg:width="3.69cm" svg:height="0.99cm" draw:z-index="398"><draw:image xlink:href="Pictures/10000000000001170000004BFE1C7216.png" xlink:type="simple" xlink:show="embed" xlink:actuate="onLoad"/></draw:frame>Output<text:tab/>REAL (Winkel zur X-Achse)</text:p>
      <text:p text:style-name="P55"><text:line-break/>V3_XANG berechnet den Winkel zwischen Der X-Achse des Koordinatensystems und einem dreidimensionalen Vektor A in Bogenmaß</text:p>
      <text:p text:style-name="P55">V3_XANG(1,2,3) = 1.300..</text:p>
      <text:list xml:id="list33655846" text:continue-numbering="true" text:style-name="L1">
        <text:list-item>
          <text:list>
            <text:list-item>
              <text:h text:style-name="P217" text:outline-level="2"><text:alphabetical-index-mark-start text:id="IMark100843576"/>V3_XPRO<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55"><draw:frame draw:style-name="fr4" draw:name="Grafik401" text:anchor-type="paragraph" svg:x="1.069cm" svg:y="0.677cm" svg:width="3.69cm" svg:height="1.39cm" draw:z-index="397"><draw:image xlink:href="Pictures/100000000000011700000069DA40C2AB.png" xlink:type="simple" xlink:show="embed" xlink:actuate="onLoad"/></draw:frame>Output<text:tab/>VECTOR_3 (Vektor mit den Koordinaten X, Y, Z)</text:p>
      <text:p text:style-name="P55"><text:line-break/>V3_XPRO berechnet das Kreuzprodukt zweier dreidimensionaler Vektoren A und B</text:p>
      <text:p text:style-name="P55">V3_XPRO([1,2,3],[2,1,2]) = (1,4,-3)</text:p>
      <text:list xml:id="list33636785" text:continue-numbering="true" text:style-name="L1">
        <text:list-item>
          <text:list>
            <text:list-item>
              <text:h text:style-name="P217" text:outline-level="2"><text:alphabetical-index-mark-start text:id="IMark100843576"/>V3_YANG<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5"><draw:frame draw:style-name="fr4" draw:name="Grafik400" text:anchor-type="paragraph" svg:x="1.046cm" svg:y="0.693cm" svg:width="3.69cm" svg:height="0.99cm" draw:z-index="396"><draw:image xlink:href="Pictures/10000000000001170000004B6A2FA867.png" xlink:type="simple" xlink:show="embed" xlink:actuate="onLoad"/></draw:frame>Output<text:tab/>REAL (Winkel zur Y-Achse)</text:p>
      <text:p text:style-name="P55"><text:soft-page-break/><text:line-break/>V3_YANG berechnet den Winkel zwischen Der Y-Achse des Koordinatensystems und einem dreidimensionalen Vektor A in Bogenmaß</text:p>
      <text:p text:style-name="P55">V3_YANG(1,2,3) = 1.006..</text:p>
      <text:list xml:id="list33626094" text:continue-numbering="true" text:style-name="L1">
        <text:list-item>
          <text:list>
            <text:list-item>
              <text:h text:style-name="P217" text:outline-level="2"><text:alphabetical-index-mark-start text:id="IMark100843576"/>V3_ZANG<text:alphabetical-index-mark-end text:id="IMark100843576"/></text:h>
            </text:list-item>
          </text:list>
        </text:list-item>
      </text:list>
      <text:p text:style-name="P25">Type<text:tab/>Funktion</text:p>
      <text:p text:style-name="P22"><text:span text:style-name="T16">Input</text:span><text:tab/>A : VECTOR_3 (Vektor mit den Koordinaten X, Y, Z)</text:p>
      <text:p text:style-name="P55"><draw:frame draw:style-name="fr4" draw:name="Grafik399" text:anchor-type="paragraph" svg:x="1.067cm" svg:y="0.693cm" svg:width="3.69cm" svg:height="0.99cm" draw:z-index="395"><draw:image xlink:href="Pictures/10000000000001170000004B57C492F9.png" xlink:type="simple" xlink:show="embed" xlink:actuate="onLoad"/></draw:frame>Output<text:tab/>REAL (Winkel zur Z-Achse)</text:p>
      <text:p text:style-name="P55"><text:line-break/>V3_ZANG berechnet den Winkel zwischen Der Z-Achse des Koordinatensystems und einem dreidimensionalen Vektor A in Bogenmaß</text:p>
      <text:p text:style-name="P55">V3_ZANG(1,2,3) = 0.640..</text:p>
      <text:list xml:id="list33627616" text:continue-numbering="true" text:style-name="L1">
        <text:list-item>
          <text:h text:style-name="P215" text:outline-level="1">Time &amp; Date</text:h>
        </text:list-item>
      </text:list>
      <text:p text:style-name="P20"/>
      <text:list xml:id="list33647254" text:continue-numbering="true" text:style-name="L1">
        <text:list-item>
          <text:list>
            <text:list-item>
              <text:h text:style-name="P217" text:outline-level="2"><text:alphabetical-index-mark-start text:id="IMark100843576"/>DATE_ADD<text:alphabetical-index-mark-end text:id="IMark100843576"/></text:h>
            </text:list-item>
          </text:list>
        </text:list-item>
      </text:list>
      <text:p text:style-name="P22">Type<text:tab/>Funktion</text:p>
      <text:p text:style-name="P22"><text:span text:style-name="T16">Input</text:span><text:tab/>IDATE : DATE (Eingangsdatum)</text:p>
      <text:p text:style-name="P22"><text:tab/>D : INT (zu addierende Tage)</text:p>
      <text:p text:style-name="P22"><text:tab/>W : INT (zu addierende Wochen)</text:p>
      <text:p text:style-name="P22"><text:tab/>M : INT (zu addierende Monate)</text:p>
      <text:p text:style-name="P22"><text:tab/>Y : INT (zu addierende Jahre)</text:p>
      <text:p text:style-name="P22"><draw:frame draw:style-name="fr4"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22"><text:line-break/>Die Funktion DATE<text:span text:style-name="T31">_ADD addiert Tage, Wochen, Monate, und Jahre zu einem Datum hinzu. Es werden erst die angegebenen Tage und Wochen addiert, dann die Monate und zuletzt die Jahre.</text:span></text:p>
      <text:p text:style-name="P23">Die Eingangswerte können sowohl positiv, wie auch negativ sein. Es kann also auch von einem Datum subtrahiert werden.</text:p>
      <text:p text:style-name="P53">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23">Beispiel:<text:tab/>DATE_ADD(1.1.2007,3,1,-1,-2) = 11.12.2005</text:p>
      <text:p text:style-name="P23"><text:tab/>addiert 3 Tage und 1 Woche hinzu und zieht dann 1 Monat und 2 <text:tab/>Jahre ab.</text:p>
      <text:list xml:id="list33636245" text:continue-numbering="true" text:style-name="L1">
        <text:list-item>
          <text:list>
            <text:list-item>
              <text:h text:style-name="P217" text:outline-level="2"><text:soft-page-break/><text:alphabetical-index-mark-start text:id="IMark100843576"/>DAY_OF_DATE<text:alphabetical-index-mark-end text:id="IMark100843576"/></text:h>
            </text:list-item>
          </text:list>
        </text:list-item>
      </text:list>
      <text:p text:style-name="P22">Type<text:tab/>Funktion : DINT</text:p>
      <text:p text:style-name="P22"><text:span text:style-name="T16">Input</text:span><text:tab/>IDATE : DATE (Eingangsdatum)</text:p>
      <text:p text:style-name="P23"><draw:frame draw:style-name="fr4" draw:name="Grafik320" text:anchor-type="paragraph" svg:x="0.984cm" svg:y="0.676cm" svg:width="4.881cm" svg:height="0.99cm" draw:z-index="296"><draw:image xlink:href="Pictures/10000000000001710000004BF7E90938.png" xlink:type="simple" xlink:show="embed" xlink:actuate="onLoad"/></draw:frame>Output<text:tab/>DINT (Tag im Monat des Eingangsdatums)</text:p>
      <text:p text:style-name="P23"><text:line-break/>Die Funktion DAY_OF_DATE berechnet den Tag seit dem 1.1.1970. Das Ergebnis der Funktion ist vom Typ DINT weil der gesamte DATE <text:span text:style-name="T16">Range</text:span> 49710 Tage umfasst.</text:p>
      <text:list xml:id="list33639217" text:continue-numbering="true" text:style-name="L1">
        <text:list-item>
          <text:list>
            <text:list-item>
              <text:h text:style-name="P217" text:outline-level="2"><text:alphabetical-index-mark-start text:id="IMark100843576"/>DAY_OF_MONTH<text:alphabetical-index-mark-end text:id="IMark100843576"/></text:h>
            </text:list-item>
          </text:list>
        </text:list-item>
      </text:list>
      <text:p text:style-name="P22">Type<text:tab/>Funktion : INT</text:p>
      <text:p text:style-name="P22"><text:span text:style-name="T16">Input</text:span><text:tab/>IDATE : DATE (Eingangsdatum)</text:p>
      <text:p text:style-name="P23"><draw:frame draw:style-name="fr4"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23"><text:line-break/>Die Funktion DAY_OF_MONTH berechnet den Tag des Monats aus dem Eingangsdatum IDATE.</text:p>
      <text:list xml:id="list33625297" text:continue-numbering="true" text:style-name="L1">
        <text:list-item>
          <text:list>
            <text:list-item>
              <text:h text:style-name="P217" text:outline-level="2"><text:alphabetical-index-mark-start text:id="IMark100843576"/>DAY_OF_WEEK<text:alphabetical-index-mark-end text:id="IMark100843576"/></text:h>
            </text:list-item>
          </text:list>
        </text:list-item>
      </text:list>
      <text:p text:style-name="P22">Type<text:tab/>Funktion : INT</text:p>
      <text:p text:style-name="P52"><text:span text:style-name="T16">Input</text:span><text:tab/>IDATE : DATE (Eingangsdatum)</text:p>
      <text:p text:style-name="P23"><draw:frame draw:style-name="fr4" draw:name="Grafik40" text:anchor-type="paragraph" svg:x="1.046cm" svg:y="0.718cm" svg:width="4.881cm" svg:height="0.99cm" draw:z-index="725"><draw:image xlink:href="Pictures/10000000000001710000004BDAF08181.png" xlink:type="simple" xlink:show="embed" xlink:actuate="onLoad"/></draw:frame>Output<text:tab/>INT (Monat im Jahr des Eingangsdatums)</text:p>
      <text:p text:style-name="P53"><text:soft-page-break/><text:line-break/>Die Funktion DAY_OF_WEEK berechnet den Wochentag aus dem Eingangsdatum IDATE.</text:p>
      <text:p text:style-name="P23">Montag = 1... Sonntag = 7. Die Berechnung erfolgt gemäß ISO8601.</text:p>
      <text:p text:style-name="P53">Beispiel:<text:tab/>DAY_OF_WEEK(D#2007-1-8) = 1</text:p>
      <text:list xml:id="list33656340" text:continue-numbering="true" text:style-name="L1">
        <text:list-item>
          <text:list>
            <text:list-item>
              <text:h text:style-name="P217" text:outline-level="2"><text:alphabetical-index-mark-start text:id="IMark100843576"/>DAY_OF_YEAR<text:alphabetical-index-mark-end text:id="IMark100843576"/></text:h>
            </text:list-item>
          </text:list>
        </text:list-item>
      </text:list>
      <text:p text:style-name="P22">Type<text:tab/>Funktion : INT</text:p>
      <text:p text:style-name="P22"><text:span text:style-name="T16">Input</text:span><text:tab/>IDATE : DATE (Eingangsdatum)</text:p>
      <text:p text:style-name="P23"><draw:frame draw:style-name="fr4"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23"><text:line-break/>Die Funktion DAY_OF_YEAR berechnet den Tag des Jahres aus dem Eingangsdatum IDATE. Schaltjahre werden entsprechend dem gregorianischen Kalender berücksichtigt. Die Funktion ist definiert für die Jahre 1970 – 2099.</text:p>
      <text:p text:style-name="P23">Beispiel:<text:tab/>DAY_OF_YEAR(31.12.2007) = 365</text:p>
      <text:p text:style-name="P23"><text:tab/>DAY_OF_YEAR(31.12.2008) = 366</text:p>
      <text:list xml:id="list33656229" text:continue-numbering="true" text:style-name="L1">
        <text:list-item>
          <text:list>
            <text:list-item>
              <text:h text:style-name="P217" text:outline-level="2"><text:alphabetical-index-mark-start text:id="IMark100843576"/>DAY_TO_TIME<text:alphabetical-index-mark-end text:id="IMark100843576"/></text:h>
            </text:list-item>
          </text:list>
        </text:list-item>
      </text:list>
      <text:p text:style-name="P22">Type<text:tab/>Funktion : <text:span text:style-name="T16">TIME</text:span></text:p>
      <text:p text:style-name="P22"><text:span text:style-name="T16">Input</text:span><text:tab/><text:span text:style-name="T16">Input</text:span> : REAL (Anzahl Tage mit Nachkommastellen)</text:p>
      <text:p text:style-name="P23"><draw:frame draw:style-name="fr4" draw:name="Grafik17" text:anchor-type="paragraph" svg:x="1.094cm" svg:y="0.63cm" svg:width="4.521cm" svg:height="1.12cm" draw:z-index="13"><draw:image xlink:href="Pictures/1000000000000156000000554BC81FE9.png" xlink:type="simple" xlink:show="embed" xlink:actuate="onLoad"/></draw:frame>Output<text:tab/><text:span text:style-name="T16">TIME</text:span> (<text:span text:style-name="T16">TIME</text:span>)</text:p>
      <text:p text:style-name="P23"><text:line-break/>Die Funktion DAY_TO_TIME berechnet einen Zeitwert (TIME) aus dem Eingangswert in Tagen als REAL.</text:p>
      <text:p text:style-name="P23">Beispiel:<text:tab/>DAY_TO_TIME(1.1) = T#26h24m</text:p>
      <text:list xml:id="list33637362" text:continue-numbering="true" text:style-name="L1">
        <text:list-item>
          <text:list>
            <text:list-item>
              <text:h text:style-name="P217" text:outline-level="2"><text:soft-page-break/><text:alphabetical-index-mark-start text:id="IMark100843576"/>DAYS_DELTA<text:alphabetical-index-mark-end text:id="IMark100843576"/></text:h>
            </text:list-item>
          </text:list>
        </text:list-item>
      </text:list>
      <text:p text:style-name="P22">Type<text:tab/>Funktion : DINT</text:p>
      <text:p text:style-name="P22"><text:span text:style-name="T16">Input</text:span><text:tab/>DATE_1 : DATE (Datum1)</text:p>
      <text:p text:style-name="P22"><text:tab/>DATE_2 : DATE (Datum2)</text:p>
      <text:p text:style-name="P23"><draw:frame draw:style-name="fr4"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23"><text:line-break/>Die Funktion DAYS_DELTA berechnet die Differenz zweier Daten in Tagen.</text:p>
      <text:p text:style-name="P23">Beispiel:<text:tab/>DAYS_DELTA(10.1.2007, 1.1.2007) = -9</text:p>
      <text:p text:style-name="P23"><text:tab/>DAYS_DELTA(1.1.2007, 10.1.2007) = 9</text:p>
      <text:p text:style-name="P23">Das Ergebnis der Funktion ist vom Typ DINT weil der gesamte DATE <text:span text:style-name="T16">Range</text:span> 49710 Tage umfasst.</text:p>
      <text:list xml:id="list33643846" text:continue-numbering="true" text:style-name="L1">
        <text:list-item>
          <text:list>
            <text:list-item>
              <text:h text:style-name="P217" text:outline-level="2"><text:alphabetical-index-mark-start text:id="IMark100843576"/>DCF77<text:alphabetical-index-mark-end text:id="IMark100843576"/></text:h>
            </text:list-item>
          </text:list>
        </text:list-item>
      </text:list>
      <text:p text:style-name="P22">Type<text:tab/>Funktionsbaustein</text:p>
      <text:p text:style-name="P22"><text:span text:style-name="T16">Input</text:span><text:tab/>REC : BOOL (Eingang für den DCF77 Empfänger)</text:p>
      <text:p text:style-name="P52"><text:tab/>SET : BOOL (Asynchroner SET Eingang)</text:p>
      <text:p text:style-name="P52"><text:tab/>SDT : DT (Anfangswert für RTC)</text:p>
      <text:p text:style-name="P52"><text:tab/>DSI : BOOL (Sommerzeit Eingang)</text:p>
      <text:p text:style-name="P23">Output<text:tab/>TP : BOOL (Puls zum Setzen von nachgeschalteten Uhren)</text:p>
      <text:p text:style-name="P23"><text:tab/>DS : BOOL (TRUE, wenn Sommerzeit herrscht)</text:p>
      <text:p text:style-name="P23"><text:tab/><text:span text:style-name="T16">WDAY</text:span> : INT (Wochentag)</text:p>
      <text:p text:style-name="P23"><text:tab/>ERROR : BOOL (TRUE, wenn kein gültiges Signal am Eingang rec)</text:p>
      <text:p text:style-name="P23"><text:tab/>RTC : DT (Synchronisierte Weltzeit UTC)</text:p>
      <text:p text:style-name="P23"><text:tab/>RTC1 : DT (Synchronisierte Lokalzeit)</text:p>
      <text:p text:style-name="P23"><text:tab/>MSEC : INT (Millisekunden von RTC und RTC1)</text:p>
      <text:p text:style-name="P23"><text:tab/>SYNC : BOOL (TRUE, wenn RTC und RTC1 mit DCF synchron sind)</text:p>
      <text:p text:style-name="P23">Config<text:tab/>SYNC_TIMEOUT : TIME (<text:span text:style-name="T16">Default</text:span> = T#2m)</text:p>
      <text:p text:style-name="P23"><text:soft-page-break/><text:tab/>TIME_OFFSET : INT (Zeit Offset für RTC1, <text:span text:style-name="T16">Default</text:span> = 1 Stunde)</text:p>
      <text:p text:style-name="P23"><draw:frame draw:style-name="fr4" draw:name="Grafik19" text:anchor-type="paragraph" svg:x="0.981cm" svg:y="0.646cm" svg:width="3.62cm" svg:height="4.44cm" draw:z-index="560"><draw:image xlink:href="Pictures/1000000000000112000001500A7AB421.png" xlink:type="simple" xlink:show="embed" xlink:actuate="onLoad"/></draw:frame><text:tab/>DST_EN : BOOL (Sommerzeit für RTC1, <text:span text:style-name="T16">Default</text:span> = TRUE)</text:p>
      <text:p text:style-name="P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6">Timers</text:span>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 text:style-name="T16">Default</text:span> ist 1 Stunde für MEZ (Mitteleuropäische Zeit). Die Variable TIME_OFFSET ist vom Typ INTEGER damit auch Zeitzonen mit negativem Offset (Westlich von Greenwich) möglich sind.</text:p>
      <text:p text:style-name="P53">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xml:id="list33655573" text:continue-numbering="true" text:style-name="L1">
        <text:list-item>
          <text:list>
            <text:list-item>
              <text:h text:style-name="P217" text:outline-level="2"><text:soft-page-break/><text:alphabetical-index-mark-start text:id="IMark100843576"/>DST<text:alphabetical-index-mark-end text:id="IMark100843576"/></text:h>
            </text:list-item>
          </text:list>
        </text:list-item>
      </text:list>
      <text:p text:style-name="P22">Type<text:tab/>Funktion : BOOL</text:p>
      <text:p text:style-name="P22"><text:span text:style-name="T16">Input</text:span><text:tab/>UTC : DATE_TIME (Weltzeit)</text:p>
      <text:p text:style-name="P22"><text:tab/>TIME_Zone_Offset : TIME (Differenz zur Weltzeit (UTC)</text:p>
      <text:p text:style-name="P23"><draw:frame draw:style-name="fr4" draw:name="Grafik20" text:anchor-type="paragraph" svg:x="1.046cm" svg:y="0.683cm" svg:width="2.281cm" svg:height="0.99cm" draw:z-index="358"><draw:image xlink:href="Pictures/10000000000000AC0000004BD8BA5DD3.png" xlink:type="simple" xlink:show="embed" xlink:actuate="onLoad"/></draw:frame>Output<text:tab/>BOOL (TRUE, wenn Sommerzeit)</text:p>
      <text:p text:style-name="P23"><text:line-break/>Die Funktion DST überprüft, ob im Augenblick Sommerzeit herrscht, oder nicht. Sie kann dazu benutzt werden eine vorhandene nicht-Sommerzeit fähige Uhr sekundengenau auf Sommer- und Winterzeit umzustellen.</text:p>
      <text:p text:style-name="P53">Die Funktion DST schaltet am letzten Sonntag des März um 01:00 UTC (02:00 MEZ) auf Sommerzeit (03:00 MESZ) und am letzten Sonntag des Oktober um 01:00 UTC (03:00 MESZ) auf 02:00 MEZ zurück. Der Ausgang von DST ist dann TRUE, wenn Sommerzeit herrscht.</text:p>
      <text:p text:style-name="P53">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xml:id="list33638672" text:continue-numbering="true" text:style-name="L1">
        <text:list-item>
          <text:list>
            <text:list-item>
              <text:h text:style-name="P217" text:outline-level="2"><text:alphabetical-index-mark-start text:id="IMark100843576"/>EASTER<text:alphabetical-index-mark-end text:id="IMark100843576"/></text:h>
            </text:list-item>
          </text:list>
        </text:list-item>
      </text:list>
      <text:p text:style-name="P22">Type<text:tab/>Funktion : DATE</text:p>
      <text:p text:style-name="P22"><text:span text:style-name="T16">Input</text:span><text:tab/>YEAR : INT (Jahr)</text:p>
      <text:p text:style-name="P23"><draw:frame draw:style-name="fr4"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23"><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xml:id="list33643251" text:continue-numbering="true" text:style-name="L1">
        <text:list-item>
          <text:list>
            <text:list-item>
              <text:h text:style-name="P217" text:outline-level="2"><text:soft-page-break/><text:alphabetical-index-mark-start text:id="IMark100843576"/>HOLIDAY<text:alphabetical-index-mark-end text:id="IMark100843576"/></text:h>
            </text:list-item>
          </text:list>
        </text:list-item>
      </text:list>
      <text:p text:style-name="P22">Type<text:tab/>Funktionsbaustein</text:p>
      <text:p text:style-name="P22"><text:span text:style-name="T16">Input</text:span><text:tab/>DATE_IN : DATE (Eingangsdatum)</text:p>
      <text:p text:style-name="P52"><text:tab/>COUNTRY : INT (gewünschtes Land)</text:p>
      <text:p text:style-name="P52"><text:tab/>FRIDAY : BOOL (Y wird TRUE an Freitagen wenn TRUE)</text:p>
      <text:p text:style-name="P52"><text:tab/>SATURDAY : BOOL (Y wird TRUE an Samstagen wenn TRUE)</text:p>
      <text:p text:style-name="P52"><text:tab/>SUNDAY : BOOL (Y wird TRUE an Sonntagen wenn TRUE)</text:p>
      <text:p text:style-name="P23">Output<text:tab/>Y : BOOL (TRUE, wenn DATE_IN ein Feiertag ist)</text:p>
      <text:p text:style-name="P23"><draw:frame draw:style-name="fr4" draw:name="Grafik22" text:anchor-type="paragraph" svg:x="1.023cm" svg:y="0.688cm" svg:width="3.69cm" svg:height="2.709cm" draw:z-index="716"><draw:image xlink:href="Pictures/1000000000000117000000CD9AB8CE87.png" xlink:type="simple" xlink:show="embed" xlink:actuate="onLoad"/></draw:frame><text:tab/>Name : STRING(30) (Name des heutigen Feiertags)</text:p>
      <text:p text:style-name="P23"><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Eingänge FRIDAY, SATURDAY oder SUNDAY auf TRUE gesetzt sind. Im Globalen Setup werden Name und Datum von Feiertagen definiert und sind auch dort für andere Länder universell anpassbar. Feiertage können als festes Datum, mit einem Abstand von Ostern oder Wochentag vor einem festen Datum definiert werden. Der Eingang COUNTRY wählt die dem Land entsprechende Tabelle aus den Setup Daten aus. Die Feiertage sind unter Globale Konstanten im Abschnitt "LOCATION SETUP" vordefinert und können dort erweitert oder angepasst werden.</text:p>
      <text:list xml:id="list33627148" text:continue-numbering="true" text:style-name="L1">
        <text:list-item>
          <text:list>
            <text:list-item>
              <text:h text:style-name="P217" text:outline-level="2"><text:alphabetical-index-mark-start text:id="IMark100843576"/>HOUR<text:alphabetical-index-mark-end text:id="IMark100843576"/></text:h>
            </text:list-item>
          </text:list>
        </text:list-item>
      </text:list>
      <text:p text:style-name="P22">Type<text:tab/>Funktion : INT</text:p>
      <text:p text:style-name="P22"><text:span text:style-name="T16">Input</text:span><text:tab/>ITOD : TIMEOFDAY (Tageszeit)</text:p>
      <text:p text:style-name="P23"><draw:frame draw:style-name="fr4" draw:name="Grafik23" text:anchor-type="paragraph" svg:x="1.037cm" svg:y="0.693cm" svg:width="2.281cm" svg:height="1.12cm" draw:z-index="16"><draw:image xlink:href="Pictures/10000000000000AC00000055919540D9.png" xlink:type="simple" xlink:show="embed" xlink:actuate="onLoad"/></draw:frame>Output<text:tab/>INT (aktuelle Stunde)</text:p>
      <text:p text:style-name="P23"><text:soft-page-break/><text:line-break/>Die Funktion HOUR extrahiert die aktuelle Stunde aus der Tageszeit.</text:p>
      <text:p text:style-name="P23">Beispiel:<text:tab/>HOUR(22:55:13) = 22</text:p>
      <text:p text:style-name="P53"/>
      <text:list xml:id="list33629694" text:continue-numbering="true" text:style-name="L1">
        <text:list-item>
          <text:list>
            <text:list-item>
              <text:h text:style-name="P217" text:outline-level="2"><text:alphabetical-index-mark-start text:id="IMark100843576"/>HOUR_OF_DT<text:alphabetical-index-mark-end text:id="IMark100843576"/></text:h>
            </text:list-item>
          </text:list>
        </text:list-item>
      </text:list>
      <text:p text:style-name="P22">Type<text:tab/>Funktion : INT</text:p>
      <text:p text:style-name="P22"><text:span text:style-name="T16">Input</text:span><text:tab/>XDT : DATETIME (Eingangswert)</text:p>
      <text:p text:style-name="P53"><draw:frame draw:style-name="fr4" draw:name="Grafik608" text:anchor-type="paragraph" svg:x="1.069cm" svg:y="0.688cm" svg:width="4.48cm" svg:height="0.99cm" draw:z-index="630"><draw:image xlink:href="Pictures/10000000000001530000004B0E0700DB.png" xlink:type="simple" xlink:show="embed" xlink:actuate="onLoad"/></draw:frame>Output<text:tab/>INT (aktuelle Stunde)</text:p>
      <text:p text:style-name="P53"><text:line-break/>HOUR_OF_DT extrahiert die momentane Stunde aus einem DT Wert.</text:p>
      <text:p text:style-name="P53">HOUR_OF_DT(DT#2008-6-6-10:22:20) = 10</text:p>
      <text:list xml:id="list33639481" text:continue-numbering="true" text:style-name="L1">
        <text:list-item>
          <text:list>
            <text:list-item>
              <text:h text:style-name="P217" text:outline-level="2"><text:alphabetical-index-mark-start text:id="IMark100843576"/>HOUR_TO_TIME<text:alphabetical-index-mark-end text:id="IMark100843576"/></text:h>
            </text:list-item>
          </text:list>
        </text:list-item>
      </text:list>
      <text:p text:style-name="P22">Type<text:tab/>Funktion : TIME</text:p>
      <text:p text:style-name="P22"><text:span text:style-name="T16">Input</text:span><text:tab/>INPUT : REAL (Anzahl Stunden mit Nachkommastellen)</text:p>
      <text:p text:style-name="P23"><draw:frame draw:style-name="fr4" draw:name="Grafik24" text:anchor-type="paragraph" svg:x="1.058cm" svg:y="0.697cm" svg:width="4.971cm" svg:height="1.12cm" draw:z-index="17"><draw:image xlink:href="Pictures/100000000000017800000055BE7D0FD3.png" xlink:type="simple" xlink:show="embed" xlink:actuate="onLoad"/></draw:frame>Output<text:tab/>TIME (TIME)</text:p>
      <text:p text:style-name="P23"><text:line-break/>Die Funktion HOUR_TO_TIME berechnet einen Zeitwert (TIME) aus dem Eingangswert in Stunden als REAL.</text:p>
      <text:p text:style-name="P23">Beispiel:<text:tab/>HOUR_TO_TIME(1.1) = T#1h6m</text:p>
      <text:list xml:id="list33639004" text:continue-numbering="true" text:style-name="L1">
        <text:list-item>
          <text:list>
            <text:list-item>
              <text:h text:style-name="P218" text:outline-level="2"><text:soft-page-break/><text:alphabetical-index-mark-start text:id="IMark100843576"/>HOUR_TO_TOD<text:alphabetical-index-mark-end text:id="IMark100843576"/></text:h>
            </text:list-item>
          </text:list>
        </text:list-item>
      </text:list>
      <text:p text:style-name="P22">Type<text:tab/>Funktion : TIME</text:p>
      <text:p text:style-name="P22"><text:span text:style-name="T16">Input</text:span><text:tab/>INPUT : REAL (Anzahl Stunden mit Nachkommastellen)</text:p>
      <text:p text:style-name="P23"><draw:frame draw:style-name="fr4" draw:name="Grafik25" text:anchor-type="paragraph" svg:x="1.062cm" svg:y="0.681cm" svg:width="4.521cm" svg:height="1.12cm" draw:z-index="18"><draw:image xlink:href="Pictures/1000000000000156000000555D155473.png" xlink:type="simple" xlink:show="embed" xlink:actuate="onLoad"/></draw:frame>Output<text:tab/>TIME (Tageszeit)</text:p>
      <text:p text:style-name="P23"><text:line-break/>Die Funktion HOUR_TO_TOD berechnet eine Tageszeit (TIMEOFDAY) aus dem Eingangswert in Stunden als REAL.</text:p>
      <text:p text:style-name="P23">Beispiel:<text:tab/>HOUR_TO_TOD(12.1) = 12:06:00</text:p>
      <text:list xml:id="list33654452" text:continue-numbering="true" text:style-name="L1">
        <text:list-item>
          <text:list>
            <text:list-item>
              <text:h text:style-name="P218" text:outline-level="2"><text:alphabetical-index-mark-start text:id="IMark100843576"/>JD2000<text:alphabetical-index-mark-end text:id="IMark100843576"/></text:h>
            </text:list-item>
          </text:list>
        </text:list-item>
      </text:list>
      <text:p text:style-name="P22">Type<text:tab/>Funktion : REAL</text:p>
      <text:p text:style-name="P22"><text:span text:style-name="T16">Input</text:span><text:tab/>INPUT : DTI (Gregorianisches Datum)</text:p>
      <text:p text:style-name="P53"><draw:frame draw:style-name="fr4" draw:name="Grafik665" text:anchor-type="paragraph" svg:x="1.025cm" svg:y="0.667cm" svg:width="3.29cm" svg:height="0.99cm" draw:z-index="687"><draw:image xlink:href="Pictures/10000000000000F90000004B7B3C8EB0.png" xlink:type="simple" xlink:show="embed" xlink:actuate="onLoad"/></draw:frame>Output<text:tab/>REAL (astronomischer julianischer Tag seit dem 1.1.2000 12:00)</text:p>
      <text:p text:style-name="P53"><text:line-break/>JD2000 berechnet das astronomische Julianische Datum seit dem 1. Januar 2000 12:00 (dem Standardäquinoktium).</text:p>
      <text:p text:style-name="P77"><text:span text:style-name="T10">Das Julianische Datum gibt die Zeit in Tagen seit dem 1. Januar 4713 12:00 vor Chr. als Gleitkommazahl an. Der 1. Januar 2000 00:00 entspricht dem Julianischen Datum </text:span>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p>
      <text:list xml:id="list33640934" text:continue-numbering="true" text:style-name="L1">
        <text:list-item>
          <text:list>
            <text:list-item>
              <text:h text:style-name="P217" text:outline-level="2"><text:soft-page-break/><text:alphabetical-index-mark-start text:id="IMark100843576"/>LEAP_DAY<text:alphabetical-index-mark-end text:id="IMark100843576"/></text:h>
            </text:list-item>
          </text:list>
        </text:list-item>
      </text:list>
      <text:p text:style-name="P22">Type<text:tab/>Funktion : BOOL</text:p>
      <text:p text:style-name="P22"><text:span text:style-name="T16">Input</text:span><text:tab/>IDATE : DATE (Eingangsdatum)</text:p>
      <text:p text:style-name="P23"><draw:frame draw:style-name="fr4" draw:name="Grafik626" text:anchor-type="paragraph" svg:x="1.067cm" svg:y="0.667cm" svg:width="3.859cm" svg:height="0.99cm" draw:z-index="648"><draw:image xlink:href="Pictures/10000000000001240000004B8EF3C8A3.png" xlink:type="simple" xlink:show="embed" xlink:actuate="onLoad"/></draw:frame>Output<text:tab/>BOOL (TRUE, wenn der aktuelle Tag ein 29. Februar ist)</text:p>
      <text:p text:style-name="P23">Die Funktion LEAP_DAY testet ob das Eingangsdatum ein Schalttag beziehungsweise ein 29. Februar ist. Der Test hat Gültigkeit für den Zeitrum 1970 - 2099. Im Jahr 2100 wird ein Schaltjahr angezeigt obwohl dies keines ist. Da aber der Wertebereich des Datums nach IEC61131-3 nur bis zum Jahr 2106 reicht wird auf diese Korrektur verzichtet.</text:p>
      <text:p text:style-name="P53">Beispiel:<text:tab/>LEAP_DAY(D#2004-02-29) = TRUE</text:p>
      <text:list xml:id="list33636968" text:continue-numbering="true" text:style-name="L1">
        <text:list-item>
          <text:list>
            <text:list-item>
              <text:h text:style-name="P217" text:outline-level="2"><text:alphabetical-index-mark-start text:id="IMark100843576"/>LEAP_OF_DATE<text:alphabetical-index-mark-end text:id="IMark100843576"/></text:h>
            </text:list-item>
          </text:list>
        </text:list-item>
      </text:list>
      <text:p text:style-name="P22">Type<text:tab/>Funktion : BOOL</text:p>
      <text:p text:style-name="P22"><text:span text:style-name="T16">Input</text:span><text:tab/>IDATE : DATE (Eingangsdatum)</text:p>
      <text:p text:style-name="P23"><draw:frame draw:style-name="fr4" draw:name="Grafik26" text:anchor-type="paragraph" svg:x="1.076cm" svg:y="0.679cm" svg:width="4.971cm" svg:height="1.12cm" draw:z-index="19"><draw:image xlink:href="Pictures/10000000000001780000005586B3E068.png" xlink:type="simple" xlink:show="embed" xlink:actuate="onLoad"/></draw:frame>Output<text:tab/>BOOL (TRUE, wenn IDATE in einem Schaltjahr liegt)</text:p>
      <text:p text:style-name="P23"><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53">Beispiel:<text:tab/>LEAP_OF_YEAR(D#2004-01-12) = TRUE</text:p>
      <text:list xml:id="list33637029" text:continue-numbering="true" text:style-name="L1">
        <text:list-item>
          <text:list>
            <text:list-item>
              <text:h text:style-name="P217" text:outline-level="2"><text:soft-page-break/><text:alphabetical-index-mark-start text:id="IMark100843576"/>LEAP_YEAR<text:alphabetical-index-mark-end text:id="IMark100843576"/></text:h>
            </text:list-item>
          </text:list>
        </text:list-item>
      </text:list>
      <text:p text:style-name="P22">Type<text:tab/>Funktion : BOOL</text:p>
      <text:p text:style-name="P22"><text:span text:style-name="T16">Input</text:span><text:tab/>YR : INT (Jahreszahl)</text:p>
      <text:p text:style-name="P23"><draw:frame draw:style-name="fr4" draw:name="Grafik27" text:anchor-type="paragraph" svg:x="1.053cm" svg:y="0.626cm" svg:width="4.069cm" svg:height="1.12cm" draw:z-index="20"><draw:image xlink:href="Pictures/100000000000013400000055AE5B01E9.png" xlink:type="simple" xlink:show="embed" xlink:actuate="onLoad"/></draw:frame>Output<text:tab/>BOOL (TRUE, wenn das angegebene Jahr ein Schaltjahr ist)</text:p>
      <text:p text:style-name="P23"><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xml:id="list33633515" text:continue-numbering="true" text:style-name="L1">
        <text:list-item>
          <text:list>
            <text:list-item>
              <text:h text:style-name="P224" text:outline-level="2"><text:alphabetical-index-mark-start text:id="IMark100843576"/><text:span text:style-name="T11">LOCAL_</text:span><text:span text:style-name="T1">TIME</text:span><text:alphabetical-index-mark-end text:id="IMark100843576"/></text:h>
            </text:list-item>
          </text:list>
        </text:list-item>
      </text:list>
      <text:p text:style-name="P39">Die Funktion LOCAL_TIME wurde durch die Funktion LTIME ersetzt!<text:line-break/>Bitte in Zukunft nur noch LTIME einsetzen.</text:p>
      <text:p text:style-name="P40">Type<text:tab/>Funktion : DATE_TIME</text:p>
      <text:p text:style-name="P40">Input<text:tab/>UTC : DATE_TIME (Weltzeit)</text:p>
      <text:p text:style-name="P40"><text:tab/>TIME_<text:span text:style-name="T16">ZONE</text:span>_OFFSET : INT (Zeitdifferenz zu UTC in Stunden)</text:p>
      <text:p text:style-name="P40"><text:tab/>DST_<text:span text:style-name="T16">ENABLE</text:span> : BOOL (TRUE bei Sommerzeit)</text:p>
      <text:p text:style-name="P41"><draw:frame draw:style-name="fr4" draw:name="Grafik28" text:anchor-type="paragraph" svg:x="1.118cm" svg:y="0.788cm" svg:width="5.87cm" svg:height="2.02cm" draw:z-index="21"><draw:image xlink:href="Pictures/10000000000001BC00000099B16FC79A.png" xlink:type="simple" xlink:show="embed" xlink:actuate="onLoad"/></draw:frame>Output<text:tab/>DATE_TIME (Lokalzeit mit automatischer Sommerzeitschaltung)</text:p>
      <text:p text:style-name="P42"><text:line-break/>Die Funktion LOCAL_TIME errechnet die Lokalzeit mit automatischer Umschaltung von Winter- auf Sommerzeit. Die Sommerzeit wird exakt am letzten Sonntag im März eingeschaltet und im Oktober entsprechend zurück auf Winterzeit gesetzt.</text:p>
      <text:list xml:id="list33655965" text:continue-numbering="true" text:style-name="L1">
        <text:list-item>
          <text:list>
            <text:list-item>
              <text:h text:style-name="P217" text:outline-level="2"><text:soft-page-break/><text:alphabetical-index-mark-start text:id="IMark100843576"/>LTIME_TO_UTC<text:alphabetical-index-mark-end text:id="IMark100843576"/></text:h>
            </text:list-item>
          </text:list>
        </text:list-item>
      </text:list>
      <text:p text:style-name="P22">Type<text:tab/>Funktion : DATE_TIME</text:p>
      <text:p text:style-name="P22"><text:span text:style-name="T16">Input</text:span><text:tab/>LTIME : DATE_TIME (Lokalzeit)</text:p>
      <text:p text:style-name="P22"><text:tab/>DST : BOOL (TRUE, wenn Sommerzeit herrscht)<text:alphabetical-index-mark text:string-value=" "/></text:p>
      <text:p text:style-name="P22"><text:tab/>TIME_ZONE_OFFSET : REAL (Zeitdifferenz zur Weltzeit in Stunden)</text:p>
      <text:p text:style-name="P23"><draw:frame draw:style-name="fr4" draw:name="Grafik311" text:anchor-type="paragraph" svg:x="1.125cm" svg:y="0.982cm" svg:width="6.32cm" svg:height="2.02cm" draw:z-index="285"><draw:image xlink:href="Pictures/10000000000001DE00000099D3EB4E1C.png" xlink:type="simple" xlink:show="embed" xlink:actuate="onLoad"/></draw:frame>Output<text:tab/>DATE_TIME (UTC, Weltzeit)</text:p>
      <text:p text:style-name="P55"><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75">Anmerkung: Diese Funktion gilt nur innerhalb des europäischen Kontinents!</text:p>
      <text:p text:style-name="P75">Für andere Regionen gelten unterschiedliche Regeln für die Sommerzeit.</text:p>
      <text:list xml:id="list33629117" text:continue-numbering="true" text:style-name="L1">
        <text:list-item>
          <text:list>
            <text:list-item>
              <text:h text:style-name="P217" text:outline-level="2"><text:alphabetical-index-mark-start text:id="IMark100843576"/>MINUTE<text:alphabetical-index-mark-end text:id="IMark100843576"/></text:h>
            </text:list-item>
          </text:list>
        </text:list-item>
      </text:list>
      <text:p text:style-name="P22">Type<text:tab/>Funktion : INT</text:p>
      <text:p text:style-name="P22"><text:span text:style-name="T16">Input</text:span><text:tab/>ITOD : TIMEOFDAY (Tageszeit)</text:p>
      <text:p text:style-name="P23"><draw:frame draw:style-name="fr4" draw:name="Grafik30" text:anchor-type="paragraph" svg:x="1.058cm" svg:y="0.594cm" svg:width="3.18cm" svg:height="1.12cm" draw:z-index="22"><draw:image xlink:href="Pictures/10000000000000F0000000558127FD0E.png" xlink:type="simple" xlink:show="embed" xlink:actuate="onLoad"/></draw:frame>Output<text:tab/>INT (aktuelle Minute)</text:p>
      <text:p text:style-name="P23"><text:line-break/>Die Funktion MINUTE extrahiert die aktuelle Minute aus der Tageszeit.</text:p>
      <text:p text:style-name="P25">Beispiel:<text:tab/>MINUTE(22:55:13) = 55</text:p>
      <text:list xml:id="list33638070" text:continue-numbering="true" text:style-name="L1">
        <text:list-item>
          <text:list>
            <text:list-item>
              <text:h text:style-name="P217" text:outline-level="2"><text:soft-page-break/><text:alphabetical-index-mark-start text:id="IMark100843576"/>MINUTE_OF_DT<text:alphabetical-index-mark-end text:id="IMark100843576"/></text:h>
            </text:list-item>
          </text:list>
        </text:list-item>
      </text:list>
      <text:p text:style-name="P22">Type<text:tab/>Funktion : INT</text:p>
      <text:p text:style-name="P22"><text:span text:style-name="T16">Input</text:span><text:tab/>XDT : DATETIME (Eingangswert)</text:p>
      <text:p text:style-name="P53"><draw:frame draw:style-name="fr4" draw:name="Grafik609" text:anchor-type="paragraph" svg:x="1.09cm" svg:y="0.667cm" svg:width="5.279cm" svg:height="0.99cm" draw:z-index="631"><draw:image xlink:href="Pictures/100000000000018F0000004BBB5AA8F7.png" xlink:type="simple" xlink:show="embed" xlink:actuate="onLoad"/></draw:frame>Output<text:tab/>INT (aktuelle Minute)</text:p>
      <text:p text:style-name="P53"><text:line-break/>MINUTE_OF_DT extrahiert die momentane Minute aus einem DT Wert.</text:p>
      <text:p text:style-name="P55">MINUTE_OF_DT(DT#2008-6-6-10:22:20) = 22</text:p>
      <text:list xml:id="list33627143" text:continue-numbering="true" text:style-name="L1">
        <text:list-item>
          <text:list>
            <text:list-item>
              <text:h text:style-name="P217" text:outline-level="2"><text:alphabetical-index-mark-start text:id="IMark100843576"/>MINUTE_TO_TIME<text:alphabetical-index-mark-end text:id="IMark100843576"/></text:h>
            </text:list-item>
          </text:list>
        </text:list-item>
      </text:list>
      <text:p text:style-name="P22">Type<text:tab/>Funktion : TIME</text:p>
      <text:p text:style-name="P22"><text:span text:style-name="T16">Input</text:span><text:tab/>ITOD : REAL (Anzahl Minuten mit Nachkommastellen)</text:p>
      <text:p text:style-name="P23"><draw:frame draw:style-name="fr4" draw:name="Grafik31" text:anchor-type="paragraph" svg:x="1.041cm" svg:y="0.635cm" svg:width="5.42cm" svg:height="1.12cm" draw:z-index="23"><draw:image xlink:href="Pictures/100000000000019A0000005573580FE8.png" xlink:type="simple" xlink:show="embed" xlink:actuate="onLoad"/></draw:frame>Output<text:tab/>TIME (TIME)</text:p>
      <text:p text:style-name="P23"><text:line-break/>Die Funktion MINUTE_TO_TIME berechnet einen Zeitwert (TIME) aus dem Eingangswert in Minuten als REAL.</text:p>
      <text:p text:style-name="P25">Beispiel:<text:tab/>MINUTE_TO_TIME(122.5) = T#2h2m30s</text:p>
      <text:list xml:id="list33635310" text:continue-numbering="true" text:style-name="L1">
        <text:list-item>
          <text:list>
            <text:list-item>
              <text:h text:style-name="P217" text:outline-level="2"><text:alphabetical-index-mark-start text:id="IMark100843576"/>MONTH_BEGIN<text:alphabetical-index-mark-end text:id="IMark100843576"/></text:h>
            </text:list-item>
          </text:list>
        </text:list-item>
      </text:list>
      <text:p text:style-name="P22">Type<text:tab/>Funktion : DATE</text:p>
      <text:p text:style-name="P52"><text:span text:style-name="T16">Input</text:span><text:tab/>Y : DATE (aktuelles Datum)</text:p>
      <text:p text:style-name="P23"><draw:frame draw:style-name="fr4" draw:name="Grafik624" text:anchor-type="paragraph" svg:x="1.067cm" svg:y="0.69cm" svg:width="4.881cm" svg:height="0.99cm" draw:z-index="646"><draw:image xlink:href="Pictures/10000000000001710000004B9FBA4FD0.png" xlink:type="simple" xlink:show="embed" xlink:actuate="onLoad"/></draw:frame>Output<text:tab/>DATE (Datum des 1. Tages des aktuellen Monats)</text:p>
      <text:p text:style-name="P55"><text:soft-page-break/><text:line-break/>MONTH_BEGIN berechnet das Datum des 1. Tages des aktuellen Monats und aktuellen Jahres.</text:p>
      <text:p text:style-name="P55">MONTH_BEGIN(D#2008-2-13) = D#2008-2-1</text:p>
      <text:list xml:id="list33631598" text:continue-numbering="true" text:style-name="L1">
        <text:list-item>
          <text:list>
            <text:list-item>
              <text:h text:style-name="P217" text:outline-level="2"><text:alphabetical-index-mark-start text:id="IMark100843576"/>MONTH_END<text:alphabetical-index-mark-end text:id="IMark100843576"/></text:h>
            </text:list-item>
          </text:list>
        </text:list-item>
      </text:list>
      <text:p text:style-name="P22">Type<text:tab/>Funktion : DATE</text:p>
      <text:p text:style-name="P52"><text:span text:style-name="T16">Input</text:span><text:tab/>Y : DATE (aktuelles Datum)</text:p>
      <text:p text:style-name="P23"><draw:frame draw:style-name="fr4" draw:name="Grafik625" text:anchor-type="paragraph" svg:x="1.002cm" svg:y="0.667cm" svg:width="4.26cm" svg:height="0.99cm" draw:z-index="647"><draw:image xlink:href="Pictures/10000000000001420000004B525202F7.png" xlink:type="simple" xlink:show="embed" xlink:actuate="onLoad"/></draw:frame>Output<text:tab/>DATE (Datum des letzten Tages des aktuellen Monats)</text:p>
      <text:p text:style-name="P55"><text:line-break/>MONTH_END berechnet das Datum des letzten Tages des aktuellen Monats und aktuellen Jahres.</text:p>
      <text:p text:style-name="P55">MONTH_END(D#2008-2-13) = D#2008-2-29</text:p>
      <text:list xml:id="list336249081" text:continue-numbering="true" text:style-name="L1">
        <text:list-item>
          <text:list>
            <text:list-item>
              <text:h text:style-name="P223" text:outline-level="2"><text:alphabetical-index-mark-start text:id="IMark100843576"/><text:alphabetical-index-mark-start text:id="IMark100800580"/>MONTH_OF_DATE<text:alphabetical-index-mark-end text:id="IMark100800580"/><text:alphabetical-index-mark-end text:id="IMark100843576"/></text:h>
            </text:list-item>
          </text:list>
        </text:list-item>
      </text:list>
      <text:p text:style-name="P22">Type<text:tab/>Funktion : INT</text:p>
      <text:p text:style-name="P22"><text:span text:style-name="T16">Input</text:span><text:tab/>IDATE : DATE (Eingangsdatum)</text:p>
      <text:p text:style-name="P23"><draw:frame draw:style-name="fr4" draw:name="Grafik32" text:anchor-type="paragraph" svg:x="1.046cm" svg:y="0.644cm" svg:width="5.669cm" svg:height="0.99cm" draw:z-index="726"><draw:image xlink:href="Pictures/10000000000001AD0000004B1C9725D1.png" xlink:type="simple" xlink:show="embed" xlink:actuate="onLoad"/></draw:frame>Output<text:tab/>INT (Monat im Jahr des Eingangsdatums)</text:p>
      <text:p text:style-name="P23"><text:line-break/>Die Funktion MONTH berechnet den Monat des Jahres aus dem Eingangsdatum IDATE.</text:p>
      <text:p text:style-name="P23">Beispiel:<text:tab/>MONTH_OF_DATE(D#2007-12-31) = 12</text:p>
      <text:p text:style-name="P53"><text:tab/>MONTH_OF_DATE(D#2006-1-1) = 1</text:p>
      <text:list xml:id="list33646814" text:continue-numbering="true" text:style-name="L1">
        <text:list-item>
          <text:list>
            <text:list-item>
              <text:h text:style-name="P217" text:outline-level="2"><text:soft-page-break/><text:alphabetical-index-mark-start text:id="IMark100843576"/>MULTIME<text:alphabetical-index-mark-end text:id="IMark100843576"/></text:h>
            </text:list-item>
          </text:list>
        </text:list-item>
      </text:list>
      <text:p text:style-name="P22">Type<text:tab/>Funktion : TIME</text:p>
      <text:p text:style-name="P22"><text:span text:style-name="T16">Input</text:span><text:tab/>T : TIME (Eingangszeit)</text:p>
      <text:p text:style-name="P22"><text:tab/>M : REAL (Multiplikator)</text:p>
      <text:p text:style-name="P23"><draw:frame draw:style-name="fr4" draw:name="Grafik33" text:anchor-type="paragraph" svg:x="1.014cm" svg:y="0.609cm" svg:width="3.62cm" svg:height="1.57cm" draw:z-index="24"><draw:image xlink:href="Pictures/10000000000001120000007763C04288.png" xlink:type="simple" xlink:show="embed" xlink:actuate="onLoad"/></draw:frame>Output<text:tab/>TIME (Ergebnis Eingangszeit Multipliziert mit M)</text:p>
      <text:p text:style-name="P23"><text:line-break/>Die Funktion MULTIME Multipliziert einen Zeitwert mit einem Multiplikator.</text:p>
      <text:p text:style-name="P23">Beispiel:<text:tab/>MULTIME(T#1h10m, 2.5) = T#2h55m</text:p>
      <text:list xml:id="list33648674" text:continue-numbering="true" text:style-name="L1">
        <text:list-item>
          <text:list>
            <text:list-item>
              <text:h text:style-name="P217" text:outline-level="2"><text:alphabetical-index-mark-start text:id="IMark100843576"/>PERIOD<text:alphabetical-index-mark-end text:id="IMark100843576"/></text:h>
            </text:list-item>
          </text:list>
        </text:list-item>
      </text:list>
      <text:p text:style-name="P22">Type<text:tab/>Funktion : BOOL</text:p>
      <text:p text:style-name="P22"><text:span text:style-name="T16">Input</text:span><text:tab/>D1 : DATE (Perioden Beginn)</text:p>
      <text:p text:style-name="P22"><text:tab/>DX : DATE (zu testendes Datum)</text:p>
      <text:p text:style-name="P52"><text:tab/>D1 : DATE (Perioden Ende)</text:p>
      <text:p text:style-name="P23"><draw:frame draw:style-name="fr4" draw:name="Grafik326" text:anchor-type="paragraph" svg:x="1.067cm" svg:y="0.684cm" svg:width="3.29cm" svg:height="1.79cm" draw:z-index="307"><draw:image xlink:href="Pictures/10000000000000F90000008763C94FCE.png" xlink:type="simple" xlink:show="embed" xlink:actuate="onLoad"/></draw:frame>Output<text:tab/>BOOL (TRUE wenn DX innerhalb der Periode D1 .. D2 liegt)</text:p>
      <text:p text:style-name="P23">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53">PERIOD(1.10.2001, 12.11.2007, 31.3.2001) ergibt TRUE, weil das zu prüfende Datum innerhalb der Periode vom 1.10 - 31.3. liegt.</text:p>
      <text:list xml:id="list33630762" text:continue-numbering="true" text:style-name="L1">
        <text:list-item>
          <text:list>
            <text:list-item>
              <text:h text:style-name="P217" text:outline-level="2"><text:soft-page-break/><text:alphabetical-index-mark-start text:id="IMark100843576"/>PERIOD2<text:alphabetical-index-mark-end text:id="IMark100843576"/></text:h>
            </text:list-item>
          </text:list>
        </text:list-item>
      </text:list>
      <text:p text:style-name="P22">Type<text:tab/>Funktion : BOOL</text:p>
      <text:p text:style-name="P22"><text:span text:style-name="T16">Input</text:span><text:tab/>DP : ARRAY[0..3,0..1] <text:span text:style-name="T16">of</text:span> DATE (Perioden)</text:p>
      <text:p text:style-name="P22"><text:tab/>DX : DATE (zu testendes Datum)</text:p>
      <text:p text:style-name="P53"><draw:frame draw:style-name="fr4" draw:name="Grafik560" text:anchor-type="paragraph" svg:x="1.046cm" svg:y="0.667cm" svg:width="3.69cm" svg:height="1.39cm" draw:z-index="571"><draw:image xlink:href="Pictures/1000000000000117000000697AC157C0.png" xlink:type="simple" xlink:show="embed" xlink:actuate="onLoad"/></draw:frame>Output<text:tab/>BOOL (TRUE wenn DX innerhalb einer der Perioden liegt)</text:p>
      <text:p text:style-name="P53"><text:line-break/>PERIOD2 prüft ob das Datum DX innerhalb einer von 4 spezifizierten Perioden liegt. Die Perioden werden in einem ARRAY[0..3,0..1] <text:span text:style-name="T16">of</text:span> DATE spezifiziert. Im Gegensatz zur Funktion PERIOD prüft PERIOD2 auch das Jahr. Die Perioden werden im ARRAY DP spezifiziert, wobei DP[N,0] das Anfangsdatum der Periode N DP[N,1] das Enddatum der Periode N ist.</text:p>
      <text:p text:style-name="P53">Die Funktion Prüft nach der Formel: DX &gt;= DP[N,0] AND DX &gt;= DP[N,1]. Es wird Dabei jeweils N=0 bis 3 geprüft. Wenn DX in eine der 4 Perioden fällt wird der Ausgang auf TRUE gesetzt.</text:p>
      <text:p text:style-name="P53">Die einzelnen Perioden Müssen nicht sortiert vorliegen. PERIOD2 kann benutzt werden um Ferien oder Urlaubszeiten zu definieren. PERIOD2 prüft nicht wiederkehrende Perioden, wobei die Funktion PERIOD jährlich wiederkehrende Perioden Prüft.</text:p>
      <text:list xml:id="list33625502" text:continue-numbering="true" text:style-name="L1">
        <text:list-item>
          <text:list>
            <text:list-item>
              <text:h text:style-name="P217" text:outline-level="2"><text:alphabetical-index-mark-start text:id="IMark100843576"/>REFRACTION<text:alphabetical-index-mark-end text:id="IMark100843576"/></text:h>
            </text:list-item>
          </text:list>
        </text:list-item>
      </text:list>
      <text:p text:style-name="P22">Type<text:tab/>Funktion : REAL</text:p>
      <text:p text:style-name="P22"><text:span text:style-name="T16">Input</text:span><text:tab/>ELEV : REAL (Elevation in Grad über Horizont)</text:p>
      <text:p text:style-name="P53"><draw:frame draw:style-name="fr4" draw:name="Grafik664" text:anchor-type="paragraph" svg:x="1.069cm" svg:y="0.688cm" svg:width="4.48cm" svg:height="0.99cm" draw:z-index="686"><draw:image xlink:href="Pictures/10000000000001530000004BB276BEA9.png" xlink:type="simple" xlink:show="embed" xlink:actuate="onLoad"/></draw:frame>Output<text:tab/>REAL (Refraktion in Grad)</text:p>
      <text:p text:style-name="P53"><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text:soft-page-break/>net einen Mittelwert für einen Luftdruck von 1010mBar und 10°C. Wenn die Sonne tatsächlich bei 0° also exakt am Horizont steht erscheint sie wegen der Refraktion bei 0,59 ° über dem Horizont. Der Sichtbare Sonnenstand ist der tatsächliche (astronomische) Sonnenstand H + die Refraktion.</text:p>
      <text:list xml:id="list33631199" text:continue-numbering="true" text:style-name="L1">
        <text:list-item>
          <text:list>
            <text:list-item>
              <text:h text:style-name="P217" text:outline-level="2"><text:alphabetical-index-mark-start text:id="IMark100843576"/>RTC_2<text:alphabetical-index-mark-end text:id="IMark100843576"/></text:h>
            </text:list-item>
          </text:list>
        </text:list-item>
      </text:list>
      <text:p text:style-name="P22">Type<text:tab/>Funktionsbaustein</text:p>
      <text:p text:style-name="P22"><text:span text:style-name="T16">Input</text:span><text:tab/>SET : BOOL (Set Eingang)</text:p>
      <text:p text:style-name="P22"><text:tab/>SDT : DT (Set Datum und Zeit)</text:p>
      <text:p text:style-name="P52"><text:tab/>SMS : INT (Set Millisekunden)</text:p>
      <text:p text:style-name="P52"><text:tab/>DEN : BOOL (Automatische Sommerzeitumstellung Ein)</text:p>
      <text:p text:style-name="P52"><text:tab/>OFS : INT (Offset der Lokalzeit LDT von der Weltzeit UDT)</text:p>
      <text:p text:style-name="P23">Output<text:tab/>UDT : DT (Datums und Zeit Ausgang für Weltzeit)</text:p>
      <text:p text:style-name="P53"><text:tab/>LDT : DT (Lokalzeit)</text:p>
      <text:p text:style-name="P53"><text:tab/>DSO : BOOL (Sommerzeit aktiv)</text:p>
      <text:p text:style-name="P53"><draw:frame draw:style-name="fr4" draw:name="Grafik441" text:anchor-type="paragraph" svg:x="1.111cm" svg:y="0.667cm" svg:width="2.731cm" svg:height="3.099cm" draw:z-index="453"><draw:image xlink:href="Pictures/10000000000000CE000000EA5E427DA7.png" xlink:type="simple" xlink:show="embed" xlink:actuate="onLoad"/></draw:frame><text:tab/>XMS : INT (Millisekunden)</text:p>
      <text:p text:style-name="P53"><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6">Timer</text:span> der SPS ab. Der Eingang OFS spezifiziert den Zeitversatz von LDT zu UDT, für MEZ ist dieser Wert 1 Stunde. OFS wird als Integer spezifiziert damit auch ein negativer Offset möglich ist. RTC_2 übernimmt beim Power <text:span text:style-name="T16">Up</text:span> automatisch <text:soft-page-break/>die an SDT anliegende Startzeit und Datum. Der Ausgang XMS stellt die Millisekunden zur Verfügung und zählt in jeder Sekunde von 0 – 999. </text:p>
      <text:p text:style-name="P53"><draw:frame draw:style-name="fr4" draw:name="Grafik442" text:anchor-type="paragraph" svg:x="1.817cm" svg:y="0.651cm" svg:width="10.7cm" svg:height="2.17cm" draw:z-index="455"><draw:image xlink:href="Pictures/100000000000024200000075D8A4868B.png" xlink:type="simple" xlink:show="embed" xlink:actuate="onLoad"/></draw:frame>Im folgenden Beispiel wird beim Start die Systemzeit übernommen.</text:p>
      <text:p text:style-name="P53"/>
      <text:list xml:id="list33632199" text:continue-numbering="true" text:style-name="L1">
        <text:list-item>
          <text:list>
            <text:list-item>
              <text:h text:style-name="P217" text:outline-level="2"><text:alphabetical-index-mark-start text:id="IMark100843576"/>RTC_MS<text:alphabetical-index-mark-end text:id="IMark100843576"/></text:h>
            </text:list-item>
          </text:list>
        </text:list-item>
      </text:list>
      <text:p text:style-name="P22">Type<text:tab/>Funktionsbaustein</text:p>
      <text:p text:style-name="P22"><text:span text:style-name="T16">Input</text:span><text:tab/>SET : BOOL (Set Eingang)</text:p>
      <text:p text:style-name="P22"><text:tab/>SDT : DT (Set Datum und Zeit)</text:p>
      <text:p text:style-name="P52"><text:tab/>SMS : INT (Set Millisekunden)</text:p>
      <text:p text:style-name="P23">Output<text:tab/>XDT : DT (Datums und Zeit Ausgang)</text:p>
      <text:p text:style-name="P53"><draw:frame draw:style-name="fr4" draw:name="Grafik440" text:anchor-type="paragraph" svg:x="1.002cm" svg:y="0.667cm" svg:width="2.731cm" svg:height="2.2cm" draw:z-index="454"><draw:image xlink:href="Pictures/10000000000000CE000000A6C9D4B444.png" xlink:type="simple" xlink:show="embed" xlink:actuate="onLoad"/></draw:frame><text:tab/>XMS : INT (Millisekunden Ausgang)</text:p>
      <text:p text:style-name="P53"><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6">Timer</text:span> der SPS ab.</text:p>
      <text:p text:style-name="P53"/>
      <text:list xml:id="list33627869" text:continue-numbering="true" text:style-name="L1">
        <text:list-item>
          <text:list>
            <text:list-item>
              <text:h text:style-name="P217" text:outline-level="2"><text:soft-page-break/><text:alphabetical-index-mark-start text:id="IMark100843576"/>SECOND<text:alphabetical-index-mark-end text:id="IMark100843576"/></text:h>
            </text:list-item>
          </text:list>
        </text:list-item>
      </text:list>
      <text:p text:style-name="P22">Type<text:tab/>Funktion : REAL</text:p>
      <text:p text:style-name="P22"><text:span text:style-name="T16">Input</text:span><text:tab/>ITOD : TOD (Tageszeit)</text:p>
      <text:p text:style-name="P23"><draw:frame draw:style-name="fr4" draw:name="Grafik34" text:anchor-type="paragraph" svg:x="1.102cm" svg:y="0.667cm" svg:width="3.18cm" svg:height="1.12cm" draw:z-index="25"><draw:image xlink:href="Pictures/10000000000000F000000055F069EDE2.png" xlink:type="simple" xlink:show="embed" xlink:actuate="onLoad"/></draw:frame>Output<text:tab/>REAL (Sekunden und Millisekunden der Tageszeit)</text:p>
      <text:p text:style-name="P23"><text:line-break/>Die Funktion <text:span text:style-name="T16">SECOND</text:span> extrahiert den Sekundenanteil aus der Tageszeit</text:p>
      <text:p text:style-name="P23">Beispiel:<text:tab/><text:span text:style-name="T16">SECOND</text:span>(22:10:12.331) = 12.331</text:p>
      <text:list xml:id="list33633602" text:continue-numbering="true" text:style-name="L1">
        <text:list-item>
          <text:list>
            <text:list-item>
              <text:h text:style-name="P217" text:outline-level="2"><text:alphabetical-index-mark-start text:id="IMark100843576"/>SECOND_OF_DT<text:alphabetical-index-mark-end text:id="IMark100843576"/></text:h>
            </text:list-item>
          </text:list>
        </text:list-item>
      </text:list>
      <text:p text:style-name="P22">Type<text:tab/>Funktion : INT</text:p>
      <text:p text:style-name="P22"><text:span text:style-name="T16">Input</text:span><text:tab/>XDT : DATETIME (Eingangswert)</text:p>
      <text:p text:style-name="P53"><draw:frame draw:style-name="fr4" draw:name="Grafik610" text:anchor-type="paragraph" svg:x="1.046cm" svg:y="0.614cm" svg:width="5.279cm" svg:height="0.99cm" draw:z-index="632"><draw:image xlink:href="Pictures/100000000000018F0000004BE5590CCA.png" xlink:type="simple" xlink:show="embed" xlink:actuate="onLoad"/></draw:frame>Output<text:tab/>INT (aktuelle Sekunde)</text:p>
      <text:p text:style-name="P53"><text:line-break/>SECOND_OF_DT extrahiert die momentane Sekunde aus einem DT Wert.</text:p>
      <text:p text:style-name="P53">SECOND_OF_DT(DT#2008-6-6-10:22:20) = 20</text:p>
      <text:list xml:id="list33655645" text:continue-numbering="true" text:style-name="L1">
        <text:list-item>
          <text:list>
            <text:list-item>
              <text:h text:style-name="P217" text:outline-level="2"><text:alphabetical-index-mark-start text:id="IMark100843576"/>SECOND_TO_TIME<text:alphabetical-index-mark-end text:id="IMark100843576"/></text:h>
            </text:list-item>
          </text:list>
        </text:list-item>
      </text:list>
      <text:p text:style-name="P22">Type<text:tab/>Funktion : TIME</text:p>
      <text:p text:style-name="P22"><text:span text:style-name="T16">Input</text:span><text:tab/>INPUT : REAL (Anzahl Sekunden mit Nachkommastellen)</text:p>
      <text:p text:style-name="P23"><draw:frame draw:style-name="fr4" draw:name="Grafik35" text:anchor-type="paragraph" svg:x="1.078cm" svg:y="0.663cm" svg:width="5.42cm" svg:height="1.12cm" draw:z-index="46"><draw:image xlink:href="Pictures/100000000000019A000000553EEC73AE.png" xlink:type="simple" xlink:show="embed" xlink:actuate="onLoad"/></draw:frame>Output<text:tab/>TIME (TIME)</text:p>
      <text:p text:style-name="P23"><text:soft-page-break/><text:line-break/>Die Funktion SECOND_TO_TIME berechnet einen Zeitwert (TIME) aus dem Eingangswert in Sekunden als REAL.</text:p>
      <text:p text:style-name="P25">Beispiel:<text:tab/>SECOND_TO_TIME(63.123) = T#1m3s123ms</text:p>
      <text:list xml:id="list33632430" text:continue-numbering="true" text:style-name="L1">
        <text:list-item>
          <text:list>
            <text:list-item>
              <text:h text:style-name="P217" text:outline-level="2"><text:alphabetical-index-mark-start text:id="IMark100843576"/>SET_DATE<text:alphabetical-index-mark-end text:id="IMark100843576"/></text:h>
            </text:list-item>
          </text:list>
        </text:list-item>
      </text:list>
      <text:p text:style-name="P22">Type<text:tab/>Funktion : DATE</text:p>
      <text:p text:style-name="P22"><text:span text:style-name="T16">Input</text:span><text:tab/>YEAR : INT (Jahreszahl)</text:p>
      <text:p text:style-name="P22"><text:tab/>MONTH : INT (Monat)</text:p>
      <text:p text:style-name="P22"><text:tab/>DAY : INT (Tag)</text:p>
      <text:p text:style-name="P23"><draw:frame draw:style-name="fr4" draw:name="Grafik36" text:anchor-type="paragraph" svg:x="1.039cm" svg:y="0.665cm" svg:width="3.62cm" svg:height="2.02cm" draw:z-index="26"><draw:image xlink:href="Pictures/10000000000001120000009949531E17.png" xlink:type="simple" xlink:show="embed" xlink:actuate="onLoad"/></draw:frame>Output<text:tab/>DATE (Zusammengesetztes Datum)</text:p>
      <text:p text:style-name="P23"><text:line-break/>Die Funktion SET_DATE berechnet einen Datum (DATE) aus den Eingangswerten Tag, Monat und Jahr. <text:span text:style-name="T34">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34">Sinnvolle Anwendung sein. In diesem Fall darf der Monat auch 0 betragen. Eine un</text:span><text:span text:style-name="T34">gültige Monatsangabe ergibt immer ein Datum in Bezug auf den Januar. Ein ungültiger Monat ( Monat &lt; 1 oder Monat &gt; 12) wird immer als Januar interpretiert.</text:span></text:p>
      <text:p text:style-name="P55">Beispiel:<text:tab/>SET_DATE(2007,1,365) = 31.12.2007</text:p>
      <text:p text:style-name="P25">Beispiel:<text:tab/>SET_DATE(2007, 1, 22) = 22.1.2007</text:p>
      <text:p text:style-name="P55"/>
      <text:p text:style-name="P55"/>
      <text:p text:style-name="P55"/>
      <text:list xml:id="list33632152" text:continue-numbering="true" text:style-name="L1">
        <text:list-item>
          <text:list>
            <text:list-item>
              <text:h text:style-name="P217" text:outline-level="2"><text:soft-page-break/><text:alphabetical-index-mark-start text:id="IMark100843576"/>SET_DT<text:alphabetical-index-mark-end text:id="IMark100843576"/></text:h>
            </text:list-item>
          </text:list>
        </text:list-item>
      </text:list>
      <text:p text:style-name="P22">Type<text:tab/>Funktion : DATE_TIME</text:p>
      <text:p text:style-name="P22"><text:span text:style-name="T16">Input</text:span><text:tab/>YEAR : INT (Jahreszahl)</text:p>
      <text:p text:style-name="P22"><text:tab/>MONTH : INT (Monat)</text:p>
      <text:p text:style-name="P22"><text:tab/>DAY : INT (Tag)</text:p>
      <text:p text:style-name="P22"><text:tab/>HOUR : INT (Stunde)</text:p>
      <text:p text:style-name="P22"><text:tab/>MINUTE : INT (Minute)</text:p>
      <text:p text:style-name="P22"><text:tab/>SECOND : INT (Sekunden)</text:p>
      <text:p text:style-name="P23"><draw:frame draw:style-name="fr4" draw:name="Grafik37" text:anchor-type="paragraph" svg:x="1.028cm" svg:y="0.654cm" svg:width="3.18cm" svg:height="3.371cm" draw:z-index="27"><draw:image xlink:href="Pictures/10000000000000F0000000FF67464D95.png" xlink:type="simple" xlink:show="embed" xlink:actuate="onLoad"/></draw:frame>Output<text:tab/>DATE_TIME (Zusammengesetztes Zeitdatum)</text:p>
      <text:p text:style-name="P23"><text:line-break/>Die Funktion SET_DT berechnet einen Zeit-Datumswert (DATE_TIME) aus den Eingangswerten Tag, Monat, Jahr, Stunde, Minute und Sekunden.</text:p>
      <text:p text:style-name="P25">Beispiel:<text:tab/>Set_DT(2007, 1, 22, 13, 10, 22) = DT#2007-1-22-13:10:22</text:p>
      <text:list xml:id="list33649994" text:continue-numbering="true" text:style-name="L1">
        <text:list-item>
          <text:list>
            <text:list-item>
              <text:h text:style-name="P217" text:outline-level="2"><text:alphabetical-index-mark-start text:id="IMark100843576"/>SET_TOD<text:alphabetical-index-mark-end text:id="IMark100843576"/></text:h>
            </text:list-item>
          </text:list>
        </text:list-item>
      </text:list>
      <text:p text:style-name="P22">Type<text:tab/>Funktion : TOD</text:p>
      <text:p text:style-name="P22"><text:span text:style-name="T16">Input</text:span><text:tab/>HOUR : INT (Stunde)</text:p>
      <text:p text:style-name="P22"><text:tab/>MINUTE : INT (Minute)</text:p>
      <text:p text:style-name="P22"><text:tab/>SECOND : REAL (Sekunden und Millisekunden)</text:p>
      <text:p text:style-name="P23"><draw:frame draw:style-name="fr4" draw:name="Grafik38" text:anchor-type="paragraph" svg:x="1.011cm" svg:y="0.654cm" svg:width="3.62cm" svg:height="2.02cm" draw:z-index="28"><draw:image xlink:href="Pictures/1000000000000112000000996C6C258E.png" xlink:type="simple" xlink:show="embed" xlink:actuate="onLoad"/></draw:frame>Output<text:tab/>TOD (Ausgangswert Tageszeit)</text:p>
      <text:p text:style-name="P23"><text:soft-page-break/><text:line-break/>Die Funktion SET_TOD berechnet eine Tageszeit (TOD) aus den Eingangswerten Stunde, Minute und Sekunden.</text:p>
      <text:p text:style-name="P25">Beispiel:<text:tab/>Set_TOD(13, 10, 22.33) = 13:10:22.330</text:p>
      <text:list xml:id="list33648680" text:continue-numbering="true" text:style-name="L1">
        <text:list-item>
          <text:list>
            <text:list-item>
              <text:h text:style-name="P217" text:outline-level="2"><text:alphabetical-index-mark-start text:id="IMark100843576"/>SUN_POS<text:alphabetical-index-mark-end text:id="IMark100843576"/></text:h>
            </text:list-item>
          </text:list>
        </text:list-item>
      </text:list>
      <text:p text:style-name="Standard"><text:span text:style-name="T46">Type</text:span><text:tab/><text:span text:style-name="T38">Funktionsbaustein</text:span></text:p>
      <text:p text:style-name="P22"><text:span text:style-name="T16">Input</text:span><text:tab/>LATITUDE : REAL (Breitengrad des Bezugsortes)</text:p>
      <text:p text:style-name="P22"><text:tab/><text:span text:style-name="T16">LONGITUDE</text:span> : REAL (Längengrad des Bezugsortes)</text:p>
      <text:p text:style-name="P22"><text:tab/>UTC : DATE_TIME (Weltzeit)</text:p>
      <text:p text:style-name="P23">Output<text:tab/><text:span text:style-name="T34">B : REAL (Sonnenazimut in Grad von Nord)</text:span></text:p>
      <text:p text:style-name="P25"><draw:frame draw:style-name="fr4" draw:name="Grafik258" text:anchor-type="paragraph" svg:x="1.111cm" svg:y="0.665cm" svg:width="3.62cm" svg:height="2.2cm" draw:z-index="227"><draw:image xlink:href="Pictures/1000000000000112000000A6060A45F1.png" xlink:type="simple" xlink:show="embed" xlink:actuate="onLoad"/></draw:frame><text:tab/>HR : REAL (Sonnenhöhe in Grad über Horizont mit Refraktion)</text:p>
      <text:p text:style-name="Standard"><text:line-break/>SUN_POS <text:span text:style-name="T38">berechnet</text:span>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p text:style-name="Standard"/>
      <text:p text:style-name="Standard"/>
      <text:p text:style-name="Standard"/>
      <text:list xml:id="list33628730" text:continue-numbering="true" text:style-name="L1">
        <text:list-item>
          <text:list>
            <text:list-item>
              <text:h text:style-name="P217" text:outline-level="2"><text:soft-page-break/><text:alphabetical-index-mark-start text:id="IMark100843576"/>SUN_TIME<text:alphabetical-index-mark-end text:id="IMark100843576"/></text:h>
            </text:list-item>
          </text:list>
        </text:list-item>
      </text:list>
      <text:p text:style-name="P22">Type<text:tab/>Funktionsbaustein</text:p>
      <text:p text:style-name="P22"><text:span text:style-name="T16">Input</text:span><text:tab/>LATITUDE : REAL (Breitengrad des Bezugsortes)</text:p>
      <text:p text:style-name="P22"><text:tab/><text:span text:style-name="T16">LONGITUDE</text:span> : REAL (Längengrad des Bezugsortes)</text:p>
      <text:p text:style-name="P22"><text:tab/>UTC : DATE_TIME (Weltzeit)</text:p>
      <text:p text:style-name="P23">Output<text:tab/>SUN_<text:span text:style-name="T16">MIDDAY</text:span> : TOD (Uhrzeit, zu der die Sonne exakt im <text:s text:c="6"/><text:tab/>Süden steht)</text:p>
      <text:p text:style-name="P53"><text:tab/>SUN_<text:span text:style-name="T16">RISE</text:span> : TOD (Zeit des Sonnenaufgangs)</text:p>
      <text:p text:style-name="P23"><text:tab/>SUN_SET : TOD (Zeit des Sonnenuntergangs)</text:p>
      <text:p text:style-name="P23"><draw:frame draw:style-name="fr4" draw:name="Grafik39" text:anchor-type="paragraph" svg:x="1.088cm" svg:y="1.147cm" svg:width="5.42cm" svg:height="2.649cm" draw:z-index="29"><draw:image xlink:href="Pictures/100000000000019A000000C89A3B50C2.png" xlink:type="simple" xlink:show="embed" xlink:actuate="onLoad"/></draw:frame><text:tab/>SUN_<text:span text:style-name="T16">DECLINATION</text:span> : REAL (Sonnenwinkel, wenn die Sonne genau <text:tab/>im <text:tab/>Süden Steht)</text:p>
      <text:p text:style-name="P42"><text:span text:style-name="T10"><text:line-break/>Der Funktionsbaustein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text:span text:style-name="T4">SUN_TIME wird für die Steuerung von Jalousien benutzt, um sie kurz vor Sonnenaufgang hochzuziehen, damit man im Schlafzimmer die Dämmerung genießen kann. Weitere Anwendungen sind im Gartenbau um Bewässerung anhand des Sonnen auf- und Untergangs zu steuern oder auch zum Nachführen von Solarpanels. Weitere Berechnungen des <text:s/>Sonnenstandes stellt der Baustein SUN_POS zur Verfügung.</text:span></text:p>
      <text:list xml:id="list33640654" text:continue-numbering="true" text:style-name="L1">
        <text:list-item>
          <text:list>
            <text:list-item>
              <text:h text:style-name="P217" text:outline-level="2"><text:soft-page-break/><text:alphabetical-index-mark-start text:id="IMark100843576"/>UTC_TO_LTIME<text:alphabetical-index-mark-end text:id="IMark100843576"/></text:h>
            </text:list-item>
          </text:list>
        </text:list-item>
      </text:list>
      <text:p text:style-name="P22">Type<text:tab/>Funktionsbaustein</text:p>
      <text:p text:style-name="P22"><text:span text:style-name="T16">Input</text:span><text:tab/>UTC : DATE_TIME (Weltzeit)</text:p>
      <text:p text:style-name="P22"><text:tab/>DST_ENABLE : BOOL (TRUE erlaubt Sommerzeit)</text:p>
      <text:p text:style-name="P22"><text:tab/>TIME_ZONE_OFFSET : REAL (Zeitdifferenz zur Weltzeit in Stunden)</text:p>
      <text:p text:style-name="P23">Output<text:tab/>LOCAL_DT : DATE_TIME (Lokalzeit)</text:p>
      <text:p text:style-name="P23"><text:tab/>DST_ON : BOOL (TRUE, wenn Sommerzeit herrscht)</text:p>
      <text:p text:style-name="P23"><draw:frame draw:style-name="fr4" draw:name="Grafik29" text:anchor-type="paragraph" svg:x="1.014cm" svg:y="0.642cm" svg:width="5.87cm" svg:height="2.2cm" draw:z-index="738"><draw:image xlink:href="Pictures/10000000000001BC000000A6E10655FD.png" xlink:type="simple" xlink:show="embed" xlink:actuate="onLoad"/></draw:frame><text:tab/>WDAY : INT (Wochentag 1 = Montag, 7 = Sonntag )</text:p>
      <text:p text:style-name="P23"><text:line-break/>Der Funktionsbaustein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53">Dieser Funktionsbaustein benötigt <text:span text:style-name="T34">UTC am Eingang, welche normalerweise von der SPS zur Verfügung gestellt wird und durch eine Routine des Herstellers gelesen werden kann.</text:span></text:p>
      <text:p text:style-name="P55"><draw:frame draw:style-name="fr4" draw:name="Grafik103" text:anchor-type="paragraph" svg:x="1.002cm" svg:y="1.663cm" svg:width="15.998cm" svg:height="1.526cm" draw:z-index="739"><draw:image xlink:href="Pictures/10000000000002FD00000049719FD5EB.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55"/>
      <text:p text:style-name="P55"/>
      <text:p text:style-name="P55"><text:alphabetical-index-mark text:string-value=" "/></text:p>
      <text:list xml:id="list33632437" text:continue-numbering="true" text:style-name="L1">
        <text:list-item>
          <text:list>
            <text:list-item>
              <text:h text:style-name="P217" text:outline-level="2"><text:soft-page-break/><text:alphabetical-index-mark-start text:id="IMark100843576"/>WORK_WEEK<text:alphabetical-index-mark-end text:id="IMark100843576"/></text:h>
            </text:list-item>
          </text:list>
        </text:list-item>
      </text:list>
      <text:p text:style-name="P22">Type<text:tab/>Funktion : INT</text:p>
      <text:p text:style-name="P22"><text:span text:style-name="T16">Input</text:span><text:tab/>IDATE : DATE (Eingangsdatum)</text:p>
      <text:p text:style-name="P23"><draw:frame draw:style-name="fr4" draw:name="Grafik41" text:anchor-type="paragraph" svg:x="1.081cm" svg:y="0.676cm" svg:width="4.069cm" svg:height="1.12cm" draw:z-index="30"><draw:image xlink:href="Pictures/1000000000000134000000554EF08597.png" xlink:type="simple" xlink:show="embed" xlink:actuate="onLoad"/></draw:frame>Output<text:tab/>INT (Arbeitswoche des Eingangsdatums)</text:p>
      <text:p text:style-name="P23"><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77"><text:span text:style-name="T10">Da die Arbeitswoche ( </text:span>Work<text:span text:style-name="T10"> </text:span>Week<text:span text:style-name="T10">) international nicht immer einheitlich Verwendung findet ist vor der Anwendung der Funktion zu klären ob die </text:span>Work<text:span text:style-name="T10"> </text:span>Week<text:span text:style-name="T10"> gemäß ISO8601 der in der Anwendung gewünschten Funktion entspricht.</text:span></text:p>
      <text:list xml:id="list33644640" text:continue-numbering="true" text:style-name="L1">
        <text:list-item>
          <text:list>
            <text:list-item>
              <text:h text:style-name="P217" text:outline-level="2"><text:alphabetical-index-mark-start text:id="IMark100843576"/>YEAR_BEGIN<text:alphabetical-index-mark-end text:id="IMark100843576"/></text:h>
            </text:list-item>
          </text:list>
        </text:list-item>
      </text:list>
      <text:p text:style-name="P22">Type<text:tab/>Funktion : DATE</text:p>
      <text:p text:style-name="P52"><text:span text:style-name="T16">Input</text:span><text:tab/>Y : INT (Jahreszahl)</text:p>
      <text:p text:style-name="P23"><draw:frame draw:style-name="fr4" draw:name="Grafik85" text:anchor-type="paragraph" svg:x="1.069cm" svg:y="0.667cm" svg:width="4.48cm" svg:height="0.99cm" draw:z-index="418"><draw:image xlink:href="Pictures/10000000000001530000004BA0B36DD1.png" xlink:type="simple" xlink:show="embed" xlink:actuate="onLoad"/></draw:frame>Output<text:tab/>DATE (Datum des 1. Januars für die Jahreszahl)</text:p>
      <text:p text:style-name="P53"><text:line-break/>YEAR_BEGIN berechnet das Datum des 1. Januars für das Jahr Y.</text:p>
      <text:list xml:id="list33647831" text:continue-numbering="true" text:style-name="L1">
        <text:list-item>
          <text:list>
            <text:list-item>
              <text:h text:style-name="P217" text:outline-level="2"><text:soft-page-break/><text:alphabetical-index-mark-start text:id="IMark100843576"/>YEAR_END<text:alphabetical-index-mark-end text:id="IMark100843576"/></text:h>
            </text:list-item>
          </text:list>
        </text:list-item>
      </text:list>
      <text:p text:style-name="P22">Type<text:tab/>Funktion : DATE</text:p>
      <text:p text:style-name="P52"><text:span text:style-name="T16">Input</text:span><text:tab/>Y : INT (Jahreszahl)</text:p>
      <text:p text:style-name="P23"><draw:frame draw:style-name="fr4" draw:name="Grafik694" text:anchor-type="paragraph" svg:x="1.046cm" svg:y="0.69cm" svg:width="3.69cm" svg:height="0.99cm" draw:z-index="727"><draw:image xlink:href="Pictures/10000000000001170000004B653EF57E.png" xlink:type="simple" xlink:show="embed" xlink:actuate="onLoad"/></draw:frame>Output<text:tab/>DATE (Datum des 31. Dezembers für die Jahreszahl)</text:p>
      <text:p text:style-name="P53"><text:line-break/>YEAR_END berechnet das Datum des 31. Dezembers für das Jahr Y.</text:p>
      <text:list xml:id="list33626309" text:continue-numbering="true" text:style-name="L1">
        <text:list-item>
          <text:list>
            <text:list-item>
              <text:h text:style-name="P217" text:outline-level="2"><text:alphabetical-index-mark-start text:id="IMark100843576"/>YEAR_OF_DATE<text:alphabetical-index-mark-end text:id="IMark100843576"/></text:h>
            </text:list-item>
          </text:list>
        </text:list-item>
      </text:list>
      <text:p text:style-name="P22">Type<text:tab/>Funktion : INT</text:p>
      <text:p text:style-name="P52"><text:span text:style-name="T16">Input</text:span><text:tab/>IDATE : DATE (Eingangsdatum)</text:p>
      <text:p text:style-name="P23"><draw:frame draw:style-name="fr4" draw:name="Grafik42" text:anchor-type="paragraph" svg:x="1.025cm" svg:y="0.644cm" svg:width="5.279cm" svg:height="0.99cm" draw:z-index="728"><draw:image xlink:href="Pictures/100000000000018F0000004B21F6D762.png" xlink:type="simple" xlink:show="embed" xlink:actuate="onLoad"/></draw:frame>Output<text:tab/>INT (Jahr des Eingangsdatums)</text:p>
      <text:p text:style-name="P23"><text:line-break/>Die Funktion YEAR_OF_DATE berechnet das entsprechende Jahr aus dem Eingangsdatum IDATE.</text:p>
      <text:p text:style-name="P23">Beispiel:<text:tab/>YEAR_OF_DATE(31.12.2007) = 2007</text:p>
      <text:list xml:id="list33650177" text:continue-numbering="true" text:style-name="L1">
        <text:list-item>
          <text:h text:style-name="P210" text:outline-level="1"><text:span text:style-name="T16">String</text:span> Funktionen</text:h>
        </text:list-item>
      </text:list>
      <text:p text:style-name="P199"/>
      <text:list xml:id="list33651847" text:continue-numbering="true" text:style-name="L1">
        <text:list-item>
          <text:list>
            <text:list-item>
              <text:h text:style-name="P217" text:outline-level="2"><text:alphabetical-index-mark-start text:id="IMark100843576"/>BIN_TO_BYTE<text:alphabetical-index-mark-end text:id="IMark100843576"/></text:h>
            </text:list-item>
          </text:list>
        </text:list-item>
      </text:list>
      <text:p text:style-name="P22">Type<text:tab/>Funktion : BYTE</text:p>
      <text:p text:style-name="P22"><text:span text:style-name="T16">Input</text:span><text:tab/>BIN : STRING(12) (Oktale Zeichenkette)</text:p>
      <text:p text:style-name="P25"><draw:frame draw:style-name="fr4" draw:name="Grafik636" text:anchor-type="paragraph" svg:x="1.046cm" svg:y="0.667cm" svg:width="4.881cm" svg:height="0.99cm" draw:z-index="657"><draw:image xlink:href="Pictures/10000000000001710000004B52AA7156.png" xlink:type="simple" xlink:show="embed" xlink:actuate="onLoad"/></draw:frame>Output<text:tab/>BYTE (Ausgangswert)</text:p>
      <text:p text:style-name="P25"><text:line-break/>Die Funktion BIN_TO_BYTE konvertiert eine binär kodierte Zeichenkette in einen BYTE Wert. Es werden dabei nur die binären Zeichen sind '0' und '1' interpretiert, alle anderen in BIN vorkommenden Zeichen werden ignoriert.</text:p>
      <text:p text:style-name="P55">Beispiel:<text:tab/>BIN_TO_BYTE('11') ergibt 3.</text:p>
      <text:list xml:id="list33655495" text:continue-numbering="true" text:style-name="L1">
        <text:list-item>
          <text:list>
            <text:list-item>
              <text:h text:style-name="P217" text:outline-level="2"><text:alphabetical-index-mark-start text:id="IMark100843576"/>BIN_TO_DWORD<text:alphabetical-index-mark-end text:id="IMark100843576"/></text:h>
            </text:list-item>
          </text:list>
        </text:list-item>
      </text:list>
      <text:p text:style-name="P22">Type<text:tab/>Funktion : DWORD</text:p>
      <text:p text:style-name="P22"><text:span text:style-name="T16">Input</text:span><text:tab/>BIN : STRING(40) (Oktale Zeichenkette)</text:p>
      <text:p text:style-name="P25">Output<text:tab/>DWORD (Ausgangswert)</text:p>
      <text:p text:style-name="P25"><draw:frame draw:style-name="fr4" draw:name="Grafik637" text:anchor-type="paragraph" svg:x="1.023cm" svg:y="0.035cm" svg:width="5.279cm" svg:height="0.99cm" draw:z-index="658"><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25">Beispiel:<text:tab/>BIN_TO_DWORD('11') ergibt 3.</text:p>
      <text:list xml:id="list33637698" text:continue-numbering="true" text:style-name="L1">
        <text:list-item>
          <text:list>
            <text:list-item>
              <text:h text:style-name="P217" text:outline-level="2"><text:soft-page-break/><text:alphabetical-index-mark-start text:id="IMark100843576"/>BYTE_TO_STRB<text:alphabetical-index-mark-end text:id="IMark100843576"/></text:h>
            </text:list-item>
          </text:list>
        </text:list-item>
      </text:list>
      <text:p text:style-name="Standard">Type<text:tab/><text:span text:style-name="T38">Funktion</text:span> : STRING</text:p>
      <text:p text:style-name="P22"><text:span text:style-name="T16">Input</text:span><text:tab/>IN : BYTE (Eingangswert)</text:p>
      <text:p text:style-name="P25"><draw:frame draw:style-name="fr4" draw:name="Grafik305" text:anchor-type="paragraph" svg:x="1.032cm" svg:y="0.619cm" svg:width="5.87cm" svg:height="1.12cm" draw:z-index="280"><draw:image xlink:href="Pictures/10000000000001BC0000005559EEB8A5.png" xlink:type="simple" xlink:show="embed" xlink:actuate="onLoad"/></draw:frame>Output<text:tab/>STRING(8) (Ergebnis STRING)</text:p>
      <text:p text:style-name="P63"><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63">Beispiel:<text:tab/>BYTE_TO_STRB(3) = '00000011'</text:p>
      <text:list xml:id="list33637919" text:continue-numbering="true" text:style-name="L1">
        <text:list-item>
          <text:list>
            <text:list-item>
              <text:h text:style-name="P217" text:outline-level="2"><text:alphabetical-index-mark-start text:id="IMark100843576"/>BYTE_TO_STRH<text:alphabetical-index-mark-end text:id="IMark100843576"/></text:h>
            </text:list-item>
          </text:list>
        </text:list-item>
      </text:list>
      <text:p text:style-name="Standard">Type<text:tab/><text:span text:style-name="T38">Funktion</text:span> : STRING</text:p>
      <text:p text:style-name="P22"><text:span text:style-name="T16">Input</text:span><text:tab/>IN : BYTE (Eingangswert)</text:p>
      <text:p text:style-name="P25"><draw:frame draw:style-name="fr4" draw:name="Grafik306" text:anchor-type="paragraph" svg:x="1.048cm" svg:y="0.669cm" svg:width="5.87cm" svg:height="1.12cm" draw:z-index="281"><draw:image xlink:href="Pictures/10000000000001BC000000552A28D0FB.png" xlink:type="simple" xlink:show="embed" xlink:actuate="onLoad"/></draw:frame>Output<text:tab/>STRING(2) (Ergebnis STRING)</text:p>
      <text:p text:style-name="P63"><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58">Beispiel:<text:tab/>BYTE_TO_STRH(15) = '0F'</text:p>
      <text:list xml:id="list33641181" text:continue-numbering="true" text:style-name="L1">
        <text:list-item>
          <text:list>
            <text:list-item>
              <text:h text:style-name="P217" text:outline-level="2"><text:soft-page-break/><text:alphabetical-index-mark-start text:id="IMark100843576"/>CAPITALIZE<text:alphabetical-index-mark-end text:id="IMark100843576"/></text:h>
            </text:list-item>
          </text:list>
        </text:list-item>
      </text:list>
      <text:p text:style-name="Standard">Type<text:tab/><text:span text:style-name="T38">Funktion</text:span> : STRING</text:p>
      <text:p text:style-name="P22"><text:span text:style-name="T16">Input</text:span><text:tab/>STR : STRING (Eingangsstring)</text:p>
      <text:p text:style-name="P25"><draw:frame draw:style-name="fr4" draw:name="Grafik497" text:anchor-type="paragraph" svg:x="1.046cm" svg:y="0.667cm" svg:width="4.521cm" svg:height="1.12cm" draw:z-index="503"><draw:image xlink:href="Pictures/1000000000000156000000551DF95B3E.png" xlink:type="simple" xlink:show="embed" xlink:actuate="onLoad"/></draw:frame>Output<text:tab/>STRING (Ergebnis STRING)</text:p>
      <text:p text:style-name="P160"><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61">CAPITALIZE('hugo wallenstein') = 'Hugo Wallenstein'</text:p>
      <text:list xml:id="list33644069" text:continue-numbering="true" text:style-name="L1">
        <text:list-item>
          <text:list>
            <text:list-item>
              <text:h text:style-name="P217" text:outline-level="2"><text:alphabetical-index-mark-start text:id="IMark100843576"/>CHARCODE<text:alphabetical-index-mark-end text:id="IMark100843576"/></text:h>
            </text:list-item>
          </text:list>
        </text:list-item>
      </text:list>
      <text:p text:style-name="Standard">Type<text:tab/><text:span text:style-name="T38">Funktion</text:span> : BYTE</text:p>
      <text:p text:style-name="P22"><text:span text:style-name="T16">Input</text:span><text:tab/>STR : STRING(10) (Eingangsstring)</text:p>
      <text:p text:style-name="P25"><draw:frame draw:style-name="fr4" draw:name="Grafik566" text:anchor-type="paragraph" svg:x="1.067cm" svg:y="0.688cm" svg:width="4.521cm" svg:height="1.12cm" draw:z-index="576"><draw:image xlink:href="Pictures/10000000000001560000005532B45A0F.png" xlink:type="simple" xlink:show="embed" xlink:actuate="onLoad"/></draw:frame>Output<text:tab/>BYTE (Zeichencode)</text:p>
      <text:p text:style-name="P160"><text:line-break/>CHARCODE liefert den Byte Code eines <text:span text:style-name="T16">Named</text:span> <text:span text:style-name="T16">Characters. </text:span>Eine<text:span text:style-name="T16"> </text:span>Liste<text:span text:style-name="T16"> </text:span>der<text:span text:style-name="T16"> Codes </text:span>mit<text:span text:style-name="T16"> </text:span>Namen<text:span text:style-name="T16"> </text:span>befindet sich unter der Funktion CHARNAME. Falls für den Namen in STR keine <text:span text:style-name="T16">Named</text:span> <text:span text:style-name="T28">Character</text:span> bekannt ist wird der Code des ersten Zeichens der Zeichenkette STR zurückgegeben. CHARCODE benutzt die globalen Variablen CHARNAME_1 .. 4 die die Liste der Namen mit Codes enthalten.</text:p>
      <text:p text:style-name="P161">Beispiel: CHARCODE('euro') = 128 und entspricht dem Zeichen €</text:p>
      <text:p text:style-name="P161"/>
      <text:list xml:id="list33638799" text:continue-numbering="true" text:style-name="L1">
        <text:list-item>
          <text:list>
            <text:list-item>
              <text:h text:style-name="P217" text:outline-level="2"><text:soft-page-break/><text:alphabetical-index-mark-start text:id="IMark100843576"/>CHARNAME<text:alphabetical-index-mark-end text:id="IMark100843576"/></text:h>
            </text:list-item>
          </text:list>
        </text:list-item>
      </text:list>
      <text:p text:style-name="Standard">Type<text:tab/><text:span text:style-name="T38">Funktion</text:span> : STRING(10)</text:p>
      <text:p text:style-name="P22"><text:span text:style-name="T16">Input</text:span><text:tab/>STR : STRING (Eingangsstring)</text:p>
      <text:p text:style-name="P25"><draw:frame draw:style-name="fr4" draw:name="Grafik567" text:anchor-type="paragraph" svg:x="1.023cm" svg:y="0.688cm" svg:width="4.521cm" svg:height="1.12cm" draw:z-index="577"><draw:image xlink:href="Pictures/10000000000001560000005532B45A0F.png" xlink:type="simple" xlink:show="embed" xlink:actuate="onLoad"/></draw:frame>Output<text:tab/>STRING (Ergebnis STRING)</text:p>
      <text:p text:style-name="P160"><text:line-break/>CHARNAME ermittelt den Zeichennamen für einen Zeichencode.</text:p>
      <text:p text:style-name="P161"><draw:frame draw:style-name="fr18" draw:name="Objekt1" text:anchor-type="paragraph" svg:x="1.002cm" svg:y="0.66cm" svg:width="13.716cm" svg:height="16.582cm" draw:z-index="578"><draw:object xlink:href="./Object 1" xlink:type="simple" xlink:show="embed" xlink:actuate="onLoad"/><draw:image xlink:href="./ObjectReplacements/Object 1" xlink:type="simple" xlink:show="embed" xlink:actuate="onLoad"/></draw:frame>Beispiel: CHARNAME(128) = 'euro'</text:p>
      <text:p text:style-name="P161"><text:soft-page-break/>Falls für einen Code kein Name bekannt ist wird der Code als einzelnes Zeichen zurückgegeben. Für den Code 0 wird eine leere Zeichenkette zurückgegeben. CHARCODE benutzt die globalen Variablen CHARNAME_1 .. 4 die die Liste der Namen mit Codes enthalten.</text:p>
      <text:list xml:id="list33634966" text:continue-numbering="true" text:style-name="L1">
        <text:list-item>
          <text:list>
            <text:list-item>
              <text:h text:style-name="P217" text:outline-level="2"><text:alphabetical-index-mark-start text:id="IMark100843576"/>CHR<text:alphabetical-index-mark-end text:id="IMark100843576"/></text:h>
            </text:list-item>
          </text:list>
        </text:list-item>
      </text:list>
      <text:p text:style-name="Standard">Type<text:tab/><text:span text:style-name="T46">Funktion</text:span> : STRING</text:p>
      <text:p text:style-name="P22"><text:span text:style-name="T16">Input</text:span><text:tab/>C : Byte (Eingangswert)</text:p>
      <text:p text:style-name="P25"><draw:frame draw:style-name="fr4" draw:name="Grafik231" text:anchor-type="paragraph" svg:x="1.087cm" svg:y="0.67cm" svg:width="2.731cm" svg:height="1.12cm" draw:z-index="204"><draw:image xlink:href="Pictures/10000000000000CE00000055F06621EC.png" xlink:type="simple" xlink:show="embed" xlink:actuate="onLoad"/></draw:frame>Output<text:tab/>STRING (Ergebnis STRING)</text:p>
      <text:p text:style-name="P25"><text:line-break/>CHR formt ein ASCII Zeichen aus einem Byte und liefert es als einen ein Zeichen langen STRING.</text:p>
      <text:list xml:id="list33651947" text:continue-numbering="true" text:style-name="L1">
        <text:list-item>
          <text:list>
            <text:list-item>
              <text:h text:style-name="P217" text:outline-level="2"><text:alphabetical-index-mark-start text:id="IMark100843576"/>CLEAN<text:alphabetical-index-mark-end text:id="IMark100843576"/></text:h>
            </text:list-item>
          </text:list>
        </text:list-item>
      </text:list>
      <text:p text:style-name="Standard">Type<text:tab/><text:span text:style-name="T46">Funktion</text:span> : STRING</text:p>
      <text:p text:style-name="P22"><text:span text:style-name="T16">Input</text:span><text:tab/>IN : STRING (Eingangswert)</text:p>
      <text:p text:style-name="P52"><text:tab/>CX : STRING (Alle Zeichen die nicht gelöscht werden sollen)</text:p>
      <text:p text:style-name="P25"><draw:frame draw:style-name="fr4" draw:name="Grafik631" text:anchor-type="paragraph" svg:x="1.067cm" svg:y="0.667cm" svg:width="2.9cm" svg:height="1.39cm" draw:z-index="652"><draw:image xlink:href="Pictures/10000000000000DB00000069689B5570.png" xlink:type="simple" xlink:show="embed" xlink:actuate="onLoad"/></draw:frame>Output<text:tab/>STRING (Ergebnis STRING)</text:p>
      <text:p text:style-name="P55"><text:line-break/>CLEAN löscht alle Zeichen aus einer Zeichenkette die nicht in der Zeichenkette CX enthalten sind.</text:p>
      <text:p text:style-name="P55">CLEAN('Nr.1 23#', '0123456789') = '123'</text:p>
      <text:list xml:id="list33630242" text:continue-numbering="true" text:style-name="L1">
        <text:list-item>
          <text:list>
            <text:list-item>
              <text:h text:style-name="P217" text:outline-level="2"><text:soft-page-break/><text:alphabetical-index-mark-start text:id="IMark100843576"/>CODE<text:alphabetical-index-mark-end text:id="IMark100843576"/></text:h>
            </text:list-item>
          </text:list>
        </text:list-item>
      </text:list>
      <text:p text:style-name="Standard">Type<text:tab/><text:span text:style-name="T46">Funktion</text:span> : BYTE</text:p>
      <text:p text:style-name="P22"><text:span text:style-name="T16">Input</text:span><text:tab/>STR : STRING (Zeichenkette)</text:p>
      <text:p text:style-name="P52"><text:tab/>POS : INT (Position an der das Zeichen gelesen wird)</text:p>
      <text:p text:style-name="P25"><draw:frame draw:style-name="fr4" draw:name="Grafik514" text:anchor-type="paragraph" svg:x="1.046cm" svg:y="0.667cm" svg:width="3.18cm" svg:height="1.57cm" draw:z-index="518"><draw:image xlink:href="Pictures/10000000000000F000000077AEA6C437.png" xlink:type="simple" xlink:show="embed" xlink:actuate="onLoad"/></draw:frame>Output<text:tab/>BYTE (Code des Zeichens an der Position POS)</text:p>
      <text:p text:style-name="P55"><text:line-break/>CODE ermittelt den Numerischen Code eines Zeichens an der Stelle POS in STR. wird CODE mit einer Position kleiner 1 oder größer der Länge von STR aufgerufen wird 0 zurückgegeben.</text:p>
      <text:p text:style-name="P55">Beispiel: CODE('ABC 123',4) = 32 (Das Zeichen ' ' wird mit dem Wert 32 kodiert.</text:p>
      <text:list xml:id="list33650844" text:continue-numbering="true" text:style-name="L1">
        <text:list-item>
          <text:list>
            <text:list-item>
              <text:h text:style-name="P217" text:outline-level="2"><text:alphabetical-index-mark-start text:id="IMark100843576"/>COUNT_CHAR<text:alphabetical-index-mark-end text:id="IMark100843576"/></text:h>
            </text:list-item>
          </text:list>
        </text:list-item>
      </text:list>
      <text:p text:style-name="Standard">Type<text:tab/><text:span text:style-name="T46">Funktion</text:span> : STRING</text:p>
      <text:p text:style-name="P22"><text:span text:style-name="T16">Input</text:span><text:tab/>STR : STRING (Zeichenkette)</text:p>
      <text:p text:style-name="P52"><text:tab/>CHR : Byte (Suchzeichen)</text:p>
      <text:p text:style-name="P25"><draw:frame draw:style-name="fr4" draw:name="Grafik487" text:anchor-type="paragraph" svg:x="1.046cm" svg:y="0.688cm" svg:width="5.42cm" svg:height="1.57cm" draw:z-index="493"><draw:image xlink:href="Pictures/100000000000019A00000077004F76A6.png" xlink:type="simple" xlink:show="embed" xlink:actuate="onLoad"/></draw:frame>Output<text:tab/>STRING (Ergebnis STRING)</text:p>
      <text:p text:style-name="P25"><text:line-break/>COUNT_CHAR ermittelt wie oft das Zeichen CHR in der Zeichenkette STR vorkommt. Um auch nach Sonderzeichen und Steuerzeichen suchen zu können wird das Suchzeichen CHR als BYTE angegeben.</text:p>
      <text:p text:style-name="P55"/>
      <text:list xml:id="list33642205" text:continue-numbering="true" text:style-name="L1">
        <text:list-item>
          <text:list>
            <text:list-item>
              <text:h text:style-name="P217" text:outline-level="2"><text:soft-page-break/><text:alphabetical-index-mark-start text:id="IMark100843576"/>DEC_TO_BYTE<text:alphabetical-index-mark-end text:id="IMark100843576"/></text:h>
            </text:list-item>
          </text:list>
        </text:list-item>
      </text:list>
      <text:p text:style-name="P22">Type<text:tab/>Funktion : BYTE</text:p>
      <text:p text:style-name="P22"><text:span text:style-name="T16">Input</text:span><text:tab/>DEC : STRING(10) (dezimale kodierte Zeichenkette)</text:p>
      <text:p text:style-name="P25"><draw:frame draw:style-name="fr4" draw:name="Grafik646" text:anchor-type="paragraph" svg:x="1.046cm" svg:y="0.688cm" svg:width="4.881cm" svg:height="0.99cm" draw:z-index="667"><draw:image xlink:href="Pictures/10000000000001710000004B1101EB13.png" xlink:type="simple" xlink:show="embed" xlink:actuate="onLoad"/></draw:frame>Output<text:tab/>BYTE (Ausgangswert)</text:p>
      <text:p text:style-name="P25"><text:line-break/>Die Funktion DEC_TO_BYTE konvertiert eine dezimal kodierte Zeichenkette in einen BYTE Wert. Es werden dabei nur die dezimalen Zeichen sind '0'..'9' interpretiert, alle anderen in DEC vorkommenden Zeichen werden ignoriert.</text:p>
      <text:p text:style-name="P55">Beispiel:<text:tab/>DEC_TO_BYTE('34') ergibt 34.</text:p>
      <text:list xml:id="list33635165" text:continue-numbering="true" text:style-name="L1">
        <text:list-item>
          <text:list>
            <text:list-item>
              <text:h text:style-name="P217" text:outline-level="2"><text:alphabetical-index-mark-start text:id="IMark100843576"/>DEC_TO_DWORD<text:alphabetical-index-mark-end text:id="IMark100843576"/></text:h>
            </text:list-item>
          </text:list>
        </text:list-item>
      </text:list>
      <text:p text:style-name="P22">Type<text:tab/>Funktion : DWORD</text:p>
      <text:p text:style-name="P22"><text:span text:style-name="T16">Input</text:span><text:tab/>DEC : STRING(20) (dezimale kodierte Zeichenkette)</text:p>
      <text:p text:style-name="P25"><draw:frame draw:style-name="fr4" draw:name="Grafik647" text:anchor-type="paragraph" svg:x="1.046cm" svg:y="0.688cm" svg:width="5.279cm" svg:height="0.99cm" draw:z-index="666"><draw:image xlink:href="Pictures/100000000000018F0000004B88033294.png" xlink:type="simple" xlink:show="embed" xlink:actuate="onLoad"/></draw:frame>Output<text:tab/>DWORD (Ausgangswert)</text:p>
      <text:p text:style-name="P25"><text:line-break/>Die Funktion DEC_TO_DWORD konvertiert eine dezimal kodierte Zeichenkette in einen BYTE Wert. Es werden dabei nur die dezimalen Zeichen sind '0'..'9' interpretiert, alle anderen in DEC vorkommenden Zeichen werden ignoriert.</text:p>
      <text:p text:style-name="P55">Beispiel:<text:tab/>DEC_TO_DWORD('34') ergibt 34.</text:p>
      <text:p text:style-name="P55"/>
      <text:p text:style-name="P55"/>
      <text:p text:style-name="P55"/>
      <text:list xml:id="list33654168" text:continue-numbering="true" text:style-name="L1">
        <text:list-item>
          <text:list>
            <text:list-item>
              <text:h text:style-name="P217" text:outline-level="2"><text:soft-page-break/><text:alphabetical-index-mark-start text:id="IMark100843576"/>DEC_TO_INT<text:alphabetical-index-mark-end text:id="IMark100843576"/></text:h>
            </text:list-item>
          </text:list>
        </text:list-item>
      </text:list>
      <text:p text:style-name="P22">Type<text:tab/>Funktion : INT</text:p>
      <text:p text:style-name="P22"><text:span text:style-name="T16">Input</text:span><text:tab/>DEC : STRING(10) (dezimale kodierte Zeichenkette)</text:p>
      <text:p text:style-name="P25"><draw:frame draw:style-name="fr4" draw:name="Grafik648" text:anchor-type="paragraph" svg:x="1.069cm" svg:y="0.695cm" svg:width="4.48cm" svg:height="0.99cm" draw:z-index="665"><draw:image xlink:href="Pictures/10000000000001530000004B6F217B9B.png" xlink:type="simple" xlink:show="embed" xlink:actuate="onLoad"/></draw:frame>Output<text:tab/>INT (Ausgangswert)</text:p>
      <text:p text:style-name="P25"><text:line-break/>Die Funktion DEC_TO_INT konvertiert eine dezimal kodierte Zeichenkette in einen BYTE Wert. Es werden dabei nur die dezimalen Zeichen sind '0'..'9' und '-' interpretiert, alle anderen in DEC vorkommenden Zeichen werden ignoriert.</text:p>
      <text:p text:style-name="P55">Beispiel:<text:tab/>DEC_TO_INT('-34') ergibt -34.</text:p>
      <text:list xml:id="list33628031" text:continue-numbering="true" text:style-name="L1">
        <text:list-item>
          <text:list>
            <text:list-item>
              <text:h text:style-name="P217" text:outline-level="2"><text:alphabetical-index-mark-start text:id="IMark100843576"/>DEL_CHARS<text:alphabetical-index-mark-end text:id="IMark100843576"/></text:h>
            </text:list-item>
          </text:list>
        </text:list-item>
      </text:list>
      <text:p text:style-name="Standard">Type<text:tab/><text:span text:style-name="T46">Funktion</text:span> : STRING</text:p>
      <text:p text:style-name="P22"><text:span text:style-name="T16">Input</text:span><text:tab/>IN : STRING (Eingangswert)</text:p>
      <text:p text:style-name="P52"><text:tab/>CX : STRING (Alle Zeichen die gelöscht werden sollen)</text:p>
      <text:p text:style-name="P25"><draw:frame draw:style-name="fr4" draw:name="Grafik632" text:anchor-type="paragraph" svg:x="1.023cm" svg:y="0.688cm" svg:width="4.09cm" svg:height="1.39cm" draw:z-index="653"><draw:image xlink:href="Pictures/100000000000013500000069432143A6.png" xlink:type="simple" xlink:show="embed" xlink:actuate="onLoad"/></draw:frame>Output<text:tab/>STRING (Ergebnis STRING)</text:p>
      <text:p text:style-name="P55"><text:line-break/>DEL_CHARS löscht alle Zeichen aus einer Zeichenkette die in der Zeichenkette CX enthalten sind.</text:p>
      <text:p text:style-name="P55">CLEAN('Nr.1 23#', ' #ABCDEFG') = 'Nr.123'</text:p>
      <text:p text:style-name="P55"/>
      <text:p text:style-name="P55"/>
      <text:list xml:id="list33655042" text:continue-numbering="true" text:style-name="L1">
        <text:list-item>
          <text:list>
            <text:list-item>
              <text:h text:style-name="P217" text:outline-level="2"><text:soft-page-break/><text:alphabetical-index-mark-start text:id="IMark100843576"/>DT_TO_STRF<text:alphabetical-index-mark-end text:id="IMark100843576"/></text:h>
            </text:list-item>
          </text:list>
        </text:list-item>
      </text:list>
      <text:p text:style-name="Standard">Type<text:tab/><text:span text:style-name="T46">Funktion</text:span> : STRING</text:p>
      <text:p text:style-name="P22"><text:span text:style-name="T16">Input</text:span><text:tab/>DTI : DT (Datum und Zeit Eingangswert)</text:p>
      <text:p text:style-name="P52"><text:tab/>MS : INT (Millisekunden Eingang)</text:p>
      <text:p text:style-name="P52"><text:tab/>FMT : STRING (Vorgabe für Ausgangs Format)</text:p>
      <text:p text:style-name="P52"><text:tab/>FILL : STRING(1) (Füllzeichen)</text:p>
      <text:p text:style-name="P52"><text:tab/>LANG : INT (Sprachvorgabe)</text:p>
      <text:p text:style-name="P25"><draw:frame draw:style-name="fr4" draw:name="Grafik684" text:anchor-type="paragraph" svg:x="1.025cm" svg:y="0.676cm" svg:width="4.971cm" svg:height="2.919cm" draw:z-index="724"><draw:image xlink:href="Pictures/1000000000000178000000DDB59A5580.png" xlink:type="simple" xlink:show="embed" xlink:actuate="onLoad"/></draw:frame>Output<text:tab/>STRING(32) (Ergebnis <text:span text:style-name="T16">String</text:span>)</text:p>
      <text:p text:style-name="P55"><text:line-break/>DT_TO_STRF konvertiert einen DATETIME Wert in eine f<text:span text:style-name="T24">ormatierte</text:span> Zeichenkette. Am Eingang DTI liegt der zu konvertierende DATETIME Wert an und mit der Zeichenkette FMT wird das entsprechende Ausgangsformat bestimmt. Der Eingang LANG bestimmt dabei die zu benutzende Sprache (0= LANGUAGE_DEFAULT, 1= Englisch und 2 = Deutsch). Die Spracheinstellungen werden im entsprechenden Absatz der Globalen Konstanten vorgenommen und können dort angepasst oder Erweitert werden. Zusätzlich zu Datum und Zeit können am Eingang MS auch Millisekunden verarbeitet werden.</text:p>
      <text:p text:style-name="P55">Die erzeugte Zeichenkette entspricht der Zeichenkette FMT wobei in der Zeichenkette alle Zeichen '#' gefolgt von einem Großbuchstaben mit dem entsprechenden Wert ersetzt werden. Die folgende Tabelle definiert die Formatierungszeichen:</text:p>
      <table:table table:name="Tabelle41" table:style-name="Tabelle41">
        <table:table-column table:style-name="Tabelle41.A"/>
        <table:table-column table:style-name="Tabelle41.B"/>
        <table:table-row>
          <table:table-cell table:style-name="Tabelle41.A1" office:value-type="string">
            <text:p text:style-name="P106">#A</text:p>
          </table:table-cell>
          <table:table-cell table:style-name="Tabelle41.B1" office:value-type="string">
            <text:p text:style-name="P106">Jahreszahl mit 4 Stellen (2008)</text:p>
          </table:table-cell>
        </table:table-row>
        <table:table-row>
          <table:table-cell table:style-name="Tabelle41.A2" office:value-type="string">
            <text:p text:style-name="P106">#B</text:p>
          </table:table-cell>
          <table:table-cell table:style-name="Tabelle41.B2" office:value-type="string">
            <text:p text:style-name="P106">Jahreszahl 2-Stellig z.B. (08)</text:p>
          </table:table-cell>
        </table:table-row>
        <table:table-row>
          <table:table-cell table:style-name="Tabelle41.A2" office:value-type="string">
            <text:p text:style-name="P106">#C</text:p>
          </table:table-cell>
          <table:table-cell table:style-name="Tabelle41.B2" office:value-type="string">
            <text:p text:style-name="P106">Monat 1-2 Stellig (1,12)</text:p>
          </table:table-cell>
        </table:table-row>
        <table:table-row>
          <table:table-cell table:style-name="Tabelle41.A2" office:value-type="string">
            <text:p text:style-name="P106">#D</text:p>
          </table:table-cell>
          <table:table-cell table:style-name="Tabelle41.B2" office:value-type="string">
            <text:p text:style-name="P106">Monat 2 Stellig (01, 12) die 0 oder ein anders Zeichen muss am Eingang FILL anliegen.</text:p>
          </table:table-cell>
        </table:table-row>
        <table:table-row>
          <table:table-cell table:style-name="Tabelle41.A2" office:value-type="string">
            <text:p text:style-name="P106">#E</text:p>
          </table:table-cell>
          <table:table-cell table:style-name="Tabelle41.B2" office:value-type="string">
            <text:p text:style-name="P106">Monat 3 Buchstaben (Jan) </text:p>
          </table:table-cell>
        </table:table-row>
        <table:table-row>
          <table:table-cell table:style-name="Tabelle41.A2" office:value-type="string">
            <text:p text:style-name="P106">#F</text:p>
          </table:table-cell>
          <table:table-cell table:style-name="Tabelle41.B2" office:value-type="string">
            <text:p text:style-name="P106">Monat ausgeschrieben (Januar)</text:p>
          </table:table-cell>
        </table:table-row>
        <table:table-row>
          <table:table-cell table:style-name="Tabelle41.A2" office:value-type="string">
            <text:p text:style-name="P106">#G</text:p>
          </table:table-cell>
          <table:table-cell table:style-name="Tabelle41.B2" office:value-type="string">
            <text:p text:style-name="P106">Tag 1 oder 2 stellig (1, 31)</text:p>
          </table:table-cell>
        </table:table-row>
        <table:table-row>
          <table:table-cell table:style-name="Tabelle41.A2" office:value-type="string">
            <text:p text:style-name="P106">#H</text:p>
          </table:table-cell>
          <table:table-cell table:style-name="Tabelle41.B2" office:value-type="string">
            <text:p text:style-name="P106">Tag 2 Stellig (01, 31) die 0 oder ein anders Zeichen muss am Eingang FILL anliegen.</text:p>
          </table:table-cell>
        </table:table-row>
        <table:table-row>
          <table:table-cell table:style-name="Tabelle41.A2" office:value-type="string">
            <text:p text:style-name="P106">#I</text:p>
          </table:table-cell>
          <table:table-cell table:style-name="Tabelle41.B2" office:value-type="string">
            <text:p text:style-name="P106">Wochentag als Zahl (1 = Montag, 7= Sonntag)</text:p>
          </table:table-cell>
        </table:table-row>
        <table:table-row>
          <table:table-cell table:style-name="Tabelle41.A2" office:value-type="string">
            <text:p text:style-name="P106">#J</text:p>
          </table:table-cell>
          <table:table-cell table:style-name="Tabelle41.B2" office:value-type="string">
            <text:p text:style-name="P106">Wochentag 2 Buchstaben (Mo)<text:soft-page-break/></text:p>
          </table:table-cell>
        </table:table-row>
        <table:table-row>
          <table:table-cell table:style-name="Tabelle41.A2" office:value-type="string">
            <text:p text:style-name="P106">#K</text:p>
          </table:table-cell>
          <table:table-cell table:style-name="Tabelle41.B2" office:value-type="string">
            <text:p text:style-name="P106">Wochentag ausgeschrieben (Montag)</text:p>
          </table:table-cell>
        </table:table-row>
        <table:table-row>
          <table:table-cell table:style-name="Tabelle41.A2" office:value-type="string">
            <text:p text:style-name="P106">#L</text:p>
          </table:table-cell>
          <table:table-cell table:style-name="Tabelle41.B2" office:value-type="string">
            <text:p text:style-name="P106">AM oder PM für Amerikanische Datumsformate</text:p>
          </table:table-cell>
        </table:table-row>
        <table:table-row>
          <table:table-cell table:style-name="Tabelle41.A2" office:value-type="string">
            <text:p text:style-name="P106">#M</text:p>
          </table:table-cell>
          <table:table-cell table:style-name="Tabelle41.B2" office:value-type="string">
            <text:p text:style-name="P106">Stunde in 24 Stunden Format 1 - 2 Stellig (0, 23)</text:p>
          </table:table-cell>
        </table:table-row>
        <table:table-row>
          <table:table-cell table:style-name="Tabelle41.A2" office:value-type="string">
            <text:p text:style-name="P106">#N</text:p>
          </table:table-cell>
          <table:table-cell table:style-name="Tabelle41.B2" office:value-type="string">
            <text:p text:style-name="P106">Stunde in 24 Stunden Format 2 Stellig (00, 23) die 0 oder ein anders Zeichen muss am Eingang FILL anliegen.</text:p>
          </table:table-cell>
        </table:table-row>
        <table:table-row>
          <table:table-cell table:style-name="Tabelle41.A2" office:value-type="string">
            <text:p text:style-name="P106">#O</text:p>
          </table:table-cell>
          <table:table-cell table:style-name="Tabelle41.B2" office:value-type="string">
            <text:p text:style-name="P106">Stunde in 12 Stunden Format 1 - 2 Stellig (1, 12)</text:p>
          </table:table-cell>
        </table:table-row>
        <table:table-row>
          <table:table-cell table:style-name="Tabelle41.A2" office:value-type="string">
            <text:p text:style-name="P106">#P</text:p>
          </table:table-cell>
          <table:table-cell table:style-name="Tabelle41.B2" office:value-type="string">
            <text:p text:style-name="P106">Stunde in 12 Stunden Format 2 Stellig (01, 12) die 0 oder ein anders Zeichen muss am Eingang FILL anliegen.</text:p>
          </table:table-cell>
        </table:table-row>
        <table:table-row>
          <table:table-cell table:style-name="Tabelle41.A2" office:value-type="string">
            <text:p text:style-name="P106">#Q</text:p>
          </table:table-cell>
          <table:table-cell table:style-name="Tabelle41.B2" office:value-type="string">
            <text:p text:style-name="P106">Minuten 1 - 2 Stellig (0, 59)</text:p>
          </table:table-cell>
        </table:table-row>
        <table:table-row>
          <table:table-cell table:style-name="Tabelle41.A2" office:value-type="string">
            <text:p text:style-name="P106">#R</text:p>
          </table:table-cell>
          <table:table-cell table:style-name="Tabelle41.B2" office:value-type="string">
            <text:p text:style-name="P106">Minuten 2 Stellig (00, 59) die 0 oder ein anders Zeichen muss am Eingang FILL anliegen.</text:p>
          </table:table-cell>
        </table:table-row>
        <table:table-row>
          <table:table-cell table:style-name="Tabelle41.A2" office:value-type="string">
            <text:p text:style-name="P106">#S</text:p>
          </table:table-cell>
          <table:table-cell table:style-name="Tabelle41.B2" office:value-type="string">
            <text:p text:style-name="P106">Sekunden 1 - 2 Stellig (0, 59)</text:p>
          </table:table-cell>
        </table:table-row>
        <table:table-row>
          <table:table-cell table:style-name="Tabelle41.A2" office:value-type="string">
            <text:p text:style-name="P106">#T</text:p>
          </table:table-cell>
          <table:table-cell table:style-name="Tabelle41.B2" office:value-type="string">
            <text:p text:style-name="P106">Sekunden 2 Stellig (00, 59) die 0 oder ein anders Zeichen muss am Eingang FILL anliegen.</text:p>
          </table:table-cell>
        </table:table-row>
        <table:table-row>
          <table:table-cell table:style-name="Tabelle41.A2" office:value-type="string">
            <text:p text:style-name="P106">#U</text:p>
          </table:table-cell>
          <table:table-cell table:style-name="Tabelle41.B2" office:value-type="string">
            <text:p text:style-name="P106">Millisekunden 1 - 3 Stellig (0, 999)</text:p>
          </table:table-cell>
        </table:table-row>
        <table:table-row>
          <table:table-cell table:style-name="Tabelle41.A2" office:value-type="string">
            <text:p text:style-name="P106">#V</text:p>
          </table:table-cell>
          <table:table-cell table:style-name="Tabelle41.B2" office:value-type="string">
            <text:p text:style-name="P106">Millisekunden 3 Stellig (000, 999) die 0 oder ein anders Zeichen muss am Eingang FILL anliegen.</text:p>
          </table:table-cell>
        </table:table-row>
        <table:table-row>
          <table:table-cell table:style-name="Tabelle41.A2" office:value-type="string">
            <text:p text:style-name="P106">#W</text:p>
          </table:table-cell>
          <table:table-cell table:style-name="Tabelle41.B2" office:value-type="string">
            <text:p text:style-name="P106">Tag 2 Stellig aber vorne mit Blank aufgefüllt (' 1' ..'31')</text:p>
          </table:table-cell>
        </table:table-row>
        <table:table-row>
          <table:table-cell table:style-name="Tabelle41.A2" office:value-type="string">
            <text:p text:style-name="P106">#X</text:p>
          </table:table-cell>
          <table:table-cell table:style-name="Tabelle41.B2" office:value-type="string">
            <text:p text:style-name="P106">Monat 2 Stellig aber vorne mit Blank aufgefüllt (' 1' ..'12')</text:p>
          </table:table-cell>
        </table:table-row>
      </table:table>
      <text:p text:style-name="P55"/>
      <text:p text:style-name="P55">Beispiele:</text:p>
      <text:p text:style-name="P55">DT_TO_STRF(DT#2008-1-1, 'Datum '#C. #F #A', 2) = '1. Januar 2008'</text:p>
      <text:p text:style-name="P55">DT_TO_STRF(DT#2008-1-1-13:43:12, '#J #M:#Q am #C. #E #A', 2) = </text:p>
      <text:p text:style-name="P55"><text:tab/>'Di 13:43 am 1. Jan 2008'</text:p>
      <text:list xml:id="list33653772" text:continue-numbering="true" text:style-name="L1">
        <text:list-item>
          <text:list>
            <text:list-item>
              <text:h text:style-name="P217" text:outline-level="2"><text:alphabetical-index-mark-start text:id="IMark100843576"/>DWORD_TO_STRB<text:alphabetical-index-mark-end text:id="IMark100843576"/></text:h>
            </text:list-item>
          </text:list>
        </text:list-item>
      </text:list>
      <text:p text:style-name="Standard">Type<text:tab/><text:span text:style-name="T46">Funktion</text:span> : STRING</text:p>
      <text:p text:style-name="P22"><text:span text:style-name="T28">Input</text:span><text:tab/>IN : DWORD (Eingangswert)</text:p>
      <text:p text:style-name="P25"><draw:frame draw:style-name="fr4" draw:name="Grafik303" text:anchor-type="paragraph" svg:x="1.074cm" svg:y="0.663cm" svg:width="6.77cm" svg:height="1.12cm" draw:z-index="279"><draw:image xlink:href="Pictures/100000000000020000000055A61AE4B1.png" xlink:type="simple" xlink:show="embed" xlink:actuate="onLoad"/></draw:frame>Output<text:tab/>STRING(32) (Ergebnis String)</text:p>
      <text:p text:style-name="P63"><text:soft-page-break/><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57">Beispiel:<text:tab/>DWORD_TO_STRB(127) = '00000000000000000000000001111111'</text:p>
      <text:list xml:id="list33625273" text:continue-numbering="true" text:style-name="L1">
        <text:list-item>
          <text:list>
            <text:list-item>
              <text:h text:style-name="P217" text:outline-level="2"><text:alphabetical-index-mark-start text:id="IMark100843576"/>DWORD_TO_STRF<text:alphabetical-index-mark-end text:id="IMark100843576"/></text:h>
            </text:list-item>
          </text:list>
        </text:list-item>
      </text:list>
      <text:p text:style-name="P22">Type<text:tab/>Funktion : STRING</text:p>
      <text:p text:style-name="P22"><text:span text:style-name="T16">Input</text:span><text:tab/>IN : DWORD (Eingangswert)</text:p>
      <text:p text:style-name="P52"><text:tab/>N : Int (Länge des Ergebnis Strings)</text:p>
      <text:p text:style-name="P25"><draw:frame draw:style-name="fr4" draw:name="Grafik230" text:anchor-type="paragraph" svg:x="1.092cm" svg:y="0.691cm" svg:width="6.77cm" svg:height="1.57cm" draw:z-index="203"><draw:image xlink:href="Pictures/100000000000020000000077F00DC735.png" xlink:type="simple" xlink:show="embed" xlink:actuate="onLoad"/></draw:frame>Output<text:tab/>STRING (Ergebnis String)</text:p>
      <text:p text:style-name="P64"><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78"><text:line-break/>Beispiel:<text:tab/>DWORD_TO_STRF(5123, 6) = '005123'<text:line-break/><text:tab/>DWORD_TO_STRF(5123, 3) = '123'</text:p>
      <text:p text:style-name="P78"/>
      <text:p text:style-name="P78"/>
      <text:list xml:id="list33629220" text:continue-numbering="true" text:style-name="L1">
        <text:list-item>
          <text:list>
            <text:list-item>
              <text:h text:style-name="P217" text:outline-level="2"><text:soft-page-break/><text:alphabetical-index-mark-start text:id="IMark100843576"/>DWORD_TO_STRH<text:alphabetical-index-mark-end text:id="IMark100843576"/></text:h>
            </text:list-item>
          </text:list>
        </text:list-item>
      </text:list>
      <text:p text:style-name="Standard">Type<text:tab/><text:span text:style-name="T46">Funktion</text:span> : STRING</text:p>
      <text:p text:style-name="P22"><text:span text:style-name="T16">Input</text:span><text:tab/>IN : DWORD (Eingangswert)</text:p>
      <text:p text:style-name="P25"><draw:frame draw:style-name="fr4" draw:name="Grafik304" text:anchor-type="paragraph" svg:x="0.982cm" svg:y="0.642cm" svg:width="6.77cm" svg:height="1.12cm" draw:z-index="278"><draw:image xlink:href="Pictures/100000000000020000000055CC4855F7.png" xlink:type="simple" xlink:show="embed" xlink:actuate="onLoad"/></draw:frame>Output<text:tab/>STRING(8) (Ergebnis <text:span text:style-name="T16">String</text:span>)</text:p>
      <text:p text:style-name="P64"><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59">Beispiel:<text:tab/>DWORD_TO_STRH(127) = '0000007F'</text:p>
      <text:list xml:id="list33627542" text:continue-numbering="true" text:style-name="L1">
        <text:list-item>
          <text:list>
            <text:list-item>
              <text:h text:style-name="P217" text:outline-level="2"><text:alphabetical-index-mark-start text:id="IMark100843576"/>EXEC<text:alphabetical-index-mark-end text:id="IMark100843576"/></text:h>
            </text:list-item>
          </text:list>
        </text:list-item>
      </text:list>
      <text:p text:style-name="P22">Type<text:tab/>Funktion : STRING</text:p>
      <text:p text:style-name="P22"><text:span text:style-name="T16">Input</text:span><text:tab/>STR : STRING (Eingabe STRING)</text:p>
      <text:p text:style-name="P25"><draw:frame draw:style-name="fr4" draw:name="Grafik43" text:anchor-type="paragraph" svg:x="1.087cm" svg:y="0.684cm" svg:width="2.281cm" svg:height="1.12cm" draw:z-index="31"><draw:image xlink:href="Pictures/10000000000000AC00000055753EEDAC.png" xlink:type="simple" xlink:show="embed" xlink:actuate="onLoad"/></draw:frame>Output<text:tab/>STRING (Ergebnis STRING)</text:p>
      <text:p text:style-name="P25">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25">Die zulässigen Operatoren sind:<text:tab/>+, - *, /, ^, SIN, COS, TAN, SQRT.</text:p>
      <text:p text:style-name="P25">Als Zahlen sind REAL und Integer-Zahlen zulässig.</text:p>
      <text:p text:style-name="P25">Beispiel:<text:tab/>EXEC('3^2') = '9'</text:p>
      <text:p text:style-name="P25"><text:tab/>EXEC('4-2') = '2'</text:p>
      <text:list xml:id="list33633889" text:continue-numbering="true" text:style-name="L1">
        <text:list-item>
          <text:list>
            <text:list-item>
              <text:h text:style-name="P217" text:outline-level="2"><text:soft-page-break/><text:alphabetical-index-mark-start text:id="IMark100843576"/>FILL<text:alphabetical-index-mark-end text:id="IMark100843576"/></text:h>
            </text:list-item>
          </text:list>
        </text:list-item>
      </text:list>
      <text:p text:style-name="P22">Type<text:tab/>Funktion : STRING</text:p>
      <text:p text:style-name="P22"><text:span text:style-name="T16">Input</text:span><text:tab/>C : BYTE (<text:span text:style-name="T16">Character</text:span> Code)</text:p>
      <text:p text:style-name="P52"><text:tab/>L : INT (Länge der Zeichenkette)</text:p>
      <text:p text:style-name="P25"><draw:frame draw:style-name="fr4" draw:name="Grafik537" text:anchor-type="paragraph" svg:x="1.069cm" svg:y="0.688cm" svg:width="2.281cm" svg:height="1.57cm" draw:z-index="546"><draw:image xlink:href="Pictures/10000000000000AC00000077A47A6952.png" xlink:type="simple" xlink:show="embed" xlink:actuate="onLoad"/></draw:frame>Output<text:tab/>STRING (Ergebnis STRING)</text:p>
      <text:p text:style-name="P55"><text:line-break/>FILL erzeugt eine Zeichenkette bestehend aus dem Zeichen C mit der Länge L.</text:p>
      <text:p text:style-name="P55">FILL(49,5) = '11111'</text:p>
      <text:p text:style-name="P55">Die Funktion FILL wertet auch die Globale Setup Konstante STRING_LENGTH aus und begrenzt die maximale Länge L der Zeichenkette auf STRING_LENGTH.</text:p>
      <text:list xml:id="list33630243" text:continue-numbering="true" text:style-name="L1">
        <text:list-item>
          <text:list>
            <text:list-item>
              <text:h text:style-name="P217" text:outline-level="2"><text:alphabetical-index-mark-start text:id="IMark100843576"/>FIND_CHAR<text:alphabetical-index-mark-end text:id="IMark100843576"/></text:h>
            </text:list-item>
          </text:list>
        </text:list-item>
      </text:list>
      <text:p text:style-name="P22">Type<text:tab/>Funktion : INT</text:p>
      <text:p text:style-name="P52"><text:span text:style-name="T16">Input</text:span><text:tab/>STR : STRING (Eingabe STRING)</text:p>
      <text:p text:style-name="P52"><text:tab/>POS : INT (Startposition)</text:p>
      <text:p text:style-name="P25"><draw:frame draw:style-name="fr4" draw:name="Grafik485" text:anchor-type="paragraph" svg:x="1.023cm" svg:y="0.614cm" svg:width="4.09cm" svg:height="1.39cm" draw:z-index="489"><draw:image xlink:href="Pictures/1000000000000135000000699422C29F.png" xlink:type="simple" xlink:show="embed" xlink:actuate="onLoad"/></draw:frame>Output<text:tab/>INT (Position des ersten Zeichens das kein Steuerzeichen ist)</text:p>
      <text:p text:style-name="P55"><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xml:id="list33651776" text:continue-numbering="true" text:style-name="L1">
        <text:list-item>
          <text:list>
            <text:list-item>
              <text:h text:style-name="P217" text:outline-level="2"><text:soft-page-break/><text:alphabetical-index-mark-start text:id="IMark100843576"/>FIND_CTRL<text:alphabetical-index-mark-end text:id="IMark100843576"/></text:h>
            </text:list-item>
          </text:list>
        </text:list-item>
      </text:list>
      <text:p text:style-name="P22">Type<text:tab/>Funktion : INT</text:p>
      <text:p text:style-name="P52"><text:span text:style-name="T16">Input</text:span><text:tab/>STR : STRING (Eingabe STRING)</text:p>
      <text:p text:style-name="P52"><text:tab/>POS : INT (Startposition)</text:p>
      <text:p text:style-name="P25"><draw:frame draw:style-name="fr4" draw:name="Grafik486" text:anchor-type="paragraph" svg:x="1.046cm" svg:y="0.667cm" svg:width="4.09cm" svg:height="1.39cm" draw:z-index="490"><draw:image xlink:href="Pictures/100000000000013500000069E528D1A3.png" xlink:type="simple" xlink:show="embed" xlink:actuate="onLoad"/></draw:frame>Output<text:tab/>INT (Position des ersten Zeichens das ein Steuerzeichen ist)</text:p>
      <text:p text:style-name="P25"><text:line-break/>FIND_CTRL durchsucht die Zeichenkette STR ab der Position POS und gibt die Position zurück an der das nächste Steuerzeichen steht. Steuerzeichen sind alle Zeichen deren Wert kleiner 32 oder 127 ist.</text:p>
      <text:list xml:id="list33630918" text:continue-numbering="true" text:style-name="L1">
        <text:list-item>
          <text:list>
            <text:list-item>
              <text:h text:style-name="P217" text:outline-level="2"><text:alphabetical-index-mark-start text:id="IMark100843576"/>FIND_NONUM<text:alphabetical-index-mark-end text:id="IMark100843576"/></text:h>
            </text:list-item>
          </text:list>
        </text:list-item>
      </text:list>
      <text:p text:style-name="P22">Type<text:tab/>Funktion : INT</text:p>
      <text:p text:style-name="P22"><text:span text:style-name="T16">Input</text:span><text:tab/>STR : STRING (Eingabestring)</text:p>
      <text:p text:style-name="P52"><text:tab/>POS : INT (Position an der die Suche beginnt)</text:p>
      <text:p text:style-name="P25"><draw:frame draw:style-name="fr4" draw:name="Grafik44" text:anchor-type="paragraph" svg:x="1.023cm" svg:y="0.667cm" svg:width="4.48cm" svg:height="1.39cm" draw:z-index="491"><draw:image xlink:href="Pictures/100000000000015300000069BB7FFC73.png" xlink:type="simple" xlink:show="embed" xlink:actuate="onLoad"/></draw:frame>Output<text:tab/>INT (Position des ersten Buchstaben, der keine Zahl oder Punkt ist)</text:p>
      <text:p text:style-name="P25"><text:line-break/>Die Funktion FIND_NONUM durchsucht STR ab der Startposition POS von links nach rechts und liefert die erste Stelle die keine Nummer ist zurück.</text:p>
      <text:p text:style-name="P25">Nummern sind die Buchstaben "0..9" und "."</text:p>
      <text:p text:style-name="P25">Beispiel:<text:tab/>FIND_NONUM('4+33',1) = 2</text:p>
      <text:p text:style-name="P55"/>
      <text:list xml:id="list33647068" text:continue-numbering="true" text:style-name="L1">
        <text:list-item>
          <text:list>
            <text:list-item>
              <text:h text:style-name="P217" text:outline-level="2"><text:soft-page-break/><text:alphabetical-index-mark-start text:id="IMark100843576"/>FIND_NUM<text:alphabetical-index-mark-end text:id="IMark100843576"/></text:h>
            </text:list-item>
          </text:list>
        </text:list-item>
      </text:list>
      <text:p text:style-name="P22">Type<text:tab/>Funktion : INT</text:p>
      <text:p text:style-name="P52"><text:span text:style-name="T16">Input</text:span><text:tab/>STR : STRING (Eingabestring)</text:p>
      <text:p text:style-name="P52"><text:tab/>POS : INT (Position an der die Suche beginnt)</text:p>
      <text:p text:style-name="P25"><draw:frame draw:style-name="fr4" draw:name="Grafik45" text:anchor-type="paragraph" svg:x="1.069cm" svg:y="0.667cm" svg:width="3.69cm" svg:height="1.39cm" draw:z-index="492"><draw:image xlink:href="Pictures/100000000000011700000069DBD267B1.png" xlink:type="simple" xlink:show="embed" xlink:actuate="onLoad"/></draw:frame>Output<text:tab/>INT (Position des ersten Buchstaben, der eine Zahl oder Punkt ist)</text:p>
      <text:p text:style-name="P25"><text:line-break/>Die Funktion FIND_NUM durchsucht STR ab der Position POS von links nach rechts und liefert die erste Stelle die eine Nummer ist zurück.</text:p>
      <text:p text:style-name="P25">Nummern sind die Buchstaben "0..9" und "."</text:p>
      <text:p text:style-name="P25">Beispiel:<text:tab/>FIND_NONUM('4+33',1) = 1</text:p>
      <text:list xml:id="list33631008" text:continue-numbering="true" text:style-name="L1">
        <text:list-item>
          <text:list>
            <text:list-item>
              <text:h text:style-name="P217" text:outline-level="2"><text:alphabetical-index-mark-start text:id="IMark100843576"/>FINDB<text:alphabetical-index-mark-end text:id="IMark100843576"/></text:h>
            </text:list-item>
          </text:list>
        </text:list-item>
      </text:list>
      <text:p text:style-name="P22">Type<text:tab/>Funktion : INT</text:p>
      <text:p text:style-name="P52"><text:span text:style-name="T16">Input</text:span><text:tab/>STR1 : STRING (Eingabestring)</text:p>
      <text:p text:style-name="P22"><text:tab/>STR2 : STRING (Suchstring)</text:p>
      <text:p text:style-name="P25"><draw:frame draw:style-name="fr4" draw:name="Grafik46" text:anchor-type="paragraph" svg:x="1.064cm" svg:y="0.686cm" svg:width="2.731cm" svg:height="1.57cm" draw:z-index="32"><draw:image xlink:href="Pictures/10000000000000CE000000771B8C3274.png" xlink:type="simple" xlink:show="embed" xlink:actuate="onLoad"/></draw:frame>Output<text:tab/>INT (Position des letzten Vorkommens von STR2 in STR1)</text:p>
      <text:p text:style-name="P25"><text:line-break/>Die Funktion FINDB durchsucht STR1 auf das Vorkommen von STR2 und liefert die letzte Position von STR2 in STR1 zurück.</text:p>
      <text:p text:style-name="P55">Falls STR2 nicht gefunden wird, wird eine 0 zurückgegeben.</text:p>
      <text:p text:style-name="P25">Beispiel:<text:tab/>FINDB('abs12fir12bus12', '12') = 14</text:p>
      <text:list xml:id="list33624198" text:continue-numbering="true" text:style-name="L1">
        <text:list-item>
          <text:list>
            <text:list-item>
              <text:h text:style-name="P217" text:outline-level="2"><text:soft-page-break/><text:alphabetical-index-mark-start text:id="IMark100843576"/>FINDB_NONUM<text:alphabetical-index-mark-end text:id="IMark100843576"/></text:h>
            </text:list-item>
          </text:list>
        </text:list-item>
      </text:list>
      <text:p text:style-name="P22">Type<text:tab/>Funktion : INT</text:p>
      <text:p text:style-name="P22"><text:span text:style-name="T16">Input</text:span><text:tab/>STR : STRING (Eingabestring)</text:p>
      <text:p text:style-name="P25"><draw:frame draw:style-name="fr4" draw:name="Grafik47" text:anchor-type="paragraph" svg:x="1.058cm" svg:y="0.679cm" svg:width="4.971cm" svg:height="1.12cm" draw:z-index="33"><draw:image xlink:href="Pictures/100000000000017800000055590B5D00.png" xlink:type="simple" xlink:show="embed" xlink:actuate="onLoad"/></draw:frame>Output<text:tab/>INT (Position des letzten Buchstaben, der keine Nummer ist)</text:p>
      <text:p text:style-name="P25"><text:line-break/>Die Funktion FINDB_NONUM durchsucht STR von rechts nach links und liefert die letzte Stelle die keine Nummer ist zurück.</text:p>
      <text:p text:style-name="P55">Nummern sind die Buchstaben "0..9" und ".".</text:p>
      <text:p text:style-name="P25">Beispiel:<text:tab/>FINDB_NONUM('4+33+1') = 5</text:p>
      <text:p text:style-name="P55"/>
      <text:list xml:id="list33633991" text:continue-numbering="true" text:style-name="L1">
        <text:list-item>
          <text:list>
            <text:list-item>
              <text:h text:style-name="P217" text:outline-level="2"><text:alphabetical-index-mark-start text:id="IMark100843576"/>FINDB_NUM<text:alphabetical-index-mark-end text:id="IMark100843576"/></text:h>
            </text:list-item>
          </text:list>
        </text:list-item>
      </text:list>
      <text:p text:style-name="P22">Type<text:tab/>Funktion : INT</text:p>
      <text:p text:style-name="P22"><text:span text:style-name="T16">Input</text:span><text:tab/>STR : STRING (Eingabestring)</text:p>
      <text:p text:style-name="P25"><draw:frame draw:style-name="fr4" draw:name="Grafik48" text:anchor-type="paragraph" svg:x="1.078cm" svg:y="0.644cm" svg:width="4.521cm" svg:height="1.12cm" draw:z-index="34"><draw:image xlink:href="Pictures/100000000000015600000055651EBE0A.png" xlink:type="simple" xlink:show="embed" xlink:actuate="onLoad"/></draw:frame>Output<text:tab/>INT (Position des letzten Buchstaben, der eine Zahl oder Punkt ist)</text:p>
      <text:p text:style-name="P25"><text:line-break/>Die Funktion FINDB_NUM durchsucht STR von Rechts nach links und liefert die letzte Stelle die eine Nummer ist.</text:p>
      <text:p text:style-name="P55">Nummern sind die Buchstaben "0..9" und ".".</text:p>
      <text:p text:style-name="P25">Beispiel:<text:tab/>FINDB_NUM('4+33+1hh') = 6</text:p>
      <text:p text:style-name="P55"/>
      <text:list xml:id="list33655537" text:continue-numbering="true" text:style-name="L1">
        <text:list-item>
          <text:list>
            <text:list-item>
              <text:h text:style-name="P217" text:outline-level="2"><text:soft-page-break/><text:alphabetical-index-mark-start text:id="IMark100843576"/>FINDP<text:alphabetical-index-mark-end text:id="IMark100843576"/></text:h>
            </text:list-item>
          </text:list>
        </text:list-item>
      </text:list>
      <text:p text:style-name="P22">Type<text:tab/>Funktion : INT</text:p>
      <text:p text:style-name="P22"><text:span text:style-name="T16">Input</text:span><text:tab/>STR : STRING (Eingabestring)</text:p>
      <text:p text:style-name="P52"><text:tab/>SRC : STRING (Suchstring)</text:p>
      <text:p text:style-name="P52"><text:tab/>POS : INT (Position ab der gesucht wird)</text:p>
      <text:p text:style-name="P25"><draw:frame draw:style-name="fr4" draw:name="Grafik445" text:anchor-type="paragraph" svg:x="1.002cm" svg:y="0.607cm" svg:width="3.18cm" svg:height="2.02cm" draw:z-index="447"><draw:image xlink:href="Pictures/10000000000000F0000000997833D160.png" xlink:type="simple" xlink:show="embed" xlink:actuate="onLoad"/></draw:frame>Output<text:tab/>INT (Position des ersten Buchstabens des gefundenen Strings SRC</text:p>
      <text:p text:style-name="P55"><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55">Beispiel: <text:tab/>FINDP('ein Fuchs ist ein Tier','ein',1) = 1;</text:p>
      <text:p text:style-name="P55"><text:tab/>FINDP('ein Fuchs ist ein Tier','ein',2) = 15;</text:p>
      <text:p text:style-name="P55"><text:tab/>FINDP('ein Fuchs ist ein Tier','ein',16) = 0;</text:p>
      <text:list xml:id="list33626921" text:continue-numbering="true" text:style-name="L1">
        <text:list-item>
          <text:list>
            <text:list-item>
              <text:h text:style-name="P217" text:outline-level="2"><text:alphabetical-index-mark-start text:id="IMark100843576"/>FIX<text:alphabetical-index-mark-end text:id="IMark100843576"/></text:h>
            </text:list-item>
          </text:list>
        </text:list-item>
      </text:list>
      <text:p text:style-name="P22">Type<text:tab/>Funktion : STRING</text:p>
      <text:p text:style-name="P22"><text:span text:style-name="T16">Input</text:span><text:tab/>STR : STRING (Eingabestring)</text:p>
      <text:p text:style-name="P52"><text:tab/>L : INT (feste Länge des Ausgabestrings)</text:p>
      <text:p text:style-name="P52"><text:tab/>C : BYTE (Füllzeichen beim Auffüllen)</text:p>
      <text:p text:style-name="P52"><text:tab/>M : INT (Mode zum Auffüllen)</text:p>
      <text:p text:style-name="P25"><draw:frame draw:style-name="fr4" draw:name="Grafik536" text:anchor-type="paragraph" svg:x="1.046cm" svg:y="0.658cm" svg:width="2.101cm" svg:height="2.18cm" draw:z-index="548"><draw:image xlink:href="Pictures/100000000000009F000000A512E9F5C6.png" xlink:type="simple" xlink:show="embed" xlink:actuate="onLoad"/></draw:frame>Output<text:tab/>STRING (Zeichenkette mit fester Länge N)</text:p>
      <text:p text:style-name="P55"><text:soft-page-break/>FIX erzeugt eine Zeichenkette mit fester Länge N. Die Zeichenkette STR 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xml:id="list33644572" text:continue-numbering="true" text:style-name="L1">
        <text:list-item>
          <text:list>
            <text:list-item>
              <text:h text:style-name="P217" text:outline-level="2"><text:alphabetical-index-mark-start text:id="IMark100843576"/>FLOAT_TO_REAL<text:alphabetical-index-mark-end text:id="IMark100843576"/></text:h>
            </text:list-item>
          </text:list>
        </text:list-item>
      </text:list>
      <text:p text:style-name="P22">Type<text:tab/>Funktion : REAL</text:p>
      <text:p text:style-name="P22"><text:span text:style-name="T16">Input</text:span><text:tab/>FLT : STRING(20) (Gleitkommazahl)</text:p>
      <text:p text:style-name="P55"><draw:frame draw:style-name="fr4" draw:name="Grafik650" text:anchor-type="paragraph" svg:x="1.046cm" svg:y="0.658cm" svg:width="5.669cm" svg:height="0.99cm" draw:z-index="668"><draw:image xlink:href="Pictures/10000000000001AD0000004BB638D73E.png" xlink:type="simple" xlink:show="embed" xlink:actuate="onLoad"/></draw:frame>Output<text:tab/>REAL (REAL Wert der Gleitkommazahl)</text:p>
      <text:p text:style-name="P55"><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list xml:id="list33627510" text:continue-numbering="true" text:style-name="L1">
        <text:list-item>
          <text:list>
            <text:list-item>
              <text:h text:style-name="P217" text:outline-level="2"><text:alphabetical-index-mark-start text:id="IMark100843576"/>FSTRING_TO_BYTE<text:alphabetical-index-mark-end text:id="IMark100843576"/></text:h>
            </text:list-item>
          </text:list>
        </text:list-item>
      </text:list>
      <text:p text:style-name="P22">Type<text:tab/>Funktion : BYTE</text:p>
      <text:p text:style-name="P22"><text:span text:style-name="T16">Input</text:span><text:tab/>IN : STRING(12) (Eingabestring)</text:p>
      <text:p text:style-name="P55"><draw:frame draw:style-name="fr4" draw:name="Grafik638" text:anchor-type="paragraph" svg:x="1.046cm" svg:y="0.665cm" svg:width="6.47cm" svg:height="0.99cm" draw:z-index="659"><draw:image xlink:href="Pictures/10000000000001E90000004BCD8DC171.png" xlink:type="simple" xlink:show="embed" xlink:actuate="onLoad"/></draw:frame>Output<text:tab/>BYTE (Byte Wert)</text:p>
      <text:p text:style-name="P55">FSTRING_TO_BYTE konvertiert eine formatierten Zeichenkette in einen Byte Wert. Es werden folgende Eingabeformate unterstützt:</text:p>
      <text:p text:style-name="P55">2#0101 (binär), 8#345 (oktal), 16#2a33 (hexadezimal) und 234 (dezimal).</text:p>
      <text:list xml:id="list33634839" text:continue-numbering="true" text:style-name="L1">
        <text:list-item>
          <text:list>
            <text:list-item>
              <text:h text:style-name="P217" text:outline-level="2"><text:soft-page-break/><text:alphabetical-index-mark-start text:id="IMark100843576"/>FSTRING_TO_DT<text:alphabetical-index-mark-end text:id="IMark100843576"/></text:h>
            </text:list-item>
          </text:list>
        </text:list-item>
      </text:list>
      <text:p text:style-name="P22">Type<text:tab/>Funktion : DT</text:p>
      <text:p text:style-name="P52"><text:span text:style-name="T16">Input</text:span><text:tab/>SDT : STRING(60) (Eingabestring)</text:p>
      <text:p text:style-name="P52"><text:tab/>FMT : STRING(60) (Formatierung)<text:tab/></text:p>
      <text:p text:style-name="P206"><draw:frame draw:style-name="fr4" draw:name="Grafik690" text:anchor-type="paragraph" svg:x="1.046cm" svg:y="0.667cm" svg:width="5.669cm" svg:height="1.39cm" draw:z-index="718"><draw:image xlink:href="Pictures/10000000000001AD0000006921359A14.png" xlink:type="simple" xlink:show="embed" xlink:actuate="onLoad"/></draw:frame>Output<text:tab/>DT (ermitteltes Datum und Uhrzeit)</text:p>
      <text:p text:style-name="P206"><text:line-break/>FSTRING_TO_DT konvertiert eine formatierte Zeichenkette in einen DATETIME Wert. Mithilfe der Zeichenkette FMT wird eine Formatierung zur Dekodierung vorgegeben. Das Zeichen '#' gefolgt von einem Buchstaben definiert die zu Dekodierende Information. </text:p>
      <table:table table:name="Tabelle45" table:style-name="Tabelle45">
        <table:table-column table:style-name="Tabelle45.A"/>
        <table:table-column table:style-name="Tabelle45.B"/>
        <table:table-row>
          <table:table-cell table:style-name="Tabelle45.A1" office:value-type="string">
            <text:p text:style-name="P106">#Y</text:p>
          </table:table-cell>
          <table:table-cell table:style-name="Tabelle45.B1" office:value-type="string">
            <text:p text:style-name="P106">Jahr in der Schreibweise 08 oder 2008</text:p>
          </table:table-cell>
        </table:table-row>
        <table:table-row>
          <table:table-cell table:style-name="Tabelle45.A2" office:value-type="string">
            <text:p text:style-name="P106">#M</text:p>
          </table:table-cell>
          <table:table-cell table:style-name="Tabelle45.B2" office:value-type="string">
            <text:p text:style-name="P106">Monat in der Schreibweise 01 oder 1</text:p>
          </table:table-cell>
        </table:table-row>
        <table:table-row>
          <table:table-cell table:style-name="Tabelle45.A2" office:value-type="string">
            <text:p text:style-name="P106">#N</text:p>
          </table:table-cell>
          <table:table-cell table:style-name="Tabelle45.B2" office:value-type="string">
            <text:p text:style-name="P106">Monat in der Schreibweise 'JAN' oder 'Januar' (Groß und Kleinschreibung wird ignoriert)</text:p>
          </table:table-cell>
        </table:table-row>
        <table:table-row>
          <table:table-cell table:style-name="Tabelle45.A2" office:value-type="string">
            <text:p text:style-name="P106">#D</text:p>
          </table:table-cell>
          <table:table-cell table:style-name="Tabelle45.B2" office:value-type="string">
            <text:p text:style-name="P106">Tag in der Schreibweise 01 oder 1</text:p>
          </table:table-cell>
        </table:table-row>
        <table:table-row>
          <table:table-cell table:style-name="Tabelle45.A2" office:value-type="string">
            <text:p text:style-name="P106">#h</text:p>
          </table:table-cell>
          <table:table-cell table:style-name="Tabelle45.B2" office:value-type="string">
            <text:p text:style-name="P106">Stunde in der Schreibweise 01 oder 1</text:p>
          </table:table-cell>
        </table:table-row>
        <table:table-row>
          <table:table-cell table:style-name="Tabelle45.A2" office:value-type="string">
            <text:p text:style-name="P106">#m</text:p>
          </table:table-cell>
          <table:table-cell table:style-name="Tabelle45.B2" office:value-type="string">
            <text:p text:style-name="P106">Minute in der Schreibweise 01 oder 1</text:p>
          </table:table-cell>
        </table:table-row>
        <table:table-row>
          <table:table-cell table:style-name="Tabelle45.A2" office:value-type="string">
            <text:p text:style-name="P106">#s</text:p>
          </table:table-cell>
          <table:table-cell table:style-name="Tabelle45.B2" office:value-type="string">
            <text:p text:style-name="P106">Sekunde in der Schreibweise 01 oder 1</text:p>
          </table:table-cell>
        </table:table-row>
      </table:table>
      <text:p text:style-name="P206">Beispiele:</text:p>
      <text:p text:style-name="P206">FSTRING_TO_DT('25. September 2008 um 10:01:00', '#D. #N #Y ** #h:#m:#s')</text:p>
      <text:p text:style-name="P206">FSTRING_TO_DT('13:14', '#h:#m')</text:p>
      <text:list xml:id="list33634987" text:continue-numbering="true" text:style-name="L1">
        <text:list-item>
          <text:list>
            <text:list-item>
              <text:h text:style-name="P217" text:outline-level="2"><text:alphabetical-index-mark-start text:id="IMark100843576"/>FSTRING_TO_DWORD<text:alphabetical-index-mark-end text:id="IMark100843576"/></text:h>
            </text:list-item>
          </text:list>
        </text:list-item>
      </text:list>
      <text:p text:style-name="P22">Type<text:tab/>Funktion : DWORD</text:p>
      <text:p text:style-name="P22"><text:span text:style-name="T16">Input</text:span><text:tab/>IN : STRING(40) (Eingabestring)<text:tab/></text:p>
      <text:p text:style-name="P55"><draw:frame draw:style-name="fr4" draw:name="Grafik639" text:anchor-type="paragraph" svg:x="1.023cm" svg:y="0.66cm" svg:width="6.47cm" svg:height="0.99cm" draw:z-index="660"><draw:image xlink:href="Pictures/10000000000001E90000004B25B79A21.png" xlink:type="simple" xlink:show="embed" xlink:actuate="onLoad"/></draw:frame>Output<text:tab/>DWORD (32bit Wert)</text:p>
      <text:p text:style-name="P55"><text:soft-page-break/><text:line-break/>FSTRING_TO_DWORD konvertiert eine formatierten Zeichenkette in einen 32bit <text:s/>Wert. Es werden folgende Eingabeformate unterstützt:</text:p>
      <text:p text:style-name="P55">2#0101 (binär), 8#345 (oktal), 16#2a33 (hexadezimal) und 234 (dezimal).</text:p>
      <text:list xml:id="list33650767" text:continue-numbering="true" text:style-name="L1">
        <text:list-item>
          <text:list>
            <text:list-item>
              <text:h text:style-name="P225" text:outline-level="2"><text:alphabetical-index-mark-start text:id="IMark100843576"/>FSTRING_TO_MONTH<text:alphabetical-index-mark-end text:id="IMark100843576"/></text:h>
            </text:list-item>
          </text:list>
        </text:list-item>
      </text:list>
      <text:p text:style-name="P22">Type<text:tab/>Funktion : INT</text:p>
      <text:p text:style-name="P52"><text:span text:style-name="T16">Input</text:span><text:tab/>MTH : STRING(20) (Eingabestring)</text:p>
      <text:p text:style-name="P52"><text:tab/>LANG : INT (Sprachauswahl)<text:tab/></text:p>
      <text:p text:style-name="P206"><draw:frame draw:style-name="fr4" draw:name="Grafik689" text:anchor-type="paragraph" svg:x="1.046cm" svg:y="0.667cm" svg:width="6.47cm" svg:height="1.39cm" draw:z-index="717"><draw:image xlink:href="Pictures/10000000000001E9000000696DFF8DA7.png" xlink:type="simple" xlink:show="embed" xlink:actuate="onLoad"/></draw:frame>Output<text:tab/>INT (Monatszahl 1..12)</text:p>
      <text:p text:style-name="P206"><text:line-break/>FSTRING_TO_MONTH ermittelt aus einer Zeichenkette mit einem Monatsnamen oder Kürzel den Zahlenwert des Monats. Die Funktion kann als Eingang sowohl die Monatsnamen und Kürzel in verschiedenen Sprachen als auch eine Monatszahl verarbeiten.</text:p>
      <text:p text:style-name="P206">FSTRING_TO_MONTH(0,'Januar') = 1</text:p>
      <text:p text:style-name="P206">FSTRING_TO_MONTH(0,'Jan') = 1</text:p>
      <text:p text:style-name="P206">FSTRING_TO_MONTH(0,'11') = 11</text:p>
      <text:p text:style-name="P206">Der Eingang LANG selektiert die zu verwendende Sprache, wird LANG nicht belegt oder mit 0 belegt, so werden alle im System definierten Sprachen geprüft.</text:p>
      <text:list xml:id="list33651008" text:continue-numbering="true" text:style-name="L1">
        <text:list-item>
          <text:list>
            <text:list-item>
              <text:h text:style-name="P226" text:outline-level="2"><text:alphabetical-index-mark-start text:id="IMark100843576"/>FSTRING_TO_WEEK<text:alphabetical-index-mark-end text:id="IMark100843576"/></text:h>
            </text:list-item>
          </text:list>
        </text:list-item>
      </text:list>
      <text:p text:style-name="P22">Type<text:tab/>Funktion : BYTE</text:p>
      <text:p text:style-name="P22"><text:span text:style-name="T16">Input</text:span><text:tab/>WDAY : STRING(60) (Eingabestring)<text:tab/></text:p>
      <text:p text:style-name="P55"><draw:frame draw:style-name="fr4" draw:name="Grafik643" text:anchor-type="paragraph" svg:x="1.046cm" svg:y="0.69cm" svg:width="6.47cm" svg:height="0.99cm" draw:z-index="664"><draw:image xlink:href="Pictures/10000000000001E90000004B95327156.png" xlink:type="simple" xlink:show="embed" xlink:actuate="onLoad"/></draw:frame>Output<text:tab/>BYTE (Bitpattern der Wochentage)</text:p>
      <text:p text:style-name="P55"><text:soft-page-break/><text:line-break/>FSTRING_TO_WEEK dekodiert eine Liste von Wochentagen in der Form 'MO' in ein Bitpattern (Bit6 = MO...Bit0 = So). Für die Auswertung werden jeweils die ersten beiden Buchstaben der Listenelemente ausgewertet, alle folgenden werden ignoriert. Falls die Zeichenkette Leerzeichen enthält werden diese entfernt. Die Wochentage können sowohl in englischer als auch deutscher Schreibweise vorliegen. Auch Groß- Klein- Schreibung spielt keine Rolle.</text:p>
      <text:p text:style-name="P55">Mo = 1; Di, Tu = 2; We, Mi = 3; Th, Do = 4; Fr = 5; Sa = 6; So, Su = 7</text:p>
      <text:p text:style-name="P55">Da die Funktion nur die ersten beiden Zeichen auswertet, können die Wochentage auch in ausgeschriebener Form (Montag) vorliegen.</text:p>
      <text:p text:style-name="P55">Als alternative Form kann der Wochentag auch als Zahl 1..7 angegeben werden.</text:p>
      <text:p text:style-name="P55">Die Liste enthält die einzelnen Wochentage unsortiert mit Komma getrennt.</text:p>
      <text:p text:style-name="P55">FSTRING_TO_WEEK('Mo,Di,Sa') = 2#01100010.</text:p>
      <text:list xml:id="list33628444" text:continue-numbering="true" text:style-name="L1">
        <text:list-item>
          <text:list>
            <text:list-item>
              <text:h text:style-name="P217" text:outline-level="2"><text:alphabetical-index-mark-start text:id="IMark100843576"/>FSTRING_TO_WEEKDAY<text:alphabetical-index-mark-end text:id="IMark100843576"/></text:h>
            </text:list-item>
          </text:list>
        </text:list-item>
      </text:list>
      <text:p text:style-name="P22">Type<text:tab/>Funktion : INT</text:p>
      <text:p text:style-name="P22"><text:span text:style-name="T16">Input</text:span><text:tab/>WDAY : STRING(20) (Eingabestring)<text:tab/></text:p>
      <text:p text:style-name="P55"><draw:frame draw:style-name="fr4" draw:name="Grafik642" text:anchor-type="paragraph" svg:x="1.046cm" svg:y="0.667cm" svg:width="7.26cm" svg:height="0.99cm" draw:z-index="663"><draw:image xlink:href="Pictures/10000000000002250000004BEBC2B313.png" xlink:type="simple" xlink:show="embed" xlink:actuate="onLoad"/></draw:frame>Output<text:tab/>INT (Wochentag)</text:p>
      <text:p text:style-name="P55"><text:line-break/>FSTRING_TO_WEEKDAY dekodiert eine Wochentag in der Form 'MO' in einen Integer, 1 = MO...7= So. Für die Auswertung werden die ersten beiden Buchstaben der Zeichenkette WDAY ausgewertet, alle folgenden werden ignoriert. Falls die Zeichenkette Leerzeichen enthält werden diese entfernt. Die Wochentage können sowohl in englischer als auch deutscher Schreibweise vorliegen. Auch Groß- Klein- Schreibung spielt keine Rolle.</text:p>
      <text:p text:style-name="P55">Mo = 1; Di, Tu = 2; We, Mi = 3; Th, Do = 4; Fr = 5; Sa = 6; So, Su = 7</text:p>
      <text:p text:style-name="P55">Da die Funktion nur die ersten beiden Zeichen auswertet, können die Wochentage auch in ausgeschriebener Form (Montag) vorliegen.</text:p>
      <text:p text:style-name="P55">Als alternative Form kann der Wochentag auch als Zahl 1..7 angegeben werden.</text:p>
      <text:list xml:id="list33644808" text:continue-numbering="true" text:style-name="L1">
        <text:list-item>
          <text:list>
            <text:list-item>
              <text:h text:style-name="P217" text:outline-level="2"><text:soft-page-break/><text:alphabetical-index-mark-start text:id="IMark100843576"/>HEX_TO_BYTE<text:alphabetical-index-mark-end text:id="IMark100843576"/></text:h>
            </text:list-item>
          </text:list>
        </text:list-item>
      </text:list>
      <text:p text:style-name="P22">Type<text:tab/>Funktion : BYTE</text:p>
      <text:p text:style-name="P22"><text:span text:style-name="T16">Input</text:span><text:tab/>HEX : STRING(5) (Hexadezimale Zeichenkette)</text:p>
      <text:p text:style-name="P25"><draw:frame draw:style-name="fr4" draw:name="Grafik633" text:anchor-type="paragraph" svg:x="1.067cm" svg:y="0.69cm" svg:width="4.881cm" svg:height="0.99cm" draw:z-index="654"><draw:image xlink:href="Pictures/10000000000001710000004BF5CC0D7B.png" xlink:type="simple" xlink:show="embed" xlink:actuate="onLoad"/></draw:frame>Output<text:tab/>BYTE (Ausgangswert)</text:p>
      <text:p text:style-name="P25"><text:line-break/>Die Funktion HEX_TO_BYTE konvertiert eine hexadezimale Zeichenkette in einen BYTE Wert. Es werden dabei nur die hexadizimalen Zeichen sind '0'..'9', 'a..f' und 'A' .. 'F' interpretiert, alle anderen in HEX vorkommenden Zeichen werden ignoriert.</text:p>
      <text:p text:style-name="P55">Beispiel:<text:tab/>HEX_TO_BYTE('FF') ergibt 255.</text:p>
      <text:list xml:id="list33625224" text:continue-numbering="true" text:style-name="L1">
        <text:list-item>
          <text:list>
            <text:list-item>
              <text:h text:style-name="P217" text:outline-level="2"><text:alphabetical-index-mark-start text:id="IMark100843576"/>HEX_TO_DWORD<text:alphabetical-index-mark-end text:id="IMark100843576"/></text:h>
            </text:list-item>
          </text:list>
        </text:list-item>
      </text:list>
      <text:p text:style-name="P22">Type<text:tab/>Funktion : DWORD</text:p>
      <text:p text:style-name="P22"><text:span text:style-name="T16">Input</text:span><text:tab/>HEX : STRING(20) (Hexadezimale Zeichenkette)</text:p>
      <text:p text:style-name="P25"><draw:frame draw:style-name="fr4" draw:name="Grafik86" text:anchor-type="paragraph" svg:x="1.09cm" svg:y="0.623cm" svg:width="6.32cm" svg:height="1.12cm" draw:z-index="420"><draw:image xlink:href="Pictures/10000000000001DE00000055E28A6B99.png" xlink:type="simple" xlink:show="embed" xlink:actuate="onLoad"/></draw:frame>Output<text:tab/>DWORD (Ausgangswert)</text:p>
      <text:p text:style-name="P25"><text:line-break/>Die Funktion HEX_TO_DWORD konvertiert eine hexadezimale Zeichenkette in einen DWORD Wert. Es werden dabei nur die hexadizimalen Zeichen sind '0'..'9', 'a..f' und 'A' .. 'F' interpretiert, alle anderen in HEX vorkommenden Zeichen werden ignoriert.</text:p>
      <text:p text:style-name="P55">Beispiel:<text:tab/>HEX_TO_DWORD('FF') ergibt 255.</text:p>
      <text:p text:style-name="P55"/>
      <text:p text:style-name="P55"/>
      <text:list xml:id="list33624896" text:continue-numbering="true" text:style-name="L1">
        <text:list-item>
          <text:list>
            <text:list-item>
              <text:h text:style-name="P217" text:outline-level="2"><text:soft-page-break/><text:alphabetical-index-mark-start text:id="IMark100843576"/>IS_ALNUM<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488" text:anchor-type="paragraph" svg:x="1.09cm" svg:y="0.667cm" svg:width="4.069cm" svg:height="1.12cm" draw:z-index="494"><draw:image xlink:href="Pictures/1000000000000134000000556D05044D.png" xlink:type="simple" xlink:show="embed" xlink:actuate="onLoad"/></draw:frame>Output<text:tab/>BOOL (TRUE wenn STR nur Buchstaben oder Zahlen enthält)</text:p>
      <text:p text:style-name="P55"><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3632955" text:continue-numbering="true" text:style-name="L1">
        <text:list-item>
          <text:list>
            <text:list-item>
              <text:h text:style-name="P217" text:outline-level="2"><text:alphabetical-index-mark-start text:id="IMark100843576"/>IS_ALPHA<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489" text:anchor-type="paragraph" svg:x="1.046cm" svg:y="0.69cm" svg:width="4.069cm" svg:height="1.12cm" draw:z-index="495"><draw:image xlink:href="Pictures/100000000000013400000055619B408E.png" xlink:type="simple" xlink:show="embed" xlink:actuate="onLoad"/></draw:frame>Output<text:tab/>BOOL (TRUE wenn STR nur Buchstaben enthält)</text:p>
      <text:p text:style-name="P55"><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36557741" text:continue-numbering="true" text:style-name="L1">
        <text:list-item>
          <text:list>
            <text:list-item>
              <text:h text:style-name="P217" text:outline-level="2"><text:soft-page-break/><text:alphabetical-index-mark-start text:id="IMark100843576"/>IS_CC<text:alphabetical-index-mark-end text:id="IMark100843576"/></text:h>
            </text:list-item>
          </text:list>
        </text:list-item>
      </text:list>
      <text:p text:style-name="P22">Type<text:tab/>Funktion : BOOL</text:p>
      <text:p text:style-name="P52"><text:span text:style-name="T16">Input</text:span><text:tab/>STR : STRING (Eingabestring)</text:p>
      <text:p text:style-name="P52"><text:tab/>CMP : STRING (Vergleichszeichen)</text:p>
      <text:p text:style-name="P25">Output<text:tab/>BOOL (TRUE wenn STR nur die im STRING CMP aufgelisteten Zeichen</text:p>
      <text:p text:style-name="P55"><draw:frame draw:style-name="fr4" draw:name="Grafik527" text:anchor-type="paragraph" svg:x="1.002cm" svg:y="0.656cm" svg:width="2.799cm" svg:height="1.39cm" draw:z-index="537"><draw:image xlink:href="Pictures/10000000000000D4000000697912B531.png" xlink:type="simple" xlink:show="embed" xlink:actuate="onLoad"/></draw:frame><text:tab/><text:tab/>enthält)</text:p>
      <text:p text:style-name="P55"><text:line-break/>IS_CC testet ob in der Zeichenkette STR nur die in STR aufgelisteten Zeichen enthalten sind. Wird ein anderes Zeichen gefunden gibt die Funktion FALSE zurück.</text:p>
      <text:p text:style-name="P55">Beipiele:</text:p>
      <text:p text:style-name="P55">IS_CC('3.14', '0123456789.') = TRUE</text:p>
      <text:p text:style-name="P55">IS_CC('-3.14', '0123456789.') = FALSE</text:p>
      <text:list xml:id="list33651319" text:continue-numbering="true" text:style-name="L1">
        <text:list-item>
          <text:list>
            <text:list-item>
              <text:h text:style-name="P217" text:outline-level="2"><text:alphabetical-index-mark-start text:id="IMark100843576"/>IS_CTRL<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490" text:anchor-type="paragraph" svg:x="1.069cm" svg:y="0.688cm" svg:width="3.62cm" svg:height="1.12cm" draw:z-index="496"><draw:image xlink:href="Pictures/100000000000011200000055E8D98E47.png" xlink:type="simple" xlink:show="embed" xlink:actuate="onLoad"/></draw:frame>Output<text:tab/>BOOL (TRUE wenn STR nur Kontrollzeichen enthält)</text:p>
      <text:p text:style-name="P55"><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xml:id="list33627815" text:continue-numbering="true" text:style-name="L1">
        <text:list-item>
          <text:list>
            <text:list-item>
              <text:h text:style-name="P217" text:outline-level="2"><text:soft-page-break/><text:alphabetical-index-mark-start text:id="IMark100843576"/>IS_HEX<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526" text:anchor-type="paragraph" svg:x="1.023cm" svg:y="0.688cm" svg:width="3.18cm" svg:height="1.12cm" draw:z-index="533"><draw:image xlink:href="Pictures/10000000000000F000000055D6C68C48.png" xlink:type="simple" xlink:show="embed" xlink:actuate="onLoad"/></draw:frame>Output<text:tab/>BOOL (TRUE wenn STR nur Hexadezimalzeichen enthält)</text:p>
      <text:p text:style-name="P55"><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xml:id="list33654896" text:continue-numbering="true" text:style-name="L1">
        <text:list-item>
          <text:list>
            <text:list-item>
              <text:h text:style-name="P217" text:outline-level="2"><text:alphabetical-index-mark-start text:id="IMark100843576"/>IS_LOWER<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491" text:anchor-type="paragraph" svg:x="1.023cm" svg:y="0.667cm" svg:width="4.521cm" svg:height="1.12cm" draw:z-index="497"><draw:image xlink:href="Pictures/100000000000015600000055767DE41F.png" xlink:type="simple" xlink:show="embed" xlink:actuate="onLoad"/></draw:frame>Output<text:tab/>BOOL (TRUE wenn STR nur Kleinbuchstaben enthält)</text:p>
      <text:p text:style-name="P55"><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55"/>
      <text:list xml:id="list33625484" text:continue-numbering="true" text:style-name="L1">
        <text:list-item>
          <text:list>
            <text:list-item>
              <text:h text:style-name="P217" text:outline-level="2"><text:soft-page-break/><text:alphabetical-index-mark-start text:id="IMark100843576"/>IS_NCC<text:alphabetical-index-mark-end text:id="IMark100843576"/></text:h>
            </text:list-item>
          </text:list>
        </text:list-item>
      </text:list>
      <text:p text:style-name="P22">Type<text:tab/>Funktion : BOOL</text:p>
      <text:p text:style-name="P52"><text:span text:style-name="T16">Input</text:span><text:tab/>STR : STRING (Eingabestring)</text:p>
      <text:p text:style-name="P52"><text:tab/>CMP : STRING (Vergleichszeichen)</text:p>
      <text:p text:style-name="P25">Output<text:tab/>BOOL (TRUE wenn STR keine der im STRING CMP aufgelisteten</text:p>
      <text:p text:style-name="P55"><draw:frame draw:style-name="fr4" draw:name="Grafik528" text:anchor-type="paragraph" svg:x="1.023cm" svg:y="0.864cm" svg:width="3.2cm" svg:height="1.39cm" draw:z-index="538"><draw:image xlink:href="Pictures/10000000000000F2000000697D657483.png" xlink:type="simple" xlink:show="embed" xlink:actuate="onLoad"/></draw:frame><text:tab/><text:tab/>Zeichen enthält)</text:p>
      <text:p text:style-name="P55"><text:line-break/>IS_NCC testet ob in der Zeichenkette STR keine der in STR aufgelisteten Zeichen enthalten sind. Wird ein Zeichen aus CMP in STR gefunden gibt die Funktion FALSE zurück.</text:p>
      <text:p text:style-name="P55">Beipiele:</text:p>
      <text:p text:style-name="P55">IS_NCC('3.14', ',-+()') = TRUE</text:p>
      <text:p text:style-name="P55">IS_NCC('-3.14', ',-+()') = FALSE</text:p>
      <text:list xml:id="list33646230" text:continue-numbering="true" text:style-name="L1">
        <text:list-item>
          <text:list>
            <text:list-item>
              <text:h text:style-name="P217" text:outline-level="2"><text:alphabetical-index-mark-start text:id="IMark100843576"/>IS_NUM<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492" text:anchor-type="paragraph" svg:x="1.046cm" svg:y="0.69cm" svg:width="3.62cm" svg:height="1.12cm" draw:z-index="498"><draw:image xlink:href="Pictures/100000000000011200000055D9988034.png" xlink:type="simple" xlink:show="embed" xlink:actuate="onLoad"/></draw:frame>Output<text:tab/>BOOL (TRUE wenn STR keine Großbuchstaben enthält)</text:p>
      <text:p text:style-name="P55"><text:line-break/>IS_NUM testet ob in der Zeichenkette STR nur Zahlen enthalten sind. Wird ein anderes Zeichen gefunden gibt die Funktion FALSE zurück. Sind in STR nur Zahlen enthalten gibt die Funktion TRUE zurück. Zahlen sind die Zeichen 0..9.</text:p>
      <text:list xml:id="list33637216" text:continue-numbering="true" text:style-name="L1">
        <text:list-item>
          <text:list>
            <text:list-item>
              <text:h text:style-name="P217" text:outline-level="2"><text:soft-page-break/><text:alphabetical-index-mark-start text:id="IMark100843576"/>IS_UPPER<text:alphabetical-index-mark-end text:id="IMark100843576"/></text:h>
            </text:list-item>
          </text:list>
        </text:list-item>
      </text:list>
      <text:p text:style-name="P22">Type<text:tab/>Funktion : BOOL</text:p>
      <text:p text:style-name="P52"><text:span text:style-name="T16">Input</text:span><text:tab/>STR : STRING (Eingabestring)</text:p>
      <text:p text:style-name="P25"><draw:frame draw:style-name="fr4" draw:name="Grafik493" text:anchor-type="paragraph" svg:x="1.025cm" svg:y="0.683cm" svg:width="4.069cm" svg:height="1.12cm" draw:z-index="499"><draw:image xlink:href="Pictures/100000000000013400000055023FDEDA.png" xlink:type="simple" xlink:show="embed" xlink:actuate="onLoad"/></draw:frame>Output<text:tab/>BOOL (TRUE wenn STR nur Großbuchstaben enthält)</text:p>
      <text:p text:style-name="P55"><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3641098" text:continue-numbering="true" text:style-name="L1">
        <text:list-item>
          <text:list>
            <text:list-item>
              <text:h text:style-name="P217" text:outline-level="2"><text:alphabetical-index-mark-start text:id="IMark100843576"/>ISC_ALPHA<text:alphabetical-index-mark-end text:id="IMark100843576"/></text:h>
            </text:list-item>
          </text:list>
        </text:list-item>
      </text:list>
      <text:p text:style-name="P22">Type<text:tab/>Funktion : BOOL</text:p>
      <text:p text:style-name="P52"><text:span text:style-name="T16">Input</text:span><text:tab/>IN : BYTE (Zeichen)</text:p>
      <text:p text:style-name="P25"><draw:frame draw:style-name="fr4" draw:name="Grafik508" text:anchor-type="paragraph" svg:x="1.002cm" svg:y="0.669cm" svg:width="4.521cm" svg:height="1.12cm" draw:z-index="512"><draw:image xlink:href="Pictures/100000000000015600000055B18242AD.png" xlink:type="simple" xlink:show="embed" xlink:actuate="onLoad"/></draw:frame>Output<text:tab/>BOOL (TRUE IN ein Zeichen a..z, A..Z oder Umlaut ist))</text:p>
      <text:p text:style-name="P55"><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Standard">Die folgende <text:span text:style-name="T38">Tabelle</text:span> Erläutert die Codes: </text:p>
      <table:table table:name="Tabelle32" table:style-name="Tabelle32">
        <table:table-column table:style-name="Tabelle32.A"/>
        <table:table-column table:style-name="Tabelle32.B"/>
        <table:table-column table:style-name="Tabelle32.C"/>
        <text:soft-page-break/>
        <table:table-row table:style-name="Tabelle32.1">
          <table:table-cell table:style-name="Tabelle32.A1" office:value-type="string">
            <text:p text:style-name="P96">Code</text:p>
          </table:table-cell>
          <table:table-cell table:style-name="Tabelle32.A1" office:value-type="string">
            <text:p text:style-name="P96">EXTENDED_ASCII = TRUE</text:p>
          </table:table-cell>
          <table:table-cell table:style-name="Tabelle32.C1" office:value-type="string">
            <text:p text:style-name="P96">EXTENDED_ASCII = FASLE</text:p>
          </table:table-cell>
        </table:table-row>
        <table:table-row table:style-name="Tabelle32.1">
          <table:table-cell table:style-name="Tabelle32.A2" office:value-type="string">
            <text:p text:style-name="P96">0..64 </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65..90</text:p>
          </table:table-cell>
          <table:table-cell table:style-name="Tabelle32.A2" office:value-type="string">
            <text:p text:style-name="P96">TRUE</text:p>
          </table:table-cell>
          <table:table-cell table:style-name="Tabelle32.C2" office:value-type="string">
            <text:p text:style-name="P96">TRUE</text:p>
          </table:table-cell>
        </table:table-row>
        <table:table-row table:style-name="Tabelle32.1">
          <table:table-cell table:style-name="Tabelle32.A2" office:value-type="string">
            <text:p text:style-name="P96">91..96</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97..122</text:p>
          </table:table-cell>
          <table:table-cell table:style-name="Tabelle32.A2" office:value-type="string">
            <text:p text:style-name="P96">TRUE</text:p>
          </table:table-cell>
          <table:table-cell table:style-name="Tabelle32.C2" office:value-type="string">
            <text:p text:style-name="P96">TRUE</text:p>
          </table:table-cell>
        </table:table-row>
        <table:table-row table:style-name="Tabelle32.1">
          <table:table-cell table:style-name="Tabelle32.A2" office:value-type="string">
            <text:p text:style-name="P96">123..191</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192..214</text:p>
          </table:table-cell>
          <table:table-cell table:style-name="Tabelle32.A2" office:value-type="string">
            <text:p text:style-name="P96">TRUE</text:p>
          </table:table-cell>
          <table:table-cell table:style-name="Tabelle32.C2" office:value-type="string">
            <text:p text:style-name="P96">FALSE</text:p>
          </table:table-cell>
        </table:table-row>
        <table:table-row table:style-name="Tabelle32.1">
          <table:table-cell table:style-name="Tabelle32.A2" office:value-type="string">
            <text:p text:style-name="P96">215</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216..246</text:p>
          </table:table-cell>
          <table:table-cell table:style-name="Tabelle32.A2" office:value-type="string">
            <text:p text:style-name="P96">TRUE</text:p>
          </table:table-cell>
          <table:table-cell table:style-name="Tabelle32.C2" office:value-type="string">
            <text:p text:style-name="P96">FALSE</text:p>
          </table:table-cell>
        </table:table-row>
        <table:table-row table:style-name="Tabelle32.1">
          <table:table-cell table:style-name="Tabelle32.A2" office:value-type="string">
            <text:p text:style-name="P96">247</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248..255</text:p>
          </table:table-cell>
          <table:table-cell table:style-name="Tabelle32.A2" office:value-type="string">
            <text:p text:style-name="P96">TRUE</text:p>
          </table:table-cell>
          <table:table-cell table:style-name="Tabelle32.C2" office:value-type="string">
            <text:p text:style-name="P96">FALSE</text:p>
          </table:table-cell>
        </table:table-row>
      </table:table>
      <text:p text:style-name="P88"/>
      <text:list xml:id="list33633522" text:continue-numbering="true" text:style-name="L1">
        <text:list-item>
          <text:list>
            <text:list-item>
              <text:h text:style-name="P217" text:outline-level="2"><text:alphabetical-index-mark-start text:id="IMark100843576"/>ISC_CTRL<text:alphabetical-index-mark-end text:id="IMark100843576"/></text:h>
            </text:list-item>
          </text:list>
        </text:list-item>
      </text:list>
      <text:p text:style-name="P22">Type<text:tab/>Funktion : BOOL</text:p>
      <text:p text:style-name="P52"><text:span text:style-name="T16">Input</text:span><text:tab/>IN : BYTE (Zeichen)</text:p>
      <text:p text:style-name="P25"><draw:frame draw:style-name="fr4" draw:name="Grafik510" text:anchor-type="paragraph" svg:x="1.046cm" svg:y="0.667cm" svg:width="3.62cm" svg:height="1.12cm" draw:z-index="514"><draw:image xlink:href="Pictures/100000000000011200000055E8D98E47.png" xlink:type="simple" xlink:show="embed" xlink:actuate="onLoad"/></draw:frame>Output<text:tab/>BOOL (TRUE IN ein Zeichen 0..9 ist))</text:p>
      <text:p text:style-name="P55"><text:line-break/>ISC_CTRL testet ob ein Zeichen IN ein Kontrollzeichen ist, Ist IN ein Kontrollzeichen gibt die Funktion TRUE zurück, wenn nicht gibt die Funktion FALSE zurück. Kontrollzeichen sind alle Zeichen mit dem Code &lt; 32 oder 127.</text:p>
      <text:list xml:id="list33627345" text:continue-numbering="true" text:style-name="L1">
        <text:list-item>
          <text:list>
            <text:list-item>
              <text:h text:style-name="P217" text:outline-level="2"><text:alphabetical-index-mark-start text:id="IMark100843576"/>ISC_HEX<text:alphabetical-index-mark-end text:id="IMark100843576"/></text:h>
            </text:list-item>
          </text:list>
        </text:list-item>
      </text:list>
      <text:p text:style-name="P22">Type<text:tab/>Funktion : BOOL</text:p>
      <text:p text:style-name="P52"><text:span text:style-name="T16">Input</text:span><text:tab/>IN : BYTE (Zeichen)</text:p>
      <text:p text:style-name="P25"><draw:frame draw:style-name="fr4" draw:name="Grafik511" text:anchor-type="paragraph" svg:x="1.023cm" svg:y="0.688cm" svg:width="3.62cm" svg:height="1.12cm" draw:z-index="515"><draw:image xlink:href="Pictures/1000000000000112000000552E78F20B.png" xlink:type="simple" xlink:show="embed" xlink:actuate="onLoad"/></draw:frame>Output<text:tab/>BOOL (TRUE IN ein Zeichen 0..9 ist))</text:p>
      <text:p text:style-name="P55"><text:soft-page-break/><text:line-break/>ISC_HEX testet ob ein Zeichen IN ein Hexadezimales Zeichen ist, Ist IN ein Zeichen 0..9, A..F, a..f gibt die Funktion TRUE zurück, wenn nicht gibt die Funktion FALSE zurück.</text:p>
      <text:p text:style-name="P55">Die Zeichen 0..9 haben die Codes (48..57)</text:p>
      <text:p text:style-name="P55">Die Zeichen A..F haben die Codes (65..70)</text:p>
      <text:p text:style-name="P55">Die Zeichen a..f haben die Codes (97..102)</text:p>
      <text:list xml:id="list33635317" text:continue-numbering="true" text:style-name="L1">
        <text:list-item>
          <text:list>
            <text:list-item>
              <text:h text:style-name="P217" text:outline-level="2"><text:alphabetical-index-mark-start text:id="IMark100843576"/>ISC_LOWER<text:alphabetical-index-mark-end text:id="IMark100843576"/></text:h>
            </text:list-item>
          </text:list>
        </text:list-item>
      </text:list>
      <text:p text:style-name="P22">Type<text:tab/>Funktion : BOOL</text:p>
      <text:p text:style-name="P52"><text:span text:style-name="T16">Input</text:span><text:tab/>IN : BYTE (Zeichen)</text:p>
      <text:p text:style-name="P25"><draw:frame draw:style-name="fr4" draw:name="Grafik512" text:anchor-type="paragraph" svg:x="1.046cm" svg:y="0.667cm" svg:width="4.971cm" svg:height="1.12cm" draw:z-index="516"><draw:image xlink:href="Pictures/10000000000001780000005505F3C4A1.png" xlink:type="simple" xlink:show="embed" xlink:actuate="onLoad"/></draw:frame>Output<text:tab/>BOOL (TRUE IN ein Zeichen 0..9 ist))</text:p>
      <text:p text:style-name="P55"><text:line-break/>ISC_LOWER testet ob ein Zeichen IN ein Kleinbuchstabe ist, Ist IN ein Klein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193">Die folgende <text:span text:style-name="T38">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96">Code</text:p>
          </table:table-cell>
          <table:table-cell table:style-name="Tabelle33.A1" office:value-type="string">
            <text:p text:style-name="P96">EXTENDED_ASCII = TRUE</text:p>
          </table:table-cell>
          <table:table-cell table:style-name="Tabelle33.C1" office:value-type="string">
            <text:p text:style-name="P96">EXTENDED_ASCII = FASLE</text:p>
          </table:table-cell>
        </table:table-row>
        <table:table-row table:style-name="Tabelle33.1">
          <table:table-cell table:style-name="Tabelle33.A2" office:value-type="string">
            <text:p text:style-name="P96">0..96, 123..223, 247, 255</text:p>
          </table:table-cell>
          <table:table-cell table:style-name="Tabelle33.A2" office:value-type="string">
            <text:p text:style-name="P96">FALSE</text:p>
          </table:table-cell>
          <table:table-cell table:style-name="Tabelle33.C2" office:value-type="string">
            <text:p text:style-name="P96">FALSE</text:p>
          </table:table-cell>
        </table:table-row>
        <table:table-row table:style-name="Tabelle33.1">
          <table:table-cell table:style-name="Tabelle33.A2" office:value-type="string">
            <text:p text:style-name="P96">97..122</text:p>
          </table:table-cell>
          <table:table-cell table:style-name="Tabelle33.A2" office:value-type="string">
            <text:p text:style-name="P96">TRUE</text:p>
          </table:table-cell>
          <table:table-cell table:style-name="Tabelle33.C2" office:value-type="string">
            <text:p text:style-name="P96">TRUE</text:p>
          </table:table-cell>
        </table:table-row>
        <table:table-row table:style-name="Tabelle33.1">
          <table:table-cell table:style-name="Tabelle33.A2" office:value-type="string">
            <text:p text:style-name="P96">224..246</text:p>
          </table:table-cell>
          <table:table-cell table:style-name="Tabelle33.A2" office:value-type="string">
            <text:p text:style-name="P96">TRUE</text:p>
          </table:table-cell>
          <table:table-cell table:style-name="Tabelle33.C2" office:value-type="string">
            <text:p text:style-name="P96">FALSE</text:p>
          </table:table-cell>
        </table:table-row>
        <table:table-row table:style-name="Tabelle33.1">
          <table:table-cell table:style-name="Tabelle33.A2" office:value-type="string">
            <text:p text:style-name="P96">248..254</text:p>
          </table:table-cell>
          <table:table-cell table:style-name="Tabelle33.A2" office:value-type="string">
            <text:p text:style-name="P96">TRUE</text:p>
          </table:table-cell>
          <table:table-cell table:style-name="Tabelle33.C2" office:value-type="string">
            <text:p text:style-name="P96">FALSE</text:p>
          </table:table-cell>
        </table:table-row>
      </table:table>
      <text:p text:style-name="P88"/>
      <text:list xml:id="list33656451" text:continue-numbering="true" text:style-name="L1">
        <text:list-item>
          <text:list>
            <text:list-item>
              <text:h text:style-name="P217" text:outline-level="2"><text:soft-page-break/><text:alphabetical-index-mark-start text:id="IMark100843576"/>ISC_NUM<text:alphabetical-index-mark-end text:id="IMark100843576"/></text:h>
            </text:list-item>
          </text:list>
        </text:list-item>
      </text:list>
      <text:p text:style-name="P22">Type<text:tab/>Funktion : BOOL</text:p>
      <text:p text:style-name="P52"><text:span text:style-name="T16">Input</text:span><text:tab/>IN : BYTE (Zeichen)</text:p>
      <text:p text:style-name="P25"><draw:frame draw:style-name="fr4" draw:name="Grafik509" text:anchor-type="paragraph" svg:x="1.046cm" svg:y="0.69cm" svg:width="4.069cm" svg:height="1.12cm" draw:z-index="513"><draw:image xlink:href="Pictures/100000000000013400000055BE44F522.png" xlink:type="simple" xlink:show="embed" xlink:actuate="onLoad"/></draw:frame>Output<text:tab/>BOOL (TRUE IN ein Zeichen 0..9 ist))</text:p>
      <text:p text:style-name="P55"><text:line-break/>ISC_NUM testet ob ein Zeichen IN ein Numerisches Zeichen ist, Ist IN ein Zeichen 0..9 gibt die Funktion TRUE zurück, wenn nicht gibt die Funktion FALSE zurück. Die Zeichen von 0..9 haben die Zeichencodes (48..57).</text:p>
      <text:list xml:id="list33630839" text:continue-numbering="true" text:style-name="L1">
        <text:list-item>
          <text:list>
            <text:list-item>
              <text:h text:style-name="P217" text:outline-level="2"><text:alphabetical-index-mark-start text:id="IMark100843576"/>ISC_UPPER<text:alphabetical-index-mark-end text:id="IMark100843576"/></text:h>
            </text:list-item>
          </text:list>
        </text:list-item>
      </text:list>
      <text:p text:style-name="P22">Type<text:tab/>Funktion : BOOL</text:p>
      <text:p text:style-name="P52"><text:span text:style-name="T16">Input</text:span><text:tab/>IN : BYTE (Zeichen)</text:p>
      <text:p text:style-name="P25"><draw:frame draw:style-name="fr4" draw:name="Grafik513" text:anchor-type="paragraph" svg:x="1.046cm" svg:y="0.684cm" svg:width="4.521cm" svg:height="1.12cm" draw:z-index="517"><draw:image xlink:href="Pictures/100000000000015600000055E57D3FCD.png" xlink:type="simple" xlink:show="embed" xlink:actuate="onLoad"/></draw:frame>Output<text:tab/>BOOL (TRUE IN ein Zeichen 0..9 ist))</text:p>
      <text:p text:style-name="P55"><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Standard"><text:span text:style-name="T38">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96">Code</text:p>
          </table:table-cell>
          <table:table-cell table:style-name="Tabelle34.A1" office:value-type="string">
            <text:p text:style-name="P96">EXTENDED_ASCII = TRUE</text:p>
          </table:table-cell>
          <table:table-cell table:style-name="Tabelle34.C1" office:value-type="string">
            <text:p text:style-name="P96">EXTENDED_ASCII = FASLE</text:p>
          </table:table-cell>
        </table:table-row>
        <table:table-row table:style-name="Tabelle34.1">
          <table:table-cell table:style-name="Tabelle34.A2" office:value-type="string">
            <text:p text:style-name="P96">0..64, 91..191, 215, 223..255</text:p>
          </table:table-cell>
          <table:table-cell table:style-name="Tabelle34.A2" office:value-type="string">
            <text:p text:style-name="P96">FALSE</text:p>
          </table:table-cell>
          <table:table-cell table:style-name="Tabelle34.C2" office:value-type="string">
            <text:p text:style-name="P96">FALSE</text:p>
          </table:table-cell>
        </table:table-row>
        <table:table-row table:style-name="Tabelle34.1">
          <table:table-cell table:style-name="Tabelle34.A2" office:value-type="string">
            <text:p text:style-name="P96">65..90</text:p>
          </table:table-cell>
          <table:table-cell table:style-name="Tabelle34.A2" office:value-type="string">
            <text:p text:style-name="P96">TRUE</text:p>
          </table:table-cell>
          <table:table-cell table:style-name="Tabelle34.C2" office:value-type="string">
            <text:p text:style-name="P96">TRUE</text:p>
          </table:table-cell>
        </table:table-row>
        <table:table-row table:style-name="Tabelle34.1">
          <table:table-cell table:style-name="Tabelle34.A2" office:value-type="string">
            <text:p text:style-name="P96">192..214</text:p>
          </table:table-cell>
          <table:table-cell table:style-name="Tabelle34.A2" office:value-type="string">
            <text:p text:style-name="P96">TRUE</text:p>
          </table:table-cell>
          <table:table-cell table:style-name="Tabelle34.C2" office:value-type="string">
            <text:p text:style-name="P96">FALSE</text:p>
          </table:table-cell>
        </table:table-row>
        <table:table-row table:style-name="Tabelle34.1">
          <table:table-cell table:style-name="Tabelle34.A2" office:value-type="string">
            <text:p text:style-name="P96">216..222</text:p>
          </table:table-cell>
          <table:table-cell table:style-name="Tabelle34.A2" office:value-type="string">
            <text:p text:style-name="P96">TRUE</text:p>
          </table:table-cell>
          <table:table-cell table:style-name="Tabelle34.C2" office:value-type="string">
            <text:p text:style-name="P96">FALSE</text:p>
          </table:table-cell>
        </table:table-row>
      </table:table>
      <text:p text:style-name="P199"/>
      <text:list xml:id="list33649026" text:continue-numbering="true" text:style-name="L1">
        <text:list-item>
          <text:list>
            <text:list-item>
              <text:h text:style-name="P217" text:outline-level="2"><text:soft-page-break/><text:alphabetical-index-mark-start text:id="IMark100843576"/>LOWERCASE<text:alphabetical-index-mark-end text:id="IMark100843576"/></text:h>
            </text:list-item>
          </text:list>
        </text:list-item>
      </text:list>
      <text:p text:style-name="P22">Type<text:tab/>Funktion : STRING</text:p>
      <text:p text:style-name="P52"><text:span text:style-name="T16">Input</text:span><text:tab/>STR : STRING (Eingabestring)</text:p>
      <text:p text:style-name="P25"><draw:frame draw:style-name="fr4" draw:name="Grafik49" text:anchor-type="paragraph" svg:x="1.113cm" svg:y="0.681cm" svg:width="4.069cm" svg:height="1.12cm" draw:z-index="35"><draw:image xlink:href="Pictures/10000000000001340000005522E8BA5C.png" xlink:type="simple" xlink:show="embed" xlink:actuate="onLoad"/></draw:frame>Output<text:tab/>STRING (STRING in Kleinbuchstaben)</text:p>
      <text:p text:style-name="P25"><text:line-break/>Die Funktion LOWERCASE wandelt den <text:span text:style-name="T16">String</text:span>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p>
      <text:list xml:id="list33655469" text:continue-numbering="true" text:style-name="L1">
        <text:list-item>
          <text:list>
            <text:list-item>
              <text:h text:style-name="P217" text:outline-level="2"><text:alphabetical-index-mark-start text:id="IMark100843576"/>MESSAGE_4R<text:alphabetical-index-mark-end text:id="IMark100843576"/></text:h>
            </text:list-item>
          </text:list>
        </text:list-item>
      </text:list>
      <text:p text:style-name="P22">Type<text:tab/>Funktionsbaustein</text:p>
      <text:p text:style-name="P52"><text:span text:style-name="T16">Input</text:span><text:tab/>M0 :. M3 STRING(STRING_LENGTH) (Meldungen)</text:p>
      <text:p text:style-name="P52"><text:tab/>MM : INT (Meldung die maximal angezeigt wird)</text:p>
      <text:p text:style-name="P52"><text:tab/>ENQ : BOOL (Freigabe Eingang)</text:p>
      <text:p text:style-name="P52"><text:tab/>CLK : BOOL (Eingang zum weiter Schalten)</text:p>
      <text:p text:style-name="P52"><text:tab/>T1 : TIME (Zeit für automatisches Weiterschalten)</text:p>
      <text:p text:style-name="P52">Output<text:tab/>MX : STRING(STRING_LENGTH) (Ausgabestring)</text:p>
      <text:p text:style-name="P52"><text:tab/>MN : INT (derzeit aktive Meldung)</text:p>
      <text:p text:style-name="P52"><draw:frame draw:style-name="fr4" draw:name="Grafik696" text:anchor-type="paragraph" svg:x="1.002cm" svg:y="0.679cm" svg:width="2.9cm" svg:height="3.9cm" draw:z-index="729"><draw:image xlink:href="Pictures/10000000000000DB00000127FA2AC2F8.png" xlink:type="simple" xlink:show="embed" xlink:actuate="onLoad"/></draw:frame><text:tab/>TR : BOOL (<text:span text:style-name="T16">Trigger</text:span> Ausgang)</text:p>
      <text:p text:style-name="P52"><text:soft-page-break/><text:line-break/>MESSAGE_4R stellt am Ausgang MX eine von bis zu 4 Meldungen bereit. Es wird immer nur eine von bis zu 4 Meldungen auf MX bereitgestellt. Die Anzahl der Meldungen kann mit dem Eingang MM begrenzt werden. Wird MM auf 2 gesetzt so werden nur die Meldungen M0 .. M2 hintereinander ausgegeben. Wird MM nicht gesetzt so werden alle Meldungen M0..M3 ausgegeben. Mit jeder steigenden Flanke von CLK wird die nächste Meldung auf MX ausgegeben, bleibt CLK dauerhaft auf TRUE so wird nach Ablauf der Zeit T1 automatisch die nächste Meldung ausgegeben, solange bis CLK wieder FALSE wird. Wird der Freigabeeingang ENQ auf FALSE gesetzt, wird am Ausgang MX '' ausgegeben und der Baustein hat keinerlei Funktion. Der Ausgang MN zeigt an welche Meldung gerade am Ausgang MX ausgegeben wird. Der Ausgang TR wird immer dann für genau einen Zyklus TRUE wenn sich die Meldung am Ausgang MX verändert hat, er dient vor allem Dazu Bausteine zur Weiterverarbeitung der Meldungen anzusteuern.</text:p>
      <text:list xml:id="list33650573" text:continue-numbering="true" text:style-name="L1">
        <text:list-item>
          <text:list>
            <text:list-item>
              <text:h text:style-name="P217" text:outline-level="2"><text:alphabetical-index-mark-start text:id="IMark100843576"/>MESSAGE_8<text:alphabetical-index-mark-end text:id="IMark100843576"/></text:h>
            </text:list-item>
          </text:list>
        </text:list-item>
      </text:list>
      <text:p text:style-name="P22">Type<text:tab/>Funktionsbaustein</text:p>
      <text:p text:style-name="P52"><text:span text:style-name="T16">Input</text:span><text:tab/>IN1..IN8 : BOOL (Auswahleingänge)</text:p>
      <text:p text:style-name="P52">Config<text:tab/>S1..S8 : STRING (Nachrichtenvorgabe)</text:p>
      <text:p text:style-name="P25"><draw:frame draw:style-name="fr4" draw:name="Grafik88" text:anchor-type="paragraph" svg:x="1.067cm" svg:y="0.688cm" svg:width="2.499cm" svg:height="3.9cm" draw:z-index="422"><draw:image xlink:href="Pictures/10000000000000BD00000127EE2F0BBF.png" xlink:type="simple" xlink:show="embed" xlink:actuate="onLoad"/></draw:frame>Output<text:tab/>M : STRING (Ausgangsstring)</text:p>
      <text:p text:style-name="P55"><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55">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55"><draw:frame draw:style-name="fr4" draw:name="Grafik421" text:anchor-type="paragraph" svg:x="1.51cm" svg:y="0.138cm" svg:width="14.94cm" svg:height="6.1cm" draw:z-index="424"><draw:image xlink:href="Pictures/10000000000003AD000001806D515420.png" xlink:type="simple" xlink:show="embed" xlink:actuate="onLoad"/></draw:frame><text:soft-page-break/></text:p>
      <text:list xml:id="list33635922" text:continue-numbering="true" text:style-name="L1">
        <text:list-item>
          <text:list>
            <text:list-item>
              <text:h text:style-name="P223" text:outline-level="2"><text:alphabetical-index-mark-start text:id="IMark100843576"/>MIRROR<text:alphabetical-index-mark-end text:id="IMark100843576"/></text:h>
            </text:list-item>
          </text:list>
        </text:list-item>
      </text:list>
      <text:p text:style-name="P22">Type<text:tab/>Funktion : STRING</text:p>
      <text:p text:style-name="P52"><text:span text:style-name="T16">Input</text:span><text:tab/>STR : STRING (Eingangsstring)</text:p>
      <text:p text:style-name="P55"><draw:frame draw:style-name="fr4" draw:name="Grafik444" text:anchor-type="paragraph" svg:x="1.067cm" svg:y="0.69cm" svg:width="2.731cm" svg:height="1.12cm" draw:z-index="446"><draw:image xlink:href="Pictures/10000000000000CE00000055F16F3122.png" xlink:type="simple" xlink:show="embed" xlink:actuate="onLoad"/></draw:frame>Output<text:tab/>STRING (Eingangsstring Rückwärts gelesen)</text:p>
      <text:p text:style-name="P55"><text:line-break/>MIRROR liest die Zeichenkette an STR Rückwärts und gibt die Zeichen in umgekehrter Reihenfolge wieder aus.</text:p>
      <text:p text:style-name="P55">Beispiel: MIRROR('Das ist ein Test') = 'tseT nie tsi saD'</text:p>
      <text:list xml:id="list33644190" text:continue-numbering="true" text:style-name="L1">
        <text:list-item>
          <text:list>
            <text:list-item>
              <text:h text:style-name="P223" text:outline-level="2"><text:alphabetical-index-mark-start text:id="IMark100843576"/><text:alphabetical-index-mark-start text:id="IMark102055728"/>MONTH_TO_STRING<text:alphabetical-index-mark-end text:id="IMark102055728"/><text:alphabetical-index-mark-end text:id="IMark100843576"/></text:h>
            </text:list-item>
          </text:list>
        </text:list-item>
      </text:list>
      <text:p text:style-name="P22">Type<text:tab/>Funktion : STRING(10)</text:p>
      <text:p text:style-name="P22"><text:span text:style-name="T16">Input</text:span><text:tab/>MTH : INT (Monat 1..12)</text:p>
      <text:p text:style-name="P52"><text:tab/>LANG : INT (Sprachauswahl 0 = <text:span text:style-name="T16">Default</text:span>)</text:p>
      <text:p text:style-name="P52"><text:tab/>LX : INT (Länge der Zeichenkette)</text:p>
      <text:p text:style-name="P55"><draw:frame draw:style-name="fr4" draw:name="Grafik682" text:anchor-type="paragraph" svg:x="1.041cm" svg:y="0.693cm" svg:width="6.47cm" svg:height="1.79cm" draw:z-index="706"><draw:image xlink:href="Pictures/10000000000001E900000087F30A52BB.png" xlink:type="simple" xlink:show="embed" xlink:actuate="onLoad"/></draw:frame>Output<text:tab/>STRING(10) (Ausgangswert)</text:p>
      <text:p text:style-name="P55"><text:soft-page-break/><text:line-break/>MONTH_TO_STRING wandelt eine Monatszahl in die entsprechende Zeichenkette. Der Eingang MTH gibt den entsprechenden Monat an: 1 = Januar und 12 = Dezember. Der Eingang LANG wählt die gewünschte Sprache aus: 1 = Englisch und 2 = Deutsch. LANG = 0 benutzt die als <text:span text:style-name="T16">Default</text:span> Sprache in der Globalen Setup Variable LANGUAGE_DEFAULT festgelegte Sprache. Der Eingang LX legt die Länge der zu erzeugenden Zeichenkette fest: 0 = Voller Monatsname, 3 = Abkürzung mit 3 Buchstaben, alle anderen Werte am Eingang LX sind nicht definiert.</text:p>
      <text:p text:style-name="P55">Die vom Baustein erzeugten Zeichenketten sowie die unterstützten Sprachen sind im Bereich Global <text:span text:style-name="T16">Constants</text:span> definiert und können dort erweitert und verändert werden.</text:p>
      <text:p text:style-name="P55">MONTH_TO_STRING(1,0,0) = '<text:span text:style-name="T16">January</text:span>'</text:p>
      <text:p text:style-name="P55">abhängig von der Globalen Konstante LANGUAGE_DEFAULT</text:p>
      <text:p text:style-name="P55">MONTH_TO_STRING(1,2,0) = '<text:span text:style-name="T24">Januar</text:span>'</text:p>
      <text:p text:style-name="P55">MONTH_TO_STRING(1,2,3) = '<text:span text:style-name="T24">Jan</text:span>'</text:p>
      <text:list xml:id="list33655289" text:continue-numbering="true" text:style-name="L1">
        <text:list-item>
          <text:list>
            <text:list-item>
              <text:h text:style-name="P217" text:outline-level="2"><text:alphabetical-index-mark-start text:id="IMark100843576"/>OCT_TO_BYTE<text:alphabetical-index-mark-end text:id="IMark100843576"/></text:h>
            </text:list-item>
          </text:list>
        </text:list-item>
      </text:list>
      <text:p text:style-name="P22">Type<text:tab/>Funktion : BYTE</text:p>
      <text:p text:style-name="P22"><text:span text:style-name="T16">Input</text:span><text:tab/>OCT : STRING(10) (Oktale Zeichenkette)</text:p>
      <text:p text:style-name="P25"><draw:frame draw:style-name="fr4" draw:name="Grafik634" text:anchor-type="paragraph" svg:x="1.046cm" svg:y="0.688cm" svg:width="4.881cm" svg:height="0.99cm" draw:z-index="655"><draw:image xlink:href="Pictures/10000000000001710000004BB6AEEF76.png" xlink:type="simple" xlink:show="embed" xlink:actuate="onLoad"/></draw:frame>Output<text:tab/>BYTE (Ausgangswert)</text:p>
      <text:p text:style-name="P25"><text:line-break/>Die Funktion OCT_TO_BYTE konvertiert eine oktal kodierte Zeichenkette in einen BYTE Wert. Es werden dabei nur die oktalen Zeichen sind '0'..'7' interpretiert, alle anderen in HEX vorkommenden Zeichen werden ignoriert.</text:p>
      <text:p text:style-name="P55">Beispiel:<text:tab/>OCT_TO_BYTE('11') ergibt 9.</text:p>
      <text:list xml:id="list33645935" text:continue-numbering="true" text:style-name="L1">
        <text:list-item>
          <text:list>
            <text:list-item>
              <text:h text:style-name="P217" text:outline-level="2"><text:soft-page-break/><text:alphabetical-index-mark-start text:id="IMark100843576"/>OCT_TO_DWORD<text:alphabetical-index-mark-end text:id="IMark100843576"/></text:h>
            </text:list-item>
          </text:list>
        </text:list-item>
      </text:list>
      <text:p text:style-name="P22">Type<text:tab/>Funktion : DWORD</text:p>
      <text:p text:style-name="P22"><text:span text:style-name="T16">Input</text:span><text:tab/>OCT : STRING(20) (Oktale Zeichenkette)</text:p>
      <text:p text:style-name="P25"><draw:frame draw:style-name="fr4" draw:name="Grafik635" text:anchor-type="paragraph" svg:x="1.023cm" svg:y="0.688cm" svg:width="5.279cm" svg:height="0.99cm" draw:z-index="656"><draw:image xlink:href="Pictures/100000000000018F0000004B96DCA2C6.png" xlink:type="simple" xlink:show="embed" xlink:actuate="onLoad"/></draw:frame>Output<text:tab/>DWORD (Ausgangswert)</text:p>
      <text:p text:style-name="P25"><text:line-break/>Die Funktion OCT_TO_DWORD konvertiert eine oktal kodierte Zeichenkette in einen BYTE Wert. Es werden dabei nur die oktalen Zeichen sind '0'..'7' interpretiert, alle anderen in HEX vorkommenden Zeichen werden ignoriert.</text:p>
      <text:p text:style-name="P55">Beispiel:<text:tab/>OCT_TO_DWORD('11') ergibt 9.</text:p>
      <text:list xml:id="list33649666" text:continue-numbering="true" text:style-name="L1">
        <text:list-item>
          <text:list>
            <text:list-item>
              <text:h text:style-name="P217" text:outline-level="2"><text:alphabetical-index-mark-start text:id="IMark100843576"/>REAL_TO_STRF<text:alphabetical-index-mark-end text:id="IMark100843576"/></text:h>
            </text:list-item>
          </text:list>
        </text:list-item>
      </text:list>
      <text:p text:style-name="P22">Type<text:tab/>Funktion : STRING(20)</text:p>
      <text:p text:style-name="P22"><text:span text:style-name="T16">Input</text:span><text:tab/>IN : REAL (Eingangswert)</text:p>
      <text:p text:style-name="P52"><text:tab/>N : INT (Anzahl der Nachkommastellen)</text:p>
      <text:p text:style-name="P25"><draw:frame draw:style-name="fr4" draw:name="Grafik232" text:anchor-type="paragraph" svg:x="1.072cm" svg:y="0.686cm" svg:width="4.971cm" svg:height="1.57cm" draw:z-index="205"><draw:image xlink:href="Pictures/10000000000001780000007774385AB9.png" xlink:type="simple" xlink:show="embed" xlink:actuate="onLoad"/></draw:frame>Output<text:tab/>STRING (Ausgangsstring)</text:p>
      <text:p text:style-name="P55">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 text:style-name="T16">String</text:span>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p>
      <text:p text:style-name="P55">Beispiel:<text:tab/>REAL_TO_STRF(3.14159,4) = '3.1416'</text:p>
      <text:p text:style-name="P55"><text:tab/>REAL_TO_STRF(3.14159,0) = '3'</text:p>
      <text:p text:style-name="P55"><text:tab/>REAL_TO_STRF(0.04159,3) = '0.042'</text:p>
      <text:p text:style-name="P55"><text:tab/>REAL_TO_STRF(0.001,2) = '0.00'</text:p>
      <text:list xml:id="list33650987" text:continue-numbering="true" text:style-name="L1">
        <text:list-item>
          <text:list>
            <text:list-item>
              <text:h text:style-name="P217" text:outline-level="2"><text:soft-page-break/><text:alphabetical-index-mark-start text:id="IMark100843576"/>REPLACE_ALL<text:alphabetical-index-mark-end text:id="IMark100843576"/></text:h>
            </text:list-item>
          </text:list>
        </text:list-item>
      </text:list>
      <text:p text:style-name="P22">Type<text:tab/>Funktion : STRING</text:p>
      <text:p text:style-name="P25"><text:span text:style-name="T16">Input</text:span><text:tab/>STR : STRING (Eingangs String)</text:p>
      <text:p text:style-name="P55"><text:tab/>SRC : STRING (Suchstring)</text:p>
      <text:p text:style-name="P55"><text:tab/>REP : STRING (Ersatzstring)</text:p>
      <text:p text:style-name="P55"><draw:frame draw:style-name="fr4" draw:name="Grafik446" text:anchor-type="paragraph" svg:x="1.002cm" svg:y="0.644cm" svg:width="5.42cm" svg:height="2.02cm" draw:z-index="448"><draw:image xlink:href="Pictures/100000000000019A00000099E1D92EC9.png" xlink:type="simple" xlink:show="embed" xlink:actuate="onLoad"/></draw:frame>Output<text:tab/>STRING (Ausgangsstring)</text:p>
      <text:p text:style-name="P55"><text:line-break/>REPLACE_ALL ersetzt alle in der Zeichenkette STR vorkommenden <text:span text:style-name="T16">Strings</text:span> SRC mit REP. Eine leere Zeichenkette an SRC ergibt keine Suchergebnisse.</text:p>
      <text:p text:style-name="P55">Beispiel:<text:tab/>REPLACE_ALL('123BB456BB789BB','BB','/') = '123/456/789/'</text:p>
      <text:p text:style-name="P55"><text:tab/>REPLACE_ALL('123BB456BB789BB','BB','') = '123456789'</text:p>
      <text:list xml:id="list33643533" text:continue-numbering="true" text:style-name="L1">
        <text:list-item>
          <text:list>
            <text:list-item>
              <text:h text:style-name="P217" text:outline-level="2"><text:alphabetical-index-mark-start text:id="IMark100843576"/>REPLACE_CHARS<text:alphabetical-index-mark-end text:id="IMark100843576"/></text:h>
            </text:list-item>
          </text:list>
        </text:list-item>
      </text:list>
      <text:p text:style-name="P22">Type<text:tab/>Funktion : STRING</text:p>
      <text:p text:style-name="P52"><text:span text:style-name="T16">Input</text:span><text:tab/>STR : STRING (Eingangsstring)</text:p>
      <text:p text:style-name="P52"><text:tab/>SRC : STRING (Suchzeichen)</text:p>
      <text:p text:style-name="P52"><text:tab/>REP : STRING (Ersatzzeichen)</text:p>
      <text:p text:style-name="P55"><draw:frame draw:style-name="fr4" draw:name="Grafik568" text:anchor-type="paragraph" svg:x="1.025cm" svg:y="0.646cm" svg:width="6.77cm" svg:height="2.02cm" draw:z-index="580"><draw:image xlink:href="Pictures/1000000000000200000000993ED656C1.png" xlink:type="simple" xlink:show="embed" xlink:actuate="onLoad"/></draw:frame>Output<text:tab/>STRING (Ausgangsstring)</text:p>
      <text:p text:style-name="P55"><text:line-break/>REPLACE_CHARS ersetzt alle Zeichen <text:s/>in SRC die in STR vorkommen mit den Zeichen an der gleichen Stelle in REP.</text:p>
      <text:p text:style-name="P55">Beispiel: REPLACE_CHARS('abc123', '0123456789', ABCDEFGHIJ') = 'abcABC'</text:p>
      <text:list xml:id="list33656207" text:continue-numbering="true" text:style-name="L1">
        <text:list-item>
          <text:list>
            <text:list-item>
              <text:h text:style-name="P217" text:outline-level="2"><text:soft-page-break/><text:alphabetical-index-mark-start text:id="IMark100843576"/>REPLACE_UML<text:alphabetical-index-mark-end text:id="IMark100843576"/></text:h>
            </text:list-item>
          </text:list>
        </text:list-item>
      </text:list>
      <text:p text:style-name="P22">Type<text:tab/>Funktion : STRING</text:p>
      <text:p text:style-name="P52"><text:span text:style-name="T16">Input</text:span><text:tab/>STR : STRING (Eingangsstring)</text:p>
      <text:p text:style-name="P55"><draw:frame draw:style-name="fr4" draw:name="Grafik494" text:anchor-type="paragraph" svg:x="1.025cm" svg:y="0.688cm" svg:width="5.87cm" svg:height="1.12cm" draw:z-index="500"><draw:image xlink:href="Pictures/10000000000001BC00000055B49FA3AE.png" xlink:type="simple" xlink:show="embed" xlink:actuate="onLoad"/></draw:frame>Output<text:tab/>STRING (Ausgangsstring)</text:p>
      <text:p text:style-name="P55"><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55">Ä &gt; Ae, Ö &gt; Oe, Ü &gt; Ue, ä &gt; ae, ö &gt; oe, ü &gt; oe, ß &gt; ss.</text:p>
      <text:list xml:id="list33625885" text:continue-numbering="true" text:style-name="L1">
        <text:list-item>
          <text:list>
            <text:list-item>
              <text:h text:style-name="P217" text:outline-level="2"><text:alphabetical-index-mark-start text:id="IMark100843576"/>TICKER<text:alphabetical-index-mark-end text:id="IMark100843576"/></text:h>
            </text:list-item>
          </text:list>
        </text:list-item>
      </text:list>
      <text:p text:style-name="P22">Type<text:tab/>Funktionsbaustein</text:p>
      <text:p text:style-name="P22"><text:span text:style-name="T16">Input</text:span><text:tab/>N : INT (Länge des Display <text:span text:style-name="T16">Strings</text:span>)</text:p>
      <text:p text:style-name="P52"><text:tab/>PT : TIME (Schiebedelay, <text:span text:style-name="T16">Default</text:span> = T#1s)</text:p>
      <text:p text:style-name="P52"><text:tab/>TEXT : STRING (Eingangsstring)</text:p>
      <text:p text:style-name="P25"><draw:frame draw:style-name="fr4" draw:name="Grafik390" text:anchor-type="paragraph" svg:x="1.046cm" svg:y="0.69cm" svg:width="3.69cm" svg:height="1.921cm" draw:z-index="385"><draw:image xlink:href="Pictures/100000000000011700000091C54F8002.png" xlink:type="simple" xlink:show="embed" xlink:actuate="onLoad"/></draw:frame>Output<text:tab/>DISPLAY : STRING (Ausgangsstring)</text:p>
      <text:p text:style-name="P55"><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6">String</text:span> TEXT direkt am Ausgang DISPLAY dargestellt.</text:p>
      <text:list xml:id="list33643257" text:continue-numbering="true" text:style-name="L1">
        <text:list-item>
          <text:list>
            <text:list-item>
              <text:h text:style-name="P217" text:outline-level="2"><text:soft-page-break/><text:alphabetical-index-mark-start text:id="IMark100843576"/>TO_LOWER<text:alphabetical-index-mark-end text:id="IMark100843576"/></text:h>
            </text:list-item>
          </text:list>
        </text:list-item>
      </text:list>
      <text:p text:style-name="P22">Type<text:tab/>Funktion : BYTE</text:p>
      <text:p text:style-name="P22"><text:span text:style-name="T16">Input</text:span><text:tab/>IN : BYTE (<text:span text:style-name="T24">Zeichen das konvertiert werden soll</text:span>)</text:p>
      <text:p text:style-name="P55"><draw:frame draw:style-name="fr4" draw:name="Grafik506" text:anchor-type="paragraph" svg:x="1.046cm" svg:y="0.667cm" svg:width="4.521cm" svg:height="1.12cm" draw:z-index="510"><draw:image xlink:href="Pictures/100000000000015600000055F63448A8.png" xlink:type="simple" xlink:show="embed" xlink:actuate="onLoad"/></draw:frame>Output<text:tab/>BYTE (konvertiertes Zeichen)</text:p>
      <text:p text:style-name="P55"><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Standard">Die folgende <text:span text:style-name="T38">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96">Code</text:p>
          </table:table-cell>
          <table:table-cell table:style-name="Tabelle30.A1" office:value-type="string">
            <text:p text:style-name="P96">EXTENDED_ASCII = TRUE</text:p>
          </table:table-cell>
          <table:table-cell table:style-name="Tabelle30.C1" office:value-type="string">
            <text:p text:style-name="P96">EXTENDED_ASCII = FASLE</text:p>
          </table:table-cell>
        </table:table-row>
        <table:table-row table:style-name="Tabelle30.1">
          <table:table-cell table:style-name="Tabelle30.A2" office:value-type="string">
            <text:p text:style-name="P96">0..64 </text:p>
          </table:table-cell>
          <table:table-cell table:style-name="Tabelle30.A2" office:value-type="string">
            <text:p text:style-name="P96">0..64</text:p>
          </table:table-cell>
          <table:table-cell table:style-name="Tabelle30.C2" office:value-type="string">
            <text:p text:style-name="P96">0..64</text:p>
          </table:table-cell>
        </table:table-row>
        <table:table-row table:style-name="Tabelle30.1">
          <table:table-cell table:style-name="Tabelle30.A2" office:value-type="string">
            <text:p text:style-name="P96">65..90</text:p>
          </table:table-cell>
          <table:table-cell table:style-name="Tabelle30.A2" office:value-type="string">
            <text:p text:style-name="P96">97..122</text:p>
          </table:table-cell>
          <table:table-cell table:style-name="Tabelle30.C2" office:value-type="string">
            <text:p text:style-name="P96">97..122</text:p>
          </table:table-cell>
        </table:table-row>
        <table:table-row table:style-name="Tabelle30.1">
          <table:table-cell table:style-name="Tabelle30.A2" office:value-type="string">
            <text:p text:style-name="P96">91..191</text:p>
          </table:table-cell>
          <table:table-cell table:style-name="Tabelle30.A2" office:value-type="string">
            <text:p text:style-name="P96">91..191</text:p>
          </table:table-cell>
          <table:table-cell table:style-name="Tabelle30.C2" office:value-type="string">
            <text:p text:style-name="P96">91..191</text:p>
          </table:table-cell>
        </table:table-row>
        <table:table-row table:style-name="Tabelle30.1">
          <table:table-cell table:style-name="Tabelle30.A2" office:value-type="string">
            <text:p text:style-name="P96">192..214</text:p>
          </table:table-cell>
          <table:table-cell table:style-name="Tabelle30.A2" office:value-type="string">
            <text:p text:style-name="P96">224..246</text:p>
          </table:table-cell>
          <table:table-cell table:style-name="Tabelle30.C2" office:value-type="string">
            <text:p text:style-name="P96">192..214</text:p>
          </table:table-cell>
        </table:table-row>
        <table:table-row table:style-name="Tabelle30.1">
          <table:table-cell table:style-name="Tabelle30.A2" office:value-type="string">
            <text:p text:style-name="P96">215</text:p>
          </table:table-cell>
          <table:table-cell table:style-name="Tabelle30.A2" office:value-type="string">
            <text:p text:style-name="P96">215</text:p>
          </table:table-cell>
          <table:table-cell table:style-name="Tabelle30.C2" office:value-type="string">
            <text:p text:style-name="P96">215</text:p>
          </table:table-cell>
        </table:table-row>
        <table:table-row table:style-name="Tabelle30.1">
          <table:table-cell table:style-name="Tabelle30.A2" office:value-type="string">
            <text:p text:style-name="P96">216..222</text:p>
          </table:table-cell>
          <table:table-cell table:style-name="Tabelle30.A2" office:value-type="string">
            <text:p text:style-name="P96">248..254</text:p>
          </table:table-cell>
          <table:table-cell table:style-name="Tabelle30.C2" office:value-type="string">
            <text:p text:style-name="P96">216..254</text:p>
          </table:table-cell>
        </table:table-row>
        <table:table-row table:style-name="Tabelle30.1">
          <table:table-cell table:style-name="Tabelle30.A2" office:value-type="string">
            <text:p text:style-name="P96">223..255</text:p>
          </table:table-cell>
          <table:table-cell table:style-name="Tabelle30.A2" office:value-type="string">
            <text:p text:style-name="P96">223..255</text:p>
          </table:table-cell>
          <table:table-cell table:style-name="Tabelle30.C2" office:value-type="string">
            <text:p text:style-name="P96">223..255</text:p>
          </table:table-cell>
        </table:table-row>
      </table:table>
      <text:p text:style-name="P88"/>
      <text:list xml:id="list33652177" text:continue-numbering="true" text:style-name="L1">
        <text:list-item>
          <text:list>
            <text:list-item>
              <text:h text:style-name="P217" text:outline-level="2"><text:alphabetical-index-mark-start text:id="IMark100843576"/>TO_UML<text:alphabetical-index-mark-end text:id="IMark100843576"/></text:h>
            </text:list-item>
          </text:list>
        </text:list-item>
      </text:list>
      <text:p text:style-name="P22">Type<text:tab/>Funktion : STRING(2)</text:p>
      <text:p text:style-name="P22"><text:span text:style-name="T16">Input</text:span><text:tab/>IN : BYTE (<text:span text:style-name="T24">Zeichen das konvertiert werden soll</text:span>)</text:p>
      <text:p text:style-name="P55"><draw:frame draw:style-name="fr4" draw:name="Grafik540" text:anchor-type="paragraph" svg:x="1.023cm" svg:y="0.688cm" svg:width="3.29cm" svg:height="0.99cm" draw:z-index="550"><draw:image xlink:href="Pictures/10000000000000F90000004B9B19E092.png" xlink:type="simple" xlink:show="embed" xlink:actuate="onLoad"/></draw:frame>Output<text:tab/>STRING(2) (konvertiertes Zeichen)</text:p>
      <text:p text:style-name="P55"><text:line-break/>TO_UML wandelt einzelne Sonderzeichen des Zeichensatzes größer 127 in eine Kombination zweier Buchstaben um. Es handelt sich dabei um Zeichen des erweiterten ASCII Zeichensatzes nach ISO 8859-1(Latin1).</text:p>
      <text:p text:style-name="P55"><text:soft-page-break/>Es werden folgende Zeichen umgewandelt:</text:p>
      <text:p text:style-name="P55">Ä &gt;&gt; Ae<text:tab/>ä &gt;&gt; ae<text:tab/>Ö &gt;&gt; Oe<text:tab/>ö &gt;&gt; oe<text:tab/>Ü &gt;&gt; Ue<text:tab/>ü &gt;&gt; ue</text:p>
      <text:p text:style-name="P55">ß &gt;&gt; ss</text:p>
      <text:p text:style-name="P55">Alle andern Zeichen werden als STRING mit dem Zeichen IN zurückgegeben.</text:p>
      <text:list xml:id="list33643086" text:continue-numbering="true" text:style-name="L1">
        <text:list-item>
          <text:list>
            <text:list-item>
              <text:h text:style-name="P217" text:outline-level="2"><text:alphabetical-index-mark-start text:id="IMark100843576"/>TO_UPPER<text:alphabetical-index-mark-end text:id="IMark100843576"/></text:h>
            </text:list-item>
          </text:list>
        </text:list-item>
      </text:list>
      <text:p text:style-name="P22">Type<text:tab/>Funktion : BYTE</text:p>
      <text:p text:style-name="P22"><text:span text:style-name="T16">Input</text:span><text:tab/>IN : BYTE (<text:span text:style-name="T24">Zeichen das konvertiert werden soll</text:span>)</text:p>
      <text:p text:style-name="P55">Output<text:tab/>BYTE (konvertiertes Zeichen)</text:p>
      <text:p text:style-name="P55"><draw:frame draw:style-name="fr4" draw:name="Grafik507" text:anchor-type="paragraph" svg:x="1.046cm" svg:y="0.012cm" svg:width="4.521cm" svg:height="1.12cm" draw:z-index="511"><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Standard">Die folgende <text:span text:style-name="T38">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96">Code</text:p>
          </table:table-cell>
          <table:table-cell table:style-name="Tabelle31.A1" office:value-type="string">
            <text:p text:style-name="P96">EXTENDED_ASCII = TRUE</text:p>
          </table:table-cell>
          <table:table-cell table:style-name="Tabelle31.C1" office:value-type="string">
            <text:p text:style-name="P96">EXTENDED_ASCII = FASLE</text:p>
          </table:table-cell>
        </table:table-row>
        <table:table-row table:style-name="Tabelle31.1">
          <table:table-cell table:style-name="Tabelle31.A2" office:value-type="string">
            <text:p text:style-name="P96">0..64 </text:p>
          </table:table-cell>
          <table:table-cell table:style-name="Tabelle31.A2" office:value-type="string">
            <text:p text:style-name="P96">0..64</text:p>
          </table:table-cell>
          <table:table-cell table:style-name="Tabelle31.C2" office:value-type="string">
            <text:p text:style-name="P96">0..64</text:p>
          </table:table-cell>
        </table:table-row>
        <table:table-row table:style-name="Tabelle31.1">
          <table:table-cell table:style-name="Tabelle31.A2" office:value-type="string">
            <text:p text:style-name="P96">65..90</text:p>
          </table:table-cell>
          <table:table-cell table:style-name="Tabelle31.A2" office:value-type="string">
            <text:p text:style-name="P96">97..122</text:p>
          </table:table-cell>
          <table:table-cell table:style-name="Tabelle31.C2" office:value-type="string">
            <text:p text:style-name="P96">97..122</text:p>
          </table:table-cell>
        </table:table-row>
        <table:table-row table:style-name="Tabelle31.1">
          <table:table-cell table:style-name="Tabelle31.A2" office:value-type="string">
            <text:p text:style-name="P96">91..191</text:p>
          </table:table-cell>
          <table:table-cell table:style-name="Tabelle31.A2" office:value-type="string">
            <text:p text:style-name="P96">91..191</text:p>
          </table:table-cell>
          <table:table-cell table:style-name="Tabelle31.C2" office:value-type="string">
            <text:p text:style-name="P96">91..191</text:p>
          </table:table-cell>
        </table:table-row>
        <table:table-row table:style-name="Tabelle31.1">
          <table:table-cell table:style-name="Tabelle31.A2" office:value-type="string">
            <text:p text:style-name="P96">192..214</text:p>
          </table:table-cell>
          <table:table-cell table:style-name="Tabelle31.A2" office:value-type="string">
            <text:p text:style-name="P96">224..246</text:p>
          </table:table-cell>
          <table:table-cell table:style-name="Tabelle31.C2" office:value-type="string">
            <text:p text:style-name="P96">192..214</text:p>
          </table:table-cell>
        </table:table-row>
        <table:table-row table:style-name="Tabelle31.1">
          <table:table-cell table:style-name="Tabelle31.A2" office:value-type="string">
            <text:p text:style-name="P96">215</text:p>
          </table:table-cell>
          <table:table-cell table:style-name="Tabelle31.A2" office:value-type="string">
            <text:p text:style-name="P96">215</text:p>
          </table:table-cell>
          <table:table-cell table:style-name="Tabelle31.C2" office:value-type="string">
            <text:p text:style-name="P96">215</text:p>
          </table:table-cell>
        </table:table-row>
        <table:table-row table:style-name="Tabelle31.1">
          <table:table-cell table:style-name="Tabelle31.A2" office:value-type="string">
            <text:p text:style-name="P96">216..222</text:p>
          </table:table-cell>
          <table:table-cell table:style-name="Tabelle31.A2" office:value-type="string">
            <text:p text:style-name="P96">248..254</text:p>
          </table:table-cell>
          <table:table-cell table:style-name="Tabelle31.C2" office:value-type="string">
            <text:p text:style-name="P96">216..254</text:p>
          </table:table-cell>
        </table:table-row>
        <table:table-row table:style-name="Tabelle31.1">
          <table:table-cell table:style-name="Tabelle31.A2" office:value-type="string">
            <text:p text:style-name="P96">223..255</text:p>
          </table:table-cell>
          <table:table-cell table:style-name="Tabelle31.A2" office:value-type="string">
            <text:p text:style-name="P96">223..255</text:p>
          </table:table-cell>
          <table:table-cell table:style-name="Tabelle31.C2" office:value-type="string">
            <text:p text:style-name="P96">223..255</text:p>
          </table:table-cell>
        </table:table-row>
      </table:table>
      <text:p text:style-name="P88"/>
      <text:list xml:id="list33654099" text:continue-numbering="true" text:style-name="L1">
        <text:list-item>
          <text:list>
            <text:list-item>
              <text:h text:style-name="P217" text:outline-level="2"><text:soft-page-break/><text:alphabetical-index-mark-start text:id="IMark100843576"/>TRIM<text:alphabetical-index-mark-end text:id="IMark100843576"/></text:h>
            </text:list-item>
          </text:list>
        </text:list-item>
      </text:list>
      <text:p text:style-name="P22">Type<text:tab/>Funktion : STRING</text:p>
      <text:p text:style-name="P22"><text:span text:style-name="T16">Input</text:span><text:tab/>STR : STRING (Eingabestring)</text:p>
      <text:p text:style-name="P25"><draw:frame draw:style-name="fr4" draw:name="Grafik50" text:anchor-type="paragraph" svg:x="1.09cm" svg:y="0.647cm" svg:width="2.281cm" svg:height="1.12cm" draw:z-index="36"><draw:image xlink:href="Pictures/10000000000000AC00000055C0F872C7.png" xlink:type="simple" xlink:show="embed" xlink:actuate="onLoad"/></draw:frame>Output<text:tab/>STRING (STR ohne Leerzeichen)</text:p>
      <text:p text:style-name="P25"><text:line-break/>Die Funktion TRIM entfernt alle Leerzeichen aus STR.</text:p>
      <text:p text:style-name="P25">Beispiel:<text:tab/>TRIM('find BX12') = 'findBX12'</text:p>
      <text:list xml:id="list33641617" text:continue-numbering="true" text:style-name="L1">
        <text:list-item>
          <text:list>
            <text:list-item>
              <text:h text:style-name="P217" text:outline-level="2"><text:alphabetical-index-mark-start text:id="IMark100843576"/>TRIM1<text:alphabetical-index-mark-end text:id="IMark100843576"/></text:h>
            </text:list-item>
          </text:list>
        </text:list-item>
      </text:list>
      <text:p text:style-name="P22">Type<text:tab/>Funktion : STRING</text:p>
      <text:p text:style-name="P22"><text:span text:style-name="T16">Input</text:span><text:tab/>STR : STRING (Eingabestring)</text:p>
      <text:p text:style-name="P25"><draw:frame draw:style-name="fr4" draw:name="Grafik443" text:anchor-type="paragraph" svg:x="1.046cm" svg:y="0.69cm" svg:width="2.731cm" svg:height="1.12cm" draw:z-index="445"><draw:image xlink:href="Pictures/10000000000000CE0000005522485091.png" xlink:type="simple" xlink:show="embed" xlink:actuate="onLoad"/></draw:frame>Output<text:tab/>STRING (STR ohne doppelte Leerzeichen)</text:p>
      <text:p text:style-name="P25"><text:line-break/>Die Funktion TRIM1 ersetzt mehrfache Leerzeichen mit nur einem Leerzeichen. Leerzeichen am Anfang und Am Ende von STR werden dabei komplett gelöscht.</text:p>
      <text:p text:style-name="P25">Beispiel:<text:tab/>TRIM1(' find <text:s text:c="3"/>BX12 ') = 'find BX12'</text:p>
      <text:list xml:id="list33652986" text:continue-numbering="true" text:style-name="L1">
        <text:list-item>
          <text:list>
            <text:list-item>
              <text:h text:style-name="P217" text:outline-level="2"><text:alphabetical-index-mark-start text:id="IMark100843576"/>TRIME<text:alphabetical-index-mark-end text:id="IMark100843576"/></text:h>
            </text:list-item>
          </text:list>
        </text:list-item>
      </text:list>
      <text:p text:style-name="P22">Type<text:tab/>Funktion : STRING</text:p>
      <text:p text:style-name="P22"><text:span text:style-name="T16">Input</text:span><text:tab/>STR : STRING (Eingabestring)</text:p>
      <text:p text:style-name="P25"><draw:frame draw:style-name="fr4" draw:name="Grafik539" text:anchor-type="paragraph" svg:x="1.067cm" svg:y="0.69cm" svg:width="3.18cm" svg:height="1.12cm" draw:z-index="549"><draw:image xlink:href="Pictures/10000000000000F0000000552ABEB17E.png" xlink:type="simple" xlink:show="embed" xlink:actuate="onLoad"/></draw:frame>Output<text:tab/>STRING (Ausgabestring)</text:p>
      <text:p text:style-name="P25"><text:soft-page-break/><text:line-break/>Die Funktion TRIME entfernt Leerzeichen am Anfang und Am Ende von STR. Leerzeichen innerhalb des Strings werden ignoriert, auch wenn Sie mehrfach vorkommen.</text:p>
      <text:list xml:id="list33639580" text:continue-numbering="true" text:style-name="L1">
        <text:list-item>
          <text:list>
            <text:list-item>
              <text:h text:style-name="P223" text:outline-level="2"><text:alphabetical-index-mark-start text:id="IMark100843576"/><text:alphabetical-index-mark-start text:id="IMark158218964"/>UPPERCASE<text:alphabetical-index-mark-end text:id="IMark158218964"/><text:alphabetical-index-mark-end text:id="IMark100843576"/></text:h>
            </text:list-item>
          </text:list>
        </text:list-item>
      </text:list>
      <text:p text:style-name="P25">Beispiel:<text:tab/>TRIM1(' find BX12 ') = 'find BX12'</text:p>
      <text:p text:style-name="P22">Type<text:tab/>Funktion : STRING</text:p>
      <text:p text:style-name="P52"><text:span text:style-name="T16">Input</text:span><text:tab/>STR : STRING (Eingabestring)</text:p>
      <text:p text:style-name="P25"><draw:frame draw:style-name="fr4" draw:name="Grafik51" text:anchor-type="paragraph" svg:x="1.109cm" svg:y="0.69cm" svg:width="4.069cm" svg:height="1.12cm" draw:z-index="707"><draw:image xlink:href="Pictures/100000000000013400000055C016F1FE.png" xlink:type="simple" xlink:show="embed" xlink:actuate="onLoad"/></draw:frame>Output<text:tab/>STRING (STRING in Großbuchstaben)</text:p>
      <text:p text:style-name="P25"><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55">Beispiel:<text:tab/>UPPERCASE('find BX12') = FIND BX12</text:p>
      <text:list xml:id="list33642922" text:continue-numbering="true" text:style-name="L1">
        <text:list-item>
          <text:list>
            <text:list-item>
              <text:h text:style-name="P223" text:outline-level="2"><text:alphabetical-index-mark-start text:id="IMark100843576"/>WEEKDAY_TO_STRING<text:alphabetical-index-mark-end text:id="IMark100843576"/></text:h>
            </text:list-item>
          </text:list>
        </text:list-item>
      </text:list>
      <text:p text:style-name="P22">Type<text:tab/>Funktion : STRING(10)</text:p>
      <text:p text:style-name="P22"><text:span text:style-name="T16">Input</text:span><text:tab/>WDAY : INT (Wochentag 1..7)</text:p>
      <text:p text:style-name="P52"><text:tab/>LANG : INT (Sprachauswahl 0 = <text:span text:style-name="T16">Default</text:span>)</text:p>
      <text:p text:style-name="P52"><text:tab/>LX : INT (Länge der Zeichenkette)</text:p>
      <text:p text:style-name="P55"><draw:frame draw:style-name="fr4" draw:name="Grafik683" text:anchor-type="paragraph" svg:x="1.046cm" svg:y="0.69cm" svg:width="6.87cm" svg:height="1.79cm" draw:z-index="708"><draw:image xlink:href="Pictures/1000000000000207000000870B815ACF.png" xlink:type="simple" xlink:show="embed" xlink:actuate="onLoad"/></draw:frame>Output<text:tab/>STRING(10) (Ausgangswert)</text:p>
      <text:p text:style-name="P55"><text:soft-page-break/><text:line-break/>WEEKDAY_TO_STRING wandelt einen Wochentag in die entsprechende Zeichenkette. Der Eingang WDAY gibt den entsprechenden Wochentag an: 1 = Montag und 7 = Sonntag. Der Eingang LANG wählt die gewünschte Sprache aus: 1 = Englisch und 2 = Deutsch. LANG = 0 benutzt die als <text:span text:style-name="T16">Default</text:span> Sprache in der Globalen Setup Variable LANGUAGE_DEFAULT festgelegte Sprache. Der Eingang LX legt die Länge der zu erzeugenden Zeichenkette fest: 0 = Voller Monatsname, 2 = Abkürzung mit 2 Buchstaben, alle anderen Werte am Eingang LX sind nicht definiert.</text:p>
      <text:p text:style-name="P55">Die vom Baustein erzeugten Zeichenketten sowie die unterstützten Sprachen sind im Bereich Global <text:span text:style-name="T16">Constants</text:span> definiert und können dort erweitert und verändert werden.</text:p>
      <text:p text:style-name="P55">WEEKDAY_TO_STRING(1,0,0) = '<text:span text:style-name="T16">Monday</text:span>' </text:p>
      <text:p text:style-name="P55">abhängig von der Globalen Konstante LANGUAGE_DEFAULT</text:p>
      <text:p text:style-name="P55">WEEKDAY_TO_STRING(1,2,0) = '<text:span text:style-name="T24">Montag</text:span>'</text:p>
      <text:p text:style-name="P55">WEEKDAY_TO_STRING(1,0,2) = '<text:span text:style-name="T16">Mo</text:span>'</text:p>
      <text:list xml:id="list33651560" text:continue-numbering="true" text:style-name="L1">
        <text:list-item>
          <text:h text:style-name="P211" text:outline-level="1">Speicherbausteine</text:h>
        </text:list-item>
      </text:list>
      <text:p text:style-name="P20"/>
      <text:list xml:id="list33632626" text:continue-numbering="true" text:style-name="L1">
        <text:list-item>
          <text:list>
            <text:list-item>
              <text:h text:style-name="P217" text:outline-level="2"><text:alphabetical-index-mark-start text:id="IMark100843576"/>FIFO_16<text:alphabetical-index-mark-end text:id="IMark100843576"/></text:h>
            </text:list-item>
          </text:list>
        </text:list-item>
      </text:list>
      <text:p text:style-name="P22">Type<text:tab/>Funktionsbaustein</text:p>
      <text:p text:style-name="P22"><text:span text:style-name="T16">Input</text:span><text:tab/>DIN : DWORD (Daten Eingang)</text:p>
      <text:p text:style-name="P22"><text:tab/>WR : BOOL (TRUE = Schreiben und FALSE = Lesen)</text:p>
      <text:p text:style-name="P22"><text:tab/>E : BOOL (Freigabe Eingang)</text:p>
      <text:p text:style-name="P22"><text:tab/>RST : BOOL (Reset Eingang)</text:p>
      <text:p text:style-name="P25">Output<text:tab/>DOUT : DWORD (Daten Ausgang)</text:p>
      <text:p text:style-name="P25"><text:tab/>EMPTY : BOOL (EMPTY <text:s/>= TRUE bedeutet: Speicher ist Leer)</text:p>
      <text:p text:style-name="P25"><draw:frame draw:style-name="fr4" draw:name="Grafik80" text:anchor-type="paragraph" svg:x="1.143cm" svg:y="0.654cm" svg:width="2.731cm" svg:height="2.649cm" draw:z-index="47"><draw:image xlink:href="Pictures/10000000000000CE000000C881C7D07A.png" xlink:type="simple" xlink:show="embed" xlink:actuate="onLoad"/></draw:frame><text:tab/>FULL : BOOL (FULL = TRUE bedeutet: Speicher ist Voll)</text:p>
      <text:p text:style-name="P25"><text:line-break/>FIFO_16 ist ein First-In First-<text:span text:style-name="T16">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xml:id="list33627074" text:continue-numbering="true" text:style-name="L1">
        <text:list-item>
          <text:list>
            <text:list-item>
              <text:h text:style-name="P217" text:outline-level="2"><text:soft-page-break/><text:alphabetical-index-mark-start text:id="IMark100843576"/><text:span text:style-name="T11">FIFO_</text:span><text:span text:style-name="T1">32</text:span><text:alphabetical-index-mark-end text:id="IMark100843576"/></text:h>
            </text:list-item>
          </text:list>
        </text:list-item>
      </text:list>
      <text:p text:style-name="P80">Type<text:tab/>Funktionsbaustein</text:p>
      <text:p text:style-name="P80"><text:span text:style-name="T16">Input</text:span><text:tab/>DIN : DWORD (Daten Eingang)</text:p>
      <text:p text:style-name="P183"><text:tab/>WR : BOOL (TRUE = Schreiben und FALSE = Lesen)</text:p>
      <text:p text:style-name="P80"><text:tab/>E : BOOL (Freigabe Eingang)</text:p>
      <text:p text:style-name="P80"><text:tab/>RST : BOOL (Reset Eingang)</text:p>
      <text:p text:style-name="P25">Output<text:tab/>DOUT : DWORD (Daten Ausgang)</text:p>
      <text:p text:style-name="P25"><text:tab/>EMPTY : BOOL (EMPTY = TRUE bedeutet: Speicher ist Leer)</text:p>
      <text:p text:style-name="P25"><draw:frame draw:style-name="fr4" draw:name="Grafik81" text:anchor-type="paragraph" svg:x="1.115cm" svg:y="0.688cm" svg:width="2.731cm" svg:height="2.649cm" draw:z-index="48"><draw:image xlink:href="Pictures/10000000000000CE000000C80AE798CD.png" xlink:type="simple" xlink:show="embed" xlink:actuate="onLoad"/></draw:frame><text:tab/>FULL : BOOL (FULL = TRUE bedeutet: Speicher ist Voll)</text:p>
      <text:p text:style-name="P25"><text:line-break/>FIFO_32 ist ein First-In First-<text:span text:style-name="T16">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xml:id="list33643785" text:continue-numbering="true" text:style-name="L1">
        <text:list-item>
          <text:list>
            <text:list-item>
              <text:h text:style-name="P217" text:outline-level="2"><text:alphabetical-index-mark-start text:id="IMark100843576"/>STACK_16<text:alphabetical-index-mark-end text:id="IMark100843576"/></text:h>
            </text:list-item>
          </text:list>
        </text:list-item>
      </text:list>
      <text:p text:style-name="P22">Type<text:tab/>Funktionsbaustein</text:p>
      <text:p text:style-name="P35">Input<text:tab/>DIN : DWORD (Daten Eingang)</text:p>
      <text:p text:style-name="P22"><text:tab/>WR : BOOL (TRUE = Schreiben und FALSE = Lesen)</text:p>
      <text:p text:style-name="P22"><text:tab/>E : BOOL (Freigabe Eingang)</text:p>
      <text:p text:style-name="P22"><text:tab/>RST : BOOL (Reset Eingang)</text:p>
      <text:p text:style-name="P25">Output<text:tab/>DOUT : DWORD (Daten Ausgang)</text:p>
      <text:p text:style-name="P25"><text:tab/>EMPTY : BOOL (EMPTY = TRUE bedeutet: Speicher ist Leer)</text:p>
      <text:p text:style-name="P25"><draw:frame draw:style-name="fr8" draw:name="Grafik82" text:anchor-type="paragraph" svg:x="1.268cm" svg:y="1.034cm" svg:width="2.731cm" svg:height="2.649cm" draw:z-index="66"><draw:image xlink:href="Pictures/10000000000000CE000000C8B953B81E.png" xlink:type="simple" xlink:show="embed" xlink:actuate="onLoad"/></draw:frame><text:tab/>FULL : BOOL (FULL = TRUE bedeutet: Speicher ist Voll)</text:p>
      <text:p text:style-name="Standard"><text:soft-page-break/><text:line-break/>STACK_16 ist ein <text:span text:style-name="T38">Last</text:span>-In First-<text:span text:style-name="T16">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3646680" text:continue-numbering="true" text:style-name="L1">
        <text:list-item>
          <text:list>
            <text:list-item>
              <text:h text:style-name="P217" text:outline-level="2"><text:alphabetical-index-mark-start text:id="IMark100843576"/>STACK_32<text:alphabetical-index-mark-end text:id="IMark100843576"/></text:h>
            </text:list-item>
          </text:list>
        </text:list-item>
      </text:list>
      <text:p text:style-name="P22">Type<text:tab/>Funktionsbaustein</text:p>
      <text:p text:style-name="P22"><text:span text:style-name="T16">Input</text:span><text:tab/>DIN : DWORD (Daten Eingang)</text:p>
      <text:p text:style-name="P22"><text:tab/>RW : BOOL (TRUE = Schreiben und FALSE = Lesen)</text:p>
      <text:p text:style-name="P22"><text:tab/>E : BOOL (Freigabe Eingang)</text:p>
      <text:p text:style-name="P22"><text:tab/>RST : BOOL (Reset Eingang)</text:p>
      <text:p text:style-name="P25">Output<text:tab/>DOUT : DWORD (Daten Ausgang)</text:p>
      <text:p text:style-name="P25"><text:tab/>EMPTY : BOOL (EMPTY = TRUE bedeutet: Speicher ist Leer)</text:p>
      <text:p text:style-name="P25"><draw:frame draw:style-name="fr4" draw:name="Grafik83" text:anchor-type="paragraph" svg:x="1.113cm" svg:y="0.649cm" svg:width="2.731cm" svg:height="2.649cm" draw:z-index="49"><draw:image xlink:href="Pictures/10000000000000CE000000C81F4C5D51.png" xlink:type="simple" xlink:show="embed" xlink:actuate="onLoad"/></draw:frame><text:tab/>FULL : BOOL (FULL = TRUE bedeutet: Speicher ist Voll)</text:p>
      <text:p text:style-name="P25"><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3630722" text:continue-numbering="true" text:style-name="L1">
        <text:list-item>
          <text:h text:style-name="P211" text:outline-level="1">Takt Generatoren</text:h>
        </text:list-item>
      </text:list>
      <text:p text:style-name="P16"/>
      <text:list xml:id="list33654660" text:continue-numbering="true" text:style-name="L1">
        <text:list-item>
          <text:list>
            <text:list-item>
              <text:h text:style-name="P217" text:outline-level="2"><text:alphabetical-index-mark-start text:id="IMark100843576"/>A_TRIG<text:alphabetical-index-mark-end text:id="IMark100843576"/></text:h>
            </text:list-item>
          </text:list>
        </text:list-item>
      </text:list>
      <text:p text:style-name="P22">Type<text:tab/>Funktionsbaustein</text:p>
      <text:p text:style-name="P22"><text:span text:style-name="T16">Input</text:span><text:tab/>IN : BOOL (Eingangssignal)</text:p>
      <text:p text:style-name="P52"><text:tab/>RES : REAL (Auflösung für Eingangsveränderung)</text:p>
      <text:p text:style-name="P25">Output<text:tab/>Q : BOOL (Ausgangssignal)</text:p>
      <text:p text:style-name="P55"><text:tab/>D : REAL (letzte Veränderung des Eingangssignals)</text:p>
      <text:p text:style-name="P55"><draw:frame draw:style-name="fr4" draw:name="Grafik669" text:anchor-type="paragraph" svg:x="1.025cm" svg:y="0.012cm" svg:width="2.101cm" svg:height="1.52cm" draw:z-index="692"><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xml:id="list33644540" text:continue-numbering="true" text:style-name="L1">
        <text:list-item>
          <text:list>
            <text:list-item>
              <text:h text:style-name="P217" text:outline-level="2"><text:alphabetical-index-mark-start text:id="IMark100843576"/>B_TRIG<text:alphabetical-index-mark-end text:id="IMark100843576"/></text:h>
            </text:list-item>
          </text:list>
        </text:list-item>
      </text:list>
      <text:p text:style-name="P22">Type<text:tab/>Funktionsbaustein</text:p>
      <text:p text:style-name="P22"><text:span text:style-name="T16">Input</text:span><text:tab/>CLK : BOOL (Eingangssignal)</text:p>
      <text:p text:style-name="P25"><draw:frame draw:style-name="fr4" draw:name="Grafik84" text:anchor-type="paragraph" svg:x="1.072cm" svg:y="0.649cm" svg:width="2.281cm" svg:height="1.3cm" draw:z-index="50"><draw:image xlink:href="Pictures/10000000000000AC00000062B81667F0.png" xlink:type="simple" xlink:show="embed" xlink:actuate="onLoad"/></draw:frame>Output<text:tab/>Q : BOOL (Ausgangssignal)</text:p>
      <text:p text:style-name="P25"><text:line-break/>Der Funktionsbaustein B_TRIG erzeugt nach einem Flankenwechsel am Eingang <text:soft-page-break/>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55"><draw:g text:anchor-type="paragraph" draw:z-index="51" draw:style-name="gr1"><draw:line draw:style-name="gr2" draw:text-style-name="P251" svg:x1="2.84cm" svg:y1="0.418cm" svg:x2="3.84cm" svg:y2="0.418cm"><text:p/></draw:line><draw:line draw:style-name="gr2" draw:text-style-name="P251" svg:x1="3.84cm" svg:y1="-0.081cm" svg:x2="3.84cm" svg:y2="0.418cm"><text:p/></draw:line><draw:line draw:style-name="gr2" draw:text-style-name="P251" svg:x1="3.84cm" svg:y1="-0.081cm" svg:x2="6.84cm" svg:y2="-0.081cm"><text:p/></draw:line><draw:line draw:style-name="gr2" draw:text-style-name="P251" svg:x1="6.839cm" svg:y1="0.418cm" svg:x2="6.839cm" svg:y2="-0.081cm"><text:p/></draw:line><draw:line draw:style-name="gr2" draw:text-style-name="P251" svg:x1="6.839cm" svg:y1="0.418cm" svg:x2="8.338cm" svg:y2="0.418cm"><text:p/></draw:line><draw:line draw:style-name="gr2" draw:text-style-name="P251" svg:x1="8.34cm" svg:y1="-0.081cm" svg:x2="8.34cm" svg:y2="0.418cm"><text:p/></draw:line><draw:line draw:style-name="gr2" draw:text-style-name="P251" svg:x1="8.34cm" svg:y1="-0.081cm" svg:x2="10.09cm" svg:y2="-0.081cm"><text:p/></draw:line><draw:line draw:style-name="gr3" draw:text-style-name="P251" svg:x1="3.84cm" svg:y1="0.919cm" svg:x2="3.84cm" svg:y2="1.418cm"><text:p/></draw:line><draw:line draw:style-name="gr3" draw:text-style-name="P251" svg:x1="2.84cm" svg:y1="1.418cm" svg:x2="3.84cm" svg:y2="1.418cm"><text:p/></draw:line><draw:line draw:style-name="gr3" draw:text-style-name="P251" svg:x1="3.84cm" svg:y1="0.919cm" svg:x2="4.09cm" svg:y2="0.919cm"><text:p/></draw:line><draw:line draw:style-name="gr3" draw:text-style-name="P251" svg:x1="4.089cm" svg:y1="1.418cm" svg:x2="4.089cm" svg:y2="0.919cm"><text:p/></draw:line><draw:line draw:style-name="gr3" draw:text-style-name="P251" svg:x1="4.089cm" svg:y1="1.418cm" svg:x2="6.839cm" svg:y2="1.418cm"><text:p/></draw:line><draw:line draw:style-name="gr3" draw:text-style-name="P251" svg:x1="6.839cm" svg:y1="0.919cm" svg:x2="6.839cm" svg:y2="1.418cm"><text:p/></draw:line><draw:line draw:style-name="gr3" draw:text-style-name="P251" svg:x1="6.839cm" svg:y1="0.919cm" svg:x2="7.089cm" svg:y2="0.919cm"><text:p/></draw:line><draw:line draw:style-name="gr3" draw:text-style-name="P251" svg:x1="7.091cm" svg:y1="1.418cm" svg:x2="7.091cm" svg:y2="0.919cm"><text:p/></draw:line><draw:line draw:style-name="gr3" draw:text-style-name="P251" svg:x1="7.091cm" svg:y1="1.418cm" svg:x2="8.34cm" svg:y2="1.418cm"><text:p/></draw:line><draw:line draw:style-name="gr3" draw:text-style-name="P251" svg:x1="8.34cm" svg:y1="0.919cm" svg:x2="8.34cm" svg:y2="1.418cm"><text:p/></draw:line><draw:line draw:style-name="gr3" draw:text-style-name="P251" svg:x1="8.34cm" svg:y1="0.919cm" svg:x2="8.59cm" svg:y2="0.919cm"><text:p/></draw:line><draw:line draw:style-name="gr3" draw:text-style-name="P251" svg:x1="8.59cm" svg:y1="1.418cm" svg:x2="8.59cm" svg:y2="0.919cm"><text:p/></draw:line><draw:line draw:style-name="gr3" draw:text-style-name="P251" svg:x1="8.59cm" svg:y1="1.418cm" svg:x2="10.089cm" svg:y2="1.418cm"><text:p/></draw:line><draw:line draw:style-name="gr4" draw:text-style-name="P251" svg:x1="8.34cm" svg:y1="2.418cm" svg:x2="8.34cm" svg:y2="1.919cm"><text:p/></draw:line><draw:line draw:style-name="gr4" draw:text-style-name="P251" svg:x1="8.59cm" svg:y1="1.919cm" svg:x2="8.34cm" svg:y2="1.919cm"><text:p/></draw:line><draw:line draw:style-name="gr4" draw:text-style-name="P251" svg:x1="8.59cm" svg:y1="1.919cm" svg:x2="8.59cm" svg:y2="2.418cm"><text:p/></draw:line><draw:line draw:style-name="gr4" draw:text-style-name="P251" svg:x1="3.84cm" svg:y1="2.418cm" svg:x2="3.84cm" svg:y2="1.919cm"><text:p/></draw:line><draw:line draw:style-name="gr4" draw:text-style-name="P251" svg:x1="4.09cm" svg:y1="1.919cm" svg:x2="3.84cm" svg:y2="1.919cm"><text:p/></draw:line><draw:line draw:style-name="gr4" draw:text-style-name="P251" svg:x1="4.089cm" svg:y1="1.919cm" svg:x2="4.089cm" svg:y2="2.418cm"><text:p/></draw:line><draw:line draw:style-name="gr4" draw:text-style-name="P251" svg:x1="8.338cm" svg:y1="2.417cm" svg:x2="4.089cm" svg:y2="2.417cm"><text:p/></draw:line><draw:line draw:style-name="gr4" draw:text-style-name="P251" svg:x1="2.84cm" svg:y1="2.417cm" svg:x2="3.84cm" svg:y2="2.417cm"><text:p/></draw:line><draw:line draw:style-name="gr4" draw:text-style-name="P251" svg:x1="8.59cm" svg:y1="2.417cm" svg:x2="10.089cm" svg:y2="2.417cm"><text:p/></draw:line><draw:line draw:style-name="gr5" draw:text-style-name="P251" svg:x1="2.84cm" svg:y1="3.42cm" svg:x2="6.841cm" svg:y2="3.42cm"><text:p/></draw:line><draw:line draw:style-name="gr5" draw:text-style-name="P251" svg:x1="7.091cm" svg:y1="2.919cm" svg:x2="7.091cm" svg:y2="3.418cm"><text:p/></draw:line><draw:line draw:style-name="gr5" draw:text-style-name="P251" svg:x1="6.839cm" svg:y1="2.919cm" svg:x2="6.839cm" svg:y2="3.418cm"><text:p/></draw:line><draw:line draw:style-name="gr5" draw:text-style-name="P251" svg:x1="7.089cm" svg:y1="2.919cm" svg:x2="6.839cm" svg:y2="2.919cm"><text:p/></draw:line><draw:line draw:style-name="gr5" draw:text-style-name="P251" svg:x1="7.091cm" svg:y1="3.42cm" svg:x2="10.09cm" svg:y2="3.42cm"><text:p/></draw:line><draw:frame draw:style-name="gr6" draw:text-style-name="P253" svg:width="1.752cm" svg:height="0.65cm" svg:x="1.09cm" svg:y="-0.081cm"><draw:text-box><text:p text:style-name="P252"><text:span text:style-name="T50">CLK</text:span></text:p></draw:text-box></draw:frame><draw:frame draw:style-name="gr6" draw:text-style-name="P253" svg:width="1.752cm" svg:height="0.65cm" svg:x="1.09cm" svg:y="1.919cm"><draw:text-box><text:p text:style-name="P252"><text:span text:style-name="T50">R_TRIG</text:span></text:p></draw:text-box></draw:frame><draw:frame draw:style-name="gr6" draw:text-style-name="P253" svg:width="1.752cm" svg:height="0.65cm" svg:x="1.09cm" svg:y="2.919cm"><draw:text-box><text:p text:style-name="P252"><text:span text:style-name="T50">F_TRIG</text:span></text:p></draw:text-box></draw:frame><draw:frame draw:style-name="gr6" draw:text-style-name="P253" svg:width="1.752cm" svg:height="0.65cm" svg:x="1.09cm" svg:y="0.919cm"><draw:text-box><text:p text:style-name="P252"><text:span text:style-name="T50">B_TRIG</text:span></text:p></draw:text-box></draw:frame></draw:g></text:p>
      <text:list xml:id="list33634899" text:continue-numbering="true" text:style-name="L1">
        <text:list-item>
          <text:list>
            <text:list-item>
              <text:h text:style-name="P217" text:outline-level="2"><text:alphabetical-index-mark-start text:id="IMark100843576"/>CLICK_CNT<text:alphabetical-index-mark-end text:id="IMark100843576"/></text:h>
            </text:list-item>
          </text:list>
        </text:list-item>
      </text:list>
      <text:p text:style-name="P22">Type<text:tab/>Funktionsbaustein</text:p>
      <text:p text:style-name="P22"><text:span text:style-name="T16">Input</text:span><text:tab/>IN : BOOL (Eingangssignal)</text:p>
      <text:p text:style-name="P52"><text:tab/>N : INT (Anzahl der zu dekodierenden <text:span text:style-name="T16">Clicks</text:span>)</text:p>
      <text:p text:style-name="P52"><text:tab/>TC : TIME (Zeit in der die <text:span text:style-name="T16">Clicks</text:span> stattfinden müssen)</text:p>
      <text:p text:style-name="P25"><draw:frame draw:style-name="fr4" draw:name="Grafik670" text:anchor-type="paragraph" svg:x="1.046cm" svg:y="0.688cm" svg:width="2.499cm" svg:height="1.921cm" draw:z-index="693"><draw:image xlink:href="Pictures/10000000000000BD00000091CC3878A4.png" xlink:type="simple" xlink:show="embed" xlink:actuate="onLoad"/></draw:frame>Output<text:tab/>Q : BOOL (Ausgangssignal)</text:p>
      <text:p text:style-name="P55"><text:line-break/>CLICK_CNT ermittelt die Anzahl <text:span text:style-name="T16">der Impulse</text:span> innerhalb der Zeiteinheit TC.am Eingang IN. Eine steigende Flanke an IN startet einen internen <text:span text:style-name="T16">Timer</text:span> mit der Zeit TC. Während des Ablaufs des <text:span text:style-name="T16">Timers</text:span>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p>
      <text:p text:style-name="P55"><draw:frame draw:style-name="fr4" draw:name="Grafik671" text:anchor-type="paragraph" svg:x="1.199cm" svg:y="0.139cm" svg:width="10.291cm" svg:height="2.611cm" draw:z-index="694"><draw:image xlink:href="Pictures/100000000000030A000000C546DE1D94.png" xlink:type="simple" xlink:show="embed" xlink:actuate="onLoad"/></draw:frame></text:p>
      <text:list xml:id="list33627180" text:continue-numbering="true" text:style-name="L1">
        <text:list-item>
          <text:list>
            <text:list-item>
              <text:h text:style-name="P217" text:outline-level="2"><text:soft-page-break/><text:alphabetical-index-mark-start text:id="IMark100843576"/>CLICK_DEC<text:alphabetical-index-mark-end text:id="IMark100843576"/></text:h>
            </text:list-item>
          </text:list>
        </text:list-item>
      </text:list>
      <text:p text:style-name="P22">Type<text:tab/>Funktionsbaustein</text:p>
      <text:p text:style-name="P22"><text:span text:style-name="T16">Input</text:span><text:tab/>IN : BOOL (Eingangssignal)</text:p>
      <text:p text:style-name="P52"><text:tab/>TC : TIME (Zeit in der die <text:span text:style-name="T16">Clicks</text:span> stattfinden müssen)</text:p>
      <text:p text:style-name="P25">Output<text:tab/>Q0 : BOOL (Ausgangssignal für steigende Flanke ohne fallende Flanke)</text:p>
      <text:p text:style-name="P25"><text:tab/>Q1 : BOOL (Ausgangssignal für einen Impuls innerhalb TC)</text:p>
      <text:p text:style-name="P25"><text:tab/>Q2 : BOOL (Ausgangssignal für 2 Impulse innerhalb TC)</text:p>
      <text:p text:style-name="P25"><draw:frame draw:style-name="fr4" draw:name="Grafik672" text:anchor-type="paragraph" svg:x="1.177cm" svg:y="0.681cm" svg:width="2.671cm" svg:height="2.311cm" draw:z-index="695"><draw:image xlink:href="Pictures/10000000000000CA000000AF4E414A24.png" xlink:type="simple" xlink:show="embed" xlink:actuate="onLoad"/></draw:frame><text:tab/>Q3 : BOOL (Ausgangssignal für 3 Impulse innerhalb TC)</text:p>
      <text:p text:style-name="P55"><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55"><draw:frame draw:style-name="fr4" draw:name="Grafik673" text:anchor-type="paragraph" svg:x="1.111cm" svg:y="0.005cm" svg:width="10.28cm" svg:height="2.739cm" draw:z-index="696"><draw:image xlink:href="Pictures/1000000000000309000000CFA00A0588.png" xlink:type="simple" xlink:show="embed" xlink:actuate="onLoad"/></draw:frame> <text:s/></text:p>
      <text:list xml:id="list33624180" text:continue-numbering="true" text:style-name="L1">
        <text:list-item>
          <text:list>
            <text:list-item>
              <text:h text:style-name="P217" text:outline-level="2"><text:alphabetical-index-mark-start text:id="IMark100843576"/>CLK_1MS<text:alphabetical-index-mark-end text:id="IMark100843576"/></text:h>
            </text:list-item>
          </text:list>
        </text:list-item>
      </text:list>
      <text:p text:style-name="P25">Der Baustein CLK_1ms wurde ab der <text:span text:style-name="T16">Release</text:span> 26 mit dem Baustein CLK_N ersetzt.</text:p>
      <text:list xml:id="list33644987" text:continue-numbering="true" text:style-name="L1">
        <text:list-item>
          <text:list>
            <text:list-item>
              <text:h text:style-name="P217" text:outline-level="2"><text:soft-page-break/><text:alphabetical-index-mark-start text:id="IMark100843576"/>CLK_2MS<text:alphabetical-index-mark-end text:id="IMark100843576"/></text:h>
            </text:list-item>
          </text:list>
        </text:list-item>
      </text:list>
      <text:p text:style-name="P25">Der Baustein CLK_2ms wurde ab der <text:span text:style-name="T16">Release</text:span> 26 mit dem Baustein CLK_N ersetzt.</text:p>
      <text:list xml:id="list33632590" text:continue-numbering="true" text:style-name="L1">
        <text:list-item>
          <text:list>
            <text:list-item>
              <text:h text:style-name="P217" text:outline-level="2"><text:alphabetical-index-mark-start text:id="IMark100843576"/>CLK_4MS<text:alphabetical-index-mark-end text:id="IMark100843576"/></text:h>
            </text:list-item>
          </text:list>
        </text:list-item>
      </text:list>
      <text:p text:style-name="P25">Der Baustein CLK_4ms wurde ab der <text:span text:style-name="T16">Release</text:span> 26 mit dem Baustein CLK_N ersetzt.</text:p>
      <text:list xml:id="list33640267" text:continue-numbering="true" text:style-name="L1">
        <text:list-item>
          <text:list>
            <text:list-item>
              <text:h text:style-name="P217" text:outline-level="2"><text:alphabetical-index-mark-start text:id="IMark100843576"/>CLK_8MS<text:alphabetical-index-mark-end text:id="IMark100843576"/></text:h>
            </text:list-item>
          </text:list>
        </text:list-item>
      </text:list>
      <text:p text:style-name="P25">Der Baustein CLK_8ms wurde ab der <text:span text:style-name="T16">Release</text:span> 26 mit dem Baustein CLK_N ersetzt.</text:p>
      <text:list xml:id="list33655397" text:continue-numbering="true" text:style-name="L1">
        <text:list-item>
          <text:list>
            <text:list-item>
              <text:h text:style-name="P217" text:outline-level="2"><text:alphabetical-index-mark-start text:id="IMark100843576"/>CLK_DIV<text:alphabetical-index-mark-end text:id="IMark100843576"/></text:h>
            </text:list-item>
          </text:list>
        </text:list-item>
      </text:list>
      <text:p text:style-name="P22">Type<text:tab/>Funktionsbaustein</text:p>
      <text:p text:style-name="P22"><text:span text:style-name="T16">Input</text:span><text:tab/>CLK : BOOL (<text:span text:style-name="T16">Clock</text:span> Eingang)</text:p>
      <text:p text:style-name="P22"><text:tab/>RST : BOOL (Reset Eingang)</text:p>
      <text:p text:style-name="P25">Output<text:tab/>Q0 : BOOL (Teiler Ausgang CLK / 2)</text:p>
      <text:p text:style-name="P25"><text:tab/>Q1 : BOOL (Teiler Ausgang CLK / 4)</text:p>
      <text:p text:style-name="P25"><text:tab/>Q2 : BOOL (Teiler Ausgang CLK / 8)</text:p>
      <text:p text:style-name="P25"><text:tab/>Q3 : BOOL (Teiler Ausgang CLK / 16)</text:p>
      <text:p text:style-name="P25"><text:tab/>Q4 : BOOL (Teiler Ausgang CLK / 32)</text:p>
      <text:p text:style-name="P25"><text:tab/>Q5 : BOOL (Teiler Ausgang CLK / 64)</text:p>
      <text:p text:style-name="P25"><text:tab/>Q6 : BOOL (Teiler Ausgang CLK / 128)</text:p>
      <text:p text:style-name="P25"><draw:frame draw:style-name="fr4" draw:name="Grafik89" text:anchor-type="paragraph" svg:x="1.138cm" svg:y="0.607cm" svg:width="2.281cm" svg:height="4.44cm" draw:z-index="52"><draw:image xlink:href="Pictures/10000000000000AC00000150E7828D1A.png" xlink:type="simple" xlink:show="embed" xlink:actuate="onLoad"/></draw:frame><text:tab/>Q7 : BOOL (Teiler Ausgang CLK / 256)</text:p>
      <text:p text:style-name="P25"><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25"><draw:g text:anchor-type="paragraph" draw:z-index="419" draw:style-name="gr1"><draw:line draw:style-name="gr3" draw:text-style-name="P251" svg:x1="2.548cm" svg:y1="0.116cm" svg:x2="2.548cm" svg:y2="0.615cm"><text:p/></draw:line><draw:line draw:style-name="gr3" draw:text-style-name="P251" svg:x1="2.049cm" svg:y1="0.612cm" svg:x2="2.548cm" svg:y2="0.612cm"><text:p/></draw:line><draw:line draw:style-name="gr3" draw:text-style-name="P251" svg:x1="2.548cm" svg:y1="0.116cm" svg:x2="2.798cm" svg:y2="0.116cm"><text:p/></draw:line><draw:line draw:style-name="gr3" draw:text-style-name="P251" svg:x1="2.802cm" svg:y1="0.615cm" svg:x2="2.802cm" svg:y2="0.116cm"><text:p/></draw:line><draw:line draw:style-name="gr3" draw:text-style-name="P251" svg:x1="2.802cm" svg:y1="0.612cm" svg:x2="3.552cm" svg:y2="0.612cm"><text:p/></draw:line><draw:frame draw:style-name="gr6" draw:text-style-name="P253" svg:width="1.251cm" svg:height="0.65cm" svg:x="1.05cm" svg:y="0.116cm"><draw:text-box><text:p text:style-name="P252"><text:span text:style-name="T50">CLK</text:span></text:p></draw:text-box></draw:frame><draw:line draw:style-name="gr3" draw:text-style-name="P251" svg:x1="3.549cm" svg:y1="0.116cm" svg:x2="3.549cm" svg:y2="0.615cm"><text:p/></draw:line><draw:line draw:style-name="gr3" draw:text-style-name="P251" svg:x1="3.549cm" svg:y1="0.116cm" svg:x2="3.799cm" svg:y2="0.116cm"><text:p/></draw:line><draw:line draw:style-name="gr3" draw:text-style-name="P251" svg:x1="3.803cm" svg:y1="0.615cm" svg:x2="3.803cm" svg:y2="0.116cm"><text:p/></draw:line><draw:line draw:style-name="gr3" draw:text-style-name="P251" svg:x1="3.803cm" svg:y1="0.612cm" svg:x2="4.553cm" svg:y2="0.612cm"><text:p/></draw:line><draw:line draw:style-name="gr3" draw:text-style-name="P251" svg:x1="4.55cm" svg:y1="0.116cm" svg:x2="4.55cm" svg:y2="0.615cm"><text:p/></draw:line><draw:line draw:style-name="gr3" draw:text-style-name="P251" svg:x1="4.55cm" svg:y1="0.116cm" svg:x2="4.8cm" svg:y2="0.116cm"><text:p/></draw:line><draw:line draw:style-name="gr3" draw:text-style-name="P251" svg:x1="4.799cm" svg:y1="0.615cm" svg:x2="4.799cm" svg:y2="0.116cm"><text:p/></draw:line><draw:line draw:style-name="gr3" draw:text-style-name="P251" svg:x1="4.799cm" svg:y1="0.612cm" svg:x2="5.549cm" svg:y2="0.612cm"><text:p/></draw:line><draw:line draw:style-name="gr3" draw:text-style-name="P251" svg:x1="5.551cm" svg:y1="0.116cm" svg:x2="5.551cm" svg:y2="0.615cm"><text:p/></draw:line><draw:line draw:style-name="gr3" draw:text-style-name="P251" svg:x1="5.551cm" svg:y1="0.116cm" svg:x2="5.801cm" svg:y2="0.116cm"><text:p/></draw:line><draw:line draw:style-name="gr3" draw:text-style-name="P251" svg:x1="5.799cm" svg:y1="0.615cm" svg:x2="5.799cm" svg:y2="0.116cm"><text:p/></draw:line><draw:line draw:style-name="gr3" draw:text-style-name="P251" svg:x1="5.799cm" svg:y1="0.612cm" svg:x2="6.549cm" svg:y2="0.612cm"><text:p/></draw:line><draw:line draw:style-name="gr3" draw:text-style-name="P251" svg:x1="6.552cm" svg:y1="0.116cm" svg:x2="6.552cm" svg:y2="0.615cm"><text:p/></draw:line><draw:line draw:style-name="gr3" draw:text-style-name="P251" svg:x1="6.552cm" svg:y1="0.116cm" svg:x2="6.802cm" svg:y2="0.116cm"><text:p/></draw:line><draw:line draw:style-name="gr3" draw:text-style-name="P251" svg:x1="6.799cm" svg:y1="0.615cm" svg:x2="6.799cm" svg:y2="0.116cm"><text:p/></draw:line><draw:line draw:style-name="gr3" draw:text-style-name="P251" svg:x1="6.799cm" svg:y1="0.612cm" svg:x2="7.549cm" svg:y2="0.612cm"><text:p/></draw:line><draw:line draw:style-name="gr3" draw:text-style-name="P251" svg:x1="7.553cm" svg:y1="0.116cm" svg:x2="7.553cm" svg:y2="0.615cm"><text:p/></draw:line><draw:line draw:style-name="gr3" draw:text-style-name="P251" svg:x1="7.553cm" svg:y1="0.116cm" svg:x2="7.803cm" svg:y2="0.116cm"><text:p/></draw:line><draw:line draw:style-name="gr3" draw:text-style-name="P251" svg:x1="7.8cm" svg:y1="0.615cm" svg:x2="7.8cm" svg:y2="0.116cm"><text:p/></draw:line><draw:line draw:style-name="gr3" draw:text-style-name="P251" svg:x1="7.8cm" svg:y1="0.612cm" svg:x2="8.299cm" svg:y2="0.612cm"><text:p/></draw:line><draw:line draw:style-name="gr3" draw:text-style-name="P251" svg:x1="2.548cm" svg:y1="0.12cm" svg:x2="2.548cm" svg:y2="0.619cm"><text:p/></draw:line><draw:line draw:style-name="gr3" draw:text-style-name="P251" svg:x1="2.049cm" svg:y1="0.617cm" svg:x2="2.548cm" svg:y2="0.617cm"><text:p/></draw:line><draw:line draw:style-name="gr3" draw:text-style-name="P251" svg:x1="2.548cm" svg:y1="0.12cm" svg:x2="2.798cm" svg:y2="0.12cm"><text:p/></draw:line><draw:line draw:style-name="gr3" draw:text-style-name="P251" svg:x1="2.802cm" svg:y1="0.619cm" svg:x2="2.802cm" svg:y2="0.12cm"><text:p/></draw:line><draw:line draw:style-name="gr3" draw:text-style-name="P251" svg:x1="2.802cm" svg:y1="0.617cm" svg:x2="3.552cm" svg:y2="0.617cm"><text:p/></draw:line><draw:frame draw:style-name="gr6" draw:text-style-name="P253" svg:width="1.251cm" svg:height="0.65cm" svg:x="1.05cm" svg:y="0.118cm"><draw:text-box><text:p text:style-name="P252"><text:span text:style-name="T50">CLK</text:span></text:p></draw:text-box></draw:frame><draw:line draw:style-name="gr3" draw:text-style-name="P251" svg:x1="3.549cm" svg:y1="0.12cm" svg:x2="3.549cm" svg:y2="0.619cm"><text:p/></draw:line><draw:line draw:style-name="gr3" draw:text-style-name="P251" svg:x1="3.549cm" svg:y1="0.12cm" svg:x2="3.799cm" svg:y2="0.12cm"><text:p/></draw:line><draw:line draw:style-name="gr3" draw:text-style-name="P251" svg:x1="3.803cm" svg:y1="0.619cm" svg:x2="3.803cm" svg:y2="0.12cm"><text:p/></draw:line><draw:line draw:style-name="gr3" draw:text-style-name="P251" svg:x1="3.803cm" svg:y1="0.617cm" svg:x2="4.553cm" svg:y2="0.617cm"><text:p/></draw:line><draw:line draw:style-name="gr3" draw:text-style-name="P251" svg:x1="4.55cm" svg:y1="0.12cm" svg:x2="4.55cm" svg:y2="0.619cm"><text:p/></draw:line><draw:line draw:style-name="gr3" draw:text-style-name="P251" svg:x1="4.55cm" svg:y1="0.12cm" svg:x2="4.8cm" svg:y2="0.12cm"><text:p/></draw:line><draw:line draw:style-name="gr3" draw:text-style-name="P251" svg:x1="4.799cm" svg:y1="0.619cm" svg:x2="4.799cm" svg:y2="0.12cm"><text:p/></draw:line><draw:line draw:style-name="gr3" draw:text-style-name="P251" svg:x1="4.799cm" svg:y1="0.617cm" svg:x2="5.549cm" svg:y2="0.617cm"><text:p/></draw:line><draw:line draw:style-name="gr3" draw:text-style-name="P251" svg:x1="5.551cm" svg:y1="0.12cm" svg:x2="5.551cm" svg:y2="0.619cm"><text:p/></draw:line><draw:line draw:style-name="gr3" draw:text-style-name="P251" svg:x1="5.551cm" svg:y1="0.12cm" svg:x2="5.801cm" svg:y2="0.12cm"><text:p/></draw:line><draw:line draw:style-name="gr3" draw:text-style-name="P251" svg:x1="5.799cm" svg:y1="0.619cm" svg:x2="5.799cm" svg:y2="0.12cm"><text:p/></draw:line><draw:line draw:style-name="gr3" draw:text-style-name="P251" svg:x1="5.799cm" svg:y1="0.617cm" svg:x2="6.549cm" svg:y2="0.617cm"><text:p/></draw:line><draw:line draw:style-name="gr3" draw:text-style-name="P251" svg:x1="6.552cm" svg:y1="0.12cm" svg:x2="6.552cm" svg:y2="0.619cm"><text:p/></draw:line><draw:line draw:style-name="gr3" draw:text-style-name="P251" svg:x1="6.552cm" svg:y1="0.12cm" svg:x2="6.802cm" svg:y2="0.12cm"><text:p/></draw:line><draw:line draw:style-name="gr3" draw:text-style-name="P251" svg:x1="6.799cm" svg:y1="0.619cm" svg:x2="6.799cm" svg:y2="0.12cm"><text:p/></draw:line><draw:line draw:style-name="gr3" draw:text-style-name="P251" svg:x1="6.799cm" svg:y1="0.617cm" svg:x2="7.549cm" svg:y2="0.617cm"><text:p/></draw:line><draw:line draw:style-name="gr3" draw:text-style-name="P251" svg:x1="7.553cm" svg:y1="0.12cm" svg:x2="7.553cm" svg:y2="0.619cm"><text:p/></draw:line><draw:line draw:style-name="gr3" draw:text-style-name="P251" svg:x1="7.553cm" svg:y1="0.12cm" svg:x2="7.803cm" svg:y2="0.12cm"><text:p/></draw:line><draw:line draw:style-name="gr3" draw:text-style-name="P251" svg:x1="7.8cm" svg:y1="0.619cm" svg:x2="7.8cm" svg:y2="0.12cm"><text:p/></draw:line><draw:line draw:style-name="gr3" draw:text-style-name="P251" svg:x1="7.8cm" svg:y1="0.614cm" svg:x2="8.299cm" svg:y2="0.612cm"><text:p/></draw:line><draw:line draw:style-name="gr2" draw:text-style-name="P251" svg:x1="2.049cm" svg:y1="1.367cm" svg:x2="2.548cm" svg:y2="1.367cm"><text:p/></draw:line><draw:line draw:style-name="gr2" draw:text-style-name="P251" svg:x1="2.548cm" svg:y1="0.866cm" svg:x2="2.548cm" svg:y2="1.367cm"><text:p/></draw:line><draw:line draw:style-name="gr2" draw:text-style-name="P251" svg:x1="2.548cm" svg:y1="0.866cm" svg:x2="3.548cm" svg:y2="0.866cm"><text:p/></draw:line><draw:line draw:style-name="gr2" draw:text-style-name="P251" svg:x1="3.549cm" svg:y1="1.367cm" svg:x2="3.549cm" svg:y2="0.866cm"><text:p/></draw:line><draw:line draw:style-name="gr2" draw:text-style-name="P251" svg:x1="3.549cm" svg:y1="1.367cm" svg:x2="4.549cm" svg:y2="1.367cm"><text:p/></draw:line><draw:line draw:style-name="gr2" draw:text-style-name="P251" svg:x1="4.55cm" svg:y1="0.866cm" svg:x2="4.55cm" svg:y2="1.367cm"><text:p/></draw:line><draw:line draw:style-name="gr2" draw:text-style-name="P251" svg:x1="4.55cm" svg:y1="0.866cm" svg:x2="5.55cm" svg:y2="0.866cm"><text:p/></draw:line><draw:line draw:style-name="gr2" draw:text-style-name="P251" svg:x1="5.551cm" svg:y1="1.367cm" svg:x2="5.551cm" svg:y2="0.866cm"><text:p/></draw:line><draw:line draw:style-name="gr2" draw:text-style-name="P251" svg:x1="5.551cm" svg:y1="1.367cm" svg:x2="6.551cm" svg:y2="1.367cm"><text:p/></draw:line><draw:line draw:style-name="gr2" draw:text-style-name="P251" svg:x1="6.552cm" svg:y1="0.866cm" svg:x2="6.552cm" svg:y2="1.367cm"><text:p/></draw:line><draw:line draw:style-name="gr2" draw:text-style-name="P251" svg:x1="6.552cm" svg:y1="0.866cm" svg:x2="7.552cm" svg:y2="0.866cm"><text:p/></draw:line><draw:line draw:style-name="gr2" draw:text-style-name="P251" svg:x1="7.553cm" svg:y1="1.367cm" svg:x2="7.553cm" svg:y2="0.866cm"><text:p/></draw:line><draw:line draw:style-name="gr2" draw:text-style-name="P251" svg:x1="7.553cm" svg:y1="1.367cm" svg:x2="8.303cm" svg:y2="1.367cm"><text:p/></draw:line><draw:line draw:style-name="gr4" draw:text-style-name="P251" svg:x1="7.553cm" svg:y1="2.115cm" svg:x2="7.553cm" svg:y2="1.614cm"><text:p/></draw:line><draw:line draw:style-name="gr4" draw:text-style-name="P251" svg:x1="8.303cm" svg:y1="1.614cm" svg:x2="7.553cm" svg:y2="1.614cm"><text:p/></draw:line><draw:line draw:style-name="gr4" draw:text-style-name="P251" svg:x1="3.549cm" svg:y1="2.115cm" svg:x2="3.549cm" svg:y2="1.614cm"><text:p/></draw:line><draw:line draw:style-name="gr4" draw:text-style-name="P251" svg:x1="5.549cm" svg:y1="1.614cm" svg:x2="3.549cm" svg:y2="1.614cm"><text:p/></draw:line><draw:line draw:style-name="gr4" draw:text-style-name="P251" svg:x1="5.551cm" svg:y1="1.614cm" svg:x2="5.551cm" svg:y2="2.115cm"><text:p/></draw:line><draw:line draw:style-name="gr4" draw:text-style-name="P251" svg:x1="7.551cm" svg:y1="2.114cm" svg:x2="5.551cm" svg:y2="2.114cm"><text:p/></draw:line><draw:line draw:style-name="gr4" draw:text-style-name="P251" svg:x1="2.049cm" svg:y1="2.114cm" svg:x2="3.548cm" svg:y2="2.114cm"><text:p/></draw:line><draw:frame draw:style-name="gr6" draw:text-style-name="P253" svg:width="1.251cm" svg:height="0.65cm" svg:x="1.05cm" svg:y="0.866cm"><draw:text-box><text:p text:style-name="P252"><text:span text:style-name="T50">Q0</text:span></text:p></draw:text-box></draw:frame><draw:frame draw:style-name="gr6" draw:text-style-name="P253" svg:width="1.251cm" svg:height="0.65cm" svg:x="1.05cm" svg:y="1.615cm"><draw:text-box><text:p text:style-name="P252"><text:span text:style-name="T50">Q1</text:span></text:p></draw:text-box></draw:frame><draw:line draw:style-name="gr5" draw:text-style-name="P251" svg:x1="2.049cm" svg:y1="2.866cm" svg:x2="5.549cm" svg:y2="2.866cm"><text:p/></draw:line><draw:line draw:style-name="gr5" draw:text-style-name="P251" svg:x1="5.551cm" svg:y1="2.367cm" svg:x2="5.551cm" svg:y2="2.866cm"><text:p/></draw:line><draw:line draw:style-name="gr5" draw:text-style-name="P251" svg:x1="8.301cm" svg:y1="2.367cm" svg:x2="5.551cm" svg:y2="2.367cm"><text:p/></draw:line><draw:frame draw:style-name="gr6" draw:text-style-name="P253" svg:width="1.251cm" svg:height="0.65cm" svg:x="1.05cm" svg:y="2.367cm"><draw:text-box><text:p text:style-name="P252"><text:span text:style-name="T50">Q2</text:span></text:p></draw:text-box></draw:frame></draw:g></text:p>
      <text:p text:style-name="P55"><draw:frame draw:style-name="fr4" draw:name="Grafik90" text:anchor-type="paragraph" svg:x="1.087cm" svg:y="1.222cm" svg:width="10.28cm" svg:height="4.911cm" draw:z-index="53"><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6">Tracea</text:span>ufzeichnung der Schaltung:</text:p>
      <text:p text:style-name="P55"><draw:frame draw:style-name="fr5" draw:name="Grafik91" text:anchor-type="paragraph" svg:x="1cm" svg:y="5.514cm" svg:width="15.998cm" svg:height="7.528cm" draw:z-index="54"><draw:image xlink:href="Pictures/1000000000000321000001799953EB50.png" xlink:type="simple" xlink:show="embed" xlink:actuate="onLoad"/></draw:frame></text:p>
      <text:p text:style-name="P89"><text:soft-page-break/></text:p>
      <text:list xml:id="list33630305" text:continue-numbering="true" text:style-name="L1">
        <text:list-item>
          <text:list>
            <text:list-item>
              <text:h text:style-name="P217" text:outline-level="2"><text:alphabetical-index-mark-start text:id="IMark100843576"/>CLK_N<text:alphabetical-index-mark-end text:id="IMark100843576"/></text:h>
            </text:list-item>
          </text:list>
        </text:list-item>
      </text:list>
      <text:p text:style-name="P22">Type<text:tab/>Funktionsbaustein</text:p>
      <text:p text:style-name="P22"><text:span text:style-name="T16">Input</text:span><text:tab/>N : INT (<text:span text:style-name="T16">Clock</text:span> Teiler)</text:p>
      <text:p text:style-name="P25"><draw:frame draw:style-name="fr4" draw:name="Grafik419" text:anchor-type="paragraph" svg:x="1.067cm" svg:y="0.688cm" svg:width="2.101cm" svg:height="1.101cm" draw:z-index="413"><draw:image xlink:href="Pictures/100000000000009F000000534F7A6EA5.png" xlink:type="simple" xlink:show="embed" xlink:actuate="onLoad"/></draw:frame>Output<text:tab/>Q : BOOL (Taktausgang)</text:p>
      <text:p text:style-name="P55"><text:line-break/>CLK_N erzeugt einen Impuls alle X Millisekunden basierend auf der SPS internen 1ms Referenz. Die Impulse sind exakt einen SPS Zyklus lang und werden alle 2^N Millisekunden erzeugt.</text:p>
      <text:p text:style-name="P55">Die Periodendauer beträgt 1ms für N=0, 2ms für N=1, 4ms für N=2 usw.</text:p>
      <text:p text:style-name="P55">CLK_N ersetzt die Bausteine CLK_1ms, CLK_2ms, CLK_4ms und CLK_8ms aus älteren Bibliotheken.</text:p>
      <text:p text:style-name="P55">Das nachfolgende Bild zeigt das Ausgangssignal für N=0:</text:p>
      <text:p text:style-name="P55"><draw:g text:anchor-type="paragraph" draw:z-index="414" draw:style-name="gr1"><draw:line draw:style-name="gr3" draw:text-style-name="P251" svg:x1="2.849cm" svg:y1="0.755cm" svg:x2="2.849cm" svg:y2="1.256cm"><text:p/></draw:line><draw:line draw:style-name="gr3" draw:text-style-name="P251" svg:x1="1.85cm" svg:y1="1.256cm" svg:x2="2.85cm" svg:y2="1.256cm"><text:p/></draw:line><draw:line draw:style-name="gr3" draw:text-style-name="P251" svg:x1="2.849cm" svg:y1="0.755cm" svg:x2="3.099cm" svg:y2="0.755cm"><text:p/></draw:line><draw:line draw:style-name="gr3" draw:text-style-name="P251" svg:x1="3.099cm" svg:y1="1.256cm" svg:x2="3.099cm" svg:y2="0.755cm"><text:p/></draw:line><draw:line draw:style-name="gr3" draw:text-style-name="P251" svg:x1="3.099cm" svg:y1="1.256cm" svg:x2="4.35cm" svg:y2="1.256cm"><text:p/></draw:line><draw:line draw:style-name="gr3" draw:text-style-name="P251" svg:x1="5.849cm" svg:y1="0.755cm" svg:x2="5.849cm" svg:y2="1.256cm"><text:p/></draw:line><draw:line draw:style-name="gr3" draw:text-style-name="P251" svg:x1="5.849cm" svg:y1="0.755cm" svg:x2="6.099cm" svg:y2="0.755cm"><text:p/></draw:line><draw:line draw:style-name="gr3" draw:text-style-name="P251" svg:x1="6.101cm" svg:y1="1.256cm" svg:x2="6.101cm" svg:y2="0.755cm"><text:p/></draw:line><draw:line draw:style-name="gr3" draw:text-style-name="P251" svg:x1="6.101cm" svg:y1="1.256cm" svg:x2="7.35cm" svg:y2="1.256cm"><text:p/></draw:line><draw:line draw:style-name="gr3" draw:text-style-name="P251" svg:x1="7.348cm" svg:y1="0.755cm" svg:x2="7.348cm" svg:y2="1.256cm"><text:p/></draw:line><draw:line draw:style-name="gr3" draw:text-style-name="P251" svg:x1="7.348cm" svg:y1="0.755cm" svg:x2="7.598cm" svg:y2="0.755cm"><text:p/></draw:line><draw:line draw:style-name="gr3" draw:text-style-name="P251" svg:x1="7.599cm" svg:y1="1.256cm" svg:x2="7.599cm" svg:y2="0.755cm"><text:p/></draw:line><draw:line draw:style-name="gr3" draw:text-style-name="P251" svg:x1="7.599cm" svg:y1="1.256cm" svg:x2="8.1cm" svg:y2="1.256cm"><text:p/></draw:line><draw:frame draw:style-name="gr6" draw:text-style-name="P253" svg:width="1.251cm" svg:height="0.65cm" svg:x="1.099cm" svg:y="0.754cm"><draw:text-box><text:p text:style-name="P252"><text:span text:style-name="T50">Q</text:span></text:p></draw:text-box></draw:frame><draw:line draw:style-name="gr3" draw:text-style-name="P251" svg:x1="4.35cm" svg:y1="0.755cm" svg:x2="4.35cm" svg:y2="1.256cm"><text:p/></draw:line><draw:line draw:style-name="gr3" draw:text-style-name="P251" svg:x1="4.35cm" svg:y1="0.755cm" svg:x2="4.599cm" svg:y2="0.755cm"><text:p/></draw:line><draw:line draw:style-name="gr3" draw:text-style-name="P251" svg:x1="4.6cm" svg:y1="1.256cm" svg:x2="4.6cm" svg:y2="0.755cm"><text:p/></draw:line><draw:line draw:style-name="gr3" draw:text-style-name="P251" svg:x1="4.6cm" svg:y1="1.256cm" svg:x2="5.851cm" svg:y2="1.256cm"><text:p/></draw:line><draw:frame draw:style-name="gr6" draw:text-style-name="P253" svg:width="1.251cm" svg:height="0.65cm" svg:x="4.599cm" svg:y="0.004cm"><draw:text-box><text:p text:style-name="P252"><text:span text:style-name="T50">1 ms</text:span></text:p></draw:text-box></draw:frame><draw:line draw:style-name="gr7" draw:text-style-name="P251" svg:x1="4.35cm" svg:y1="0.254cm" svg:x2="4.849cm" svg:y2="0.254cm"><text:p/></draw:line><draw:line draw:style-name="gr7" draw:text-style-name="P251" svg:x1="5.85cm" svg:y1="0.254cm" svg:x2="5.6cm" svg:y2="0.254cm"><text:p/></draw:line></draw:g></text:p>
      <text:list xml:id="list33650062" text:continue-numbering="true" text:style-name="L1">
        <text:list-item>
          <text:list>
            <text:list-item>
              <text:h text:style-name="P217" text:outline-level="2"><text:soft-page-break/><text:alphabetical-index-mark-start text:id="IMark100843576"/>CLK_PRG<text:alphabetical-index-mark-end text:id="IMark100843576"/></text:h>
            </text:list-item>
          </text:list>
        </text:list-item>
      </text:list>
      <text:p text:style-name="P22">Type<text:tab/>Funktionsbaustein</text:p>
      <text:p text:style-name="P22"><text:span text:style-name="T16">Input</text:span><text:tab/>PT : TIME (Zykluszeit)</text:p>
      <text:p text:style-name="P25"><draw:frame draw:style-name="fr4" draw:name="Grafik92" text:anchor-type="paragraph" svg:x="1.058cm" svg:y="0.679cm" svg:width="2.281cm" svg:height="1.3cm" draw:z-index="55"><draw:image xlink:href="Pictures/10000000000000AC00000062EF71D149.png" xlink:type="simple" xlink:show="embed" xlink:actuate="onLoad"/></draw:frame>Output<text:tab/>Q : BOOL (Taktausgang)</text:p>
      <text:p text:style-name="P25"><text:line-break/>CLK_PRG erzeugt Taktimpulse mit einer programmierbaren Periodendauer PT. Die Ausgangsimpulse sind jeweils nur einen SPS Zyklus.</text:p>
      <text:p text:style-name="P25"><draw:g text:anchor-type="paragraph" draw:z-index="56" draw:style-name="gr1"><draw:line draw:style-name="gr3" draw:text-style-name="P251" svg:x1="2.847cm" svg:y1="0.718cm" svg:x2="2.847cm" svg:y2="1.219cm"><text:p/></draw:line><draw:line draw:style-name="gr3" draw:text-style-name="P251" svg:x1="1.845cm" svg:y1="1.219cm" svg:x2="2.845cm" svg:y2="1.219cm"><text:p/></draw:line><draw:line draw:style-name="gr3" draw:text-style-name="P251" svg:x1="2.847cm" svg:y1="0.718cm" svg:x2="3.097cm" svg:y2="0.718cm"><text:p/></draw:line><draw:line draw:style-name="gr3" draw:text-style-name="P251" svg:x1="3.094cm" svg:y1="1.219cm" svg:x2="3.094cm" svg:y2="0.718cm"><text:p/></draw:line><draw:line draw:style-name="gr3" draw:text-style-name="P251" svg:x1="3.094cm" svg:y1="1.219cm" svg:x2="4.345cm" svg:y2="1.219cm"><text:p/></draw:line><draw:line draw:style-name="gr3" draw:text-style-name="P251" svg:x1="5.844cm" svg:y1="0.718cm" svg:x2="5.844cm" svg:y2="1.219cm"><text:p/></draw:line><draw:line draw:style-name="gr3" draw:text-style-name="P251" svg:x1="5.844cm" svg:y1="0.718cm" svg:x2="6.094cm" svg:y2="0.718cm"><text:p/></draw:line><draw:line draw:style-name="gr3" draw:text-style-name="P251" svg:x1="6.096cm" svg:y1="1.219cm" svg:x2="6.096cm" svg:y2="0.718cm"><text:p/></draw:line><draw:line draw:style-name="gr3" draw:text-style-name="P251" svg:x1="6.096cm" svg:y1="1.219cm" svg:x2="7.345cm" svg:y2="1.219cm"><text:p/></draw:line><draw:line draw:style-name="gr3" draw:text-style-name="P251" svg:x1="7.343cm" svg:y1="0.718cm" svg:x2="7.343cm" svg:y2="1.219cm"><text:p/></draw:line><draw:line draw:style-name="gr3" draw:text-style-name="P251" svg:x1="7.343cm" svg:y1="0.718cm" svg:x2="7.593cm" svg:y2="0.718cm"><text:p/></draw:line><draw:line draw:style-name="gr3" draw:text-style-name="P251" svg:x1="7.594cm" svg:y1="1.219cm" svg:x2="7.594cm" svg:y2="0.718cm"><text:p/></draw:line><draw:line draw:style-name="gr3" draw:text-style-name="P251" svg:x1="7.594cm" svg:y1="1.219cm" svg:x2="8.095cm" svg:y2="1.219cm"><text:p/></draw:line><draw:frame draw:style-name="gr6" draw:text-style-name="P253" svg:width="1.251cm" svg:height="0.65cm" svg:x="1.094cm" svg:y="0.718cm"><draw:text-box><text:p text:style-name="P252"><text:span text:style-name="T50">Q</text:span></text:p></draw:text-box></draw:frame><draw:line draw:style-name="gr3" draw:text-style-name="P251" svg:x1="4.348cm" svg:y1="0.718cm" svg:x2="4.348cm" svg:y2="1.219cm"><text:p/></draw:line><draw:line draw:style-name="gr3" draw:text-style-name="P251" svg:x1="4.348cm" svg:y1="0.718cm" svg:x2="4.597cm" svg:y2="0.718cm"><text:p/></draw:line><draw:line draw:style-name="gr3" draw:text-style-name="P251" svg:x1="4.595cm" svg:y1="1.219cm" svg:x2="4.595cm" svg:y2="0.718cm"><text:p/></draw:line><draw:line draw:style-name="gr3" draw:text-style-name="P251" svg:x1="4.595cm" svg:y1="1.219cm" svg:x2="5.846cm" svg:y2="1.219cm"><text:p/></draw:line><draw:frame draw:style-name="gr6" draw:text-style-name="P253" svg:width="1.251cm" svg:height="0.65cm" svg:x="4.594cm" svg:y="-0.032cm"><draw:text-box><text:p text:style-name="P252"><text:span text:style-name="T50"><text:s text:c="2"/></text:span><text:span text:style-name="T50">PT</text:span></text:p></draw:text-box></draw:frame><draw:line draw:style-name="gr7" draw:text-style-name="P251" svg:x1="4.348cm" svg:y1="0.217cm" svg:x2="4.847cm" svg:y2="0.217cm"><text:p/></draw:line><draw:line draw:style-name="gr7" draw:text-style-name="P251" svg:x1="5.845cm" svg:y1="0.217cm" svg:x2="5.595cm" svg:y2="0.217cm"><text:p/></draw:line></draw:g></text:p>
      <text:list xml:id="list33626910" text:continue-numbering="true" text:style-name="L1">
        <text:list-item>
          <text:list>
            <text:list-item>
              <text:h text:style-name="P217" text:outline-level="2"><text:alphabetical-index-mark-start text:id="IMark100843576"/>CLK_PULSE<text:alphabetical-index-mark-end text:id="IMark100843576"/></text:h>
            </text:list-item>
          </text:list>
        </text:list-item>
      </text:list>
      <text:p text:style-name="P22">Type<text:tab/>Funktionsbaustein</text:p>
      <text:p text:style-name="P22"><text:span text:style-name="T16">Input</text:span><text:tab/>PT : TIME (Zykluszeit)</text:p>
      <text:p text:style-name="P22"><text:tab/>N : INT (Anzahl der zu erzeugenden Impulse)</text:p>
      <text:p text:style-name="P22"><text:tab/>RST : BOOL (Reset)</text:p>
      <text:p text:style-name="P25">Output<text:tab/>Q : BOOL (Taktausgang)</text:p>
      <text:p text:style-name="P25"><text:tab/>CNT : INT (Zähler der Ausgangsimpulse)</text:p>
      <text:p text:style-name="P25"><draw:frame draw:style-name="fr4" draw:name="Grafik93" text:anchor-type="paragraph" svg:x="0.995cm" svg:y="0.679cm" svg:width="2.731cm" svg:height="2.2cm" draw:z-index="57"><draw:image xlink:href="Pictures/10000000000000CE000000A6398FB9DC.png" xlink:type="simple" xlink:show="embed" xlink:actuate="onLoad"/></draw:frame><text:tab/>RUN : BOOL (TRUE, wenn Pulsgenerator läuft)</text:p>
      <text:p text:style-name="P25"><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55">Das folgende Beispiel zeigt eine Anwendung von CLK_PULSE zur Erzeugung von 7 Impulsen mit einem Tastverhältnis von 100ms.</text:p>
      <text:p text:style-name="P25"><draw:frame draw:style-name="fr9" draw:name="Grafik94" text:anchor-type="paragraph" svg:x="1.152cm" svg:y="0.504cm" svg:width="8.481cm" svg:height="2.21cm" draw:z-index="58"><draw:image xlink:href="Pictures/1000000000000281000000A70DD31D25.png" xlink:type="simple" xlink:show="embed" xlink:actuate="onLoad"/></draw:frame></text:p>
      <text:p text:style-name="P55"><draw:frame draw:style-name="fr9" draw:name="Grafik95" text:anchor-type="paragraph" svg:x="1.004cm" svg:y="0.046cm" svg:width="15.998cm" svg:height="6.101cm" draw:z-index="59"><draw:image xlink:href="Pictures/10000000000003A800000165B33E5B46.png" xlink:type="simple" xlink:show="embed" xlink:actuate="onLoad"/></draw:frame></text:p>
      <text:p text:style-name="P55">Die <text:span text:style-name="T16">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xml:id="list33635728" text:continue-numbering="true" text:style-name="L1">
        <text:list-item>
          <text:list>
            <text:list-item>
              <text:h text:style-name="P217" text:outline-level="2"><text:alphabetical-index-mark-start text:id="IMark100843576"/>D_TRIG<text:alphabetical-index-mark-end text:id="IMark100843576"/></text:h>
            </text:list-item>
          </text:list>
        </text:list-item>
      </text:list>
      <text:p text:style-name="P22">Type<text:tab/>Funktionsbaustein</text:p>
      <text:p text:style-name="P22"><text:span text:style-name="T16">Input</text:span><text:tab/>IN : DWORD (Eingangssignal)</text:p>
      <text:p text:style-name="P25">Output<text:tab/>Q : BOOL (Ausgangssignal)</text:p>
      <text:p text:style-name="P55"><draw:frame draw:style-name="fr4" draw:name="Grafik312" text:anchor-type="paragraph" svg:x="1.09cm" svg:y="0.649cm" svg:width="2.281cm" svg:height="1.75cm" draw:z-index="287"><draw:image xlink:href="Pictures/10000000000000AC00000084B77EE006.png" xlink:type="simple" xlink:show="embed" xlink:actuate="onLoad"/></draw:frame><text:tab/>X : DWORD (Veränderung des Eingangssignals)</text:p>
      <text:p text:style-name="Standard"><text:soft-page-break/><text:line-break/>Der Funktionsbaustein <text:span text:style-name="T38">D</text:span><text:span text:style-name="T38">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55"><draw:frame draw:style-name="fr4" draw:name="Grafik313" text:anchor-type="paragraph" svg:x="1.141cm" svg:y="1.141cm" svg:width="14.319cm" svg:height="3.56cm" draw:z-index="288"><draw:image xlink:href="Pictures/100000000000043B0000010D214F5071.png" xlink:type="simple" xlink:show="embed" xlink:actuate="onLoad"/></draw:frame>Das nachfolgende Beispiel zeigt die Anwendung von D_TRIG wenn sich der Eingang vom Wert 5 nach 2 verändert:</text:p>
      <text:p text:style-name="P55"/>
      <text:list xml:id="list33631864" text:continue-numbering="true" text:style-name="L1">
        <text:list-item>
          <text:list>
            <text:list-item>
              <text:h text:style-name="P217" text:outline-level="2"><text:alphabetical-index-mark-start text:id="IMark100843576"/>GEN_BIT<text:alphabetical-index-mark-end text:id="IMark100843576"/></text:h>
            </text:list-item>
          </text:list>
        </text:list-item>
      </text:list>
      <text:p text:style-name="P22">Type<text:tab/>Funktionsbaustein</text:p>
      <text:p text:style-name="P22"><text:span text:style-name="T16">Input</text:span><text:tab/>IN0 : DWORD (Bitsequenz für Q0)</text:p>
      <text:p text:style-name="P22"><text:tab/>IN1 : DWORD (Bitsequenz für Q1)</text:p>
      <text:p text:style-name="P22"><text:tab/>IN2 : DWORD (Bitsequenz für Q1)</text:p>
      <text:p text:style-name="P22"><text:tab/>IN3 : DWORD (Bitsequenz für Q1)</text:p>
      <text:p text:style-name="P22"><text:tab/>CLK : BOOL (Clock Eingang)</text:p>
      <text:p text:style-name="P22"><text:tab/>STEPS : INT (Anzahl der zu erzeugenden Takte)</text:p>
      <text:p text:style-name="P22"><text:soft-page-break/><text:tab/>REP : INT</text:p>
      <text:p text:style-name="P25"><text:tab/>RST : BOOL</text:p>
      <text:p text:style-name="P25">Output<text:tab/>Q0 : BOOL (Bitsequenz Q0)</text:p>
      <text:p text:style-name="P25"><text:tab/>Q1 : BOOL (Bitsequenz Q1)</text:p>
      <text:p text:style-name="P25"><text:tab/>Q2 : BOOL (Bitsequenz Q2)</text:p>
      <text:p text:style-name="P25"><text:tab/>Q3 : BOOL (Bitsequenz Q3)</text:p>
      <text:p text:style-name="P25"><text:tab/>CNT : INT (Anzahl der bereits erzeugten Ausgangsbits)</text:p>
      <text:p text:style-name="P25"><draw:frame draw:style-name="fr4" draw:name="Grafik96" text:anchor-type="paragraph" svg:x="1.159cm" svg:y="0.656cm" svg:width="2.731cm" svg:height="4.44cm" draw:z-index="60"><draw:image xlink:href="Pictures/10000000000000CE00000150FC776D7A.png" xlink:type="simple" xlink:show="embed" xlink:actuate="onLoad"/></draw:frame><text:tab/>RUN : BOOL (TRUE, wenn der Sequenzer läuft)</text:p>
      <text:p text:style-name="P25"><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25"><draw:frame draw:style-name="fr4" draw:name="Grafik101" text:anchor-type="paragraph" svg:x="0.975cm" svg:y="0.813cm" svg:width="15.998cm" svg:height="3.226cm" draw:z-index="63"><draw:image xlink:href="Pictures/1000000000000341000000A857DFB588.png" xlink:type="simple" xlink:show="embed" xlink:actuate="onLoad"/></draw:frame>Beispiel:</text:p>
      <text:p text:style-name="P25"/>
      <text:p text:style-name="P25"><text:soft-page-break/>In diesem Beispiel werden die untersten 8 Bits (Bit 0 .. 7 ) an den Eingängen IN auf die Ausgänge Q geschoben. Die Sequenz beginnt jeweils bei Bit 0 und endet bei Bit 7 (8 <text:span text:style-name="T16">Steps</text:span> sind durch den Eingang 8 definiert). Diese Sequenz wird 2 mal (2 Wiederholungen am Eingang REP) wiederholt und dann gestoppt.</text:p>
      <text:p text:style-name="P25"><draw:frame draw:style-name="fr4" draw:name="Grafik102" text:anchor-type="paragraph" svg:x="0.857cm" svg:y="0.252cm" svg:width="15.998cm" svg:height="7.13cm" draw:z-index="64"><draw:image xlink:href="Pictures/1000000000000452000001EDF45A922B.png" xlink:type="simple" xlink:show="embed" xlink:actuate="onLoad"/></draw:frame></text:p>
      <text:p text:style-name="P25">Die <text:span text:style-name="T16">Trace</text:span> Aufzeichnung zeigt das inaktiv werdende Reset Signal (Grün), welches den Generator startet und nach dem ersten Taktimpuls Bit 0 an die Ausgänge schiebt.</text:p>
      <text:list xml:id="list33644271" text:continue-numbering="true" text:style-name="L1">
        <text:list-item>
          <text:list>
            <text:list-item>
              <text:h text:style-name="P217" text:outline-level="2"><text:alphabetical-index-mark-start text:id="IMark100843576"/>GEN_SQ<text:alphabetical-index-mark-end text:id="IMark100843576"/></text:h>
            </text:list-item>
          </text:list>
        </text:list-item>
      </text:list>
      <text:p text:style-name="P22">Type<text:tab/>Funktionsbaustein</text:p>
      <text:p text:style-name="P22"><text:span text:style-name="T16">Input</text:span><text:tab/>PT : TIME (Periodendauer)</text:p>
      <text:p text:style-name="P25"><draw:frame draw:style-name="fr4" draw:name="Grafik97" text:anchor-type="paragraph" svg:x="1.051cm" svg:y="0.633cm" svg:width="2.281cm" svg:height="1.3cm" draw:z-index="61"><draw:image xlink:href="Pictures/10000000000000AC00000062C1945279.png" xlink:type="simple" xlink:show="embed" xlink:actuate="onLoad"/></draw:frame>Output<text:tab/>Q : BOOL (Ausgangssignal)</text:p>
      <text:p text:style-name="P25"><text:line-break/>Gen_SQ ist ein Rechteckgenerator mit programmierbarer Periodendauer und einem festen Tastverhältnis von 50%. Der Eingang PT legt die Periodendauer fest und am Ausgang Q steht das Ausgangssignal zur Verfügung.</text:p>
      <text:p text:style-name="P55"><draw:g text:anchor-type="paragraph" draw:z-index="65" draw:style-name="gr1"><draw:g draw:style-name="gr8"><draw:line draw:style-name="gr2" draw:text-style-name="P251" svg:x1="1.695cm" svg:y1="1.54cm" svg:x2="2.196cm" svg:y2="1.54cm"><text:p/></draw:line><draw:line draw:style-name="gr2" draw:text-style-name="P251" svg:x1="2.196cm" svg:y1="1.039cm" svg:x2="2.196cm" svg:y2="1.54cm"><text:p/></draw:line><draw:line draw:style-name="gr2" draw:text-style-name="P251" svg:x1="2.196cm" svg:y1="1.039cm" svg:x2="3.196cm" svg:y2="1.039cm"><text:p/></draw:line><draw:line draw:style-name="gr2" draw:text-style-name="P251" svg:x1="3.196cm" svg:y1="1.54cm" svg:x2="3.196cm" svg:y2="1.039cm"><text:p/></draw:line><draw:line draw:style-name="gr2" draw:text-style-name="P251" svg:x1="3.196cm" svg:y1="1.54cm" svg:x2="4.196cm" svg:y2="1.54cm"><text:p/></draw:line><draw:line draw:style-name="gr2" draw:text-style-name="P251" svg:x1="4.198cm" svg:y1="1.039cm" svg:x2="4.198cm" svg:y2="1.54cm"><text:p/></draw:line><draw:line draw:style-name="gr2" draw:text-style-name="P251" svg:x1="4.198cm" svg:y1="1.039cm" svg:x2="5.196cm" svg:y2="1.039cm"><text:p/></draw:line><draw:line draw:style-name="gr2" draw:text-style-name="P251" svg:x1="5.193cm" svg:y1="1.54cm" svg:x2="5.193cm" svg:y2="1.039cm"><text:p/></draw:line><draw:line draw:style-name="gr2" draw:text-style-name="P251" svg:x1="5.193cm" svg:y1="1.54cm" svg:x2="6.193cm" svg:y2="1.54cm"><text:p/></draw:line><draw:line draw:style-name="gr2" draw:text-style-name="P251" svg:x1="6.193cm" svg:y1="1.039cm" svg:x2="6.193cm" svg:y2="1.54cm"><text:p/></draw:line><draw:line draw:style-name="gr2" draw:text-style-name="P251" svg:x1="6.193cm" svg:y1="1.039cm" svg:x2="7.193cm" svg:y2="1.039cm"><text:p/></draw:line><draw:line draw:style-name="gr2" draw:text-style-name="P251" svg:x1="7.193cm" svg:y1="1.54cm" svg:x2="7.193cm" svg:y2="1.039cm"><text:p/></draw:line><draw:line draw:style-name="gr2" draw:text-style-name="P251" svg:x1="7.193cm" svg:y1="1.54cm" svg:x2="7.944cm" svg:y2="1.54cm"><text:p/></draw:line><draw:line draw:style-name="gr7" draw:text-style-name="P251" svg:x1="3.196cm" svg:y1="0.538cm" svg:x2="3.946cm" svg:y2="0.538cm"><text:p/></draw:line><draw:frame draw:style-name="gr9" draw:text-style-name="P254" svg:width="0.997cm" svg:height="0.749cm" svg:x="3.777cm" svg:y="0.288cm"><draw:text-box><text:p text:style-name="P252"><text:span text:style-name="T51">PT</text:span></text:p></draw:text-box></draw:frame><draw:line draw:style-name="gr7" draw:text-style-name="P251" svg:x1="5.195cm" svg:y1="0.538cm" svg:x2="4.445cm" svg:y2="0.538cm"><text:p/></draw:line></draw:g><draw:frame draw:style-name="gr6" draw:text-style-name="P253" svg:width="0.75cm" svg:height="0.65cm" svg:x="0.944cm" svg:y="1.038cm"><draw:text-box><text:p text:style-name="P252"><text:span text:style-name="T50">Q</text:span></text:p></draw:text-box></draw:frame></draw:g></text:p>
      <text:list xml:id="list33644833" text:continue-numbering="true" text:style-name="L1">
        <text:list-item>
          <text:list>
            <text:list-item>
              <text:h text:style-name="P217" text:outline-level="2"><text:soft-page-break/><text:alphabetical-index-mark-start text:id="IMark100843576"/><text:alphabetical-index-mark-start text:id="IMark158169696"/>SCHEDULER<text:alphabetical-index-mark-end text:id="IMark158169696"/><text:alphabetical-index-mark-end text:id="IMark100843576"/></text:h>
            </text:list-item>
          </text:list>
        </text:list-item>
      </text:list>
      <text:p text:style-name="P22">Type<text:tab/>Funktionsbaustein</text:p>
      <text:p text:style-name="P22"><text:span text:style-name="T16">Input</text:span><text:tab/>E0..3 : BOOL (Freigabesignale für Q0..3)</text:p>
      <text:p text:style-name="P52">Setup<text:tab/>T0..3 : TIME (Zykluszeit)</text:p>
      <text:p text:style-name="P52"><draw:frame draw:style-name="fr4" draw:name="Grafik692" text:anchor-type="paragraph" svg:x="1.048cm" svg:y="0.681cm" svg:width="3.18cm" svg:height="2.649cm" draw:z-index="722"><draw:image xlink:href="Pictures/10000000000000F0000000C8E80E7EE5.png" xlink:type="simple" xlink:show="embed" xlink:actuate="onLoad"/></draw:frame>Output<text:tab/>Q0..3 : BOOL (Ausgangssignale)</text:p>
      <text:p text:style-name="P52"><text:line-break/>SCHEDULER wird benutzt um Programmteile Zeitabhängig aufzurufen. Z.B. können aufwendige Berechnungen die nur selten gebraucht werden in bestimmten Zeitabständen aufgerufen werden. Die Ausgänge Q? Des Bausteins werden jeweils nur für einen Zyklus aktiv und schalten dadurch die Abarbeitung des entsprechenden Programmteils frei. Die Setup Zeiten T? Legen fest in welchen Zeitabständen die Ausgänge aktiviert werden. SCHEDULER prüft je CPU Zyklus nur einen Ausgang, so dass maximal ein Ausgang je Zyklus aktiv sein kann. Im Extremfall wenn alle Aufrufzeiten T? T#0s sind wird in jedem Zyklus jeweils ein Ausgang gesetzt sein, so dass erst Q0, dann Q1 usw. bis Q3 gesetzt sind um dann wieder mit Q0 zu beginnen. Die Aufrufzeiten können deshalb um bis zu 3 CPU Zyklen vom vorgegebenen Wert T? Abweichen. </text:p>
      <text:list xml:id="list33655086" text:continue-numbering="true" text:style-name="L1">
        <text:list-item>
          <text:list>
            <text:list-item>
              <text:h text:style-name="P217" text:outline-level="2"><text:alphabetical-index-mark-start text:id="IMark100843576"/><text:alphabetical-index-mark-start text:id="IMark100454764"/>SCHEDULER_2<text:alphabetical-index-mark-end text:id="IMark100454764"/><text:alphabetical-index-mark-end text:id="IMark100843576"/></text:h>
            </text:list-item>
          </text:list>
        </text:list-item>
      </text:list>
      <text:p text:style-name="P22">Type<text:tab/>Funktionsbaustein</text:p>
      <text:p text:style-name="P22"><text:span text:style-name="T16">Input</text:span><text:tab/>E0..3 : BOOL (Freigabesignale für Q0..3)</text:p>
      <text:p text:style-name="P52">Setup<text:tab/>C0..3 : UINT (Der Ausgang Q? Wird alle C? Zyklen aktiviert)</text:p>
      <text:p text:style-name="P52"><text:tab/>O0..3 : UINT (Verzögerung für die Ausgänge)</text:p>
      <text:p text:style-name="P52"><draw:frame draw:style-name="fr4" draw:name="Grafik693" text:anchor-type="paragraph" svg:x="1.023cm" svg:y="0.699cm" svg:width="3.62cm" svg:height="2.649cm" draw:z-index="723"><draw:image xlink:href="Pictures/1000000000000112000000C820785077.png" xlink:type="simple" xlink:show="embed" xlink:actuate="onLoad"/></draw:frame>Output<text:tab/>Q0..3 : BOOL (Ausgangssignale)</text:p>
      <text:p text:style-name="P52"><text:soft-page-break/><text:line-break/>SCHEDULER_2 aktiviert abhängig von den Setup Variablen C? Und O? Die Ausgänge Q?. SCHEDULER_2 kann einen Ausgang Q? Alle C? Zyklen aktivieren um damit Programmteile mit verschiedenen Zykluszeiten zu starten. Ein optionaler Setup Parameter O? Dient dazu einen Zeitversatz von O? Zyklen für den entsprechenden Ausgang zu definieren um ein gleichzeitiges aktivieren der Ausgänge im ersten Zyklus zu verhindern.</text:p>
      <text:list xml:id="list33655228" text:continue-numbering="true" text:style-name="L1">
        <text:list-item>
          <text:list>
            <text:list-item>
              <text:h text:style-name="P217" text:outline-level="2"><text:alphabetical-index-mark-start text:id="IMark100843576"/><text:alphabetical-index-mark-start text:id="IMark100456524"/>SEQUENCE_4<text:alphabetical-index-mark-end text:id="IMark100456524"/><text:alphabetical-index-mark-end text:id="IMark100843576"/></text:h>
            </text:list-item>
          </text:list>
        </text:list-item>
      </text:list>
      <text:p text:style-name="P22">Type<text:tab/>Funktionsbaustein</text:p>
      <text:p text:style-name="P22"><text:span text:style-name="T16">Input</text:span><text:tab/>IN0..3 : BOOL (Freigabesignal für Q0..3)</text:p>
      <text:p text:style-name="P22"><text:tab/><text:span text:style-name="T35">START : BOOL (Startflanke für den Sequenzer)</text:span></text:p>
      <text:p text:style-name="P25"><text:tab/>RST : BOOL (Asynchroner Reset-Eingang)</text:p>
      <text:p text:style-name="P25"><text:tab/>WAIT 0..3 : TIME (Wartezeit für das Eingangssignal an IN 0..3)</text:p>
      <text:p text:style-name="P25"><text:tab/>DELAY 0..3 : TIME (Verzögerungszeit bis das Eingangssignal IN0..3 <text:tab/>geprüft wird)</text:p>
      <text:p text:style-name="P25">Output<text:tab/>Q 0..3 : BOOL (Steuerausgänge)</text:p>
      <text:p text:style-name="P25"><text:tab/>ANY : BOOL (ANY ist TRUE, wenn einer der Ausgänge Q0 .. Q3 <text:s text:c="3"/><text:tab/>aktiv ist)</text:p>
      <text:p text:style-name="P25"><text:tab/>RUN : BOOL (RUN ist TRUE, wenn der Sequenzer gestartet wurde <text:tab/>und läuft)</text:p>
      <text:p text:style-name="P25"><text:tab/>STEP : INT (gibt den momentanen Schritt an)</text:p>
      <text:p text:style-name="P25"><draw:frame draw:style-name="fr4" draw:name="Grafik98" text:anchor-type="paragraph" svg:x="1.355cm" svg:y="1.035cm" svg:width="3.18cm" svg:height="7.14cm" draw:z-index="196"><draw:image xlink:href="Pictures/10000000000000F00000021C564077D4.png" xlink:type="simple" xlink:show="embed" xlink:actuate="onLoad"/></draw:frame><text:tab/>STATUS : BYTE (zu ESR kompatibler Status-Ausgang)</text:p>
      <text:p text:style-name="P25"><text:soft-page-break/><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6">Error-</text:span>Nummer am Ausgang STATUS angezeigt wird und abhängig von der Config-Variable STOP_ON_ERROR wird der Sequenzer angehalten oder nicht. Der STATUS-Ausgang ist 110 für warten auf Startsignal und 111 wenn die Sequenz durchlaufen wird und zeigt mit 1 .. 4 Fehler an. Ein <text:span text:style-name="T16">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55">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55">Sollte eine Flankenprüfung an einem oder mehreren Eingängen IN nicht nötig sein, so können sie einfach offen gelassen werden, denn der Vorgabe-Wert für diese Eingänge ist TRUE.</text:p>
      <text:p text:style-name="P55">Der Ausgang Status ist ESR kompatibel und zeigt durch einen Wert 1- 4 <text:s/>an, dass ein Fehler aufgetreten ist. Ein Fehler tritt dann auf, wenn das entsprechende Eingangssignal an IN nicht während der entsprechenden Wartezeit auftritt.</text:p>
      <text:p text:style-name="P55"><text:span text:style-name="T16">Error</text:span> = 1 bedeutet, dass in0 nicht innerhalb der Wartezeit aktiv geworden ist. <text:span text:style-name="T16">Error</text:span> 2 .. 4 entspricht den Eingängen 1 .. 3.</text:p>
      <text:p text:style-name="P55"><text:soft-page-break/>Ein Statuswert von 110 bedeutet Wartestellung und 111 bedeutet, dass gerade eine Sequenz durchlaufen wird.</text:p>
      <text:p text:style-name="P25">Beispiel:</text:p>
      <text:p text:style-name="Standard">Im Folgenden <text:span text:style-name="T38">Beispiel</text:span> <text:span text:style-name="T38">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25"><draw:frame draw:style-name="fr4" draw:name="Grafik99" text:anchor-type="paragraph" svg:x="1.833cm" svg:y="0.579cm" svg:width="13.42cm" svg:height="7.14cm" draw:z-index="68"><draw:image xlink:href="Pictures/10000000000003F70000021C685D3F7C.png" xlink:type="simple" xlink:show="embed" xlink:actuate="onLoad"/></draw:frame></text:p>
      <text:p text:style-name="P25"><draw:frame draw:style-name="fr4" draw:name="Grafik104" text:anchor-type="paragraph" svg:x="0.841cm" svg:y="0.148cm" svg:width="16cm" svg:height="7.221cm" draw:z-index="67"><draw:image xlink:href="Pictures/1000000000000456000001F5E08E162B.png" xlink:type="simple" xlink:show="embed" xlink:actuate="onLoad"/></draw:frame></text:p>
      <text:p text:style-name="P25"><text:soft-page-break/>Die Traceaufzeichnung zeigt das Startsignal (Grün) und das Signal RUN (Rot). Nach 2 Sekunden wird die steigende Flanke am Eingang auf in0 und danach auf die Ausgangssignale Q0..3 und ANY gelegt.</text:p>
      <text:p text:style-name="P25">Das Signal ANY (Blau) ist dann aktiv, wenn eines der Ausgangssignale aktiv ist und das Signal RUN (Rot) ist vom Start bis zum Ende aktiv.</text:p>
      <text:list xml:id="list33640642" text:continue-numbering="true" text:style-name="L1">
        <text:list-item>
          <text:list>
            <text:list-item>
              <text:h text:style-name="P217" text:outline-level="2"><text:alphabetical-index-mark-start text:id="IMark100843576"/><text:alphabetical-index-mark-start text:id="IMark101041792"/>SEQUENCE_64<text:alphabetical-index-mark-end text:id="IMark101041792"/><text:alphabetical-index-mark-end text:id="IMark100843576"/></text:h>
            </text:list-item>
          </text:list>
        </text:list-item>
      </text:list>
      <text:p text:style-name="P22">Type<text:tab/>Funktionsbaustein</text:p>
      <text:p text:style-name="P22"><text:span text:style-name="T16">Input</text:span><text:tab/>START : BOOL (steigende Flanke startet die Sequenz)</text:p>
      <text:p text:style-name="P22"><text:tab/><text:span text:style-name="T35">SMAX : INT (letzter </text:span><text:span text:style-name="T20">State</text:span><text:span text:style-name="T35"> der Sequenz)</text:span></text:p>
      <text:p text:style-name="P52"><text:span text:style-name="T35"><text:tab/>PROG : ARRAY[0..63] OF TIME (Zeitdauer der einzelnen </text:span><text:span text:style-name="T20">States</text:span><text:span text:style-name="T35">)</text:span></text:p>
      <text:p text:style-name="P25"><text:tab/>RST : BOOL (Asynchroner Reset-Eingang)<text:tab/></text:p>
      <text:p text:style-name="P55">Output<text:tab/>STATE : INT (<text:span text:style-name="T16">State</text:span> Ausgang)</text:p>
      <text:p text:style-name="P55"><draw:frame draw:style-name="fr4" draw:name="Grafik662" text:anchor-type="paragraph" svg:x="1.046cm" svg:y="0.656cm" svg:width="2.9cm" svg:height="2.29cm" draw:z-index="682"><draw:image xlink:href="Pictures/10000000000000DB000000ADD9AF3A60.png" xlink:type="simple" xlink:show="embed" xlink:actuate="onLoad"/></draw:frame><text:tab/>TRIG : BOOL (Zeigt Zustandsveränderungen mit TRUE an)</text:p>
      <text:p text:style-name="P55">SEQUENCE_64 erzeugt eine Zeitsequenz von bis zu 64 Zuständen. Im Ruhezustand steht der Ausgang STATE auf -1 und zeigt damit an das der Baustein nicht aktiv ist. Eine steigende Flanke an START startet die Sequenz und der Ausgang STATE schaltet auf 0. nach Ablauf der Wartezeit PROG[0] schaltet der Baustein weiter auf STATE = 1, Wartet die Zeit PROG[1] ab, 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p>
      <text:p text:style-name="P55"><draw:frame draw:style-name="fr4" draw:name="Grafik663" text:anchor-type="paragraph" svg:x="1.046cm" svg:y="0.69cm" svg:width="13.307cm" svg:height="2.672cm" draw:z-index="683"><draw:image xlink:href="Pictures/10000000000001F70000006505569080.png" xlink:type="simple" xlink:show="embed" xlink:actuate="onLoad"/></draw:frame>Signalverlauf von SEQUENCE_64:</text:p>
      <text:p text:style-name="P55"/>
      <text:list xml:id="list33638837" text:continue-numbering="true" text:style-name="L1">
        <text:list-item>
          <text:list>
            <text:list-item>
              <text:h text:style-name="P217" text:outline-level="2"><text:soft-page-break/><text:alphabetical-index-mark-start text:id="IMark100843576"/>SEQUENCE_8<text:alphabetical-index-mark-end text:id="IMark100843576"/></text:h>
            </text:list-item>
          </text:list>
        </text:list-item>
      </text:list>
      <text:p text:style-name="P22">Type<text:tab/>Funktionsbaustein</text:p>
      <text:p text:style-name="P22"><text:span text:style-name="T16">Input</text:span><text:tab/>IN0..7 : BOOL (Freigabesignal für Q0..7)</text:p>
      <text:p text:style-name="P22"><text:tab/><text:span text:style-name="T35">START : BOOL (Startflanke für den Sequenzer)</text:span></text:p>
      <text:p text:style-name="P25"><text:tab/>RST : BOOL (Asynchroner Reset Eingang)</text:p>
      <text:p text:style-name="P25"><text:tab/>WAIT 0..7 : TIME (Wartezeit für das Eingangssignal an IN 0..7)</text:p>
      <text:p text:style-name="P25"><text:tab/>DELAY 0..7 : TIME (Verzögerungszeit, bis das Eingangssignal <text:tab/>IN0..7 geprüft wird)</text:p>
      <text:p text:style-name="P25">Output<text:tab/>Q 0..7 : BOOL (Steuerausgänge)</text:p>
      <text:p text:style-name="P25"><text:tab/>ANY : BOOL (Der Ausgang ANY ist TRUE, wenn einer der <text:s text:c="14"/><text:tab/>Ausgänge <text:tab/>Q0 .. Q7 aktiv ist)</text:p>
      <text:p text:style-name="P25"><text:tab/>RUN : BOOL (RUN ist TRUE, wenn der Sequenzer gestartet wurde <text:tab/>und läuft)</text:p>
      <text:p text:style-name="P25"><text:tab/>STEP : INT (gibt den momentanen Schritt an)</text:p>
      <text:p text:style-name="P25"><draw:frame draw:style-name="fr9" draw:name="Grafik105" text:anchor-type="paragraph" svg:x="1.245cm" svg:y="0.753cm" svg:width="3.18cm" svg:height="12.539cm" draw:z-index="197"><draw:image xlink:href="Pictures/10000000000000F0000003B453F54230.png" xlink:type="simple" xlink:show="embed" xlink:actuate="onLoad"/></draw:frame><text:tab/>STATUS : BYTE (0 wenn kein Fehler vorliegt, sonst &gt; 0)</text:p>
      <text:p text:style-name="P25"><text:soft-page-break/><text:line-break/>Eine Funktionsbeschreibung von SEQUENCE_8 ist unter SEQUENCE_4 zu finden. SEQUENCE_8 ist Funktionsidentisch mit SEQUENCE_4. Er hat 8 anstelle von 4 Kanälen. <text:s/>SEQUENCE_8 findet Anwendung in der OSCAT Bibliothek im Modul LEGIONELLA.</text:p>
      <text:list xml:id="list33635642" text:continue-numbering="true" text:style-name="L1">
        <text:list-item>
          <text:list>
            <text:list-item>
              <text:h text:style-name="P217" text:outline-level="2"><text:alphabetical-index-mark-start text:id="IMark100843576"/>TMAX<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PT : TIME (Ausschaltverzögerung)<text:tab/></text:p>
      <text:p text:style-name="P55">Output<text:tab/>Q : BOOL (Ausgangssignal)</text:p>
      <text:p text:style-name="P55"><draw:frame draw:style-name="fr4" draw:name="Grafik676" text:anchor-type="paragraph" svg:x="1.046cm" svg:y="0.676cm" svg:width="1.709cm" svg:height="1.52cm" draw:z-index="701"><draw:image xlink:href="Pictures/100000000000008100000073A449C45B.png" xlink:type="simple" xlink:show="embed" xlink:actuate="onLoad"/></draw:frame><text:tab/>Z : BOOL (<text:span text:style-name="T16">Trigger</text:span> Ausgang)</text:p>
      <text:p text:style-name="P55"><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55"><draw:frame draw:style-name="fr4" draw:name="Grafik677" text:anchor-type="paragraph" svg:x="1.09cm" svg:y="0.012cm" svg:width="12.12cm" svg:height="4.521cm" draw:z-index="702"><draw:image xlink:href="Pictures/100000000000039400000156EDE2F335.png" xlink:type="simple" xlink:show="embed" xlink:actuate="onLoad"/></draw:frame></text:p>
      <text:list xml:id="list33632041" text:continue-numbering="true" text:style-name="L1">
        <text:list-item>
          <text:list>
            <text:list-item>
              <text:h text:style-name="P217" text:outline-level="2"><text:soft-page-break/><text:alphabetical-index-mark-start text:id="IMark100843576"/>TMIN<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PT : TIME (Ausschaltverzögerung)<text:tab/></text:p>
      <text:p text:style-name="P55"><draw:frame draw:style-name="fr4" draw:name="Grafik679" text:anchor-type="paragraph" svg:x="1.067cm" svg:y="0.683cm" svg:width="1.709cm" svg:height="1.52cm" draw:z-index="704"><draw:image xlink:href="Pictures/100000000000008100000073AF750BE2.png" xlink:type="simple" xlink:show="embed" xlink:actuate="onLoad"/></draw:frame>Output<text:tab/>Q : BOOL (Ausgangssignal)</text:p>
      <text:p text:style-name="P55"><text:line-break/>TMIN stellt sicher das der Ausgangsimpuls Q mindestens PT auf TRUE bleibt, auch wenn der Eingangsimpuls an IN kürzer als PT ist. ansonsten folgt der Ausgang Q dem Eingang IN.</text:p>
      <text:p text:style-name="P55"><draw:frame draw:style-name="fr4" draw:name="Grafik680" text:anchor-type="paragraph" svg:x="1.09cm" svg:y="0.012cm" svg:width="9.601cm" svg:height="3.29cm" draw:z-index="705"><draw:image xlink:href="Pictures/10000000000002D6000000F92D745B9A.png" xlink:type="simple" xlink:show="embed" xlink:actuate="onLoad"/></draw:frame></text:p>
      <text:list xml:id="list33652146" text:continue-numbering="true" text:style-name="L1">
        <text:list-item>
          <text:list>
            <text:list-item>
              <text:h text:style-name="P217" text:outline-level="2"><text:alphabetical-index-mark-start text:id="IMark100843576"/>TOF_1<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PT : TIME (Ausschaltverzögerung)</text:p>
      <text:p text:style-name="P55"><text:tab/>RST : BOOL (asynchroner Reset)</text:p>
      <text:p text:style-name="P55"><draw:frame draw:style-name="fr4" draw:name="Grafik674" text:anchor-type="paragraph" svg:x="1.046cm" svg:y="0.667cm" svg:width="2.101cm" svg:height="1.921cm" draw:z-index="697"><draw:image xlink:href="Pictures/100000000000009F00000091B4E53245.png" xlink:type="simple" xlink:show="embed" xlink:actuate="onLoad"/></draw:frame>Output<text:tab/>Q : BOOL (Ausgangssignal)</text:p>
      <text:p text:style-name="P55"><text:line-break/>TOF_1 verlängert einen Eingangsimpuls an IN um die Zeit PT. TOF_1 hat die gleiche Funktionalität wie TOF aus der Standard LIB, jedoch mit einem zusätzlichen asynchronen Reset Eingang.</text:p>
      <text:p text:style-name="P55"><draw:frame draw:style-name="fr4" draw:name="Grafik678" text:anchor-type="paragraph" svg:x="1.067cm" svg:y="0.012cm" svg:width="12.37cm" svg:height="5.001cm" draw:z-index="703"><draw:image xlink:href="Pictures/10000000000003A70000017AF0F3EB7A.png" xlink:type="simple" xlink:show="embed" xlink:actuate="onLoad"/></draw:frame><text:soft-page-break/></text:p>
      <text:list xml:id="list33638444" text:continue-numbering="true" text:style-name="L1">
        <text:list-item>
          <text:list>
            <text:list-item>
              <text:h text:style-name="P217" text:outline-level="2"><text:alphabetical-index-mark-start text:id="IMark100843576"/>TONOF<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T1 : TIME (Einschaltverzögerung)</text:p>
      <text:p text:style-name="P55"><text:tab/>T2 : TIME (Ausschaltverzögerung)</text:p>
      <text:p text:style-name="P25"><draw:frame draw:style-name="fr4" draw:name="Grafik392" text:anchor-type="paragraph" svg:x="1.134cm" svg:y="0.695cm" svg:width="2.101cm" svg:height="1.921cm" draw:z-index="388"><draw:image xlink:href="Pictures/100000000000009F000000912A0A0308.png" xlink:type="simple" xlink:show="embed" xlink:actuate="onLoad"/></draw:frame>Output<text:tab/>Q : BOOL (Ausgangspuls)</text:p>
      <text:p text:style-name="P25"><text:line-break/>TONOF erzeugt eine Einschaltverzögerung T1 und eine Ausschaltverzögerung T2</text:p>
      <text:p text:style-name="P55">Das steigende Flanke des Eingangssignals IN wird um T1 verzögert und die Fallende Flanke von IN wird um T2 verzögert.</text:p>
      <text:p text:style-name="P55"><draw:frame draw:style-name="fr4" draw:name="Grafik393" text:anchor-type="paragraph" svg:x="1.067cm" svg:y="0.422cm" svg:width="8.571cm" svg:height="2.499cm" draw:z-index="389"><draw:image xlink:href="Pictures/100000000000019500000076CB9F8217.png" xlink:type="simple" xlink:show="embed" xlink:actuate="onLoad"/></draw:frame></text:p>
      <text:list xml:id="list33627605" text:continue-numbering="true" text:style-name="L1">
        <text:list-item>
          <text:list>
            <text:list-item>
              <text:h text:style-name="P217" text:outline-level="2"><text:soft-page-break/><text:alphabetical-index-mark-start text:id="IMark100843576"/>TP_1<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PT : TIME (Impulsdauer)</text:p>
      <text:p text:style-name="P55"><text:tab/>RST : BOOL (asynchroner Reset)</text:p>
      <text:p text:style-name="P25"><draw:frame draw:style-name="fr4" draw:name="Grafik656" text:anchor-type="paragraph" svg:x="1.069cm" svg:y="0.69cm" svg:width="2.101cm" svg:height="1.921cm" draw:z-index="675"><draw:image xlink:href="Pictures/100000000000009F000000915B016601.png" xlink:type="simple" xlink:show="embed" xlink:actuate="onLoad"/></draw:frame>Output<text:tab/>Q : BOOL (Ausgangspuls)</text:p>
      <text:p text:style-name="P55"><text:line-break/>TP_1 ist ein flankengetriggerter Pulsgenerator der bei steigender Flanke an 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p>
      <text:p text:style-name="P188"><draw:g text:anchor-type="paragraph" draw:z-index="676" draw:style-name="gr1"><draw:line draw:style-name="gr2" draw:text-style-name="P251" svg:x1="2.083cm" svg:y1="3.101cm" svg:x2="3.083cm" svg:y2="3.101cm"><text:p/></draw:line><draw:line draw:style-name="gr2" draw:text-style-name="P251" svg:x1="3.085cm" svg:y1="2.6cm" svg:x2="3.085cm" svg:y2="3.099cm"><text:p/></draw:line><draw:line draw:style-name="gr2" draw:text-style-name="P251" svg:x1="3.085cm" svg:y1="2.6cm" svg:x2="5.085cm" svg:y2="2.6cm"><text:p/></draw:line><draw:line draw:style-name="gr2" draw:text-style-name="P251" svg:x1="5.081cm" svg:y1="3.099cm" svg:x2="5.081cm" svg:y2="2.6cm"><text:p/></draw:line><draw:line draw:style-name="gr2" draw:text-style-name="P251" svg:x1="5.081cm" svg:y1="3.101cm" svg:x2="6.081cm" svg:y2="3.101cm"><text:p/></draw:line><draw:line draw:style-name="gr2" draw:text-style-name="P251" svg:x1="6.081cm" svg:y1="2.6cm" svg:x2="6.081cm" svg:y2="3.099cm"><text:p/></draw:line><draw:line draw:style-name="gr2" draw:text-style-name="P251" svg:x1="9.583cm" svg:y1="3.101cm" svg:x2="11.084cm" svg:y2="3.101cm"><text:p/></draw:line><draw:line draw:style-name="gr3" draw:text-style-name="P251" svg:x1="3.085cm" svg:y1="1.6cm" svg:x2="3.085cm" svg:y2="2.099cm"><text:p/></draw:line><draw:line draw:style-name="gr3" draw:text-style-name="P251" svg:x1="2.083cm" svg:y1="2.101cm" svg:x2="3.083cm" svg:y2="2.101cm"><text:p/></draw:line><draw:line draw:style-name="gr3" draw:text-style-name="P251" svg:x1="3.085cm" svg:y1="1.6cm" svg:x2="3.335cm" svg:y2="1.6cm"><text:p/></draw:line><draw:line draw:style-name="gr3" draw:text-style-name="P251" svg:x1="3.331cm" svg:y1="2.099cm" svg:x2="3.331cm" svg:y2="1.6cm"><text:p/></draw:line><draw:line draw:style-name="gr3" draw:text-style-name="P251" svg:x1="3.331cm" svg:y1="2.101cm" svg:x2="6.081cm" svg:y2="2.101cm"><text:p/></draw:line><draw:line draw:style-name="gr3" draw:text-style-name="P251" svg:x1="6.081cm" svg:y1="1.6cm" svg:x2="6.081cm" svg:y2="2.099cm"><text:p/></draw:line><draw:line draw:style-name="gr3" draw:text-style-name="P251" svg:x1="6.081cm" svg:y1="1.6cm" svg:x2="6.331cm" svg:y2="1.6cm"><text:p/></draw:line><draw:line draw:style-name="gr3" draw:text-style-name="P251" svg:x1="6.334cm" svg:y1="2.099cm" svg:x2="6.334cm" svg:y2="1.6cm"><text:p/></draw:line><draw:line draw:style-name="gr3" draw:text-style-name="P251" svg:x1="6.334cm" svg:y1="2.101cm" svg:x2="7.583cm" svg:y2="2.101cm"><text:p/></draw:line><draw:line draw:style-name="gr3" draw:text-style-name="P251" svg:x1="7.581cm" svg:y1="1.6cm" svg:x2="7.581cm" svg:y2="2.099cm"><text:p/></draw:line><draw:line draw:style-name="gr3" draw:text-style-name="P251" svg:x1="7.581cm" svg:y1="1.6cm" svg:x2="7.831cm" svg:y2="1.6cm"><text:p/></draw:line><draw:line draw:style-name="gr3" draw:text-style-name="P251" svg:x1="7.835cm" svg:y1="2.099cm" svg:x2="7.835cm" svg:y2="1.6cm"><text:p/></draw:line><draw:line draw:style-name="gr3" draw:text-style-name="P251" svg:x1="7.835cm" svg:y1="2.101cm" svg:x2="11.086cm" svg:y2="2.101cm"><text:p/></draw:line><draw:frame draw:style-name="gr6" draw:text-style-name="P253" svg:width="0.997cm" svg:height="0.65cm" svg:x="1.332cm" svg:y="2.603cm"><draw:text-box><text:p text:style-name="P252"><text:span text:style-name="T50">Q</text:span></text:p></draw:text-box></draw:frame><draw:frame draw:style-name="gr6" draw:text-style-name="P253" svg:width="0.997cm" svg:height="0.65cm" svg:x="1.332cm" svg:y="1.603cm"><draw:text-box><text:p text:style-name="P252"><text:span text:style-name="T50">IN</text:span></text:p></draw:text-box></draw:frame><draw:line draw:style-name="gr2" draw:text-style-name="P251" svg:x1="6.081cm" svg:y1="2.6cm" svg:x2="9.581cm" svg:y2="2.6cm"><text:p/></draw:line><draw:line draw:style-name="gr2" draw:text-style-name="P251" svg:x1="9.583cm" svg:y1="2.6cm" svg:x2="9.583cm" svg:y2="3.099cm"><text:p/></draw:line><draw:line draw:style-name="gr2" draw:text-style-name="P251" svg:x1="5.081cm" svg:y1="3.101cm" svg:x2="6.081cm" svg:y2="3.101cm"><text:p/></draw:line><draw:line draw:style-name="gr2" draw:text-style-name="P251" svg:x1="6.081cm" svg:y1="2.6cm" svg:x2="6.081cm" svg:y2="3.099cm"><text:p/></draw:line><draw:line draw:style-name="gr7" draw:text-style-name="P251" svg:x1="3.085cm" svg:y1="0.852cm" svg:x2="3.835cm" svg:y2="0.852cm"><text:p/></draw:line><draw:frame draw:style-name="gr6" draw:text-style-name="P253" svg:width="1.124cm" svg:height="0.65cm" svg:x="3.653cm" svg:y="0.603cm"><draw:text-box><text:p text:style-name="P252"><text:span text:style-name="T50">PT</text:span></text:p></draw:text-box></draw:frame><draw:line draw:style-name="gr7" draw:text-style-name="P251" svg:x1="5.082cm" svg:y1="0.852cm" svg:x2="4.332cm" svg:y2="0.852cm"><text:p/></draw:line><draw:line draw:style-name="gr7" draw:text-style-name="P251" svg:x1="7.581cm" svg:y1="0.852cm" svg:x2="8.332cm" svg:y2="0.852cm"><text:p/></draw:line><draw:frame draw:style-name="gr6" draw:text-style-name="P253" svg:width="1.124cm" svg:height="0.65cm" svg:x="8.151cm" svg:y="0.603cm"><draw:text-box><text:p text:style-name="P252"><text:span text:style-name="T50">PT</text:span></text:p></draw:text-box></draw:frame><draw:line draw:style-name="gr7" draw:text-style-name="P251" svg:x1="9.581cm" svg:y1="0.852cm" svg:x2="8.831cm" svg:y2="0.852cm"><text:p/></draw:line></draw:g>Zeitverhalten von TP_1:</text:p>
      <text:p text:style-name="P97"/>
      <text:list xml:id="list33634352" text:continue-numbering="true" text:style-name="L1">
        <text:list-item>
          <text:list>
            <text:list-item>
              <text:h text:style-name="P217" text:outline-level="2"><text:alphabetical-index-mark-start text:id="IMark100843576"/>TP_1D<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PT1 : TIME (Impulsdauer)</text:p>
      <text:p text:style-name="P55"><text:tab/>PTD : TIME (<text:span text:style-name="T16">Delay</text:span> bis neuer Impuls erzeugt werden kann)</text:p>
      <text:p text:style-name="P55"><text:tab/>RST : BOOL (asynchroner Reset)</text:p>
      <text:p text:style-name="P25"><draw:frame draw:style-name="fr4" draw:name="Grafik657" text:anchor-type="paragraph" svg:x="1.046cm" svg:y="0.737cm" svg:width="2.101cm" svg:height="2.311cm" draw:z-index="677"><draw:image xlink:href="Pictures/100000000000009F000000AFE9351DA9.png" xlink:type="simple" xlink:show="embed" xlink:actuate="onLoad"/></draw:frame>Output<text:tab/>Q : BOOL (Ausgangspuls)</text:p>
      <text:p text:style-name="P55"><text:soft-page-break/><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xml:id="list33630203" text:continue-numbering="true" text:style-name="L1">
        <text:list-item>
          <text:list>
            <text:list-item>
              <text:h text:style-name="P217" text:outline-level="2"><text:alphabetical-index-mark-start text:id="IMark100843576"/>TP_R<text:alphabetical-index-mark-end text:id="IMark100843576"/></text:h>
            </text:list-item>
          </text:list>
        </text:list-item>
      </text:list>
      <text:p text:style-name="P22">Type<text:tab/>Funktionsbaustein</text:p>
      <text:p text:style-name="P22"><text:span text:style-name="T16">Input</text:span><text:tab/>IN : BOOL (Eingangssignal)</text:p>
      <text:p text:style-name="P25"><text:tab/>PT : TIME (Impulsdauer)</text:p>
      <text:p text:style-name="P25">Output<text:tab/>Q : BOOL (Ausgangspuls)</text:p>
      <text:p text:style-name="P25"><draw:frame draw:style-name="fr4" draw:name="Grafik100" text:anchor-type="paragraph" svg:x="1.15cm" svg:y="0.67cm" svg:width="1.829cm" svg:height="1.75cm" draw:z-index="62"><draw:image xlink:href="Pictures/100000000000008A000000848699E649.png" xlink:type="simple" xlink:show="embed" xlink:actuate="onLoad"/></draw:frame><text:tab/>ET : TIME (Zähle die Abgelaufene Zeit des Ausgangspulses)</text:p>
      <text:p text:style-name="P25"><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6">Timer</text:span> wieder getriggert werden und der Ausgangsimpuls dadurch verlängert werden. Im Gegensatz zu TOF wird bei TP_R die Zeit PT ab der letzten steigenden Flanke gemessen, unabhängig wie lange <text:s text:c="2"/>IN auf TRUE bleibt. Das bedeutet das der Ausgang Q nach Ablauf der Zeit PT gemessen von der letzten steigenden Flanke an IN auf FALSE geht, auch wenn der Eingang IN noch TRUE ist.</text:p>
      <text:p text:style-name="P189"><text:soft-page-break/>Zeitverhalten von TP_R:</text:p>
      <text:p text:style-name="P87"><draw:g text:anchor-type="paragraph" draw:z-index="69" draw:style-name="gr1"><draw:line draw:style-name="gr2" draw:text-style-name="P251" svg:x1="1.949cm" svg:y1="2.453cm" svg:x2="2.949cm" svg:y2="2.453cm"><text:p/></draw:line><draw:line draw:style-name="gr2" draw:text-style-name="P251" svg:x1="2.951cm" svg:y1="1.953cm" svg:x2="2.951cm" svg:y2="2.452cm"><text:p/></draw:line><draw:line draw:style-name="gr2" draw:text-style-name="P251" svg:x1="2.951cm" svg:y1="1.953cm" svg:x2="4.951cm" svg:y2="1.953cm"><text:p/></draw:line><draw:line draw:style-name="gr2" draw:text-style-name="P251" svg:x1="4.947cm" svg:y1="2.452cm" svg:x2="4.947cm" svg:y2="1.953cm"><text:p/></draw:line><draw:line draw:style-name="gr2" draw:text-style-name="P251" svg:x1="4.947cm" svg:y1="2.453cm" svg:x2="5.947cm" svg:y2="2.453cm"><text:p/></draw:line><draw:line draw:style-name="gr2" draw:text-style-name="P251" svg:x1="5.947cm" svg:y1="1.953cm" svg:x2="5.947cm" svg:y2="2.452cm"><text:p/></draw:line><draw:line draw:style-name="gr2" draw:text-style-name="P251" svg:x1="9.449cm" svg:y1="2.453cm" svg:x2="10.95cm" svg:y2="2.453cm"><text:p/></draw:line><draw:line draw:style-name="gr3" draw:text-style-name="P251" svg:x1="2.951cm" svg:y1="0.952cm" svg:x2="2.951cm" svg:y2="1.451cm"><text:p/></draw:line><draw:line draw:style-name="gr3" draw:text-style-name="P251" svg:x1="1.949cm" svg:y1="1.455cm" svg:x2="2.949cm" svg:y2="1.455cm"><text:p/></draw:line><draw:line draw:style-name="gr3" draw:text-style-name="P251" svg:x1="2.951cm" svg:y1="0.952cm" svg:x2="3.201cm" svg:y2="0.952cm"><text:p/></draw:line><draw:line draw:style-name="gr3" draw:text-style-name="P251" svg:x1="3.197cm" svg:y1="1.451cm" svg:x2="3.197cm" svg:y2="0.952cm"><text:p/></draw:line><draw:line draw:style-name="gr3" draw:text-style-name="P251" svg:x1="3.197cm" svg:y1="1.455cm" svg:x2="5.947cm" svg:y2="1.455cm"><text:p/></draw:line><draw:line draw:style-name="gr3" draw:text-style-name="P251" svg:x1="5.947cm" svg:y1="0.952cm" svg:x2="5.947cm" svg:y2="1.451cm"><text:p/></draw:line><draw:line draw:style-name="gr3" draw:text-style-name="P251" svg:x1="5.947cm" svg:y1="0.952cm" svg:x2="6.197cm" svg:y2="0.952cm"><text:p/></draw:line><draw:line draw:style-name="gr3" draw:text-style-name="P251" svg:x1="6.2cm" svg:y1="1.451cm" svg:x2="6.2cm" svg:y2="0.952cm"><text:p/></draw:line><draw:line draw:style-name="gr3" draw:text-style-name="P251" svg:x1="6.2cm" svg:y1="1.455cm" svg:x2="7.449cm" svg:y2="1.455cm"><text:p/></draw:line><draw:line draw:style-name="gr3" draw:text-style-name="P251" svg:x1="7.447cm" svg:y1="0.952cm" svg:x2="7.447cm" svg:y2="1.451cm"><text:p/></draw:line><draw:line draw:style-name="gr3" draw:text-style-name="P251" svg:x1="7.447cm" svg:y1="0.952cm" svg:x2="7.697cm" svg:y2="0.952cm"><text:p/></draw:line><draw:line draw:style-name="gr3" draw:text-style-name="P251" svg:x1="7.701cm" svg:y1="1.451cm" svg:x2="7.701cm" svg:y2="0.952cm"><text:p/></draw:line><draw:line draw:style-name="gr3" draw:text-style-name="P251" svg:x1="7.701cm" svg:y1="1.455cm" svg:x2="10.952cm" svg:y2="1.455cm"><text:p/></draw:line><draw:frame draw:style-name="gr6" draw:text-style-name="P253" svg:width="0.997cm" svg:height="0.65cm" svg:x="1.198cm" svg:y="1.956cm"><draw:text-box><text:p text:style-name="P252"><text:span text:style-name="T50">Q</text:span></text:p></draw:text-box></draw:frame><draw:frame draw:style-name="gr6" draw:text-style-name="P253" svg:width="0.997cm" svg:height="0.65cm" svg:x="1.198cm" svg:y="0.956cm"><draw:text-box><text:p text:style-name="P252"><text:span text:style-name="T50">IN</text:span></text:p></draw:text-box></draw:frame><draw:line draw:style-name="gr2" draw:text-style-name="P251" svg:x1="5.947cm" svg:y1="1.953cm" svg:x2="9.447cm" svg:y2="1.953cm"><text:p/></draw:line><draw:line draw:style-name="gr2" draw:text-style-name="P251" svg:x1="9.449cm" svg:y1="1.953cm" svg:x2="9.449cm" svg:y2="2.452cm"><text:p/></draw:line><draw:line draw:style-name="gr2" draw:text-style-name="P251" svg:x1="4.947cm" svg:y1="2.453cm" svg:x2="5.947cm" svg:y2="2.453cm"><text:p/></draw:line><draw:line draw:style-name="gr2" draw:text-style-name="P251" svg:x1="5.947cm" svg:y1="1.953cm" svg:x2="5.947cm" svg:y2="2.452cm"><text:p/></draw:line><draw:line draw:style-name="gr7" draw:text-style-name="P251" svg:x1="2.951cm" svg:y1="0.205cm" svg:x2="3.701cm" svg:y2="0.205cm"><text:p/></draw:line><draw:frame draw:style-name="gr6" draw:text-style-name="P253" svg:width="1.124cm" svg:height="0.65cm" svg:x="3.519cm" svg:y="-0.044cm"><draw:text-box><text:p text:style-name="P252"><text:span text:style-name="T50">PT</text:span></text:p></draw:text-box></draw:frame><draw:line draw:style-name="gr7" draw:text-style-name="P251" svg:x1="4.948cm" svg:y1="0.205cm" svg:x2="4.198cm" svg:y2="0.205cm"><text:p/></draw:line><draw:line draw:style-name="gr7" draw:text-style-name="P251" svg:x1="7.447cm" svg:y1="0.205cm" svg:x2="8.198cm" svg:y2="0.205cm"><text:p/></draw:line><draw:frame draw:style-name="gr6" draw:text-style-name="P253" svg:width="1.124cm" svg:height="0.65cm" svg:x="8.017cm" svg:y="-0.044cm"><draw:text-box><text:p text:style-name="P252"><text:span text:style-name="T50">PT</text:span></text:p></draw:text-box></draw:frame><draw:line draw:style-name="gr7" draw:text-style-name="P251" svg:x1="9.447cm" svg:y1="0.205cm" svg:x2="8.697cm" svg:y2="0.205cm"><text:p/></draw:line></draw:g></text:p>
      <text:p text:style-name="P87"/>
      <text:p text:style-name="P25"/>
      <text:list xml:id="list336307681" text:continue-numbering="true" text:style-name="L1">
        <text:list-item>
          <text:h text:style-name="P211" text:outline-level="1">Logik Bausteine</text:h>
        </text:list-item>
      </text:list>
      <text:p text:style-name="P16"/>
      <text:list xml:id="list33637665" text:continue-numbering="true" text:style-name="L1">
        <text:list-item>
          <text:list>
            <text:list-item>
              <text:h text:style-name="P217" text:outline-level="2"><text:alphabetical-index-mark-start text:id="IMark100843576"/>BCDC_TO_INT<text:alphabetical-index-mark-end text:id="IMark100843576"/></text:h>
            </text:list-item>
          </text:list>
        </text:list-item>
      </text:list>
      <text:p text:style-name="P22">Type<text:tab/>Funktion : INT</text:p>
      <text:p text:style-name="P22"><text:span text:style-name="T16">Input</text:span><text:tab/>IN : BYTE (BCD codierter Eingang)</text:p>
      <text:p text:style-name="P25"><draw:frame draw:style-name="fr4" draw:name="Grafik413" text:anchor-type="paragraph" svg:x="1.067cm" svg:y="0.688cm" svg:width="4.881cm" svg:height="0.99cm" draw:z-index="684"><draw:image xlink:href="Pictures/10000000000001710000004B1DF17AC6.png" xlink:type="simple" xlink:show="embed" xlink:actuate="onLoad"/></draw:frame>Output<text:tab/>INT (Ausgangswert)</text:p>
      <text:p text:style-name="P55"><text:line-break/>BCDC_TO_INT konvertiert ein BCD codiertes Eingangs BYTE in einen Integer Wert.</text:p>
      <text:list xml:id="list33656125" text:continue-numbering="true" text:style-name="L1">
        <text:list-item>
          <text:list>
            <text:list-item>
              <text:h text:style-name="P217" text:outline-level="2"><text:alphabetical-index-mark-start text:id="IMark100843576"/>BIT_COUNT<text:alphabetical-index-mark-end text:id="IMark100843576"/></text:h>
            </text:list-item>
          </text:list>
        </text:list-item>
      </text:list>
      <text:p text:style-name="P22">Type<text:tab/>Funktion : INT</text:p>
      <text:p text:style-name="P22"><text:span text:style-name="T16">Input</text:span><text:tab/>IN : DWORD (Eingang)</text:p>
      <text:p text:style-name="P25"><draw:frame draw:style-name="fr4" draw:name="Grafik310" text:anchor-type="paragraph" svg:x="1.12cm" svg:y="0.672cm" svg:width="4.022cm" svg:height="1.141cm" draw:z-index="284"><draw:image xlink:href="Pictures/10000000000001340000005569674502.png" xlink:type="simple" xlink:show="embed" xlink:actuate="onLoad"/></draw:frame>Output<text:tab/>INT (Anzahl der Bits, welche in IN den Wert TRUE (1) besitzen)</text:p>
      <text:p text:style-name="P25"><text:line-break/>BIT_COUNT ermittelt die Anzahl der Bits in IN, welche den Wert TRUE (1) besitzen. Der Eingang IN ist DWORD und Kann auch die Typen Byte und Word verarbeiten.</text:p>
      <text:list xml:id="list33632724" text:continue-numbering="true" text:style-name="L1">
        <text:list-item>
          <text:list>
            <text:list-item>
              <text:h text:style-name="P217" text:outline-level="2"><text:soft-page-break/><text:alphabetical-index-mark-start text:id="IMark100843576"/>BIT_LOAD_B<text:alphabetical-index-mark-end text:id="IMark100843576"/></text:h>
            </text:list-item>
          </text:list>
        </text:list-item>
      </text:list>
      <text:p text:style-name="P22">Type<text:tab/>Funktion : BYTE</text:p>
      <text:p text:style-name="P22"><text:span text:style-name="T16">Input</text:span><text:tab/>IN : BYTE (Eingang)</text:p>
      <text:p text:style-name="P52"><text:tab/>VAL : BOOL (Wert des zu ladenden Bits)</text:p>
      <text:p text:style-name="P52"><text:tab/>POS : INT (Position des zu ladenden Bits)</text:p>
      <text:p text:style-name="P25"><draw:frame draw:style-name="fr4" draw:name="Grafik482" text:anchor-type="paragraph" svg:x="1.046cm" svg:y="0.69cm" svg:width="4.791cm" svg:height="1.79cm" draw:z-index="534"><draw:image xlink:href="Pictures/100000000000016A000000871EB27646.png" xlink:type="simple" xlink:show="embed" xlink:actuate="onLoad"/></draw:frame>Output<text:tab/>BYTE (Ausgang)</text:p>
      <text:p text:style-name="P55"><text:line-break/>BIT_LOAD_B kopiert das am Eingang VAL anliegende Bit an die Position N im Byte IN. Das niederwertigste Bit B0 wird mit der Position 0 bezeichnet.</text:p>
      <text:list xml:id="list33633876" text:continue-numbering="true" text:style-name="L1">
        <text:list-item>
          <text:list>
            <text:list-item>
              <text:h text:style-name="P217" text:outline-level="2"><text:alphabetical-index-mark-start text:id="IMark100843576"/>BIT_LOAD_DW<text:alphabetical-index-mark-end text:id="IMark100843576"/></text:h>
            </text:list-item>
          </text:list>
        </text:list-item>
      </text:list>
      <text:p text:style-name="P22">Type<text:tab/>Funktion : DWORD</text:p>
      <text:p text:style-name="P22"><text:span text:style-name="T16">Input</text:span><text:tab/>IN : DWORD (Eingang)</text:p>
      <text:p text:style-name="P52"><text:tab/>VAL : BOOL (Wert des zu ladenden Bits)</text:p>
      <text:p text:style-name="P52"><text:tab/>POS : INT (Position des zu ladenden Bits)</text:p>
      <text:p text:style-name="P25"><draw:frame draw:style-name="fr4" draw:name="Grafik483" text:anchor-type="paragraph" svg:x="1.023cm" svg:y="0.644cm" svg:width="5.579cm" svg:height="1.79cm" draw:z-index="535"><draw:image xlink:href="Pictures/10000000000001A60000008780FB3AE2.png" xlink:type="simple" xlink:show="embed" xlink:actuate="onLoad"/></draw:frame>Output<text:tab/>DWORD (Ausgang)</text:p>
      <text:p text:style-name="P55"><text:line-break/>BIT_LOAD_DW kopiert das am Eingang VAL anliegende Bit an die Position N im DWORD IN. Das niederwertigste Bit B0 wird mit der Position 0 bezeichnet.</text:p>
      <text:list xml:id="list33642314" text:continue-numbering="true" text:style-name="L1">
        <text:list-item>
          <text:list>
            <text:list-item>
              <text:h text:style-name="P217" text:outline-level="2"><text:soft-page-break/><text:alphabetical-index-mark-start text:id="IMark100843576"/>BIT_LOAD_W<text:alphabetical-index-mark-end text:id="IMark100843576"/></text:h>
            </text:list-item>
          </text:list>
        </text:list-item>
      </text:list>
      <text:p text:style-name="P22">Type<text:tab/>Funktion : WORD</text:p>
      <text:p text:style-name="P22"><text:span text:style-name="T16">Input</text:span><text:tab/>IN : WORD (Eingang)</text:p>
      <text:p text:style-name="P52"><text:tab/>VAL : BOOL (Wert des zu ladenden Bits)</text:p>
      <text:p text:style-name="P52"><text:tab/>POS : INT (Position des zu ladenden Bits)</text:p>
      <text:p text:style-name="P25"><draw:frame draw:style-name="fr4" draw:name="Grafik484" text:anchor-type="paragraph" svg:x="1.046cm" svg:y="0.69cm" svg:width="4.791cm" svg:height="1.79cm" draw:z-index="536"><draw:image xlink:href="Pictures/100000000000016A000000874176E321.png" xlink:type="simple" xlink:show="embed" xlink:actuate="onLoad"/></draw:frame>Output<text:tab/>WORD (Ausgang)</text:p>
      <text:p text:style-name="P55"><text:line-break/>BIT_LOAD_W kopiert das am Eingang VAL anliegende Bit an die Position N im WORD IN. Das niederwertigste Bit B0 wird mit der Position 0 bezeichnet.</text:p>
      <text:list xml:id="list33626505" text:continue-numbering="true" text:style-name="L1">
        <text:list-item>
          <text:list>
            <text:list-item>
              <text:h text:style-name="P217" text:outline-level="2"><text:alphabetical-index-mark-start text:id="IMark100843576"/>BIT_OF_DWORD<text:alphabetical-index-mark-end text:id="IMark100843576"/></text:h>
            </text:list-item>
          </text:list>
        </text:list-item>
      </text:list>
      <text:p text:style-name="P22">Type<text:tab/>Funktion : BOOL</text:p>
      <text:p text:style-name="P22"><text:span text:style-name="T16">Input</text:span><text:tab/>IN : DWORD (Eingang)</text:p>
      <text:p text:style-name="P22"><text:tab/>N : INT (Nummer des Bits 0..31)</text:p>
      <text:p text:style-name="P25"><draw:frame draw:style-name="fr4" draw:name="Grafik106" text:anchor-type="paragraph" svg:x="1.125cm" svg:y="0.66cm" svg:width="4.971cm" svg:height="1.57cm" draw:z-index="70"><draw:image xlink:href="Pictures/100000000000017800000077E24E5BB8.png" xlink:type="simple" xlink:show="embed" xlink:actuate="onLoad"/></draw:frame>Output<text:tab/>BOOL (Ausgangsbit)</text:p>
      <text:p text:style-name="P25"><text:line-break/>BIT_OF_DWORD extrahiert ein Bit aus dem DWORD am Eingang IN.</text:p>
      <text:p text:style-name="P25">Bit0 für N=0, Bit1 für N=1 usw.</text:p>
      <text:p text:style-name="P55"/>
      <text:list xml:id="list33624622" text:continue-numbering="true" text:style-name="L1">
        <text:list-item>
          <text:list>
            <text:list-item>
              <text:h text:style-name="P217" text:outline-level="2"><text:soft-page-break/><text:alphabetical-index-mark-start text:id="IMark100843576"/>BYTE_OF_BIT<text:alphabetical-index-mark-end text:id="IMark100843576"/></text:h>
            </text:list-item>
          </text:list>
        </text:list-item>
      </text:list>
      <text:p text:style-name="P22">Type<text:tab/>Funktion : BYTE</text:p>
      <text:p text:style-name="P22"><text:span text:style-name="T16">Input</text:span><text:tab/>B0 .. B7 : BOOL (Eingangs Bits)</text:p>
      <text:p text:style-name="P25">Output<text:tab/>BYTE (Ausgangsbyte)</text:p>
      <text:p text:style-name="P25"><draw:frame draw:style-name="fr4" draw:name="Grafik107" text:anchor-type="paragraph" svg:x="1.115cm" svg:y="0.192cm" svg:width="4.521cm" svg:height="4.27cm" draw:z-index="71"><draw:image xlink:href="Pictures/10000000000001560000014324105CD4.png" xlink:type="simple" xlink:show="embed" xlink:actuate="onLoad"/></draw:frame><text:line-break/>BYTE_OF_BIT setzt ein Byte aus 8 einzelnen Bits (B0 .. B7) zusammen.</text:p>
      <text:list xml:id="list33627677" text:continue-numbering="true" text:style-name="L1">
        <text:list-item>
          <text:list>
            <text:list-item>
              <text:h text:style-name="P217" text:outline-level="2"><text:alphabetical-index-mark-start text:id="IMark100843576"/>BYTE_OF_DWORD<text:alphabetical-index-mark-end text:id="IMark100843576"/></text:h>
            </text:list-item>
          </text:list>
        </text:list-item>
      </text:list>
      <text:p text:style-name="P22">Type<text:tab/>Funktion : BYTE</text:p>
      <text:p text:style-name="P22"><text:span text:style-name="T16">Input</text:span><text:tab/>IN : DWORD (Eingangs-DWORD)</text:p>
      <text:p text:style-name="P25"><draw:frame draw:style-name="fr4" draw:name="Grafik108" text:anchor-type="paragraph" svg:x="1.078cm" svg:y="0.684cm" svg:width="5.42cm" svg:height="1.57cm" draw:z-index="72"><draw:image xlink:href="Pictures/100000000000019A000000779CD846BB.png" xlink:type="simple" xlink:show="embed" xlink:actuate="onLoad"/></draw:frame>Output<text:tab/>BYTE (Ausgangsbyte)</text:p>
      <text:p text:style-name="P25"><text:line-break/>BYTE_OF_DWORD extrahiert ein Byte (B0 .. B3) aus einem DWORD. Die einzelnen Bytes werden mit 0 - 3 am Eingang IN ausgewählt.</text:p>
      <text:p text:style-name="P55"/>
      <text:list xml:id="list33635570" text:continue-numbering="true" text:style-name="L1">
        <text:list-item>
          <text:list>
            <text:list-item>
              <text:h text:style-name="P217" text:outline-level="2"><text:soft-page-break/><text:alphabetical-index-mark-start text:id="IMark100843576"/>BYTE_TO_BIT<text:alphabetical-index-mark-end text:id="IMark100843576"/></text:h>
            </text:list-item>
          </text:list>
        </text:list-item>
      </text:list>
      <text:p text:style-name="P22">Type<text:tab/>Funktionsbaustein</text:p>
      <text:p text:style-name="P22"><text:span text:style-name="T16">Input</text:span><text:tab/>IN : DWORD (Eingangs Byte)</text:p>
      <text:p text:style-name="P25">Output<text:tab/>B0 .. B7 : BOOL (Ausgangs Bits)</text:p>
      <text:p text:style-name="P25"><draw:frame draw:style-name="fr4" draw:name="Grafik109" text:anchor-type="paragraph" svg:x="1.185cm" svg:y="0.236cm" svg:width="2.731cm" svg:height="4.44cm" draw:z-index="73"><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xml:id="list33647633" text:continue-numbering="true" text:style-name="L1">
        <text:list-item>
          <text:list>
            <text:list-item>
              <text:h text:style-name="P217" text:outline-level="2"><text:alphabetical-index-mark-start text:id="IMark100843576"/>CHECK_PARITY<text:alphabetical-index-mark-end text:id="IMark100843576"/></text:h>
            </text:list-item>
          </text:list>
        </text:list-item>
      </text:list>
      <text:p text:style-name="P22">Type<text:tab/>Funktion : BOOL</text:p>
      <text:p text:style-name="P22"><text:span text:style-name="T16">Input</text:span><text:tab/>IN : BYTE (Eingangsbyte)</text:p>
      <text:p text:style-name="P52"><text:tab/>P : BOOL (<text:span text:style-name="T16">Parity-</text:span>Bit)</text:p>
      <text:p text:style-name="P25"><draw:frame draw:style-name="fr4" draw:name="Grafik110" text:anchor-type="paragraph" svg:x="1.067cm" svg:y="0.656cm" svg:width="4.521cm" svg:height="1.57cm" draw:z-index="74"><draw:image xlink:href="Pictures/1000000000000156000000777000D7DB.png" xlink:type="simple" xlink:show="embed" xlink:actuate="onLoad"/></draw:frame>Output<text:tab/>BYTE (Ausgang ist bei gerader Parität <text:span text:style-name="T4">TRUE</text:span>)</text:p>
      <text:p text:style-name="P25"><text:line-break/>CHECK_PARITY überprüft ein Eingangsbyte IN und ein zugehöriges <text:span text:style-name="T16">Parity-</text:span>Bit P auf gerade Parität. Der Ausgang ist TRUE, wenn die Anzahl der Bits im Byte IN die den Wert TRUE besitzen zusammen mit dem <text:span text:style-name="T16">Parity-</text:span>Bit P eine gerade Anzahl ergeben.</text:p>
      <text:p text:style-name="P209"><draw:frame draw:style-name="fr4" draw:name="Grafik111" text:anchor-type="paragraph" svg:x="1.062cm" svg:y="0.61cm" svg:width="12.531cm" svg:height="1.589cm" draw:z-index="75"><draw:image xlink:href="Pictures/10000000000003B30000007886A5752B.png" xlink:type="simple" xlink:show="embed" xlink:actuate="onLoad"/></draw:frame><text:soft-page-break/><text:span text:style-name="T38">Beispiel</text:span> für Ausgang = TRUE:</text:p>
      <text:p text:style-name="P89">Beispiel für Ausgang = FALSE:</text:p>
      <text:p text:style-name="P89"><draw:frame draw:style-name="fr4" draw:name="Grafik112" text:anchor-type="paragraph" svg:x="1.106cm" svg:y="0.085cm" svg:width="12.531cm" svg:height="1.589cm" draw:z-index="76"><draw:image xlink:href="Pictures/10000000000003B300000078EE2DF6DA.png" xlink:type="simple" xlink:show="embed" xlink:actuate="onLoad"/></draw:frame></text:p>
      <text:list xml:id="list33653163" text:continue-numbering="true" text:style-name="L1">
        <text:list-item>
          <text:list>
            <text:list-item>
              <text:h text:style-name="P217" text:outline-level="2"><text:alphabetical-index-mark-start text:id="IMark100843576"/>CRC_CHECK<text:alphabetical-index-mark-end text:id="IMark100843576"/></text:h>
            </text:list-item>
          </text:list>
        </text:list-item>
      </text:list>
      <text:p text:style-name="Standard">Type<text:tab/><text:span text:style-name="T38">Funktion</text:span> : BOOL</text:p>
      <text:p text:style-name="P22"><text:span text:style-name="T16">Input</text:span><text:tab/>PT : POINTER TO ARRAY OF BYTE (Eingangsbyte)</text:p>
      <text:p text:style-name="P22"><text:tab/>SIZE : INT (Größe des <text:span text:style-name="T16">Arrays</text:span>)</text:p>
      <text:p text:style-name="P25">Config<text:tab/>POLYNOM_L : DWORD (unterste 32 Bit des Polynoms)</text:p>
      <text:p text:style-name="P25"><text:tab/>POLYNOM_32 : BOOL (Bit 32 des Polynoms)</text:p>
      <text:p text:style-name="P25"><draw:frame draw:style-name="fr4" draw:name="Grafik308" text:anchor-type="paragraph" svg:x="1.041cm" svg:y="0.732cm" svg:width="4.971cm" svg:height="1.57cm" draw:z-index="282"><draw:image xlink:href="Pictures/1000000000000178000000779AD6E6C3.png" xlink:type="simple" xlink:show="embed" xlink:actuate="onLoad"/></draw:frame>Output<text:tab/>BOOL (Ausgang ist TRUE, wenn die CRC-Checksumme = 0)</text:p>
      <text:p text:style-name="P25"><text:line-break/>CRC_CHECK prüft ein Array <text:span text:style-name="T16">of</text:span> Byte auf eine gültige CRC Checksumme und liefert TRUE, wenn die Checksumme 0 ergibt und der Datenblock fehlerfrei vorliegt. Beim Aufruf wird der Funktion ein <text:span text:style-name="T16">Pointer</text:span> auf das zu bearbeitende Array und dessen Größe in Bytes übergeben. Unter CoDeSys lautet der Aufruf: CRC_CHECK(ADR(Array), SIZEOF(Array)), wobei Array der Name des zu prüfenden Arrays ist. ADR ist eine Standardfunktion, die den <text:span text:style-name="T16">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xml:id="list33638156" text:continue-numbering="true" text:style-name="L1">
        <text:list-item>
          <text:list>
            <text:list-item>
              <text:h text:style-name="P217" text:outline-level="2"><text:soft-page-break/><text:alphabetical-index-mark-start text:id="IMark100843576"/>CRC_GEN<text:alphabetical-index-mark-end text:id="IMark100843576"/></text:h>
            </text:list-item>
          </text:list>
        </text:list-item>
      </text:list>
      <text:p text:style-name="Standard">Type<text:tab/><text:span text:style-name="T46">Funktion</text:span> : DWORD</text:p>
      <text:p text:style-name="P22"><text:span text:style-name="T16">Input</text:span><text:tab/>PT : POINTER TO ARRAY OF BYTE (Datenpaket)</text:p>
      <text:p text:style-name="P22"><text:tab/>SIZE : INT (Größe des <text:span text:style-name="T16">Arrays</text:span>)</text:p>
      <text:p text:style-name="P25">Config<text:tab/>POLYNOM_L : DWORD (unterste 32 Bits des Polynoms)</text:p>
      <text:p text:style-name="P25"><text:tab/>POLYNOM_32 : BOOL (Bit 32 des Polynoms)</text:p>
      <text:p text:style-name="P55"><text:tab/>INIT : DWORD (INIT Daten)</text:p>
      <text:p text:style-name="P55"><text:tab/>XOR_OUT : DWORD (Letztes XOR des Ausgangs)</text:p>
      <text:p text:style-name="P55"><text:tab/>REV_IN : BOOL (Eingangsdaten Bytes Umkehren)</text:p>
      <text:p text:style-name="P55"><text:tab/>REV_OUT : (Ausgangsdaten Umkehren)</text:p>
      <text:p text:style-name="P25"><draw:frame draw:style-name="fr4" draw:name="Grafik307" text:anchor-type="paragraph" svg:x="1.122cm" svg:y="0.681cm" svg:width="4.069cm" svg:height="1.57cm" draw:z-index="325"><draw:image xlink:href="Pictures/100000000000013400000077F2AF2F3D.png" xlink:type="simple" xlink:show="embed" xlink:actuate="onLoad"/></draw:frame>Output<text:tab/>DWORD (errechnete CRC-Checksumme)</text:p>
      <text:p text:style-name="P25"><text:line-break/>CRC_GEN generiert eine CRC-Checksumme aus einen beliebig großen Array <text:span text:style-name="T16">of</text:span> Byte. Beim Aufruf wird der Funktion ein <text:span text:style-name="T16">Pointer</text:span> auf das zu bearbeitende Array und dessen Größe in Bytes übergeben. Unter CoDeSys lautet der Aufruf: CRC_GEN(ADR(Array), SIZEOF(Array)), wobei Array der Name des zu bearbeitenden Arrays ist. ADR ist eine Standardfunktion, die den <text:span text:style-name="T16">Pointer</text:span>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25">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96">CRC</text:p>
          </table:table-cell>
          <table:table-cell table:style-name="Tabelle11.A1" office:value-type="string">
            <text:p text:style-name="P150">Polynom</text:p>
          </table:table-cell>
          <table:table-cell table:style-name="Tabelle11.A1" office:value-type="string">
            <text:p text:style-name="P150">initial HEX</text:p>
          </table:table-cell>
          <table:table-cell table:style-name="Tabelle11.A1" office:value-type="string">
            <text:p text:style-name="P150">XOR_OUT</text:p>
          </table:table-cell>
          <table:table-cell table:style-name="Tabelle11.A1" office:value-type="string">
            <text:p text:style-name="P151">REV<text:line-break/>IN</text:p>
          </table:table-cell>
          <table:table-cell table:style-name="Tabelle11.A1" office:value-type="string">
            <text:p text:style-name="P151">REV<text:line-break/>OUT</text:p>
          </table:table-cell>
          <table:table-cell table:style-name="Tabelle11.A1" office:value-type="string">
            <text:p text:style-name="P151">P32</text:p>
          </table:table-cell>
          <table:table-cell table:style-name="Tabelle11.A1" office:value-type="string">
            <text:p text:style-name="P153">Polynom_L</text:p>
          </table:table-cell>
          <table:table-cell table:style-name="Tabelle11.I1" office:value-type="string">
            <text:p text:style-name="P152">Polynom_L (DEC)</text:p>
          </table:table-cell>
        </table:table-row>
        <text:soft-page-break/>
        <table:table-row table:style-name="Tabelle11.1">
          <table:table-cell table:style-name="Tabelle11.A2" office:value-type="string">
            <text:p text:style-name="P196">CRC-4-ITU<text:line-break/>ITU G.704, <text:line-break/>p. 12 </text:p>
          </table:table-cell>
          <table:table-cell table:style-name="Tabelle11.A2" office:value-type="string">
            <text:p text:style-name="P150">x4 + x + 1 <text:tab/></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0 00010011</text:p>
          </table:table-cell>
          <table:table-cell table:style-name="Tabelle11.I2" office:value-type="string">
            <text:p text:style-name="P152">19</text:p>
          </table:table-cell>
        </table:table-row>
        <table:table-row table:style-name="Tabelle11.1">
          <table:table-cell table:style-name="Tabelle11.A2" office:value-type="string">
            <text:p text:style-name="P196">CRC-5-ITU<text:line-break/>ITU G.704, p. 9<text:line-break/>Bluetooth</text:p>
          </table:table-cell>
          <table:table-cell table:style-name="Tabelle11.A2" office:value-type="string">
            <text:p text:style-name="P150">x5 + x4 + x2 + 1 </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0 00110101</text:p>
          </table:table-cell>
          <table:table-cell table:style-name="Tabelle11.I2" office:value-type="string">
            <text:p text:style-name="P152">53</text:p>
          </table:table-cell>
        </table:table-row>
        <table:table-row table:style-name="Tabelle11.1">
          <table:table-cell table:style-name="Tabelle11.A2" office:value-type="string">
            <text:p text:style-name="P196">CRC-5-USB<text:line-break/>USB token packets</text:p>
          </table:table-cell>
          <table:table-cell table:style-name="Tabelle11.A2" office:value-type="string">
            <text:p text:style-name="P150">x5 + x2 + 1 </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0 00100101</text:p>
          </table:table-cell>
          <table:table-cell table:style-name="Tabelle11.I2" office:value-type="string">
            <text:p text:style-name="P152">37</text:p>
          </table:table-cell>
        </table:table-row>
        <table:table-row table:style-name="Tabelle11.5">
          <table:table-cell table:style-name="Tabelle11.A2" office:value-type="string">
            <text:p text:style-name="P196">CRC-6-ITU<text:line-break/>ITU G.704, p. 3</text:p>
          </table:table-cell>
          <table:table-cell table:style-name="Tabelle11.A2" office:value-type="string">
            <text:p text:style-name="P150">x6 + x + 1 <text:tab/></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0 01000011</text:p>
          </table:table-cell>
          <table:table-cell table:style-name="Tabelle11.I2" office:value-type="string">
            <text:p text:style-name="P152">67</text:p>
          </table:table-cell>
        </table:table-row>
        <table:table-row table:style-name="Tabelle11.1">
          <table:table-cell table:style-name="Tabelle11.A2" office:value-type="string">
            <text:p text:style-name="P196">CRC-7<text:line-break/>telecom, MMC</text:p>
          </table:table-cell>
          <table:table-cell table:style-name="Tabelle11.A2" office:value-type="string">
            <text:p text:style-name="P150">x7 + x3 + 1</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0 10001001</text:p>
          </table:table-cell>
          <table:table-cell table:style-name="Tabelle11.I2" office:value-type="string">
            <text:p text:style-name="P152">137</text:p>
          </table:table-cell>
        </table:table-row>
        <table:table-row table:style-name="Tabelle11.1">
          <table:table-cell table:style-name="Tabelle11.A2" office:value-type="string">
            <text:p text:style-name="P196">CRC-8-ATM<text:line-break/>ATM HEC</text:p>
          </table:table-cell>
          <table:table-cell table:style-name="Tabelle11.A2" office:value-type="string">
            <text:p text:style-name="P150">x8 + x2 + x + 1</text:p>
          </table:table-cell>
          <table:table-cell table:style-name="Tabelle11.A2" office:value-type="string">
            <text:p text:style-name="P150">00</text:p>
          </table:table-cell>
          <table:table-cell table:style-name="Tabelle11.A2" office:value-type="string">
            <text:p text:style-name="P150">00</text:p>
          </table:table-cell>
          <table:table-cell table:style-name="Tabelle11.A2" office:value-type="string">
            <text:p text:style-name="P155">0</text:p>
          </table:table-cell>
          <table:table-cell table:style-name="Tabelle11.A2" office:value-type="string">
            <text:p text:style-name="P155">0</text:p>
          </table:table-cell>
          <table:table-cell table:style-name="Tabelle11.A2" office:value-type="string">
            <text:p text:style-name="P155">0</text:p>
          </table:table-cell>
          <table:table-cell table:style-name="Tabelle11.A2" office:value-type="string">
            <text:p text:style-name="P153">00000000 00000000 00000001 00000111</text:p>
          </table:table-cell>
          <table:table-cell table:style-name="Tabelle11.I2" office:value-type="string">
            <text:p text:style-name="P152">263</text:p>
          </table:table-cell>
        </table:table-row>
        <table:table-row table:style-name="Tabelle11.1">
          <table:table-cell table:style-name="Tabelle11.A2" office:value-type="string">
            <text:p text:style-name="P196">CRC-8-CCITT<text:line-break/>1-Wire bus</text:p>
          </table:table-cell>
          <table:table-cell table:style-name="Tabelle11.A2" office:value-type="string">
            <text:p text:style-name="P150">x8 + x7 + x3 + x2 + 1 </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1 10001101</text:p>
          </table:table-cell>
          <table:table-cell table:style-name="Tabelle11.I2" office:value-type="string">
            <text:p text:style-name="P152">397</text:p>
          </table:table-cell>
        </table:table-row>
        <table:table-row table:style-name="Tabelle11.1">
          <table:table-cell table:style-name="Tabelle11.A2" office:value-type="string">
            <text:p text:style-name="P196">CRC-8<text:line-break/>1-Wire bus<text:line-break/>Dallas/Maxim</text:p>
          </table:table-cell>
          <table:table-cell table:style-name="Tabelle11.A2" office:value-type="string">
            <text:p text:style-name="P150">x8 + x5 + x4 + 1</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1 00110001</text:p>
          </table:table-cell>
          <table:table-cell table:style-name="Tabelle11.I2" office:value-type="string">
            <text:p text:style-name="P152">305</text:p>
            <text:p text:style-name="P154"/>
          </table:table-cell>
        </table:table-row>
        <table:table-row table:style-name="Tabelle11.1">
          <table:table-cell table:style-name="Tabelle11.A2" office:value-type="string">
            <text:p text:style-name="P196">CRC-8 </text:p>
          </table:table-cell>
          <table:table-cell table:style-name="Tabelle11.A2" office:value-type="string">
            <text:p text:style-name="P150">x8 + x7 + x6 + x4 + x2 + 1</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1 11010101</text:p>
          </table:table-cell>
          <table:table-cell table:style-name="Tabelle11.I2" office:value-type="string">
            <text:p text:style-name="P152">469</text:p>
          </table:table-cell>
        </table:table-row>
        <table:table-row table:style-name="Tabelle11.1">
          <table:table-cell table:style-name="Tabelle11.A2" office:value-type="string">
            <text:p text:style-name="P196">CRC-8<text:line-break/>SAE J1850</text:p>
          </table:table-cell>
          <table:table-cell table:style-name="Tabelle11.A2" office:value-type="string">
            <text:p text:style-name="P150">x8 + x4 + x3 + x2 + 1</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001 00011101</text:p>
          </table:table-cell>
          <table:table-cell table:style-name="Tabelle11.I2" office:value-type="string">
            <text:p text:style-name="P152">285</text:p>
          </table:table-cell>
        </table:table-row>
        <table:table-row table:style-name="Tabelle11.1">
          <table:table-cell table:style-name="Tabelle11.A2" office:value-type="string">
            <text:p text:style-name="P196">CRC-10 </text:p>
          </table:table-cell>
          <table:table-cell table:style-name="Tabelle11.A2" office:value-type="string">
            <text:p text:style-name="P150">x10 + x9 + x5 + x4 + x + 1</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00110 00110011</text:p>
          </table:table-cell>
          <table:table-cell table:style-name="Tabelle11.I2" office:value-type="string">
            <text:p text:style-name="P152">1587</text:p>
          </table:table-cell>
        </table:table-row>
        <table:table-row table:style-name="Tabelle11.1">
          <table:table-cell table:style-name="Tabelle11.A2" office:value-type="string">
            <text:p text:style-name="P196">CRC-12<text:line-break/>telecom systems</text:p>
          </table:table-cell>
          <table:table-cell table:style-name="Tabelle11.A2" office:value-type="string">
            <text:p text:style-name="P150">x12 + x11 + x3 + x2 + x + 1</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00011000 00001111</text:p>
          </table:table-cell>
          <table:table-cell table:style-name="Tabelle11.I2" office:value-type="string">
            <text:p text:style-name="P152">6159</text:p>
          </table:table-cell>
        </table:table-row>
        <table:table-row table:style-name="Tabelle11.1">
          <table:table-cell table:style-name="Tabelle11.A2" office:value-type="string">
            <text:p text:style-name="P196">CRC-15<text:line-break/>CAN</text:p>
          </table:table-cell>
          <table:table-cell table:style-name="Tabelle11.A2" office:value-type="string">
            <text:p text:style-name="P156">x15 + x14 + x10 + x8 + x7 + x4 + x3 + 1 </text:p>
          </table:table-cell>
          <table:table-cell table:style-name="Tabelle11.A2" office:value-type="string">
            <text:p text:style-name="P150"/>
          </table:table-cell>
          <table:table-cell table:style-name="Tabelle11.A2" office:value-type="string">
            <text:p text:style-name="P150"/>
          </table:table-cell>
          <table:table-cell table:style-name="Tabelle11.A2" office:value-type="string">
            <text:p text:style-name="P155"/>
          </table:table-cell>
          <table:table-cell table:style-name="Tabelle11.A2" office:value-type="string">
            <text:p text:style-name="P155"/>
          </table:table-cell>
          <table:table-cell table:style-name="Tabelle11.A2" office:value-type="string">
            <text:p text:style-name="P155">0</text:p>
          </table:table-cell>
          <table:table-cell table:style-name="Tabelle11.A2" office:value-type="string">
            <text:p text:style-name="P153">00000000 00000000 11000101 10011001</text:p>
          </table:table-cell>
          <table:table-cell table:style-name="Tabelle11.I2" office:value-type="string">
            <text:p text:style-name="P152">50585</text:p>
          </table:table-cell>
        </table:table-row>
        <text:soft-page-break/>
        <table:table-row table:style-name="Tabelle11.15">
          <table:table-cell table:style-name="Tabelle11.A2" office:value-type="string">
            <text:p text:style-name="P197">CRC-CCITT <text:line-break/>XMODEM, PPP, IRDA,<text:line-break/>Bluetooth, V41</text:p>
          </table:table-cell>
          <table:table-cell table:style-name="Tabelle11.A2" office:value-type="string">
            <text:p text:style-name="P156">x16 + x12 + x5 + 1 </text:p>
          </table:table-cell>
          <table:table-cell table:style-name="Tabelle11.A2" office:value-type="string">
            <text:p text:style-name="P150">FFFF</text:p>
          </table:table-cell>
          <table:table-cell table:style-name="Tabelle11.A2" office:value-type="string">
            <text:p text:style-name="P150">0000</text:p>
          </table:table-cell>
          <table:table-cell table:style-name="Tabelle11.A2" office:value-type="string">
            <text:p text:style-name="P155">0</text:p>
          </table:table-cell>
          <table:table-cell table:style-name="Tabelle11.A2" office:value-type="string">
            <text:p text:style-name="P155">0</text:p>
          </table:table-cell>
          <table:table-cell table:style-name="Tabelle11.A2" office:value-type="string">
            <text:p text:style-name="P155">0</text:p>
          </table:table-cell>
          <table:table-cell table:style-name="Tabelle11.A2" office:value-type="string">
            <text:p text:style-name="P153">00000000 00000001<text:line-break/>00010000 00100001</text:p>
          </table:table-cell>
          <table:table-cell table:style-name="Tabelle11.I2" office:value-type="string">
            <text:p text:style-name="P152">69665</text:p>
          </table:table-cell>
        </table:table-row>
        <table:table-row table:style-name="Tabelle11.15">
          <table:table-cell table:style-name="Tabelle11.A2" office:value-type="string">
            <text:p text:style-name="P197">CRC-16<text:line-break/>X25</text:p>
          </table:table-cell>
          <table:table-cell table:style-name="Tabelle11.A2" office:value-type="string">
            <text:p text:style-name="P156">x16 + x12 + x5 + 1 </text:p>
          </table:table-cell>
          <table:table-cell table:style-name="Tabelle11.A2" office:value-type="string">
            <text:p text:style-name="P150">FFFF</text:p>
          </table:table-cell>
          <table:table-cell table:style-name="Tabelle11.A2" office:value-type="string">
            <text:p text:style-name="P150">FFFF</text:p>
          </table:table-cell>
          <table:table-cell table:style-name="Tabelle11.A2" office:value-type="string">
            <text:p text:style-name="P155">1</text:p>
          </table:table-cell>
          <table:table-cell table:style-name="Tabelle11.A2" office:value-type="string">
            <text:p text:style-name="P155">1</text:p>
          </table:table-cell>
          <table:table-cell table:style-name="Tabelle11.A2" office:value-type="string">
            <text:p text:style-name="P155">0</text:p>
          </table:table-cell>
          <table:table-cell table:style-name="Tabelle11.A2" office:value-type="string">
            <text:p text:style-name="P153">00000000 00000001<text:line-break/>00010000 00100001</text:p>
          </table:table-cell>
          <table:table-cell table:style-name="Tabelle11.I2" office:value-type="string">
            <text:p text:style-name="P152">69665</text:p>
          </table:table-cell>
        </table:table-row>
        <table:table-row table:style-name="Tabelle11.15">
          <table:table-cell table:style-name="Tabelle11.A2" office:value-type="string">
            <text:p text:style-name="P197">CRC-16-CCITT<text:line-break/> KERMIT</text:p>
          </table:table-cell>
          <table:table-cell table:style-name="Tabelle11.A2" office:value-type="string">
            <text:p text:style-name="P156">x16 + x12 + x5 + 1 </text:p>
          </table:table-cell>
          <table:table-cell table:style-name="Tabelle11.A2" office:value-type="string">
            <text:p text:style-name="P150">0000</text:p>
          </table:table-cell>
          <table:table-cell table:style-name="Tabelle11.A2" office:value-type="string">
            <text:p text:style-name="P150">0000</text:p>
          </table:table-cell>
          <table:table-cell table:style-name="Tabelle11.A2" office:value-type="string">
            <text:p text:style-name="P155">1</text:p>
          </table:table-cell>
          <table:table-cell table:style-name="Tabelle11.A2" office:value-type="string">
            <text:p text:style-name="P155">1</text:p>
          </table:table-cell>
          <table:table-cell table:style-name="Tabelle11.A2" office:value-type="string">
            <text:p text:style-name="P155">0</text:p>
          </table:table-cell>
          <table:table-cell table:style-name="Tabelle11.A2" office:value-type="string">
            <text:p text:style-name="P153">00000000 00000001<text:line-break/>00010000 00100001</text:p>
          </table:table-cell>
          <table:table-cell table:style-name="Tabelle11.I2" office:value-type="string">
            <text:p text:style-name="P152">69665</text:p>
          </table:table-cell>
        </table:table-row>
        <table:table-row table:style-name="Tabelle11.1">
          <table:table-cell table:style-name="Tabelle11.A18" office:value-type="string">
            <text:p text:style-name="P196">CRC-16-IBM<text:line-break/>"CRC-16"<text:line-break/>USB, ARC</text:p>
          </table:table-cell>
          <table:table-cell table:style-name="Tabelle11.A18" office:value-type="string">
            <text:p text:style-name="P156">x16 + x15 + x2 + 1</text:p>
          </table:table-cell>
          <table:table-cell table:style-name="Tabelle11.A18" office:value-type="string">
            <text:p text:style-name="P150">0000</text:p>
          </table:table-cell>
          <table:table-cell table:style-name="Tabelle11.A18" office:value-type="string">
            <text:p text:style-name="P150">0000</text:p>
          </table:table-cell>
          <table:table-cell table:style-name="Tabelle11.A18" office:value-type="string">
            <text:p text:style-name="P155">1</text:p>
          </table:table-cell>
          <table:table-cell table:style-name="Tabelle11.A18" office:value-type="string">
            <text:p text:style-name="P155">1</text:p>
          </table:table-cell>
          <table:table-cell table:style-name="Tabelle11.A18" office:value-type="string">
            <text:p text:style-name="P155">0</text:p>
          </table:table-cell>
          <table:table-cell table:style-name="Tabelle11.A18" office:value-type="string">
            <text:p text:style-name="P153">00000000 00000001<text:line-break/>10000000 00000101</text:p>
          </table:table-cell>
          <table:table-cell table:style-name="Tabelle11.I18" office:value-type="string">
            <text:p text:style-name="P152">98309</text:p>
          </table:table-cell>
        </table:table-row>
        <table:table-row table:style-name="Tabelle11.1">
          <table:table-cell table:style-name="Tabelle11.A18" office:value-type="string">
            <text:p text:style-name="P196">CRC-16<text:line-break/>MODBUS</text:p>
          </table:table-cell>
          <table:table-cell table:style-name="Tabelle11.A18" office:value-type="string">
            <text:p text:style-name="P156">x16 + x15 + x2 + 1</text:p>
          </table:table-cell>
          <table:table-cell table:style-name="Tabelle11.A18" office:value-type="string">
            <text:p text:style-name="P150">FFFF</text:p>
          </table:table-cell>
          <table:table-cell table:style-name="Tabelle11.A18" office:value-type="string">
            <text:p text:style-name="P150">0000</text:p>
          </table:table-cell>
          <table:table-cell table:style-name="Tabelle11.A18" office:value-type="string">
            <text:p text:style-name="P155">1</text:p>
          </table:table-cell>
          <table:table-cell table:style-name="Tabelle11.A18" office:value-type="string">
            <text:p text:style-name="P155">1</text:p>
          </table:table-cell>
          <table:table-cell table:style-name="Tabelle11.A18" office:value-type="string">
            <text:p text:style-name="P155">0</text:p>
          </table:table-cell>
          <table:table-cell table:style-name="Tabelle11.A18" office:value-type="string">
            <text:p text:style-name="P153">00000000 00000001<text:line-break/>10000000 00000101</text:p>
          </table:table-cell>
          <table:table-cell table:style-name="Tabelle11.I18" office:value-type="string">
            <text:p text:style-name="P152">98309</text:p>
          </table:table-cell>
        </table:table-row>
        <table:table-row table:style-name="Tabelle11.1">
          <table:table-cell table:style-name="Tabelle11.A18" office:value-type="string">
            <text:p text:style-name="P196">CRC-24<text:line-break/>Radix-64 </text:p>
          </table:table-cell>
          <table:table-cell table:style-name="Tabelle11.A18" office:value-type="string">
            <text:p text:style-name="P156">x24 + x23 + x18 + x17 + x14 + x11 + x10 + x7 + x6 + x5 + x4 + x3 + x + 1 </text:p>
          </table:table-cell>
          <table:table-cell table:style-name="Tabelle11.A18" office:value-type="string">
            <text:p text:style-name="P150"/>
          </table:table-cell>
          <table:table-cell table:style-name="Tabelle11.A18" office:value-type="string">
            <text:p text:style-name="P150"/>
          </table:table-cell>
          <table:table-cell table:style-name="Tabelle11.A18" office:value-type="string">
            <text:p text:style-name="P155"/>
          </table:table-cell>
          <table:table-cell table:style-name="Tabelle11.A18" office:value-type="string">
            <text:p text:style-name="P155"/>
          </table:table-cell>
          <table:table-cell table:style-name="Tabelle11.A18" office:value-type="string">
            <text:p text:style-name="P155">0</text:p>
          </table:table-cell>
          <table:table-cell table:style-name="Tabelle11.A18" office:value-type="string">
            <text:p text:style-name="P153">00000001 10000110 01001100 11111011</text:p>
          </table:table-cell>
          <table:table-cell table:style-name="Tabelle11.I18" office:value-type="string">
            <text:p text:style-name="P152">25578747</text:p>
          </table:table-cell>
        </table:table-row>
        <table:table-row table:style-name="Tabelle11.1">
          <table:table-cell table:style-name="Tabelle11.A18" office:value-type="string">
            <text:p text:style-name="P196">CRC-32<text:line-break/>MPEG2<text:line-break/>IEEE 802.3</text:p>
          </table:table-cell>
          <table:table-cell table:style-name="Tabelle11.A18" office:value-type="string">
            <text:p text:style-name="P156">x32 + x26 + x23 + x22 + x16 + x12 + x11 + x10 + x8 + x7 + x5 + x4 + x2 + x + 1 </text:p>
          </table:table-cell>
          <table:table-cell table:style-name="Tabelle11.A18" office:value-type="string">
            <text:p text:style-name="P150">FFFF<text:line-break/>FFFF</text:p>
          </table:table-cell>
          <table:table-cell table:style-name="Tabelle11.A18" office:value-type="string">
            <text:p text:style-name="P150">FFFF<text:line-break/>FFFF</text:p>
          </table:table-cell>
          <table:table-cell table:style-name="Tabelle11.A18" office:value-type="string">
            <text:p text:style-name="P155">1</text:p>
          </table:table-cell>
          <table:table-cell table:style-name="Tabelle11.A18" office:value-type="string">
            <text:p text:style-name="P155">1</text:p>
          </table:table-cell>
          <table:table-cell table:style-name="Tabelle11.A18" office:value-type="string">
            <text:p text:style-name="P155">1</text:p>
          </table:table-cell>
          <table:table-cell table:style-name="Tabelle11.A18" office:value-type="string">
            <text:p text:style-name="P153">00000100 11000001 00011101 10110111</text:p>
          </table:table-cell>
          <table:table-cell table:style-name="Tabelle11.I18" office:value-type="string">
            <text:p text:style-name="P152">79764919</text:p>
          </table:table-cell>
        </table:table-row>
        <table:table-row table:style-name="Tabelle11.1">
          <table:table-cell table:style-name="Tabelle11.A18" office:value-type="string">
            <text:p text:style-name="P196">CRC-32C<text:line-break/>(Castagnoli) </text:p>
          </table:table-cell>
          <table:table-cell table:style-name="Tabelle11.A18" office:value-type="string">
            <text:p text:style-name="P156">x32 + x28 + x27 + x26 + x25 + x23 + x22 + x20 + x19 + x18 + x14 + x13 + x11 + x10 + x9 + x8 + x6 + 1 </text:p>
          </table:table-cell>
          <table:table-cell table:style-name="Tabelle11.A18" office:value-type="string">
            <text:p text:style-name="P150"/>
          </table:table-cell>
          <table:table-cell table:style-name="Tabelle11.A18" office:value-type="string">
            <text:p text:style-name="P150"/>
          </table:table-cell>
          <table:table-cell table:style-name="Tabelle11.A18" office:value-type="string">
            <text:p text:style-name="P155"/>
          </table:table-cell>
          <table:table-cell table:style-name="Tabelle11.A18" office:value-type="string">
            <text:p text:style-name="P155"/>
          </table:table-cell>
          <table:table-cell table:style-name="Tabelle11.A18" office:value-type="string">
            <text:p text:style-name="P155">1</text:p>
          </table:table-cell>
          <table:table-cell table:style-name="Tabelle11.A18" office:value-type="string">
            <text:p text:style-name="P153">00011110 11011100 01101111 01000001</text:p>
          </table:table-cell>
          <table:table-cell table:style-name="Tabelle11.I18" office:value-type="string">
            <text:p text:style-name="P152">517762881</text:p>
          </table:table-cell>
        </table:table-row>
      </table:table>
      <text:p text:style-name="P25"/>
      <text:list xml:id="list33642423" text:continue-numbering="true" text:style-name="L1">
        <text:list-item>
          <text:list>
            <text:list-item>
              <text:h text:style-name="P217" text:outline-level="2"><text:alphabetical-index-mark-start text:id="IMark100843576"/>DEC_2<text:alphabetical-index-mark-end text:id="IMark100843576"/> </text:h>
            </text:list-item>
          </text:list>
        </text:list-item>
      </text:list>
      <text:p text:style-name="P22">Type<text:tab/>Funktionsbaustein</text:p>
      <text:p text:style-name="P22"><text:span text:style-name="T16">Input</text:span><text:tab/>D : BOOL (Eingangs Bit)</text:p>
      <text:p text:style-name="P22"><text:tab/>A : BOOL (Adresse)</text:p>
      <text:p text:style-name="P25">Output<text:tab/>Q0 : BOOL (TRUE bei A=0)</text:p>
      <text:p text:style-name="P25"><draw:frame draw:style-name="fr4" draw:name="Grafik113" text:anchor-type="paragraph" svg:x="1.071cm" svg:y="0.619cm" svg:width="2.281cm" svg:height="1.75cm" draw:z-index="77"><draw:image xlink:href="Pictures/10000000000000AC000000849226E70F.png" xlink:type="simple" xlink:show="embed" xlink:actuate="onLoad"/></draw:frame><text:tab/>Q1 : BOOL (TRUE bei A=1)</text:p>
      <text:p text:style-name="P25"><text:soft-page-break/><text:line-break/>DEC_2 ist ein 2-Bit Dekodierbaustein. Ist A=0, so wird der Eingang D auf Ausgang Q0 geschaltet. Ist A=1, so wird D auf Q1 geschaltet. Mit anderen Worten: Q0=1 wenn D=1 und A=0.</text:p>
      <text:p text:style-name="P55">Logische Verknüpfung:<text:tab/><text:tab/>Q0 = D &amp; /A;<text:tab/>Q1 = D &amp; A</text:p>
      <text:p text:style-name="P25"><draw:g text:anchor-type="paragraph" draw:z-index="83" draw:style-name="gr1"><draw:line draw:style-name="gr3" draw:text-style-name="P251" svg:x1="2.501cm" svg:y1="0.157cm" svg:x2="2.501cm" svg:y2="0.656cm"><text:p/></draw:line><draw:line draw:style-name="gr3" draw:text-style-name="P251" svg:x1="2.002cm" svg:y1="0.651cm" svg:x2="2.501cm" svg:y2="0.651cm"><text:p/></draw:line><draw:line draw:style-name="gr3" draw:text-style-name="P251" svg:x1="2.501cm" svg:y1="0.157cm" svg:x2="2.751cm" svg:y2="0.157cm"><text:p/></draw:line><draw:line draw:style-name="gr3" draw:text-style-name="P251" svg:x1="2.752cm" svg:y1="0.656cm" svg:x2="2.752cm" svg:y2="0.157cm"><text:p/></draw:line><draw:line draw:style-name="gr3" draw:text-style-name="P251" svg:x1="2.752cm" svg:y1="0.651cm" svg:x2="3.502cm" svg:y2="0.651cm"><text:p/></draw:line><draw:frame draw:style-name="gr6" draw:text-style-name="P253" svg:width="1.251cm" svg:height="0.65cm" svg:x="1.002cm" svg:y="0.152cm"><draw:text-box><text:p text:style-name="P252"><text:span text:style-name="T50">D</text:span></text:p></draw:text-box></draw:frame><draw:line draw:style-name="gr3" draw:text-style-name="P251" svg:x1="3.501cm" svg:y1="0.157cm" svg:x2="3.501cm" svg:y2="0.656cm"><text:p/></draw:line><draw:line draw:style-name="gr3" draw:text-style-name="P251" svg:x1="3.501cm" svg:y1="0.157cm" svg:x2="3.751cm" svg:y2="0.157cm"><text:p/></draw:line><draw:line draw:style-name="gr3" draw:text-style-name="P251" svg:x1="3.752cm" svg:y1="0.656cm" svg:x2="3.752cm" svg:y2="0.157cm"><text:p/></draw:line><draw:line draw:style-name="gr3" draw:text-style-name="P251" svg:x1="3.752cm" svg:y1="0.651cm" svg:x2="4.502cm" svg:y2="0.651cm"><text:p/></draw:line><draw:line draw:style-name="gr3" draw:text-style-name="P251" svg:x1="4.503cm" svg:y1="0.157cm" svg:x2="4.503cm" svg:y2="0.656cm"><text:p/></draw:line><draw:line draw:style-name="gr3" draw:text-style-name="P251" svg:x1="4.503cm" svg:y1="0.157cm" svg:x2="4.753cm" svg:y2="0.157cm"><text:p/></draw:line><draw:line draw:style-name="gr3" draw:text-style-name="P251" svg:x1="4.752cm" svg:y1="0.656cm" svg:x2="4.752cm" svg:y2="0.157cm"><text:p/></draw:line><draw:line draw:style-name="gr3" draw:text-style-name="P251" svg:x1="4.752cm" svg:y1="0.651cm" svg:x2="5.502cm" svg:y2="0.651cm"><text:p/></draw:line><draw:line draw:style-name="gr3" draw:text-style-name="P251" svg:x1="5.502cm" svg:y1="0.157cm" svg:x2="5.502cm" svg:y2="0.656cm"><text:p/></draw:line><draw:line draw:style-name="gr3" draw:text-style-name="P251" svg:x1="5.502cm" svg:y1="0.157cm" svg:x2="5.752cm" svg:y2="0.157cm"><text:p/></draw:line><draw:line draw:style-name="gr3" draw:text-style-name="P251" svg:x1="5.752cm" svg:y1="0.656cm" svg:x2="5.752cm" svg:y2="0.157cm"><text:p/></draw:line><draw:line draw:style-name="gr3" draw:text-style-name="P251" svg:x1="5.752cm" svg:y1="0.651cm" svg:x2="6.502cm" svg:y2="0.651cm"><text:p/></draw:line><draw:line draw:style-name="gr3" draw:text-style-name="P251" svg:x1="6.502cm" svg:y1="0.157cm" svg:x2="6.502cm" svg:y2="0.656cm"><text:p/></draw:line><draw:line draw:style-name="gr3" draw:text-style-name="P251" svg:x1="6.502cm" svg:y1="0.157cm" svg:x2="6.752cm" svg:y2="0.157cm"><text:p/></draw:line><draw:line draw:style-name="gr3" draw:text-style-name="P251" svg:x1="6.752cm" svg:y1="0.656cm" svg:x2="6.752cm" svg:y2="0.157cm"><text:p/></draw:line><draw:line draw:style-name="gr3" draw:text-style-name="P251" svg:x1="6.752cm" svg:y1="0.651cm" svg:x2="7.502cm" svg:y2="0.651cm"><text:p/></draw:line><draw:line draw:style-name="gr3" draw:text-style-name="P251" svg:x1="2.501cm" svg:y1="0.157cm" svg:x2="2.501cm" svg:y2="0.656cm"><text:p/></draw:line><draw:line draw:style-name="gr3" draw:text-style-name="P251" svg:x1="2.002cm" svg:y1="0.656cm" svg:x2="2.501cm" svg:y2="0.656cm"><text:p/></draw:line><draw:line draw:style-name="gr3" draw:text-style-name="P251" svg:x1="2.501cm" svg:y1="0.157cm" svg:x2="2.751cm" svg:y2="0.157cm"><text:p/></draw:line><draw:line draw:style-name="gr3" draw:text-style-name="P251" svg:x1="2.752cm" svg:y1="0.656cm" svg:x2="2.752cm" svg:y2="0.157cm"><text:p/></draw:line><draw:line draw:style-name="gr3" draw:text-style-name="P251" svg:x1="2.752cm" svg:y1="0.656cm" svg:x2="3.502cm" svg:y2="0.656cm"><text:p/></draw:line><draw:line draw:style-name="gr3" draw:text-style-name="P251" svg:x1="3.501cm" svg:y1="0.157cm" svg:x2="3.501cm" svg:y2="0.656cm"><text:p/></draw:line><draw:line draw:style-name="gr3" draw:text-style-name="P251" svg:x1="3.501cm" svg:y1="0.157cm" svg:x2="3.751cm" svg:y2="0.157cm"><text:p/></draw:line><draw:line draw:style-name="gr3" draw:text-style-name="P251" svg:x1="3.752cm" svg:y1="0.656cm" svg:x2="3.752cm" svg:y2="0.157cm"><text:p/></draw:line><draw:line draw:style-name="gr3" draw:text-style-name="P251" svg:x1="3.752cm" svg:y1="0.656cm" svg:x2="4.502cm" svg:y2="0.656cm"><text:p/></draw:line><draw:line draw:style-name="gr3" draw:text-style-name="P251" svg:x1="4.503cm" svg:y1="0.157cm" svg:x2="4.503cm" svg:y2="0.656cm"><text:p/></draw:line><draw:line draw:style-name="gr3" draw:text-style-name="P251" svg:x1="4.503cm" svg:y1="0.157cm" svg:x2="4.753cm" svg:y2="0.157cm"><text:p/></draw:line><draw:line draw:style-name="gr3" draw:text-style-name="P251" svg:x1="4.752cm" svg:y1="0.656cm" svg:x2="4.752cm" svg:y2="0.157cm"><text:p/></draw:line><draw:line draw:style-name="gr3" draw:text-style-name="P251" svg:x1="4.752cm" svg:y1="0.656cm" svg:x2="5.502cm" svg:y2="0.656cm"><text:p/></draw:line><draw:line draw:style-name="gr3" draw:text-style-name="P251" svg:x1="5.502cm" svg:y1="0.157cm" svg:x2="5.502cm" svg:y2="0.656cm"><text:p/></draw:line><draw:line draw:style-name="gr3" draw:text-style-name="P251" svg:x1="5.502cm" svg:y1="0.157cm" svg:x2="5.752cm" svg:y2="0.157cm"><text:p/></draw:line><draw:line draw:style-name="gr3" draw:text-style-name="P251" svg:x1="5.752cm" svg:y1="0.656cm" svg:x2="5.752cm" svg:y2="0.157cm"><text:p/></draw:line><draw:line draw:style-name="gr3" draw:text-style-name="P251" svg:x1="5.752cm" svg:y1="0.656cm" svg:x2="6.502cm" svg:y2="0.656cm"><text:p/></draw:line><draw:line draw:style-name="gr3" draw:text-style-name="P251" svg:x1="6.502cm" svg:y1="0.157cm" svg:x2="6.502cm" svg:y2="0.656cm"><text:p/></draw:line><draw:line draw:style-name="gr3" draw:text-style-name="P251" svg:x1="6.502cm" svg:y1="0.157cm" svg:x2="6.752cm" svg:y2="0.157cm"><text:p/></draw:line><draw:line draw:style-name="gr3" draw:text-style-name="P251" svg:x1="6.752cm" svg:y1="0.656cm" svg:x2="6.752cm" svg:y2="0.157cm"><text:p/></draw:line><draw:line draw:style-name="gr3" draw:text-style-name="P251" svg:x1="6.752cm" svg:y1="0.656cm" svg:x2="7.502cm" svg:y2="0.656cm"><text:p/></draw:line><draw:line draw:style-name="gr2" draw:text-style-name="P251" svg:x1="2.002cm" svg:y1="1.404cm" svg:x2="4.002cm" svg:y2="1.404cm"><text:p/></draw:line><draw:line draw:style-name="gr2" draw:text-style-name="P251" svg:x1="4.002cm" svg:y1="0.903cm" svg:x2="4.002cm" svg:y2="1.404cm"><text:p/></draw:line><draw:line draw:style-name="gr2" draw:text-style-name="P251" svg:x1="4.002cm" svg:y1="0.903cm" svg:x2="7.502cm" svg:y2="0.903cm"><text:p/></draw:line><draw:line draw:style-name="gr4" draw:text-style-name="P251" svg:x1="2.501cm" svg:y1="2.152cm" svg:x2="2.501cm" svg:y2="1.651cm"><text:p/></draw:line><draw:line draw:style-name="gr4" draw:text-style-name="P251" svg:x1="2.751cm" svg:y1="1.651cm" svg:x2="2.501cm" svg:y2="1.651cm"><text:p/></draw:line><draw:line draw:style-name="gr4" draw:text-style-name="P251" svg:x1="2.752cm" svg:y1="1.651cm" svg:x2="2.752cm" svg:y2="2.152cm"><text:p/></draw:line><draw:line draw:style-name="gr4" draw:text-style-name="P251" svg:x1="7.502cm" svg:y1="2.152cm" svg:x2="3.752cm" svg:y2="2.152cm"><text:p/></draw:line><draw:line draw:style-name="gr4" draw:text-style-name="P251" svg:x1="2.002cm" svg:y1="2.152cm" svg:x2="2.501cm" svg:y2="2.152cm"><text:p/></draw:line><draw:frame draw:style-name="gr6" draw:text-style-name="P253" svg:width="1.251cm" svg:height="0.65cm" svg:x="1.002cm" svg:y="0.902cm"><draw:text-box><text:p text:style-name="P252"><text:span text:style-name="T50">A</text:span></text:p></draw:text-box></draw:frame><draw:frame draw:style-name="gr6" draw:text-style-name="P253" svg:width="1.251cm" svg:height="0.65cm" svg:x="1.002cm" svg:y="1.651cm"><draw:text-box><text:p text:style-name="P252"><text:span text:style-name="T50">Q0</text:span></text:p></draw:text-box></draw:frame><draw:line draw:style-name="gr5" draw:text-style-name="P251" svg:x1="2.002cm" svg:y1="2.905cm" svg:x2="4.501cm" svg:y2="2.905cm"><text:p/></draw:line><draw:line draw:style-name="gr5" draw:text-style-name="P251" svg:x1="4.503cm" svg:y1="2.404cm" svg:x2="4.503cm" svg:y2="2.903cm"><text:p/></draw:line><draw:line draw:style-name="gr5" draw:text-style-name="P251" svg:x1="4.753cm" svg:y1="2.404cm" svg:x2="4.503cm" svg:y2="2.404cm"><text:p/></draw:line><draw:frame draw:style-name="gr6" draw:text-style-name="P253" svg:width="1.251cm" svg:height="0.65cm" svg:x="1.002cm" svg:y="2.403cm"><draw:text-box><text:p text:style-name="P252"><text:span text:style-name="T50">Q1</text:span></text:p></draw:text-box></draw:frame><draw:line draw:style-name="gr4" draw:text-style-name="P251" svg:x1="3.501cm" svg:y1="2.152cm" svg:x2="3.501cm" svg:y2="1.651cm"><text:p/></draw:line><draw:line draw:style-name="gr4" draw:text-style-name="P251" svg:x1="3.751cm" svg:y1="1.651cm" svg:x2="3.501cm" svg:y2="1.651cm"><text:p/></draw:line><draw:line draw:style-name="gr4" draw:text-style-name="P251" svg:x1="3.752cm" svg:y1="1.651cm" svg:x2="3.752cm" svg:y2="2.152cm"><text:p/></draw:line><draw:line draw:style-name="gr4" draw:text-style-name="P251" svg:x1="2.752cm" svg:y1="2.152cm" svg:x2="3.502cm" svg:y2="2.152cm"><text:p/></draw:line><draw:line draw:style-name="gr5" draw:text-style-name="P251" svg:x1="4.752cm" svg:y1="2.404cm" svg:x2="4.752cm" svg:y2="2.903cm"><text:p/></draw:line><draw:line draw:style-name="gr5" draw:text-style-name="P251" svg:x1="5.502cm" svg:y1="2.404cm" svg:x2="5.502cm" svg:y2="2.903cm"><text:p/></draw:line><draw:line draw:style-name="gr5" draw:text-style-name="P251" svg:x1="5.752cm" svg:y1="2.404cm" svg:x2="5.502cm" svg:y2="2.404cm"><text:p/></draw:line><draw:line draw:style-name="gr5" draw:text-style-name="P251" svg:x1="5.752cm" svg:y1="2.404cm" svg:x2="5.752cm" svg:y2="2.903cm"><text:p/></draw:line><draw:line draw:style-name="gr5" draw:text-style-name="P251" svg:x1="6.502cm" svg:y1="2.404cm" svg:x2="6.502cm" svg:y2="2.903cm"><text:p/></draw:line><draw:line draw:style-name="gr5" draw:text-style-name="P251" svg:x1="6.752cm" svg:y1="2.404cm" svg:x2="6.502cm" svg:y2="2.404cm"><text:p/></draw:line><draw:line draw:style-name="gr5" draw:text-style-name="P251" svg:x1="6.752cm" svg:y1="2.404cm" svg:x2="6.752cm" svg:y2="2.903cm"><text:p/></draw:line><draw:line draw:style-name="gr5" draw:text-style-name="P251" svg:x1="5.502cm" svg:y1="2.905cm" svg:x2="4.752cm" svg:y2="2.905cm"><text:p/></draw:line><draw:line draw:style-name="gr5" draw:text-style-name="P251" svg:x1="6.502cm" svg:y1="2.905cm" svg:x2="5.752cm" svg:y2="2.905cm"><text:p/></draw:line><draw:line draw:style-name="gr5" draw:text-style-name="P251" svg:x1="7.502cm" svg:y1="2.905cm" svg:x2="6.752cm" svg:y2="2.905cm"><text:p/></draw:line></draw:g></text:p>
      <text:list xml:id="list33647083" text:continue-numbering="true" text:style-name="L1">
        <text:list-item>
          <text:list>
            <text:list-item>
              <text:h text:style-name="P217" text:outline-level="2"><text:alphabetical-index-mark-start text:id="IMark100843576"/>DEC_4<text:alphabetical-index-mark-end text:id="IMark100843576"/></text:h>
            </text:list-item>
          </text:list>
        </text:list-item>
      </text:list>
      <text:p text:style-name="P22">Type<text:tab/>Funktionsbaustein</text:p>
      <text:p text:style-name="P22"><text:span text:style-name="T16">Input</text:span><text:tab/>D : BOOL (Eingangs Bit)</text:p>
      <text:p text:style-name="P22"><text:tab/>A0 : BOOL (Adresse Bit0)</text:p>
      <text:p text:style-name="P22"><text:tab/>A1 : BOOL (Adresse Bit1)</text:p>
      <text:p text:style-name="P25">Output<text:tab/>Q0 : BOOL (TRUE bei A0=0 und A1=0)</text:p>
      <text:p text:style-name="P25"><text:tab/>Q1 : BOOL (<text:span text:style-name="T4">TRUE bei</text:span> A0=1 und A1=0)</text:p>
      <text:p text:style-name="P25"><text:tab/>Q2 : BOOL (<text:span text:style-name="T4">TRUE bei</text:span> A0=0 und A1=1)</text:p>
      <text:p text:style-name="P25"><draw:frame draw:style-name="fr4" draw:name="Grafik114" text:anchor-type="paragraph" svg:x="1.136cm" svg:y="0.827cm" svg:width="2.281cm" svg:height="2.649cm" draw:z-index="78"><draw:image xlink:href="Pictures/10000000000000AC000000C8400BC969.png" xlink:type="simple" xlink:show="embed" xlink:actuate="onLoad"/></draw:frame><text:tab/>Q3 : BOOL (<text:span text:style-name="T4">TRUE bei</text:span> A0=1 und A1=1)</text:p>
      <text:p text:style-name="P25"><text:line-break/>DEC_4 ist ein 4-Bit Dekodierbaustein. Ist A0=0 und A1=0 wird der Eingang D auf Ausgang Q0 geschaltet. Wenn A0=1 und A1=1 wird D auf Q3 geschaltet. Mit anderen Worten: Q0=1, wenn D=1 und A0=0 und A1=0.</text:p>
      <text:p text:style-name="P55">Logische Verknüpfung:<text:tab/><text:tab/>Q0 = D &amp; /A0 &amp; /A1</text:p>
      <text:p text:style-name="P25"><text:tab/><text:tab/><text:tab/>Q1 = D &amp; A0 &amp; /A1</text:p>
      <text:p text:style-name="P25"><text:tab/><text:tab/><text:tab/>Q2 = D &amp; /A0 &amp; A1</text:p>
      <text:p text:style-name="P25"><text:tab/><text:tab/><text:tab/>Q3 = D &amp; A0 &amp; A1</text:p>
      <text:p text:style-name="P25"><draw:g text:anchor-type="paragraph" draw:z-index="84" draw:style-name="gr1"><draw:line draw:style-name="gr3" draw:text-style-name="P251" svg:x1="2.575cm" svg:y1="0.168cm" svg:x2="2.575cm" svg:y2="0.667cm"><text:p/></draw:line><draw:line draw:style-name="gr3" draw:text-style-name="P251" svg:x1="2.076cm" svg:y1="0.667cm" svg:x2="2.575cm" svg:y2="0.667cm"><text:p/></draw:line><draw:line draw:style-name="gr3" draw:text-style-name="P251" svg:x1="2.575cm" svg:y1="0.168cm" svg:x2="2.825cm" svg:y2="0.168cm"><text:p/></draw:line><draw:line draw:style-name="gr3" draw:text-style-name="P251" svg:x1="2.826cm" svg:y1="0.667cm" svg:x2="2.826cm" svg:y2="0.168cm"><text:p/></draw:line><draw:line draw:style-name="gr3" draw:text-style-name="P251" svg:x1="2.826cm" svg:y1="0.667cm" svg:x2="3.576cm" svg:y2="0.667cm"><text:p/></draw:line><draw:frame draw:style-name="gr6" draw:text-style-name="P253" svg:width="1.251cm" svg:height="0.65cm" svg:x="1.076cm" svg:y="0.168cm"><draw:text-box><text:p text:style-name="P252"><text:span text:style-name="T50">D</text:span></text:p></draw:text-box></draw:frame><draw:line draw:style-name="gr3" draw:text-style-name="P251" svg:x1="3.575cm" svg:y1="0.168cm" svg:x2="3.575cm" svg:y2="0.667cm"><text:p/></draw:line><draw:line draw:style-name="gr3" draw:text-style-name="P251" svg:x1="3.575cm" svg:y1="0.168cm" svg:x2="3.825cm" svg:y2="0.168cm"><text:p/></draw:line><draw:line draw:style-name="gr3" draw:text-style-name="P251" svg:x1="3.826cm" svg:y1="0.667cm" svg:x2="3.826cm" svg:y2="0.168cm"><text:p/></draw:line><draw:line draw:style-name="gr3" draw:text-style-name="P251" svg:x1="3.826cm" svg:y1="0.667cm" svg:x2="4.576cm" svg:y2="0.667cm"><text:p/></draw:line><draw:line draw:style-name="gr3" draw:text-style-name="P251" svg:x1="4.576cm" svg:y1="0.168cm" svg:x2="4.576cm" svg:y2="0.667cm"><text:p/></draw:line><draw:line draw:style-name="gr3" draw:text-style-name="P251" svg:x1="4.576cm" svg:y1="0.168cm" svg:x2="4.826cm" svg:y2="0.168cm"><text:p/></draw:line><draw:line draw:style-name="gr3" draw:text-style-name="P251" svg:x1="4.826cm" svg:y1="0.667cm" svg:x2="4.826cm" svg:y2="0.168cm"><text:p/></draw:line><draw:line draw:style-name="gr3" draw:text-style-name="P251" svg:x1="4.826cm" svg:y1="0.667cm" svg:x2="5.576cm" svg:y2="0.667cm"><text:p/></draw:line><draw:line draw:style-name="gr3" draw:text-style-name="P251" svg:x1="5.576cm" svg:y1="0.168cm" svg:x2="5.576cm" svg:y2="0.667cm"><text:p/></draw:line><draw:line draw:style-name="gr3" draw:text-style-name="P251" svg:x1="5.576cm" svg:y1="0.168cm" svg:x2="5.826cm" svg:y2="0.168cm"><text:p/></draw:line><draw:line draw:style-name="gr3" draw:text-style-name="P251" svg:x1="5.826cm" svg:y1="0.667cm" svg:x2="5.826cm" svg:y2="0.168cm"><text:p/></draw:line><draw:line draw:style-name="gr3" draw:text-style-name="P251" svg:x1="5.826cm" svg:y1="0.667cm" svg:x2="6.576cm" svg:y2="0.667cm"><text:p/></draw:line><draw:line draw:style-name="gr3" draw:text-style-name="P251" svg:x1="6.826cm" svg:y1="0.667cm" svg:x2="7.576cm" svg:y2="0.667cm"><text:p/></draw:line><draw:line draw:style-name="gr3" draw:text-style-name="P251" svg:x1="2.575cm" svg:y1="0.173cm" svg:x2="2.575cm" svg:y2="0.672cm"><text:p/></draw:line><draw:line draw:style-name="gr3" draw:text-style-name="P251" svg:x1="2.076cm" svg:y1="0.669cm" svg:x2="2.575cm" svg:y2="0.669cm"><text:p/></draw:line><draw:line draw:style-name="gr3" draw:text-style-name="P251" svg:x1="2.575cm" svg:y1="0.173cm" svg:x2="2.825cm" svg:y2="0.173cm"><text:p/></draw:line><draw:line draw:style-name="gr3" draw:text-style-name="P251" svg:x1="2.826cm" svg:y1="0.672cm" svg:x2="2.826cm" svg:y2="0.173cm"><text:p/></draw:line><draw:line draw:style-name="gr3" draw:text-style-name="P251" svg:x1="2.826cm" svg:y1="0.669cm" svg:x2="3.576cm" svg:y2="0.669cm"><text:p/></draw:line><draw:line draw:style-name="gr3" draw:text-style-name="P251" svg:x1="3.575cm" svg:y1="0.173cm" svg:x2="3.575cm" svg:y2="0.672cm"><text:p/></draw:line><draw:line draw:style-name="gr3" draw:text-style-name="P251" svg:x1="3.575cm" svg:y1="0.173cm" svg:x2="3.825cm" svg:y2="0.173cm"><text:p/></draw:line><draw:line draw:style-name="gr3" draw:text-style-name="P251" svg:x1="3.826cm" svg:y1="0.672cm" svg:x2="3.826cm" svg:y2="0.173cm"><text:p/></draw:line><draw:line draw:style-name="gr3" draw:text-style-name="P251" svg:x1="3.826cm" svg:y1="0.669cm" svg:x2="4.576cm" svg:y2="0.669cm"><text:p/></draw:line><draw:line draw:style-name="gr3" draw:text-style-name="P251" svg:x1="4.576cm" svg:y1="0.173cm" svg:x2="4.576cm" svg:y2="0.672cm"><text:p/></draw:line><draw:line draw:style-name="gr3" draw:text-style-name="P251" svg:x1="4.576cm" svg:y1="0.173cm" svg:x2="4.826cm" svg:y2="0.173cm"><text:p/></draw:line><draw:line draw:style-name="gr3" draw:text-style-name="P251" svg:x1="4.826cm" svg:y1="0.672cm" svg:x2="4.826cm" svg:y2="0.173cm"><text:p/></draw:line><draw:line draw:style-name="gr3" draw:text-style-name="P251" svg:x1="4.826cm" svg:y1="0.669cm" svg:x2="5.576cm" svg:y2="0.669cm"><text:p/></draw:line><draw:line draw:style-name="gr3" draw:text-style-name="P251" svg:x1="5.576cm" svg:y1="0.173cm" svg:x2="5.576cm" svg:y2="0.672cm"><text:p/></draw:line><draw:line draw:style-name="gr3" draw:text-style-name="P251" svg:x1="5.576cm" svg:y1="0.173cm" svg:x2="5.826cm" svg:y2="0.173cm"><text:p/></draw:line><draw:line draw:style-name="gr3" draw:text-style-name="P251" svg:x1="5.826cm" svg:y1="0.672cm" svg:x2="5.826cm" svg:y2="0.173cm"><text:p/></draw:line><draw:line draw:style-name="gr3" draw:text-style-name="P251" svg:x1="5.826cm" svg:y1="0.669cm" svg:x2="7.576cm" svg:y2="0.667cm"><text:p/></draw:line><draw:line draw:style-name="gr2" draw:text-style-name="P251" svg:x1="2.076cm" svg:y1="1.42cm" svg:x2="3.076cm" svg:y2="1.42cm"><text:p/></draw:line><draw:line draw:style-name="gr2" draw:text-style-name="P251" svg:x1="3.076cm" svg:y1="0.919cm" svg:x2="3.076cm" svg:y2="1.42cm"><text:p/></draw:line><draw:line draw:style-name="gr2" draw:text-style-name="P251" svg:x1="3.076cm" svg:y1="0.919cm" svg:x2="4.076cm" svg:y2="0.919cm"><text:p/></draw:line><draw:line draw:style-name="gr4" draw:text-style-name="P251" svg:x1="2.575cm" svg:y1="2.919cm" svg:x2="2.575cm" svg:y2="2.42cm"><text:p/></draw:line><draw:line draw:style-name="gr4" draw:text-style-name="P251" svg:x1="2.825cm" svg:y1="2.42cm" svg:x2="2.575cm" svg:y2="2.42cm"><text:p/></draw:line><draw:line draw:style-name="gr4" draw:text-style-name="P251" svg:x1="2.826cm" svg:y1="2.42cm" svg:x2="2.826cm" svg:y2="2.919cm"><text:p/></draw:line><draw:line draw:style-name="gr4" draw:text-style-name="P251" svg:x1="7.576cm" svg:y1="2.921cm" svg:x2="2.826cm" svg:y2="2.921cm"><text:p/></draw:line><draw:line draw:style-name="gr4" draw:text-style-name="P251" svg:x1="2.076cm" svg:y1="2.921cm" svg:x2="2.575cm" svg:y2="2.921cm"><text:p/></draw:line><draw:frame draw:style-name="gr6" draw:text-style-name="P253" svg:width="1.251cm" svg:height="0.65cm" svg:x="1.076cm" svg:y="0.918cm"><draw:text-box><text:p text:style-name="P252"><text:span text:style-name="T50">A0</text:span></text:p></draw:text-box></draw:frame><draw:frame draw:style-name="gr6" draw:text-style-name="P253" svg:width="1.251cm" svg:height="0.65cm" svg:x="1.076cm" svg:y="2.419cm"><draw:text-box><text:p text:style-name="P252"><text:span text:style-name="T50">Q0</text:span></text:p></draw:text-box></draw:frame><draw:line draw:style-name="gr5" draw:text-style-name="P251" svg:x1="2.076cm" svg:y1="3.669cm" svg:x2="3.575cm" svg:y2="3.669cm"><text:p/></draw:line><draw:line draw:style-name="gr5" draw:text-style-name="P251" svg:x1="3.575cm" svg:y1="3.168cm" svg:x2="3.575cm" svg:y2="3.667cm"><text:p/></draw:line><draw:line draw:style-name="gr5" draw:text-style-name="P251" svg:x1="3.825cm" svg:y1="3.168cm" svg:x2="3.575cm" svg:y2="3.168cm"><text:p/></draw:line><draw:frame draw:style-name="gr6" draw:text-style-name="P253" svg:width="1.251cm" svg:height="0.65cm" svg:x="1.076cm" svg:y="3.168cm"><draw:text-box><text:p text:style-name="P252"><text:span text:style-name="T50">Q1</text:span></text:p></draw:text-box></draw:frame><draw:line draw:style-name="gr5" draw:text-style-name="P251" svg:x1="3.826cm" svg:y1="3.168cm" svg:x2="3.826cm" svg:y2="3.667cm"><text:p/></draw:line><draw:line draw:style-name="gr5" draw:text-style-name="P251" svg:x1="7.576cm" svg:y1="3.669cm" svg:x2="3.826cm" svg:y2="3.669cm"><text:p/></draw:line><draw:frame draw:style-name="gr6" draw:text-style-name="P253" svg:width="1.251cm" svg:height="0.65cm" svg:x="1.076cm" svg:y="1.667cm"><draw:text-box><text:p text:style-name="P252"><text:span text:style-name="T50">A1</text:span></text:p></draw:text-box></draw:frame><draw:line draw:style-name="gr2" draw:text-style-name="P251" svg:x1="4.076cm" svg:y1="0.919cm" svg:x2="4.076cm" svg:y2="1.42cm"><text:p/></draw:line><draw:line draw:style-name="gr2" draw:text-style-name="P251" svg:x1="4.076cm" svg:y1="1.42cm" svg:x2="5.076cm" svg:y2="1.42cm"><text:p/></draw:line><draw:line draw:style-name="gr2" draw:text-style-name="P251" svg:x1="5.078cm" svg:y1="0.919cm" svg:x2="5.078cm" svg:y2="1.42cm"><text:p/></draw:line><draw:line draw:style-name="gr2" draw:text-style-name="P251" svg:x1="5.078cm" svg:y1="0.919cm" svg:x2="6.078cm" svg:y2="0.919cm"><text:p/></draw:line><draw:line draw:style-name="gr2" draw:text-style-name="P251" svg:x1="6.077cm" svg:y1="0.919cm" svg:x2="6.077cm" svg:y2="1.42cm"><text:p/></draw:line><draw:line draw:style-name="gr2" draw:text-style-name="P251" svg:x1="6.077cm" svg:y1="1.42cm" svg:x2="7.576cm" svg:y2="1.42cm"><text:p/></draw:line><draw:line draw:style-name="gr10" draw:text-style-name="P251" svg:x1="2.076cm" svg:y1="2.168cm" svg:x2="4.076cm" svg:y2="2.168cm"><text:p/></draw:line><draw:line draw:style-name="gr10" draw:text-style-name="P251" svg:x1="4.076cm" svg:y1="2.168cm" svg:x2="4.076cm" svg:y2="1.667cm"><text:p/></draw:line><draw:line draw:style-name="gr10" draw:text-style-name="P251" svg:x1="7.576cm" svg:y1="1.667cm" svg:x2="4.076cm" svg:y2="1.667cm"><text:p/></draw:line><draw:line draw:style-name="gr11" draw:text-style-name="P251" svg:x1="4.576cm" svg:y1="4.417cm" svg:x2="4.576cm" svg:y2="3.918cm"><text:p/></draw:line><draw:line draw:style-name="gr11" draw:text-style-name="P251" svg:x1="4.826cm" svg:y1="3.918cm" svg:x2="4.576cm" svg:y2="3.918cm"><text:p/></draw:line><draw:line draw:style-name="gr11" draw:text-style-name="P251" svg:x1="4.826cm" svg:y1="3.918cm" svg:x2="4.826cm" svg:y2="4.417cm"><text:p/></draw:line><draw:line draw:style-name="gr11" draw:text-style-name="P251" svg:x1="7.576cm" svg:y1="4.417cm" svg:x2="4.826cm" svg:y2="4.417cm"><text:p/></draw:line><draw:line draw:style-name="gr11" draw:text-style-name="P251" svg:x1="2.076cm" svg:y1="4.417cm" svg:x2="4.575cm" svg:y2="4.417cm"><text:p/></draw:line><draw:frame draw:style-name="gr6" draw:text-style-name="P253" svg:width="1.251cm" svg:height="0.65cm" svg:x="1.076cm" svg:y="3.918cm"><draw:text-box><text:p text:style-name="P252"><text:span text:style-name="T50">Q2</text:span></text:p></draw:text-box></draw:frame><draw:line draw:style-name="gr12" draw:text-style-name="P251" svg:x1="2.076cm" svg:y1="5.17cm" svg:x2="5.576cm" svg:y2="5.17cm"><text:p/></draw:line><draw:line draw:style-name="gr12" draw:text-style-name="P251" svg:x1="5.576cm" svg:y1="4.669cm" svg:x2="5.576cm" svg:y2="5.17cm"><text:p/></draw:line><draw:line draw:style-name="gr12" draw:text-style-name="P251" svg:x1="5.826cm" svg:y1="4.669cm" svg:x2="5.576cm" svg:y2="4.669cm"><text:p/></draw:line><draw:frame draw:style-name="gr6" draw:text-style-name="P253" svg:width="1.251cm" svg:height="0.65cm" svg:x="1.076cm" svg:y="4.668cm"><draw:text-box><text:p text:style-name="P252"><text:span text:style-name="T50">Q3</text:span></text:p></draw:text-box></draw:frame><draw:line draw:style-name="gr12" draw:text-style-name="P251" svg:x1="5.826cm" svg:y1="4.669cm" svg:x2="5.826cm" svg:y2="5.17cm"><text:p/></draw:line><draw:line draw:style-name="gr12" draw:text-style-name="P251" svg:x1="7.576cm" svg:y1="5.17cm" svg:x2="5.826cm" svg:y2="5.17cm"><text:p/></draw:line></draw:g><text:soft-page-break/></text:p>
      <text:list xml:id="list33649617" text:continue-numbering="true" text:style-name="L1">
        <text:list-item>
          <text:list>
            <text:list-item>
              <text:h text:style-name="P217" text:outline-level="2"><text:alphabetical-index-mark-start text:id="IMark100843576"/>DEC_8<text:alphabetical-index-mark-end text:id="IMark100843576"/></text:h>
            </text:list-item>
          </text:list>
        </text:list-item>
      </text:list>
      <text:p text:style-name="P22">Type<text:tab/>Funktionsbaustein</text:p>
      <text:p text:style-name="P22"><text:span text:style-name="T16">Input</text:span><text:tab/>D : BOOL (Eingangs Bit)</text:p>
      <text:p text:style-name="P22"><text:tab/>A0 : BOOL (Adresse Bit0)</text:p>
      <text:p text:style-name="P22"><text:tab/>A1 : BOOL (Adresse Bit1)</text:p>
      <text:p text:style-name="P22"><text:tab/>A2 : BOOL (Adresse Bit2)</text:p>
      <text:p text:style-name="P25">Output<text:tab/>Q0 : BOOL (<text:span text:style-name="T4">TRUE bei </text:span>A0=0 und A1=0 und A2=0)</text:p>
      <text:p text:style-name="P25"><text:tab/>Q1 : BOOL (<text:span text:style-name="T4">TRUE bei </text:span>A0=1 und A1=0 und A2=0)</text:p>
      <text:p text:style-name="P25"><text:tab/>Q2 : BOOL (<text:span text:style-name="T4">TRUE bei </text:span>A0=0 und A1=1 und A2=0)</text:p>
      <text:p text:style-name="P25"><text:tab/>Q3 : BOOL (<text:span text:style-name="T4">TRUE bei </text:span>A0=1 und A1=1 und A2=0)</text:p>
      <text:p text:style-name="P25"><text:tab/>Q4 : BOOL (<text:span text:style-name="T4">TRUE bei </text:span>A0=0 und A1=0 und A2=1)</text:p>
      <text:p text:style-name="P25"><text:tab/>Q5 : BOOL (<text:span text:style-name="T4">TRUE bei </text:span>A0=1 und A1=0 und A2=1)</text:p>
      <text:p text:style-name="P25"><text:tab/>Q6 : BOOL (<text:span text:style-name="T4">TRUE bei </text:span>A0=0 und A1=1 und A2=1)</text:p>
      <text:p text:style-name="P25"><draw:frame draw:style-name="fr4" draw:name="Grafik115" text:anchor-type="paragraph" svg:x="1.055cm" svg:y="0.69cm" svg:width="2.281cm" svg:height="4.44cm" draw:z-index="79"><draw:image xlink:href="Pictures/10000000000000AC000001501AC14DDF.png" xlink:type="simple" xlink:show="embed" xlink:actuate="onLoad"/></draw:frame><text:tab/>Q7 : BOOL (<text:span text:style-name="T4">TRUE bei </text:span>A0=1 und A1=1 und A2=1)</text:p>
      <text:p text:style-name="P25"><text:soft-page-break/><text:line-break/>DEC_8 ist ein 8-Bit Dekodierbaustein. Ist A0=0 und A1=0 und A2=0 wird der Eingang D auf Ausgang Q0 geschaltet, wenn A0=1 und A1=1 und A2=1 wird D auf Q3 geschaltet. Mit anderen Worten: Q0=1 wenn D=1 und A0=0 und A1=0 und A2=0.</text:p>
      <text:p text:style-name="P55"><draw:frame draw:style-name="fr1" draw:name="Rahmen1" text:anchor-type="char" svg:x="1.109cm" svg:y="0.642cm" svg:width="9.555cm" draw:z-index="415"><draw:text-box fo:min-height="6.158cm"><text:p text:style-name="Caption"><draw:frame draw:style-name="fr2" draw:name="Rahmen2" text:anchor-type="paragraph" svg:x="2.424cm" svg:y="0.575cm" svg:width="9.555cm" draw:z-index="416"><draw:text-box fo:min-height="6.158cm"><text:p text:style-name="Drawing"><draw:g text:anchor-type="paragraph" draw:z-index="417" draw:style-name="gr64"><draw:line draw:style-name="gr3" draw:text-style-name="P251" svg:x1="1.524cm" svg:y1="0.101cm" svg:x2="1.524cm" svg:y2="0.351cm"><text:p/></draw:line><draw:line draw:style-name="gr3" draw:text-style-name="P251" svg:x1="1.025cm" svg:y1="0.353cm" svg:x2="1.524cm" svg:y2="0.353cm"><text:p/></draw:line><draw:line draw:style-name="gr3" draw:text-style-name="P251" svg:x1="1.778cm" svg:y1="0.353cm" svg:x2="2.528cm" svg:y2="0.353cm"><text:p/></draw:line><draw:frame draw:style-name="gr35" draw:text-style-name="P254" svg:width="1.251cm" svg:height="0.622cm" svg:x="0.025cm" svg:y="0cm"><draw:text-box><text:p text:style-name="P252"><text:span text:style-name="T51">D</text:span></text:p></draw:text-box></draw:frame><draw:line draw:style-name="gr3" draw:text-style-name="P251" svg:x1="2.775cm" svg:y1="0.351cm" svg:x2="2.775cm" svg:y2="0.101cm"><text:p/></draw:line><draw:line draw:style-name="gr3" draw:text-style-name="P251" svg:x1="2.775cm" svg:y1="0.353cm" svg:x2="3.525cm" svg:y2="0.353cm"><text:p/></draw:line><draw:line draw:style-name="gr3" draw:text-style-name="P251" svg:x1="3.775cm" svg:y1="0.351cm" svg:x2="3.775cm" svg:y2="0.101cm"><text:p/></draw:line><draw:line draw:style-name="gr3" draw:text-style-name="P251" svg:x1="3.775cm" svg:y1="0.353cm" svg:x2="4.525cm" svg:y2="0.353cm"><text:p/></draw:line><draw:line draw:style-name="gr3" draw:text-style-name="P251" svg:x1="4.775cm" svg:y1="0.351cm" svg:x2="4.775cm" svg:y2="0.101cm"><text:p/></draw:line><draw:line draw:style-name="gr3" draw:text-style-name="P251" svg:x1="4.775cm" svg:y1="0.353cm" svg:x2="5.525cm" svg:y2="0.353cm"><text:p/></draw:line><draw:line draw:style-name="gr3" draw:text-style-name="P251" svg:x1="1.025cm" svg:y1="0.355cm" svg:x2="1.524cm" svg:y2="0.355cm"><text:p/></draw:line><draw:line draw:style-name="gr3" draw:text-style-name="P251" svg:x1="1.524cm" svg:y1="0.101cm" svg:x2="1.774cm" svg:y2="0.101cm"><text:p/></draw:line><draw:line draw:style-name="gr3" draw:text-style-name="P251" svg:x1="1.778cm" svg:y1="0.353cm" svg:x2="1.778cm" svg:y2="0.101cm"><text:p/></draw:line><draw:line draw:style-name="gr3" draw:text-style-name="P251" svg:x1="1.778cm" svg:y1="0.355cm" svg:x2="2.528cm" svg:y2="0.355cm"><text:p/></draw:line><draw:line draw:style-name="gr3" draw:text-style-name="P251" svg:x1="2.524cm" svg:y1="0.101cm" svg:x2="2.524cm" svg:y2="0.353cm"><text:p/></draw:line><draw:line draw:style-name="gr3" draw:text-style-name="P251" svg:x1="2.524cm" svg:y1="0.101cm" svg:x2="2.774cm" svg:y2="0.101cm"><text:p/></draw:line><draw:line draw:style-name="gr3" draw:text-style-name="P251" svg:x1="2.775cm" svg:y1="0.355cm" svg:x2="3.525cm" svg:y2="0.355cm"><text:p/></draw:line><draw:line draw:style-name="gr3" draw:text-style-name="P251" svg:x1="3.526cm" svg:y1="0.101cm" svg:x2="3.526cm" svg:y2="0.351cm"><text:p/></draw:line><draw:line draw:style-name="gr3" draw:text-style-name="P251" svg:x1="3.526cm" svg:y1="0.101cm" svg:x2="3.776cm" svg:y2="0.101cm"><text:p/></draw:line><draw:line draw:style-name="gr3" draw:text-style-name="P251" svg:x1="3.775cm" svg:y1="0.355cm" svg:x2="4.525cm" svg:y2="0.355cm"><text:p/></draw:line><draw:line draw:style-name="gr3" draw:text-style-name="P251" svg:x1="4.526cm" svg:y1="0.101cm" svg:x2="4.526cm" svg:y2="0.353cm"><text:p/></draw:line><draw:line draw:style-name="gr3" draw:text-style-name="P251" svg:x1="4.775cm" svg:y1="0.355cm" svg:x2="5.525cm" svg:y2="0.353cm"><text:p/></draw:line><draw:line draw:style-name="gr2" draw:text-style-name="P251" svg:x1="1.025cm" svg:y1="0.854cm" svg:x2="2.025cm" svg:y2="0.854cm"><text:p/></draw:line><draw:line draw:style-name="gr2" draw:text-style-name="P251" svg:x1="2.025cm" svg:y1="0.6cm" svg:x2="2.025cm" svg:y2="0.85cm"><text:p/></draw:line><draw:line draw:style-name="gr2" draw:text-style-name="P251" svg:x1="2.025cm" svg:y1="0.6cm" svg:x2="3.025cm" svg:y2="0.6cm"><text:p/></draw:line><draw:line draw:style-name="gr4" draw:text-style-name="P251" svg:x1="1.524cm" svg:y1="2.353cm" svg:x2="1.524cm" svg:y2="2.103cm"><text:p/></draw:line><draw:line draw:style-name="gr4" draw:text-style-name="P251" svg:x1="1.774cm" svg:y1="2.103cm" svg:x2="1.524cm" svg:y2="2.103cm"><text:p/></draw:line><draw:line draw:style-name="gr4" draw:text-style-name="P251" svg:x1="1.778cm" svg:y1="2.103cm" svg:x2="1.778cm" svg:y2="2.353cm"><text:p/></draw:line><draw:line draw:style-name="gr4" draw:text-style-name="P251" svg:x1="9.529cm" svg:y1="2.353cm" svg:x2="1.778cm" svg:y2="2.353cm"><text:p/></draw:line><draw:line draw:style-name="gr4" draw:text-style-name="P251" svg:x1="1.025cm" svg:y1="2.353cm" svg:x2="1.524cm" svg:y2="2.353cm"><text:p/></draw:line><draw:frame draw:style-name="gr35" draw:text-style-name="P254" svg:width="1.251cm" svg:height="0.622cm" svg:x="0.025cm" svg:y="0.534cm"><draw:text-box><text:p text:style-name="P252"><text:span text:style-name="T51">A0</text:span></text:p></draw:text-box></draw:frame><draw:frame draw:style-name="gr35" draw:text-style-name="P254" svg:width="1.251cm" svg:height="0.622cm" svg:x="0.025cm" svg:y="2.034cm"><draw:text-box><text:p text:style-name="P252"><text:span text:style-name="T51">Q0</text:span></text:p></draw:text-box></draw:frame><draw:line draw:style-name="gr5" draw:text-style-name="P251" svg:x1="1.025cm" svg:y1="2.849cm" svg:x2="2.524cm" svg:y2="2.849cm"><text:p/></draw:line><draw:line draw:style-name="gr5" draw:text-style-name="P251" svg:x1="2.524cm" svg:y1="2.604cm" svg:x2="2.524cm" svg:y2="2.853cm"><text:p/></draw:line><draw:line draw:style-name="gr5" draw:text-style-name="P251" svg:x1="2.774cm" svg:y1="2.604cm" svg:x2="2.524cm" svg:y2="2.604cm"><text:p/></draw:line><draw:frame draw:style-name="gr35" draw:text-style-name="P254" svg:width="1.251cm" svg:height="0.622cm" svg:x="0.025cm" svg:y="2.535cm"><draw:text-box><text:p text:style-name="P252"><text:span text:style-name="T51">Q1</text:span></text:p></draw:text-box></draw:frame><draw:line draw:style-name="gr5" draw:text-style-name="P251" svg:x1="2.775cm" svg:y1="2.604cm" svg:x2="2.775cm" svg:y2="2.853cm"><text:p/></draw:line><draw:line draw:style-name="gr5" draw:text-style-name="P251" svg:x1="9.525cm" svg:y1="2.849cm" svg:x2="2.775cm" svg:y2="2.849cm"><text:p/></draw:line><draw:frame draw:style-name="gr35" draw:text-style-name="P254" svg:width="1.251cm" svg:height="0.622cm" svg:x="0.025cm" svg:y="1.034cm"><draw:text-box><text:p text:style-name="P252"><text:span text:style-name="T51">A1</text:span></text:p></draw:text-box></draw:frame><draw:line draw:style-name="gr2" draw:text-style-name="P251" svg:x1="3.025cm" svg:y1="0.6cm" svg:x2="3.025cm" svg:y2="0.85cm"><text:p/></draw:line><draw:line draw:style-name="gr2" draw:text-style-name="P251" svg:x1="3.025cm" svg:y1="0.854cm" svg:x2="4.025cm" svg:y2="0.854cm"><text:p/></draw:line><draw:line draw:style-name="gr2" draw:text-style-name="P251" svg:x1="4.027cm" svg:y1="0.6cm" svg:x2="4.027cm" svg:y2="0.85cm"><text:p/></draw:line><draw:line draw:style-name="gr2" draw:text-style-name="P251" svg:x1="4.027cm" svg:y1="0.6cm" svg:x2="5.027cm" svg:y2="0.6cm"><text:p/></draw:line><draw:line draw:style-name="gr2" draw:text-style-name="P251" svg:x1="5.027cm" svg:y1="0.6cm" svg:x2="5.027cm" svg:y2="0.85cm"><text:p/></draw:line><draw:line draw:style-name="gr2" draw:text-style-name="P251" svg:x1="9.024cm" svg:y1="0.854cm" svg:x2="9.525cm" svg:y2="0.854cm"><text:p/></draw:line><draw:line draw:style-name="gr10" draw:text-style-name="P251" svg:x1="1.025cm" svg:y1="1.353cm" svg:x2="3.025cm" svg:y2="1.353cm"><text:p/></draw:line><draw:line draw:style-name="gr10" draw:text-style-name="P251" svg:x1="3.025cm" svg:y1="1.351cm" svg:x2="3.025cm" svg:y2="1.101cm"><text:p/></draw:line><draw:line draw:style-name="gr10" draw:text-style-name="P251" svg:x1="5.025cm" svg:y1="1.101cm" svg:x2="3.025cm" svg:y2="1.101cm"><text:p/></draw:line><draw:line draw:style-name="gr11" draw:text-style-name="P251" svg:x1="3.526cm" svg:y1="3.353cm" svg:x2="3.526cm" svg:y2="3.103cm"><text:p/></draw:line><draw:line draw:style-name="gr11" draw:text-style-name="P251" svg:x1="3.776cm" svg:y1="3.103cm" svg:x2="3.526cm" svg:y2="3.103cm"><text:p/></draw:line><draw:line draw:style-name="gr11" draw:text-style-name="P251" svg:x1="3.775cm" svg:y1="3.103cm" svg:x2="3.775cm" svg:y2="3.353cm"><text:p/></draw:line><draw:line draw:style-name="gr11" draw:text-style-name="P251" svg:x1="9.525cm" svg:y1="3.35cm" svg:x2="3.775cm" svg:y2="3.35cm"><text:p/></draw:line><draw:line draw:style-name="gr11" draw:text-style-name="P251" svg:x1="1.025cm" svg:y1="3.35cm" svg:x2="3.524cm" svg:y2="3.35cm"><text:p/></draw:line><draw:frame draw:style-name="gr35" draw:text-style-name="P254" svg:width="1.251cm" svg:height="0.622cm" svg:x="0.025cm" svg:y="3.034cm"><draw:text-box><text:p text:style-name="P252"><text:span text:style-name="T51">Q2</text:span></text:p></draw:text-box></draw:frame><draw:line draw:style-name="gr12" draw:text-style-name="P251" svg:x1="1.025cm" svg:y1="3.851cm" svg:x2="4.525cm" svg:y2="3.851cm"><text:p/></draw:line><draw:line draw:style-name="gr12" draw:text-style-name="P251" svg:x1="4.526cm" svg:y1="3.604cm" svg:x2="4.526cm" svg:y2="3.853cm"><text:p/></draw:line><draw:line draw:style-name="gr12" draw:text-style-name="P251" svg:x1="4.776cm" svg:y1="3.604cm" svg:x2="4.526cm" svg:y2="3.604cm"><text:p/></draw:line><draw:frame draw:style-name="gr35" draw:text-style-name="P254" svg:width="1.251cm" svg:height="0.622cm" svg:x="0.025cm" svg:y="3.535cm"><draw:text-box><text:p text:style-name="P252"><text:span text:style-name="T51">Q3</text:span></text:p></draw:text-box></draw:frame><draw:line draw:style-name="gr12" draw:text-style-name="P251" svg:x1="4.775cm" svg:y1="3.604cm" svg:x2="4.775cm" svg:y2="3.853cm"><text:p/></draw:line><draw:line draw:style-name="gr12" draw:text-style-name="P251" svg:x1="9.525cm" svg:y1="3.851cm" svg:x2="4.775cm" svg:y2="3.851cm"><text:p/></draw:line><draw:line draw:style-name="gr3" draw:text-style-name="P251" svg:x1="4.526cm" svg:y1="0.101cm" svg:x2="4.776cm" svg:y2="0.101cm"><text:p/></draw:line><draw:line draw:style-name="gr3" draw:text-style-name="P251" svg:x1="5.528cm" svg:y1="0.101cm" svg:x2="5.528cm" svg:y2="0.351cm"><text:p/></draw:line><draw:line draw:style-name="gr3" draw:text-style-name="P251" svg:x1="5.775cm" svg:y1="0.353cm" svg:x2="6.525cm" svg:y2="0.353cm"><text:p/></draw:line><draw:line draw:style-name="gr3" draw:text-style-name="P251" svg:x1="6.775cm" svg:y1="0.351cm" svg:x2="6.775cm" svg:y2="0.101cm"><text:p/></draw:line><draw:line draw:style-name="gr3" draw:text-style-name="P251" svg:x1="6.775cm" svg:y1="0.353cm" svg:x2="7.525cm" svg:y2="0.353cm"><text:p/></draw:line><draw:line draw:style-name="gr3" draw:text-style-name="P251" svg:x1="7.777cm" svg:y1="0.351cm" svg:x2="7.777cm" svg:y2="0.101cm"><text:p/></draw:line><draw:line draw:style-name="gr3" draw:text-style-name="P251" svg:x1="7.777cm" svg:y1="0.353cm" svg:x2="8.527cm" svg:y2="0.353cm"><text:p/></draw:line><draw:line draw:style-name="gr3" draw:text-style-name="P251" svg:x1="8.777cm" svg:y1="0.351cm" svg:x2="8.777cm" svg:y2="0.101cm"><text:p/></draw:line><draw:line draw:style-name="gr3" draw:text-style-name="P251" svg:x1="8.777cm" svg:y1="0.353cm" svg:x2="9.527cm" svg:y2="0.353cm"><text:p/></draw:line><draw:line draw:style-name="gr3" draw:text-style-name="P251" svg:x1="5.528cm" svg:y1="0.101cm" svg:x2="5.778cm" svg:y2="0.101cm"><text:p/></draw:line><draw:line draw:style-name="gr3" draw:text-style-name="P251" svg:x1="5.775cm" svg:y1="0.353cm" svg:x2="5.775cm" svg:y2="0.101cm"><text:p/></draw:line><draw:line draw:style-name="gr3" draw:text-style-name="P251" svg:x1="5.775cm" svg:y1="0.355cm" svg:x2="6.525cm" svg:y2="0.355cm"><text:p/></draw:line><draw:line draw:style-name="gr3" draw:text-style-name="P251" svg:x1="6.525cm" svg:y1="0.101cm" svg:x2="6.525cm" svg:y2="0.353cm"><text:p/></draw:line><draw:line draw:style-name="gr3" draw:text-style-name="P251" svg:x1="6.525cm" svg:y1="0.101cm" svg:x2="6.775cm" svg:y2="0.101cm"><text:p/></draw:line><draw:line draw:style-name="gr3" draw:text-style-name="P251" svg:x1="6.775cm" svg:y1="0.355cm" svg:x2="7.525cm" svg:y2="0.355cm"><text:p/></draw:line><draw:line draw:style-name="gr3" draw:text-style-name="P251" svg:x1="7.525cm" svg:y1="0.101cm" svg:x2="7.525cm" svg:y2="0.351cm"><text:p/></draw:line><draw:line draw:style-name="gr3" draw:text-style-name="P251" svg:x1="7.525cm" svg:y1="0.101cm" svg:x2="7.775cm" svg:y2="0.101cm"><text:p/></draw:line><draw:line draw:style-name="gr3" draw:text-style-name="P251" svg:x1="7.777cm" svg:y1="0.355cm" svg:x2="8.527cm" svg:y2="0.355cm"><text:p/></draw:line><draw:line draw:style-name="gr3" draw:text-style-name="P251" svg:x1="8.525cm" svg:y1="0.101cm" svg:x2="8.525cm" svg:y2="0.353cm"><text:p/></draw:line><draw:line draw:style-name="gr3" draw:text-style-name="P251" svg:x1="8.777cm" svg:y1="0.355cm" svg:x2="9.527cm" svg:y2="0.353cm"><text:p/></draw:line><draw:line draw:style-name="gr3" draw:text-style-name="P251" svg:x1="8.525cm" svg:y1="0.101cm" svg:x2="8.775cm" svg:y2="0.101cm"><text:p/></draw:line><draw:line draw:style-name="gr2" draw:text-style-name="P251" svg:x1="5.027cm" svg:y1="0.854cm" svg:x2="6.027cm" svg:y2="0.854cm"><text:p/></draw:line><draw:line draw:style-name="gr2" draw:text-style-name="P251" svg:x1="6.029cm" svg:y1="0.6cm" svg:x2="6.029cm" svg:y2="0.85cm"><text:p/></draw:line><draw:line draw:style-name="gr2" draw:text-style-name="P251" svg:x1="6.029cm" svg:y1="0.6cm" svg:x2="7.029cm" svg:y2="0.6cm"><text:p/></draw:line><draw:line draw:style-name="gr2" draw:text-style-name="P251" svg:x1="7.026cm" svg:y1="0.6cm" svg:x2="7.026cm" svg:y2="0.85cm"><text:p/></draw:line><draw:line draw:style-name="gr2" draw:text-style-name="P251" svg:x1="7.026cm" svg:y1="0.854cm" svg:x2="8.024cm" svg:y2="0.854cm"><text:p/></draw:line><draw:line draw:style-name="gr2" draw:text-style-name="P251" svg:x1="8.024cm" svg:y1="0.6cm" svg:x2="8.024cm" svg:y2="0.85cm"><text:p/></draw:line><draw:line draw:style-name="gr2" draw:text-style-name="P251" svg:x1="8.024cm" svg:y1="0.6cm" svg:x2="9.024cm" svg:y2="0.6cm"><text:p/></draw:line><draw:line draw:style-name="gr2" draw:text-style-name="P251" svg:x1="9.024cm" svg:y1="0.6cm" svg:x2="9.024cm" svg:y2="0.85cm"><text:p/></draw:line><draw:line draw:style-name="gr10" draw:text-style-name="P251" svg:x1="5.027cm" svg:y1="1.353cm" svg:x2="7.027cm" svg:y2="1.353cm"><text:p/></draw:line><draw:line draw:style-name="gr10" draw:text-style-name="P251" svg:x1="7.026cm" svg:y1="1.351cm" svg:x2="7.026cm" svg:y2="1.101cm"><text:p/></draw:line><draw:line draw:style-name="gr10" draw:text-style-name="P251" svg:x1="9.024cm" svg:y1="1.101cm" svg:x2="7.026cm" svg:y2="1.101cm"><text:p/></draw:line><draw:line draw:style-name="gr10" draw:text-style-name="P251" svg:x1="5.027cm" svg:y1="1.351cm" svg:x2="5.027cm" svg:y2="1.101cm"><text:p/></draw:line><draw:line draw:style-name="gr10" draw:text-style-name="P251" svg:x1="9.024cm" svg:y1="1.351cm" svg:x2="9.024cm" svg:y2="1.101cm"><text:p/></draw:line><draw:line draw:style-name="gr10" draw:text-style-name="P251" svg:x1="9.024cm" svg:y1="1.353cm" svg:x2="9.525cm" svg:y2="1.353cm"><text:p/></draw:line><draw:frame draw:style-name="gr35" draw:text-style-name="P254" svg:width="1.251cm" svg:height="0.622cm" svg:x="0.025cm" svg:y="1.535cm"><draw:text-box><text:p text:style-name="P252"><text:span text:style-name="T51">A2</text:span></text:p></draw:text-box></draw:frame><draw:line draw:style-name="gr65" draw:text-style-name="P251" svg:x1="1.025cm" svg:y1="1.854cm" svg:x2="5.026cm" svg:y2="1.854cm"><text:p/></draw:line><draw:line draw:style-name="gr65" draw:text-style-name="P251" svg:x1="5.027cm" svg:y1="1.602cm" svg:x2="9.527cm" svg:y2="1.602cm"><text:p/></draw:line><draw:line draw:style-name="gr65" draw:text-style-name="P251" svg:x1="5.027cm" svg:y1="1.602cm" svg:x2="5.027cm" svg:y2="1.852cm"><text:p/></draw:line><draw:line draw:style-name="gr4" draw:text-style-name="P251" svg:x1="5.528cm" svg:y1="4.353cm" svg:x2="5.528cm" svg:y2="4.103cm"><text:p/></draw:line><draw:line draw:style-name="gr4" draw:text-style-name="P251" svg:x1="5.778cm" svg:y1="4.103cm" svg:x2="5.528cm" svg:y2="4.103cm"><text:p/></draw:line><draw:line draw:style-name="gr4" draw:text-style-name="P251" svg:x1="5.775cm" svg:y1="4.103cm" svg:x2="5.775cm" svg:y2="4.353cm"><text:p/></draw:line><draw:line draw:style-name="gr4" draw:text-style-name="P251" svg:x1="9.525cm" svg:y1="4.352cm" svg:x2="5.775cm" svg:y2="4.352cm"><text:p/></draw:line><draw:line draw:style-name="gr4" draw:text-style-name="P251" svg:x1="1.025cm" svg:y1="4.352cm" svg:x2="5.525cm" svg:y2="4.352cm"><text:p/></draw:line><draw:frame draw:style-name="gr35" draw:text-style-name="P254" svg:width="1.251cm" svg:height="0.622cm" svg:x="0.025cm" svg:y="4.034cm"><draw:text-box><text:p text:style-name="P252"><text:span text:style-name="T51">Q4</text:span></text:p></draw:text-box></draw:frame><draw:line draw:style-name="gr5" draw:text-style-name="P251" svg:x1="1.025cm" svg:y1="4.851cm" svg:x2="6.525cm" svg:y2="4.851cm"><text:p/></draw:line><draw:line draw:style-name="gr5" draw:text-style-name="P251" svg:x1="6.525cm" svg:y1="4.604cm" svg:x2="6.525cm" svg:y2="4.853cm"><text:p/></draw:line><draw:line draw:style-name="gr5" draw:text-style-name="P251" svg:x1="6.775cm" svg:y1="4.604cm" svg:x2="6.525cm" svg:y2="4.604cm"><text:p/></draw:line><draw:frame draw:style-name="gr35" draw:text-style-name="P254" svg:width="1.251cm" svg:height="0.622cm" svg:x="0.025cm" svg:y="4.533cm"><draw:text-box><text:p text:style-name="P252"><text:span text:style-name="T51">Q5</text:span></text:p></draw:text-box></draw:frame><draw:line draw:style-name="gr5" draw:text-style-name="P251" svg:x1="6.775cm" svg:y1="4.604cm" svg:x2="6.775cm" svg:y2="4.853cm"><text:p/></draw:line><draw:line draw:style-name="gr5" draw:text-style-name="P251" svg:x1="9.525cm" svg:y1="4.851cm" svg:x2="6.775cm" svg:y2="4.851cm"><text:p/></draw:line><draw:line draw:style-name="gr11" draw:text-style-name="P251" svg:x1="7.525cm" svg:y1="5.353cm" svg:x2="7.525cm" svg:y2="5.103cm"><text:p/></draw:line><draw:line draw:style-name="gr11" draw:text-style-name="P251" svg:x1="7.775cm" svg:y1="5.103cm" svg:x2="7.525cm" svg:y2="5.103cm"><text:p/></draw:line><draw:line draw:style-name="gr11" draw:text-style-name="P251" svg:x1="7.777cm" svg:y1="5.103cm" svg:x2="7.777cm" svg:y2="5.353cm"><text:p/></draw:line><draw:line draw:style-name="gr11" draw:text-style-name="P251" svg:x1="9.527cm" svg:y1="5.352cm" svg:x2="7.777cm" svg:y2="5.352cm"><text:p/></draw:line><draw:line draw:style-name="gr11" draw:text-style-name="P251" svg:x1="1.025cm" svg:y1="5.352cm" svg:x2="7.525cm" svg:y2="5.352cm"><text:p/></draw:line><draw:frame draw:style-name="gr35" draw:text-style-name="P254" svg:width="1.251cm" svg:height="0.622cm" svg:x="0.025cm" svg:y="5.034cm"><draw:text-box><text:p text:style-name="P252"><text:span text:style-name="T51">Q6</text:span></text:p></draw:text-box></draw:frame><draw:line draw:style-name="gr12" draw:text-style-name="P251" svg:x1="1.025cm" svg:y1="5.853cm" svg:x2="8.525cm" svg:y2="5.853cm"><text:p/></draw:line><draw:line draw:style-name="gr12" draw:text-style-name="P251" svg:x1="8.525cm" svg:y1="5.604cm" svg:x2="8.525cm" svg:y2="5.853cm"><text:p/></draw:line><draw:line draw:style-name="gr12" draw:text-style-name="P251" svg:x1="8.775cm" svg:y1="5.604cm" svg:x2="8.525cm" svg:y2="5.604cm"><text:p/></draw:line><draw:frame draw:style-name="gr35" draw:text-style-name="P254" svg:width="1.251cm" svg:height="0.622cm" svg:x="0.025cm" svg:y="5.533cm"><draw:text-box><text:p text:style-name="P252"><text:span text:style-name="T51">Q7</text:span></text:p></draw:text-box></draw:frame><draw:line draw:style-name="gr12" draw:text-style-name="P251" svg:x1="8.777cm" svg:y1="5.604cm" svg:x2="8.777cm" svg:y2="5.853cm"><text:p/></draw:line><draw:line draw:style-name="gr12" draw:text-style-name="P251" svg:x1="9.527cm" svg:y1="5.853cm" svg:x2="8.777cm" svg:y2="5.853cm"><text:p/></draw:line></draw:g></text:p></draw:text-box></draw:frame></text:p></draw:text-box></draw:frame>Das folgende Schaubild verdeutlicht die Logik des Bausteins:</text:p>
      <text:p text:style-name="P25"><text:line-break/>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xml:id="list33632030" text:continue-numbering="true" text:style-name="L1">
        <text:list-item>
          <text:list>
            <text:list-item>
              <text:h text:style-name="P217" text:outline-level="2"><text:alphabetical-index-mark-start text:id="IMark100843576"/>DW_TO_REAL<text:alphabetical-index-mark-end text:id="IMark100843576"/></text:h>
            </text:list-item>
          </text:list>
        </text:list-item>
      </text:list>
      <text:p text:style-name="P22">Type<text:tab/>Funktion : REAL</text:p>
      <text:p text:style-name="P22"><text:span text:style-name="T16">Input</text:span><text:tab/>IN : DWORD (Eingang)</text:p>
      <text:p text:style-name="P25"><draw:frame draw:style-name="fr4" draw:name="Grafik550" text:anchor-type="paragraph" svg:x="1.046cm" svg:y="0.667cm" svg:width="5.42cm" svg:height="1.12cm" draw:z-index="590"><draw:image xlink:href="Pictures/100000000000019A00000055C3088950.png" xlink:type="simple" xlink:show="embed" xlink:actuate="onLoad"/></draw:frame>Output<text:tab/>REAL (Ausgangswert)</text:p>
      <text:p text:style-name="P55"><text:line-break/>DW_TO_REAL kopiert das Bitmuster eines DWORD (IN) in einen REAL. Es werden dabei die einzelnen Bits kopiert ohne auf deren Bedeutung zu achten. Die Funktion <text:soft-page-break/>REAL_TO_DW ist die Umkehrfunktion so das die Konvertierung von REAL_TO_DW und anschließend DW_TO_REAL wiederum den Ausgangswert ergeben. Die IEC Standardfunktion DWORD_TO_REAL wandelt den Wert des DWORDS in einen REAL Wert.</text:p>
      <text:list xml:id="list33645842" text:continue-numbering="true" text:style-name="L1">
        <text:list-item>
          <text:list>
            <text:list-item>
              <text:h text:style-name="P217" text:outline-level="2"><text:alphabetical-index-mark-start text:id="IMark100843576"/>DWORD_OF_BYTE<text:alphabetical-index-mark-end text:id="IMark100843576"/></text:h>
            </text:list-item>
          </text:list>
        </text:list-item>
      </text:list>
      <text:p text:style-name="P22">Type<text:tab/>Funktion : DWORD</text:p>
      <text:p text:style-name="P25"><text:span text:style-name="T16">Input</text:span><text:tab/>B3 : Byte (Eingangs Byte 3)</text:p>
      <text:p text:style-name="P25"><text:tab/>B2 : Byte (Eingangs Byte 2)</text:p>
      <text:p text:style-name="P25"><text:tab/>B1 : Byte (Eingangs Byte 1)</text:p>
      <text:p text:style-name="P25"><text:tab/>B0 : Byte (Eingangs Byte 0)</text:p>
      <text:p text:style-name="P25"><draw:frame draw:style-name="fr4" draw:name="Grafik215" text:anchor-type="paragraph" svg:x="1.023cm" svg:y="0.667cm" svg:width="6.77cm" svg:height="2.469cm" draw:z-index="564"><draw:image xlink:href="Pictures/1000000000000200000000BBD245CAE7.png" xlink:type="simple" xlink:show="embed" xlink:actuate="onLoad"/></draw:frame>Output<text:tab/>DWORD (Ergebnis-DWORD)</text:p>
      <text:p text:style-name="P25"><text:line-break/>DWORD_OF_BYTE setzt aus 4 separaten Bytes B0 .. B3 ein DWORD zusammen.</text:p>
      <text:p text:style-name="P55">EIN DWORD setzt sich zusammen wie folgt: B3-B2-B1-B0</text:p>
      <text:list xml:id="list33650086" text:continue-numbering="true" text:style-name="L1">
        <text:list-item>
          <text:list>
            <text:list-item>
              <text:h text:style-name="P217" text:outline-level="2"><text:alphabetical-index-mark-start text:id="IMark100843576"/>INT_TO_BCDC<text:alphabetical-index-mark-end text:id="IMark100843576"/></text:h>
            </text:list-item>
          </text:list>
        </text:list-item>
      </text:list>
      <text:p text:style-name="P22">Type<text:tab/>Funktion : BYTE</text:p>
      <text:p text:style-name="P22"><text:span text:style-name="T16">Input</text:span><text:tab/>IN : INT (Eingangswert)</text:p>
      <text:p text:style-name="P25"><draw:frame draw:style-name="fr4" draw:name="Grafik414" text:anchor-type="paragraph" svg:x="1.023cm" svg:y="0.69cm" svg:width="4.881cm" svg:height="0.99cm" draw:z-index="685"><draw:image xlink:href="Pictures/10000000000001710000004B076F9D1D.png" xlink:type="simple" xlink:show="embed" xlink:actuate="onLoad"/></draw:frame>Output<text:tab/>BYTE (BCD codierter Ausgangswert)</text:p>
      <text:p text:style-name="P55"><text:line-break/>INT_TO_BCDC konvertiert den Eingangswert IN in einen BCD codierten Ausgangswert.</text:p>
      <text:list xml:id="list33632343" text:continue-numbering="true" text:style-name="L1">
        <text:list-item>
          <text:list>
            <text:list-item>
              <text:h text:style-name="P217" text:outline-level="2"><text:soft-page-break/><text:alphabetical-index-mark-start text:id="IMark100843576"/>MATRIX<text:alphabetical-index-mark-end text:id="IMark100843576"/></text:h>
            </text:list-item>
          </text:list>
        </text:list-item>
      </text:list>
      <text:p text:style-name="Standard">Type<text:tab/><text:span text:style-name="T46">Funktionsbaustein</text:span></text:p>
      <text:p text:style-name="P22"><text:span text:style-name="T16">Input</text:span><text:tab/>X1 .. X5 : BOOL (Zeileneingänge)</text:p>
      <text:p text:style-name="P22">Config<text:tab/><text:span text:style-name="T35">RELEASE : BOOL (Ein Tastencode wird beim Drücken und <text:s text:c="10"/><text:tab/>loslassen einer Taste erzeugt)</text:span></text:p>
      <text:p text:style-name="P25">Output<text:tab/>CODE : Byte (Ausgang für Tastencode)</text:p>
      <text:p text:style-name="P25"><text:tab/>TP : BOOL (TP ist <text:span text:style-name="T4">für einen Zyklus </text:span>TRUE, wenn ein neuer <text:s text:c="17"/><text:tab/>Tastencode ansteht)</text:p>
      <text:p text:style-name="P25"><text:tab/>Y1 .. Y4 : BOOL (Zeilenausgänge)</text:p>
      <text:p text:style-name="P55"><draw:frame draw:style-name="fr4" draw:name="Grafik309" text:anchor-type="paragraph" svg:x="1.27cm" svg:y="0.005cm" svg:width="2.731cm" svg:height="3.54cm" draw:z-index="283"><draw:image xlink:href="Pictures/10000000000000CE0000010C823042AB.png" xlink:type="simple" xlink:show="embed" xlink:actuate="onLoad"/></draw:frame><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55"/>
      <table:table table:name="Tabelle12" table:style-name="Tabelle12">
        <table:table-column table:style-name="Tabelle12.A"/>
        <table:table-column table:style-name="Tabelle12.B"/>
        <table:table-row>
          <table:table-cell table:style-name="Tabelle12.A1" office:value-type="string">
            <text:p text:style-name="P122">Bit</text:p>
          </table:table-cell>
          <table:table-cell table:style-name="Tabelle12.B1" office:value-type="string">
            <text:p text:style-name="P127">CODE Output</text:p>
          </table:table-cell>
        </table:table-row>
        <table:table-row>
          <table:table-cell table:style-name="Tabelle12.A2" office:value-type="string">
            <text:p text:style-name="P122">7</text:p>
          </table:table-cell>
          <table:table-cell table:style-name="Tabelle12.B2" office:value-type="string">
            <text:p text:style-name="P127">1 when key is pressed, 0 when key is released</text:p>
          </table:table-cell>
        </table:table-row>
        <table:table-row>
          <table:table-cell table:style-name="Tabelle12.A2" office:value-type="string">
            <text:p text:style-name="P122">6</text:p>
          </table:table-cell>
          <table:table-cell table:style-name="Tabelle12.B2" office:value-type="string">
            <text:p text:style-name="P127">Line number Bit 2</text:p>
          </table:table-cell>
        </table:table-row>
        <table:table-row>
          <table:table-cell table:style-name="Tabelle12.A2" office:value-type="string">
            <text:p text:style-name="P122">5</text:p>
          </table:table-cell>
          <table:table-cell table:style-name="Tabelle12.B2" office:value-type="string">
            <text:p text:style-name="P127">Line number Bit 1</text:p>
          </table:table-cell>
        </table:table-row>
        <table:table-row>
          <table:table-cell table:style-name="Tabelle12.A2" office:value-type="string">
            <text:p text:style-name="P122">4</text:p>
          </table:table-cell>
          <table:table-cell table:style-name="Tabelle12.B2" office:value-type="string">
            <text:p text:style-name="P127">Line number Bit 0</text:p>
          </table:table-cell>
        </table:table-row>
        <table:table-row>
          <table:table-cell table:style-name="Tabelle12.A2" office:value-type="string">
            <text:p text:style-name="P122">3</text:p>
          </table:table-cell>
          <table:table-cell table:style-name="Tabelle12.B2" office:value-type="string">
            <text:p text:style-name="P127">Always 0</text:p>
          </table:table-cell>
        </table:table-row>
        <table:table-row>
          <table:table-cell table:style-name="Tabelle12.A2" office:value-type="string">
            <text:p text:style-name="P122">2</text:p>
          </table:table-cell>
          <table:table-cell table:style-name="Tabelle12.B2" office:value-type="string">
            <text:p text:style-name="P127">Row number Bit 2</text:p>
          </table:table-cell>
        </table:table-row>
        <text:soft-page-break/>
        <table:table-row>
          <table:table-cell table:style-name="Tabelle12.A2" office:value-type="string">
            <text:p text:style-name="P122">1</text:p>
          </table:table-cell>
          <table:table-cell table:style-name="Tabelle12.B2" office:value-type="string">
            <text:p text:style-name="P127">Row Number Bit 1</text:p>
          </table:table-cell>
        </table:table-row>
        <table:table-row>
          <table:table-cell table:style-name="Tabelle12.A2" office:value-type="string">
            <text:p text:style-name="P122">0</text:p>
          </table:table-cell>
          <table:table-cell table:style-name="Tabelle12.B2" office:value-type="string">
            <text:p text:style-name="P127">Row Number Bit 0</text:p>
          </table:table-cell>
        </table:table-row>
      </table:table>
      <text:p text:style-name="Standard"/>
      <text:p text:style-name="P55"><draw:g text:anchor-type="paragraph" draw:z-index="302" draw:style-name="gr1"><draw:frame draw:style-name="gr56" draw:text-style-name="P266" svg:width="1.422cm" svg:height="0.832cm" svg:x="1.101cm" svg:y="0.997cm"><draw:text-box><text:p text:style-name="P252"><text:span text:style-name="T58">Y1</text:span></text:p></draw:text-box></draw:frame><draw:frame draw:style-name="gr57" draw:text-style-name="P266" svg:width="1.422cm" svg:height="0.83cm" svg:x="1.101cm" svg:y="1.918cm"><draw:text-box><text:p text:style-name="P252"><text:span text:style-name="T58">Y2</text:span></text:p></draw:text-box></draw:frame><draw:frame draw:style-name="gr56" draw:text-style-name="P266" svg:width="1.422cm" svg:height="0.832cm" svg:x="1.101cm" svg:y="2.786cm"><draw:text-box><text:p text:style-name="P252"><text:span text:style-name="T58">Y3</text:span></text:p></draw:text-box></draw:frame><draw:frame draw:style-name="gr57" draw:text-style-name="P266" svg:width="1.422cm" svg:height="0.83cm" svg:x="1.101cm" svg:y="3.655cm"><draw:text-box><text:p text:style-name="P252"><text:span text:style-name="T58">Y4</text:span></text:p></draw:text-box></draw:frame><draw:g draw:style-name="gr8"><draw:line draw:style-name="gr14" draw:text-style-name="P264" svg:x1="2.196cm" svg:y1="1.374cm" svg:x2="7.885cm" svg:y2="1.374cm"><text:p/></draw:line><draw:line draw:style-name="gr14" draw:text-style-name="P264" svg:x1="2.196cm" svg:y1="2.249cm" svg:x2="7.885cm" svg:y2="2.249cm"><text:p/></draw:line><draw:line draw:style-name="gr14" draw:text-style-name="P264" svg:x1="2.196cm" svg:y1="3.115cm" svg:x2="7.885cm" svg:y2="3.115cm"><text:p/></draw:line><draw:line draw:style-name="gr14" draw:text-style-name="P264" svg:x1="2.196cm" svg:y1="3.983cm" svg:x2="7.885cm" svg:y2="3.983cm"><text:p/></draw:line><draw:line draw:style-name="gr14" draw:text-style-name="P264" svg:x1="3.727cm" svg:y1="5.287cm" svg:x2="3.727cm" svg:y2="0.72cm"><text:p/></draw:line><draw:line draw:style-name="gr14" draw:text-style-name="P264" svg:x1="4.603cm" svg:y1="5.287cm" svg:x2="4.603cm" svg:y2="0.72cm"><text:p/></draw:line><draw:line draw:style-name="gr14" draw:text-style-name="P264" svg:x1="5.478cm" svg:y1="5.287cm" svg:x2="5.478cm" svg:y2="0.72cm"><text:p/></draw:line><draw:line draw:style-name="gr14" draw:text-style-name="P264" svg:x1="6.353cm" svg:y1="5.287cm" svg:x2="6.353cm" svg:y2="0.72cm"><text:p/></draw:line><draw:line draw:style-name="gr14" draw:text-style-name="P264" svg:x1="7.226cm" svg:y1="5.287cm" svg:x2="7.226cm" svg:y2="0.72cm"><text:p/></draw:line><draw:g draw:style-name="gr8"><draw:line draw:style-name="gr58" draw:text-style-name="P264" svg:x1="3.694cm" svg:y1="1.584cm" svg:x2="4.057cm" svg:y2="1.699cm"><text:p/></draw:line><draw:line draw:style-name="gr58" draw:text-style-name="P264" svg:x1="4.061cm" svg:y1="1.323cm" svg:x2="4.057cm" svg:y2="1.588cm"><text:p/></draw:line></draw:g><draw:g draw:style-name="gr8"><draw:line draw:style-name="gr58" draw:text-style-name="P264" svg:x1="4.565cm" svg:y1="1.584cm" svg:x2="4.928cm" svg:y2="1.699cm"><text:p/></draw:line><draw:line draw:style-name="gr58" draw:text-style-name="P264" svg:x1="4.934cm" svg:y1="1.323cm" svg:x2="4.93cm" svg:y2="1.588cm"><text:p/></draw:line></draw:g><draw:g draw:style-name="gr8"><draw:line draw:style-name="gr58" draw:text-style-name="P264" svg:x1="5.44cm" svg:y1="1.584cm" svg:x2="5.803cm" svg:y2="1.699cm"><text:p/></draw:line><draw:line draw:style-name="gr58" draw:text-style-name="P264" svg:x1="5.809cm" svg:y1="1.323cm" svg:x2="5.805cm" svg:y2="1.588cm"><text:p/></draw:line></draw:g><draw:g draw:style-name="gr8"><draw:line draw:style-name="gr58" draw:text-style-name="P264" svg:x1="6.314cm" svg:y1="1.584cm" svg:x2="6.677cm" svg:y2="1.699cm"><text:p/></draw:line><draw:line draw:style-name="gr58" draw:text-style-name="P264" svg:x1="6.682cm" svg:y1="1.323cm" svg:x2="6.678cm" svg:y2="1.588cm"><text:p/></draw:line></draw:g><draw:g draw:style-name="gr8"><draw:line draw:style-name="gr58" draw:text-style-name="P264" svg:x1="7.202cm" svg:y1="1.588cm" svg:x2="7.565cm" svg:y2="1.703cm"><text:p/></draw:line><draw:line draw:style-name="gr58" draw:text-style-name="P264" svg:x1="7.564cm" svg:y1="1.33cm" svg:x2="7.56cm" svg:y2="1.595cm"><text:p/></draw:line></draw:g><draw:g draw:style-name="gr8"><draw:line draw:style-name="gr58" draw:text-style-name="P264" svg:x1="3.697cm" svg:y1="2.452cm" svg:x2="4.06cm" svg:y2="2.567cm"><text:p/></draw:line><draw:line draw:style-name="gr58" draw:text-style-name="P264" svg:x1="4.063cm" svg:y1="2.193cm" svg:x2="4.059cm" svg:y2="2.458cm"><text:p/></draw:line></draw:g><draw:g draw:style-name="gr8"><draw:line draw:style-name="gr58" draw:text-style-name="P264" svg:x1="4.572cm" svg:y1="2.452cm" svg:x2="4.935cm" svg:y2="2.567cm"><text:p/></draw:line><draw:line draw:style-name="gr58" draw:text-style-name="P264" svg:x1="4.935cm" svg:y1="2.193cm" svg:x2="4.931cm" svg:y2="2.458cm"><text:p/></draw:line></draw:g><draw:g draw:style-name="gr8"><draw:line draw:style-name="gr58" draw:text-style-name="P264" svg:x1="5.446cm" svg:y1="2.452cm" svg:x2="5.809cm" svg:y2="2.567cm"><text:p/></draw:line><draw:line draw:style-name="gr58" draw:text-style-name="P264" svg:x1="5.81cm" svg:y1="2.193cm" svg:x2="5.806cm" svg:y2="2.458cm"><text:p/></draw:line></draw:g><draw:g draw:style-name="gr8"><draw:line draw:style-name="gr58" draw:text-style-name="P264" svg:x1="6.32cm" svg:y1="2.452cm" svg:x2="6.683cm" svg:y2="2.567cm"><text:p/></draw:line><draw:line draw:style-name="gr58" draw:text-style-name="P264" svg:x1="6.684cm" svg:y1="2.193cm" svg:x2="6.68cm" svg:y2="2.458cm"><text:p/></draw:line></draw:g><draw:g draw:style-name="gr8"><draw:line draw:style-name="gr58" draw:text-style-name="P264" svg:x1="7.193cm" svg:y1="2.452cm" svg:x2="7.556cm" svg:y2="2.567cm"><text:p/></draw:line><draw:line draw:style-name="gr58" draw:text-style-name="P264" svg:x1="7.557cm" svg:y1="2.193cm" svg:x2="7.553cm" svg:y2="2.458cm"><text:p/></draw:line></draw:g><draw:g draw:style-name="gr8"><draw:line draw:style-name="gr58" draw:text-style-name="P264" svg:x1="3.69cm" svg:y1="3.346cm" svg:x2="4.053cm" svg:y2="3.461cm"><text:p/></draw:line><draw:line draw:style-name="gr58" draw:text-style-name="P264" svg:x1="4.052cm" svg:y1="3.087cm" svg:x2="4.048cm" svg:y2="3.352cm"><text:p/></draw:line></draw:g><draw:g draw:style-name="gr8"><draw:line draw:style-name="gr58" draw:text-style-name="P264" svg:x1="4.559cm" svg:y1="3.346cm" svg:x2="4.922cm" svg:y2="3.461cm"><text:p/></draw:line><draw:line draw:style-name="gr58" draw:text-style-name="P264" svg:x1="4.927cm" svg:y1="3.087cm" svg:x2="4.923cm" svg:y2="3.352cm"><text:p/></draw:line></draw:g><draw:g draw:style-name="gr8"><draw:line draw:style-name="gr58" draw:text-style-name="P264" svg:x1="5.434cm" svg:y1="3.346cm" svg:x2="5.797cm" svg:y2="3.461cm"><text:p/></draw:line><draw:line draw:style-name="gr58" draw:text-style-name="P264" svg:x1="5.801cm" svg:y1="3.087cm" svg:x2="5.797cm" svg:y2="3.352cm"><text:p/></draw:line></draw:g><draw:g draw:style-name="gr8"><draw:line draw:style-name="gr58" draw:text-style-name="P264" svg:x1="6.313cm" svg:y1="3.346cm" svg:x2="6.676cm" svg:y2="3.461cm"><text:p/></draw:line><draw:line draw:style-name="gr58" draw:text-style-name="P264" svg:x1="6.675cm" svg:y1="3.087cm" svg:x2="6.671cm" svg:y2="3.352cm"><text:p/></draw:line></draw:g><draw:g draw:style-name="gr8"><draw:line draw:style-name="gr58" draw:text-style-name="P264" svg:x1="7.202cm" svg:y1="3.34cm" svg:x2="7.565cm" svg:y2="3.455cm"><text:p/></draw:line><draw:line draw:style-name="gr58" draw:text-style-name="P264" svg:x1="7.565cm" svg:y1="3.08cm" svg:x2="7.561cm" svg:y2="3.345cm"><text:p/></draw:line></draw:g><draw:g draw:style-name="gr8"><draw:line draw:style-name="gr58" draw:text-style-name="P264" svg:x1="3.69cm" svg:y1="4.214cm" svg:x2="4.053cm" svg:y2="4.329cm"><text:p/></draw:line><draw:line draw:style-name="gr58" draw:text-style-name="P264" svg:x1="4.061cm" svg:y1="3.955cm" svg:x2="4.057cm" svg:y2="4.22cm"><text:p/></draw:line></draw:g><draw:g draw:style-name="gr8"><draw:line draw:style-name="gr58" draw:text-style-name="P264" svg:x1="4.565cm" svg:y1="4.214cm" svg:x2="4.928cm" svg:y2="4.329cm"><text:p/></draw:line><draw:line draw:style-name="gr58" draw:text-style-name="P264" svg:x1="4.928cm" svg:y1="3.955cm" svg:x2="4.924cm" svg:y2="4.22cm"><text:p/></draw:line></draw:g><draw:g draw:style-name="gr8"><draw:line draw:style-name="gr58" draw:text-style-name="P264" svg:x1="5.44cm" svg:y1="4.214cm" svg:x2="5.803cm" svg:y2="4.329cm"><text:p/></draw:line><draw:line draw:style-name="gr58" draw:text-style-name="P264" svg:x1="5.804cm" svg:y1="3.955cm" svg:x2="5.8cm" svg:y2="4.22cm"><text:p/></draw:line></draw:g><draw:g draw:style-name="gr8"><draw:line draw:style-name="gr58" draw:text-style-name="P264" svg:x1="6.314cm" svg:y1="4.214cm" svg:x2="6.677cm" svg:y2="4.329cm"><text:p/></draw:line><draw:line draw:style-name="gr58" draw:text-style-name="P264" svg:x1="6.678cm" svg:y1="3.955cm" svg:x2="6.674cm" svg:y2="4.22cm"><text:p/></draw:line></draw:g><draw:g draw:style-name="gr8"><draw:line draw:style-name="gr58" draw:text-style-name="P264" svg:x1="7.183cm" svg:y1="4.214cm" svg:x2="7.546cm" svg:y2="4.329cm"><text:p/></draw:line><draw:line draw:style-name="gr58" draw:text-style-name="P264" svg:x1="7.55cm" svg:y1="3.955cm" svg:x2="7.546cm" svg:y2="4.22cm"><text:p/></draw:line></draw:g><draw:frame draw:style-name="gr56" draw:text-style-name="P266" svg:width="1.422cm" svg:height="0.832cm" svg:x="3.179cm" svg:y="5.209cm"><draw:text-box><text:p text:style-name="P252"><text:span text:style-name="T58">X1</text:span></text:p></draw:text-box></draw:frame><draw:frame draw:style-name="gr56" draw:text-style-name="P266" svg:width="1.422cm" svg:height="0.832cm" svg:x="4.054cm" svg:y="5.211cm"><draw:text-box><text:p text:style-name="P252"><text:span text:style-name="T58">X2</text:span></text:p></draw:text-box></draw:frame><draw:frame draw:style-name="gr56" draw:text-style-name="P266" svg:width="1.424cm" svg:height="0.832cm" svg:x="4.929cm" svg:y="5.211cm"><draw:text-box><text:p text:style-name="P252"><text:span text:style-name="T58">X3</text:span></text:p></draw:text-box></draw:frame><draw:frame draw:style-name="gr57" draw:text-style-name="P266" svg:width="1.422cm" svg:height="0.83cm" svg:x="5.805cm" svg:y="5.241cm"><draw:text-box><text:p text:style-name="P252"><text:span text:style-name="T58">X4</text:span></text:p></draw:text-box></draw:frame><draw:frame draw:style-name="gr57" draw:text-style-name="P266" svg:width="1.422cm" svg:height="0.83cm" svg:x="6.68cm" svg:y="5.241cm"><draw:text-box><text:p text:style-name="P252"><text:span text:style-name="T58">X5</text:span></text:p></draw:text-box></draw:frame></draw:g></draw:g>Der Matrixcontroller wird wie folgt beschaltet:</text:p>
      <text:p text:style-name="P55"/>
      <text:p text:style-name="P55">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55">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25"><draw:g text:anchor-type="paragraph" draw:z-index="286" draw:style-name="gr55"><draw:line draw:style-name="gr4" draw:text-style-name="P264" svg:x1="2.501cm" svg:y1="0.797cm" svg:x2="2.501cm" svg:y2="0.298cm"><text:p/></draw:line><draw:line draw:style-name="gr4" draw:text-style-name="P264" svg:x1="3.515cm" svg:y1="0.298cm" svg:x2="2.501cm" svg:y2="0.3cm"><text:p/></draw:line><draw:line draw:style-name="gr4" draw:text-style-name="P264" svg:x1="3.517cm" svg:y1="0.298cm" svg:x2="3.517cm" svg:y2="0.797cm"><text:p/></draw:line><draw:line draw:style-name="gr4" draw:text-style-name="P264" svg:x1="6.517cm" svg:y1="0.795cm" svg:x2="3.517cm" svg:y2="0.795cm"><text:p/></draw:line><draw:line draw:style-name="gr4" draw:text-style-name="P264" svg:x1="2.002cm" svg:y1="0.795cm" svg:x2="2.501cm" svg:y2="0.795cm"><text:p/></draw:line><draw:frame draw:style-name="gr6" draw:text-style-name="P265" svg:width="1.251cm" svg:height="0.65cm" svg:x="1.002cm" svg:y="0.293cm"><draw:text-box><text:p text:style-name="P252"><text:span text:style-name="T57">Y1</text:span></text:p></draw:text-box></draw:frame><draw:line draw:style-name="gr5" draw:text-style-name="P264" svg:x1="2.002cm" svg:y1="1.545cm" svg:x2="3.501cm" svg:y2="1.545cm"><text:p/></draw:line><draw:line draw:style-name="gr5" draw:text-style-name="P264" svg:x1="3.501cm" svg:y1="1.044cm" svg:x2="3.501cm" svg:y2="1.543cm"><text:p/></draw:line><draw:line draw:style-name="gr5" draw:text-style-name="P264" svg:x1="4.515cm" svg:y1="1.046cm" svg:x2="3.501cm" svg:y2="1.044cm"><text:p/></draw:line><draw:frame draw:style-name="gr6" draw:text-style-name="P265" svg:width="1.251cm" svg:height="0.65cm" svg:x="1.002cm" svg:y="1.043cm"><draw:text-box><text:p text:style-name="P252"><text:span text:style-name="T57">Y2</text:span></text:p></draw:text-box></draw:frame><draw:line draw:style-name="gr5" draw:text-style-name="P264" svg:x1="4.516cm" svg:y1="1.044cm" svg:x2="4.516cm" svg:y2="1.543cm"><text:p/></draw:line><draw:line draw:style-name="gr5" draw:text-style-name="P264" svg:x1="7.502cm" svg:y1="1.545cm" svg:x2="4.516cm" svg:y2="1.545cm"><text:p/></draw:line><draw:line draw:style-name="gr11" draw:text-style-name="P264" svg:x1="4.503cm" svg:y1="2.291cm" svg:x2="4.503cm" svg:y2="1.792cm"><text:p/></draw:line><draw:line draw:style-name="gr11" draw:text-style-name="P264" svg:x1="5.515cm" svg:y1="1.792cm" svg:x2="4.503cm" svg:y2="1.792cm"><text:p/></draw:line><draw:line draw:style-name="gr11" draw:text-style-name="P264" svg:x1="5.516cm" svg:y1="1.792cm" svg:x2="5.516cm" svg:y2="2.291cm"><text:p/></draw:line><draw:line draw:style-name="gr11" draw:text-style-name="P264" svg:x1="8.502cm" svg:y1="2.291cm" svg:x2="5.516cm" svg:y2="2.289cm"><text:p/></draw:line><draw:line draw:style-name="gr11" draw:text-style-name="P264" svg:x1="2.002cm" svg:y1="2.289cm" svg:x2="4.501cm" svg:y2="2.289cm"><text:p/></draw:line><draw:frame draw:style-name="gr6" draw:text-style-name="P265" svg:width="1.251cm" svg:height="0.65cm" svg:x="1.002cm" svg:y="1.792cm"><draw:text-box><text:p text:style-name="P252"><text:span text:style-name="T57">Y3</text:span></text:p></draw:text-box></draw:frame><draw:line draw:style-name="gr12" draw:text-style-name="P264" svg:x1="2.002cm" svg:y1="3.046cm" svg:x2="5.502cm" svg:y2="3.046cm"><text:p/></draw:line><draw:line draw:style-name="gr12" draw:text-style-name="P264" svg:x1="5.502cm" svg:y1="2.543cm" svg:x2="5.502cm" svg:y2="3.044cm"><text:p/></draw:line><draw:line draw:style-name="gr12" draw:text-style-name="P264" svg:x1="6.514cm" svg:y1="2.543cm" svg:x2="5.502cm" svg:y2="2.543cm"><text:p/></draw:line><draw:frame draw:style-name="gr6" draw:text-style-name="P265" svg:width="1.251cm" svg:height="0.65cm" svg:x="1.002cm" svg:y="2.542cm"><draw:text-box><text:p text:style-name="P252"><text:span text:style-name="T57">Y4</text:span></text:p></draw:text-box></draw:frame><draw:line draw:style-name="gr12" draw:text-style-name="P264" svg:x1="6.516cm" svg:y1="2.543cm" svg:x2="6.516cm" svg:y2="3.044cm"><text:p/></draw:line><draw:line draw:style-name="gr12" draw:text-style-name="P264" svg:x1="9.502cm" svg:y1="3.048cm" svg:x2="6.516cm" svg:y2="3.046cm"><text:p/></draw:line><draw:line draw:style-name="gr4" draw:text-style-name="P264" svg:x1="6.502cm" svg:y1="0.797cm" svg:x2="6.502cm" svg:y2="0.298cm"><text:p/></draw:line><draw:line draw:style-name="gr5" draw:text-style-name="P264" svg:x1="7.504cm" svg:y1="1.543cm" svg:x2="7.516cm" svg:y2="1.014cm"><text:p/></draw:line><draw:line draw:style-name="gr4" draw:text-style-name="P264" svg:x1="7.516cm" svg:y1="0.298cm" svg:x2="6.502cm" svg:y2="0.3cm"><text:p/></draw:line><draw:line draw:style-name="gr4" draw:text-style-name="P264" svg:x1="7.514cm" svg:y1="0.298cm" svg:x2="7.514cm" svg:y2="0.797cm"><text:p/></draw:line><draw:line draw:style-name="gr4" draw:text-style-name="P264" svg:x1="10.514cm" svg:y1="0.795cm" svg:x2="7.514cm" svg:y2="0.795cm"><text:p/></draw:line><draw:line draw:style-name="gr5" draw:text-style-name="P264" svg:x1="8.516cm" svg:y1="1.046cm" svg:x2="7.502cm" svg:y2="1.044cm"><text:p/></draw:line><draw:line draw:style-name="gr5" draw:text-style-name="P264" svg:x1="8.514cm" svg:y1="1.044cm" svg:x2="8.514cm" svg:y2="1.543cm"><text:p/></draw:line><draw:line draw:style-name="gr5" draw:text-style-name="P264" svg:x1="10.514cm" svg:y1="1.545cm" svg:x2="8.514cm" svg:y2="1.545cm"><text:p/></draw:line><draw:line draw:style-name="gr11" draw:text-style-name="P264" svg:x1="8.502cm" svg:y1="2.293cm" svg:x2="8.502cm" svg:y2="1.794cm"><text:p/></draw:line><draw:line draw:style-name="gr11" draw:text-style-name="P264" svg:x1="9.514cm" svg:y1="1.794cm" svg:x2="8.502cm" svg:y2="1.794cm"><text:p/></draw:line><draw:line draw:style-name="gr11" draw:text-style-name="P264" svg:x1="9.516cm" svg:y1="1.794cm" svg:x2="9.516cm" svg:y2="2.293cm"><text:p/></draw:line><draw:line draw:style-name="gr11" draw:text-style-name="P264" svg:x1="10.516cm" svg:y1="2.289cm" svg:x2="9.516cm" svg:y2="2.289cm"><text:p/></draw:line><draw:line draw:style-name="gr12" draw:text-style-name="P264" svg:x1="9.502cm" svg:y1="2.543cm" svg:x2="9.502cm" svg:y2="3.044cm"><text:p/></draw:line><draw:line draw:style-name="gr12" draw:text-style-name="P264" svg:x1="10.514cm" svg:y1="2.543cm" svg:x2="9.502cm" svg:y2="2.543cm"><text:p/></draw:line></draw:g></text:p>
      <text:p text:style-name="P25"><text:line-break/><text:line-break/><text:line-break/><text:line-break/><text:line-break/></text:p>
      <text:list xml:id="list33648649" text:continue-numbering="true" text:style-name="L1">
        <text:list-item>
          <text:list>
            <text:list-item>
              <text:h text:style-name="P217" text:outline-level="2"><text:soft-page-break/><text:alphabetical-index-mark-start text:id="IMark100843576"/>MUX_2<text:alphabetical-index-mark-end text:id="IMark100843576"/></text:h>
            </text:list-item>
          </text:list>
        </text:list-item>
      </text:list>
      <text:p text:style-name="P22">Type<text:tab/>Funktion : BOOL</text:p>
      <text:p text:style-name="P22"><text:span text:style-name="T16">Input</text:span><text:tab/>D0 : BOOL (Bit 0)</text:p>
      <text:p text:style-name="P22"><text:tab/>D1 : BOOL (Bit 1)</text:p>
      <text:p text:style-name="P52"><text:tab/>A0 : BOOL (Adresse)</text:p>
      <text:p text:style-name="P25"><draw:frame draw:style-name="fr4" draw:name="Grafik116" text:anchor-type="paragraph" svg:x="1.115cm" svg:y="0.649cm" svg:width="3.18cm" svg:height="2.02cm" draw:z-index="80"><draw:image xlink:href="Pictures/10000000000000F0000000994894E8DB.png" xlink:type="simple" xlink:show="embed" xlink:actuate="onLoad"/></draw:frame>Output<text:tab/>BOOL (D0, wenn A0=0 und D1, wenn A0=1)</text:p>
      <text:p text:style-name="P25"><text:line-break/>MUX_2 ist ein 2-Bit <text:span text:style-name="T16">Multiplexer.</text:span> Der Ausgang entspricht D0, wenn A0=0 und er entspricht D1, wenn A0=1.</text:p>
      <text:p text:style-name="P25">Logische Verknüpfung:<text:tab/><text:tab/>MUX_2 = D0 &amp; /A0 + D1 &amp; A0</text:p>
      <text:p text:style-name="P55"><draw:g text:anchor-type="paragraph" draw:z-index="85" draw:style-name="gr1"><draw:line draw:style-name="gr2" draw:text-style-name="P251" svg:x1="2.309cm" svg:y1="1.598cm" svg:x2="3.059cm" svg:y2="1.598cm"><text:p/></draw:line><draw:line draw:style-name="gr2" draw:text-style-name="P251" svg:x1="3.057cm" svg:y1="1.097cm" svg:x2="3.057cm" svg:y2="1.596cm"><text:p/></draw:line><draw:line draw:style-name="gr2" draw:text-style-name="P251" svg:x1="3.057cm" svg:y1="1.097cm" svg:x2="5.308cm" svg:y2="1.097cm"><text:p/></draw:line><draw:line draw:style-name="gr2" draw:text-style-name="P251" svg:x1="5.309cm" svg:y1="1.596cm" svg:x2="5.309cm" svg:y2="1.097cm"><text:p/></draw:line><draw:line draw:style-name="gr2" draw:text-style-name="P251" svg:x1="6.059cm" svg:y1="1.097cm" svg:x2="6.059cm" svg:y2="1.596cm"><text:p/></draw:line><draw:line draw:style-name="gr2" draw:text-style-name="P251" svg:x1="9.809cm" svg:y1="1.598cm" svg:x2="11.31cm" svg:y2="1.598cm"><text:p/></draw:line><draw:line draw:style-name="gr3" draw:text-style-name="P251" svg:x1="3.309cm" svg:y1="0.098cm" svg:x2="3.309cm" svg:y2="0.597cm"><text:p/></draw:line><draw:line draw:style-name="gr3" draw:text-style-name="P251" svg:x1="2.309cm" svg:y1="0.596cm" svg:x2="3.309cm" svg:y2="0.596cm"><text:p/></draw:line><draw:line draw:style-name="gr3" draw:text-style-name="P251" svg:x1="3.309cm" svg:y1="0.098cm" svg:x2="3.559cm" svg:y2="0.098cm"><text:p/></draw:line><draw:line draw:style-name="gr3" draw:text-style-name="P251" svg:x1="3.556cm" svg:y1="0.597cm" svg:x2="3.556cm" svg:y2="0.098cm"><text:p/></draw:line><draw:line draw:style-name="gr3" draw:text-style-name="P251" svg:x1="3.556cm" svg:y1="0.596cm" svg:x2="6.306cm" svg:y2="0.596cm"><text:p/></draw:line><draw:line draw:style-name="gr3" draw:text-style-name="P251" svg:x1="6.309cm" svg:y1="0.098cm" svg:x2="6.309cm" svg:y2="0.597cm"><text:p/></draw:line><draw:line draw:style-name="gr3" draw:text-style-name="P251" svg:x1="6.309cm" svg:y1="0.098cm" svg:x2="7.309cm" svg:y2="0.098cm"><text:p/></draw:line><draw:line draw:style-name="gr3" draw:text-style-name="P251" svg:x1="7.308cm" svg:y1="0.597cm" svg:x2="7.308cm" svg:y2="0.098cm"><text:p/></draw:line><draw:line draw:style-name="gr3" draw:text-style-name="P251" svg:x1="7.308cm" svg:y1="0.596cm" svg:x2="7.807cm" svg:y2="0.596cm"><text:p/></draw:line><draw:line draw:style-name="gr3" draw:text-style-name="P251" svg:x1="7.807cm" svg:y1="0.098cm" svg:x2="7.807cm" svg:y2="0.597cm"><text:p/></draw:line><draw:line draw:style-name="gr3" draw:text-style-name="P251" svg:x1="7.807cm" svg:y1="0.098cm" svg:x2="8.057cm" svg:y2="0.098cm"><text:p/></draw:line><draw:line draw:style-name="gr3" draw:text-style-name="P251" svg:x1="8.059cm" svg:y1="0.597cm" svg:x2="8.059cm" svg:y2="0.098cm"><text:p/></draw:line><draw:line draw:style-name="gr3" draw:text-style-name="P251" svg:x1="8.059cm" svg:y1="0.596cm" svg:x2="11.31cm" svg:y2="0.596cm"><text:p/></draw:line><draw:frame draw:style-name="gr6" draw:text-style-name="P253" svg:width="0.997cm" svg:height="0.65cm" svg:x="1.559cm" svg:y="1.099cm"><draw:text-box><text:p text:style-name="P252"><text:span text:style-name="T50">D1</text:span></text:p></draw:text-box></draw:frame><draw:frame draw:style-name="gr6" draw:text-style-name="P253" svg:width="0.997cm" svg:height="0.65cm" svg:x="1.559cm" svg:y="0.099cm"><draw:text-box><text:p text:style-name="P252"><text:span text:style-name="T50">D0</text:span></text:p></draw:text-box></draw:frame><draw:line draw:style-name="gr2" draw:text-style-name="P251" svg:x1="6.059cm" svg:y1="1.097cm" svg:x2="9.809cm" svg:y2="1.097cm"><text:p/></draw:line><draw:line draw:style-name="gr2" draw:text-style-name="P251" svg:x1="9.809cm" svg:y1="1.097cm" svg:x2="9.809cm" svg:y2="1.596cm"><text:p/></draw:line><draw:line draw:style-name="gr2" draw:text-style-name="P251" svg:x1="5.309cm" svg:y1="1.598cm" svg:x2="6.059cm" svg:y2="1.598cm"><text:p/></draw:line><draw:line draw:style-name="gr2" draw:text-style-name="P251" svg:x1="2.309cm" svg:y1="2.598cm" svg:x2="6.809cm" svg:y2="2.598cm"><text:p/></draw:line><draw:line draw:style-name="gr2" draw:text-style-name="P251" svg:x1="6.807cm" svg:y1="2.095cm" svg:x2="6.807cm" svg:y2="2.594cm"><text:p/></draw:line><draw:line draw:style-name="gr2" draw:text-style-name="P251" svg:x1="6.807cm" svg:y1="2.095cm" svg:x2="11.308cm" svg:y2="2.095cm"><text:p/></draw:line><draw:frame draw:style-name="gr6" draw:text-style-name="P253" svg:width="0.997cm" svg:height="0.65cm" svg:x="1.559cm" svg:y="2.099cm"><draw:text-box><text:p text:style-name="P252"><text:span text:style-name="T50">A0</text:span></text:p></draw:text-box></draw:frame><draw:line draw:style-name="gr4" draw:text-style-name="P251" svg:x1="3.309cm" svg:y1="3.598cm" svg:x2="3.309cm" svg:y2="3.099cm"><text:p/></draw:line><draw:line draw:style-name="gr4" draw:text-style-name="P251" svg:x1="3.559cm" svg:y1="3.099cm" svg:x2="3.309cm" svg:y2="3.099cm"><text:p/></draw:line><draw:line draw:style-name="gr4" draw:text-style-name="P251" svg:x1="3.556cm" svg:y1="3.099cm" svg:x2="3.556cm" svg:y2="3.598cm"><text:p/></draw:line><draw:line draw:style-name="gr4" draw:text-style-name="P251" svg:x1="6.805cm" svg:y1="3.6cm" svg:x2="3.556cm" svg:y2="3.6cm"><text:p/></draw:line><draw:line draw:style-name="gr4" draw:text-style-name="P251" svg:x1="2.309cm" svg:y1="3.6cm" svg:x2="3.309cm" svg:y2="3.6cm"><text:p/></draw:line><draw:frame draw:style-name="gr6" draw:text-style-name="P253" svg:width="0.997cm" svg:height="0.65cm" svg:x="1.559cm" svg:y="3.099cm"><draw:text-box><text:p text:style-name="P252"><text:span text:style-name="T50">Q</text:span></text:p></draw:text-box></draw:frame><draw:line draw:style-name="gr4" draw:text-style-name="P251" svg:x1="6.807cm" svg:y1="3.099cm" svg:x2="6.807cm" svg:y2="3.598cm"><text:p/></draw:line><draw:line draw:style-name="gr4" draw:text-style-name="P251" svg:x1="7.308cm" svg:y1="3.099cm" svg:x2="6.807cm" svg:y2="3.099cm"><text:p/></draw:line><draw:line draw:style-name="gr4" draw:text-style-name="P251" svg:x1="7.308cm" svg:y1="3.099cm" svg:x2="7.308cm" svg:y2="3.598cm"><text:p/></draw:line><draw:line draw:style-name="gr4" draw:text-style-name="P251" svg:x1="7.807cm" svg:y1="3.6cm" svg:x2="7.308cm" svg:y2="3.6cm"><text:p/></draw:line><draw:line draw:style-name="gr4" draw:text-style-name="P251" svg:x1="7.807cm" svg:y1="3.598cm" svg:x2="7.807cm" svg:y2="3.099cm"><text:p/></draw:line><draw:line draw:style-name="gr4" draw:text-style-name="P251" svg:x1="8.057cm" svg:y1="3.099cm" svg:x2="7.807cm" svg:y2="3.099cm"><text:p/></draw:line><draw:line draw:style-name="gr4" draw:text-style-name="P251" svg:x1="8.059cm" svg:y1="3.099cm" svg:x2="8.059cm" svg:y2="3.598cm"><text:p/></draw:line><draw:line draw:style-name="gr4" draw:text-style-name="P251" svg:x1="11.31cm" svg:y1="3.6cm" svg:x2="8.059cm" svg:y2="3.6cm"><text:p/></draw:line></draw:g></text:p>
      <text:list xml:id="list33653548" text:continue-numbering="true" text:style-name="L1">
        <text:list-item>
          <text:list>
            <text:list-item>
              <text:h text:style-name="P217" text:outline-level="2"><text:alphabetical-index-mark-start text:id="IMark100843576"/>MUX_4<text:alphabetical-index-mark-end text:id="IMark100843576"/></text:h>
            </text:list-item>
          </text:list>
        </text:list-item>
      </text:list>
      <text:p text:style-name="P22">Type<text:tab/>Funktion : BOOL</text:p>
      <text:p text:style-name="P22"><text:span text:style-name="T16">Input</text:span><text:tab/>D0 : BOOL (Eingang 0)</text:p>
      <text:p text:style-name="P22"><text:tab/>D1 : BOOL (Eingang 1)</text:p>
      <text:p text:style-name="P22"><text:tab/>D2 : BOOL (Eingang 2)</text:p>
      <text:p text:style-name="P22"><text:tab/>D3 : BOOL (Eingang 3)</text:p>
      <text:p text:style-name="P55"><draw:frame draw:style-name="fr4" draw:name="Grafik117" text:anchor-type="paragraph" svg:x="1.092cm" svg:y="0.64cm" svg:width="3.18cm" svg:height="3.371cm" draw:z-index="81"><draw:image xlink:href="Pictures/10000000000000F0000000FF27105534.png" xlink:type="simple" xlink:show="embed" xlink:actuate="onLoad"/></draw:frame>Output<text:tab/>BOOL (D0, wenn A0=0 und A1 = 0, usw...)</text:p>
      <text:p text:style-name="P25"><text:soft-page-break/><text:line-break/>MUX_4 ist ein 4-Bit <text:span text:style-name="T16">Multiplexer.</text:span> Der Ausgang entspricht D0, wenn A0=0 und A1=0. Er entspricht D3, wenn A0=1 und A1=1.</text:p>
      <text:p text:style-name="P25">Logische Verknüpfung:<text:tab/><text:tab/>MUX_4 <text:s/>= <text:tab/>D0 &amp; /A0 &amp; /A1 + D1 &amp; A0 &amp; /A1</text:p>
      <text:p text:style-name="P55"><text:tab/><text:tab/><text:tab/><text:tab/>+ D2 &amp; /A0 &amp; A1 + D3 &amp; A0 &amp; A1</text:p>
      <text:p text:style-name="P25"/>
      <text:p text:style-name="P25"><draw:g text:anchor-type="paragraph" draw:z-index="86" draw:style-name="gr1"><draw:line draw:style-name="gr13" draw:text-style-name="P251" svg:x1="2.152cm" svg:y1="1.693cm" svg:x2="2.902cm" svg:y2="1.693cm"><text:p/></draw:line><draw:line draw:style-name="gr13" draw:text-style-name="P251" svg:x1="2.9cm" svg:y1="1.194cm" svg:x2="2.9cm" svg:y2="1.693cm"><text:p/></draw:line><draw:line draw:style-name="gr13" draw:text-style-name="P251" svg:x1="2.9cm" svg:y1="1.194cm" svg:x2="5.151cm" svg:y2="1.194cm"><text:p/></draw:line><draw:line draw:style-name="gr13" draw:text-style-name="P251" svg:x1="5.152cm" svg:y1="1.693cm" svg:x2="5.152cm" svg:y2="1.194cm"><text:p/></draw:line><draw:line draw:style-name="gr13" draw:text-style-name="P251" svg:x1="5.902cm" svg:y1="1.194cm" svg:x2="5.902cm" svg:y2="1.693cm"><text:p/></draw:line><draw:line draw:style-name="gr13" draw:text-style-name="P251" svg:x1="9.652cm" svg:y1="1.693cm" svg:x2="11.153cm" svg:y2="1.693cm"><text:p/></draw:line><draw:line draw:style-name="gr3" draw:text-style-name="P251" svg:x1="3.152cm" svg:y1="0.194cm" svg:x2="3.152cm" svg:y2="0.693cm"><text:p/></draw:line><draw:line draw:style-name="gr3" draw:text-style-name="P251" svg:x1="2.152cm" svg:y1="0.693cm" svg:x2="3.152cm" svg:y2="0.693cm"><text:p/></draw:line><draw:line draw:style-name="gr3" draw:text-style-name="P251" svg:x1="3.152cm" svg:y1="0.194cm" svg:x2="3.402cm" svg:y2="0.194cm"><text:p/></draw:line><draw:line draw:style-name="gr3" draw:text-style-name="P251" svg:x1="3.399cm" svg:y1="0.693cm" svg:x2="3.399cm" svg:y2="0.194cm"><text:p/></draw:line><draw:line draw:style-name="gr3" draw:text-style-name="P251" svg:x1="3.399cm" svg:y1="0.693cm" svg:x2="6.149cm" svg:y2="0.693cm"><text:p/></draw:line><draw:line draw:style-name="gr3" draw:text-style-name="P251" svg:x1="6.152cm" svg:y1="0.194cm" svg:x2="6.152cm" svg:y2="0.693cm"><text:p/></draw:line><draw:line draw:style-name="gr3" draw:text-style-name="P251" svg:x1="6.152cm" svg:y1="0.194cm" svg:x2="7.152cm" svg:y2="0.194cm"><text:p/></draw:line><draw:line draw:style-name="gr3" draw:text-style-name="P251" svg:x1="7.151cm" svg:y1="0.693cm" svg:x2="7.151cm" svg:y2="0.194cm"><text:p/></draw:line><draw:line draw:style-name="gr3" draw:text-style-name="P251" svg:x1="7.151cm" svg:y1="0.693cm" svg:x2="7.65cm" svg:y2="0.693cm"><text:p/></draw:line><draw:line draw:style-name="gr3" draw:text-style-name="P251" svg:x1="7.65cm" svg:y1="0.194cm" svg:x2="7.65cm" svg:y2="0.693cm"><text:p/></draw:line><draw:line draw:style-name="gr3" draw:text-style-name="P251" svg:x1="7.65cm" svg:y1="0.194cm" svg:x2="7.9cm" svg:y2="0.194cm"><text:p/></draw:line><draw:line draw:style-name="gr3" draw:text-style-name="P251" svg:x1="7.902cm" svg:y1="0.693cm" svg:x2="7.902cm" svg:y2="0.194cm"><text:p/></draw:line><draw:line draw:style-name="gr3" draw:text-style-name="P251" svg:x1="7.902cm" svg:y1="0.693cm" svg:x2="11.153cm" svg:y2="0.693cm"><text:p/></draw:line><draw:frame draw:style-name="gr6" draw:text-style-name="P253" svg:width="0.997cm" svg:height="0.65cm" svg:x="1.402cm" svg:y="1.194cm"><draw:text-box><text:p text:style-name="P252"><text:span text:style-name="T50">D1</text:span></text:p></draw:text-box></draw:frame><draw:frame draw:style-name="gr6" draw:text-style-name="P253" svg:width="0.997cm" svg:height="0.65cm" svg:x="1.402cm" svg:y="0.194cm"><draw:text-box><text:p text:style-name="P252"><text:span text:style-name="T50">D0</text:span></text:p></draw:text-box></draw:frame><draw:line draw:style-name="gr13" draw:text-style-name="P251" svg:x1="5.902cm" svg:y1="1.194cm" svg:x2="9.652cm" svg:y2="1.194cm"><text:p/></draw:line><draw:line draw:style-name="gr13" draw:text-style-name="P251" svg:x1="9.652cm" svg:y1="1.194cm" svg:x2="9.652cm" svg:y2="1.693cm"><text:p/></draw:line><draw:line draw:style-name="gr13" draw:text-style-name="P251" svg:x1="5.152cm" svg:y1="1.693cm" svg:x2="5.902cm" svg:y2="1.693cm"><text:p/></draw:line><draw:line draw:style-name="gr2" draw:text-style-name="P251" svg:x1="2.152cm" svg:y1="4.591cm" svg:x2="6.652cm" svg:y2="4.591cm"><text:p/></draw:line><draw:line draw:style-name="gr2" draw:text-style-name="P251" svg:x1="6.65cm" svg:y1="4.09cm" svg:x2="6.65cm" svg:y2="4.591cm"><text:p/></draw:line><draw:line draw:style-name="gr2" draw:text-style-name="P251" svg:x1="6.65cm" svg:y1="4.09cm" svg:x2="11.151cm" svg:y2="4.09cm"><text:p/></draw:line><draw:frame draw:style-name="gr6" draw:text-style-name="P253" svg:width="0.997cm" svg:height="0.65cm" svg:x="1.402cm" svg:y="4.09cm"><draw:text-box><text:p text:style-name="P252"><text:span text:style-name="T50">A0</text:span></text:p></draw:text-box></draw:frame><draw:line draw:style-name="gr4" draw:text-style-name="P251" svg:x1="3.152cm" svg:y1="6.443cm" svg:x2="3.152cm" svg:y2="5.944cm"><text:p/></draw:line><draw:line draw:style-name="gr4" draw:text-style-name="P251" svg:x1="3.402cm" svg:y1="5.944cm" svg:x2="3.152cm" svg:y2="5.944cm"><text:p/></draw:line><draw:line draw:style-name="gr4" draw:text-style-name="P251" svg:x1="3.399cm" svg:y1="5.944cm" svg:x2="3.399cm" svg:y2="6.443cm"><text:p/></draw:line><draw:line draw:style-name="gr4" draw:text-style-name="P251" svg:x1="4.65cm" svg:y1="6.443cm" svg:x2="3.399cm" svg:y2="6.443cm"><text:p/></draw:line><draw:line draw:style-name="gr4" draw:text-style-name="P251" svg:x1="2.152cm" svg:y1="6.443cm" svg:x2="3.152cm" svg:y2="6.443cm"><text:p/></draw:line><draw:frame draw:style-name="gr6" draw:text-style-name="P253" svg:width="0.997cm" svg:height="0.65cm" svg:x="1.402cm" svg:y="5.944cm"><draw:text-box><text:p text:style-name="P252"><text:span text:style-name="T50">Q</text:span></text:p></draw:text-box></draw:frame><draw:line draw:style-name="gr4" draw:text-style-name="P251" svg:x1="4.653cm" svg:y1="5.944cm" svg:x2="4.653cm" svg:y2="6.443cm"><text:p/></draw:line><draw:line draw:style-name="gr4" draw:text-style-name="P251" svg:x1="5.902cm" svg:y1="6.443cm" svg:x2="5.152cm" svg:y2="6.443cm"><text:p/></draw:line><draw:line draw:style-name="gr4" draw:text-style-name="P251" svg:x1="5.902cm" svg:y1="5.944cm" svg:x2="5.902cm" svg:y2="6.443cm"><text:p/></draw:line><draw:line draw:style-name="gr4" draw:text-style-name="P251" svg:x1="6.652cm" svg:y1="5.944cm" svg:x2="5.902cm" svg:y2="5.944cm"><text:p/></draw:line><draw:line draw:style-name="gr4" draw:text-style-name="P251" svg:x1="7.65cm" svg:y1="6.443cm" svg:x2="7.65cm" svg:y2="5.944cm"><text:p/></draw:line><draw:line draw:style-name="gr4" draw:text-style-name="P251" svg:x1="8.65cm" svg:y1="5.944cm" svg:x2="7.65cm" svg:y2="5.944cm"><text:p/></draw:line><draw:line draw:style-name="gr4" draw:text-style-name="P251" svg:x1="8.652cm" svg:y1="5.944cm" svg:x2="8.652cm" svg:y2="6.443cm"><text:p/></draw:line><draw:line draw:style-name="gr4" draw:text-style-name="P251" svg:x1="9.153cm" svg:y1="6.443cm" svg:x2="8.652cm" svg:y2="6.443cm"><text:p/></draw:line><draw:line draw:style-name="gr5" draw:text-style-name="P251" svg:x1="2.152cm" svg:y1="2.693cm" svg:x2="7.652cm" svg:y2="2.693cm"><text:p/></draw:line><draw:line draw:style-name="gr5" draw:text-style-name="P251" svg:x1="7.65cm" svg:y1="2.194cm" svg:x2="7.65cm" svg:y2="2.693cm"><text:p/></draw:line><draw:line draw:style-name="gr5" draw:text-style-name="P251" svg:x1="8.65cm" svg:y1="2.194cm" svg:x2="7.65cm" svg:y2="2.194cm"><text:p/></draw:line><draw:line draw:style-name="gr5" draw:text-style-name="P251" svg:x1="8.652cm" svg:y1="2.194cm" svg:x2="8.652cm" svg:y2="2.693cm"><text:p/></draw:line><draw:line draw:style-name="gr5" draw:text-style-name="P251" svg:x1="11.153cm" svg:y1="2.693cm" svg:x2="8.652cm" svg:y2="2.693cm"><text:p/></draw:line><draw:line draw:style-name="gr11" draw:text-style-name="P251" svg:x1="8.403cm" svg:y1="3.693cm" svg:x2="8.403cm" svg:y2="3.194cm"><text:p/></draw:line><draw:line draw:style-name="gr11" draw:text-style-name="P251" svg:x1="11.153cm" svg:y1="3.194cm" svg:x2="8.403cm" svg:y2="3.194cm"><text:p/></draw:line><draw:line draw:style-name="gr11" draw:text-style-name="P251" svg:x1="2.152cm" svg:y1="3.694cm" svg:x2="8.403cm" svg:y2="3.694cm"><text:p/></draw:line><draw:line draw:style-name="gr12" draw:text-style-name="P251" svg:x1="2.152cm" svg:y1="5.443cm" svg:x2="4.653cm" svg:y2="5.443cm"><text:p/></draw:line><draw:line draw:style-name="gr12" draw:text-style-name="P251" svg:x1="4.653cm" svg:y1="4.944cm" svg:x2="4.653cm" svg:y2="5.443cm"><text:p/></draw:line><draw:line draw:style-name="gr12" draw:text-style-name="P251" svg:x1="9.153cm" svg:y1="4.944cm" svg:x2="4.653cm" svg:y2="4.944cm"><text:p/></draw:line><draw:line draw:style-name="gr12" draw:text-style-name="P251" svg:x1="9.153cm" svg:y1="4.944cm" svg:x2="9.153cm" svg:y2="5.443cm"><text:p/></draw:line><draw:line draw:style-name="gr12" draw:text-style-name="P251" svg:x1="11.153cm" svg:y1="5.443cm" svg:x2="9.153cm" svg:y2="5.443cm"><text:p/></draw:line><draw:frame draw:style-name="gr6" draw:text-style-name="P253" svg:width="0.997cm" svg:height="0.65cm" svg:x="1.402cm" svg:y="3.09cm"><draw:text-box><text:p text:style-name="P252"><text:span text:style-name="T50">D3</text:span></text:p></draw:text-box></draw:frame><draw:frame draw:style-name="gr6" draw:text-style-name="P253" svg:width="0.997cm" svg:height="0.65cm" svg:x="1.402cm" svg:y="2.09cm"><draw:text-box><text:p text:style-name="P252"><text:span text:style-name="T50">D2</text:span></text:p></draw:text-box></draw:frame><draw:frame draw:style-name="gr6" draw:text-style-name="P253" svg:width="0.997cm" svg:height="0.65cm" svg:x="1.402cm" svg:y="4.944cm"><draw:text-box><text:p text:style-name="P252"><text:span text:style-name="T50">A1</text:span></text:p></draw:text-box></draw:frame><draw:line draw:style-name="gr4" draw:text-style-name="P251" svg:x1="9.153cm" svg:y1="6.443cm" svg:x2="9.153cm" svg:y2="5.944cm"><text:p/></draw:line><draw:line draw:style-name="gr4" draw:text-style-name="P251" svg:x1="11.153cm" svg:y1="5.944cm" svg:x2="9.153cm" svg:y2="5.944cm"><text:p/></draw:line><draw:line draw:style-name="gr4" draw:text-style-name="P251" svg:x1="5.152cm" svg:y1="5.944cm" svg:x2="5.152cm" svg:y2="6.443cm"><text:p/></draw:line><draw:line draw:style-name="gr4" draw:text-style-name="P251" svg:x1="6.65cm" svg:y1="5.944cm" svg:x2="6.65cm" svg:y2="6.443cm"><text:p/></draw:line><draw:line draw:style-name="gr4" draw:text-style-name="P251" svg:x1="4.653cm" svg:y1="5.944cm" svg:x2="5.152cm" svg:y2="5.944cm"><text:p/></draw:line><draw:line draw:style-name="gr4" draw:text-style-name="P251" svg:x1="6.65cm" svg:y1="6.443cm" svg:x2="7.65cm" svg:y2="6.443cm"><text:p/></draw:line></draw:g></text:p>
      <text:list xml:id="list33632295" text:continue-numbering="true" text:style-name="L1">
        <text:list-item>
          <text:list>
            <text:list-item>
              <text:h text:style-name="P217" text:outline-level="2"><text:alphabetical-index-mark-start text:id="IMark100843576"/>PARITY<text:alphabetical-index-mark-end text:id="IMark100843576"/></text:h>
            </text:list-item>
          </text:list>
        </text:list-item>
      </text:list>
      <text:p text:style-name="P22">Type<text:tab/>Funktion : BOOL</text:p>
      <text:p text:style-name="P22"><text:span text:style-name="T16">Input</text:span><text:tab/>IN : BYTE (Eingangs BYTE)</text:p>
      <text:p text:style-name="P25"><draw:frame draw:style-name="fr4" draw:name="Grafik118" text:anchor-type="paragraph" svg:x="1.071cm" svg:y="0.679cm" svg:width="2.731cm" svg:height="1.12cm" draw:z-index="82"><draw:image xlink:href="Pictures/10000000000000CE00000055FB83BF65.png" xlink:type="simple" xlink:show="embed" xlink:actuate="onLoad"/></draw:frame>Output<text:tab/>BOOL (Ausgang ist TRUE, wenn Parität gerade ist)</text:p>
      <text:p text:style-name="P25"><text:line-break/>PARITY bildet eine gerade Parität über das Eingangsbyte IN. Der Ausgang ist TRUE wenn die Anzahl der TRUE Bits im Byte (In) ungerade ist.</text:p>
      <text:list xml:id="list33628446" text:continue-numbering="true" text:style-name="L1">
        <text:list-item>
          <text:list>
            <text:list-item>
              <text:h text:style-name="P217" text:outline-level="2"><text:soft-page-break/><text:alphabetical-index-mark-start text:id="IMark100843576"/>REAL_TO_DW<text:alphabetical-index-mark-end text:id="IMark100843576"/></text:h>
            </text:list-item>
          </text:list>
        </text:list-item>
      </text:list>
      <text:p text:style-name="P22">Type<text:tab/>Funktion : DWORD</text:p>
      <text:p text:style-name="P22"><text:span text:style-name="T16">Input</text:span><text:tab/>IN : REAL (Eingang)</text:p>
      <text:p text:style-name="P25"><draw:frame draw:style-name="fr4" draw:name="Grafik551" text:anchor-type="paragraph" svg:x="1.046cm" svg:y="0.667cm" svg:width="5.42cm" svg:height="1.12cm" draw:z-index="591"><draw:image xlink:href="Pictures/100000000000019A0000005543E02C22.png" xlink:type="simple" xlink:show="embed" xlink:actuate="onLoad"/></draw:frame>Output<text:tab/>DWORD (Ausgangswert)</text:p>
      <text:p text:style-name="P55"><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 Ganzzahl und Rundet an der kleinsten Stelle des DWORD.</text:p>
      <text:list xml:id="list33629885" text:continue-numbering="true" text:style-name="L1">
        <text:list-item>
          <text:list>
            <text:list-item>
              <text:h text:style-name="P217" text:outline-level="2"><text:alphabetical-index-mark-start text:id="IMark100843576"/>REVERSE<text:alphabetical-index-mark-end text:id="IMark100843576"/></text:h>
            </text:list-item>
          </text:list>
        </text:list-item>
      </text:list>
      <text:p text:style-name="P22">Type<text:tab/>Funktion : BYTE</text:p>
      <text:p text:style-name="P22"><text:span text:style-name="T16">Input</text:span><text:tab/>IN : BYTE (Eingangs BYTE)</text:p>
      <text:p text:style-name="P25"><draw:frame draw:style-name="fr4" draw:name="Grafik216" text:anchor-type="paragraph" svg:x="1.023cm" svg:y="0.676cm" svg:width="3.69cm" svg:height="0.99cm" draw:z-index="324"><draw:image xlink:href="Pictures/10000000000001170000004B1522CB51.png" xlink:type="simple" xlink:show="embed" xlink:actuate="onLoad"/></draw:frame>Output<text:tab/>BYTE(Ausgangs Byte)</text:p>
      <text:p text:style-name="P25"><text:line-break/>REVERSE dreht die Reihenfolge der Bits in einem Byte um. Bit7 von IN wird zu Bit 0, Bit 6 wird zu Bit 1 usw.</text:p>
      <text:p text:style-name="P55">Beispiel:<text:tab/>REVERSE(10011110) = 01111001</text:p>
      <text:p text:style-name="P55"/>
      <text:p text:style-name="P55"/>
      <text:p text:style-name="P55"/>
      <text:list xml:id="list33655950" text:continue-numbering="true" text:style-name="L1">
        <text:list-item>
          <text:list>
            <text:list-item>
              <text:h text:style-name="P217" text:outline-level="2"><text:soft-page-break/><text:alphabetical-index-mark-start text:id="IMark100843576"/>SHL1<text:alphabetical-index-mark-end text:id="IMark100843576"/></text:h>
            </text:list-item>
          </text:list>
        </text:list-item>
      </text:list>
      <text:p text:style-name="P22">Type<text:tab/>Funktion : DWORD</text:p>
      <text:p text:style-name="P22"><text:span text:style-name="T16">Input</text:span><text:tab/>IN : DWORD (Eingangsdaten)</text:p>
      <text:p text:style-name="P52"><text:tab/>N : INT (Anzahl der zu schiebenden Bits)</text:p>
      <text:p text:style-name="P25">Output<text:tab/>DWORD (Ergebnis)</text:p>
      <text:p text:style-name="P25"><draw:frame draw:style-name="fr4" draw:name="Grafik318" text:anchor-type="paragraph" svg:x="1.037cm" svg:y="0.03cm" svg:width="2.499cm" svg:height="1.39cm" draw:z-index="294"><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55">Beispiel:<text:tab/>SHL1(11110000,2) ergibt 11000011</text:p>
      <text:list xml:id="list33633943" text:continue-numbering="true" text:style-name="L1">
        <text:list-item>
          <text:list>
            <text:list-item>
              <text:h text:style-name="P217" text:outline-level="2"><text:alphabetical-index-mark-start text:id="IMark100843576"/>SHR1<text:alphabetical-index-mark-end text:id="IMark100843576"/></text:h>
            </text:list-item>
          </text:list>
        </text:list-item>
      </text:list>
      <text:p text:style-name="P22">Type<text:tab/>Funktion : DWORD</text:p>
      <text:p text:style-name="P22"><text:span text:style-name="T16">Input</text:span><text:tab/>IN : DWORD (Eingangsdaten)</text:p>
      <text:p text:style-name="P52"><text:tab/>N : INT (Anzahl der zu schiebenden Bits)</text:p>
      <text:p text:style-name="P25"><draw:frame draw:style-name="fr4" draw:name="Grafik319" text:anchor-type="paragraph" svg:x="1.09cm" svg:y="0.686cm" svg:width="2.499cm" svg:height="1.39cm" draw:z-index="295"><draw:image xlink:href="Pictures/10000000000000BD0000006989192CEB.png" xlink:type="simple" xlink:show="embed" xlink:actuate="onLoad"/></draw:frame>Output<text:tab/>DWORD (Ergebnis)</text:p>
      <text:p text:style-name="P25"><text:line-break/>SHR1 schiebt das Eingangs DWORD um N Bits nach Rechts und füllt die N linken Bits mit 1en auf. Im Gegensatz zur IEC Standard Funktion SHL die beim Schieben mit Nullen aufgefüllt wird bei SHR1 mit Einsen Aufgefüllt.</text:p>
      <text:p text:style-name="P55">Beispiel:<text:tab/>SHR1(11110000,2) ergibt 11111100</text:p>
      <text:list xml:id="list33630164" text:continue-numbering="true" text:style-name="L1">
        <text:list-item>
          <text:list>
            <text:list-item>
              <text:h text:style-name="P217" text:outline-level="2"><text:soft-page-break/><text:alphabetical-index-mark-start text:id="IMark100843576"/>SWAP_BYTE<text:alphabetical-index-mark-end text:id="IMark100843576"/></text:h>
            </text:list-item>
          </text:list>
        </text:list-item>
      </text:list>
      <text:p text:style-name="P22">Type<text:tab/>Funktion : WORD</text:p>
      <text:p text:style-name="P22"><text:span text:style-name="T16">Input</text:span><text:tab/>IN : WORD (Eingangsdaten)</text:p>
      <text:p text:style-name="P55"><draw:frame draw:style-name="fr4" draw:name="Grafik447" text:anchor-type="paragraph" svg:x="1.046cm" svg:y="0.688cm" svg:width="4.521cm" svg:height="1.12cm" draw:z-index="449"><draw:image xlink:href="Pictures/10000000000001560000005500DC9585.png" xlink:type="simple" xlink:show="embed" xlink:actuate="onLoad"/></draw:frame>Output<text:tab/>WORD (Ergebnis)</text:p>
      <text:p text:style-name="P55"><text:line-break/>SWAP_BYTE tauscht das <text:span text:style-name="T16">High</text:span> und <text:span text:style-name="T16">Low</text:span> Byte in einem WORD.</text:p>
      <text:p text:style-name="P55">Beispiel:<text:tab/>SWAP_BYTE(16#33df) = 16#df33.</text:p>
      <text:list xml:id="list33636635" text:continue-numbering="true" text:style-name="L1">
        <text:list-item>
          <text:list>
            <text:list-item>
              <text:h text:style-name="P217" text:outline-level="2"><text:alphabetical-index-mark-start text:id="IMark100843576"/>SWAP_BYTE2<text:alphabetical-index-mark-end text:id="IMark100843576"/></text:h>
            </text:list-item>
          </text:list>
        </text:list-item>
      </text:list>
      <text:p text:style-name="P22">Type<text:tab/>Funktion : DWORD</text:p>
      <text:p text:style-name="P22"><text:span text:style-name="T16">Input</text:span><text:tab/>IN : DWORD (Eingangsdaten)</text:p>
      <text:p text:style-name="P55"><draw:frame draw:style-name="fr4" draw:name="Grafik448" text:anchor-type="paragraph" svg:x="1.025cm" svg:y="0.663cm" svg:width="4.521cm" svg:height="1.12cm" draw:z-index="450"><draw:image xlink:href="Pictures/1000000000000156000000552E0061EF.png" xlink:type="simple" xlink:show="embed" xlink:actuate="onLoad"/></draw:frame>Output<text:tab/>DWORD (Ergebnis)</text:p>
      <text:p text:style-name="P55"><text:line-break/>SWAP_BYTE2 kehrt die Reihenfolge der Bytes in einem DWORD um.</text:p>
      <text:p text:style-name="P55">Beispiel:<text:tab/>SWAP_BYTE2(16#33df1122) = 16#2211df33.</text:p>
      <text:p text:style-name="P55"/>
      <text:p text:style-name="P55"/>
      <text:p text:style-name="P55"/>
      <text:p text:style-name="P55"/>
      <text:p text:style-name="P55"/>
      <text:p text:style-name="P55"/>
      <text:list xml:id="list33635724" text:continue-numbering="true" text:style-name="L1">
        <text:list-item>
          <text:list>
            <text:list-item>
              <text:h text:style-name="P217" text:outline-level="2"><text:soft-page-break/><text:alphabetical-index-mark-start text:id="IMark100843576"/>WORD_OF_BYTE<text:alphabetical-index-mark-end text:id="IMark100843576"/></text:h>
            </text:list-item>
          </text:list>
        </text:list-item>
      </text:list>
      <text:p text:style-name="P22">Type<text:tab/>Funktion : WORD</text:p>
      <text:p text:style-name="P25"><text:span text:style-name="T16">Input</text:span><text:tab/>B1 : Byte (Eingangs Byte 1)</text:p>
      <text:p text:style-name="P25"><text:tab/>B0 : Byte (Eingangs Byte 0)</text:p>
      <text:p text:style-name="P25"><draw:frame draw:style-name="fr4" draw:name="Grafik214" text:anchor-type="paragraph" svg:x="1.046cm" svg:y="0.63cm" svg:width="6.32cm" svg:height="1.57cm" draw:z-index="565"><draw:image xlink:href="Pictures/10000000000001DE0000007777BC1C51.png" xlink:type="simple" xlink:show="embed" xlink:actuate="onLoad"/></draw:frame>Output<text:tab/>Word (Ergebnis Word)</text:p>
      <text:p text:style-name="P25"><text:line-break/>WORD_OF_BYTE setzt aus 2 separaten Bytes B0 und B1 ein Word zusammen.</text:p>
      <text:list xml:id="list33653225" text:continue-numbering="true" text:style-name="L1">
        <text:list-item>
          <text:list>
            <text:list-item>
              <text:h text:style-name="P217" text:outline-level="2"><text:alphabetical-index-mark-start text:id="IMark100843576"/>WORD_OF_DWORD<text:alphabetical-index-mark-end text:id="IMark100843576"/></text:h>
            </text:list-item>
          </text:list>
        </text:list-item>
      </text:list>
      <text:p text:style-name="P22">Type<text:tab/>Funktion : WORD</text:p>
      <text:p text:style-name="P22"><text:span text:style-name="T16">Input</text:span><text:tab/>IN : DWORD (Eingangs DWORD)</text:p>
      <text:p text:style-name="P25"><draw:frame draw:style-name="fr4" draw:name="Grafik213" text:anchor-type="paragraph" svg:x="1.046cm" svg:y="0.619cm" svg:width="5.87cm" svg:height="1.57cm" draw:z-index="185"><draw:image xlink:href="Pictures/10000000000001BC000000779250AF5E.png" xlink:type="simple" xlink:show="embed" xlink:actuate="onLoad"/></draw:frame>Output<text:tab/>WORD (Ausgangs WORD)</text:p>
      <text:p text:style-name="P25"><text:line-break/>WORD_OF_DWORD extrahiert ein Word (W0 .. W1) aus einem DWORD.</text:p>
      <text:list xml:id="list33624201" text:continue-numbering="true" text:style-name="L1">
        <text:list-item>
          <text:h text:style-name="P211" text:outline-level="1"><text:span text:style-name="T29">Latches</text:span><text:span text:style-name="T28">, Flip-Flop</text:span> und Schieberegister</text:h>
        </text:list-item>
      </text:list>
      <text:p text:style-name="P20"/>
      <text:list xml:id="list336505701" text:continue-numbering="true" text:style-name="L1">
        <text:list-item>
          <text:list>
            <text:list-item>
              <text:h text:style-name="P217" text:outline-level="2"><text:alphabetical-index-mark-start text:id="IMark100843576"/>COUNT_BR<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IN : BYTE (Vorgabewert für Set)</text:p>
      <text:p text:style-name="P22"><text:tab/>UP : BOOL (Vorwärts Schalter flankengetriggert)</text:p>
      <text:p text:style-name="P22"><text:tab/>DN : BOOL (Rückwärts Schalter flankengetriggert)</text:p>
      <text:p text:style-name="P52"><text:tab/>STEP : BYTE (Schrittweite des <text:span text:style-name="T16">Counters</text:span>)</text:p>
      <text:p text:style-name="P52"><text:tab/>MX : BYTE (Maximalwert des <text:span text:style-name="T16">Counters</text:span>)</text:p>
      <text:p text:style-name="P22"><text:tab/>RST : BOOL (asynchroner Reset)</text:p>
      <text:p text:style-name="P25"><draw:frame draw:style-name="fr4" draw:name="Grafik437" text:anchor-type="paragraph" svg:x="1.046cm" svg:y="0.667cm" svg:width="2.499cm" svg:height="3.5cm" draw:z-index="441"><draw:image xlink:href="Pictures/10000000000000BD0000010999EB8796.png" xlink:type="simple" xlink:show="embed" xlink:actuate="onLoad"/></draw:frame>Output<text:tab/>CNT : BYTE (Ausgang)</text:p>
      <text:p text:style-name="P55"><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2"/>
          </table:table-cell>
          <table:table-cell table:style-name="Tabelle29.A1" office:value-type="string">
            <text:p text:style-name="P122">SET</text:p>
          </table:table-cell>
          <table:table-cell table:style-name="Tabelle29.A1" office:value-type="string">
            <text:p text:style-name="P122">IN</text:p>
          </table:table-cell>
          <table:table-cell table:style-name="Tabelle29.A1" office:value-type="string">
            <text:p text:style-name="P122">UP</text:p>
          </table:table-cell>
          <table:table-cell table:style-name="Tabelle29.A1" office:value-type="string">
            <text:p text:style-name="P122">DN</text:p>
          </table:table-cell>
          <table:table-cell table:style-name="Tabelle29.A1" office:value-type="string">
            <text:p text:style-name="P122">STEP</text:p>
          </table:table-cell>
          <table:table-cell table:style-name="Tabelle29.A1" office:value-type="string">
            <text:p text:style-name="P122">RST</text:p>
          </table:table-cell>
          <table:table-cell table:style-name="Tabelle29.H1" office:value-type="string">
            <text:p text:style-name="P122">CNT</text:p>
          </table:table-cell>
        </table:table-row>
        <table:table-row>
          <table:table-cell table:style-name="Tabelle29.A2" office:value-type="string">
            <text:p text:style-name="P131">Reset</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1</text:p>
          </table:table-cell>
          <table:table-cell table:style-name="Tabelle29.H2" office:value-type="string">
            <text:p text:style-name="P122">0</text:p>
          </table:table-cell>
        </table:table-row>
        <table:table-row>
          <table:table-cell table:style-name="Tabelle29.A2" office:value-type="string">
            <text:p text:style-name="P122">Set</text:p>
          </table:table-cell>
          <table:table-cell table:style-name="Tabelle29.A2" office:value-type="string">
            <text:p text:style-name="P122">1</text:p>
          </table:table-cell>
          <table:table-cell table:style-name="Tabelle29.A2" office:value-type="string">
            <text:p text:style-name="P122">N</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0</text:p>
          </table:table-cell>
          <table:table-cell table:style-name="Tabelle29.H2" office:value-type="string">
            <text:p text:style-name="P122">N</text:p>
          </table:table-cell>
        </table:table-row>
        <text:soft-page-break/>
        <table:table-row>
          <table:table-cell table:style-name="Tabelle29.A2" office:value-type="string">
            <text:p text:style-name="P122">up</text:p>
          </table:table-cell>
          <table:table-cell table:style-name="Tabelle29.A2" office:value-type="string">
            <text:p text:style-name="P122">0</text:p>
          </table:table-cell>
          <table:table-cell table:style-name="Tabelle29.A2" office:value-type="string">
            <text:p text:style-name="P122">-</text:p>
          </table:table-cell>
          <table:table-cell table:style-name="Tabelle29.A2" office:value-type="string">
            <text:p text:style-name="P133">↑</text:p>
          </table:table-cell>
          <table:table-cell table:style-name="Tabelle29.A2" office:value-type="string">
            <text:p text:style-name="P122">0</text:p>
          </table:table-cell>
          <table:table-cell table:style-name="Tabelle29.A2" office:value-type="string">
            <text:p text:style-name="P122">N</text:p>
          </table:table-cell>
          <table:table-cell table:style-name="Tabelle29.A2" office:value-type="string">
            <text:p text:style-name="P122">0</text:p>
          </table:table-cell>
          <table:table-cell table:style-name="Tabelle29.H2" office:value-type="string">
            <text:p text:style-name="P122">CNT + N</text:p>
          </table:table-cell>
        </table:table-row>
        <table:table-row>
          <table:table-cell table:style-name="Tabelle29.A2" office:value-type="string">
            <text:p text:style-name="P128">down</text:p>
          </table:table-cell>
          <table:table-cell table:style-name="Tabelle29.A2" office:value-type="string">
            <text:p text:style-name="P122">0</text:p>
          </table:table-cell>
          <table:table-cell table:style-name="Tabelle29.A2" office:value-type="string">
            <text:p text:style-name="P122">-</text:p>
          </table:table-cell>
          <table:table-cell table:style-name="Tabelle29.A2" office:value-type="string">
            <text:p text:style-name="P134">0</text:p>
          </table:table-cell>
          <table:table-cell table:style-name="Tabelle29.A2" office:value-type="string">
            <text:p text:style-name="P133">↑</text:p>
          </table:table-cell>
          <table:table-cell table:style-name="Tabelle29.A2" office:value-type="string">
            <text:p text:style-name="P122">N</text:p>
          </table:table-cell>
          <table:table-cell table:style-name="Tabelle29.A2" office:value-type="string">
            <text:p text:style-name="P122">0</text:p>
          </table:table-cell>
          <table:table-cell table:style-name="Tabelle29.H2" office:value-type="string">
            <text:p text:style-name="P122">CNT - N</text:p>
          </table:table-cell>
        </table:table-row>
      </table:table>
      <text:p text:style-name="P55"/>
      <text:p text:style-name="P55"><draw:frame draw:style-name="fr4" draw:name="Grafik438" text:anchor-type="paragraph" svg:x="2.545cm" svg:y="1.619cm" svg:width="8.789cm" svg:height="3.32cm" draw:z-index="442"><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20"/>
      <text:list xml:id="list33642526" text:continue-numbering="true" text:style-name="L1">
        <text:list-item>
          <text:list>
            <text:list-item>
              <text:h text:style-name="P217" text:outline-level="2"><text:alphabetical-index-mark-start text:id="IMark100843576"/>COUNT_DR<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IN : DWORD (Vorgabewert für Set)</text:p>
      <text:p text:style-name="P22"><text:tab/>UP : BOOL (Vorwärts Schalter flankengetriggert)</text:p>
      <text:p text:style-name="P22"><text:tab/>DN : BOOL (Rückwärts Schalter flankengetriggert)</text:p>
      <text:p text:style-name="P52"><text:tab/>STEP : DWORD (Schrittweite des <text:span text:style-name="T16">Counters</text:span>)</text:p>
      <text:p text:style-name="P52"><text:tab/>MX : DWORD (Maximalwert des <text:span text:style-name="T16">Counters</text:span>)</text:p>
      <text:p text:style-name="P22"><text:tab/>RST : BOOL (asynchroner Reset)</text:p>
      <text:p text:style-name="P25"><draw:frame draw:style-name="fr4" draw:name="Grafik613" text:anchor-type="paragraph" svg:x="1.069cm" svg:y="0.667cm" svg:width="2.499cm" svg:height="3.5cm" draw:z-index="636"><draw:image xlink:href="Pictures/10000000000000BD00000109EB30A564.png" xlink:type="simple" xlink:show="embed" xlink:actuate="onLoad"/></draw:frame>Output<text:tab/>CNT : DWORD (Ausgang)</text:p>
      <text:p text:style-name="P55"><text:line-break/>COUNT_DR ist ein DWORD (32-Bit) Zähler der von 0 bis MX zählt und dann wieder bei 0 beginnt. Der Zähler kann mittels 2 flankengetriggerten Eingängen UP und DN <text:soft-page-break/>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22"/>
          </table:table-cell>
          <table:table-cell table:style-name="Tabelle37.A1" office:value-type="string">
            <text:p text:style-name="P122">SET</text:p>
          </table:table-cell>
          <table:table-cell table:style-name="Tabelle37.A1" office:value-type="string">
            <text:p text:style-name="P122">IN</text:p>
          </table:table-cell>
          <table:table-cell table:style-name="Tabelle37.A1" office:value-type="string">
            <text:p text:style-name="P122">UP</text:p>
          </table:table-cell>
          <table:table-cell table:style-name="Tabelle37.A1" office:value-type="string">
            <text:p text:style-name="P122">DN</text:p>
          </table:table-cell>
          <table:table-cell table:style-name="Tabelle37.A1" office:value-type="string">
            <text:p text:style-name="P122">STEP</text:p>
          </table:table-cell>
          <table:table-cell table:style-name="Tabelle37.A1" office:value-type="string">
            <text:p text:style-name="P122">RST</text:p>
          </table:table-cell>
          <table:table-cell table:style-name="Tabelle37.H1" office:value-type="string">
            <text:p text:style-name="P122">CNT</text:p>
          </table:table-cell>
        </table:table-row>
        <table:table-row>
          <table:table-cell table:style-name="Tabelle37.A2" office:value-type="string">
            <text:p text:style-name="P131">Reset</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1</text:p>
          </table:table-cell>
          <table:table-cell table:style-name="Tabelle37.H2" office:value-type="string">
            <text:p text:style-name="P122">0</text:p>
          </table:table-cell>
        </table:table-row>
        <table:table-row>
          <table:table-cell table:style-name="Tabelle37.A2" office:value-type="string">
            <text:p text:style-name="P122">Set</text:p>
          </table:table-cell>
          <table:table-cell table:style-name="Tabelle37.A2" office:value-type="string">
            <text:p text:style-name="P122">1</text:p>
          </table:table-cell>
          <table:table-cell table:style-name="Tabelle37.A2" office:value-type="string">
            <text:p text:style-name="P122">N</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0</text:p>
          </table:table-cell>
          <table:table-cell table:style-name="Tabelle37.H2" office:value-type="string">
            <text:p text:style-name="P122">N</text:p>
          </table:table-cell>
        </table:table-row>
        <table:table-row>
          <table:table-cell table:style-name="Tabelle37.A2" office:value-type="string">
            <text:p text:style-name="P122">up</text:p>
          </table:table-cell>
          <table:table-cell table:style-name="Tabelle37.A2" office:value-type="string">
            <text:p text:style-name="P122">0</text:p>
          </table:table-cell>
          <table:table-cell table:style-name="Tabelle37.A2" office:value-type="string">
            <text:p text:style-name="P122">-</text:p>
          </table:table-cell>
          <table:table-cell table:style-name="Tabelle37.A2" office:value-type="string">
            <text:p text:style-name="P133">↑</text:p>
          </table:table-cell>
          <table:table-cell table:style-name="Tabelle37.A2" office:value-type="string">
            <text:p text:style-name="P122">0</text:p>
          </table:table-cell>
          <table:table-cell table:style-name="Tabelle37.A2" office:value-type="string">
            <text:p text:style-name="P122">N</text:p>
          </table:table-cell>
          <table:table-cell table:style-name="Tabelle37.A2" office:value-type="string">
            <text:p text:style-name="P122">0</text:p>
          </table:table-cell>
          <table:table-cell table:style-name="Tabelle37.H2" office:value-type="string">
            <text:p text:style-name="P122">CNT + N</text:p>
          </table:table-cell>
        </table:table-row>
        <table:table-row>
          <table:table-cell table:style-name="Tabelle37.A2" office:value-type="string">
            <text:p text:style-name="P128">down</text:p>
          </table:table-cell>
          <table:table-cell table:style-name="Tabelle37.A2" office:value-type="string">
            <text:p text:style-name="P122">0</text:p>
          </table:table-cell>
          <table:table-cell table:style-name="Tabelle37.A2" office:value-type="string">
            <text:p text:style-name="P122">-</text:p>
          </table:table-cell>
          <table:table-cell table:style-name="Tabelle37.A2" office:value-type="string">
            <text:p text:style-name="P134">0</text:p>
          </table:table-cell>
          <table:table-cell table:style-name="Tabelle37.A2" office:value-type="string">
            <text:p text:style-name="P133">↑</text:p>
          </table:table-cell>
          <table:table-cell table:style-name="Tabelle37.A2" office:value-type="string">
            <text:p text:style-name="P122">N</text:p>
          </table:table-cell>
          <table:table-cell table:style-name="Tabelle37.A2" office:value-type="string">
            <text:p text:style-name="P122">0</text:p>
          </table:table-cell>
          <table:table-cell table:style-name="Tabelle37.H2" office:value-type="string">
            <text:p text:style-name="P122">CNT - N</text:p>
          </table:table-cell>
        </table:table-row>
      </table:table>
      <text:p text:style-name="P55"/>
      <text:p text:style-name="P55"><draw:frame draw:style-name="fr4" draw:name="Grafik614" text:anchor-type="paragraph" svg:x="2.545cm" svg:y="1.619cm" svg:width="8.789cm" svg:height="3.32cm" draw:z-index="635"><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55"/>
      <text:list xml:id="list33639194" text:continue-numbering="true" text:style-name="L1">
        <text:list-item>
          <text:list>
            <text:list-item>
              <text:h text:style-name="P217" text:outline-level="2"><text:alphabetical-index-mark-start text:id="IMark100843576"/>FF_D2E<text:alphabetical-index-mark-end text:id="IMark100843576"/></text:h>
            </text:list-item>
          </text:list>
        </text:list-item>
      </text:list>
      <text:p text:style-name="P22">Type<text:tab/>Funktionsbaustein</text:p>
      <text:p text:style-name="P22"><text:span text:style-name="T16">Input</text:span><text:tab/>D0 : BOOL (Data 0 in)</text:p>
      <text:p text:style-name="P22"><text:tab/>D1 : BOOL (Data 1 in)</text:p>
      <text:p text:style-name="P22"><text:tab/>CLK : BOOL (Takteingang)</text:p>
      <text:p text:style-name="P22"><text:tab/>RST : BOOL (asynchroner Reset)</text:p>
      <text:p text:style-name="P25">Output<text:tab/>Q0 : BOOL (Data 0 o<text:span text:style-name="T16">ut</text:span>)</text:p>
      <text:p text:style-name="P25"><draw:frame draw:style-name="fr4" draw:name="Grafik119" text:anchor-type="paragraph" svg:x="1.175cm" svg:y="0.612cm" svg:width="2.281cm" svg:height="2.649cm" draw:z-index="87"><draw:image xlink:href="Pictures/10000000000000AC000000C82226B47B.png" xlink:type="simple" xlink:show="embed" xlink:actuate="onLoad"/></draw:frame><text:tab/>Q1 : BOOL (Data 1 o<text:span text:style-name="T16">ut</text:span>)</text:p>
      <text:p text:style-name="P25"><text:soft-page-break/><text:line-break/>FF_D2E ist ein 2 Bit flankengetriggertes D-<text:span text:style-name="T16">Flip</text:span>-Flop mit asynchronem Reset-Eingang. Das D-<text:span text:style-name="T16">Flip</text:span>-Flop speichert die Werte am Eingang D mit einer steigenden Flanke am CLK Eingang.</text:p>
      <text:p text:style-name="P55"/>
      <text:p text:style-name="P55"><draw:g text:anchor-type="paragraph" draw:z-index="88" draw:style-name="gr1"><draw:line draw:style-name="gr13" draw:text-style-name="P251" svg:x1="2.143cm" svg:y1="1.663cm" svg:x2="2.893cm" svg:y2="1.663cm"><text:p/></draw:line><draw:line draw:style-name="gr13" draw:text-style-name="P251" svg:x1="2.898cm" svg:y1="1.162cm" svg:x2="2.898cm" svg:y2="1.661cm"><text:p/></draw:line><draw:line draw:style-name="gr13" draw:text-style-name="P251" svg:x1="2.898cm" svg:y1="1.162cm" svg:x2="5.149cm" svg:y2="1.162cm"><text:p/></draw:line><draw:line draw:style-name="gr13" draw:text-style-name="P251" svg:x1="5.147cm" svg:y1="1.661cm" svg:x2="5.147cm" svg:y2="1.162cm"><text:p/></draw:line><draw:line draw:style-name="gr13" draw:text-style-name="P251" svg:x1="6.394cm" svg:y1="1.162cm" svg:x2="6.394cm" svg:y2="1.661cm"><text:p/></draw:line><draw:line draw:style-name="gr13" draw:text-style-name="P251" svg:x1="9.643cm" svg:y1="1.663cm" svg:x2="11.142cm" svg:y2="1.663cm"><text:p/></draw:line><draw:line draw:style-name="gr3" draw:text-style-name="P251" svg:x1="2.898cm" svg:y1="0.159cm" svg:x2="2.898cm" svg:y2="0.658cm"><text:p/></draw:line><draw:line draw:style-name="gr3" draw:text-style-name="P251" svg:x1="2.143cm" svg:y1="0.661cm" svg:x2="2.893cm" svg:y2="0.661cm"><text:p/></draw:line><draw:line draw:style-name="gr3" draw:text-style-name="P251" svg:x1="2.898cm" svg:y1="0.159cm" svg:x2="3.648cm" svg:y2="0.159cm"><text:p/></draw:line><draw:line draw:style-name="gr3" draw:text-style-name="P251" svg:x1="3.644cm" svg:y1="0.658cm" svg:x2="3.644cm" svg:y2="0.159cm"><text:p/></draw:line><draw:line draw:style-name="gr3" draw:text-style-name="P251" svg:x1="3.644cm" svg:y1="0.661cm" svg:x2="6.145cm" svg:y2="0.661cm"><text:p/></draw:line><draw:line draw:style-name="gr3" draw:text-style-name="P251" svg:x1="6.147cm" svg:y1="0.159cm" svg:x2="6.147cm" svg:y2="0.658cm"><text:p/></draw:line><draw:line draw:style-name="gr3" draw:text-style-name="P251" svg:x1="6.147cm" svg:y1="0.159cm" svg:x2="7.147cm" svg:y2="0.159cm"><text:p/></draw:line><draw:line draw:style-name="gr3" draw:text-style-name="P251" svg:x1="7.149cm" svg:y1="0.658cm" svg:x2="7.149cm" svg:y2="0.159cm"><text:p/></draw:line><draw:line draw:style-name="gr3" draw:text-style-name="P251" svg:x1="7.149cm" svg:y1="0.661cm" svg:x2="11.148cm" svg:y2="0.661cm"><text:p/></draw:line><draw:frame draw:style-name="gr6" draw:text-style-name="P253" svg:width="0.997cm" svg:height="0.65cm" svg:x="1.145cm" svg:y="1.161cm"><draw:text-box><text:p text:style-name="P252"><text:span text:style-name="T50">D1</text:span></text:p></draw:text-box></draw:frame><draw:frame draw:style-name="gr6" draw:text-style-name="P253" svg:width="0.997cm" svg:height="0.65cm" svg:x="1.145cm" svg:y="0.16cm"><draw:text-box><text:p text:style-name="P252"><text:span text:style-name="T50">D0</text:span></text:p></draw:text-box></draw:frame><draw:line draw:style-name="gr13" draw:text-style-name="P251" svg:x1="6.394cm" svg:y1="1.162cm" svg:x2="9.645cm" svg:y2="1.162cm"><text:p/></draw:line><draw:line draw:style-name="gr13" draw:text-style-name="P251" svg:x1="9.643cm" svg:y1="1.162cm" svg:x2="9.643cm" svg:y2="1.661cm"><text:p/></draw:line><draw:line draw:style-name="gr13" draw:text-style-name="P251" svg:x1="5.147cm" svg:y1="1.663cm" svg:x2="6.396cm" svg:y2="1.663cm"><text:p/></draw:line><draw:line draw:style-name="gr4" draw:text-style-name="P251" svg:x1="3.143cm" svg:y1="2.66cm" svg:x2="3.143cm" svg:y2="2.161cm"><text:p/></draw:line><draw:line draw:style-name="gr4" draw:text-style-name="P251" svg:x1="4.143cm" svg:y1="2.161cm" svg:x2="3.143cm" svg:y2="2.161cm"><text:p/></draw:line><draw:line draw:style-name="gr4" draw:text-style-name="P251" svg:x1="4.145cm" svg:y1="2.161cm" svg:x2="4.145cm" svg:y2="2.66cm"><text:p/></draw:line><draw:line draw:style-name="gr4" draw:text-style-name="P251" svg:x1="4.644cm" svg:y1="2.663cm" svg:x2="4.145cm" svg:y2="2.663cm"><text:p/></draw:line><draw:line draw:style-name="gr4" draw:text-style-name="P251" svg:x1="2.143cm" svg:y1="2.663cm" svg:x2="3.143cm" svg:y2="2.663cm"><text:p/></draw:line><draw:frame draw:style-name="gr6" draw:text-style-name="P253" svg:width="1.251cm" svg:height="0.65cm" svg:x="1.145cm" svg:y="2.161cm"><draw:text-box><text:p text:style-name="P252"><text:span text:style-name="T50">CLK</text:span></text:p></draw:text-box></draw:frame><draw:line draw:style-name="gr4" draw:text-style-name="P251" svg:x1="4.646cm" svg:y1="2.161cm" svg:x2="4.646cm" svg:y2="2.66cm"><text:p/></draw:line><draw:line draw:style-name="gr4" draw:text-style-name="P251" svg:x1="5.893cm" svg:y1="2.663cm" svg:x2="5.392cm" svg:y2="2.663cm"><text:p/></draw:line><draw:line draw:style-name="gr4" draw:text-style-name="P251" svg:x1="5.893cm" svg:y1="2.161cm" svg:x2="5.893cm" svg:y2="2.66cm"><text:p/></draw:line><draw:line draw:style-name="gr4" draw:text-style-name="P251" svg:x1="6.643cm" svg:y1="2.161cm" svg:x2="5.893cm" svg:y2="2.161cm"><text:p/></draw:line><draw:line draw:style-name="gr4" draw:text-style-name="P251" svg:x1="7.644cm" svg:y1="2.66cm" svg:x2="7.644cm" svg:y2="2.161cm"><text:p/></draw:line><draw:line draw:style-name="gr4" draw:text-style-name="P251" svg:x1="8.644cm" svg:y1="2.161cm" svg:x2="7.644cm" svg:y2="2.161cm"><text:p/></draw:line><draw:line draw:style-name="gr4" draw:text-style-name="P251" svg:x1="8.643cm" svg:y1="2.161cm" svg:x2="8.643cm" svg:y2="2.66cm"><text:p/></draw:line><draw:line draw:style-name="gr4" draw:text-style-name="P251" svg:x1="9.142cm" svg:y1="2.663cm" svg:x2="8.643cm" svg:y2="2.663cm"><text:p/></draw:line><draw:line draw:style-name="gr4" draw:text-style-name="P251" svg:x1="9.142cm" svg:y1="2.66cm" svg:x2="9.142cm" svg:y2="2.161cm"><text:p/></draw:line><draw:line draw:style-name="gr4" draw:text-style-name="P251" svg:x1="11.142cm" svg:y1="2.161cm" svg:x2="9.142cm" svg:y2="2.161cm"><text:p/></draw:line><draw:line draw:style-name="gr4" draw:text-style-name="P251" svg:x1="5.392cm" svg:y1="2.161cm" svg:x2="5.392cm" svg:y2="2.66cm"><text:p/></draw:line><draw:line draw:style-name="gr4" draw:text-style-name="P251" svg:x1="6.648cm" svg:y1="2.161cm" svg:x2="6.648cm" svg:y2="2.66cm"><text:p/></draw:line><draw:line draw:style-name="gr4" draw:text-style-name="P251" svg:x1="4.646cm" svg:y1="2.161cm" svg:x2="5.396cm" svg:y2="2.161cm"><text:p/></draw:line><draw:line draw:style-name="gr4" draw:text-style-name="P251" svg:x1="6.648cm" svg:y1="2.663cm" svg:x2="7.648cm" svg:y2="2.663cm"><text:p/></draw:line><draw:line draw:style-name="gr11" draw:text-style-name="P251" svg:x1="9.897cm" svg:y1="3.663cm" svg:x2="9.897cm" svg:y2="3.164cm"><text:p/></draw:line><draw:line draw:style-name="gr11" draw:text-style-name="P251" svg:x1="10.146cm" svg:y1="3.164cm" svg:x2="9.897cm" svg:y2="3.164cm"><text:p/></draw:line><draw:line draw:style-name="gr11" draw:text-style-name="P251" svg:x1="2.143cm" svg:y1="3.661cm" svg:x2="9.894cm" svg:y2="3.661cm"><text:p/></draw:line><draw:frame draw:style-name="gr6" draw:text-style-name="P253" svg:width="1.251cm" svg:height="0.65cm" svg:x="1.145cm" svg:y="3.161cm"><draw:text-box><text:p text:style-name="P252"><text:span text:style-name="T50">RST</text:span></text:p></draw:text-box></draw:frame><draw:line draw:style-name="gr11" draw:text-style-name="P251" svg:x1="11.144cm" svg:y1="3.661cm" svg:x2="10.144cm" svg:y2="3.661cm"><text:p/></draw:line><draw:line draw:style-name="gr11" draw:text-style-name="P251" svg:x1="10.144cm" svg:y1="3.164cm" svg:x2="10.144cm" svg:y2="3.663cm"><text:p/></draw:line><draw:line draw:style-name="gr5" draw:text-style-name="P251" svg:x1="2.143cm" svg:y1="4.66cm" svg:x2="3.143cm" svg:y2="4.66cm"><text:p/></draw:line><draw:line draw:style-name="gr5" draw:text-style-name="P251" svg:x1="3.143cm" svg:y1="4.159cm" svg:x2="3.143cm" svg:y2="4.66cm"><text:p/></draw:line><draw:line draw:style-name="gr5" draw:text-style-name="P251" svg:x1="4.642cm" svg:y1="4.159cm" svg:x2="3.143cm" svg:y2="4.159cm"><text:p/></draw:line><draw:line draw:style-name="gr5" draw:text-style-name="P251" svg:x1="4.646cm" svg:y1="4.159cm" svg:x2="4.646cm" svg:y2="4.66cm"><text:p/></draw:line><draw:line draw:style-name="gr5" draw:text-style-name="P251" svg:x1="11.146cm" svg:y1="4.66cm" svg:x2="4.646cm" svg:y2="4.66cm"><text:p/></draw:line><draw:frame draw:style-name="gr6" draw:text-style-name="P253" svg:width="0.997cm" svg:height="0.65cm" svg:x="1.145cm" svg:y="5.159cm"><draw:text-box><text:p text:style-name="P252"><text:span text:style-name="T50">Q1</text:span></text:p></draw:text-box></draw:frame><draw:frame draw:style-name="gr6" draw:text-style-name="P253" svg:width="0.997cm" svg:height="0.65cm" svg:x="1.145cm" svg:y="4.159cm"><draw:text-box><text:p text:style-name="P252"><text:span text:style-name="T50">Q0</text:span></text:p></draw:text-box></draw:frame><draw:line draw:style-name="gr12" draw:text-style-name="P251" svg:x1="2.143cm" svg:y1="5.66cm" svg:x2="3.143cm" svg:y2="5.66cm"><text:p/></draw:line><draw:line draw:style-name="gr12" draw:text-style-name="P251" svg:x1="3.143cm" svg:y1="5.159cm" svg:x2="3.143cm" svg:y2="5.66cm"><text:p/></draw:line><draw:line draw:style-name="gr12" draw:text-style-name="P251" svg:x1="5.893cm" svg:y1="5.159cm" svg:x2="3.143cm" svg:y2="5.159cm"><text:p/></draw:line><draw:line draw:style-name="gr12" draw:text-style-name="P251" svg:x1="5.893cm" svg:y1="5.159cm" svg:x2="5.893cm" svg:y2="5.66cm"><text:p/></draw:line><draw:line draw:style-name="gr12" draw:text-style-name="P251" svg:x1="7.643cm" svg:y1="5.66cm" svg:x2="5.893cm" svg:y2="5.66cm"><text:p/></draw:line><draw:line draw:style-name="gr12" draw:text-style-name="P251" svg:x1="7.644cm" svg:y1="5.159cm" svg:x2="7.644cm" svg:y2="5.66cm"><text:p/></draw:line><draw:line draw:style-name="gr12" draw:text-style-name="P251" svg:x1="9.895cm" svg:y1="5.159cm" svg:x2="7.644cm" svg:y2="5.159cm"><text:p/></draw:line><draw:line draw:style-name="gr12" draw:text-style-name="P251" svg:x1="9.897cm" svg:y1="5.159cm" svg:x2="9.897cm" svg:y2="5.66cm"><text:p/></draw:line><draw:line draw:style-name="gr12" draw:text-style-name="P251" svg:x1="11.146cm" svg:y1="5.66cm" svg:x2="9.897cm" svg:y2="5.66cm"><text:p/></draw:line><draw:line draw:style-name="gr14" draw:text-style-name="P251" svg:x1="3.143cm" svg:y1="-0.09cm" svg:x2="3.143cm" svg:y2="5.911cm"><text:p/></draw:line><draw:line draw:style-name="gr14" draw:text-style-name="P251" svg:x1="4.646cm" svg:y1="-0.09cm" svg:x2="4.646cm" svg:y2="5.911cm"><text:p/></draw:line><draw:line draw:style-name="gr14" draw:text-style-name="P251" svg:x1="5.893cm" svg:y1="-0.09cm" svg:x2="5.893cm" svg:y2="5.911cm"><text:p/></draw:line><draw:line draw:style-name="gr14" draw:text-style-name="P251" svg:x1="7.644cm" svg:y1="-0.09cm" svg:x2="7.644cm" svg:y2="5.911cm"><text:p/></draw:line><draw:line draw:style-name="gr14" draw:text-style-name="P251" svg:x1="9.142cm" svg:y1="-0.09cm" svg:x2="9.142cm" svg:y2="5.911cm"><text:p/></draw:line></draw:g></text:p>
      <text:list xml:id="list33649634" text:continue-numbering="true" text:style-name="L1">
        <text:list-item>
          <text:list>
            <text:list-item>
              <text:h text:style-name="P217" text:outline-level="2"><text:alphabetical-index-mark-start text:id="IMark100843576"/>FF_D4E<text:alphabetical-index-mark-end text:id="IMark100843576"/></text:h>
            </text:list-item>
          </text:list>
        </text:list-item>
      </text:list>
      <text:p text:style-name="P22">Type<text:tab/>Funktionsbaustein</text:p>
      <text:p text:style-name="P22"><text:span text:style-name="T16">Input</text:span><text:tab/>D0 : BOOL (Data 0 in)</text:p>
      <text:p text:style-name="P22"><text:tab/>D1 : BOOL (Data 1 in)</text:p>
      <text:p text:style-name="P22"><text:tab/>D2 : BOOL (Data 2 in)</text:p>
      <text:p text:style-name="P22"><text:tab/>D3 : BOOL (Data 3 in)</text:p>
      <text:p text:style-name="P22"><text:tab/>CLK : BOOL (Takteingang)</text:p>
      <text:p text:style-name="P22"><text:tab/>RST : BOOL (asynchroner Reset)</text:p>
      <text:p text:style-name="P25">Output<text:tab/>Q0 : BOOL (Data 0 <text:span text:style-name="T16">Out</text:span>)</text:p>
      <text:p text:style-name="P25"><text:tab/>Q1 : BOOL (Data 1 <text:span text:style-name="T16">Out</text:span>)</text:p>
      <text:p text:style-name="P25"><text:tab/>Q2 : BOOL (Data 2 <text:span text:style-name="T16">Out</text:span>)</text:p>
      <text:p text:style-name="P25"><draw:frame draw:style-name="fr4" draw:name="Grafik120" text:anchor-type="paragraph" svg:x="1.147cm" svg:y="0.616cm" svg:width="2.281cm" svg:height="3.54cm" draw:z-index="89"><draw:image xlink:href="Pictures/10000000000000AC0000010C6F87760E.png" xlink:type="simple" xlink:show="embed" xlink:actuate="onLoad"/></draw:frame><text:tab/>Q3 : BOOL (Data 3 <text:span text:style-name="T16">Out</text:span>)</text:p>
      <text:p text:style-name="P25"><text:soft-page-break/><text:line-break/>FF_D2E ist ein 4 Bit flankengetriggertes D-<text:span text:style-name="T16">Flip</text:span>-Flop mit asynchronem Reset-Eingang. Das D-<text:span text:style-name="T16">Flip</text:span>-Flop speichert die Werte am Eingang D mit einer steigenden Flanke an CLK. Detaillierte Angaben finden Sie beim Baustein FF_D2E.</text:p>
      <text:list xml:id="list33650065" text:continue-numbering="true" text:style-name="L1">
        <text:list-item>
          <text:list>
            <text:list-item>
              <text:h text:style-name="P217" text:outline-level="2"><text:alphabetical-index-mark-start text:id="IMark100843576"/>FF_DRE<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D : BOOL (Data in)</text:p>
      <text:p text:style-name="P22"><text:tab/>CLK : BOOL (Takteingang)</text:p>
      <text:p text:style-name="P22"><text:tab/>RST : BOOL (asynchroner Reset)</text:p>
      <text:p text:style-name="P25"><draw:frame draw:style-name="fr4" draw:name="Grafik121" text:anchor-type="paragraph" svg:x="1.076cm" svg:y="0.723cm" svg:width="2.33cm" svg:height="2.649cm" draw:z-index="90"><draw:image xlink:href="Pictures/10000000000000B0000000C8F7201C05.png" xlink:type="simple" xlink:show="embed" xlink:actuate="onLoad"/></draw:frame>Output<text:tab/>Q : BOOL (Data <text:span text:style-name="T16">Out</text:span>)</text:p>
      <text:p text:style-name="P25"><text:line-break/>FF_DRE ist ein flankengetriggertes D-<text:span text:style-name="T16">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55"><draw:g text:anchor-type="paragraph" draw:z-index="91" draw:style-name="gr1"><draw:line draw:style-name="gr13" draw:text-style-name="P251" svg:x1="2.108cm" svg:y1="0.612cm" svg:x2="2.858cm" svg:y2="0.612cm"><text:p/></draw:line><draw:line draw:style-name="gr13" draw:text-style-name="P251" svg:x1="2.861cm" svg:y1="0.111cm" svg:x2="2.861cm" svg:y2="0.61cm"><text:p/></draw:line><draw:line draw:style-name="gr13" draw:text-style-name="P251" svg:x1="2.861cm" svg:y1="0.111cm" svg:x2="5.112cm" svg:y2="0.111cm"><text:p/></draw:line><draw:line draw:style-name="gr13" draw:text-style-name="P251" svg:x1="5.112cm" svg:y1="0.61cm" svg:x2="5.112cm" svg:y2="0.111cm"><text:p/></draw:line><draw:line draw:style-name="gr13" draw:text-style-name="P251" svg:x1="6.359cm" svg:y1="0.111cm" svg:x2="6.359cm" svg:y2="0.61cm"><text:p/></draw:line><draw:frame draw:style-name="gr6" draw:text-style-name="P253" svg:width="0.997cm" svg:height="0.65cm" svg:x="1.111cm" svg:y="0.111cm"><draw:text-box><text:p text:style-name="P252"><text:span text:style-name="T50">D</text:span></text:p></draw:text-box></draw:frame><draw:line draw:style-name="gr13" draw:text-style-name="P251" svg:x1="6.359cm" svg:y1="0.111cm" svg:x2="12.109cm" svg:y2="0.111cm"><text:p/></draw:line><draw:line draw:style-name="gr13" draw:text-style-name="P251" svg:x1="5.112cm" svg:y1="0.612cm" svg:x2="6.361cm" svg:y2="0.612cm"><text:p/></draw:line><draw:line draw:style-name="gr4" draw:text-style-name="P251" svg:x1="3.108cm" svg:y1="1.612cm" svg:x2="3.108cm" svg:y2="1.113cm"><text:p/></draw:line><draw:line draw:style-name="gr4" draw:text-style-name="P251" svg:x1="4.108cm" svg:y1="1.113cm" svg:x2="3.108cm" svg:y2="1.113cm"><text:p/></draw:line><draw:line draw:style-name="gr4" draw:text-style-name="P251" svg:x1="4.11cm" svg:y1="1.113cm" svg:x2="4.11cm" svg:y2="1.612cm"><text:p/></draw:line><draw:line draw:style-name="gr4" draw:text-style-name="P251" svg:x1="4.609cm" svg:y1="1.612cm" svg:x2="4.11cm" svg:y2="1.612cm"><text:p/></draw:line><draw:line draw:style-name="gr4" draw:text-style-name="P251" svg:x1="2.108cm" svg:y1="1.612cm" svg:x2="3.108cm" svg:y2="1.612cm"><text:p/></draw:line><draw:frame draw:style-name="gr6" draw:text-style-name="P253" svg:width="1.251cm" svg:height="0.65cm" svg:x="1.111cm" svg:y="1.113cm"><draw:text-box><text:p text:style-name="P252"><text:span text:style-name="T50">CLK</text:span></text:p></draw:text-box></draw:frame><draw:line draw:style-name="gr4" draw:text-style-name="P251" svg:x1="4.611cm" svg:y1="1.113cm" svg:x2="4.611cm" svg:y2="1.612cm"><text:p/></draw:line><draw:line draw:style-name="gr4" draw:text-style-name="P251" svg:x1="5.858cm" svg:y1="1.612cm" svg:x2="5.357cm" svg:y2="1.612cm"><text:p/></draw:line><draw:line draw:style-name="gr4" draw:text-style-name="P251" svg:x1="5.858cm" svg:y1="1.113cm" svg:x2="5.858cm" svg:y2="1.612cm"><text:p/></draw:line><draw:line draw:style-name="gr4" draw:text-style-name="P251" svg:x1="6.608cm" svg:y1="1.113cm" svg:x2="5.858cm" svg:y2="1.113cm"><text:p/></draw:line><draw:line draw:style-name="gr4" draw:text-style-name="P251" svg:x1="7.611cm" svg:y1="1.612cm" svg:x2="7.611cm" svg:y2="1.113cm"><text:p/></draw:line><draw:line draw:style-name="gr4" draw:text-style-name="P251" svg:x1="9.611cm" svg:y1="1.113cm" svg:x2="7.611cm" svg:y2="1.113cm"><text:p/></draw:line><draw:line draw:style-name="gr4" draw:text-style-name="P251" svg:x1="9.608cm" svg:y1="1.113cm" svg:x2="9.608cm" svg:y2="1.612cm"><text:p/></draw:line><draw:line draw:style-name="gr4" draw:text-style-name="P251" svg:x1="11.358cm" svg:y1="1.612cm" svg:x2="9.608cm" svg:y2="1.612cm"><text:p/></draw:line><draw:line draw:style-name="gr4" draw:text-style-name="P251" svg:x1="5.357cm" svg:y1="1.113cm" svg:x2="5.357cm" svg:y2="1.612cm"><text:p/></draw:line><draw:line draw:style-name="gr4" draw:text-style-name="P251" svg:x1="6.611cm" svg:y1="1.113cm" svg:x2="6.611cm" svg:y2="1.612cm"><text:p/></draw:line><draw:line draw:style-name="gr4" draw:text-style-name="P251" svg:x1="4.611cm" svg:y1="1.113cm" svg:x2="5.361cm" svg:y2="1.113cm"><text:p/></draw:line><draw:line draw:style-name="gr4" draw:text-style-name="P251" svg:x1="6.611cm" svg:y1="1.612cm" svg:x2="7.611cm" svg:y2="1.612cm"><text:p/></draw:line><draw:line draw:style-name="gr11" draw:text-style-name="P251" svg:x1="9.862cm" svg:y1="2.612cm" svg:x2="9.862cm" svg:y2="2.113cm"><text:p/></draw:line><draw:line draw:style-name="gr11" draw:text-style-name="P251" svg:x1="10.111cm" svg:y1="2.113cm" svg:x2="9.862cm" svg:y2="2.113cm"><text:p/></draw:line><draw:line draw:style-name="gr11" draw:text-style-name="P251" svg:x1="2.108cm" svg:y1="2.612cm" svg:x2="9.859cm" svg:y2="2.612cm"><text:p/></draw:line><draw:frame draw:style-name="gr6" draw:text-style-name="P253" svg:width="1.251cm" svg:height="0.65cm" svg:x="1.111cm" svg:y="2.113cm"><draw:text-box><text:p text:style-name="P252"><text:span text:style-name="T50">RST</text:span></text:p></draw:text-box></draw:frame><draw:line draw:style-name="gr11" draw:text-style-name="P251" svg:x1="10.86cm" svg:y1="2.612cm" svg:x2="10.109cm" svg:y2="2.612cm"><text:p/></draw:line><draw:line draw:style-name="gr11" draw:text-style-name="P251" svg:x1="10.109cm" svg:y1="2.113cm" svg:x2="10.109cm" svg:y2="2.612cm"><text:p/></draw:line><draw:line draw:style-name="gr5" draw:text-style-name="P251" svg:x1="10.61cm" svg:y1="3.113cm" svg:x2="12.109cm" svg:y2="3.113cm"><text:p/></draw:line><draw:line draw:style-name="gr5" draw:text-style-name="P251" svg:x1="10.608cm" svg:y1="3.612cm" svg:x2="2.108cm" svg:y2="3.612cm"><text:p/></draw:line><draw:frame draw:style-name="gr6" draw:text-style-name="P253" svg:width="0.997cm" svg:height="0.65cm" svg:x="1.111cm" svg:y="4.111cm"><draw:text-box><text:p text:style-name="P252"><text:span text:style-name="T50">Q</text:span></text:p></draw:text-box></draw:frame><draw:frame draw:style-name="gr6" draw:text-style-name="P253" svg:width="1.251cm" svg:height="0.65cm" svg:x="1.111cm" svg:y="3.113cm"><draw:text-box><text:p text:style-name="P252"><text:span text:style-name="T50">SET</text:span></text:p></draw:text-box></draw:frame><draw:line draw:style-name="gr12" draw:text-style-name="P251" svg:x1="2.108cm" svg:y1="4.609cm" svg:x2="3.108cm" svg:y2="4.609cm"><text:p/></draw:line><draw:line draw:style-name="gr12" draw:text-style-name="P251" svg:x1="3.108cm" svg:y1="4.108cm" svg:x2="3.108cm" svg:y2="4.609cm"><text:p/></draw:line><draw:line draw:style-name="gr12" draw:text-style-name="P251" svg:x1="5.858cm" svg:y1="4.108cm" svg:x2="3.108cm" svg:y2="4.108cm"><text:p/></draw:line><draw:line draw:style-name="gr12" draw:text-style-name="P251" svg:x1="5.858cm" svg:y1="4.108cm" svg:x2="5.858cm" svg:y2="4.609cm"><text:p/></draw:line><draw:line draw:style-name="gr12" draw:text-style-name="P251" svg:x1="7.608cm" svg:y1="4.609cm" svg:x2="5.858cm" svg:y2="4.609cm"><text:p/></draw:line><draw:line draw:style-name="gr12" draw:text-style-name="P251" svg:x1="7.611cm" svg:y1="4.108cm" svg:x2="7.611cm" svg:y2="4.609cm"><text:p/></draw:line><draw:line draw:style-name="gr12" draw:text-style-name="P251" svg:x1="9.862cm" svg:y1="4.108cm" svg:x2="7.611cm" svg:y2="4.108cm"><text:p/></draw:line><draw:line draw:style-name="gr12" draw:text-style-name="P251" svg:x1="9.862cm" svg:y1="4.108cm" svg:x2="9.862cm" svg:y2="4.609cm"><text:p/></draw:line><draw:line draw:style-name="gr12" draw:text-style-name="P251" svg:x1="10.612cm" svg:y1="4.609cm" svg:x2="9.862cm" svg:y2="4.609cm"><text:p/></draw:line><draw:line draw:style-name="gr14" draw:text-style-name="P251" svg:x1="3.108cm" svg:y1="-0.138cm" svg:x2="3.108cm" svg:y2="4.863cm"><text:p/></draw:line><draw:line draw:style-name="gr14" draw:text-style-name="P251" svg:x1="4.611cm" svg:y1="-0.138cm" svg:x2="4.611cm" svg:y2="4.863cm"><text:p/></draw:line><draw:line draw:style-name="gr14" draw:text-style-name="P251" svg:x1="5.858cm" svg:y1="-0.138cm" svg:x2="5.858cm" svg:y2="4.863cm"><text:p/></draw:line><draw:line draw:style-name="gr14" draw:text-style-name="P251" svg:x1="7.611cm" svg:y1="-0.138cm" svg:x2="7.611cm" svg:y2="4.863cm"><text:p/></draw:line><draw:line draw:style-name="gr14" draw:text-style-name="P251" svg:x1="11.361cm" svg:y1="-0.138cm" svg:x2="11.361cm" svg:y2="4.863cm"><text:p/></draw:line><draw:line draw:style-name="gr5" draw:text-style-name="P251" svg:x1="10.61cm" svg:y1="3.113cm" svg:x2="10.61cm" svg:y2="3.612cm"><text:p/></draw:line><draw:line draw:style-name="gr11" draw:text-style-name="P251" svg:x1="10.862cm" svg:y1="2.612cm" svg:x2="10.862cm" svg:y2="2.113cm"><text:p/></draw:line><draw:line draw:style-name="gr11" draw:text-style-name="P251" svg:x1="12.111cm" svg:y1="2.113cm" svg:x2="10.862cm" svg:y2="2.113cm"><text:p/></draw:line><draw:line draw:style-name="gr4" draw:text-style-name="P251" svg:x1="11.361cm" svg:y1="1.113cm" svg:x2="11.361cm" svg:y2="1.612cm"><text:p/></draw:line><draw:line draw:style-name="gr4" draw:text-style-name="P251" svg:x1="12.111cm" svg:y1="1.113cm" svg:x2="11.361cm" svg:y2="1.113cm"><text:p/></draw:line><draw:line draw:style-name="gr12" draw:text-style-name="P251" svg:x1="10.862cm" svg:y1="4.108cm" svg:x2="10.862cm" svg:y2="4.609cm"><text:p/></draw:line><draw:line draw:style-name="gr12" draw:text-style-name="P251" svg:x1="10.86cm" svg:y1="4.108cm" svg:x2="10.61cm" svg:y2="4.108cm"><text:p/></draw:line><draw:line draw:style-name="gr12" draw:text-style-name="P251" svg:x1="9.862cm" svg:y1="4.108cm" svg:x2="9.862cm" svg:y2="4.609cm"><text:p/></draw:line><draw:line draw:style-name="gr12" draw:text-style-name="P251" svg:x1="10.612cm" svg:y1="4.609cm" svg:x2="9.862cm" svg:y2="4.609cm"><text:p/></draw:line><draw:line draw:style-name="gr12" draw:text-style-name="P251" svg:x1="10.61cm" svg:y1="4.108cm" svg:x2="10.61cm" svg:y2="4.609cm"><text:p/></draw:line><draw:line draw:style-name="gr12" draw:text-style-name="P251" svg:x1="12.111cm" svg:y1="4.609cm" svg:x2="10.862cm" svg:y2="4.609cm"><text:p/></draw:line></draw:g><text:soft-page-break/></text:p>
      <text:list xml:id="list33634808" text:continue-numbering="true" text:style-name="L1">
        <text:list-item>
          <text:list>
            <text:list-item>
              <text:h text:style-name="P217" text:outline-level="2"><text:alphabetical-index-mark-start text:id="IMark100843576"/>FF_JKE<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J : BOOL (Takt-synchroner Set)</text:p>
      <text:p text:style-name="P22"><text:tab/>CLK : BOOL (Takteingang)</text:p>
      <text:p text:style-name="P22"><text:tab/>K : BOOL (Takt-synchroner Reset)</text:p>
      <text:p text:style-name="P22"><text:tab/>RST : BOOL (asynchroner Reset)</text:p>
      <text:p text:style-name="P25"><draw:frame draw:style-name="fr4" draw:name="Grafik122" text:anchor-type="paragraph" svg:x="1.028cm" svg:y="0.667cm" svg:width="2.33cm" svg:height="3.099cm" draw:z-index="92"><draw:image xlink:href="Pictures/10000000000000B0000000EA09666FDE.png" xlink:type="simple" xlink:show="embed" xlink:actuate="onLoad"/></draw:frame>Output<text:tab/>Q : BOOL (Ausgang)</text:p>
      <text:p text:style-name="P25"><text:line-break/>FF_JKE ist ein flankengetriggertes JK-Flop-Flop mit asynchronen Set und Reset Eingängen. Das JK-<text:span text:style-name="T16">Flip</text:span>-Flop setzt den Ausgang Q, wenn bei einer steigenden Flanke von CLK der <text:span text:style-name="T16">Input</text:span> J TRUE ist. Q wird FALSE, wenn bei einer steigenden Taktflanke der Eingang K TRUE ist. Sind die beiden Eingänge J und K bei einer Steigenden Taktflanke TRUE, so wird der Ausgang negiert. Er schaltet bei jedem Takt das Ausgangssignal um.</text:p>
      <text:p text:style-name="P55"><draw:g text:anchor-type="paragraph" draw:z-index="690" draw:style-name="gr1"><draw:line draw:style-name="gr13" draw:text-style-name="P251" svg:x1="2.108cm" svg:y1="0.612cm" svg:x2="2.858cm" svg:y2="0.612cm"><text:p/></draw:line><draw:line draw:style-name="gr13" draw:text-style-name="P251" svg:x1="2.861cm" svg:y1="0.111cm" svg:x2="2.861cm" svg:y2="0.61cm"><text:p/></draw:line><draw:line draw:style-name="gr13" draw:text-style-name="P251" svg:x1="2.861cm" svg:y1="0.111cm" svg:x2="5.112cm" svg:y2="0.111cm"><text:p/></draw:line><draw:line draw:style-name="gr13" draw:text-style-name="P251" svg:x1="5.112cm" svg:y1="0.61cm" svg:x2="5.112cm" svg:y2="0.111cm"><text:p/></draw:line><draw:line draw:style-name="gr13" draw:text-style-name="P251" svg:x1="6.359cm" svg:y1="0.111cm" svg:x2="6.359cm" svg:y2="0.61cm"><text:p/></draw:line><draw:frame draw:style-name="gr6" draw:text-style-name="P253" svg:width="0.997cm" svg:height="0.65cm" svg:x="1.111cm" svg:y="0.111cm"><draw:text-box><text:p text:style-name="P252"><text:span text:style-name="T50">D</text:span></text:p></draw:text-box></draw:frame><draw:line draw:style-name="gr13" draw:text-style-name="P251" svg:x1="6.359cm" svg:y1="0.111cm" svg:x2="12.109cm" svg:y2="0.111cm"><text:p/></draw:line><draw:line draw:style-name="gr13" draw:text-style-name="P251" svg:x1="5.112cm" svg:y1="0.612cm" svg:x2="6.361cm" svg:y2="0.612cm"><text:p/></draw:line><draw:line draw:style-name="gr4" draw:text-style-name="P251" svg:x1="3.108cm" svg:y1="1.612cm" svg:x2="3.108cm" svg:y2="1.113cm"><text:p/></draw:line><draw:line draw:style-name="gr4" draw:text-style-name="P251" svg:x1="4.108cm" svg:y1="1.113cm" svg:x2="3.108cm" svg:y2="1.113cm"><text:p/></draw:line><draw:line draw:style-name="gr4" draw:text-style-name="P251" svg:x1="4.11cm" svg:y1="1.113cm" svg:x2="4.11cm" svg:y2="1.612cm"><text:p/></draw:line><draw:line draw:style-name="gr4" draw:text-style-name="P251" svg:x1="4.609cm" svg:y1="1.612cm" svg:x2="4.11cm" svg:y2="1.612cm"><text:p/></draw:line><draw:line draw:style-name="gr4" draw:text-style-name="P251" svg:x1="2.108cm" svg:y1="1.612cm" svg:x2="3.108cm" svg:y2="1.612cm"><text:p/></draw:line><draw:frame draw:style-name="gr6" draw:text-style-name="P253" svg:width="1.251cm" svg:height="0.65cm" svg:x="1.111cm" svg:y="1.113cm"><draw:text-box><text:p text:style-name="P252"><text:span text:style-name="T50">CLK</text:span></text:p></draw:text-box></draw:frame><draw:line draw:style-name="gr4" draw:text-style-name="P251" svg:x1="4.611cm" svg:y1="1.113cm" svg:x2="4.611cm" svg:y2="1.612cm"><text:p/></draw:line><draw:line draw:style-name="gr4" draw:text-style-name="P251" svg:x1="5.858cm" svg:y1="1.612cm" svg:x2="5.357cm" svg:y2="1.612cm"><text:p/></draw:line><draw:line draw:style-name="gr4" draw:text-style-name="P251" svg:x1="5.858cm" svg:y1="1.113cm" svg:x2="5.858cm" svg:y2="1.612cm"><text:p/></draw:line><draw:line draw:style-name="gr4" draw:text-style-name="P251" svg:x1="6.608cm" svg:y1="1.113cm" svg:x2="5.858cm" svg:y2="1.113cm"><text:p/></draw:line><draw:line draw:style-name="gr4" draw:text-style-name="P251" svg:x1="7.611cm" svg:y1="1.612cm" svg:x2="7.611cm" svg:y2="1.113cm"><text:p/></draw:line><draw:line draw:style-name="gr4" draw:text-style-name="P251" svg:x1="9.611cm" svg:y1="1.113cm" svg:x2="7.611cm" svg:y2="1.113cm"><text:p/></draw:line><draw:line draw:style-name="gr4" draw:text-style-name="P251" svg:x1="9.608cm" svg:y1="1.113cm" svg:x2="9.608cm" svg:y2="1.612cm"><text:p/></draw:line><draw:line draw:style-name="gr4" draw:text-style-name="P251" svg:x1="11.358cm" svg:y1="1.612cm" svg:x2="9.608cm" svg:y2="1.612cm"><text:p/></draw:line><draw:line draw:style-name="gr4" draw:text-style-name="P251" svg:x1="5.357cm" svg:y1="1.113cm" svg:x2="5.357cm" svg:y2="1.612cm"><text:p/></draw:line><draw:line draw:style-name="gr4" draw:text-style-name="P251" svg:x1="6.611cm" svg:y1="1.113cm" svg:x2="6.611cm" svg:y2="1.612cm"><text:p/></draw:line><draw:line draw:style-name="gr4" draw:text-style-name="P251" svg:x1="4.611cm" svg:y1="1.113cm" svg:x2="5.361cm" svg:y2="1.113cm"><text:p/></draw:line><draw:line draw:style-name="gr4" draw:text-style-name="P251" svg:x1="6.611cm" svg:y1="1.612cm" svg:x2="7.611cm" svg:y2="1.612cm"><text:p/></draw:line><draw:line draw:style-name="gr11" draw:text-style-name="P251" svg:x1="9.862cm" svg:y1="2.612cm" svg:x2="9.862cm" svg:y2="2.113cm"><text:p/></draw:line><draw:line draw:style-name="gr11" draw:text-style-name="P251" svg:x1="10.111cm" svg:y1="2.113cm" svg:x2="9.862cm" svg:y2="2.113cm"><text:p/></draw:line><draw:line draw:style-name="gr11" draw:text-style-name="P251" svg:x1="2.108cm" svg:y1="2.612cm" svg:x2="9.859cm" svg:y2="2.612cm"><text:p/></draw:line><draw:frame draw:style-name="gr6" draw:text-style-name="P253" svg:width="1.251cm" svg:height="0.65cm" svg:x="1.111cm" svg:y="2.113cm"><draw:text-box><text:p text:style-name="P252"><text:span text:style-name="T50">RST</text:span></text:p></draw:text-box></draw:frame><draw:line draw:style-name="gr11" draw:text-style-name="P251" svg:x1="10.86cm" svg:y1="2.612cm" svg:x2="10.109cm" svg:y2="2.612cm"><text:p/></draw:line><draw:line draw:style-name="gr11" draw:text-style-name="P251" svg:x1="10.109cm" svg:y1="2.113cm" svg:x2="10.109cm" svg:y2="2.612cm"><text:p/></draw:line><draw:line draw:style-name="gr5" draw:text-style-name="P251" svg:x1="10.61cm" svg:y1="3.113cm" svg:x2="12.109cm" svg:y2="3.113cm"><text:p/></draw:line><draw:line draw:style-name="gr5" draw:text-style-name="P251" svg:x1="10.608cm" svg:y1="3.612cm" svg:x2="2.108cm" svg:y2="3.612cm"><text:p/></draw:line><draw:frame draw:style-name="gr6" draw:text-style-name="P253" svg:width="0.997cm" svg:height="0.65cm" svg:x="1.111cm" svg:y="4.111cm"><draw:text-box><text:p text:style-name="P252"><text:span text:style-name="T50">Q</text:span></text:p></draw:text-box></draw:frame><draw:frame draw:style-name="gr6" draw:text-style-name="P253" svg:width="1.251cm" svg:height="0.65cm" svg:x="1.111cm" svg:y="3.113cm"><draw:text-box><text:p text:style-name="P252"><text:span text:style-name="T50">SET</text:span></text:p></draw:text-box></draw:frame><draw:line draw:style-name="gr12" draw:text-style-name="P251" svg:x1="2.108cm" svg:y1="4.609cm" svg:x2="3.108cm" svg:y2="4.609cm"><text:p/></draw:line><draw:line draw:style-name="gr12" draw:text-style-name="P251" svg:x1="3.108cm" svg:y1="4.108cm" svg:x2="3.108cm" svg:y2="4.609cm"><text:p/></draw:line><draw:line draw:style-name="gr12" draw:text-style-name="P251" svg:x1="5.858cm" svg:y1="4.108cm" svg:x2="3.108cm" svg:y2="4.108cm"><text:p/></draw:line><draw:line draw:style-name="gr12" draw:text-style-name="P251" svg:x1="5.858cm" svg:y1="4.108cm" svg:x2="5.858cm" svg:y2="4.609cm"><text:p/></draw:line><draw:line draw:style-name="gr12" draw:text-style-name="P251" svg:x1="7.608cm" svg:y1="4.609cm" svg:x2="5.858cm" svg:y2="4.609cm"><text:p/></draw:line><draw:line draw:style-name="gr12" draw:text-style-name="P251" svg:x1="7.611cm" svg:y1="4.108cm" svg:x2="7.611cm" svg:y2="4.609cm"><text:p/></draw:line><draw:line draw:style-name="gr12" draw:text-style-name="P251" svg:x1="9.862cm" svg:y1="4.108cm" svg:x2="7.611cm" svg:y2="4.108cm"><text:p/></draw:line><draw:line draw:style-name="gr12" draw:text-style-name="P251" svg:x1="9.862cm" svg:y1="4.108cm" svg:x2="9.862cm" svg:y2="4.609cm"><text:p/></draw:line><draw:line draw:style-name="gr12" draw:text-style-name="P251" svg:x1="10.612cm" svg:y1="4.609cm" svg:x2="9.862cm" svg:y2="4.609cm"><text:p/></draw:line><draw:line draw:style-name="gr14" draw:text-style-name="P251" svg:x1="3.108cm" svg:y1="-0.138cm" svg:x2="3.108cm" svg:y2="4.863cm"><text:p/></draw:line><draw:line draw:style-name="gr14" draw:text-style-name="P251" svg:x1="4.611cm" svg:y1="-0.138cm" svg:x2="4.611cm" svg:y2="4.863cm"><text:p/></draw:line><draw:line draw:style-name="gr14" draw:text-style-name="P251" svg:x1="5.858cm" svg:y1="-0.138cm" svg:x2="5.858cm" svg:y2="4.863cm"><text:p/></draw:line><draw:line draw:style-name="gr14" draw:text-style-name="P251" svg:x1="7.611cm" svg:y1="-0.138cm" svg:x2="7.611cm" svg:y2="4.863cm"><text:p/></draw:line><draw:line draw:style-name="gr14" draw:text-style-name="P251" svg:x1="11.361cm" svg:y1="-0.138cm" svg:x2="11.361cm" svg:y2="4.863cm"><text:p/></draw:line><draw:line draw:style-name="gr5" draw:text-style-name="P251" svg:x1="10.61cm" svg:y1="3.113cm" svg:x2="10.61cm" svg:y2="3.612cm"><text:p/></draw:line><draw:line draw:style-name="gr11" draw:text-style-name="P251" svg:x1="10.862cm" svg:y1="2.612cm" svg:x2="10.862cm" svg:y2="2.113cm"><text:p/></draw:line><draw:line draw:style-name="gr11" draw:text-style-name="P251" svg:x1="12.111cm" svg:y1="2.113cm" svg:x2="10.862cm" svg:y2="2.113cm"><text:p/></draw:line><draw:line draw:style-name="gr4" draw:text-style-name="P251" svg:x1="11.361cm" svg:y1="1.113cm" svg:x2="11.361cm" svg:y2="1.612cm"><text:p/></draw:line><draw:line draw:style-name="gr4" draw:text-style-name="P251" svg:x1="12.111cm" svg:y1="1.113cm" svg:x2="11.361cm" svg:y2="1.113cm"><text:p/></draw:line><draw:line draw:style-name="gr12" draw:text-style-name="P251" svg:x1="10.862cm" svg:y1="4.108cm" svg:x2="10.862cm" svg:y2="4.609cm"><text:p/></draw:line><draw:line draw:style-name="gr12" draw:text-style-name="P251" svg:x1="10.86cm" svg:y1="4.108cm" svg:x2="10.61cm" svg:y2="4.108cm"><text:p/></draw:line><draw:line draw:style-name="gr12" draw:text-style-name="P251" svg:x1="9.862cm" svg:y1="4.108cm" svg:x2="9.862cm" svg:y2="4.609cm"><text:p/></draw:line><draw:line draw:style-name="gr12" draw:text-style-name="P251" svg:x1="10.612cm" svg:y1="4.609cm" svg:x2="9.862cm" svg:y2="4.609cm"><text:p/></draw:line><draw:line draw:style-name="gr12" draw:text-style-name="P251" svg:x1="10.61cm" svg:y1="4.108cm" svg:x2="10.61cm" svg:y2="4.609cm"><text:p/></draw:line><draw:line draw:style-name="gr12" draw:text-style-name="P251" svg:x1="12.111cm" svg:y1="4.609cm" svg:x2="10.862cm" svg:y2="4.609cm"><text:p/></draw:line></draw:g><text:soft-page-break/></text:p>
      <text:list xml:id="list33626394" text:continue-numbering="true" text:style-name="L1">
        <text:list-item>
          <text:list>
            <text:list-item>
              <text:h text:style-name="P217" text:outline-level="2"><text:alphabetical-index-mark-start text:id="IMark100843576"/>FF_RSE<text:alphabetical-index-mark-end text:id="IMark100843576"/></text:h>
            </text:list-item>
          </text:list>
        </text:list-item>
      </text:list>
      <text:p text:style-name="P22">Type<text:tab/>Funktionsbaustein</text:p>
      <text:p text:style-name="P22"><text:span text:style-name="T16">Input</text:span><text:tab/>CS : BOOL (flankensensitiver Set)</text:p>
      <text:p text:style-name="P22"><text:tab/>CR : BOOL (flankensensitiver Reset)</text:p>
      <text:p text:style-name="P22"><text:tab/>RST : BOOL (asynchroner Reset)</text:p>
      <text:p text:style-name="P25"><draw:frame draw:style-name="fr4" draw:name="Grafik668" text:anchor-type="paragraph" svg:x="1.046cm" svg:y="0.69cm" svg:width="2.101cm" svg:height="1.921cm" draw:z-index="691"><draw:image xlink:href="Pictures/100000000000009F000000912310C34A.png" xlink:type="simple" xlink:show="embed" xlink:actuate="onLoad"/></draw:frame>Output<text:tab/>Q : BOOL (Ausgang)</text:p>
      <text:p text:style-name="P55"><text:line-break/>FF_RSE ist ein flankengetriggertes RS Flip-Flop. Der Ausgang Q wird durch eine steigende Flanke an CS gesetzt und durch eine steigende Flanke an CR gelöscht. Treten beide Flanken (CS und CR) gleichzeitig auf, so wird der Ausgang auf FALSE gesetzt. Ein Asynchroner Reset Eingang RST setzt den Ausgang jederzeit auf FALSE.</text:p>
      <text:p text:style-name="P55"/>
      <text:p text:style-name="P55"/>
      <text:p text:style-name="P55"/>
      <text:list xml:id="list33627600" text:continue-numbering="true" text:style-name="L1">
        <text:list-item>
          <text:list>
            <text:list-item>
              <text:h text:style-name="P217" text:outline-level="2"><text:soft-page-break/><text:alphabetical-index-mark-start text:id="IMark100843576"/>SELECT_8<text:alphabetical-index-mark-end text:id="IMark100843576"/></text:h>
            </text:list-item>
          </text:list>
        </text:list-item>
      </text:list>
      <text:p text:style-name="P22">Type<text:tab/>Funktionsbaustein</text:p>
      <text:p text:style-name="P22"><text:span text:style-name="T16">Input</text:span><text:tab/>EN : BOOL (<text:span text:style-name="T16">Enable</text:span> für Ausgänge)</text:p>
      <text:p text:style-name="P22"><text:tab/>SET : BOOL (asynchroner Set)</text:p>
      <text:p text:style-name="P22"><text:tab/>IN : BYTE (Vorgabewert für Set)</text:p>
      <text:p text:style-name="P22"><text:tab/>UP : BOOL (Vorwärts Schalter flankengetriggert)</text:p>
      <text:p text:style-name="P22"><text:tab/>DN : BOOL (Rückwärts Schalter flankengetriggert)</text:p>
      <text:p text:style-name="P22"><text:tab/>RST : BOOL (asynchroner Reset)</text:p>
      <text:p text:style-name="P25">Output<text:tab/>Q0 .. Q7 : BOOL (Ausgänge)</text:p>
      <text:p text:style-name="P55"><draw:frame draw:style-name="fr4" draw:name="Grafik436" text:anchor-type="paragraph" svg:x="1.046cm" svg:y="0.679cm" svg:width="2.937cm" svg:height="4.286cm" draw:z-index="440"><draw:image xlink:href="Pictures/100000000000006F000000A29C7EAB16.png" xlink:type="simple" xlink:show="embed" xlink:actuate="onLoad"/></draw:frame><text:tab/>STATE : BYTE (Status Ausgang)</text:p>
      <text:p text:style-name="P55"><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25"/>
          </table:table-cell>
          <table:table-cell table:style-name="Tabelle28.A1" office:value-type="string">
            <text:p text:style-name="P136">EN</text:p>
          </table:table-cell>
          <table:table-cell table:style-name="Tabelle28.A1" office:value-type="string">
            <text:p text:style-name="P136">SET</text:p>
          </table:table-cell>
          <table:table-cell table:style-name="Tabelle28.A1" office:value-type="string">
            <text:p text:style-name="P136">IN</text:p>
          </table:table-cell>
          <table:table-cell table:style-name="Tabelle28.A1" office:value-type="string">
            <text:p text:style-name="P136">UP</text:p>
          </table:table-cell>
          <table:table-cell table:style-name="Tabelle28.A1" office:value-type="string">
            <text:p text:style-name="P136">DN</text:p>
          </table:table-cell>
          <table:table-cell table:style-name="Tabelle28.A1" office:value-type="string">
            <text:p text:style-name="P136">RST</text:p>
          </table:table-cell>
          <table:table-cell table:style-name="Tabelle28.A1" office:value-type="string">
            <text:p text:style-name="P136">Q</text:p>
          </table:table-cell>
          <table:table-cell table:style-name="Tabelle28.I1" office:value-type="string">
            <text:p text:style-name="P136">STATE</text:p>
          </table:table-cell>
        </table:table-row>
        <table:table-row table:style-name="Tabelle28.1">
          <table:table-cell table:style-name="Tabelle28.A2" office:value-type="string">
            <text:p text:style-name="P137">Reset</text:p>
          </table:table-cell>
          <table:table-cell table:style-name="Tabelle28.A2" office:value-type="string">
            <text:p text:style-name="P136">X</text:p>
          </table:table-cell>
          <table:table-cell table:style-name="Tabelle28.A2" office:value-type="string">
            <text:p text:style-name="P136">-</text:p>
          </table:table-cell>
          <table:table-cell table:style-name="Tabelle28.A2" office:value-type="string">
            <text:p text:style-name="P136">-</text:p>
          </table:table-cell>
          <table:table-cell table:style-name="Tabelle28.A2" office:value-type="string">
            <text:p text:style-name="P136">-</text:p>
          </table:table-cell>
          <table:table-cell table:style-name="Tabelle28.A2" office:value-type="string">
            <text:p text:style-name="P136">-</text:p>
          </table:table-cell>
          <table:table-cell table:style-name="Tabelle28.A2" office:value-type="string">
            <text:p text:style-name="P136">1</text:p>
          </table:table-cell>
          <table:table-cell table:style-name="Tabelle28.A2" office:value-type="string">
            <text:p text:style-name="P136">Q0 <text:span text:style-name="T16">if</text:span> EN=1</text:p>
          </table:table-cell>
          <table:table-cell table:style-name="Tabelle28.I2" office:value-type="string">
            <text:p text:style-name="P136">0</text:p>
          </table:table-cell>
        </table:table-row>
        <table:table-row table:style-name="Tabelle28.1">
          <table:table-cell table:style-name="Tabelle28.A2" office:value-type="string">
            <text:p text:style-name="P136">Set</text:p>
          </table:table-cell>
          <table:table-cell table:style-name="Tabelle28.A2" office:value-type="string">
            <text:p text:style-name="P136">X</text:p>
          </table:table-cell>
          <table:table-cell table:style-name="Tabelle28.A2" office:value-type="string">
            <text:p text:style-name="P136">1</text:p>
          </table:table-cell>
          <table:table-cell table:style-name="Tabelle28.A2" office:value-type="string">
            <text:p text:style-name="P136">N</text:p>
          </table:table-cell>
          <table:table-cell table:style-name="Tabelle28.A2" office:value-type="string">
            <text:p text:style-name="P136">-</text:p>
          </table:table-cell>
          <table:table-cell table:style-name="Tabelle28.A2" office:value-type="string">
            <text:p text:style-name="P136">-</text:p>
          </table:table-cell>
          <table:table-cell table:style-name="Tabelle28.A2" office:value-type="string">
            <text:p text:style-name="P136">0</text:p>
          </table:table-cell>
          <table:table-cell table:style-name="Tabelle28.A2" office:value-type="string">
            <text:p text:style-name="P136">QN <text:span text:style-name="T16">if</text:span> EN=1</text:p>
          </table:table-cell>
          <table:table-cell table:style-name="Tabelle28.I2" office:value-type="string">
            <text:p text:style-name="P136">N</text:p>
          </table:table-cell>
        </table:table-row>
        <table:table-row table:style-name="Tabelle28.1">
          <table:table-cell table:style-name="Tabelle28.A2" office:value-type="string">
            <text:p text:style-name="P136">up</text:p>
          </table:table-cell>
          <table:table-cell table:style-name="Tabelle28.A2" office:value-type="string">
            <text:p text:style-name="P136">X</text:p>
          </table:table-cell>
          <table:table-cell table:style-name="Tabelle28.A2" office:value-type="string">
            <text:p text:style-name="P136">0</text:p>
          </table:table-cell>
          <table:table-cell table:style-name="Tabelle28.A2" office:value-type="string">
            <text:p text:style-name="P136">-</text:p>
          </table:table-cell>
          <table:table-cell table:style-name="Tabelle28.A2" office:value-type="string">
            <text:p text:style-name="P135">↑</text:p>
          </table:table-cell>
          <table:table-cell table:style-name="Tabelle28.A2" office:value-type="string">
            <text:p text:style-name="P136">0</text:p>
          </table:table-cell>
          <table:table-cell table:style-name="Tabelle28.A2" office:value-type="string">
            <text:p text:style-name="P136">0</text:p>
          </table:table-cell>
          <table:table-cell table:style-name="Tabelle28.A2" office:value-type="string">
            <text:p text:style-name="P136">QN+1 <text:span text:style-name="T16">if</text:span> EN=1</text:p>
          </table:table-cell>
          <table:table-cell table:style-name="Tabelle28.I2" office:value-type="string">
            <text:p text:style-name="P136">N + 1</text:p>
          </table:table-cell>
        </table:table-row>
        <table:table-row table:style-name="Tabelle28.5">
          <table:table-cell table:style-name="Tabelle28.A2" office:value-type="string">
            <text:p text:style-name="P138">down</text:p>
          </table:table-cell>
          <table:table-cell table:style-name="Tabelle28.A2" office:value-type="string">
            <text:p text:style-name="P136">X</text:p>
          </table:table-cell>
          <table:table-cell table:style-name="Tabelle28.A2" office:value-type="string">
            <text:p text:style-name="P136">0</text:p>
          </table:table-cell>
          <table:table-cell table:style-name="Tabelle28.A2" office:value-type="string">
            <text:p text:style-name="P136">-</text:p>
          </table:table-cell>
          <table:table-cell table:style-name="Tabelle28.E5" office:value-type="string">
            <text:p text:style-name="P202">0</text:p>
          </table:table-cell>
          <table:table-cell table:style-name="Tabelle28.A2" office:value-type="string">
            <text:p text:style-name="P135">↑</text:p>
          </table:table-cell>
          <table:table-cell table:style-name="Tabelle28.A2" office:value-type="string">
            <text:p text:style-name="P136">0</text:p>
          </table:table-cell>
          <table:table-cell table:style-name="Tabelle28.A2" office:value-type="string">
            <text:p text:style-name="P136">QN-1 <text:span text:style-name="T16">if</text:span> EN=1</text:p>
          </table:table-cell>
          <table:table-cell table:style-name="Tabelle28.I2" office:value-type="string">
            <text:p text:style-name="P136">N - 1</text:p>
          </table:table-cell>
        </table:table-row>
      </table:table>
      <text:p text:style-name="P55"/>
      <text:list xml:id="list33650076" text:continue-numbering="true" text:style-name="L1">
        <text:list-item>
          <text:list>
            <text:list-item>
              <text:h text:style-name="P217" text:outline-level="2"><text:soft-page-break/><text:alphabetical-index-mark-start text:id="IMark100843576"/>LATCH<text:alphabetical-index-mark-end text:id="IMark100843576"/></text:h>
            </text:list-item>
          </text:list>
        </text:list-item>
      </text:list>
      <text:p text:style-name="P22">Type<text:tab/>Funktionsbaustein</text:p>
      <text:p text:style-name="P22"><text:span text:style-name="T16">Input</text:span><text:tab/>D : BOOL (Data in)</text:p>
      <text:p text:style-name="P22"><text:tab/>L : BOOL (<text:span text:style-name="T16">Latch</text:span> <text:span text:style-name="T16">enable</text:span> Signal)</text:p>
      <text:p text:style-name="P22"><text:tab/>RST : BOOL (asynchroner Reset)</text:p>
      <text:p text:style-name="P25"><draw:frame draw:style-name="fr4" draw:name="Grafik124" text:anchor-type="paragraph" svg:x="1.109cm" svg:y="0.677cm" svg:width="2.281cm" svg:height="2.2cm" draw:z-index="93"><draw:image xlink:href="Pictures/10000000000000AC000000A6504A3E07.png" xlink:type="simple" xlink:show="embed" xlink:actuate="onLoad"/></draw:frame>Output<text:tab/>Q : BOOL (Data <text:span text:style-name="T16">Out</text:span>)</text:p>
      <text:p text:style-name="P25"><text:line-break/>LTCH ist ein transparentes Speicherelement (<text:span text:style-name="T16">Latch</text:span>). Solange L TRUE ist, folgt Q dem Eingang D und mit der fallenden Flanke von L speichert der Ausgang Q das aktuelle Eingangssignal an D. Mit dem asynchronen Reset-Eingang kann das <text:span text:style-name="T16">Latch</text:span> jederzeit unabhängig von L gelöscht werden.</text:p>
      <text:p text:style-name="P25"><draw:g text:anchor-type="paragraph" draw:z-index="94" draw:style-name="gr1"><draw:line draw:style-name="gr4" draw:text-style-name="P251" svg:x1="3.152cm" svg:y1="1.656cm" svg:x2="3.152cm" svg:y2="1.157cm"><text:p/></draw:line><draw:line draw:style-name="gr4" draw:text-style-name="P251" svg:x1="4.152cm" svg:y1="1.157cm" svg:x2="3.152cm" svg:y2="1.157cm"><text:p/></draw:line><draw:line draw:style-name="gr4" draw:text-style-name="P251" svg:x1="4.152cm" svg:y1="1.157cm" svg:x2="4.152cm" svg:y2="1.656cm"><text:p/></draw:line><draw:line draw:style-name="gr4" draw:text-style-name="P251" svg:x1="5.152cm" svg:y1="1.656cm" svg:x2="4.152cm" svg:y2="1.656cm"><text:p/></draw:line><draw:line draw:style-name="gr4" draw:text-style-name="P251" svg:x1="2.152cm" svg:y1="1.656cm" svg:x2="3.152cm" svg:y2="1.656cm"><text:p/></draw:line><draw:frame draw:style-name="gr6" draw:text-style-name="P253" svg:width="1.251cm" svg:height="0.65cm" svg:x="1.152cm" svg:y="1.157cm"><draw:text-box><text:p text:style-name="P252"><text:span text:style-name="T50">L</text:span></text:p></draw:text-box></draw:frame><draw:line draw:style-name="gr4" draw:text-style-name="P251" svg:x1="5.154cm" svg:y1="1.157cm" svg:x2="5.154cm" svg:y2="1.656cm"><text:p/></draw:line><draw:line draw:style-name="gr4" draw:text-style-name="P251" svg:x1="5.902cm" svg:y1="1.656cm" svg:x2="5.401cm" svg:y2="1.656cm"><text:p/></draw:line><draw:line draw:style-name="gr4" draw:text-style-name="P251" svg:x1="5.902cm" svg:y1="1.157cm" svg:x2="5.902cm" svg:y2="1.656cm"><text:p/></draw:line><draw:line draw:style-name="gr4" draw:text-style-name="P251" svg:x1="6.652cm" svg:y1="1.157cm" svg:x2="5.902cm" svg:y2="1.157cm"><text:p/></draw:line><draw:line draw:style-name="gr4" draw:text-style-name="P251" svg:x1="7.652cm" svg:y1="1.656cm" svg:x2="7.652cm" svg:y2="1.157cm"><text:p/></draw:line><draw:line draw:style-name="gr4" draw:text-style-name="P251" svg:x1="10.402cm" svg:y1="1.656cm" svg:x2="8.652cm" svg:y2="1.656cm"><text:p/></draw:line><draw:line draw:style-name="gr4" draw:text-style-name="P251" svg:x1="5.401cm" svg:y1="1.157cm" svg:x2="5.401cm" svg:y2="1.656cm"><text:p/></draw:line><draw:line draw:style-name="gr4" draw:text-style-name="P251" svg:x1="6.652cm" svg:y1="1.157cm" svg:x2="6.652cm" svg:y2="1.656cm"><text:p/></draw:line><draw:line draw:style-name="gr4" draw:text-style-name="P251" svg:x1="5.154cm" svg:y1="1.157cm" svg:x2="5.403cm" svg:y2="1.157cm"><text:p/></draw:line><draw:line draw:style-name="gr4" draw:text-style-name="P251" svg:x1="6.652cm" svg:y1="1.656cm" svg:x2="7.652cm" svg:y2="1.656cm"><text:p/></draw:line><draw:line draw:style-name="gr11" draw:text-style-name="P251" svg:x1="9.904cm" svg:y1="3.656cm" svg:x2="9.904cm" svg:y2="3.157cm"><text:p/></draw:line><draw:line draw:style-name="gr11" draw:text-style-name="P251" svg:x1="10.153cm" svg:y1="3.157cm" svg:x2="9.904cm" svg:y2="3.157cm"><text:p/></draw:line><draw:line draw:style-name="gr11" draw:text-style-name="P251" svg:x1="2.152cm" svg:y1="3.658cm" svg:x2="9.903cm" svg:y2="3.658cm"><text:p/></draw:line><draw:frame draw:style-name="gr6" draw:text-style-name="P253" svg:width="1.251cm" svg:height="0.65cm" svg:x="1.152cm" svg:y="3.157cm"><draw:text-box><text:p text:style-name="P252"><text:span text:style-name="T50">RST</text:span></text:p></draw:text-box></draw:frame><draw:line draw:style-name="gr11" draw:text-style-name="P251" svg:x1="10.902cm" svg:y1="3.658cm" svg:x2="10.151cm" svg:y2="3.658cm"><text:p/></draw:line><draw:line draw:style-name="gr11" draw:text-style-name="P251" svg:x1="10.151cm" svg:y1="3.157cm" svg:x2="10.151cm" svg:y2="3.656cm"><text:p/></draw:line><draw:line draw:style-name="gr5" draw:text-style-name="P251" svg:x1="10.652cm" svg:y1="4.159cm" svg:x2="12.151cm" svg:y2="4.159cm"><text:p/></draw:line><draw:line draw:style-name="gr5" draw:text-style-name="P251" svg:x1="10.652cm" svg:y1="4.658cm" svg:x2="2.152cm" svg:y2="4.658cm"><text:p/></draw:line><draw:frame draw:style-name="gr6" draw:text-style-name="P253" svg:width="0.997cm" svg:height="0.65cm" svg:x="1.152cm" svg:y="2.157cm"><draw:text-box><text:p text:style-name="P252"><text:span text:style-name="T50">Q</text:span></text:p></draw:text-box></draw:frame><draw:frame draw:style-name="gr6" draw:text-style-name="P253" svg:width="1.251cm" svg:height="0.65cm" svg:x="1.152cm" svg:y="4.158cm"><draw:text-box><text:p text:style-name="P252"><text:span text:style-name="T50">SET</text:span></text:p></draw:text-box></draw:frame><draw:line draw:style-name="gr12" draw:text-style-name="P251" svg:x1="2.152cm" svg:y1="2.656cm" svg:x2="3.403cm" svg:y2="2.656cm"><text:p/></draw:line><draw:line draw:style-name="gr12" draw:text-style-name="P251" svg:x1="3.403cm" svg:y1="2.157cm" svg:x2="3.403cm" svg:y2="2.656cm"><text:p/></draw:line><draw:line draw:style-name="gr12" draw:text-style-name="P251" svg:x1="3.652cm" svg:y1="2.157cm" svg:x2="3.403cm" svg:y2="2.157cm"><text:p/></draw:line><draw:line draw:style-name="gr12" draw:text-style-name="P251" svg:x1="3.651cm" svg:y1="2.157cm" svg:x2="3.651cm" svg:y2="2.656cm"><text:p/></draw:line><draw:line draw:style-name="gr12" draw:text-style-name="P251" svg:x1="6.154cm" svg:y1="2.656cm" svg:x2="5.154cm" svg:y2="2.656cm"><text:p/></draw:line><draw:line draw:style-name="gr12" draw:text-style-name="P251" svg:x1="6.154cm" svg:y1="2.157cm" svg:x2="6.154cm" svg:y2="2.656cm"><text:p/></draw:line><draw:line draw:style-name="gr12" draw:text-style-name="P251" svg:x1="9.654cm" svg:y1="2.157cm" svg:x2="6.154cm" svg:y2="2.157cm"><text:p/></draw:line><draw:line draw:style-name="gr12" draw:text-style-name="P251" svg:x1="10.654cm" svg:y1="2.656cm" svg:x2="9.904cm" svg:y2="2.656cm"><text:p/></draw:line><draw:line draw:style-name="gr5" draw:text-style-name="P251" svg:x1="10.652cm" svg:y1="4.159cm" svg:x2="10.652cm" svg:y2="4.658cm"><text:p/></draw:line><draw:line draw:style-name="gr11" draw:text-style-name="P251" svg:x1="10.903cm" svg:y1="3.656cm" svg:x2="10.903cm" svg:y2="3.157cm"><text:p/></draw:line><draw:line draw:style-name="gr11" draw:text-style-name="P251" svg:x1="12.152cm" svg:y1="3.157cm" svg:x2="10.903cm" svg:y2="3.157cm"><text:p/></draw:line><draw:line draw:style-name="gr4" draw:text-style-name="P251" svg:x1="10.402cm" svg:y1="1.157cm" svg:x2="10.402cm" svg:y2="1.656cm"><text:p/></draw:line><draw:line draw:style-name="gr4" draw:text-style-name="P251" svg:x1="12.152cm" svg:y1="1.157cm" svg:x2="10.402cm" svg:y2="1.157cm"><text:p/></draw:line><draw:line draw:style-name="gr12" draw:text-style-name="P251" svg:x1="10.903cm" svg:y1="2.157cm" svg:x2="10.903cm" svg:y2="2.656cm"><text:p/></draw:line><draw:line draw:style-name="gr12" draw:text-style-name="P251" svg:x1="10.902cm" svg:y1="2.157cm" svg:x2="10.652cm" svg:y2="2.157cm"><text:p/></draw:line><draw:line draw:style-name="gr12" draw:text-style-name="P251" svg:x1="10.654cm" svg:y1="2.656cm" svg:x2="9.904cm" svg:y2="2.656cm"><text:p/></draw:line><draw:line draw:style-name="gr12" draw:text-style-name="P251" svg:x1="10.652cm" svg:y1="2.157cm" svg:x2="10.652cm" svg:y2="2.656cm"><text:p/></draw:line><draw:line draw:style-name="gr12" draw:text-style-name="P251" svg:x1="12.152cm" svg:y1="2.656cm" svg:x2="10.903cm" svg:y2="2.656cm"><text:p/></draw:line><draw:line draw:style-name="gr2" draw:text-style-name="P251" svg:x1="2.152cm" svg:y1="0.656cm" svg:x2="3.403cm" svg:y2="0.656cm"><text:p/></draw:line><draw:line draw:style-name="gr2" draw:text-style-name="P251" svg:x1="3.403cm" svg:y1="0.157cm" svg:x2="3.403cm" svg:y2="0.656cm"><text:p/></draw:line><draw:line draw:style-name="gr2" draw:text-style-name="P251" svg:x1="3.902cm" svg:y1="0.157cm" svg:x2="4.652cm" svg:y2="0.157cm"><text:p/></draw:line><draw:line draw:style-name="gr2" draw:text-style-name="P251" svg:x1="4.653cm" svg:y1="0.656cm" svg:x2="4.653cm" svg:y2="0.157cm"><text:p/></draw:line><draw:line draw:style-name="gr2" draw:text-style-name="P251" svg:x1="5.154cm" svg:y1="0.656cm" svg:x2="6.154cm" svg:y2="0.656cm"><text:p/></draw:line><draw:line draw:style-name="gr2" draw:text-style-name="P251" svg:x1="6.154cm" svg:y1="0.157cm" svg:x2="6.154cm" svg:y2="0.656cm"><text:p/></draw:line><draw:line draw:style-name="gr2" draw:text-style-name="P251" svg:x1="9.151cm" svg:y1="0.656cm" svg:x2="12.151cm" svg:y2="0.656cm"><text:p/></draw:line><draw:frame draw:style-name="gr6" draw:text-style-name="P253" svg:width="0.997cm" svg:height="0.65cm" svg:x="1.152cm" svg:y="0.157cm"><draw:text-box><text:p text:style-name="P252"><text:span text:style-name="T50">D</text:span></text:p></draw:text-box></draw:frame><draw:line draw:style-name="gr2" draw:text-style-name="P251" svg:x1="6.154cm" svg:y1="0.157cm" svg:x2="9.153cm" svg:y2="0.157cm"><text:p/></draw:line><draw:line draw:style-name="gr2" draw:text-style-name="P251" svg:x1="9.151cm" svg:y1="0.157cm" svg:x2="9.151cm" svg:y2="0.656cm"><text:p/></draw:line><draw:line draw:style-name="gr2" draw:text-style-name="P251" svg:x1="4.653cm" svg:y1="0.656cm" svg:x2="6.154cm" svg:y2="0.656cm"><text:p/></draw:line><draw:line draw:style-name="gr2" draw:text-style-name="P251" svg:x1="6.154cm" svg:y1="0.157cm" svg:x2="6.154cm" svg:y2="0.656cm"><text:p/></draw:line><draw:line draw:style-name="gr4" draw:text-style-name="P251" svg:x1="8.652cm" svg:y1="1.157cm" svg:x2="7.652cm" svg:y2="1.157cm"><text:p/></draw:line><draw:line draw:style-name="gr4" draw:text-style-name="P251" svg:x1="8.652cm" svg:y1="1.157cm" svg:x2="8.652cm" svg:y2="1.656cm"><text:p/></draw:line><draw:line draw:style-name="gr12" draw:text-style-name="P251" svg:x1="9.904cm" svg:y1="2.157cm" svg:x2="8.904cm" svg:y2="2.157cm"><text:p/></draw:line><draw:line draw:style-name="gr12" draw:text-style-name="P251" svg:x1="9.904cm" svg:y1="2.157cm" svg:x2="9.904cm" svg:y2="2.656cm"><text:p/></draw:line><draw:line draw:style-name="gr2" draw:text-style-name="P251" svg:x1="3.902cm" svg:y1="0.157cm" svg:x2="3.902cm" svg:y2="0.656cm"><text:p/></draw:line><draw:line draw:style-name="gr2" draw:text-style-name="P251" svg:x1="3.651cm" svg:y1="0.656cm" svg:x2="3.901cm" svg:y2="0.656cm"><text:p/></draw:line><draw:line draw:style-name="gr2" draw:text-style-name="P251" svg:x1="3.651cm" svg:y1="0.656cm" svg:x2="3.651cm" svg:y2="0.157cm"><text:p/></draw:line><draw:line draw:style-name="gr2" draw:text-style-name="P251" svg:x1="3.403cm" svg:y1="0.157cm" svg:x2="3.652cm" svg:y2="0.157cm"><text:p/></draw:line><draw:line draw:style-name="gr12" draw:text-style-name="P251" svg:x1="3.902cm" svg:y1="2.157cm" svg:x2="3.902cm" svg:y2="2.656cm"><text:p/></draw:line><draw:line draw:style-name="gr12" draw:text-style-name="P251" svg:x1="5.153cm" svg:y1="2.157cm" svg:x2="3.902cm" svg:y2="2.157cm"><text:p/></draw:line><draw:line draw:style-name="gr12" draw:text-style-name="P251" svg:x1="5.154cm" svg:y1="2.157cm" svg:x2="5.154cm" svg:y2="2.656cm"><text:p/></draw:line><draw:line draw:style-name="gr12" draw:text-style-name="P251" svg:x1="3.901cm" svg:y1="2.656cm" svg:x2="3.651cm" svg:y2="2.656cm"><text:p/></draw:line></draw:g></text:p>
      <text:list xml:id="list33626298" text:continue-numbering="true" text:style-name="L1">
        <text:list-item>
          <text:list>
            <text:list-item>
              <text:h text:style-name="P217" text:outline-level="2"><text:alphabetical-index-mark-start text:id="IMark100843576"/>LATCH4<text:alphabetical-index-mark-end text:id="IMark100843576"/></text:h>
            </text:list-item>
          </text:list>
        </text:list-item>
      </text:list>
      <text:p text:style-name="P22">Type<text:tab/>Funktionsbaustein</text:p>
      <text:p text:style-name="P22"><text:span text:style-name="T16">Input</text:span><text:tab/>D0 .. D3 : BOOL (Data in)</text:p>
      <text:p text:style-name="P22"><text:tab/>L : BOOL (<text:span text:style-name="T16">Latch</text:span> <text:span text:style-name="T16">enable</text:span> Signal)</text:p>
      <text:p text:style-name="P22"><text:tab/>RST : BOOL (asynchroner Reset)</text:p>
      <text:p text:style-name="P25"><draw:frame draw:style-name="fr4" draw:name="Grafik125" text:anchor-type="paragraph" svg:x="1.162cm" svg:y="0.67cm" svg:width="2.281cm" svg:height="3.54cm" draw:z-index="95"><draw:image xlink:href="Pictures/10000000000000AC0000010C06D23609.png" xlink:type="simple" xlink:show="embed" xlink:actuate="onLoad"/></draw:frame>Output<text:tab/>Q0 .. Q3 : BOOL (Data <text:span text:style-name="T16">Out</text:span>)</text:p>
      <text:p text:style-name="P25"><text:soft-page-break/><text:line-break/>LTCH4 ist ein transparentes Speicherelement (<text:span text:style-name="T16">Latch</text:span>). Solange L TRUE ist folgen Q0 - Q3 den Eingängen D0 - D3 und mit der fallenden Flanke von L speichern die Ausgänge Q0 - Q3 das aktuelle Eingangssignal von D0 - D3. Mit dem asynchronen Reset-Eingang kann das <text:span text:style-name="T16">Latch</text:span> jederzeit unabhängig von L gelöscht werden. Weitere Erläuterungen und Angaben finden Sie beim Baustein LTCH.</text:p>
      <text:list xml:id="list33643408" text:continue-numbering="true" text:style-name="L1">
        <text:list-item>
          <text:list>
            <text:list-item>
              <text:h text:style-name="P217" text:outline-level="2"><text:alphabetical-index-mark-start text:id="IMark100843576"/>SHR_4E<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D0 : BOOL (Data Input)</text:p>
      <text:p text:style-name="P22"><text:tab/>CLK : BOOL (Takteingang)</text:p>
      <text:p text:style-name="P22"><text:tab/>RST : BOOL (asynchroner Reset)</text:p>
      <text:p text:style-name="P25">Output<text:tab/>Q0 : BOOL (Data <text:span text:style-name="T16">Out</text:span> 0)</text:p>
      <text:p text:style-name="P25"><text:tab/>Q1 : BOOL (Data <text:span text:style-name="T16">Out</text:span> 1)</text:p>
      <text:p text:style-name="P25"><text:tab/>Q2 : BOOL (Data <text:span text:style-name="T16">Out</text:span> 2)</text:p>
      <text:p text:style-name="P25"><text:tab/>Q3 : BOOL (Data <text:span text:style-name="T16">Out</text:span> 3)</text:p>
      <text:p text:style-name="P25"><draw:frame draw:style-name="fr4" draw:name="Grafik123" text:anchor-type="paragraph" svg:x="1.291cm" svg:y="0.157cm" svg:width="2.281cm" svg:height="2.649cm" draw:z-index="96"><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25"><text:soft-page-break/></text:p>
      <text:p text:style-name="P25"><draw:g text:anchor-type="paragraph" draw:z-index="97" draw:style-name="gr1"><draw:line draw:style-name="gr13" draw:text-style-name="P251" svg:x1="2.577cm" svg:y1="0.947cm" svg:x2="3.395cm" svg:y2="0.947cm"><text:p/></draw:line><draw:line draw:style-name="gr13" draw:text-style-name="P251" svg:x1="3.399cm" svg:y1="0.536cm" svg:x2="3.399cm" svg:y2="0.946cm"><text:p/></draw:line><draw:line draw:style-name="gr13" draw:text-style-name="P251" svg:x1="7.215cm" svg:y1="0.536cm" svg:x2="7.215cm" svg:y2="0.946cm"><text:p/></draw:line><draw:frame draw:style-name="gr15" draw:text-style-name="P253" svg:width="1.089cm" svg:height="0.652cm" svg:x="1.49cm" svg:y="0.536cm"><draw:text-box><text:p text:style-name="P252"><text:span text:style-name="T50">D</text:span></text:p></draw:text-box></draw:frame><draw:line draw:style-name="gr13" draw:text-style-name="P251" svg:x1="7.215cm" svg:y1="0.536cm" svg:x2="13.488cm" svg:y2="0.536cm"><text:p/></draw:line><draw:line draw:style-name="gr13" draw:text-style-name="P251" svg:x1="5.855cm" svg:y1="0.947cm" svg:x2="7.218cm" svg:y2="0.947cm"><text:p/></draw:line><draw:line draw:style-name="gr4" draw:text-style-name="P251" svg:x1="3.668cm" svg:y1="1.768cm" svg:x2="3.668cm" svg:y2="1.358cm"><text:p/></draw:line><draw:line draw:style-name="gr4" draw:text-style-name="P251" svg:x1="2.577cm" svg:y1="1.769cm" svg:x2="3.668cm" svg:y2="1.769cm"><text:p/></draw:line><draw:frame draw:style-name="gr16" draw:text-style-name="P253" svg:width="1.364cm" svg:height="1.05cm" svg:x="1.49cm" svg:y="1.357cm"><draw:text-box><text:p text:style-name="P252"><text:span text:style-name="T50">CLK</text:span></text:p></draw:text-box></draw:frame><draw:line draw:style-name="gr4" draw:text-style-name="P251" svg:x1="5.851cm" svg:y1="1.769cm" svg:x2="5.304cm" svg:y2="1.769cm"><text:p/></draw:line><draw:line draw:style-name="gr4" draw:text-style-name="P251" svg:x1="6.671cm" svg:y1="1.358cm" svg:x2="6.671cm" svg:y2="1.768cm"><text:p/></draw:line><draw:line draw:style-name="gr4" draw:text-style-name="P251" svg:x1="7.489cm" svg:y1="1.769cm" svg:x2="6.671cm" svg:y2="1.769cm"><text:p/></draw:line><draw:line draw:style-name="gr4" draw:text-style-name="P251" svg:x1="8.581cm" svg:y1="1.768cm" svg:x2="8.581cm" svg:y2="1.358cm"><text:p/></draw:line><draw:line draw:style-name="gr4" draw:text-style-name="P251" svg:x1="9.128cm" svg:y1="1.358cm" svg:x2="8.581cm" svg:y2="1.358cm"><text:p/></draw:line><draw:line draw:style-name="gr4" draw:text-style-name="P251" svg:x1="10.763cm" svg:y1="1.358cm" svg:x2="10.763cm" svg:y2="1.768cm"><text:p/></draw:line><draw:line draw:style-name="gr4" draw:text-style-name="P251" svg:x1="12.672cm" svg:y1="1.769cm" svg:x2="10.763cm" svg:y2="1.769cm"><text:p/></draw:line><draw:line draw:style-name="gr4" draw:text-style-name="P251" svg:x1="5.855cm" svg:y1="1.358cm" svg:x2="5.855cm" svg:y2="1.768cm"><text:p/></draw:line><draw:line draw:style-name="gr4" draw:text-style-name="P251" svg:x1="7.49cm" svg:y1="1.358cm" svg:x2="7.49cm" svg:y2="1.768cm"><text:p/></draw:line><draw:polyline draw:style-name="gr4" draw:text-style-name="P251" svg:width="0cm" svg:height="0cm" svg:x="5.304cm" svg:y="1.358cm" svg:viewBox="0 0 0 0" draw:points="0,0"><text:p/></draw:polyline><draw:line draw:style-name="gr11" draw:text-style-name="P251" svg:x1="11.034cm" svg:y1="2.59cm" svg:x2="11.034cm" svg:y2="2.18cm"><text:p/></draw:line><draw:line draw:style-name="gr11" draw:text-style-name="P251" svg:x1="11.306cm" svg:y1="2.18cm" svg:x2="11.034cm" svg:y2="2.18cm"><text:p/></draw:line><draw:line draw:style-name="gr11" draw:text-style-name="P251" svg:x1="2.577cm" svg:y1="2.588cm" svg:x2="11.033cm" svg:y2="2.588cm"><text:p/></draw:line><draw:frame draw:style-name="gr16" draw:text-style-name="P253" svg:width="1.364cm" svg:height="1.05cm" svg:x="1.49cm" svg:y="2.179cm"><draw:text-box><text:p text:style-name="P252"><text:span text:style-name="T50">RST</text:span></text:p></draw:text-box></draw:frame><draw:line draw:style-name="gr11" draw:text-style-name="P251" svg:x1="12.122cm" svg:y1="2.588cm" svg:x2="11.303cm" svg:y2="2.588cm"><text:p/></draw:line><draw:line draw:style-name="gr11" draw:text-style-name="P251" svg:x1="11.303cm" svg:y1="2.18cm" svg:x2="11.303cm" svg:y2="2.59cm"><text:p/></draw:line><draw:line draw:style-name="gr5" draw:text-style-name="P251" svg:x1="11.853cm" svg:y1="3.002cm" svg:x2="13.488cm" svg:y2="3.002cm"><text:p/></draw:line><draw:line draw:style-name="gr5" draw:text-style-name="P251" svg:x1="11.85cm" svg:y1="3.409cm" svg:x2="2.577cm" svg:y2="3.409cm"><text:p/></draw:line><draw:frame draw:style-name="gr17" draw:text-style-name="P253" svg:width="1.089cm" svg:height="0.653cm" svg:x="1.49cm" svg:y="3.817cm"><draw:text-box><text:p text:style-name="P252"><text:span text:style-name="T50">Q</text:span></text:p></draw:text-box></draw:frame><draw:frame draw:style-name="gr18" draw:text-style-name="P253" svg:width="1.364cm" svg:height="1.052cm" svg:x="1.49cm" svg:y="2.997cm"><draw:text-box><text:p text:style-name="P252"><text:span text:style-name="T50">SET</text:span></text:p></draw:text-box></draw:frame><draw:line draw:style-name="gr12" draw:text-style-name="P251" svg:x1="2.577cm" svg:y1="4.229cm" svg:x2="3.668cm" svg:y2="4.229cm"><text:p/></draw:line><draw:line draw:style-name="gr12" draw:text-style-name="P251" svg:x1="3.668cm" svg:y1="3.818cm" svg:x2="3.668cm" svg:y2="4.229cm"><text:p/></draw:line><draw:line draw:style-name="gr12" draw:text-style-name="P251" svg:x1="7.49cm" svg:y1="3.818cm" svg:x2="7.49cm" svg:y2="4.229cm"><text:p/></draw:line><draw:line draw:style-name="gr12" draw:text-style-name="P251" svg:x1="8.581cm" svg:y1="3.818cm" svg:x2="7.49cm" svg:y2="3.818cm"><text:p/></draw:line><draw:line draw:style-name="gr12" draw:text-style-name="P251" svg:x1="11.037cm" svg:y1="3.818cm" svg:x2="8.581cm" svg:y2="3.818cm"><text:p/></draw:line><draw:line draw:style-name="gr12" draw:text-style-name="P251" svg:x1="11.034cm" svg:y1="3.818cm" svg:x2="11.034cm" svg:y2="4.229cm"><text:p/></draw:line><draw:line draw:style-name="gr12" draw:text-style-name="P251" svg:x1="11.852cm" svg:y1="4.229cm" svg:x2="11.034cm" svg:y2="4.229cm"><text:p/></draw:line><draw:line draw:style-name="gr14" draw:text-style-name="P251" svg:x1="3.668cm" svg:y1="0.33cm" svg:x2="3.668cm" svg:y2="4.435cm"><text:p/></draw:line><draw:line draw:style-name="gr14" draw:text-style-name="P251" svg:x1="5.855cm" svg:y1="0.33cm" svg:x2="5.855cm" svg:y2="6.896cm"><text:p/></draw:line><draw:line draw:style-name="gr14" draw:text-style-name="P251" svg:x1="8.581cm" svg:y1="0.33cm" svg:x2="8.581cm" svg:y2="6.896cm"><text:p/></draw:line><draw:line draw:style-name="gr14" draw:text-style-name="P251" svg:x1="12.67cm" svg:y1="0.33cm" svg:x2="12.67cm" svg:y2="4.435cm"><text:p/></draw:line><draw:line draw:style-name="gr5" draw:text-style-name="P251" svg:x1="11.853cm" svg:y1="3.002cm" svg:x2="11.853cm" svg:y2="3.412cm"><text:p/></draw:line><draw:line draw:style-name="gr11" draw:text-style-name="P251" svg:x1="12.124cm" svg:y1="2.59cm" svg:x2="12.124cm" svg:y2="2.18cm"><text:p/></draw:line><draw:line draw:style-name="gr11" draw:text-style-name="P251" svg:x1="13.487cm" svg:y1="2.18cm" svg:x2="12.124cm" svg:y2="2.18cm"><text:p/></draw:line><draw:line draw:style-name="gr4" draw:text-style-name="P251" svg:x1="12.67cm" svg:y1="1.358cm" svg:x2="12.67cm" svg:y2="1.768cm"><text:p/></draw:line><draw:line draw:style-name="gr4" draw:text-style-name="P251" svg:x1="13.488cm" svg:y1="1.358cm" svg:x2="12.67cm" svg:y2="1.358cm"><text:p/></draw:line><draw:line draw:style-name="gr12" draw:text-style-name="P251" svg:x1="12.124cm" svg:y1="3.818cm" svg:x2="12.124cm" svg:y2="4.229cm"><text:p/></draw:line><draw:line draw:style-name="gr12" draw:text-style-name="P251" svg:x1="12.126cm" svg:y1="3.818cm" svg:x2="11.853cm" svg:y2="3.818cm"><text:p/></draw:line><draw:line draw:style-name="gr12" draw:text-style-name="P251" svg:x1="11.034cm" svg:y1="3.818cm" svg:x2="11.034cm" svg:y2="4.229cm"><text:p/></draw:line><draw:line draw:style-name="gr12" draw:text-style-name="P251" svg:x1="11.852cm" svg:y1="4.229cm" svg:x2="11.034cm" svg:y2="4.229cm"><text:p/></draw:line><draw:line draw:style-name="gr12" draw:text-style-name="P251" svg:x1="11.853cm" svg:y1="3.818cm" svg:x2="11.853cm" svg:y2="4.229cm"><text:p/></draw:line><draw:line draw:style-name="gr12" draw:text-style-name="P251" svg:x1="13.487cm" svg:y1="4.229cm" svg:x2="12.124cm" svg:y2="4.229cm"><text:p/></draw:line><draw:line draw:style-name="gr13" draw:text-style-name="P251" svg:x1="2.577cm" svg:y1="0.947cm" svg:x2="3.395cm" svg:y2="0.947cm"><text:p/></draw:line><draw:line draw:style-name="gr13" draw:text-style-name="P251" svg:x1="3.399cm" svg:y1="0.536cm" svg:x2="3.399cm" svg:y2="0.946cm"><text:p/></draw:line><draw:line draw:style-name="gr13" draw:text-style-name="P251" svg:x1="3.399cm" svg:y1="0.536cm" svg:x2="5.036cm" svg:y2="0.536cm"><text:p/></draw:line><draw:line draw:style-name="gr13" draw:text-style-name="P251" svg:x1="5.035cm" svg:y1="0.946cm" svg:x2="5.035cm" svg:y2="0.536cm"><text:p/></draw:line><draw:line draw:style-name="gr13" draw:text-style-name="P251" svg:x1="7.215cm" svg:y1="0.536cm" svg:x2="7.215cm" svg:y2="0.946cm"><text:p/></draw:line><draw:frame draw:style-name="gr16" draw:text-style-name="P253" svg:width="1.089cm" svg:height="1.05cm" svg:x="1.49cm" svg:y="0.536cm"><draw:text-box><text:p text:style-name="P252"><text:span text:style-name="T50">D0</text:span></text:p></draw:text-box></draw:frame><draw:line draw:style-name="gr13" draw:text-style-name="P251" svg:x1="7.215cm" svg:y1="0.536cm" svg:x2="13.488cm" svg:y2="0.536cm"><text:p/></draw:line><draw:line draw:style-name="gr13" draw:text-style-name="P251" svg:x1="5.035cm" svg:y1="0.947cm" svg:x2="7.215cm" svg:y2="0.947cm"><text:p/></draw:line><draw:line draw:style-name="gr4" draw:text-style-name="P251" svg:x1="3.668cm" svg:y1="1.768cm" svg:x2="3.668cm" svg:y2="1.358cm"><text:p/></draw:line><draw:line draw:style-name="gr4" draw:text-style-name="P251" svg:x1="4.212cm" svg:y1="1.358cm" svg:x2="3.668cm" svg:y2="1.358cm"><text:p/></draw:line><draw:line draw:style-name="gr4" draw:text-style-name="P251" svg:x1="4.213cm" svg:y1="1.358cm" svg:x2="4.213cm" svg:y2="1.768cm"><text:p/></draw:line><draw:line draw:style-name="gr4" draw:text-style-name="P251" svg:x1="4.76cm" svg:y1="1.769cm" svg:x2="4.213cm" svg:y2="1.769cm"><text:p/></draw:line><draw:line draw:style-name="gr4" draw:text-style-name="P251" svg:x1="2.577cm" svg:y1="1.769cm" svg:x2="3.668cm" svg:y2="1.769cm"><text:p/></draw:line><draw:frame draw:style-name="gr16" draw:text-style-name="P253" svg:width="1.364cm" svg:height="1.05cm" svg:x="1.49cm" svg:y="1.357cm"><draw:text-box><text:p text:style-name="P252"><text:span text:style-name="T50">CLK</text:span></text:p></draw:text-box></draw:frame><draw:line draw:style-name="gr4" draw:text-style-name="P251" svg:x1="4.758cm" svg:y1="1.358cm" svg:x2="4.758cm" svg:y2="1.768cm"><text:p/></draw:line><draw:line draw:style-name="gr4" draw:text-style-name="P251" svg:x1="5.302cm" svg:y1="1.358cm" svg:x2="4.758cm" svg:y2="1.358cm"><text:p/></draw:line><draw:line draw:style-name="gr4" draw:text-style-name="P251" svg:x1="6.671cm" svg:y1="1.358cm" svg:x2="6.671cm" svg:y2="1.768cm"><text:p/></draw:line><draw:line draw:style-name="gr4" draw:text-style-name="P251" svg:x1="6.673cm" svg:y1="1.358cm" svg:x2="5.855cm" svg:y2="1.358cm"><text:p/></draw:line><draw:line draw:style-name="gr4" draw:text-style-name="P251" svg:x1="8.037cm" svg:y1="1.768cm" svg:x2="8.037cm" svg:y2="1.358cm"><text:p/></draw:line><draw:line draw:style-name="gr4" draw:text-style-name="P251" svg:x1="10.217cm" svg:y1="1.769cm" svg:x2="9.128cm" svg:y2="1.769cm"><text:p/></draw:line><draw:line draw:style-name="gr4" draw:text-style-name="P251" svg:x1="9.128cm" svg:y1="1.358cm" svg:x2="9.128cm" svg:y2="1.768cm"><text:p/></draw:line><draw:line draw:style-name="gr4" draw:text-style-name="P251" svg:x1="12.672cm" svg:y1="1.769cm" svg:x2="10.763cm" svg:y2="1.769cm"><text:p/></draw:line><draw:line draw:style-name="gr4" draw:text-style-name="P251" svg:x1="5.304cm" svg:y1="1.358cm" svg:x2="5.304cm" svg:y2="1.768cm"><text:p/></draw:line><draw:line draw:style-name="gr4" draw:text-style-name="P251" svg:x1="7.49cm" svg:y1="1.358cm" svg:x2="7.49cm" svg:y2="1.768cm"><text:p/></draw:line><draw:line draw:style-name="gr4" draw:text-style-name="P251" svg:x1="8.037cm" svg:y1="1.769cm" svg:x2="8.581cm" svg:y2="1.769cm"><text:p/></draw:line><draw:line draw:style-name="gr11" draw:text-style-name="P251" svg:x1="11.034cm" svg:y1="2.59cm" svg:x2="11.034cm" svg:y2="2.18cm"><text:p/></draw:line><draw:line draw:style-name="gr11" draw:text-style-name="P251" svg:x1="11.306cm" svg:y1="2.18cm" svg:x2="11.034cm" svg:y2="2.18cm"><text:p/></draw:line><draw:line draw:style-name="gr11" draw:text-style-name="P251" svg:x1="2.577cm" svg:y1="2.588cm" svg:x2="11.033cm" svg:y2="2.588cm"><text:p/></draw:line><draw:frame draw:style-name="gr16" draw:text-style-name="P253" svg:width="1.364cm" svg:height="1.05cm" svg:x="1.49cm" svg:y="2.179cm"><draw:text-box><text:p text:style-name="P252"><text:span text:style-name="T50">RST</text:span></text:p></draw:text-box></draw:frame><draw:line draw:style-name="gr11" draw:text-style-name="P251" svg:x1="12.122cm" svg:y1="2.588cm" svg:x2="11.303cm" svg:y2="2.588cm"><text:p/></draw:line><draw:line draw:style-name="gr11" draw:text-style-name="P251" svg:x1="11.303cm" svg:y1="2.18cm" svg:x2="11.303cm" svg:y2="2.59cm"><text:p/></draw:line><draw:line draw:style-name="gr5" draw:text-style-name="P251" svg:x1="11.853cm" svg:y1="3.002cm" svg:x2="13.488cm" svg:y2="3.002cm"><text:p/></draw:line><draw:line draw:style-name="gr5" draw:text-style-name="P251" svg:x1="11.85cm" svg:y1="3.409cm" svg:x2="2.577cm" svg:y2="3.409cm"><text:p/></draw:line><draw:frame draw:style-name="gr16" draw:text-style-name="P253" svg:width="1.089cm" svg:height="1.05cm" svg:x="1.49cm" svg:y="3.817cm"><draw:text-box><text:p text:style-name="P252"><text:span text:style-name="T50">Q0</text:span></text:p></draw:text-box></draw:frame><draw:frame draw:style-name="gr18" draw:text-style-name="P253" svg:width="1.364cm" svg:height="1.052cm" svg:x="1.49cm" svg:y="2.997cm"><draw:text-box><text:p text:style-name="P252"><text:span text:style-name="T50">SET</text:span></text:p></draw:text-box></draw:frame><draw:line draw:style-name="gr12" draw:text-style-name="P251" svg:x1="2.577cm" svg:y1="4.229cm" svg:x2="3.668cm" svg:y2="4.229cm"><text:p/></draw:line><draw:line draw:style-name="gr12" draw:text-style-name="P251" svg:x1="3.668cm" svg:y1="3.818cm" svg:x2="3.668cm" svg:y2="4.229cm"><text:p/></draw:line><draw:line draw:style-name="gr12" draw:text-style-name="P251" svg:x1="5.85cm" svg:y1="3.818cm" svg:x2="3.668cm" svg:y2="3.818cm"><text:p/></draw:line><draw:line draw:style-name="gr12" draw:text-style-name="P251" svg:x1="5.855cm" svg:y1="3.818cm" svg:x2="5.855cm" svg:y2="4.229cm"><text:p/></draw:line><draw:line draw:style-name="gr12" draw:text-style-name="P251" svg:x1="7.49cm" svg:y1="4.229cm" svg:x2="5.855cm" svg:y2="4.229cm"><text:p/></draw:line><draw:line draw:style-name="gr12" draw:text-style-name="P251" svg:x1="11.037cm" svg:y1="3.818cm" svg:x2="8.581cm" svg:y2="3.818cm"><text:p/></draw:line><draw:line draw:style-name="gr12" draw:text-style-name="P251" svg:x1="11.034cm" svg:y1="3.818cm" svg:x2="11.034cm" svg:y2="4.229cm"><text:p/></draw:line><draw:line draw:style-name="gr12" draw:text-style-name="P251" svg:x1="11.852cm" svg:y1="4.229cm" svg:x2="11.034cm" svg:y2="4.229cm"><text:p/></draw:line><draw:line draw:style-name="gr14" draw:text-style-name="P251" svg:x1="3.668cm" svg:y1="0.33cm" svg:x2="3.668cm" svg:y2="6.896cm"><text:p/></draw:line><draw:line draw:style-name="gr14" draw:text-style-name="P251" svg:x1="4.758cm" svg:y1="0.33cm" svg:x2="4.758cm" svg:y2="6.896cm"><text:p/></draw:line><draw:line draw:style-name="gr14" draw:text-style-name="P251" svg:x1="7.49cm" svg:y1="0.33cm" svg:x2="7.49cm" svg:y2="6.896cm"><text:p/></draw:line><draw:line draw:style-name="gr14" draw:text-style-name="P251" svg:x1="12.67cm" svg:y1="0.33cm" svg:x2="12.67cm" svg:y2="6.896cm"><text:p/></draw:line><draw:line draw:style-name="gr5" draw:text-style-name="P251" svg:x1="11.853cm" svg:y1="3.002cm" svg:x2="11.853cm" svg:y2="3.412cm"><text:p/></draw:line><draw:line draw:style-name="gr11" draw:text-style-name="P251" svg:x1="12.124cm" svg:y1="2.59cm" svg:x2="12.124cm" svg:y2="2.18cm"><text:p/></draw:line><draw:line draw:style-name="gr11" draw:text-style-name="P251" svg:x1="13.487cm" svg:y1="2.18cm" svg:x2="12.124cm" svg:y2="2.18cm"><text:p/></draw:line><draw:line draw:style-name="gr4" draw:text-style-name="P251" svg:x1="12.67cm" svg:y1="1.358cm" svg:x2="12.67cm" svg:y2="1.768cm"><text:p/></draw:line><draw:line draw:style-name="gr4" draw:text-style-name="P251" svg:x1="13.488cm" svg:y1="1.358cm" svg:x2="12.67cm" svg:y2="1.358cm"><text:p/></draw:line><draw:line draw:style-name="gr12" draw:text-style-name="P251" svg:x1="12.124cm" svg:y1="3.818cm" svg:x2="12.124cm" svg:y2="4.229cm"><text:p/></draw:line><draw:line draw:style-name="gr12" draw:text-style-name="P251" svg:x1="12.126cm" svg:y1="3.818cm" svg:x2="11.853cm" svg:y2="3.818cm"><text:p/></draw:line><draw:line draw:style-name="gr12" draw:text-style-name="P251" svg:x1="11.034cm" svg:y1="3.818cm" svg:x2="11.034cm" svg:y2="4.229cm"><text:p/></draw:line><draw:line draw:style-name="gr12" draw:text-style-name="P251" svg:x1="11.852cm" svg:y1="4.229cm" svg:x2="11.034cm" svg:y2="4.229cm"><text:p/></draw:line><draw:line draw:style-name="gr12" draw:text-style-name="P251" svg:x1="11.853cm" svg:y1="3.818cm" svg:x2="11.853cm" svg:y2="4.229cm"><text:p/></draw:line><draw:line draw:style-name="gr12" draw:text-style-name="P251" svg:x1="13.487cm" svg:y1="4.229cm" svg:x2="12.124cm" svg:y2="4.229cm"><text:p/></draw:line><draw:line draw:style-name="gr4" draw:text-style-name="P251" svg:x1="7.49cm" svg:y1="1.358cm" svg:x2="8.037cm" svg:y2="1.358cm"><text:p/></draw:line><draw:line draw:style-name="gr4" draw:text-style-name="P251" svg:x1="10.764cm" svg:y1="1.358cm" svg:x2="10.217cm" svg:y2="1.358cm"><text:p/></draw:line><draw:line draw:style-name="gr4" draw:text-style-name="P251" svg:x1="10.217cm" svg:y1="1.768cm" svg:x2="10.217cm" svg:y2="1.358cm"><text:p/></draw:line><draw:line draw:style-name="gr14" draw:text-style-name="P251" svg:x1="10.217cm" svg:y1="0.33cm" svg:x2="10.217cm" svg:y2="6.896cm"><text:p/></draw:line><draw:frame draw:style-name="gr17" draw:text-style-name="P253" svg:width="1.089cm" svg:height="0.653cm" svg:x="1.49cm" svg:y="4.639cm"><draw:text-box><text:p text:style-name="P252"><text:span text:style-name="T50">Q</text:span></text:p></draw:text-box></draw:frame><draw:line draw:style-name="gr12" draw:text-style-name="P251" svg:x1="2.577cm" svg:y1="5.05cm" svg:x2="3.668cm" svg:y2="5.05cm"><text:p/></draw:line><draw:line draw:style-name="gr12" draw:text-style-name="P251" svg:x1="7.49cm" svg:y1="4.639cm" svg:x2="7.49cm" svg:y2="5.05cm"><text:p/></draw:line><draw:line draw:style-name="gr12" draw:text-style-name="P251" svg:x1="8.581cm" svg:y1="5.05cm" svg:x2="7.49cm" svg:y2="5.05cm"><text:p/></draw:line><draw:line draw:style-name="gr12" draw:text-style-name="P251" svg:x1="11.037cm" svg:y1="4.639cm" svg:x2="8.581cm" svg:y2="4.639cm"><text:p/></draw:line><draw:line draw:style-name="gr12" draw:text-style-name="P251" svg:x1="11.034cm" svg:y1="4.639cm" svg:x2="11.034cm" svg:y2="5.05cm"><text:p/></draw:line><draw:line draw:style-name="gr12" draw:text-style-name="P251" svg:x1="11.852cm" svg:y1="5.05cm" svg:x2="11.034cm" svg:y2="5.05cm"><text:p/></draw:line><draw:line draw:style-name="gr12" draw:text-style-name="P251" svg:x1="12.124cm" svg:y1="4.639cm" svg:x2="12.124cm" svg:y2="5.05cm"><text:p/></draw:line><draw:line draw:style-name="gr12" draw:text-style-name="P251" svg:x1="12.126cm" svg:y1="4.639cm" svg:x2="11.853cm" svg:y2="4.639cm"><text:p/></draw:line><draw:line draw:style-name="gr12" draw:text-style-name="P251" svg:x1="11.034cm" svg:y1="4.639cm" svg:x2="11.034cm" svg:y2="5.05cm"><text:p/></draw:line><draw:line draw:style-name="gr12" draw:text-style-name="P251" svg:x1="11.852cm" svg:y1="5.05cm" svg:x2="11.034cm" svg:y2="5.05cm"><text:p/></draw:line><draw:line draw:style-name="gr12" draw:text-style-name="P251" svg:x1="11.853cm" svg:y1="4.639cm" svg:x2="11.853cm" svg:y2="5.05cm"><text:p/></draw:line><draw:line draw:style-name="gr12" draw:text-style-name="P251" svg:x1="13.487cm" svg:y1="5.05cm" svg:x2="12.124cm" svg:y2="5.05cm"><text:p/></draw:line><draw:frame draw:style-name="gr16" draw:text-style-name="P253" svg:width="1.089cm" svg:height="1.05cm" svg:x="1.49cm" svg:y="4.639cm"><draw:text-box><text:p text:style-name="P252"><text:span text:style-name="T50">Q1</text:span></text:p></draw:text-box></draw:frame><draw:line draw:style-name="gr12" draw:text-style-name="P251" svg:x1="2.577cm" svg:y1="5.05cm" svg:x2="4.759cm" svg:y2="5.05cm"><text:p/></draw:line><draw:line draw:style-name="gr12" draw:text-style-name="P251" svg:x1="4.758cm" svg:y1="4.639cm" svg:x2="4.758cm" svg:y2="5.05cm"><text:p/></draw:line><draw:line draw:style-name="gr12" draw:text-style-name="P251" svg:x1="7.484cm" svg:y1="4.639cm" svg:x2="4.758cm" svg:y2="4.639cm"><text:p/></draw:line><draw:line draw:style-name="gr12" draw:text-style-name="P251" svg:x1="8.581cm" svg:y1="4.639cm" svg:x2="8.581cm" svg:y2="5.05cm"><text:p/></draw:line><draw:line draw:style-name="gr12" draw:text-style-name="P251" svg:x1="11.034cm" svg:y1="4.639cm" svg:x2="11.034cm" svg:y2="5.05cm"><text:p/></draw:line><draw:line draw:style-name="gr12" draw:text-style-name="P251" svg:x1="11.852cm" svg:y1="5.05cm" svg:x2="11.034cm" svg:y2="5.05cm"><text:p/></draw:line><draw:line draw:style-name="gr12" draw:text-style-name="P251" svg:x1="12.124cm" svg:y1="4.639cm" svg:x2="12.124cm" svg:y2="5.05cm"><text:p/></draw:line><draw:line draw:style-name="gr12" draw:text-style-name="P251" svg:x1="12.126cm" svg:y1="4.639cm" svg:x2="11.853cm" svg:y2="4.639cm"><text:p/></draw:line><draw:line draw:style-name="gr12" draw:text-style-name="P251" svg:x1="11.034cm" svg:y1="4.639cm" svg:x2="11.034cm" svg:y2="5.05cm"><text:p/></draw:line><draw:line draw:style-name="gr12" draw:text-style-name="P251" svg:x1="11.852cm" svg:y1="5.05cm" svg:x2="11.034cm" svg:y2="5.05cm"><text:p/></draw:line><draw:line draw:style-name="gr12" draw:text-style-name="P251" svg:x1="11.853cm" svg:y1="4.639cm" svg:x2="11.853cm" svg:y2="5.05cm"><text:p/></draw:line><draw:line draw:style-name="gr12" draw:text-style-name="P251" svg:x1="13.487cm" svg:y1="5.05cm" svg:x2="12.124cm" svg:y2="5.05cm"><text:p/></draw:line><draw:frame draw:style-name="gr15" draw:text-style-name="P253" svg:width="1.089cm" svg:height="0.652cm" svg:x="1.49cm" svg:y="5.459cm"><draw:text-box><text:p text:style-name="P252"><text:span text:style-name="T50">Q</text:span></text:p></draw:text-box></draw:frame><draw:line draw:style-name="gr12" draw:text-style-name="P251" svg:x1="2.577cm" svg:y1="5.871cm" svg:x2="3.668cm" svg:y2="5.871cm"><text:p/></draw:line><draw:line draw:style-name="gr12" draw:text-style-name="P251" svg:x1="11.853cm" svg:y1="5.46cm" svg:x2="11.853cm" svg:y2="5.871cm"><text:p/></draw:line><draw:line draw:style-name="gr12" draw:text-style-name="P251" svg:x1="8.581cm" svg:y1="5.46cm" svg:x2="5.855cm" svg:y2="5.46cm"><text:p/></draw:line><draw:line draw:style-name="gr12" draw:text-style-name="P251" svg:x1="8.581cm" svg:y1="5.46cm" svg:x2="8.581cm" svg:y2="5.871cm"><text:p/></draw:line><draw:line draw:style-name="gr12" draw:text-style-name="P251" svg:x1="12.124cm" svg:y1="5.46cm" svg:x2="12.124cm" svg:y2="5.871cm"><text:p/></draw:line><draw:line draw:style-name="gr12" draw:text-style-name="P251" svg:x1="12.126cm" svg:y1="5.46cm" svg:x2="11.853cm" svg:y2="5.46cm"><text:p/></draw:line><draw:line draw:style-name="gr12" draw:text-style-name="P251" svg:x1="11.034cm" svg:y1="5.871cm" svg:x2="11.852cm" svg:y2="5.871cm"><text:p/></draw:line><draw:line draw:style-name="gr12" draw:text-style-name="P251" svg:x1="13.487cm" svg:y1="5.871cm" svg:x2="12.124cm" svg:y2="5.871cm"><text:p/></draw:line><draw:frame draw:style-name="gr16" draw:text-style-name="P253" svg:width="1.089cm" svg:height="1.05cm" svg:x="1.49cm" svg:y="5.459cm"><draw:text-box><text:p text:style-name="P252"><text:span text:style-name="T50">Q2</text:span></text:p></draw:text-box></draw:frame><draw:line draw:style-name="gr12" draw:text-style-name="P251" svg:x1="2.577cm" svg:y1="5.871cm" svg:x2="5.85cm" svg:y2="5.871cm"><text:p/></draw:line><draw:line draw:style-name="gr12" draw:text-style-name="P251" svg:x1="5.855cm" svg:y1="5.46cm" svg:x2="5.855cm" svg:y2="5.871cm"><text:p/></draw:line><draw:line draw:style-name="gr12" draw:text-style-name="P251" svg:x1="8.581cm" svg:y1="5.46cm" svg:x2="8.581cm" svg:y2="5.871cm"><text:p/></draw:line><draw:line draw:style-name="gr12" draw:text-style-name="P251" svg:x1="10.216cm" svg:y1="5.871cm" svg:x2="8.581cm" svg:y2="5.871cm"><text:p/></draw:line><draw:line draw:style-name="gr12" draw:text-style-name="P251" svg:x1="10.217cm" svg:y1="5.46cm" svg:x2="10.217cm" svg:y2="5.871cm"><text:p/></draw:line><draw:line draw:style-name="gr12" draw:text-style-name="P251" svg:x1="12.124cm" svg:y1="5.46cm" svg:x2="12.124cm" svg:y2="5.871cm"><text:p/></draw:line><draw:line draw:style-name="gr12" draw:text-style-name="P251" svg:x1="12.126cm" svg:y1="5.46cm" svg:x2="11.853cm" svg:y2="5.46cm"><text:p/></draw:line><draw:line draw:style-name="gr12" draw:text-style-name="P251" svg:x1="11.034cm" svg:y1="5.46cm" svg:x2="11.034cm" svg:y2="5.871cm"><text:p/></draw:line><draw:line draw:style-name="gr12" draw:text-style-name="P251" svg:x1="11.036cm" svg:y1="5.46cm" svg:x2="10.217cm" svg:y2="5.46cm"><text:p/></draw:line><draw:frame draw:style-name="gr15" draw:text-style-name="P253" svg:width="1.089cm" svg:height="0.652cm" svg:x="1.49cm" svg:y="6.281cm"><draw:text-box><text:p text:style-name="P252"><text:span text:style-name="T50">Q</text:span></text:p></draw:text-box></draw:frame><draw:line draw:style-name="gr12" draw:text-style-name="P251" svg:x1="2.577cm" svg:y1="6.694cm" svg:x2="3.668cm" svg:y2="6.694cm"><text:p/></draw:line><draw:line draw:style-name="gr12" draw:text-style-name="P251" svg:x1="11.852cm" svg:y1="6.694cm" svg:x2="11.034cm" svg:y2="6.694cm"><text:p/></draw:line><draw:line draw:style-name="gr12" draw:text-style-name="P251" svg:x1="12.124cm" svg:y1="6.283cm" svg:x2="12.124cm" svg:y2="6.694cm"><text:p/></draw:line><draw:line draw:style-name="gr12" draw:text-style-name="P251" svg:x1="12.126cm" svg:y1="6.283cm" svg:x2="11.853cm" svg:y2="6.283cm"><text:p/></draw:line><draw:line draw:style-name="gr12" draw:text-style-name="P251" svg:x1="11.852cm" svg:y1="6.694cm" svg:x2="11.034cm" svg:y2="6.694cm"><text:p/></draw:line><draw:line draw:style-name="gr12" draw:text-style-name="P251" svg:x1="11.853cm" svg:y1="6.283cm" svg:x2="11.853cm" svg:y2="6.694cm"><text:p/></draw:line><draw:line draw:style-name="gr12" draw:text-style-name="P251" svg:x1="13.487cm" svg:y1="6.694cm" svg:x2="12.124cm" svg:y2="6.694cm"><text:p/></draw:line><draw:frame draw:style-name="gr16" draw:text-style-name="P253" svg:width="1.089cm" svg:height="1.05cm" svg:x="1.49cm" svg:y="6.281cm"><draw:text-box><text:p text:style-name="P252"><text:span text:style-name="T50">Q3</text:span></text:p></draw:text-box></draw:frame><draw:line draw:style-name="gr12" draw:text-style-name="P251" svg:x1="2.577cm" svg:y1="6.694cm" svg:x2="7.486cm" svg:y2="6.694cm"><text:p/></draw:line><draw:line draw:style-name="gr12" draw:text-style-name="P251" svg:x1="7.49cm" svg:y1="6.283cm" svg:x2="7.49cm" svg:y2="6.694cm"><text:p/></draw:line><draw:line draw:style-name="gr12" draw:text-style-name="P251" svg:x1="10.216cm" svg:y1="6.283cm" svg:x2="7.49cm" svg:y2="6.283cm"><text:p/></draw:line><draw:line draw:style-name="gr12" draw:text-style-name="P251" svg:x1="10.217cm" svg:y1="6.283cm" svg:x2="10.217cm" svg:y2="6.694cm"><text:p/></draw:line><draw:line draw:style-name="gr12" draw:text-style-name="P251" svg:x1="11.036cm" svg:y1="6.694cm" svg:x2="10.217cm" svg:y2="6.694cm"><text:p/></draw:line><draw:line draw:style-name="gr12" draw:text-style-name="P251" svg:x1="11.852cm" svg:y1="6.694cm" svg:x2="11.034cm" svg:y2="6.694cm"><text:p/></draw:line><draw:line draw:style-name="gr12" draw:text-style-name="P251" svg:x1="12.124cm" svg:y1="6.283cm" svg:x2="12.124cm" svg:y2="6.694cm"><text:p/></draw:line><draw:line draw:style-name="gr12" draw:text-style-name="P251" svg:x1="12.126cm" svg:y1="6.283cm" svg:x2="11.853cm" svg:y2="6.283cm"><text:p/></draw:line><draw:line draw:style-name="gr12" draw:text-style-name="P251" svg:x1="11.852cm" svg:y1="6.694cm" svg:x2="11.034cm" svg:y2="6.694cm"><text:p/></draw:line><draw:line draw:style-name="gr12" draw:text-style-name="P251" svg:x1="11.853cm" svg:y1="6.283cm" svg:x2="11.853cm" svg:y2="6.694cm"><text:p/></draw:line><draw:line draw:style-name="gr12" draw:text-style-name="P251" svg:x1="13.487cm" svg:y1="6.694cm" svg:x2="12.124cm" svg:y2="6.694cm"><text:p/></draw:line></draw:g></text:p>
      <text:list xml:id="list33639577" text:continue-numbering="true" text:style-name="L1">
        <text:list-item>
          <text:list>
            <text:list-item>
              <text:h text:style-name="P217" text:outline-level="2"><text:alphabetical-index-mark-start text:id="IMark100843576"/>SHR_4UDE<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D0 : BOOL (Data <text:span text:style-name="T16">Input</text:span> Bit 0)</text:p>
      <text:p text:style-name="P22"><text:tab/>D3 : BOOL (Data <text:span text:style-name="T16">Input</text:span> Bit 3)</text:p>
      <text:p text:style-name="P22"><text:tab/>CLK : BOOL (Takteingang)</text:p>
      <text:p text:style-name="P22"><text:tab/>DN : BOOL (Steuereingang <text:span text:style-name="T16">Up / Down</text:span>, TRUE = D<text:span text:style-name="T16">own</text:span>)</text:p>
      <text:p text:style-name="P22"><text:tab/>RST : BOOL (asynchroner Reset)</text:p>
      <text:p text:style-name="P25">Output<text:tab/>Q0 : BOOL (Data <text:span text:style-name="T16">Out</text:span> 0)</text:p>
      <text:p text:style-name="P25"><text:tab/>Q1 : BOOL (Data <text:span text:style-name="T16">Out</text:span> 1)</text:p>
      <text:p text:style-name="P25"><text:tab/>Q2 : BOOL (Data <text:span text:style-name="T16">Out</text:span> 2)</text:p>
      <text:p text:style-name="P25"><draw:frame draw:style-name="fr4" draw:name="Grafik126" text:anchor-type="paragraph" svg:x="1.346cm" svg:y="0.626cm" svg:width="2.731cm" svg:height="3.54cm" draw:z-index="98"><draw:image xlink:href="Pictures/10000000000000CE0000010C09A20770.png" xlink:type="simple" xlink:show="embed" xlink:actuate="onLoad"/></draw:frame><text:tab/>Q3 : BOOL (Data <text:span text:style-name="T16">Out</text:span> 3)</text:p>
      <text:p text:style-name="P25"><text:soft-page-break/><text:line-break/>SHR_4UDE ist ein 4 Bit Schieberegister mit U<text:span text:style-name="T16">p</text:span> / D<text:span text:style-name="T16">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55"/>
      <text:p text:style-name="P55"><draw:g text:anchor-type="paragraph" draw:z-index="99" draw:style-name="gr1"><draw:frame draw:style-name="gr19" draw:text-style-name="P253" svg:width="0.997cm" svg:height="0.618cm" svg:x="1.058cm" svg:y="0.591cm"><draw:text-box><text:p text:style-name="P252"><text:span text:style-name="T50">D3</text:span></text:p></draw:text-box></draw:frame><draw:line draw:style-name="gr13" draw:text-style-name="P251" svg:x1="6.306cm" svg:y1="0.127cm" svg:x2="12.056cm" svg:y2="0.127cm"><text:p/></draw:line><draw:line draw:style-name="gr4" draw:text-style-name="P251" svg:x1="5.059cm" svg:y1="1.758cm" svg:x2="4.558cm" svg:y2="1.758cm"><text:p/></draw:line><draw:line draw:style-name="gr4" draw:text-style-name="P251" svg:x1="6.555cm" svg:y1="1.758cm" svg:x2="5.805cm" svg:y2="1.758cm"><text:p/></draw:line><draw:line draw:style-name="gr4" draw:text-style-name="P251" svg:x1="7.558cm" svg:y1="1.757cm" svg:x2="7.558cm" svg:y2="1.524cm"><text:p/></draw:line><draw:line draw:style-name="gr4" draw:text-style-name="P251" svg:x1="8.059cm" svg:y1="1.524cm" svg:x2="7.558cm" svg:y2="1.524cm"><text:p/></draw:line><draw:line draw:style-name="gr4" draw:text-style-name="P251" svg:x1="9.555cm" svg:y1="1.524cm" svg:x2="9.555cm" svg:y2="1.757cm"><text:p/></draw:line><draw:line draw:style-name="gr4" draw:text-style-name="P251" svg:x1="5.059cm" svg:y1="1.524cm" svg:x2="5.059cm" svg:y2="1.757cm"><text:p/></draw:line><draw:line draw:style-name="gr4" draw:text-style-name="P251" svg:x1="6.558cm" svg:y1="1.524cm" svg:x2="6.558cm" svg:y2="1.757cm"><text:p/></draw:line><draw:polyline draw:style-name="gr4" draw:text-style-name="P251" svg:width="0cm" svg:height="0cm" svg:x="4.558cm" svg:y="1.758cm" svg:viewBox="0 0 0 0" draw:points="0,0"><text:p/></draw:polyline><draw:line draw:style-name="gr11" draw:text-style-name="P251" svg:x1="2.055cm" svg:y1="3.159cm" svg:x2="9.806cm" svg:y2="3.159cm"><text:p/></draw:line><draw:frame draw:style-name="gr19" draw:text-style-name="P253" svg:width="1.251cm" svg:height="0.618cm" svg:x="1.058cm" svg:y="2.692cm"><draw:text-box><text:p text:style-name="P252"><text:span text:style-name="T50">RST</text:span></text:p></draw:text-box></draw:frame><draw:line draw:style-name="gr11" draw:text-style-name="P251" svg:x1="10.807cm" svg:y1="3.159cm" svg:x2="10.056cm" svg:y2="3.159cm"><text:p/></draw:line><draw:line draw:style-name="gr5" draw:text-style-name="P251" svg:x1="10.557cm" svg:y1="3.627cm" svg:x2="12.056cm" svg:y2="3.627cm"><text:p/></draw:line><draw:line draw:style-name="gr12" draw:text-style-name="P251" svg:x1="6.558cm" svg:y1="4.325cm" svg:x2="6.558cm" svg:y2="4.558cm"><text:p/></draw:line><draw:line draw:style-name="gr12" draw:text-style-name="P251" svg:x1="7.558cm" svg:y1="4.325cm" svg:x2="6.558cm" svg:y2="4.325cm"><text:p/></draw:line><draw:line draw:style-name="gr12" draw:text-style-name="P251" svg:x1="9.057cm" svg:y1="4.56cm" svg:x2="7.558cm" svg:y2="4.56cm"><text:p/></draw:line><draw:line draw:style-name="gr12" draw:text-style-name="P251" svg:x1="10.557cm" svg:y1="4.325cm" svg:x2="10.557cm" svg:y2="4.558cm"><text:p/></draw:line><draw:line draw:style-name="gr14" draw:text-style-name="P251" svg:x1="5.059cm" svg:y1="-0.109cm" svg:x2="5.059cm" svg:y2="6.892cm"><text:p/></draw:line><draw:line draw:style-name="gr14" draw:text-style-name="P251" svg:x1="7.558cm" svg:y1="-0.109cm" svg:x2="7.558cm" svg:y2="6.892cm"><text:p/></draw:line><draw:line draw:style-name="gr5" draw:text-style-name="P251" svg:x1="10.557cm" svg:y1="3.627cm" svg:x2="10.557cm" svg:y2="3.859cm"><text:p/></draw:line><draw:line draw:style-name="gr12" draw:text-style-name="P251" svg:x1="10.809cm" svg:y1="4.558cm" svg:x2="10.809cm" svg:y2="4.325cm"><text:p/></draw:line><draw:line draw:style-name="gr13" draw:text-style-name="P251" svg:x1="2.055cm" svg:y1="0.358cm" svg:x2="2.805cm" svg:y2="0.358cm"><text:p/></draw:line><draw:line draw:style-name="gr13" draw:text-style-name="P251" svg:x1="2.808cm" svg:y1="0.127cm" svg:x2="2.808cm" svg:y2="0.359cm"><text:p/></draw:line><draw:line draw:style-name="gr13" draw:text-style-name="P251" svg:x1="2.808cm" svg:y1="0.127cm" svg:x2="4.309cm" svg:y2="0.127cm"><text:p/></draw:line><draw:line draw:style-name="gr13" draw:text-style-name="P251" svg:x1="4.309cm" svg:y1="0.359cm" svg:x2="4.309cm" svg:y2="0.127cm"><text:p/></draw:line><draw:line draw:style-name="gr13" draw:text-style-name="P251" svg:x1="6.306cm" svg:y1="0.127cm" svg:x2="6.306cm" svg:y2="0.359cm"><text:p/></draw:line><draw:frame draw:style-name="gr20" draw:text-style-name="P253" svg:width="0.997cm" svg:height="0.618cm" svg:x="1.058cm" svg:y="-0.109cm"><draw:text-box><text:p text:style-name="P252"><text:span text:style-name="T50">D0</text:span></text:p></draw:text-box></draw:frame><draw:line draw:style-name="gr13" draw:text-style-name="P251" svg:x1="6.306cm" svg:y1="0.127cm" svg:x2="12.056cm" svg:y2="0.127cm"><text:p/></draw:line><draw:line draw:style-name="gr13" draw:text-style-name="P251" svg:x1="4.309cm" svg:y1="0.358cm" svg:x2="6.307cm" svg:y2="0.358cm"><text:p/></draw:line><draw:line draw:style-name="gr4" draw:text-style-name="P251" svg:x1="3.055cm" svg:y1="1.757cm" svg:x2="3.055cm" svg:y2="1.524cm"><text:p/></draw:line><draw:line draw:style-name="gr4" draw:text-style-name="P251" svg:x1="3.554cm" svg:y1="1.524cm" svg:x2="3.055cm" svg:y2="1.524cm"><text:p/></draw:line><draw:line draw:style-name="gr4" draw:text-style-name="P251" svg:x1="3.556cm" svg:y1="1.524cm" svg:x2="3.556cm" svg:y2="1.757cm"><text:p/></draw:line><draw:line draw:style-name="gr4" draw:text-style-name="P251" svg:x1="4.057cm" svg:y1="1.758cm" svg:x2="3.556cm" svg:y2="1.758cm"><text:p/></draw:line><draw:line draw:style-name="gr4" draw:text-style-name="P251" svg:x1="2.055cm" svg:y1="1.758cm" svg:x2="3.055cm" svg:y2="1.758cm"><text:p/></draw:line><draw:frame draw:style-name="gr20" draw:text-style-name="P253" svg:width="1.251cm" svg:height="0.618cm" svg:x="1.058cm" svg:y="1.29cm"><draw:text-box><text:p text:style-name="P252"><text:span text:style-name="T50">CLK</text:span></text:p></draw:text-box></draw:frame><draw:line draw:style-name="gr4" draw:text-style-name="P251" svg:x1="4.057cm" svg:y1="1.524cm" svg:x2="4.057cm" svg:y2="1.757cm"><text:p/></draw:line><draw:line draw:style-name="gr4" draw:text-style-name="P251" svg:x1="4.556cm" svg:y1="1.524cm" svg:x2="4.057cm" svg:y2="1.524cm"><text:p/></draw:line><draw:line draw:style-name="gr4" draw:text-style-name="P251" svg:x1="5.805cm" svg:y1="1.524cm" svg:x2="5.805cm" svg:y2="1.757cm"><text:p/></draw:line><draw:line draw:style-name="gr4" draw:text-style-name="P251" svg:x1="5.809cm" svg:y1="1.524cm" svg:x2="5.059cm" svg:y2="1.524cm"><text:p/></draw:line><draw:line draw:style-name="gr4" draw:text-style-name="P251" svg:x1="7.059cm" svg:y1="1.757cm" svg:x2="7.059cm" svg:y2="1.524cm"><text:p/></draw:line><draw:line draw:style-name="gr4" draw:text-style-name="P251" svg:x1="9.057cm" svg:y1="1.758cm" svg:x2="8.059cm" svg:y2="1.758cm"><text:p/></draw:line><draw:line draw:style-name="gr4" draw:text-style-name="P251" svg:x1="8.059cm" svg:y1="1.524cm" svg:x2="8.059cm" svg:y2="1.757cm"><text:p/></draw:line><draw:line draw:style-name="gr4" draw:text-style-name="P251" svg:x1="11.305cm" svg:y1="1.758cm" svg:x2="9.555cm" svg:y2="1.758cm"><text:p/></draw:line><draw:line draw:style-name="gr4" draw:text-style-name="P251" svg:x1="4.558cm" svg:y1="1.524cm" svg:x2="4.558cm" svg:y2="1.757cm"><text:p/></draw:line><draw:line draw:style-name="gr4" draw:text-style-name="P251" svg:x1="7.059cm" svg:y1="1.758cm" svg:x2="7.558cm" svg:y2="1.758cm"><text:p/></draw:line><draw:line draw:style-name="gr11" draw:text-style-name="P251" svg:x1="9.809cm" svg:y1="3.16cm" svg:x2="9.809cm" svg:y2="2.928cm"><text:p/></draw:line><draw:line draw:style-name="gr11" draw:text-style-name="P251" svg:x1="10.058cm" svg:y1="2.928cm" svg:x2="9.809cm" svg:y2="2.928cm"><text:p/></draw:line><draw:line draw:style-name="gr11" draw:text-style-name="P251" svg:x1="2.055cm" svg:y1="3.159cm" svg:x2="9.806cm" svg:y2="3.159cm"><text:p/></draw:line><draw:frame draw:style-name="gr19" draw:text-style-name="P253" svg:width="1.251cm" svg:height="0.618cm" svg:x="1.058cm" svg:y="2.692cm"><draw:text-box><text:p text:style-name="P252"><text:span text:style-name="T50">RST</text:span></text:p></draw:text-box></draw:frame><draw:line draw:style-name="gr11" draw:text-style-name="P251" svg:x1="10.807cm" svg:y1="3.159cm" svg:x2="10.056cm" svg:y2="3.159cm"><text:p/></draw:line><draw:line draw:style-name="gr11" draw:text-style-name="P251" svg:x1="10.056cm" svg:y1="2.928cm" svg:x2="10.056cm" svg:y2="3.16cm"><text:p/></draw:line><draw:line draw:style-name="gr5" draw:text-style-name="P251" svg:x1="10.557cm" svg:y1="3.627cm" svg:x2="12.056cm" svg:y2="3.627cm"><text:p/></draw:line><draw:line draw:style-name="gr5" draw:text-style-name="P251" svg:x1="10.555cm" svg:y1="3.857cm" svg:x2="2.055cm" svg:y2="3.857cm"><text:p/></draw:line><draw:frame draw:style-name="gr20" draw:text-style-name="P253" svg:width="0.997cm" svg:height="0.618cm" svg:x="1.058cm" svg:y="4.091cm"><draw:text-box><text:p text:style-name="P252"><text:span text:style-name="T50">Q0</text:span></text:p></draw:text-box></draw:frame><draw:frame draw:style-name="gr19" draw:text-style-name="P253" svg:width="1.251cm" svg:height="0.618cm" svg:x="1.058cm" svg:y="3.392cm"><draw:text-box><text:p text:style-name="P252"><text:span text:style-name="T50">SET</text:span></text:p></draw:text-box></draw:frame><draw:line draw:style-name="gr12" draw:text-style-name="P251" svg:x1="2.055cm" svg:y1="4.56cm" svg:x2="3.055cm" svg:y2="4.56cm"><text:p/></draw:line><draw:line draw:style-name="gr12" draw:text-style-name="P251" svg:x1="3.055cm" svg:y1="4.325cm" svg:x2="3.055cm" svg:y2="4.558cm"><text:p/></draw:line><draw:line draw:style-name="gr12" draw:text-style-name="P251" svg:x1="5.055cm" svg:y1="4.325cm" svg:x2="3.055cm" svg:y2="4.325cm"><text:p/></draw:line><draw:line draw:style-name="gr12" draw:text-style-name="P251" svg:x1="5.059cm" svg:y1="4.325cm" svg:x2="5.059cm" svg:y2="4.558cm"><text:p/></draw:line><draw:line draw:style-name="gr12" draw:text-style-name="P251" svg:x1="6.558cm" svg:y1="4.56cm" svg:x2="5.059cm" svg:y2="4.56cm"><text:p/></draw:line><draw:line draw:style-name="gr12" draw:text-style-name="P251" svg:x1="9.057cm" svg:y1="4.56cm" svg:x2="7.558cm" svg:y2="4.56cm"><text:p/></draw:line><draw:line draw:style-name="gr14" draw:text-style-name="P251" svg:x1="3.055cm" svg:y1="-0.109cm" svg:x2="3.055cm" svg:y2="6.892cm"><text:p/></draw:line><draw:line draw:style-name="gr14" draw:text-style-name="P251" svg:x1="4.057cm" svg:y1="-0.109cm" svg:x2="4.057cm" svg:y2="6.892cm"><text:p/></draw:line><draw:line draw:style-name="gr14" draw:text-style-name="P251" svg:x1="6.558cm" svg:y1="-0.109cm" svg:x2="6.558cm" svg:y2="6.892cm"><text:p/></draw:line><draw:line draw:style-name="gr14" draw:text-style-name="P251" svg:x1="11.557cm" svg:y1="-0.109cm" svg:x2="11.557cm" svg:y2="6.892cm"><text:p/></draw:line><draw:line draw:style-name="gr11" draw:text-style-name="P251" svg:x1="10.809cm" svg:y1="3.16cm" svg:x2="10.809cm" svg:y2="2.928cm"><text:p/></draw:line><draw:line draw:style-name="gr11" draw:text-style-name="P251" svg:x1="12.058cm" svg:y1="2.928cm" svg:x2="10.809cm" svg:y2="2.928cm"><text:p/></draw:line><draw:line draw:style-name="gr4" draw:text-style-name="P251" svg:x1="11.308cm" svg:y1="1.524cm" svg:x2="11.308cm" svg:y2="1.757cm"><text:p/></draw:line><draw:line draw:style-name="gr4" draw:text-style-name="P251" svg:x1="12.058cm" svg:y1="1.524cm" svg:x2="11.308cm" svg:y2="1.524cm"><text:p/></draw:line><draw:line draw:style-name="gr12" draw:text-style-name="P251" svg:x1="10.807cm" svg:y1="4.325cm" svg:x2="10.557cm" svg:y2="4.325cm"><text:p/></draw:line><draw:line draw:style-name="gr12" draw:text-style-name="P251" svg:x1="7.558cm" svg:y1="4.325cm" svg:x2="7.558cm" svg:y2="4.558cm"><text:p/></draw:line><draw:line draw:style-name="gr12" draw:text-style-name="P251" svg:x1="11.807cm" svg:y1="4.56cm" svg:x2="10.809cm" svg:y2="4.56cm"><text:p/></draw:line><draw:line draw:style-name="gr4" draw:text-style-name="P251" svg:x1="6.558cm" svg:y1="1.524cm" svg:x2="7.059cm" svg:y2="1.524cm"><text:p/></draw:line><draw:line draw:style-name="gr4" draw:text-style-name="P251" svg:x1="9.555cm" svg:y1="1.524cm" svg:x2="9.054cm" svg:y2="1.524cm"><text:p/></draw:line><draw:line draw:style-name="gr4" draw:text-style-name="P251" svg:x1="9.054cm" svg:y1="1.757cm" svg:x2="9.054cm" svg:y2="1.524cm"><text:p/></draw:line><draw:line draw:style-name="gr14" draw:text-style-name="P251" svg:x1="9.054cm" svg:y1="-0.109cm" svg:x2="9.054cm" svg:y2="6.892cm"><text:p/></draw:line><draw:line draw:style-name="gr12" draw:text-style-name="P251" svg:x1="6.558cm" svg:y1="5.027cm" svg:x2="6.558cm" svg:y2="5.26cm"><text:p/></draw:line><draw:line draw:style-name="gr12" draw:text-style-name="P251" svg:x1="7.558cm" svg:y1="5.26cm" svg:x2="6.558cm" svg:y2="5.26cm"><text:p/></draw:line><draw:line draw:style-name="gr12" draw:text-style-name="P251" svg:x1="9.809cm" svg:y1="5.027cm" svg:x2="7.558cm" svg:y2="5.027cm"><text:p/></draw:line><draw:frame draw:style-name="gr19" draw:text-style-name="P253" svg:width="0.997cm" svg:height="0.618cm" svg:x="1.058cm" svg:y="4.791cm"><draw:text-box><text:p text:style-name="P252"><text:span text:style-name="T50">Q1</text:span></text:p></draw:text-box></draw:frame><draw:line draw:style-name="gr12" draw:text-style-name="P251" svg:x1="2.055cm" svg:y1="5.26cm" svg:x2="4.055cm" svg:y2="5.26cm"><text:p/></draw:line><draw:line draw:style-name="gr12" draw:text-style-name="P251" svg:x1="4.057cm" svg:y1="5.027cm" svg:x2="4.057cm" svg:y2="5.26cm"><text:p/></draw:line><draw:line draw:style-name="gr12" draw:text-style-name="P251" svg:x1="6.556cm" svg:y1="5.027cm" svg:x2="4.057cm" svg:y2="5.027cm"><text:p/></draw:line><draw:line draw:style-name="gr12" draw:text-style-name="P251" svg:x1="7.558cm" svg:y1="5.027cm" svg:x2="7.558cm" svg:y2="5.26cm"><text:p/></draw:line><draw:line draw:style-name="gr12" draw:text-style-name="P251" svg:x1="10.809cm" svg:y1="5.027cm" svg:x2="10.809cm" svg:y2="5.26cm"><text:p/></draw:line><draw:line draw:style-name="gr12" draw:text-style-name="P251" svg:x1="10.807cm" svg:y1="5.027cm" svg:x2="10.557cm" svg:y2="5.027cm"><text:p/></draw:line><draw:line draw:style-name="gr12" draw:text-style-name="P251" svg:x1="9.809cm" svg:y1="5.027cm" svg:x2="9.809cm" svg:y2="5.26cm"><text:p/></draw:line><draw:line draw:style-name="gr12" draw:text-style-name="P251" svg:x1="10.559cm" svg:y1="5.26cm" svg:x2="9.809cm" svg:y2="5.26cm"><text:p/></draw:line><draw:line draw:style-name="gr12" draw:text-style-name="P251" svg:x1="10.557cm" svg:y1="5.027cm" svg:x2="10.557cm" svg:y2="5.26cm"><text:p/></draw:line><draw:line draw:style-name="gr12" draw:text-style-name="P251" svg:x1="12.058cm" svg:y1="5.26cm" svg:x2="10.809cm" svg:y2="5.26cm"><text:p/></draw:line><draw:line draw:style-name="gr12" draw:text-style-name="P251" svg:x1="10.557cm" svg:y1="5.724cm" svg:x2="10.557cm" svg:y2="5.957cm"><text:p/></draw:line><draw:line draw:style-name="gr12" draw:text-style-name="P251" svg:x1="9.058cm" svg:y1="5.724cm" svg:x2="5.059cm" svg:y2="5.724cm"><text:p/></draw:line><draw:line draw:style-name="gr12" draw:text-style-name="P251" svg:x1="9.054cm" svg:y1="4.325cm" svg:x2="9.805cm" svg:y2="4.325cm"><text:p/></draw:line><draw:line draw:style-name="gr12" draw:text-style-name="P251" svg:x1="9.054cm" svg:y1="5.962cm" svg:x2="10.555cm" svg:y2="5.962cm"><text:p/></draw:line><draw:line draw:style-name="gr12" draw:text-style-name="P251" svg:x1="12.058cm" svg:y1="5.962cm" svg:x2="10.809cm" svg:y2="5.962cm"><text:p/></draw:line><draw:frame draw:style-name="gr19" draw:text-style-name="P253" svg:width="0.997cm" svg:height="0.618cm" svg:x="1.058cm" svg:y="5.493cm"><draw:text-box><text:p text:style-name="P252"><text:span text:style-name="T50">Q2</text:span></text:p></draw:text-box></draw:frame><draw:line draw:style-name="gr12" draw:text-style-name="P251" svg:x1="2.055cm" svg:y1="5.962cm" svg:x2="5.055cm" svg:y2="5.962cm"><text:p/></draw:line><draw:line draw:style-name="gr12" draw:text-style-name="P251" svg:x1="5.059cm" svg:y1="5.724cm" svg:x2="5.059cm" svg:y2="5.957cm"><text:p/></draw:line><draw:line draw:style-name="gr12" draw:text-style-name="P251" svg:x1="9.054cm" svg:y1="4.325cm" svg:x2="9.054cm" svg:y2="4.558cm"><text:p/></draw:line><draw:line draw:style-name="gr12" draw:text-style-name="P251" svg:x1="9.054cm" svg:y1="5.724cm" svg:x2="9.054cm" svg:y2="5.957cm"><text:p/></draw:line><draw:line draw:style-name="gr12" draw:text-style-name="P251" svg:x1="10.809cm" svg:y1="5.724cm" svg:x2="10.809cm" svg:y2="5.957cm"><text:p/></draw:line><draw:line draw:style-name="gr12" draw:text-style-name="P251" svg:x1="10.807cm" svg:y1="5.724cm" svg:x2="10.557cm" svg:y2="5.724cm"><text:p/></draw:line><draw:frame draw:style-name="gr20" draw:text-style-name="P253" svg:width="0.997cm" svg:height="0.618cm" svg:x="1.058cm" svg:y="6.192cm"><draw:text-box><text:p text:style-name="P252"><text:span text:style-name="T50">Q3</text:span></text:p></draw:text-box></draw:frame><draw:line draw:style-name="gr12" draw:text-style-name="P251" svg:x1="2.055cm" svg:y1="6.664cm" svg:x2="6.555cm" svg:y2="6.664cm"><text:p/></draw:line><draw:line draw:style-name="gr12" draw:text-style-name="P251" svg:x1="6.558cm" svg:y1="6.425cm" svg:x2="6.558cm" svg:y2="6.657cm"><text:p/></draw:line><draw:line draw:style-name="gr12" draw:text-style-name="P251" svg:x1="7.558cm" svg:y1="6.425cm" svg:x2="6.558cm" svg:y2="6.425cm"><text:p/></draw:line><draw:line draw:style-name="gr12" draw:text-style-name="P251" svg:x1="9.054cm" svg:y1="6.425cm" svg:x2="9.054cm" svg:y2="6.657cm"><text:p/></draw:line><draw:line draw:style-name="gr12" draw:text-style-name="P251" svg:x1="9.805cm" svg:y1="6.425cm" svg:x2="9.054cm" svg:y2="6.425cm"><text:p/></draw:line><draw:line draw:style-name="gr12" draw:text-style-name="P251" svg:x1="10.809cm" svg:y1="6.425cm" svg:x2="10.809cm" svg:y2="6.657cm"><text:p/></draw:line><draw:line draw:style-name="gr12" draw:text-style-name="P251" svg:x1="10.807cm" svg:y1="6.425cm" svg:x2="10.557cm" svg:y2="6.425cm"><text:p/></draw:line><draw:line draw:style-name="gr12" draw:text-style-name="P251" svg:x1="10.559cm" svg:y1="6.664cm" svg:x2="9.809cm" svg:y2="6.664cm"><text:p/></draw:line><draw:line draw:style-name="gr12" draw:text-style-name="P251" svg:x1="10.557cm" svg:y1="6.425cm" svg:x2="10.557cm" svg:y2="6.657cm"><text:p/></draw:line><draw:line draw:style-name="gr12" draw:text-style-name="P251" svg:x1="12.058cm" svg:y1="6.664cm" svg:x2="10.809cm" svg:y2="6.664cm"><text:p/></draw:line><draw:line draw:style-name="gr2" draw:text-style-name="P251" svg:x1="2.055cm" svg:y1="2.457cm" svg:x2="6.805cm" svg:y2="2.457cm"><text:p/></draw:line><draw:line draw:style-name="gr2" draw:text-style-name="P251" svg:x1="6.807cm" svg:y1="2.226cm" svg:x2="6.807cm" svg:y2="2.459cm"><text:p/></draw:line><draw:line draw:style-name="gr2" draw:text-style-name="P251" svg:x1="6.807cm" svg:y1="2.226cm" svg:x2="12.056cm" svg:y2="2.226cm"><text:p/></draw:line><draw:frame draw:style-name="gr20" draw:text-style-name="P253" svg:width="0.997cm" svg:height="0.618cm" svg:x="1.058cm" svg:y="1.992cm"><draw:text-box><text:p text:style-name="P252"><text:span text:style-name="T50">DN</text:span></text:p></draw:text-box></draw:frame><draw:line draw:style-name="gr12" draw:text-style-name="P251" svg:x1="2.055cm" svg:y1="1.06cm" svg:x2="7.805cm" svg:y2="1.06cm"><text:p/></draw:line><draw:line draw:style-name="gr12" draw:text-style-name="P251" svg:x1="7.807cm" svg:y1="0.825cm" svg:x2="7.807cm" svg:y2="1.058cm"><text:p/></draw:line><draw:line draw:style-name="gr12" draw:text-style-name="P251" svg:x1="9.807cm" svg:y1="0.825cm" svg:x2="7.807cm" svg:y2="0.825cm"><text:p/></draw:line><draw:line draw:style-name="gr12" draw:text-style-name="P251" svg:x1="9.809cm" svg:y1="0.825cm" svg:x2="9.809cm" svg:y2="1.058cm"><text:p/></draw:line><draw:line draw:style-name="gr12" draw:text-style-name="P251" svg:x1="12.058cm" svg:y1="1.06cm" svg:x2="9.809cm" svg:y2="1.06cm"><text:p/></draw:line><draw:line draw:style-name="gr12" draw:text-style-name="P251" svg:x1="7.558cm" svg:y1="6.425cm" svg:x2="7.558cm" svg:y2="6.657cm"><text:p/></draw:line><draw:line draw:style-name="gr12" draw:text-style-name="P251" svg:x1="9.057cm" svg:y1="6.664cm" svg:x2="7.558cm" svg:y2="6.664cm"><text:p/></draw:line><draw:line draw:style-name="gr12" draw:text-style-name="P251" svg:x1="9.809cm" svg:y1="6.425cm" svg:x2="9.809cm" svg:y2="6.657cm"><text:p/></draw:line><draw:line draw:style-name="gr12" draw:text-style-name="P251" svg:x1="9.809cm" svg:y1="4.558cm" svg:x2="9.809cm" svg:y2="4.325cm"><text:p/></draw:line><draw:line draw:style-name="gr12" draw:text-style-name="P251" svg:x1="9.809cm" svg:y1="4.56cm" svg:x2="10.559cm" svg:y2="4.56cm"><text:p/></draw:line></draw:g></text:p>
      <text:list xml:id="list336415621" text:continue-numbering="true" text:style-name="L1">
        <text:list-item>
          <text:list>
            <text:list-item>
              <text:h text:style-name="P217" text:outline-level="2"><text:alphabetical-index-mark-start text:id="IMark100843576"/>SHR_8PLE<text:alphabetical-index-mark-end text:id="IMark100843576"/></text:h>
            </text:list-item>
          </text:list>
        </text:list-item>
      </text:list>
      <text:p text:style-name="P22">Type<text:tab/>Funktionsbaustein</text:p>
      <text:p text:style-name="P22"><text:span text:style-name="T16">Input</text:span><text:tab/>DIN : BOOL (Shift Data <text:span text:style-name="T16">Input</text:span>)</text:p>
      <text:p text:style-name="P22"><text:tab/>DLOAD : Byte (Datenwort zum Parallel <text:span text:style-name="T16">Load</text:span>)</text:p>
      <text:p text:style-name="P22"><text:tab/>CLK : BOOL (Takteingang)</text:p>
      <text:p text:style-name="P22"><text:tab/>UP : BOOL (Steuereingang <text:span text:style-name="T17">Up</text:span> / <text:span text:style-name="T16">Down,</text:span> TRUE = <text:span text:style-name="T16">Up</text:span>)</text:p>
      <text:p text:style-name="P22"><text:tab/>LOAD : BOOL (Steuereingang zum Laden des Registers)</text:p>
      <text:p text:style-name="P22"><text:tab/>RST : BOOL (asynchroner Reset)</text:p>
      <text:p text:style-name="P25"><draw:frame draw:style-name="fr4" draw:name="Grafik127" text:anchor-type="paragraph" svg:x="1.099cm" svg:y="0.628cm" svg:width="2.731cm" svg:height="3.54cm" draw:z-index="100"><draw:image xlink:href="Pictures/10000000000000CE0000010C48456A00.png" xlink:type="simple" xlink:show="embed" xlink:actuate="onLoad"/></draw:frame>Output<text:tab/>DOUT : BOOL (Data <text:span text:style-name="T16">Out</text:span>)</text:p>
      <text:p text:style-name="P25"><text:soft-page-break/><text:line-break/>SHR_8PLE ist ein 8 Bit Schieberegister mit Parallel <text:span text:style-name="T16">Load</text:span> und asynchronem Reset. Die Schieberichtung kann mit dem Eingang UP umgekehrt werden. Wenn UP=1, wird Bit 7 zuerst auf DOUT geschoben und wenn UP=0, wird Bit0 zuerst an DOUT geschoben. Für U<text:span text:style-name="T16">p-</text:span>Shift wird Bit 0 mit DIN geladen und bei D<text:span text:style-name="T16">own-</text:span>Shift wird Bit 7 mit DIN geladen. Am Eingang DLOAD liegt ein Byte Daten an, das bei Parallel <text:span text:style-name="T16">Load</text:span> (<text:span text:style-name="T16">LOAD</text:span>=1 und steigende Flanke an <text:span text:style-name="T16">CLK</text:span>) ins interne Register geladen wird. Im Falle von Parallel <text:span text:style-name="T16">Load</text:span> wird zuerst ein Shift durchgeführt und anschließend das Register geladen. Ein RST kann jederzeit asynchron das Register löschen. Eine eingehende Beschreibung eines Schieberegisters finden Sie beim Modul SHR_4E.</text:p>
      <text:list xml:id="list33642686" text:continue-numbering="true" text:style-name="L1">
        <text:list-item>
          <text:list>
            <text:list-item>
              <text:h text:style-name="P217" text:outline-level="2"><text:alphabetical-index-mark-start text:id="IMark100843576"/>SHR_8UDE<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D0 : BOOL (Data <text:span text:style-name="T16">Input</text:span> Bit 0)</text:p>
      <text:p text:style-name="P22"><text:tab/>D3 : BOOL (Data <text:span text:style-name="T16">Input</text:span> Bit 3)</text:p>
      <text:p text:style-name="P22"><text:tab/>CLK : BOOL (Takteingang)</text:p>
      <text:p text:style-name="P22"><text:tab/>DN : BOOL (Steuereingang <text:span text:style-name="T16">Up</text:span> / <text:span text:style-name="T16">Down,</text:span> TRUE = <text:span text:style-name="T16">Down</text:span>)</text:p>
      <text:p text:style-name="P22"><text:tab/>RST : BOOL (asynchroner Reset)</text:p>
      <text:p text:style-name="P25"><draw:frame draw:style-name="fr4" draw:name="Grafik128" text:anchor-type="paragraph" svg:x="1.129cm" svg:y="0.679cm" svg:width="2.731cm" svg:height="4.44cm" draw:z-index="101"><draw:image xlink:href="Pictures/10000000000000CE000001505EE5F723.png" xlink:type="simple" xlink:show="embed" xlink:actuate="onLoad"/></draw:frame>Output<text:tab/>Q0 .. Q7 : BOOL (Data <text:span text:style-name="T16">Out</text:span>)</text:p>
      <text:p text:style-name="P25">SHR_8UDE ist ein 8 Bit Schieberegister mit U<text:span text:style-name="T16">p</text:span> / D<text:span text:style-name="T16">own</text:span> Schieberichtung. Mit einer steigenden Flanke an CLK werden die Daten Q0 nach Q7 um jeweils einen Schritt <text:soft-page-break/>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xml:id="list33634195" text:continue-numbering="true" text:style-name="L1">
        <text:list-item>
          <text:list>
            <text:list-item>
              <text:h text:style-name="P217" text:outline-level="2"><text:alphabetical-index-mark-start text:id="IMark100843576"/>STORE_8<text:alphabetical-index-mark-end text:id="IMark100843576"/></text:h>
            </text:list-item>
          </text:list>
        </text:list-item>
      </text:list>
      <text:p text:style-name="P22">Type<text:tab/>Funktionsbaustein</text:p>
      <text:p text:style-name="P22"><text:span text:style-name="T16">Input</text:span><text:tab/>SET : BOOL (asynchroner Set)</text:p>
      <text:p text:style-name="P22"><text:tab/>D0..D7 : BOOL (Data <text:span text:style-name="T16">Input</text:span> Bit 0..7)</text:p>
      <text:p text:style-name="P22"><text:tab/><text:span text:style-name="T35">CLR : BOOL (Schrittweise Rücksetzen Eingang)</text:span></text:p>
      <text:p text:style-name="P55"><text:tab/>RST : BOOL (Asynchroner Set Eingang)</text:p>
      <text:p text:style-name="P55"><draw:frame draw:style-name="fr4" draw:name="Grafik420" text:anchor-type="paragraph" svg:x="1.044cm" svg:y="0.663cm" svg:width="2.499cm" svg:height="5.091cm" draw:z-index="423"><draw:image xlink:href="Pictures/10000000000000BD00000181789B3A92.png" xlink:type="simple" xlink:show="embed" xlink:actuate="onLoad"/></draw:frame>Output<text:tab/>Q0..Q7 : BOOL (Ereignis Ausgänge)</text:p>
      <text:p text:style-name="P55">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xml:id="list33643485" text:continue-numbering="true" text:style-name="L1">
        <text:list-item>
          <text:list>
            <text:list-item>
              <text:h text:style-name="P217" text:outline-level="2"><text:soft-page-break/><text:alphabetical-index-mark-start text:id="IMark100843576"/>TOGGLE<text:alphabetical-index-mark-end text:id="IMark100843576"/></text:h>
            </text:list-item>
          </text:list>
        </text:list-item>
      </text:list>
      <text:p text:style-name="P22">Type<text:tab/>Funktionsbaustein</text:p>
      <text:p text:style-name="P22"><text:span text:style-name="T16">Input</text:span><text:tab/>CLK: BOOL (Takteingang)</text:p>
      <text:p text:style-name="P22"><text:tab/><text:span text:style-name="T1">RST : BOOL (asynchroner Reset)</text:span></text:p>
      <text:p text:style-name="P25"><draw:frame draw:style-name="fr4" draw:name="Grafik315" text:anchor-type="paragraph" svg:x="1.062cm" svg:y="1.037cm" svg:width="2.731cm" svg:height="1.79cm" draw:z-index="290"><draw:image xlink:href="Pictures/10000000000000AC00000071DA8A4843.png" xlink:type="simple" xlink:show="embed" xlink:actuate="onLoad"/></draw:frame>Output<text:tab/>Q : BOOL (Ausgang)</text:p>
      <text:p text:style-name="Standard"><text:line-break/>TOGGLE ist ein <text:span text:style-name="T38">flankengetriggertes</text:span> Toggle <text:span text:style-name="T46">Flop</text:span>-Flop mit asynchronem Reset-Eingang. Das TOGGLE <text:span text:style-name="T16">Flip</text:span>-Flop invertiert den Ausgang Q bei einer steigenden Flanke von CLK. Der Ausgang ändert bei jeder steigenden Flanke von CLK seinen Zustand.</text:p>
      <text:list xml:id="list33644200" text:continue-numbering="true" text:style-name="L1">
        <text:list-item>
          <text:h text:style-name="P211" text:outline-level="1">Signalgeneratoren</text:h>
        </text:list-item>
      </text:list>
      <text:p text:style-name="P55"/>
      <text:list xml:id="list33632654" text:continue-numbering="true" text:style-name="L1">
        <text:list-item>
          <text:list>
            <text:list-item>
              <text:h text:style-name="P217" text:outline-level="2"><text:alphabetical-index-mark-start text:id="IMark100843576"/>GEN_PULSE<text:alphabetical-index-mark-end text:id="IMark100843576"/></text:h>
            </text:list-item>
          </text:list>
        </text:list-item>
      </text:list>
      <text:p text:style-name="P22">Type<text:tab/>Funktionsbaustein</text:p>
      <text:p text:style-name="P22"><text:span text:style-name="T16">Input</text:span><text:tab/>ENQ : BOOL (<text:span text:style-name="T16">Enable</text:span> Eingang)</text:p>
      <text:p text:style-name="P22"><text:tab/>PTH : TIME (Impulsdauer HIGH)</text:p>
      <text:p text:style-name="P22"><text:tab/>PTL : TIME (Impulsdauer LOW)</text:p>
      <text:p text:style-name="P25"><draw:frame draw:style-name="fr4" draw:name="Grafik660" text:anchor-type="paragraph" svg:x="1.002cm" svg:y="0.69cm" svg:width="2.499cm" svg:height="1.891cm" draw:z-index="680"><draw:image xlink:href="Pictures/10000000000000BD0000008FFFDF8E1C.png" xlink:type="simple" xlink:show="embed" xlink:actuate="onLoad"/></draw:frame>Output<text:tab/>Q : BOOL (Ausgangssignal)</text:p>
      <text:p text:style-name="P55"><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wird die Zeit auf einen SPS Zyklus begrenzt. GEN_PULSE(ENQ := TRUE, PTH := T#0s, PTL := T#0s) erzeugt ein Ausgangssignal das einen Zyklus TRUE ist und einen Zyklus FALSE .</text:p>
      <text:p text:style-name="P55"/>
      <text:p text:style-name="P55"/>
      <text:p text:style-name="P55"/>
      <text:p text:style-name="P55"/>
      <text:p text:style-name="P55"/>
      <text:list xml:id="list33646729" text:continue-numbering="true" text:style-name="L1">
        <text:list-item>
          <text:list>
            <text:list-item>
              <text:h text:style-name="P217" text:outline-level="2"><text:soft-page-break/><text:alphabetical-index-mark-start text:id="IMark100843576"/>GEN_PW2<text:alphabetical-index-mark-end text:id="IMark100843576"/></text:h>
            </text:list-item>
          </text:list>
        </text:list-item>
      </text:list>
      <text:p text:style-name="P22">Type<text:tab/>Funktionsbaustein</text:p>
      <text:p text:style-name="P22"><text:span text:style-name="T16">Input</text:span><text:tab/>ENQ : BOOL (<text:span text:style-name="T16">Enable</text:span> Eingang)</text:p>
      <text:p text:style-name="P52"><text:tab/>TH1 : TIME (Vorgabezeit HIGH wenn TS = LOW)</text:p>
      <text:p text:style-name="P34"><text:tab/>TL1 : TIME (Vorgabezeit LOW wenn TS = LOW)</text:p>
      <text:p text:style-name="P52"><text:tab/>TH2 : TIME (Vorgabezeit HIGH wenn TS = HIGH)</text:p>
      <text:p text:style-name="P34"><text:tab/>TL2 : TIME (Vorgabezeit LOW wenn TS = HIGH)</text:p>
      <text:p text:style-name="P26"><text:tab/>TS : BOOL (Auswahl für Ablaufzeiten)</text:p>
      <text:p text:style-name="P25">Output<text:tab/>Q : BOOL (Binäres Ausgangssignal)</text:p>
      <text:p text:style-name="P55"><text:tab/>TL : TIME (Ablaufzeit wenn Q = FALSE)</text:p>
      <text:p text:style-name="P55"><draw:frame draw:style-name="fr4" draw:name="Grafik691" text:anchor-type="paragraph" svg:x="1.069cm" svg:y="0.669cm" svg:width="2.499cm" svg:height="3.11cm" draw:z-index="720"><draw:image xlink:href="Pictures/10000000000000BD000000EB796DA5A3.png" xlink:type="simple" xlink:show="embed" xlink:actuate="onLoad"/></draw:frame><text:tab/>TH : TIME (Ablaufzeit wenn Q = TRUE)</text:p>
      <text:p text:style-name="P77"><text:line-break/>GEN_PW2 erzeugt ein Ausgangssignal mit einer definierbaren Zeit TH? für HIGH und TL für LOW. Mithilfe des Eingangs TS wird zwischen 2 Parametersätzen (TL1, TH1 und TL2, TH2) umgeschaltet. Beim Start oder nach einem ENQ = TRUE beginnt der Baustein mit der LOW Phase am Ausgang.</text:p>
      <text:list xml:id="list33632331" text:continue-numbering="true" text:style-name="L1">
        <text:list-item>
          <text:list>
            <text:list-item>
              <text:h text:style-name="P217" text:outline-level="2"><text:alphabetical-index-mark-start text:id="IMark100843576"/>GEN_RDM<text:alphabetical-index-mark-end text:id="IMark100843576"/></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5">Output<text:tab/>Q : BOOL (Binäres Ausgangssignal)</text:p>
      <text:p text:style-name="P25"><draw:frame draw:style-name="fr4" draw:name="Grafik290" text:anchor-type="paragraph" svg:x="1.064cm" svg:y="0.6cm" svg:width="2.281cm" svg:height="2.2cm" draw:z-index="262"><draw:image xlink:href="Pictures/10000000000000AC000000A63F7C5BE8.png" xlink:type="simple" xlink:show="embed" xlink:actuate="onLoad"/></draw:frame><text:tab/>OUT: REAL (Analoges Ausgangssignal)</text:p>
      <text:p text:style-name="P177"><text:soft-page-break/><text:span text:style-name="T34"><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67"><draw:frame draw:style-name="fr4" draw:name="Grafik291" text:anchor-type="paragraph" svg:x="1.032cm" svg:y="1.626cm" svg:width="15.711cm" svg:height="5.726cm" draw:z-index="444"><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67"/>
      <text:list xml:id="list33644531" text:continue-numbering="true" text:style-name="L1">
        <text:list-item>
          <text:list>
            <text:list-item>
              <text:h text:style-name="P217" text:outline-level="2"><text:alphabetical-index-mark-start text:id="IMark100843576"/>GEN_RDT<text:alphabetical-index-mark-end text:id="IMark100843576"/></text:h>
            </text:list-item>
          </text:list>
        </text:list-item>
      </text:list>
      <text:p text:style-name="P22">Type<text:tab/>Funktionsbaustein</text:p>
      <text:p text:style-name="P22"><text:span text:style-name="T16">Input</text:span><text:tab/>ENABLE : BOOL (Freigabeeingang)</text:p>
      <text:p text:style-name="P22"><text:tab/>MIN_TIME_MS : TIME (Minimale Periodendauer)</text:p>
      <text:p text:style-name="P22"><text:tab/>MAX_TIME_MS : TIME (Maximale Periodendauer)</text:p>
      <text:p text:style-name="P52"><text:tab/>TP_Q : TIME (Pulsbreite des Ausgangspulses an XQ)</text:p>
      <text:p text:style-name="P25"><draw:frame draw:style-name="fr4" draw:name="Grafik388" text:anchor-type="paragraph" svg:x="1.09cm" svg:y="0.695cm" svg:width="5.42cm" svg:height="2.649cm" draw:z-index="382"><draw:image xlink:href="Pictures/100000000000019A000000C81DD19F14.png" xlink:type="simple" xlink:show="embed" xlink:actuate="onLoad"/></draw:frame>Output<text:tab/>XQ : BOOL (Binäres Ausgangssignal)</text:p>
      <text:p text:style-name="P25"><text:soft-page-break/><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xml:id="list33625486" text:continue-numbering="true" text:style-name="L1">
        <text:list-item>
          <text:list>
            <text:list-item>
              <text:h text:style-name="P217" text:outline-level="2"><text:alphabetical-index-mark-start text:id="IMark100843576"/>GEN_RMP<text:alphabetical-index-mark-end text:id="IMark100843576"/></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52"><text:tab/>DL : REAL (Signal Verzögerung 0..1 * PT)</text:p>
      <text:p text:style-name="P25">Output<text:tab/>Q : BOOL (Binäres Ausgangssignal)</text:p>
      <text:p text:style-name="P25"><draw:frame draw:style-name="fr4" draw:name="Grafik264" text:anchor-type="paragraph" svg:x="1.224cm" svg:y="0.878cm" svg:width="2.281cm" svg:height="2.649cm" draw:z-index="263"><draw:image xlink:href="Pictures/10000000000000AC000000C869322E02.png" xlink:type="simple" xlink:show="embed" xlink:actuate="onLoad"/></draw:frame><text:tab/>OUT : REAL (Analoges Ausgangssignal)</text:p>
      <text:p text:style-name="Standard"><text:line-break/>GEN_RMP ist ein <text:span text:style-name="T38">Sägezahngenerator. </text:span>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25"><text:soft-page-break/>Das folgende Beispiel zeigt eine Traceaufzeichnung<text:span text:style-name="T4"> für die Eingangswerte PT = 10s, AM = 1 und OS = 0.</text:span></text:p>
      <text:p text:style-name="P55"><draw:frame draw:style-name="fr4" draw:name="Grafik265" text:anchor-type="paragraph" svg:x="1.154cm" svg:y="0.515cm" svg:width="15.863cm" svg:height="5.66cm" draw:z-index="261"><draw:image xlink:href="Pictures/10000000000002A9000000F3E79E9B74.png" xlink:type="simple" xlink:show="embed" xlink:actuate="onLoad"/></draw:frame></text:p>
      <text:list xml:id="list33643438" text:continue-numbering="true" text:style-name="L1">
        <text:list-item>
          <text:list>
            <text:list-item>
              <text:h text:style-name="P217" text:outline-level="2"><text:alphabetical-index-mark-start text:id="IMark100843576"/>GEN_SIN<text:alphabetical-index-mark-end text:id="IMark100843576"/></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2"><text:tab/>DL : REAL (Signal Verzögerung 0..1 * PT)</text:p>
      <text:p text:style-name="P25">Output<text:tab/>Q : BOOL (Binäres Ausgangssignal)</text:p>
      <text:p text:style-name="P25"><draw:frame draw:style-name="fr4" draw:name="Grafik206" text:anchor-type="paragraph" svg:x="1.39cm" svg:y="0.739cm" svg:width="2.281cm" svg:height="2.649cm" draw:z-index="164"><draw:image xlink:href="Pictures/10000000000000AC000000C89112D8DC.png" xlink:type="simple" xlink:show="embed" xlink:actuate="onLoad"/></draw:frame><text:tab/>OUT : REAL (Analoges Ausgangssignal)</text:p>
      <text:p text:style-name="P25"><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6">Delay</text:span> wird spezifiziert mit DL * PT. Ein DL von 0.5 verzögert das Signal um eine halbe Periode.</text:p>
      <text:p text:style-name="P25"><draw:frame draw:style-name="fr9" draw:name="Grafik207" text:anchor-type="paragraph" svg:x="1.769cm" svg:y="1.499cm" svg:width="6.68cm" svg:height="2.66cm" draw:z-index="165"><draw:image xlink:href="Pictures/10000000000001F9000000C9E803F6DF.png" xlink:type="simple" xlink:show="embed" xlink:actuate="onLoad"/></draw:frame><text:soft-page-break/>Das folgende Beispiel zeigt GEN_SIN mit einer Traceaufzeichnung des Sinussignals und des binären Ausgangs Q.</text:p>
      <text:p text:style-name="P25"/>
      <text:p text:style-name="P25">Obiges Beispiel Erzeugt ein Sinussignal mit 0.1 HZ (PT = 10 s) und einen unteren Spitzenwert von 0 und oberen Spitzenwert von 10.</text:p>
      <text:p text:style-name="P25"><draw:frame draw:style-name="fr4" draw:name="Grafik208" text:anchor-type="paragraph" svg:x="1.118cm" svg:y="0.473cm" svg:width="15.889cm" svg:height="6.883cm" draw:z-index="166"><draw:image xlink:href="Pictures/10000000000002D000000138926B238E.png" xlink:type="simple" xlink:show="embed" xlink:actuate="onLoad"/></draw:frame></text:p>
      <text:list xml:id="list33650509" text:continue-numbering="true" text:style-name="L1">
        <text:list-item>
          <text:list>
            <text:list-item>
              <text:h text:style-name="P217" text:outline-level="2"><text:alphabetical-index-mark-start text:id="IMark100843576"/>GEN_SQR<text:alphabetical-index-mark-end text:id="IMark100843576"/></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2"><text:tab/>DC : REAL (Tastverhältnis 0..1)</text:p>
      <text:p text:style-name="P22"><text:tab/>DL : REAL (Signal Verzögerung 0..1 * PT)</text:p>
      <text:p text:style-name="P25">Output<text:tab/>Q : BOOL (Binäres Ausgangssignal)</text:p>
      <text:p text:style-name="P25"><draw:frame draw:style-name="fr4" draw:name="Grafik190" text:anchor-type="paragraph" svg:x="1.388cm" svg:y="0.642cm" svg:width="2.281cm" svg:height="3.099cm" draw:z-index="150"><draw:image xlink:href="Pictures/10000000000000AC000000EAA0684FB4.png" xlink:type="simple" xlink:show="embed" xlink:actuate="onLoad"/></draw:frame><text:tab/>OUT : REAL (Analoges Ausgangssignal)</text:p>
      <text:p text:style-name="P25"><text:soft-page-break/><text:line-break/>GEN_SQR ist ein Rechteckgenerator mit programmierbarer Periodendauer, einstellbarer Amplitude und Signal Offset sowie Tastverhältnis DC (<text:span text:style-name="T16">Duty</text:span> <text:span text:style-name="T16">Cycle</text:span>). Als Besonderheit kann auch noch ein <text:span text:style-name="T16">Delay</text:span> eingestellt werden, damit mit mehreren Generatoren überlappende Signale erzeugt werden können.</text:p>
      <text:p text:style-name="Standard">Das folgende <text:span text:style-name="T38">Beispiel</text:span> zeigt 2 GEN_SQR, wobei einer davon mit einem Delay von 0.25 ( ¼ Periode) läuft. In der Traceaufzeichnung ist deutlich das Signal des ersten Generators und das verzögerte Signal des zweiten Generators zu sehen.</text:p>
      <text:p text:style-name="P25"><draw:frame draw:style-name="fr9" draw:name="Grafik191" text:anchor-type="paragraph" svg:x="1.037cm" svg:y="0.164cm" svg:width="9.83cm" svg:height="6.71cm" draw:z-index="151"><draw:image xlink:href="Pictures/10000000000002E7000001FB0EDD17E6.png" xlink:type="simple" xlink:show="embed" xlink:actuate="onLoad"/></draw:frame></text:p>
      <text:p text:style-name="P25"><draw:frame draw:style-name="fr4" draw:name="Grafik192" text:anchor-type="paragraph" svg:x="1.065cm" svg:y="0.005cm" svg:width="15.924cm" svg:height="6.297cm" draw:z-index="152"><draw:image xlink:href="Pictures/10000000000002C700000119A48C9101.png" xlink:type="simple" xlink:show="embed" xlink:actuate="onLoad"/></draw:frame></text:p>
      <text:list xml:id="list33632912" text:continue-numbering="true" text:style-name="L1">
        <text:list-item>
          <text:list>
            <text:list-item>
              <text:h text:style-name="P217" text:outline-level="2"><text:soft-page-break/><text:alphabetical-index-mark-start text:id="IMark100843576"/>PWM_DC<text:alphabetical-index-mark-end text:id="IMark100843576"/></text:h>
            </text:list-item>
          </text:list>
        </text:list-item>
      </text:list>
      <text:p text:style-name="P22">Type<text:tab/>Funktionsbaustein</text:p>
      <text:p text:style-name="P22"><text:span text:style-name="T16">Input</text:span><text:tab/>F : REAL (Ausgangsfrequenz)</text:p>
      <text:p text:style-name="P22"><text:tab/>DC : REAL (Tastverhältnis 0..1) </text:p>
      <text:p text:style-name="P25"><draw:frame draw:style-name="fr4" draw:name="Grafik129" text:anchor-type="paragraph" svg:x="1.092cm" svg:y="0.681cm" svg:width="2.281cm" svg:height="1.75cm" draw:z-index="102"><draw:image xlink:href="Pictures/10000000000000AC0000008464C2606D.png" xlink:type="simple" xlink:show="embed" xlink:actuate="onLoad"/></draw:frame>Output<text:tab/>Q : BOOL (Ausgangssignal)</text:p>
      <text:p text:style-name="P25"><text:line-break/>PWM_DC ist ein <text:span text:style-name="T16">Duty</text:span>-<text:span text:style-name="T16">Cycle</text:span> modulierter Frequenzgenerator. Der Generator erzeugt eine feste Frequenz F mit einem Tastverhältnis (TON / TOFF), welche über den Eingang DC moduliert (Eingestellt) werden kann. Ein Wert von 0.5 am Eingang DC erzeugt ein Tastverhältnis von 50%.</text:p>
      <text:p text:style-name="P25"><draw:g text:anchor-type="paragraph" draw:z-index="103" draw:style-name="gr1"><draw:line draw:style-name="gr2" draw:text-style-name="P251" svg:x1="1.877cm" svg:y1="2.935cm" svg:x2="2.877cm" svg:y2="2.935cm"><text:p/></draw:line><draw:line draw:style-name="gr2" draw:text-style-name="P251" svg:x1="2.877cm" svg:y1="2.434cm" svg:x2="2.877cm" svg:y2="2.933cm"><text:p/></draw:line><draw:line draw:style-name="gr2" draw:text-style-name="P251" svg:x1="2.877cm" svg:y1="2.434cm" svg:x2="4.877cm" svg:y2="2.434cm"><text:p/></draw:line><draw:line draw:style-name="gr2" draw:text-style-name="P251" svg:x1="4.877cm" svg:y1="2.933cm" svg:x2="4.877cm" svg:y2="2.434cm"><text:p/></draw:line><draw:frame draw:style-name="gr6" draw:text-style-name="P253" svg:width="0.997cm" svg:height="0.65cm" svg:x="1.127cm" svg:y="2.433cm"><draw:text-box><text:p text:style-name="P252"><text:span text:style-name="T50">Q</text:span></text:p></draw:text-box></draw:frame><draw:line draw:style-name="gr2" draw:text-style-name="P251" svg:x1="4.877cm" svg:y1="2.935cm" svg:x2="5.877cm" svg:y2="2.935cm"><text:p/></draw:line><draw:line draw:style-name="gr7" draw:text-style-name="P251" svg:x1="2.877cm" svg:y1="1.933cm" svg:x2="3.378cm" svg:y2="1.933cm"><text:p/></draw:line><draw:frame draw:style-name="gr6" draw:text-style-name="P253" svg:width="1.124cm" svg:height="0.65cm" svg:x="3.378cm" svg:y="1.579cm"><draw:text-box><text:p text:style-name="P252"><text:span text:style-name="T50">Ton</text:span></text:p></draw:text-box></draw:frame><draw:line draw:style-name="gr7" draw:text-style-name="P251" svg:x1="4.877cm" svg:y1="1.933cm" svg:x2="4.378cm" svg:y2="1.933cm"><text:p/></draw:line><draw:line draw:style-name="gr2" draw:text-style-name="P251" svg:x1="5.877cm" svg:y1="2.434cm" svg:x2="5.877cm" svg:y2="2.933cm"><text:p/></draw:line><draw:line draw:style-name="gr2" draw:text-style-name="P251" svg:x1="5.877cm" svg:y1="2.434cm" svg:x2="7.877cm" svg:y2="2.434cm"><text:p/></draw:line><draw:line draw:style-name="gr2" draw:text-style-name="P251" svg:x1="7.876cm" svg:y1="2.933cm" svg:x2="7.876cm" svg:y2="2.434cm"><text:p/></draw:line><draw:line draw:style-name="gr2" draw:text-style-name="P251" svg:x1="7.876cm" svg:y1="2.935cm" svg:x2="8.876cm" svg:y2="2.935cm"><text:p/></draw:line><draw:line draw:style-name="gr2" draw:text-style-name="P251" svg:x1="7.876cm" svg:y1="2.935cm" svg:x2="8.876cm" svg:y2="2.935cm"><text:p/></draw:line><draw:line draw:style-name="gr2" draw:text-style-name="P251" svg:x1="8.879cm" svg:y1="2.434cm" svg:x2="8.879cm" svg:y2="2.933cm"><text:p/></draw:line><draw:line draw:style-name="gr2" draw:text-style-name="P251" svg:x1="8.879cm" svg:y1="2.434cm" svg:x2="10.879cm" svg:y2="2.434cm"><text:p/></draw:line><draw:line draw:style-name="gr2" draw:text-style-name="P251" svg:x1="10.878cm" svg:y1="2.933cm" svg:x2="10.878cm" svg:y2="2.434cm"><text:p/></draw:line><draw:line draw:style-name="gr2" draw:text-style-name="P251" svg:x1="10.878cm" svg:y1="2.935cm" svg:x2="11.876cm" svg:y2="2.935cm"><text:p/></draw:line><draw:line draw:style-name="gr2" draw:text-style-name="P251" svg:x1="10.878cm" svg:y1="2.935cm" svg:x2="11.876cm" svg:y2="2.935cm"><text:p/></draw:line><draw:line draw:style-name="gr21" draw:text-style-name="P251" svg:x1="7.876cm" svg:y1="1.933cm" svg:x2="8.876cm" svg:y2="1.933cm"><text:p/></draw:line><draw:frame draw:style-name="gr6" draw:text-style-name="P253" svg:width="1.124cm" svg:height="0.65cm" svg:x="7.877cm" svg:y="1.182cm"><draw:text-box><text:p text:style-name="P252"><text:span text:style-name="T50">Toff</text:span></text:p></draw:text-box></draw:frame><draw:line draw:style-name="gr7" draw:text-style-name="P251" svg:x1="2.877cm" svg:y1="3.434cm" svg:x2="3.877cm" svg:y2="3.434cm"><text:p/></draw:line><draw:frame draw:style-name="gr6" draw:text-style-name="P253" svg:width="1.251cm" svg:height="0.65cm" svg:x="3.877cm" svg:y="3.078cm"><draw:text-box><text:p text:style-name="P252"><text:span text:style-name="T50">1 / F</text:span></text:p></draw:text-box></draw:frame><draw:line draw:style-name="gr7" draw:text-style-name="P251" svg:x1="5.877cm" svg:y1="3.434cm" svg:x2="4.877cm" svg:y2="3.434cm"><text:p/></draw:line></draw:g>Das Folgende Signalbild zeigt ein Ausgangssignal mit einem <text:span text:style-name="T16">Duty</text:span>-<text:span text:style-name="T16">Cycle</text:span> von 2 / 1, was einem DC (Tastverhältnis) von 0.67 entspricht.</text:p>
      <text:p text:style-name="P55"/>
      <text:list xml:id="list33656532" text:continue-numbering="true" text:style-name="L1">
        <text:list-item>
          <text:list>
            <text:list-item>
              <text:h text:style-name="P217" text:outline-level="2"><text:alphabetical-index-mark-start text:id="IMark100843576"/>PWM_PW<text:alphabetical-index-mark-end text:id="IMark100843576"/></text:h>
            </text:list-item>
          </text:list>
        </text:list-item>
      </text:list>
      <text:p text:style-name="P22">Type<text:tab/>Funktionsbaustein</text:p>
      <text:p text:style-name="P22"><text:span text:style-name="T16">Input</text:span><text:tab/>F : REAL (Ausgangsfrequenz)</text:p>
      <text:p text:style-name="P22"><text:tab/>PW : TIME (Impulsdauer <text:span text:style-name="T16">High</text:span>) </text:p>
      <text:p text:style-name="P25"><draw:frame draw:style-name="fr4" draw:name="Grafik130" text:anchor-type="paragraph" svg:x="1.102cm" svg:y="0.684cm" svg:width="2.281cm" svg:height="1.75cm" draw:z-index="104"><draw:image xlink:href="Pictures/10000000000000AC0000008475A5B37A.png" xlink:type="simple" xlink:show="embed" xlink:actuate="onLoad"/></draw:frame>Output<text:tab/>Q : BOOL (Ausgangssignal)</text:p>
      <text:p text:style-name="P25"><text:line-break/>PWM_PW ist ein Puls breiten modulierter Frequenzgenerator. Der Generator erzeugt eine feste Frequenz F mit einem Tastverhältnis (TON / TOFF) das über den <text:soft-page-break/>Eingang PW moduliert (eingestellt) werden kann. Der Eingang gibt die Zeit vor die das Signal auf TRUE bleibt.</text:p>
      <text:p text:style-name="P25"><draw:g text:anchor-type="paragraph" draw:z-index="105" draw:style-name="gr1"><draw:line draw:style-name="gr2" draw:text-style-name="P251" svg:x1="1.93cm" svg:y1="1.519cm" svg:x2="2.93cm" svg:y2="1.519cm"><text:p/></draw:line><draw:line draw:style-name="gr2" draw:text-style-name="P251" svg:x1="2.93cm" svg:y1="1.02cm" svg:x2="2.93cm" svg:y2="1.519cm"><text:p/></draw:line><draw:line draw:style-name="gr2" draw:text-style-name="P251" svg:x1="2.93cm" svg:y1="1.02cm" svg:x2="4.93cm" svg:y2="1.02cm"><text:p/></draw:line><draw:line draw:style-name="gr2" draw:text-style-name="P251" svg:x1="4.93cm" svg:y1="1.519cm" svg:x2="4.93cm" svg:y2="1.02cm"><text:p/></draw:line><draw:frame draw:style-name="gr6" draw:text-style-name="P253" svg:width="0.997cm" svg:height="0.65cm" svg:x="1.18cm" svg:y="1.02cm"><draw:text-box><text:p text:style-name="P252"><text:span text:style-name="T50">Q</text:span></text:p></draw:text-box></draw:frame><draw:line draw:style-name="gr2" draw:text-style-name="P251" svg:x1="4.93cm" svg:y1="1.519cm" svg:x2="5.93cm" svg:y2="1.519cm"><text:p/></draw:line><draw:line draw:style-name="gr7" draw:text-style-name="P251" svg:x1="2.93cm" svg:y1="0.519cm" svg:x2="3.431cm" svg:y2="0.519cm"><text:p/></draw:line><draw:frame draw:style-name="gr6" draw:text-style-name="P253" svg:width="1.124cm" svg:height="0.65cm" svg:x="3.431cm" svg:y="0.166cm"><draw:text-box><text:p text:style-name="P252"><text:span text:style-name="T50">PW</text:span></text:p></draw:text-box></draw:frame><draw:line draw:style-name="gr7" draw:text-style-name="P251" svg:x1="4.93cm" svg:y1="0.519cm" svg:x2="4.431cm" svg:y2="0.519cm"><text:p/></draw:line><draw:line draw:style-name="gr2" draw:text-style-name="P251" svg:x1="5.93cm" svg:y1="1.02cm" svg:x2="5.93cm" svg:y2="1.519cm"><text:p/></draw:line><draw:line draw:style-name="gr2" draw:text-style-name="P251" svg:x1="5.93cm" svg:y1="1.02cm" svg:x2="7.93cm" svg:y2="1.02cm"><text:p/></draw:line><draw:line draw:style-name="gr2" draw:text-style-name="P251" svg:x1="7.93cm" svg:y1="1.519cm" svg:x2="7.93cm" svg:y2="1.02cm"><text:p/></draw:line><draw:line draw:style-name="gr2" draw:text-style-name="P251" svg:x1="7.93cm" svg:y1="1.519cm" svg:x2="8.93cm" svg:y2="1.519cm"><text:p/></draw:line><draw:line draw:style-name="gr2" draw:text-style-name="P251" svg:x1="7.93cm" svg:y1="1.519cm" svg:x2="8.93cm" svg:y2="1.519cm"><text:p/></draw:line><draw:line draw:style-name="gr7" draw:text-style-name="P251" svg:x1="2.93cm" svg:y1="2.02cm" svg:x2="3.93cm" svg:y2="2.02cm"><text:p/></draw:line><draw:frame draw:style-name="gr6" draw:text-style-name="P253" svg:width="1.251cm" svg:height="0.65cm" svg:x="3.93cm" svg:y="1.665cm"><draw:text-box><text:p text:style-name="P252"><text:span text:style-name="T50">1 / F</text:span></text:p></draw:text-box></draw:frame><draw:line draw:style-name="gr7" draw:text-style-name="P251" svg:x1="5.93cm" svg:y1="2.02cm" svg:x2="4.93cm" svg:y2="2.02cm"><text:p/></draw:line></draw:g></text:p>
      <text:list xml:id="list33646475" text:continue-numbering="true" text:style-name="L1">
        <text:list-item>
          <text:list>
            <text:list-item>
              <text:h text:style-name="P217" text:outline-level="2"><text:alphabetical-index-mark-start text:id="IMark100843576"/>RMP_B<text:alphabetical-index-mark-end text:id="IMark100843576"/></text:h>
            </text:list-item>
          </text:list>
        </text:list-item>
      </text:list>
      <text:p text:style-name="P22">Type<text:tab/>Funktionsbaustein</text:p>
      <text:p text:style-name="P22"><text:span text:style-name="T16">Input</text:span><text:tab/>SET : BOOL (Set-Eingang)</text:p>
      <text:p text:style-name="P22"><text:tab/>PT : TIME (Dauer einer Rampe 0..255)</text:p>
      <text:p text:style-name="P22"><text:tab/>EN : BOOL (Freigabeeingang)</text:p>
      <text:p text:style-name="P22"><text:tab/>UP : BOOL (Richtung UP=TRUE bedeutet Up)</text:p>
      <text:p text:style-name="P22"><text:tab/>RST : BOOL (Reset-Eingang)</text:p>
      <text:p text:style-name="P25">Output<text:tab/>OUT : Byte (Ausgangssignal)</text:p>
      <text:p text:style-name="P25"><text:tab/>BUSY : BOOL (TRUE, wenn Rampe läuft)</text:p>
      <text:p text:style-name="P55"><text:tab/>HIGH : BOOL (Maximaler Ausgangswert ist erreicht)</text:p>
      <text:p text:style-name="P55"><draw:frame draw:style-name="fr4" draw:name="Grafik131" text:anchor-type="paragraph" svg:x="1.222cm" svg:y="0.697cm" svg:width="2.499cm" svg:height="2.709cm" draw:z-index="308"><draw:image xlink:href="Pictures/10000000000000BD000000CDB3FE0E25.png" xlink:type="simple" xlink:show="embed" xlink:actuate="onLoad"/></draw:frame><text:tab/>LOW : BOOL (Minimaler Ausgangswert ist erreicht)</text:p>
      <text:p text:style-name="P25"><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55"><text:soft-page-break/>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55">Das folgende Beispiel zeigt eine Anwendung von RMP_B. Die Ausgänge HIGH und LOW Triggern die beiden TON (X4, X5) jeweils 1 Sekunde verzögert und schalten über das RS <text:span text:style-name="T16">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25"><draw:frame draw:style-name="fr4" draw:name="Grafik134" text:anchor-type="paragraph" svg:x="1.201cm" svg:y="0.093cm" svg:width="13.78cm" svg:height="4.521cm" draw:z-index="312"><draw:image xlink:href="Pictures/1000000000000265000000C90089EFE7.png" xlink:type="simple" xlink:show="embed" xlink:actuate="onLoad"/></draw:frame><draw:frame draw:style-name="fr9" draw:name="Grafik135" text:anchor-type="paragraph" svg:x="0.84cm" svg:y="9.689cm" svg:width="15.845cm" svg:height="7.167cm" draw:z-index="107"><draw:image xlink:href="Pictures/10000000000003E5000001C3B8829BB6.png" xlink:type="simple" xlink:show="embed" xlink:actuate="onLoad"/></draw:frame></text:p>
      <text:p text:style-name="P25"><text:line-break/>Ein weiteres Beispiel zeigt den Einsatz von RMP_B als Sägezahngenerator.</text:p>
      <text:p text:style-name="P55"><draw:frame draw:style-name="fr4" draw:name="Grafik136" text:anchor-type="paragraph" svg:x="1.018cm" svg:y="0.002cm" svg:width="12.301cm" svg:height="2.937cm" draw:z-index="310"><draw:image xlink:href="Pictures/10000000000001D10000006F6E8142FB.png" xlink:type="simple" xlink:show="embed" xlink:actuate="onLoad"/></draw:frame></text:p>
      <text:p text:style-name="P55"><draw:frame draw:style-name="fr4" draw:name="Grafik137" text:anchor-type="paragraph" svg:x="1.018cm" svg:y="0.071cm" svg:width="15.944cm" svg:height="6.498cm" draw:z-index="108"><draw:image xlink:href="Pictures/10000000000002DD0000012B0E252388.png" xlink:type="simple" xlink:show="embed" xlink:actuate="onLoad"/></draw:frame></text:p>
      <text:list xml:id="list33656526" text:continue-numbering="true" text:style-name="L1">
        <text:list-item>
          <text:list>
            <text:list-item>
              <text:h text:style-name="P217" text:outline-level="2"><text:soft-page-break/><text:alphabetical-index-mark-start text:id="IMark101004592"/>RMP_SOFT<text:alphabetical-index-mark-end text:id="IMark101004592"/></text:h>
            </text:list-item>
          </text:list>
        </text:list-item>
      </text:list>
      <text:p text:style-name="P22">Type<text:tab/>Funktionsbaustein</text:p>
      <text:p text:style-name="P22"><text:span text:style-name="T16">Input</text:span><text:tab/>IN : BOOL ()</text:p>
      <text:p text:style-name="P22"><text:tab/>VAL : Byte (Maximaler Ausgangswert)</text:p>
      <text:p text:style-name="P22">Config<text:tab/>PT_ON : TIME (Anstiegszeit, <text:span text:style-name="T16">Default</text:span> ist 100 ms)</text:p>
      <text:p text:style-name="P22"><text:tab/>PT_OFF : TIME (Abfallzeit, <text:span text:style-name="T16">Default</text:span> ist 100 ms)</text:p>
      <text:p text:style-name="P25"><draw:frame draw:style-name="fr4" draw:name="Grafik132" text:anchor-type="paragraph" svg:x="1.139cm" svg:y="0.684cm" svg:width="2.281cm" svg:height="1.75cm" draw:z-index="106"><draw:image xlink:href="Pictures/10000000000000AC00000084EFADF0FA.png" xlink:type="simple" xlink:show="embed" xlink:actuate="onLoad"/></draw:frame>Output<text:tab/>OUT : Byte (Ausgangssignal)</text:p>
      <text:p text:style-name="P25"><text:line-break/>RMP_SOFT glättet die Rampen eines Eingangssignals IN. Das Signal <text:span text:style-name="T16">Out</text:span> folgt dem Eingangssignal IN, indem es bei steigender Flanke von IN eine Rampe von 0 .. VAL am Ausgang OUT erzeugt und bei fallender Flanke am Eingang eine Rampe von VAL .. 0 am Ausgang <text:span text:style-name="T16">Out </text:span><text:span text:style-name="T24">erzeugt.</text:span> Die <text:span text:style-name="T24">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55"><draw:frame draw:style-name="fr4" draw:name="Grafik138" text:anchor-type="paragraph" svg:x="1.171cm" svg:y="0.691cm" svg:width="10.73cm" svg:height="3.39cm" draw:z-index="304"><draw:image xlink:href="Pictures/100000000000032B00000100EADD0B42.png" xlink:type="simple" xlink:show="embed" xlink:actuate="onLoad"/></draw:frame>Beispiel:</text:p>
      <text:p text:style-name="P55"><draw:frame draw:style-name="fr4" draw:name="Grafik139" text:anchor-type="paragraph" svg:x="1.051cm" svg:y="3.84cm" svg:width="15.896cm" svg:height="6.671cm" draw:z-index="303"><draw:image xlink:href="Pictures/10000000000002C80000012BC57AB450.png" xlink:type="simple" xlink:show="embed" xlink:actuate="onLoad"/></draw:frame></text:p>
      <text:list xml:id="list33642503" text:continue-numbering="true" text:style-name="L1">
        <text:list-item>
          <text:list>
            <text:list-item>
              <text:h text:style-name="P217" text:outline-level="2"><text:soft-page-break/><text:alphabetical-index-mark-start text:id="IMark101004592"/>RMP_W<text:alphabetical-index-mark-end text:id="IMark101004592"/></text:h>
            </text:list-item>
          </text:list>
        </text:list-item>
      </text:list>
      <text:p text:style-name="P22">Type<text:tab/>Funktionsbaustein</text:p>
      <text:p text:style-name="P22"><text:span text:style-name="T16">Input</text:span><text:tab/>SET : BOOL (Set Eingang)</text:p>
      <text:p text:style-name="P22"><text:tab/>PT : TIME (Dauer einer Rampe 0..65535)</text:p>
      <text:p text:style-name="P22"><text:tab/>EN : BOOL (Freigabeeingang)</text:p>
      <text:p text:style-name="P22"><text:tab/>UP : BOOL (Richtung UP=TRUE bedeutet U<text:span text:style-name="T16">p</text:span>)</text:p>
      <text:p text:style-name="P22"><text:tab/>RST : BOOL (Reset Eingang)</text:p>
      <text:p text:style-name="P25">Output<text:tab/>OUT : Byte (Ausgangssignal)</text:p>
      <text:p text:style-name="P55"><text:tab/>BUSY : BOOL (TRUE, wenn Rampe läuft)</text:p>
      <text:p text:style-name="P55"><text:tab/>HIGH : BOOL (Maximaler Ausgangswert ist erreicht)</text:p>
      <text:p text:style-name="P25"><draw:frame draw:style-name="fr4" draw:name="Grafik133" text:anchor-type="paragraph" svg:x="1.046cm" svg:y="0.667cm" svg:width="2.499cm" svg:height="2.709cm" draw:z-index="309"><draw:image xlink:href="Pictures/10000000000000BD000000CDA93EE1A9.png" xlink:type="simple" xlink:show="embed" xlink:actuate="onLoad"/></draw:frame><text:tab/>LOW : BOOL (Minimaler Ausgangswert ist erreicht)</text:p>
      <text:p text:style-name="P25"><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55">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55">Eine detaillierte Beschreibung finden Sie beim Modul RMP_B. Die Funktion ist absolut identisch mit der Ausnahme, dass der Ausgang OUT 8 Bit anstelle von 16 Bit weit ist.</text:p>
      <text:list xml:id="list33654496" text:continue-numbering="true" text:style-name="L1">
        <text:list-item>
          <text:h text:style-name="P211" text:outline-level="1">Signalverarbeitung</text:h>
        </text:list-item>
      </text:list>
      <text:p text:style-name="P20"/>
      <text:list xml:id="list33637727" text:continue-numbering="true" text:style-name="L1">
        <text:list-item>
          <text:list>
            <text:list-item>
              <text:h text:style-name="P217" text:outline-level="2"><text:alphabetical-index-mark-start text:id="IMark101004592"/>AIN<text:alphabetical-index-mark-end text:id="IMark101004592"/></text:h>
            </text:list-item>
          </text:list>
        </text:list-item>
      </text:list>
      <text:p text:style-name="P22">Type<text:tab/>Funktion</text:p>
      <text:p text:style-name="P22"><text:span text:style-name="T16">Input</text:span><text:tab/>IN : DWORD (Eingang vom A/D Wandler)</text:p>
      <text:p text:style-name="P25">Output<text:tab/>REAL (Ausgangswert)</text:p>
      <text:p text:style-name="P25">Config<text:tab/>BITS : Byte (Anzahl der Bits, 16 für ein komplettes Wort)</text:p>
      <text:p text:style-name="P25"><text:tab/>SIGN : Byte (<text:span text:style-name="T16">Sign</text:span> Bit, 15 für Bit 15)</text:p>
      <text:p text:style-name="P25"><text:tab/>LOW : REAL (kleinster Wert des Ausgangs)</text:p>
      <text:p text:style-name="P25"><draw:frame draw:style-name="fr4" draw:name="Grafik140" text:anchor-type="paragraph" svg:x="1.027cm" svg:y="0.589cm" svg:width="2.281cm" svg:height="1.12cm" draw:z-index="109"><draw:image xlink:href="Pictures/10000000000000AC00000055C71FE237.png" xlink:type="simple" xlink:show="embed" xlink:actuate="onLoad"/></draw:frame><text:tab/>HIGH : REAL (größter Wert des Ausgangs)</text:p>
      <text:p text:style-name="P25"><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6">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6">Sign</text:span> definiert, ob ein Vorzeichenbit vorhanden ist und wo im Eingangswort es zu finden ist. <text:span text:style-name="T16">Sign</text:span>=255 bedeutet, dass kein Vorzeichenbit vorhanden ist und 15 bedeutet, dass Bit 15 im DWORD das Vorzeichen enthält. Der Vorgabewert für SIGN ist 255. LOW und HIGH definieren den kleinsten und höchsten Ausgangswert. Ist ein <text:span text:style-name="T16">Sign-</text:span>Bit definiert (SIGN &lt; 255), dann müssen LOW und HIGH positiv sein. Ohne <text:span text:style-name="T16">Sign-</text:span>Bit können Sie sowohl positiv als auch negativ sein.</text:p>
      <text:p text:style-name="P25">Beispiel:</text:p>
      <text:p text:style-name="P55">Ein 12 Bit A/D Wandler ohne Vorzeichen und Eingangsbereich 0 – 10 wird wie folgt definiert: Bits=12, <text:span text:style-name="T16">Sign</text:span>=255, LOW=0, HIGH=10.</text:p>
      <text:p text:style-name="P55"><text:soft-page-break/>Ein 14 Bit A/D Wandler mit Vorzeichen in Bit 14 und Eingangsbereich -10 - +10 wird folgendermaßen definiert: Bits=14, <text:span text:style-name="T16">Sign</text:span>=14, LOW=0, HIGH=+10.</text:p>
      <text:p text:style-name="P55">Ein 24 Bit A/D Wandler ohne Vorzeichen und Eingangsbereich -10 - +10 wird folgendermaßen definiert: Bits=24, <text:span text:style-name="T16">Sign</text:span>=255, LOW=-10, HIGH=+10.</text:p>
      <text:list xml:id="list33630587" text:continue-numbering="true" text:style-name="L1">
        <text:list-item>
          <text:list>
            <text:list-item>
              <text:h text:style-name="P217" text:outline-level="2"><text:alphabetical-index-mark-start text:id="IMark101004592"/>AIN1<text:alphabetical-index-mark-end text:id="IMark101004592"/></text:h>
            </text:list-item>
          </text:list>
        </text:list-item>
      </text:list>
      <text:p text:style-name="P22">Type<text:tab/>Funktionsbaustein</text:p>
      <text:p text:style-name="P52"><text:span text:style-name="T16">Input</text:span><text:tab/>IN : DWORD (Eingang vom A/D Wandler)</text:p>
      <text:p text:style-name="P25">Output<text:tab/>OUT :REAL (Ausgangswert)</text:p>
      <text:p text:style-name="P25">Config<text:tab/>SIGN_BIT : INT (Bitnummer des Vorzeichens)</text:p>
      <text:p text:style-name="P25"><text:tab/>ERROR_BIT : INT (Bitnummer des Fehlerbits)</text:p>
      <text:p text:style-name="P55"><text:tab/>ERROR_CODE_EN : BOOL (Auswertung des <text:span text:style-name="T16">Error</text:span> Codes Ein)</text:p>
      <text:p text:style-name="P55"><text:tab/>ERROR_CODE : DWORD (Fehlercode des Eingangs IN)</text:p>
      <text:p text:style-name="P55"><text:tab/>OVERFLOW_BIT : INT (Bitnummer des <text:span text:style-name="T16">Overflow</text:span> Bits)</text:p>
      <text:p text:style-name="P55"><text:tab/>OVERFLOW_CODE_EN : BOOL (Auswertung des <text:span text:style-name="T16">Overflow</text:span> Codes Ein)</text:p>
      <text:p text:style-name="P55"><text:tab/>OVERFLOW_CODE : DWORD (<text:span text:style-name="T16">Overflow</text:span> Code des Eingangs IN)</text:p>
      <text:p text:style-name="P55"><text:tab/>BIT_0 : INT (Bitnummer des niederwertigsten Datenbits)</text:p>
      <text:p text:style-name="P55"><text:tab/>BIT_N : INT (Bitnummer des höchstwertigsten Datenbits)</text:p>
      <text:p text:style-name="P55"><text:tab/>OUT_MIN : REAL (Ausgangswert bei CODE_MIN)</text:p>
      <text:p text:style-name="P55"><text:tab/>OUT_MAX : REAL (Ausgangswert bei CODE_MAX)</text:p>
      <text:p text:style-name="P55"><text:tab/>CODE_MIN : DWORD (Minimaler Eingangswert)</text:p>
      <text:p text:style-name="P55"><text:tab/>CODE_MAX : DWORD (Maximaler Eingangswert)</text:p>
      <text:p text:style-name="P55"><text:tab/>ERROR_OUTPUT : REAL (Ausgangswert der bei ERROR)</text:p>
      <text:p text:style-name="P55"><draw:frame draw:style-name="fr4" draw:name="Grafik477" text:anchor-type="paragraph" svg:x="1.094cm" svg:y="0.661cm" svg:width="3.69cm" svg:height="2.311cm" draw:z-index="484"><draw:image xlink:href="Pictures/1000000000000117000000AF85604DC6.png" xlink:type="simple" xlink:show="embed" xlink:actuate="onLoad"/></draw:frame><text:tab/>OVERFLOW_OUTPUT: REAL <text:s/>(Ausgangswert der Bei OVERFLOW)</text:p>
      <text:p text:style-name="P55"><text:line-break/>AIN1 setzt den Digitalen Ausgangswert eines A/D Wandlers in einen dem Messwert entsprechenden REAL Wert um. Der Baustein kann mittels Config Variablen auf die unterschiedlichsten Digitalwandler angepasst werden.</text:p>
      <text:p text:style-name="P55"><draw:frame draw:style-name="fr10" draw:name="Grafik478" text:anchor-type="paragraph" svg:x="9.245cm" svg:y="0.326cm" svg:width="7.699cm" svg:height="7.121cm" draw:z-index="485"><draw:image xlink:href="Pictures/10000000000001840000016747CDA32D.png" xlink:type="simple" xlink:show="embed" xlink:actuate="onLoad"/></draw:frame><text:soft-page-break/>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 text:style-name="T16">Error</text:span> Bits am Ausgang ERROR angezeigt. Manche A/D Wandler liefern anstatt eines <text:span text:style-name="T16">Error</text:span> Bits einen festgelegten Ausgangswert der außerhalb des spezifizierten Messbereichs liegt und Signalisieren dadurch einen Fehler. Mit der Config Variablen ERROR_CODE wird der entsprechende <text:span text:style-name="T16">Error</text:span>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Config Variablen OVERFLOW_CODE_EN und OVERFLOW_CODE kann ein bestimmter Code am Eingang IN abgefragt werden und bei Auftreten dieses Codes das <text:span text:style-name="T16">Overflow</text:span>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Config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p>
      <text:p text:style-name="P55"/>
      <text:p text:style-name="P55"/>
      <text:p text:style-name="P55"/>
      <text:p text:style-name="P55"/>
      <text:list xml:id="list33643613" text:continue-numbering="true" text:style-name="L1">
        <text:list-item>
          <text:list>
            <text:list-item>
              <text:h text:style-name="P217" text:outline-level="2"><text:soft-page-break/><text:alphabetical-index-mark-start text:id="IMark101004592"/>AOUT<text:alphabetical-index-mark-end text:id="IMark101004592"/></text:h>
            </text:list-item>
          </text:list>
        </text:list-item>
      </text:list>
      <text:p text:style-name="P22">Type<text:tab/>Funktion</text:p>
      <text:p text:style-name="P22"><text:span text:style-name="T16">Input</text:span><text:tab/>IN : REAL (Eingangswert)</text:p>
      <text:p text:style-name="P25">Output<text:tab/>DWORD (Ausgangswort zum A/D Wandler)</text:p>
      <text:p text:style-name="P25">Config<text:tab/>BITS : Byte (Anzahl der Bits, 16 für ein komplettes Wort)</text:p>
      <text:p text:style-name="P25"><text:tab/>SIGN : Byte (<text:span text:style-name="T16">Sign</text:span> Bit, 15 für Bit 15)</text:p>
      <text:p text:style-name="P25"><text:tab/>LOW : REAL (kleinster Wert des Eingangs)</text:p>
      <text:p text:style-name="P25"><draw:frame draw:style-name="fr4" draw:name="Grafik141" text:anchor-type="paragraph" svg:x="1.221cm" svg:y="0.649cm" svg:width="2.281cm" svg:height="1.12cm" draw:z-index="110"><draw:image xlink:href="Pictures/10000000000000AC000000559A97C158.png" xlink:type="simple" xlink:show="embed" xlink:actuate="onLoad"/></draw:frame><text:tab/>HIGH : REAL (größter Wert des Eingangs)</text:p>
      <text:p text:style-name="P25"><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6">Sign-</text:span>Bit an beliebiger Stelle einfügen falls der D/A Wandler ein <text:span text:style-name="T16">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6">Sign</text:span> definiert, ob ein Vorzeichenbit benötigt wird und wo im Ausgangs-DWORD es zu platzieren ist. <text:span text:style-name="T16">Sign</text:span>=255 bedeutet, dass kein Vorzeichenbit benötigt wird, und 15 bedeutet das Bit 15 im DWORD das Vorzeichen enthält. LOW und HIGH definieren den kleinsten und höchsten Eingangswert. Ist ein <text:span text:style-name="T16">Sign-</text:span>Bit definiert, so müssen LOW und HIGH positiv sein. Ohne <text:span text:style-name="T16">Sign-</text:span>Bit können Sie sowohl positiv als auch negativ sein.</text:p>
      <text:p text:style-name="Standard"><text:span text:style-name="T38">Beispiele</text:span>:</text:p>
      <text:p text:style-name="P55">Ein 12 Bit D/A Wandler ohne Vorzeichen und Ausgangsbereich 0 – 10 wird wie folgt definiert: Bits=12, <text:span text:style-name="T16">Sign</text:span>=255, LOW=0, HIGH=10.</text:p>
      <text:p text:style-name="P55">Ein 14 Bit D/A Wandler mit Vorzeichen in Bit 14 und Ausgangsbereich -10 - +10 wird folgendermaßen definiert: Bits=14, <text:span text:style-name="T16">Sign</text:span>=14, LOW=0, HIGH=+10.</text:p>
      <text:p text:style-name="P55">Ein 24 Bit D/A Wandler ohne Vorzeichen und Ausgangsbereich -10 - +10 wird folgendermaßen definiert: Bits=24, <text:span text:style-name="T16">Sign</text:span>=255, LOW=-10, HIGH=+10.</text:p>
      <text:list xml:id="list33631340" text:continue-numbering="true" text:style-name="L1">
        <text:list-item>
          <text:list>
            <text:list-item>
              <text:h text:style-name="P217" text:outline-level="2"><text:soft-page-break/><text:alphabetical-index-mark-start text:id="IMark101004592"/>AOUT1<text:alphabetical-index-mark-end text:id="IMark101004592"/></text:h>
            </text:list-item>
          </text:list>
        </text:list-item>
      </text:list>
      <text:p text:style-name="P22">Type<text:tab/>Funktion</text:p>
      <text:p text:style-name="P22"><text:span text:style-name="T16">Input</text:span><text:tab/>IN : REAL (Eingangswert)</text:p>
      <text:p text:style-name="P25">Output<text:tab/>DWORD (Ausgangswort zum A/D Wandler)</text:p>
      <text:p text:style-name="P25">Config<text:tab/>BIT_0 : INT (Bitnummer des niederwertigesten Bits des Datenwortes)</text:p>
      <text:p text:style-name="P25"><text:tab/>BIT_N : INT (Bitnummer des höchstwertigsten Bits des Datenwortes)</text:p>
      <text:p text:style-name="P25"><text:tab/>SIGN : INT (<text:span text:style-name="T16">Sign</text:span> Bit, 15 für Bit 15)</text:p>
      <text:p text:style-name="P25"><text:tab/>LOW : REAL (kleinster Wert des Eingangs)</text:p>
      <text:p text:style-name="P25"><draw:frame draw:style-name="fr4" draw:name="Grafik479" text:anchor-type="paragraph" svg:x="1.085cm" svg:y="0.672cm" svg:width="2.9cm" svg:height="0.99cm" draw:z-index="486"><draw:image xlink:href="Pictures/10000000000000DB0000004BBACCFD16.png" xlink:type="simple" xlink:show="embed" xlink:actuate="onLoad"/></draw:frame><text:tab/>HIGH : REAL (größter Wert des Eingangs)</text:p>
      <text:p text:style-name="P55"/>
      <text:p text:style-name="P55"><draw:frame draw:style-name="fr11" draw:name="Grafik480" text:anchor-type="paragraph" svg:x="9.269cm" svg:y="0.542cm" svg:width="7.721cm" svg:height="7.14cm" draw:z-index="487"><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55"/>
      <text:list xml:id="list33632176" text:continue-numbering="true" text:style-name="L1">
        <text:list-item>
          <text:list>
            <text:list-item>
              <text:h text:style-name="P217" text:outline-level="2"><text:soft-page-break/><text:alphabetical-index-mark-start text:id="IMark101004592"/>BYTE_TO_RANGE<text:alphabetical-index-mark-end text:id="IMark101004592"/></text:h>
            </text:list-item>
          </text:list>
        </text:list-item>
      </text:list>
      <text:p text:style-name="P22">Type<text:tab/>Funktion</text:p>
      <text:p text:style-name="P22"><text:span text:style-name="T16">Input</text:span><text:tab/>IN : BYTE (Eingangswert)</text:p>
      <text:p text:style-name="P25"><draw:frame draw:style-name="fr4" draw:name="Grafik432" text:anchor-type="paragraph" svg:x="1.069cm" svg:y="0.667cm" svg:width="5.669cm" svg:height="1.79cm" draw:z-index="436"><draw:image xlink:href="Pictures/10000000000001AD00000087E5252AB9.png" xlink:type="simple" xlink:show="embed" xlink:actuate="onLoad"/></draw:frame>Output<text:tab/>REAL (Ausgangswert)</text:p>
      <text:p text:style-name="P55"><text:line-break/>BYTE_TO_RANGE wandelt einen BYTE Wert in einen REAL. Ein Eingangswert von 0 entspricht dabei dem REAL Wert von LOW und eine Eingangswert von 255 entspricht dem Eingangswert von HIGH.</text:p>
      <text:p text:style-name="P55">Um einen BYTE Wert von 0..255 in einen Prozentwert von 0..100 zu Wandeln wird der Baustein wie folgt aufgerufen:</text:p>
      <text:p text:style-name="P55">BYTE_TO_RANGE(X,0,100)</text:p>
      <text:list xml:id="list33653599" text:continue-numbering="true" text:style-name="L1">
        <text:list-item>
          <text:list>
            <text:list-item>
              <text:h text:style-name="P217" text:outline-level="2"><text:alphabetical-index-mark-start text:id="IMark101004592"/>DELAY<text:alphabetical-index-mark-end text:id="IMark101004592"/></text:h>
            </text:list-item>
          </text:list>
        </text:list-item>
      </text:list>
      <text:p text:style-name="P22">Type<text:tab/>Funktionsbaustein</text:p>
      <text:p text:style-name="P22"><text:span text:style-name="T16">Input</text:span><text:tab/>IN : REAL (Eingangswert)</text:p>
      <text:p text:style-name="P22"><text:tab/>N : INT (Anzahl der <text:span text:style-name="T24">Verzögerungs</text:span> Zyklen)</text:p>
      <text:p text:style-name="P22"><text:tab/>RST : BOOL (asynchroner Reset)</text:p>
      <text:p text:style-name="P25"><draw:frame draw:style-name="fr4" draw:name="Grafik142" text:anchor-type="paragraph" svg:x="1.097cm" svg:y="0.647cm" svg:width="2.281cm" svg:height="2.2cm" draw:z-index="111"><draw:image xlink:href="Pictures/10000000000000AC000000A645DC3564.png" xlink:type="simple" xlink:show="embed" xlink:actuate="onLoad"/></draw:frame>Output<text:tab/>OUT : REAL (verzögerter Ausgangswert)</text:p>
      <text:p text:style-name="P25"><text:line-break/>DELAY verzögert ein Eingangssignal (in) um N Zyklen. Der Eingang Reset ist asynchron und kann jederzeit den <text:span text:style-name="T16">Delay</text:span> Puffer löschen.</text:p>
      <text:p text:style-name="Standard"><draw:frame draw:style-name="fr4" draw:name="Grafik143" text:anchor-type="paragraph" svg:x="1.044cm" svg:y="1.136cm" svg:width="14.33cm" svg:height="5.851cm" draw:z-index="112"><draw:image xlink:href="Pictures/100000000000043B000001BAF6D56643.png" xlink:type="simple" xlink:show="embed" xlink:actuate="onLoad"/></draw:frame>Das <text:span text:style-name="T38">Beispiel</text:span> zeigt einen Generator, der Impulse von 5 nach 10 erzeugt und ein <text:span text:style-name="T16">Delay,</text:span> das 10 Zyklen Verzögerung erzeugt.</text:p>
      <text:p text:style-name="P88"><text:soft-page-break/></text:p>
      <text:p text:style-name="P88"><draw:frame draw:style-name="fr4" draw:name="Grafik144" text:anchor-type="paragraph" svg:x="1.113cm" svg:y="0.056cm" svg:width="15.371cm" svg:height="3.859cm" draw:z-index="584"><draw:image xlink:href="Pictures/10000000000003C8000000F3E6D7164C.png" xlink:type="simple" xlink:show="embed" xlink:actuate="onLoad"/></draw:frame></text:p>
      <text:list xml:id="list33655030" text:continue-numbering="true" text:style-name="L1">
        <text:list-item>
          <text:list>
            <text:list-item>
              <text:h text:style-name="P217" text:outline-level="2"><text:alphabetical-index-mark-start text:id="IMark101004592"/>DELAY_4<text:alphabetical-index-mark-end text:id="IMark101004592"/></text:h>
            </text:list-item>
          </text:list>
        </text:list-item>
      </text:list>
      <text:p text:style-name="P22">Type<text:tab/>Funktionsbaustein</text:p>
      <text:p text:style-name="P22"><text:span text:style-name="T16">Input</text:span><text:tab/>IN : REAL (Eingangswert)</text:p>
      <text:p text:style-name="P25">Output<text:tab/>OUT1 : REAL (um 1 Zyklus verzögerter Ausgangswert)</text:p>
      <text:p text:style-name="P25"><text:tab/>OUT2 : REAL (um 2 Zyklen verzögerter Ausgangswert)</text:p>
      <text:p text:style-name="P25"><text:tab/>OUT3 : REAL (um 3 Zyklen verzögerter Ausgangswert)</text:p>
      <text:p text:style-name="P25"><draw:frame draw:style-name="fr4" draw:name="Grafik145" text:anchor-type="paragraph" svg:x="1.117cm" svg:y="0.67cm" svg:width="2.281cm" svg:height="2.649cm" draw:z-index="113"><draw:image xlink:href="Pictures/10000000000000AC000000C8FB82DB55.png" xlink:type="simple" xlink:show="embed" xlink:actuate="onLoad"/></draw:frame><text:tab/>OUT4 : REAL (um 4 Zyklen verzögerter Ausgangswert)</text:p>
      <text:p text:style-name="P25"><text:line-break/>DELAY_4 verzögert eine Eingangssignal um maximal 4 Zyklen. An den Ausgängen <text:soft-page-break/>Out1..4 stehen die letzten 4 Werte zur Verfügung. Out1 ist um einen Zyklus verzögert, Qut2 um 2 Zyklen, Out3 um 3 Zyklen und Out4 um 4 Zyklen.</text:p>
      <text:p text:style-name="Standard"><draw:frame draw:style-name="fr4" draw:name="Grafik146" text:anchor-type="paragraph" svg:x="1.048cm" svg:y="0.596cm" svg:width="13.88cm" svg:height="6.309cm" draw:z-index="187"><draw:image xlink:href="Pictures/1000000000000419000001DD17B7B257.png" xlink:type="simple" xlink:show="embed" xlink:actuate="onLoad"/></draw:frame><text:span text:style-name="T38">Beispiel</text:span>:</text:p>
      <text:p text:style-name="P59"/>
      <text:p text:style-name="P59"><draw:frame draw:style-name="fr4" draw:name="Grafik147" text:anchor-type="paragraph" svg:x="0.875cm" svg:y="0.132cm" svg:width="16.108cm" svg:height="6.152cm" draw:z-index="114"><draw:image xlink:href="Pictures/10000000000003C600000171A1B13335.png" xlink:type="simple" xlink:show="embed" xlink:actuate="onLoad"/></draw:frame></text:p>
      <text:list xml:id="list33647519" text:continue-numbering="true" text:style-name="L1">
        <text:list-item>
          <text:list>
            <text:list-item>
              <text:h text:style-name="P217" text:outline-level="2"><text:alphabetical-index-mark-start text:id="IMark101004592"/><text:alphabetical-index-mark-start text:id="IMark107320984"/>FADE<text:alphabetical-index-mark-end text:id="IMark107320984"/><text:alphabetical-index-mark-end text:id="IMark101004592"/></text:h>
            </text:list-item>
          </text:list>
        </text:list-item>
      </text:list>
      <text:p text:style-name="P22">Type<text:tab/>Funktionsbaustein</text:p>
      <text:p text:style-name="P52"><text:span text:style-name="T16">Input</text:span><text:tab/>IN1 : REAL (Eingangswert 1)</text:p>
      <text:p text:style-name="P52"><text:tab/>IN2 : REAL (Eingangswert 2)</text:p>
      <text:p text:style-name="P52"><text:tab/>F : REAL (Auswahl Eingang TRUE = IN2)</text:p>
      <text:p text:style-name="P52"><text:tab/>TF : TIME (Überblendzeit)</text:p>
      <text:p text:style-name="P52"><text:soft-page-break/><text:tab/>RST : BOOL (Asynchroner Reset)</text:p>
      <text:p text:style-name="P25"><draw:frame draw:style-name="fr4" draw:name="Grafik87" text:anchor-type="paragraph" svg:x="1.113cm" svg:y="0.667cm" svg:width="2.101cm" svg:height="2.709cm" draw:z-index="421"><draw:image xlink:href="Pictures/100000000000009F000000CDDD347162.png" xlink:type="simple" xlink:show="embed" xlink:actuate="onLoad"/></draw:frame>Output<text:tab/>Y : REAL (Ausgangswert)</text:p>
      <text:p text:style-name="P55"><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55">Während der Umschaltzeit beträgt der Ausgang Y:</text:p>
      <text:p text:style-name="P55">Y = TU/TF * IN1 + (1 - TU/TF) * IN2.</text:p>
      <text:p text:style-name="P55">TU ist dabei die seit Beginn der Umschaltung vergangene Zeit.</text:p>
      <text:p text:style-name="P55">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xml:id="list33638924" text:continue-numbering="true" text:style-name="L1">
        <text:list-item>
          <text:list>
            <text:list-item>
              <text:h text:style-name="P217" text:outline-level="2"><text:alphabetical-index-mark-start text:id="IMark101004592"/>FILTER_DW<text:alphabetical-index-mark-end text:id="IMark101004592"/></text:h>
            </text:list-item>
          </text:list>
        </text:list-item>
      </text:list>
      <text:p text:style-name="P22">Type<text:tab/>Funktion : DWORD</text:p>
      <text:p text:style-name="P52"><text:span text:style-name="T16">Input</text:span><text:tab/>X : DWORD (Eingangswert)</text:p>
      <text:p text:style-name="P52"><text:tab/>T : TIME (Zeitkonstante des Filters)</text:p>
      <text:p text:style-name="P25"><draw:frame draw:style-name="fr4" draw:name="Grafik698" text:anchor-type="paragraph" svg:x="1.046cm" svg:y="0.672cm" svg:width="2.731cm" svg:height="1.75cm" draw:z-index="731"><draw:image xlink:href="Pictures/10000000000000CE000000847B8082B2.png" xlink:type="simple" xlink:show="embed" xlink:actuate="onLoad"/></draw:frame>Output<text:tab/>Y : DWORD (gefilterter Wert)</text:p>
      <text:p text:style-name="P42"><text:soft-page-break/><text:line-break/>FILTER_DW ist ein Filter ersten Grades für 32 Bit DWORD Daten. Die Hauptanwendung ist das Filtern von Sensorsignalen zur Rauschunterdrückung. Die grundlegende Funktionalität eines Filters ersten Grades kann beim Baustein FT_PT1 nachgelesen werden.</text:p>
      <text:list xml:id="list33634929" text:continue-numbering="true" text:style-name="L1">
        <text:list-item>
          <text:list>
            <text:list-item>
              <text:h text:style-name="P217" text:outline-level="2"><text:alphabetical-index-mark-start text:id="IMark101004592"/>FILTER_MAV_DW<text:alphabetical-index-mark-end text:id="IMark101004592"/></text:h>
            </text:list-item>
          </text:list>
        </text:list-item>
      </text:list>
      <text:p text:style-name="P33">Type<text:tab/>Funktion : DWORD</text:p>
      <text:p text:style-name="P64"><text:span text:style-name="T16">Input</text:span><text:tab/>X : DWORD (Eingangswert)</text:p>
      <text:p text:style-name="P64"><text:tab/>N : UINT (Anzahl der ermittelten Werte)</text:p>
      <text:p text:style-name="P64"><text:tab/>RST : BOOL (asynchroner Reset Eingang)</text:p>
      <text:p text:style-name="P32"><draw:frame draw:style-name="fr4" draw:name="Grafik700" text:anchor-type="paragraph" svg:x="1.023cm" svg:y="0.699cm" svg:width="3.62cm" svg:height="2.2cm" draw:z-index="734"><draw:image xlink:href="Pictures/1000000000000112000000A61160D7F2.png" xlink:type="simple" xlink:show="embed" xlink:actuate="onLoad"/></draw:frame>Output<text:tab/>Y : DWORD (gefilterter Wert)</text:p>
      <text:p text:style-name="P63"><text:line-break/>FILTER_MAV_DW ist ein Filter mit gleitendem Mittelwert. Beim Filter mit gleitendem Mittelwert (auch <text:span text:style-name="T16">Moving</text:span> <text:span text:style-name="T16">Average</text:span> Filter genannt) wird der Mittelwert von N aufeinander folgenden Messwerten als Mittelwert ausgegeben.</text:p>
      <text:p text:style-name="P63">Y:= (X<text:span text:style-name="T49">0</text:span> + X<text:span text:style-name="T49">1</text:span> + … + X<text:span text:style-name="T49">n-1</text:span><text:span text:style-name="T32">) / N</text:span></text:p>
      <text:p text:style-name="P63">X0 ist der Wert X im momentanen Zyklus, X1 ist der Wert im Zyklus davor usw. Die Anzahl der Werte über die der Mittelwert gebildet werden soll wird am Eingang N spezifiziert, der Wertebereich von N liegt zwischen 1 und 32.</text:p>
      <text:p text:style-name="P63"/>
      <text:p text:style-name="P63"/>
      <text:p text:style-name="P63"/>
      <text:p text:style-name="Text_20_body_20_2"><text:alphabetical-index-mark text:string-value=" "/></text:p>
      <text:list xml:id="list33630781" text:continue-numbering="true" text:style-name="L1">
        <text:list-item>
          <text:list>
            <text:list-item>
              <text:h text:style-name="P217" text:outline-level="2"><text:soft-page-break/><text:alphabetical-index-mark-start text:id="IMark101004592"/>FILTER_MAV_W<text:alphabetical-index-mark-end text:id="IMark101004592"/></text:h>
            </text:list-item>
          </text:list>
        </text:list-item>
      </text:list>
      <text:p text:style-name="P33">Type<text:tab/>Funktion : WORD</text:p>
      <text:p text:style-name="P64"><text:span text:style-name="T16">Input</text:span><text:tab/>X : WORD (Eingangswert)</text:p>
      <text:p text:style-name="P64"><text:tab/>N : UINT (Anzahl der ermittelten Werte)</text:p>
      <text:p text:style-name="P64"><text:tab/>RST : BOOL (asynchroner Reset Eingang)</text:p>
      <text:p text:style-name="P32"><draw:frame draw:style-name="fr4" draw:name="Grafik701" text:anchor-type="paragraph" svg:x="1.046cm" svg:y="0.676cm" svg:width="3.62cm" svg:height="2.2cm" draw:z-index="735"><draw:image xlink:href="Pictures/1000000000000112000000A693B15969.png" xlink:type="simple" xlink:show="embed" xlink:actuate="onLoad"/></draw:frame>Output<text:tab/>Y : WORD (gefilterter Wert)</text:p>
      <text:p text:style-name="P63"><text:line-break/>FILTER_MAV_W ist ein Filter mit gleitendem Mittelwert. Beim Filter mit gleitendem Mittelwert (auch <text:span text:style-name="T16">Moving</text:span> <text:span text:style-name="T16">Average</text:span> Filter genannt) wird der Mittelwert von N aufeinander folgenden Messwerten als Mittelwert ausgegeben.</text:p>
      <text:p text:style-name="P63">Y:= (X<text:span text:style-name="T49">0</text:span> + X<text:span text:style-name="T49">1</text:span> + … + X<text:span text:style-name="T49">n-1</text:span><text:span text:style-name="T32">) / N</text:span></text:p>
      <text:p text:style-name="P63">X0 ist der Wert X im momentanen Zyklus, X1 ist der Wert im Zyklus davor usw. Die Anzahl der Werte über die der Mittelwert gebildet werden soll wird am Eingang N spezifiziert, der Wertebereich von N liegt zwischen 1 und 32.</text:p>
      <text:list xml:id="list33631274" text:continue-numbering="true" text:style-name="L1">
        <text:list-item>
          <text:list>
            <text:list-item>
              <text:h text:style-name="P217" text:outline-level="2"><text:alphabetical-index-mark-start text:id="IMark101004592"/>FILTER_W<text:alphabetical-index-mark-end text:id="IMark101004592"/></text:h>
            </text:list-item>
          </text:list>
        </text:list-item>
      </text:list>
      <text:p text:style-name="P33">Type<text:tab/>Funktion : WORD</text:p>
      <text:p text:style-name="P64"><text:span text:style-name="T16">Input</text:span><text:tab/>X : WORD (Eingangswert)</text:p>
      <text:p text:style-name="P64"><text:tab/>T : TIME (Zeitkonstante des Filters)</text:p>
      <text:p text:style-name="P32"><draw:frame draw:style-name="fr4" draw:name="Grafik697" text:anchor-type="paragraph" svg:x="1.046cm" svg:y="0.654cm" svg:width="2.731cm" svg:height="1.75cm" draw:z-index="730"><draw:image xlink:href="Pictures/10000000000000CE00000084640D4D8C.png" xlink:type="simple" xlink:show="embed" xlink:actuate="onLoad"/></draw:frame>Output<text:tab/>Y : WORD (gefilterter Wert)</text:p>
      <text:p text:style-name="Text_20_body_20_2"><text:line-break/>FILTER_W ist ein Filter ersten Grades für 16 Bit WORD Daten. Die Hauptanwendung ist das Filtern von Sensorsignalen zur Rauschunterdrückung. Die grundlegende Funktionalität eines Filters ersten Grades kann beim Baustein FT_PT1 nachgelesen werden.</text:p>
      <text:list xml:id="list33633786" text:continue-numbering="true" text:style-name="L1">
        <text:list-item>
          <text:list>
            <text:list-item>
              <text:h text:style-name="P217" text:outline-level="2"><text:soft-page-break/><text:alphabetical-index-mark-start text:id="IMark101004592"/>FILTER_WAV<text:alphabetical-index-mark-end text:id="IMark101004592"/></text:h>
            </text:list-item>
          </text:list>
        </text:list-item>
      </text:list>
      <text:p text:style-name="P33">Type<text:tab/>Funktion : REAL</text:p>
      <text:p text:style-name="P64"><text:span text:style-name="T16">Input</text:span><text:tab/>X : DWORD (Eingangswert)</text:p>
      <text:p text:style-name="P64"><text:tab/>W : ARRAY[0..15] of REAL (Gewichtungsfaktoren)</text:p>
      <text:p text:style-name="P64"><text:tab/>RST : BOOL (asynchroner Reset Eingang)</text:p>
      <text:p text:style-name="P32"><draw:frame draw:style-name="fr4" draw:name="Grafik699" text:anchor-type="paragraph" svg:x="1.067cm" svg:y="0.653cm" svg:width="3.18cm" svg:height="2.2cm" draw:z-index="733"><draw:image xlink:href="Pictures/10000000000000F0000000A6812CBE1D.png" xlink:type="simple" xlink:show="embed" xlink:actuate="onLoad"/></draw:frame>Output<text:tab/>Y : REAL (gefilterter Wert)</text:p>
      <text:p text:style-name="P63"><text:line-break/>FILTER_WAV ist ein Filter mit gewichtetem Mittelwert. Beim Filter mit gewichteten Mittelwert (auch FIR Filter genannt) werden die einzelnen Werte im Puffer mit unterschiedlicher Gewichtung bewertet.</text:p>
      <text:p text:style-name="P63">Y:= X0 * W0 + X1 * W1 + ….+ X15 * W15</text:p>
      <text:p text:style-name="P63">X0 ist der Wert X im momentanen Zyklus, X1 ist der Wert im Zyklus davor usw. Die Faktoren W werden als Array dem Eingang W übergeben. Bei der Anwendung des FIR Filters ist darauf zu achten, dass geeignete Faktoren für die Gewichtung eingesetzt werden. Die Anwendung macht nur dann Sinn wenn diese Faktoren mit geeigneten Methoden oder Entwurfssoftware ermittelt werden.</text:p>
      <text:list xml:id="list33628041" text:continue-numbering="true" text:style-name="L1">
        <text:list-item>
          <text:list>
            <text:list-item>
              <text:h text:style-name="P217" text:outline-level="2"><text:alphabetical-index-mark-start text:id="IMark101004592"/>MIX<text:alphabetical-index-mark-end text:id="IMark101004592"/></text:h>
            </text:list-item>
          </text:list>
        </text:list-item>
      </text:list>
      <text:p text:style-name="P22">Type<text:tab/>Funktion : REAL</text:p>
      <text:p text:style-name="P52"><text:span text:style-name="T16">Input</text:span><text:tab/>A : REAL (Eingangswert 1)</text:p>
      <text:p text:style-name="P52"><text:tab/>B : REAL (Eingangswert 2)</text:p>
      <text:p text:style-name="P52"><text:tab/>M : REAL (Mischungsverhältnis)</text:p>
      <text:p text:style-name="P25"><draw:frame draw:style-name="fr4" draw:name="Grafik387" text:anchor-type="paragraph" svg:x="1.046cm" svg:y="0.667cm" svg:width="2.281cm" svg:height="2.02cm" draw:z-index="381"><draw:image xlink:href="Pictures/10000000000000AC000000995328F442.png" xlink:type="simple" xlink:show="embed" xlink:actuate="onLoad"/></draw:frame>Output<text:tab/>REAL (Wert aus dem Mischungsverhältnis M zwischen A und B)</text:p>
      <text:p text:style-name="P55"><text:soft-page-break/><text:line-break/>MIX stellt am Ausgang einen mit dem Mischungsverhältnis M gemischten Wert aus A und B zur Verfügung. Der Eingang M gibt den Anteil vom B in Bereich 0..1 an.</text:p>
      <text:p text:style-name="P55">MIX = (M-1)*A + M*B</text:p>
      <text:list xml:id="list33647841" text:continue-numbering="true" text:style-name="L1">
        <text:list-item>
          <text:list>
            <text:list-item>
              <text:h text:style-name="P217" text:outline-level="2"><text:alphabetical-index-mark-start text:id="IMark101004592"/>MUX_R2<text:alphabetical-index-mark-end text:id="IMark101004592"/></text:h>
            </text:list-item>
          </text:list>
        </text:list-item>
      </text:list>
      <text:p text:style-name="P22">Type<text:tab/>Funktion</text:p>
      <text:p text:style-name="P22"><text:span text:style-name="T16">Input</text:span><text:tab/>IN0 : REAL (Eingangswert 0)</text:p>
      <text:p text:style-name="P22"><text:tab/>IN1 : REAL (Eingangswert 1)</text:p>
      <text:p text:style-name="P22"><text:tab/>A : BOOL (Adresseingang)</text:p>
      <text:p text:style-name="P25"><draw:frame draw:style-name="fr4" draw:name="Grafik148" text:anchor-type="paragraph" svg:x="1.115cm" svg:y="0.616cm" svg:width="3.62cm" svg:height="2.02cm" draw:z-index="115"><draw:image xlink:href="Pictures/1000000000000112000000990BA29508.png" xlink:type="simple" xlink:show="embed" xlink:actuate="onLoad"/></draw:frame>Output<text:tab/>REAL (IN0 wenn A=0, IN1 wenn A=1)</text:p>
      <text:p text:style-name="P25"><text:line-break/>MUX_R2 wählt einen von 2 Eingangswerten aus. Die Funktion liefert den Wert von IN0 zurück, wenn A=0 und den Wert von IN1, wenn A=1.</text:p>
      <text:list xml:id="list33638929" text:continue-numbering="true" text:style-name="L1">
        <text:list-item>
          <text:list>
            <text:list-item>
              <text:h text:style-name="P217" text:outline-level="2"><text:alphabetical-index-mark-start text:id="IMark101004592"/>MUX_R4<text:alphabetical-index-mark-end text:id="IMark101004592"/></text:h>
            </text:list-item>
          </text:list>
        </text:list-item>
      </text:list>
      <text:p text:style-name="P22">Type<text:tab/>Funktion</text:p>
      <text:p text:style-name="P22"><text:span text:style-name="T16">Input</text:span><text:tab/>IN0 : REAL (Eingangswert 0)</text:p>
      <text:p text:style-name="P22"><text:tab/>IN1 : REAL (Eingangswert 1)</text:p>
      <text:p text:style-name="P22"><text:tab/>IN2 : REAL (Eingangswert 0)</text:p>
      <text:p text:style-name="P22"><text:tab/>IN3 : REAL (Eingangswert 1)</text:p>
      <text:p text:style-name="P22"><text:tab/>A0 : BOOL (Adresseingang Bit 0)</text:p>
      <text:p text:style-name="P22"><text:tab/>A1 : BOOL (Adresseingang Bit 1)</text:p>
      <text:p text:style-name="P25"><draw:frame draw:style-name="fr4" draw:name="Grafik149" text:anchor-type="paragraph" svg:x="1.05cm" svg:y="0.688cm" svg:width="3.62cm" svg:height="3.371cm" draw:z-index="116"><draw:image xlink:href="Pictures/1000000000000112000000FFEB6E2121.png" xlink:type="simple" xlink:show="embed" xlink:actuate="onLoad"/></draw:frame>Output<text:tab/>REAL (IN0 wenn A0=0 und A1=0, IN3 wenn A0=1 und A3=1)</text:p>
      <text:p text:style-name="P25"><text:soft-page-break/><text:line-break/>MUX_R4 wählt einen von 4 Eingangswerten aus.</text:p>
      <text:p text:style-name="P25">Logische Verknüpfung:<text:tab/><text:tab/>IN0 wenn A0=0 &amp; A1=0,</text:p>
      <text:p text:style-name="P25"><text:tab/><text:tab/><text:tab/>IN1 wenn A0=1 &amp; A1=0;</text:p>
      <text:p text:style-name="P25"><text:tab/><text:tab/><text:tab/>IN2 wenn A0=0 &amp; A1=1;</text:p>
      <text:p text:style-name="P25"><text:tab/><text:tab/><text:tab/>IN3 wenn A0=1 &amp; A1=1;</text:p>
      <text:list xml:id="list33651036" text:continue-numbering="true" text:style-name="L1">
        <text:list-item>
          <text:list>
            <text:list-item>
              <text:h text:style-name="P217" text:outline-level="2"><text:alphabetical-index-mark-start text:id="IMark101004592"/>OFFSET<text:alphabetical-index-mark-end text:id="IMark101004592"/></text:h>
            </text:list-item>
          </text:list>
        </text:list-item>
      </text:list>
      <text:p text:style-name="Standard">Type<text:tab/><text:span text:style-name="T46">Funktion</text:span></text:p>
      <text:p text:style-name="P22"><text:span text:style-name="T16">Input</text:span><text:tab/>X : REAL (Eingangssignal)</text:p>
      <text:p text:style-name="P22"><text:tab/>O1 : BOOL (<text:span text:style-name="T16">Enable</text:span> Offset 1)</text:p>
      <text:p text:style-name="P22"><text:tab/>O2 : BOOL (<text:span text:style-name="T16">Enable</text:span> Offset 2)</text:p>
      <text:p text:style-name="P22"><text:tab/>O3 : BOOL (<text:span text:style-name="T16">Enable</text:span> Offset 3)</text:p>
      <text:p text:style-name="P22"><text:tab/>D : BOOL (<text:span text:style-name="T16">Enable</text:span> <text:span text:style-name="T16">Default</text:span>)</text:p>
      <text:p text:style-name="P25">Output<text:tab/>REAL (Ausgangswert mit Offset)</text:p>
      <text:p text:style-name="P25">Config<text:tab/>Offset_1 : REAL (Offset der addiert wird, wenn O1=TRUE)</text:p>
      <text:p text:style-name="P25"><text:tab/>Offset_2 : REAL (Offset der addiert wird, wenn O2=TRUE)</text:p>
      <text:p text:style-name="P25"><text:tab/>Offset_3 : REAL (Offset der addiert wird, wenn O3=TRUE)</text:p>
      <text:p text:style-name="P25"><text:tab/>Offset_4 : REAL (Offset der addiert wird, wenn O4=TRUE)</text:p>
      <text:p text:style-name="P25"><draw:frame draw:style-name="fr4" draw:name="Grafik249" text:anchor-type="paragraph" svg:x="1.265cm" svg:y="0.667cm" svg:width="2.731cm" svg:height="3.371cm" draw:z-index="220"><draw:image xlink:href="Pictures/10000000000000CE000000FF31BB6902.png" xlink:type="simple" xlink:show="embed" xlink:actuate="onLoad"/></draw:frame><text:tab/><text:span text:style-name="T16">Default</text:span> : REAL (Wird anstelle von X verwendet, wenn D=TRUE)</text:p>
      <text:p text:style-name="Standard"><text:line-break/><text:soft-page-break/>Die <text:span text:style-name="T38">Funktion</text:span> Offset <text:span text:style-name="T38">addiert</text:span> verschiedene Offsets zu einem Eingangssignal abhängig vom Binären Wert an O1 .. O4. <text:s/>Die Offsets können einzeln oder <text:s/>gleichzeitig addiert werden. Mit dem Eingang D kann ein <text:span text:style-name="T16">Default-</text:span>Wert anstelle des Eingangs X auf den Addierer geschaltet werden. Die Offsets und der <text:span text:style-name="T16">Default-Wert </text:span>werden über Config-Variablen definiert.</text:p>
      <text:p text:style-name="P55"><draw:frame draw:style-name="fr4" draw:name="Grafik250" text:anchor-type="paragraph" svg:x="1.088cm" svg:y="0.647cm" svg:width="11.18cm" svg:height="4.009cm" draw:z-index="221"><draw:image xlink:href="Pictures/100000000000034D0000012F68684C42.png" xlink:type="simple" xlink:show="embed" xlink:actuate="onLoad"/></draw:frame>Das folgende Beispiel verdeutlicht die Funktionsweise von Offset:</text:p>
      <text:p text:style-name="P55"/>
      <text:p text:style-name="P55"><draw:frame draw:style-name="fr4" draw:name="Grafik251" text:anchor-type="paragraph" svg:x="1.529cm" svg:y="0.139cm" svg:width="14.61cm" svg:height="7.211cm" draw:z-index="222"><draw:image xlink:href="Pictures/1000000000000398000001C64C19A4EE.png" xlink:type="simple" xlink:show="embed" xlink:actuate="onLoad"/></draw:frame></text:p>
      <text:p text:style-name="P55"/>
      <text:p text:style-name="P55"/>
      <text:p text:style-name="P55"/>
      <text:p text:style-name="P55"/>
      <text:p text:style-name="P55"/>
      <text:list xml:id="list33625005" text:continue-numbering="true" text:style-name="L1">
        <text:list-item>
          <text:list>
            <text:list-item>
              <text:h text:style-name="P217" text:outline-level="2"><text:soft-page-break/><text:alphabetical-index-mark-start text:id="IMark101004592"/>OFFSET2<text:alphabetical-index-mark-end text:id="IMark101004592"/></text:h>
            </text:list-item>
          </text:list>
        </text:list-item>
      </text:list>
      <text:p text:style-name="P22">Type<text:tab/>Funktion</text:p>
      <text:p text:style-name="P22"><text:span text:style-name="T16">Input</text:span><text:tab/>X : REAL (Eingangssignal)</text:p>
      <text:p text:style-name="P77"><text:span text:style-name="T1"><text:tab/></text:span>O1 : <text:span text:style-name="T46">REAL</text:span> (<text:span text:style-name="T16">Enable</text:span> Offset 1)</text:p>
      <text:p text:style-name="P22"><text:tab/>O2 : REAL (<text:span text:style-name="T16">Enable</text:span> Offset 2)</text:p>
      <text:p text:style-name="P22"><text:tab/>O3 : REAL (<text:span text:style-name="T16">Enable</text:span> Offset 3)</text:p>
      <text:p text:style-name="P22"><text:tab/>D : BOOL (<text:span text:style-name="T16">Enable</text:span> <text:span text:style-name="T16">Default</text:span>)</text:p>
      <text:p text:style-name="P25">Output<text:tab/>REAL (Ausgangswert mit Offset)</text:p>
      <text:p text:style-name="P25">Config<text:tab/>Offset_1 : REAL (Offset der addiert wird, wenn O1=TRUE)</text:p>
      <text:p text:style-name="P25"><text:tab/>Offset_2 : REAL (Offset der addiert wird, wenn O2=TRUE)</text:p>
      <text:p text:style-name="P25"><text:tab/>Offset_3 : REAL (Offset der addiert wird, wenn O3=TRUE)</text:p>
      <text:p text:style-name="P25"><text:tab/>Offset_4 : REAL (Offset der addiert wird, wenn O4=TRUE)</text:p>
      <text:p text:style-name="P25"><text:tab/>DEFAULT : REAL (Wird anstelle von X verwendet, wenn D=TRUE)</text:p>
      <text:p text:style-name="P25"><draw:frame draw:style-name="fr4" draw:name="Grafik252" text:anchor-type="paragraph" svg:x="1.088cm" svg:y="0.076cm" svg:width="3.18cm" svg:height="3.371cm" draw:z-index="223"><draw:image xlink:href="Pictures/10000000000000F0000000FF71B4F401.png" xlink:type="simple" xlink:show="embed" xlink:actuate="onLoad"/></draw:frame> <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6">Default-</text:span>Wert anstelle des Eingangs X auf den Addierer geschaltet werden. Die Offsets und der <text:span text:style-name="T16">Defaultwert</text:span> werden über Config-Variablen definiert.</text:p>
      <text:p text:style-name="P55">Weitere Erläuterungen und ein Beispiel finden Sie unter Offset, welches sehr ähnliche Funktion aufweist. Offset2 addiert nur jeweils einen (den mit der höchsten Nummer) Offset, während Offset alle selektierten gleichzeitig addiert.</text:p>
      <text:p text:style-name="P55"/>
      <text:list xml:id="list33625663" text:continue-numbering="true" text:style-name="L1">
        <text:list-item>
          <text:list>
            <text:list-item>
              <text:h text:style-name="P217" text:outline-level="2"><text:soft-page-break/><text:alphabetical-index-mark-start text:id="IMark101004592"/>OVERRIDE<text:alphabetical-index-mark-end text:id="IMark101004592"/></text:h>
            </text:list-item>
          </text:list>
        </text:list-item>
      </text:list>
      <text:p text:style-name="P22">Type<text:tab/>Funktion</text:p>
      <text:p text:style-name="P22"><text:span text:style-name="T16">Input</text:span><text:tab/>X1 : REAL (Eingangssignal 1)</text:p>
      <text:p text:style-name="Standard"><text:tab/>X2 : <text:span text:style-name="T46">REAL</text:span> (Eingangssignal 2)</text:p>
      <text:p text:style-name="P22"><text:tab/>X3 : REAL (Eingangssignal 3)</text:p>
      <text:p text:style-name="P22"><text:tab/>E1 : BOOL (<text:span text:style-name="T16">Enable</text:span> Signal 1)</text:p>
      <text:p text:style-name="P22"><text:tab/>E2 : BOOL (<text:span text:style-name="T16">Enable</text:span> Signal 2)</text:p>
      <text:p text:style-name="P52"><text:tab/>E2 : BOOL (<text:span text:style-name="T16">Enable</text:span> Signal 3)</text:p>
      <text:p text:style-name="P25"><draw:frame draw:style-name="fr4" draw:name="Grafik381" text:anchor-type="paragraph" svg:x="1.09cm" svg:y="0.674cm" svg:width="3.69cm" svg:height="2.979cm" draw:z-index="375"><draw:image xlink:href="Pictures/1000000000000117000000E1144D7E07.png" xlink:type="simple" xlink:show="embed" xlink:actuate="onLoad"/></draw:frame>Output<text:tab/>REAL (Ausgangswert</text:p>
      <text:p text:style-name="P25"><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55">Beispiel:</text:p>
      <text:p text:style-name="P55">OVERRIDE(10,-12,11, TRUE, TRUE, TRUE) = -12</text:p>
      <text:p text:style-name="P55">OVERRIDE(10,-12,11, TRUE, FALSE, TRUE) = 11</text:p>
      <text:p text:style-name="P55">OVERRIDE(10,-12,11, FALSE, FALSE, FALSE) = 0</text:p>
      <text:p text:style-name="P55"/>
      <text:p text:style-name="P55"/>
      <text:p text:style-name="P55"/>
      <text:list xml:id="list33651813" text:continue-numbering="true" text:style-name="L1">
        <text:list-item>
          <text:list>
            <text:list-item>
              <text:h text:style-name="P217" text:outline-level="2"><text:soft-page-break/><text:alphabetical-index-mark-start text:id="IMark101004592"/>RANGE_TO_BYTE<text:alphabetical-index-mark-end text:id="IMark101004592"/></text:h>
            </text:list-item>
          </text:list>
        </text:list-item>
      </text:list>
      <text:p text:style-name="P22">Type<text:tab/>Funktion</text:p>
      <text:p text:style-name="P42"><text:span text:style-name="T7">Input</text:span><text:span text:style-name="T1"><text:tab/>X : REAL (Eingangswert)</text:span></text:p>
      <text:p text:style-name="P77"><text:span text:style-name="T15"><text:tab/></text:span><text:span text:style-name="T46">LOW</text:span> : <text:span text:style-name="T46">REAL</text:span> (untere <text:span text:style-name="T46">Bereichsgrenze</text:span>)</text:p>
      <text:p text:style-name="P52"><text:tab/>HIGH : REAL (Obere Bereichsgrenze)<text:tab/></text:p>
      <text:p text:style-name="P25"><draw:frame draw:style-name="fr4" draw:name="Grafik433" text:anchor-type="paragraph" svg:x="1.025cm" svg:y="0.667cm" svg:width="5.669cm" svg:height="1.79cm" draw:z-index="437"><draw:image xlink:href="Pictures/10000000000001AD00000087CB38209E.png" xlink:type="simple" xlink:show="embed" xlink:actuate="onLoad"/></draw:frame>Output<text:tab/>BYTE (Ausgangswert)</text:p>
      <text:p text:style-name="P55"><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xml:id="list33626594" text:continue-numbering="true" text:style-name="L1">
        <text:list-item>
          <text:list>
            <text:list-item>
              <text:h text:style-name="P217" text:outline-level="2"><text:alphabetical-index-mark-start text:id="IMark101004592"/>RANGE_TO_WORD<text:alphabetical-index-mark-end text:id="IMark101004592"/></text:h>
            </text:list-item>
          </text:list>
        </text:list-item>
      </text:list>
      <text:p text:style-name="P22">Type<text:tab/>Funktion</text:p>
      <text:p text:style-name="P42"><text:span text:style-name="T7">Input</text:span><text:span text:style-name="T1"><text:tab/>X : REAL (Eingangswert)</text:span></text:p>
      <text:p text:style-name="P77"><text:span text:style-name="T15"><text:tab/></text:span><text:span text:style-name="T46">LOW</text:span> : <text:span text:style-name="T46">REAL</text:span> (untere Bereichsgrenze)</text:p>
      <text:p text:style-name="P52"><text:tab/>HIGH : REAL (Obere Bereichsgrenze)<text:tab/></text:p>
      <text:p text:style-name="P25"><draw:frame draw:style-name="fr4" draw:name="Grafik434" text:anchor-type="paragraph" svg:x="1.025cm" svg:y="0.69cm" svg:width="5.669cm" svg:height="1.79cm" draw:z-index="438"><draw:image xlink:href="Pictures/10000000000001AD00000087E1A21209.png" xlink:type="simple" xlink:show="embed" xlink:actuate="onLoad"/></draw:frame>Output<text:tab/>WORD (Ausgangswert)</text:p>
      <text:p text:style-name="P55"><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xml:id="list33637734" text:continue-numbering="true" text:style-name="L1">
        <text:list-item>
          <text:list>
            <text:list-item>
              <text:h text:style-name="P217" text:outline-level="2"><text:soft-page-break/><text:alphabetical-index-mark-start text:id="IMark101004592"/>SCALE<text:alphabetical-index-mark-end text:id="IMark101004592"/></text:h>
            </text:list-item>
          </text:list>
        </text:list-item>
      </text:list>
      <text:p text:style-name="P22">Type<text:tab/>Funktion : REAL</text:p>
      <text:p text:style-name="P22"><text:span text:style-name="T16">Input</text:span><text:tab/>X : Byte (Eingangswert)</text:p>
      <text:p text:style-name="P25"><text:tab/>K : Byte (Multiplikator)</text:p>
      <text:p text:style-name="P25"><text:tab/>O : REAL (Offset)</text:p>
      <text:p text:style-name="P25"><text:tab/>MX : REAL (maximaler Ausgangswert)</text:p>
      <text:p text:style-name="P55"><text:tab/>MN : REAL (minimaler Ausgangswert)</text:p>
      <text:p text:style-name="P25"><draw:frame draw:style-name="fr4" draw:name="Grafik569" text:anchor-type="paragraph" svg:x="1.025cm" svg:y="0.69cm" svg:width="3.18cm" svg:height="2.919cm" draw:z-index="581"><draw:image xlink:href="Pictures/10000000000000F0000000DDF8D79628.png" xlink:type="simple" xlink:show="embed" xlink:actuate="onLoad"/></draw:frame>Output<text:tab/>REAL (Ausgangswert)</text:p>
      <text:p text:style-name="P25"><text:line-break/>SCALE Multipliziert den Eingang X mit K und addiert den Offset O. Der so errechnete <text:s/>Wert wird dann auf die Werte MN und MX begrenzt und das Ergebnis am Ausgang zur Verfügung gestellt.</text:p>
      <text:p text:style-name="P55">SCALE = LIMIT(MN, X * K + O, MX)</text:p>
      <text:list xml:id="list33627120" text:continue-numbering="true" text:style-name="L1">
        <text:list-item>
          <text:list>
            <text:list-item>
              <text:h text:style-name="P217" text:outline-level="2"><text:alphabetical-index-mark-start text:id="IMark101004592"/>SCALE_B<text:alphabetical-index-mark-end text:id="IMark101004592"/></text:h>
            </text:list-item>
          </text:list>
        </text:list-item>
      </text:list>
      <text:p text:style-name="P22">Type<text:tab/>Funktion : REAL</text:p>
      <text:p text:style-name="P22"><text:span text:style-name="T16">Input</text:span><text:tab/>X : DWORD (Eingangswert)</text:p>
      <text:p text:style-name="P25"><text:tab/>I_LO : DWORD (Eingangswert min)</text:p>
      <text:p text:style-name="P25"><text:tab/>I_HI : DWORD (Eingangswert max)</text:p>
      <text:p text:style-name="P25"><text:tab/>O_LO : REAL (Ausgangswert min)</text:p>
      <text:p text:style-name="P55"><text:tab/>O_HI : REAL (Ausgangswert max)</text:p>
      <text:p text:style-name="P55"><draw:frame draw:style-name="fr4" draw:name="Grafik570" text:anchor-type="paragraph" svg:x="1.046cm" svg:y="0.695cm" svg:width="4.069cm" svg:height="2.919cm" draw:z-index="582"><draw:image xlink:href="Pictures/1000000000000134000000DD6FD45040.png" xlink:type="simple" xlink:show="embed" xlink:actuate="onLoad"/></draw:frame>Output<text:tab/>REAL (Ausgangswert)</text:p>
      <text:p text:style-name="P25"><text:soft-page-break/><text:line-break/>SCALE_B skaliert einen Eingangswert BYTE und errechnet einen Ausgangswert in REAL. Der Eingangswert X wird dabei auf I_LO und I_HI begrenzt. SCALE_D(IN, 0, 255, 0, 100) skaliert einen Eingang mit 8 Bit Auflösung auf den Ausgang 0..100.</text:p>
      <text:list xml:id="list33627727" text:continue-numbering="true" text:style-name="L1">
        <text:list-item>
          <text:list>
            <text:list-item>
              <text:h text:style-name="P217" text:outline-level="2"><text:alphabetical-index-mark-start text:id="IMark101004592"/>SCALE_B2<text:alphabetical-index-mark-end text:id="IMark101004592"/></text:h>
            </text:list-item>
          </text:list>
        </text:list-item>
      </text:list>
      <text:p text:style-name="P22">Type<text:tab/>Funktion : REAL</text:p>
      <text:p text:style-name="P22"><text:span text:style-name="T16">Input</text:span><text:tab/>IN1 : Byte (Eingangswert 1)</text:p>
      <text:p text:style-name="P25"><text:tab/>IN2 : Byte (Eingangswert 2)</text:p>
      <text:p text:style-name="P25"><text:tab/>K : REAL (Multiplikator)</text:p>
      <text:p text:style-name="P25"><text:tab/>O : REAL (Offset)</text:p>
      <text:p text:style-name="P25">Output<text:tab/>REAL (Ausgangswert)</text:p>
      <text:p text:style-name="P25">Config<text:tab/>IN1_MIN : REAL (kleinster Wert für IN1)</text:p>
      <text:p text:style-name="P25"><text:tab/>IN1_MAX : REAL (größter Wert für IN1)</text:p>
      <text:p text:style-name="P25"><text:tab/>IN2_MIN : REAL (kleinster Wert für IN2)</text:p>
      <text:p text:style-name="P25"><draw:frame draw:style-name="fr4" draw:name="Grafik150" text:anchor-type="paragraph" svg:x="1.314cm" svg:y="0.676cm" svg:width="3.62cm" svg:height="2.469cm" draw:z-index="120"><draw:image xlink:href="Pictures/1000000000000112000000BBB7D20AFB.png" xlink:type="simple" xlink:show="embed" xlink:actuate="onLoad"/></draw:frame><text:tab/>IN2_MAX : REAL (größter Wert für IN2)</text:p>
      <text:p text:style-name="P25"><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25"><text:span text:style-name="T16">Out </text:span>= <text:tab/>(in1 * (IN1_MAX – IN1_MIN) / 255 + IN1_MIN <text:tab/>+ in2 * (IN2_MAX – <text:tab/>IN2_MIN) / 255 + IN2_MIN) * K + O</text:p>
      <text:p text:style-name="P55"><text:soft-page-break/>SCALE_B2 kann zum Beispiel verwendet werden um Gesamtluftmengen in Lüftungsanlagen zu berechnen. Auch überall dort wo gesteuerte Mischer eingesetzt werden und die resultierende Gesamtmenge berechnet werden muss.</text:p>
      <text:p text:style-name="P25"><draw:frame draw:style-name="fr9" draw:name="Grafik153" text:anchor-type="paragraph" svg:x="1.057cm" svg:y="0.677cm" svg:width="11.18cm" svg:height="2.66cm" draw:z-index="117"><draw:image xlink:href="Pictures/100000000000034D000000C912382ADB.png" xlink:type="simple" xlink:show="embed" xlink:actuate="onLoad"/></draw:frame>Beispiel:</text:p>
      <text:p text:style-name="P55"/>
      <text:p text:style-name="P55">IN0 ist eine Luftklappe, die die Luftmenge zwischen 100m³/h und 600m³/h für die Stellwerte in0 (0 – 255) regelt.</text:p>
      <text:p text:style-name="P55">IN1 ist eine Abluftgerät, das die Abluftmenge von 0 m³/h bis 400 m³/h für die Stellwerte in1 von 0 – 255 regelt.</text:p>
      <text:p text:style-name="P55">Die Setup-Werte für diese Anwendung sind: IN0_MIN = 100, IN0_MAX = 600, IN1_MIN = 0, IN1_MAX = -400.</text:p>
      <text:p text:style-name="P55">Die resultierende Gesamtluftmenge bei K=1 und O=0 (kein Multiplikator und kein Offset) variiert dann von -300 (in0=0 und in1=255) bis +600 (in=255 und in1=0).</text:p>
      <text:p text:style-name="P25"><text:line-break/>Für einen Eingangswert in0=128 (Klappe 50%) und IN1=128 (Lüfter auf 50%) ist der Ausgangswert 250 m³ – 200 m³ = 50 m³.</text:p>
      <text:p text:style-name="P55"><draw:frame draw:style-name="fr9" draw:name="Grafik154" text:anchor-type="paragraph" svg:x="1.127cm" svg:y="0.67cm" svg:width="11.629cm" svg:height="4.89cm" draw:z-index="118"><draw:image xlink:href="Pictures/100000000000036F0000017221319F31.png" xlink:type="simple" xlink:show="embed" xlink:actuate="onLoad"/></draw:frame>Der Eingang Offset kann auch dazu benutzt werden um Bausteine zu kaskadieren.</text:p>
      <text:p text:style-name="P88"/>
      <text:p text:style-name="P59"/>
      <text:p text:style-name="P59"/>
      <text:list xml:id="list33624514" text:continue-numbering="true" text:style-name="L1">
        <text:list-item>
          <text:list>
            <text:list-item>
              <text:h text:style-name="P227" text:outline-level="2"><text:soft-page-break/><text:alphabetical-index-mark-start text:id="IMark101004592"/>SCALE<text:span text:style-name="T11">_</text:span>B4<text:alphabetical-index-mark-end text:id="IMark101004592"/></text:h>
            </text:list-item>
          </text:list>
        </text:list-item>
      </text:list>
      <text:p text:style-name="P22">Type<text:tab/>Funktion : REAL</text:p>
      <text:p text:style-name="P22"><text:span text:style-name="T16">Input</text:span><text:tab/>IN1.. IN4 <text:s/>: Byte (Eingangswerte)</text:p>
      <text:p text:style-name="P25"><text:tab/>K : REAL (Multiplikator)</text:p>
      <text:p text:style-name="P25"><text:tab/>O : REAL (Offset)</text:p>
      <text:p text:style-name="P25">Output<text:tab/>REAL (Ausgangswert)</text:p>
      <text:p text:style-name="P25">Config<text:tab/>IN1_MIN : REAL (kleinster Wert für IN1)</text:p>
      <text:p text:style-name="P25"><text:tab/>IN1_MAX : REAL (größter Wert für IN1)</text:p>
      <text:p text:style-name="P25"><text:tab/>IN2_MIN : REAL (kleinster Wert für IN2)</text:p>
      <text:p text:style-name="P25"><text:tab/>IN2_MAX : REAL (größter Wert für IN2)</text:p>
      <text:p text:style-name="P25"><text:tab/>IN3_MIN : REAL (kleinster Wert für IN3)</text:p>
      <text:p text:style-name="P25"><text:tab/>IN3_MAX : REAL (größter Wert für IN3)</text:p>
      <text:p text:style-name="P25"><text:tab/>IN4_MIN : REAL (kleinster Wert für IN4)</text:p>
      <text:p text:style-name="P25"><draw:frame draw:style-name="fr4" draw:name="Grafik151" text:anchor-type="paragraph" svg:x="0.753cm" svg:y="0.693cm" svg:width="3.62cm" svg:height="3.371cm" draw:z-index="121"><draw:image xlink:href="Pictures/1000000000000112000000FFD19834AD.png" xlink:type="simple" xlink:show="embed" xlink:actuate="onLoad"/></draw:frame><text:tab/>IN4_MAX : REAL (größter Wert für IN4)</text:p>
      <text:p text:style-name="P25"><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25">OUT <text:tab/>= (in1 * (IN1_MAX – IN1_MIN) / 255 + IN1_MIN</text:p>
      <text:p text:style-name="P55"><text:tab/>+ in2 * (IN2_MAX – IN2_MIN) / 255 + IN2_MIN</text:p>
      <text:p text:style-name="P25"><text:tab/>+ in3 * (IN3_MAX – IN3_MIN) / 255 + IN3_MIN</text:p>
      <text:p text:style-name="P25"><text:tab/>+ in4 * (IN4_MAX – IN4_MIN) / 255 + IN4_MIN) * K + O</text:p>
      <text:p text:style-name="Standard">SCALE_B4 <text:span text:style-name="T38">kann</text:span> zum <text:span text:style-name="T38">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3645201" text:continue-numbering="true" text:style-name="L1">
        <text:list-item>
          <text:list>
            <text:list-item>
              <text:h text:style-name="P217" text:outline-level="2"><text:soft-page-break/><text:alphabetical-index-mark-start text:id="IMark101004592"/>SCALE_B8<text:alphabetical-index-mark-end text:id="IMark101004592"/></text:h>
            </text:list-item>
          </text:list>
        </text:list-item>
      </text:list>
      <text:p text:style-name="P22">Type<text:tab/>Funktion : REAL</text:p>
      <text:p text:style-name="P22"><text:span text:style-name="T16">Input</text:span><text:tab/>IN1 .. 8 : Byte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2" text:anchor-type="paragraph" svg:x="1.065cm" svg:y="0.653cm" svg:width="3.62cm" svg:height="5.17cm" draw:z-index="122"><draw:image xlink:href="Pictures/1000000000000112000001875AEEC002.png" xlink:type="simple" xlink:show="embed" xlink:actuate="onLoad"/></draw:frame><text:tab/>IN_MAX : REAL (größter Wert für IN)</text:p>
      <text:p text:style-name="P25"><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25"><text:span text:style-name="T16">OUT</text:span> <text:tab/>= (in1 * (IN1_MAX – IN1_MIN) / 255 + IN1_MIN</text:p>
      <text:p text:style-name="P55"><text:tab/>+ in2 * (IN2_MAX – IN2_MIN) / 255 + IN2_MIN</text:p>
      <text:p text:style-name="P55"><text:tab/>+ in3 * (IN3_MAX – IN3_MIN) / 255 + IN3_MIN</text:p>
      <text:p text:style-name="P55"><text:tab/>+ in4 * (IN4_MAX – IN4_MIN) / 255 + IN4_MIN</text:p>
      <text:p text:style-name="P55"><text:tab/>+ in5 * (IN5_MAX – IN5_MIN) / 255 + IN5_MIN</text:p>
      <text:p text:style-name="P55"><text:tab/>+ in6 * (IN6_MAX – IN6_MIN) / 255 + IN6_MIN</text:p>
      <text:p text:style-name="P55"><text:tab/>+ in7 * (IN7_MAX – IN7_MIN) / 255 + IN7_MIN</text:p>
      <text:p text:style-name="P55"><text:tab/>+ in8 * (IN8_MAX – IN8_MIN) / 255 + IN8_MIN) * K + O</text:p>
      <text:p text:style-name="P25">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3644232" text:continue-numbering="true" text:style-name="L1">
        <text:list-item>
          <text:list>
            <text:list-item>
              <text:h text:style-name="P217" text:outline-level="2"><text:soft-page-break/><text:alphabetical-index-mark-start text:id="IMark101004592"/>SCALE_D<text:alphabetical-index-mark-end text:id="IMark101004592"/></text:h>
            </text:list-item>
          </text:list>
        </text:list-item>
      </text:list>
      <text:p text:style-name="P22">Type<text:tab/>Funktion : REAL</text:p>
      <text:p text:style-name="P22"><text:span text:style-name="T16">Input</text:span><text:tab/>X : DWORD (Eingangswert)</text:p>
      <text:p text:style-name="P25"><text:tab/>I_LO : DWORD (Eingangswert min)</text:p>
      <text:p text:style-name="P25"><text:tab/>I_HI : DWORD (Eingangswert max)</text:p>
      <text:p text:style-name="P25"><text:tab/>O_LO : REAL (Ausgangswert min)</text:p>
      <text:p text:style-name="P55"><text:tab/>O_HI : REAL (Ausgangswert max)</text:p>
      <text:p text:style-name="P55"><draw:frame draw:style-name="fr4" draw:name="Grafik572" text:anchor-type="paragraph" svg:x="1.025cm" svg:y="0.69cm" svg:width="4.069cm" svg:height="2.919cm" draw:z-index="585"><draw:image xlink:href="Pictures/1000000000000134000000DD5915C787.png" xlink:type="simple" xlink:show="embed" xlink:actuate="onLoad"/></draw:frame>Output<text:tab/>REAL (Ausgangswert)</text:p>
      <text:p text:style-name="P55"><text:line-break/>SCALE_D skaliert einen Eingangswert DWORD und errechnet einen Ausgangswert in REAL. Der Eingangswert X wird dabei auf I_LO und I_HI begrenzt. SCALE_D(IN, 0, 8191, 0, 100) skaliert einen Eingang mit 14 Bit Auflösung auf den Ausgang 0..100.</text:p>
      <text:list xml:id="list33656446" text:continue-numbering="true" text:style-name="L1">
        <text:list-item>
          <text:list>
            <text:list-item>
              <text:h text:style-name="P217" text:outline-level="2"><text:alphabetical-index-mark-start text:id="IMark101004592"/>SCALE_R<text:alphabetical-index-mark-end text:id="IMark101004592"/></text:h>
            </text:list-item>
          </text:list>
        </text:list-item>
      </text:list>
      <text:p text:style-name="P22">Type<text:tab/>Funktion : REAL</text:p>
      <text:p text:style-name="P22"><text:span text:style-name="T16">Input</text:span><text:tab/>X : REAL (Eingangswert)</text:p>
      <text:p text:style-name="P25"><text:tab/>I_LO : REAL (Eingangswert min)</text:p>
      <text:p text:style-name="P25"><text:tab/>I_HI : REAL (Eingangswert max)</text:p>
      <text:p text:style-name="P25"><text:tab/>O_LO : REAL (Ausgangswert min)</text:p>
      <text:p text:style-name="P55"><text:tab/>O_HI : REAL (Ausgangswert max)</text:p>
      <text:p text:style-name="P55"><draw:frame draw:style-name="fr4" draw:name="Grafik571" text:anchor-type="paragraph" svg:x="1.025cm" svg:y="0.69cm" svg:width="4.069cm" svg:height="2.919cm" draw:z-index="583"><draw:image xlink:href="Pictures/1000000000000134000000DD5915C787.png" xlink:type="simple" xlink:show="embed" xlink:actuate="onLoad"/></draw:frame>Output<text:tab/>REAL (Ausgangswert)</text:p>
      <text:p text:style-name="P55"><text:soft-page-break/><text:line-break/>SCALE_R skaliert einen Eingangswert REAL und errechnet einen Ausgangswert in REAL. Der Eingangswert X wird dabei auf I_LO und I_HI begrenzt. SCALE_D(IN, 4, 20, 0, 100) skaliert einen Eingang mit 4 .. 20 mA auf den Ausgang 0..100.</text:p>
      <text:list xml:id="list33653201" text:continue-numbering="true" text:style-name="L1">
        <text:list-item>
          <text:list>
            <text:list-item>
              <text:h text:style-name="P217" text:outline-level="2"><text:alphabetical-index-mark-start text:id="IMark101004592"/>SCALE_X2<text:alphabetical-index-mark-end text:id="IMark101004592"/></text:h>
            </text:list-item>
          </text:list>
        </text:list-item>
      </text:list>
      <text:p text:style-name="P22">Type<text:tab/>Funktion</text:p>
      <text:p text:style-name="P22"><text:span text:style-name="T16">Input</text:span><text:tab/>IN1 .. 2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text:tab/>IN_MAX : REAL (größter Wert für IN)</text:p>
      <text:p text:style-name="P25"><draw:frame draw:style-name="fr4" draw:name="Grafik155" text:anchor-type="paragraph" svg:x="1.189cm" svg:y="0.016cm" svg:width="3.62cm" svg:height="2.469cm" draw:z-index="123"><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5">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Standard"><draw:frame draw:style-name="fr4" draw:name="Grafik156" text:anchor-type="paragraph" svg:x="1.065cm" svg:y="1.229cm" svg:width="10.73cm" svg:height="4.44cm" draw:z-index="119"><draw:image xlink:href="Pictures/100000000000032B0000015047C7D90E.png" xlink:type="simple" xlink:show="embed" xlink:actuate="onLoad"/></draw:frame>Im <text:span text:style-name="T38">folgenden</text:span> Beispiel werden zwei motorische Klappen KM1 und km² mit 2 Ein/Aus Klappen KL1 und KL2 verknüpft und die resultierende Luftmenge berechnet.</text:p>
      <text:p text:style-name="P88"><text:soft-page-break/></text:p>
      <text:list xml:id="list33624634" text:continue-numbering="true" text:style-name="L1">
        <text:list-item>
          <text:list>
            <text:list-item>
              <text:h text:style-name="P217" text:outline-level="2"><text:alphabetical-index-mark-start text:id="IMark101004592"/>SCALE_X4<text:alphabetical-index-mark-end text:id="IMark101004592"/></text:h>
            </text:list-item>
          </text:list>
        </text:list-item>
      </text:list>
      <text:p text:style-name="P22">Type<text:tab/>Funktion : REAL</text:p>
      <text:p text:style-name="P22"><text:span text:style-name="T16">Input</text:span><text:tab/>IN1 .. 4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7" text:anchor-type="paragraph" svg:x="1.102cm" svg:y="0.762cm" svg:width="3.62cm" svg:height="3.371cm" draw:z-index="124"><draw:image xlink:href="Pictures/1000000000000112000000FF68E8671D.png" xlink:type="simple" xlink:show="embed" xlink:actuate="onLoad"/></draw:frame><text:tab/>IN_MAX : REAL (größter Wert für IN)</text:p>
      <text:p text:style-name="P25"><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5">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3656031" text:continue-numbering="true" text:style-name="L1">
        <text:list-item>
          <text:list>
            <text:list-item>
              <text:h text:style-name="P217" text:outline-level="2"><text:soft-page-break/><text:alphabetical-index-mark-start text:id="IMark101004592"/>SCALE_X8<text:alphabetical-index-mark-end text:id="IMark101004592"/></text:h>
            </text:list-item>
          </text:list>
        </text:list-item>
      </text:list>
      <text:p text:style-name="P22">Type<text:tab/>Funktion : REAL</text:p>
      <text:p text:style-name="P22"><text:span text:style-name="T16">Input</text:span><text:tab/>IN1 .. 8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8" text:anchor-type="paragraph" svg:x="0.998cm" svg:y="0.695cm" svg:width="3.62cm" svg:height="5.17cm" draw:z-index="125"><draw:image xlink:href="Pictures/100000000000011200000187B42CD32D.png" xlink:type="simple" xlink:show="embed" xlink:actuate="onLoad"/></draw:frame><text:tab/>IN_MAX : REAL (größter Wert für IN)</text:p>
      <text:p text:style-name="P25"><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5">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p text:style-name="P55"/>
      <text:p text:style-name="P55"/>
      <text:p text:style-name="P55"/>
      <text:list xml:id="list33626275" text:continue-numbering="true" text:style-name="L1">
        <text:list-item>
          <text:list>
            <text:list-item>
              <text:h text:style-name="P217" text:outline-level="2"><text:soft-page-break/><text:alphabetical-index-mark-start text:id="IMark101004592"/>SEL2_OF_3<text:alphabetical-index-mark-end text:id="IMark101004592"/></text:h>
            </text:list-item>
          </text:list>
        </text:list-item>
      </text:list>
      <text:p text:style-name="P22">Type<text:tab/>Funktion : REAL</text:p>
      <text:p text:style-name="P22"><text:span text:style-name="T16">Input</text:span><text:tab/>IN1 <text:s/>: REAL (Eingangswert 1)</text:p>
      <text:p text:style-name="P25"><text:tab/>IN1 <text:s/>: REAL (Eingangswert 2)</text:p>
      <text:p text:style-name="P25"><text:tab/>IN1 <text:s/>: REAL (Eingangswert 3)</text:p>
      <text:p text:style-name="P55"><text:tab/>D : REAL (Toleranzgrenze)</text:p>
      <text:p text:style-name="P25">Output<text:tab/>Y : REAL (Ausgangswert)</text:p>
      <text:p text:style-name="P55"><text:tab/>W : INT (Warnung)</text:p>
      <text:p text:style-name="P55"><draw:frame draw:style-name="fr4" draw:name="Grafik573" text:anchor-type="paragraph" svg:x="0.935cm" svg:y="0.677cm" svg:width="2.731cm" svg:height="2.649cm" draw:z-index="586"><draw:image xlink:href="Pictures/10000000000000CE000000C86D7C4A9A.png" xlink:type="simple" xlink:show="embed" xlink:actuate="onLoad"/></draw:frame><text:tab/>E : BOOL (<text:span text:style-name="T16">Error</text:span> Ausgang)</text:p>
      <text:p text:style-name="P55"><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55">Eine typische Anwendung für den Baustein ist die Erfassung von 3 Sensoren die dieselbe Prozessgröße Messen um zum Beispiel Messfehler durch unterschiedliche Erfassung oder Drahtbruch zu verringern.</text:p>
      <text:list xml:id="list33637572" text:continue-numbering="true" text:style-name="L1">
        <text:list-item>
          <text:list>
            <text:list-item>
              <text:h text:style-name="P217" text:outline-level="2"><text:alphabetical-index-mark-start text:id="IMark101004592"/>SEL2_OF_3B<text:alphabetical-index-mark-end text:id="IMark101004592"/></text:h>
            </text:list-item>
          </text:list>
        </text:list-item>
      </text:list>
      <text:p text:style-name="P22">Type<text:tab/>Funktion : BOOL</text:p>
      <text:p text:style-name="P22"><text:span text:style-name="T16">Input</text:span><text:tab/>IN1 : BOOL (Eingang 1)</text:p>
      <text:p text:style-name="P55"><text:tab/>IN1 : BOOL (Eingang 2)</text:p>
      <text:p text:style-name="P55"><text:tab/>IN3 : BOOL (Eingang 3)</text:p>
      <text:p text:style-name="P55"><text:soft-page-break/><text:tab/>TD : TIME (<text:span text:style-name="T16">Delay</text:span> für Ausgang W)</text:p>
      <text:p text:style-name="P55">Output<text:tab/>Q : BOOL (Ausgang)</text:p>
      <text:p text:style-name="P55"><draw:frame draw:style-name="fr4" draw:name="Grafik575" text:anchor-type="paragraph" svg:x="1.025cm" svg:y="0.863cm" svg:width="3.18cm" svg:height="2.649cm" draw:z-index="588"><draw:image xlink:href="Pictures/10000000000000F0000000C8FA3A299F.png" xlink:type="simple" xlink:show="embed" xlink:actuate="onLoad"/></draw:frame><text:tab/>W : BOOL (Warnmeldung)</text:p>
      <text:p text:style-name="P55"><text:line-break/>SEL2_OF_3B wertet 3 redundante Binäre Eingänge aus und liefert am Ausgang Q den Wert den mindestens 2 der 3 Eingänge anliegen haben. Falls einer der 3 Eingänge einen anderen Wert als die beiden anderen hat wird der Ausgang W als Warnung gesetzt. Damit bei nicht exakt Zeitgleichen Umschalten der Eingänge der Ausgang W nicht anspricht kann für diesen eine Ansprechverzögerung TD festgelegt werden.</text:p>
      <text:list xml:id="list33639136" text:continue-numbering="true" text:style-name="L1">
        <text:list-item>
          <text:list>
            <text:list-item>
              <text:h text:style-name="P217" text:outline-level="2"><text:alphabetical-index-mark-start text:id="IMark101004592"/>SH<text:alphabetical-index-mark-end text:id="IMark101004592"/></text:h>
            </text:list-item>
          </text:list>
        </text:list-item>
      </text:list>
      <text:p text:style-name="P25">Type<text:tab/>Funktionsbaustein</text:p>
      <text:p text:style-name="P25"><text:span text:style-name="T16">Input</text:span><text:tab/>IN : REAL (Eingangssignal)</text:p>
      <text:p text:style-name="P25"><text:tab/>CLK : BOOL (Takteingang)</text:p>
      <text:p text:style-name="P25">Output<text:tab/>OUT : REAL (Ausgangssignal)</text:p>
      <text:p text:style-name="P25"><draw:frame draw:style-name="fr4" draw:name="Grafik159" text:anchor-type="paragraph" svg:x="1.087cm" svg:y="0.663cm" svg:width="2.281cm" svg:height="1.75cm" draw:z-index="126"><draw:image xlink:href="Pictures/10000000000000AC000000849852D7E5.png" xlink:type="simple" xlink:show="embed" xlink:actuate="onLoad"/></draw:frame><text:tab/>TRIG : BOOL (<text:span text:style-name="T16">Trigger</text:span> Output)</text:p>
      <text:p text:style-name="P25"><text:line-break/>SH ist ein <text:span text:style-name="T16">Sample</text:span> <text:span text:style-name="T16">and</text:span> Hold Baustein. Er speichert bei jeder steigenden Flanke von CLK das Eingangssignal IN am Ausgang OUT. Nach jedem update von OUT bleibt TRIG für einen Zyklus TRUE.</text:p>
      <text:p text:style-name="Standard"><draw:frame draw:style-name="fr4" draw:name="Grafik160" text:anchor-type="paragraph" svg:x="1.143cm" svg:y="0.658cm" svg:width="15.221cm" svg:height="4.461cm" draw:z-index="127"><draw:image xlink:href="Pictures/100000000000047F0000015104187800.png" xlink:type="simple" xlink:show="embed" xlink:actuate="onLoad"/></draw:frame>Das Folgende <text:span text:style-name="T38">Beispiel</text:span> erläutert die Funktionsweise von SH:</text:p>
      <text:p text:style-name="P198"><text:soft-page-break/></text:p>
      <text:p text:style-name="P198"><draw:frame draw:style-name="fr4" draw:name="Grafik161" text:anchor-type="paragraph" svg:x="1.081cm" svg:y="0.005cm" svg:width="15.697cm" svg:height="4.36cm" draw:z-index="128"><draw:image xlink:href="Pictures/100000000000049B00000147BEEECF7B.png" xlink:type="simple" xlink:show="embed" xlink:actuate="onLoad"/></draw:frame></text:p>
      <text:list xml:id="list33648397" text:continue-numbering="true" text:style-name="L1">
        <text:list-item>
          <text:list>
            <text:list-item>
              <text:h text:style-name="P217" text:outline-level="2"><text:alphabetical-index-mark-start text:id="IMark101004592"/>SH_1<text:alphabetical-index-mark-end text:id="IMark101004592"/></text:h>
            </text:list-item>
          </text:list>
        </text:list-item>
      </text:list>
      <text:p text:style-name="P25">Type<text:tab/>Funktionsbaustein</text:p>
      <text:p text:style-name="P25"><text:span text:style-name="T16">Input</text:span><text:tab/>IN : REAL (Eingangssignal)</text:p>
      <text:p text:style-name="P25"><text:tab/>PT : TIME (Abtastzeit)</text:p>
      <text:p text:style-name="P25">Output<text:tab/>OUT : REAL (Ausgangssignal)</text:p>
      <text:p text:style-name="P25"><draw:frame draw:style-name="fr4" draw:name="Grafik162" text:anchor-type="paragraph" svg:x="1.296cm" svg:y="0.647cm" svg:width="2.281cm" svg:height="1.75cm" draw:z-index="129"><draw:image xlink:href="Pictures/10000000000000AC00000084E4420A3B.png" xlink:type="simple" xlink:show="embed" xlink:actuate="onLoad"/></draw:frame><text:tab/>TRIG: BOOL (<text:span text:style-name="T16">Trigger</text:span> Output)</text:p>
      <text:p text:style-name="P25"><text:line-break/>SH_1 ist ein <text:span text:style-name="T16">Sample</text:span> <text:span text:style-name="T24">und</text:span> Hold Baustein mit einstellbarer Abtastzeit. Er speichert alle PT das Eingangssignal IN am Ausgang OUT. Nach jedem update von OUT bleibt TRIG für einen Zyklus TRUE.</text:p>
      <text:p text:style-name="Standard"><draw:frame draw:style-name="fr4" draw:name="Grafik163" text:anchor-type="paragraph" svg:x="1.037cm" svg:y="0.713cm" svg:width="15.221cm" svg:height="4.009cm" draw:z-index="130"><draw:image xlink:href="Pictures/100000000000047F0000012FDCBC6BE4.png" xlink:type="simple" xlink:show="embed" xlink:actuate="onLoad"/></draw:frame>Das Folgende <text:span text:style-name="T38">Beispiel</text:span> erläutert die Funktionsweise von SH_1:</text:p>
      <text:p text:style-name="Standard"><text:soft-page-break/></text:p>
      <text:p text:style-name="P198"><draw:frame draw:style-name="fr4" draw:name="Grafik164" text:anchor-type="paragraph" svg:x="1.009cm" svg:y="0.101cm" svg:width="15.956cm" svg:height="6.493cm" draw:z-index="131"><draw:image xlink:href="Pictures/10000000000002BD0000011D15AE5DF7.png" xlink:type="simple" xlink:show="embed" xlink:actuate="onLoad"/></draw:frame></text:p>
      <text:list xml:id="list33627481" text:continue-numbering="true" text:style-name="L1">
        <text:list-item>
          <text:list>
            <text:list-item>
              <text:h text:style-name="P217" text:outline-level="2"><text:alphabetical-index-mark-start text:id="IMark101004592"/>SH_2<text:alphabetical-index-mark-end text:id="IMark101004592"/></text:h>
            </text:list-item>
          </text:list>
        </text:list-item>
      </text:list>
      <text:p text:style-name="P25">Type<text:tab/>Funktionsbaustein</text:p>
      <text:p text:style-name="P25"><text:span text:style-name="T16">Input</text:span><text:tab/>IN : REAL (Eingangssignal)</text:p>
      <text:p text:style-name="P25"><text:tab/>PT : TIME (Abtastzeit)</text:p>
      <text:p text:style-name="P25"><text:tab/>N : INT (Anzahl der <text:span text:style-name="T16">Samples</text:span> für Statistik)</text:p>
      <text:p text:style-name="P25">Output<text:tab/>OUT : REAL (Ausgangssignal)</text:p>
      <text:p text:style-name="P25"><draw:frame draw:style-name="fr4" draw:name="Grafik165" text:anchor-type="paragraph" svg:x="1.067cm" svg:y="0.642cm" svg:width="2.281cm" svg:height="3.099cm" draw:z-index="132"><draw:image xlink:href="Pictures/10000000000000AC000000EA5438B0E7.png" xlink:type="simple" xlink:show="embed" xlink:actuate="onLoad"/></draw:frame><text:tab/>TRIG : BOOL (<text:span text:style-name="T16">Trigger</text:span> Output)</text:p>
      <text:p text:style-name="P25"><text:soft-page-break/><text:line-break/>SH_2 ist ein <text:span text:style-name="T16">Sample</text:span> <text:span text:style-name="T16">and</text:span> Hold Baustein mit einstellbarer Abtastzeit. Er speichert alle PT das Eingangssignal IN am Ausgang OUT. Nach jedem update von OUT bleibt TRIG für einen Zyklus TRUE. Zusätzlich zur Funktion eines <text:span text:style-name="T16">Sample</text:span> <text:span text:style-name="T16">and</text:span> Hold Bausteins bietet SH_2 bereits integrierte Funktionalität bezüglich der Statistik. Mit dem Eingang N kann spezifiziert werden, über wie viele <text:span text:style-name="T16">Samples</text:span> (maximal 16) ein Mittelwert, Minimalwert und Maximalwert gebildet werden. Als weitere Eigenschaft können aus den N <text:span text:style-name="T16">Samples</text:span> für die Statistik auch kleinste und größte Werte ignoriert werden, was sehr sinnvoll sein kann um Extremwerte zu ignorieren. Der Eingangswert DISC=0 bedeutet alle <text:span text:style-name="T16">Samples</text:span> benutzen, eine 1 bedeutet den niedrigsten Wert ignorieren, 2 bedeutet den niedrigsten und den höchsten Wert ignorieren usw. Wenn zum Beispiel N=5 und DISC=2, dann werden 5 <text:span text:style-name="T16">Samples</text:span> gesammelt, der niedrigste und der höchste Wert werden verworfen und über die 3 verbleibenden <text:span text:style-name="T16">Samples</text:span> wird der Mittelwert, Minimalwert und Maximalwert gebildet.</text:p>
      <text:p text:style-name="P25">Das Folgende Beispiel erläutert die Funktionsweise von SH_2:</text:p>
      <text:p text:style-name="P25"><draw:frame draw:style-name="fr4" draw:name="Grafik167" text:anchor-type="paragraph" svg:x="0.94cm" svg:y="5.036cm" svg:width="15.903cm" svg:height="9.442cm" draw:z-index="133"><draw:image xlink:href="Pictures/10000000000002B30000019AA02676B9.png" xlink:type="simple" xlink:show="embed" xlink:actuate="onLoad"/></draw:frame><draw:frame draw:style-name="fr4" draw:name="Grafik166" text:anchor-type="paragraph" svg:x="1.099cm" svg:y="0.102cm" svg:width="15.767cm" svg:height="4.359cm" draw:z-index="305"><draw:image xlink:href="Pictures/10000000000004C30000015126E2283D.png" xlink:type="simple" xlink:show="embed" xlink:actuate="onLoad"/></draw:frame></text:p>
      <text:list xml:id="list33638320" text:continue-numbering="true" text:style-name="L1">
        <text:list-item>
          <text:list>
            <text:list-item>
              <text:h text:style-name="P217" text:outline-level="2"><text:soft-page-break/><text:alphabetical-index-mark-start text:id="IMark100452904"/>SH_T<text:alphabetical-index-mark-end text:id="IMark100452904"/></text:h>
            </text:list-item>
          </text:list>
        </text:list-item>
      </text:list>
      <text:p text:style-name="P25">Type<text:tab/>Funktionsbaustein</text:p>
      <text:p text:style-name="P25"><text:span text:style-name="T16">Input</text:span><text:tab/>IN : REAL (Eingangssignal)</text:p>
      <text:p text:style-name="P25"><text:tab/>EN : BOOL (<text:span text:style-name="T16">enable</text:span> Signal)</text:p>
      <text:p text:style-name="P25"><draw:frame draw:style-name="fr4" draw:name="Grafik168" text:anchor-type="paragraph" svg:x="1.139cm" svg:y="0.693cm" svg:width="2.281cm" svg:height="1.75cm" draw:z-index="134"><draw:image xlink:href="Pictures/10000000000000AC00000084BB0592B8.png" xlink:type="simple" xlink:show="embed" xlink:actuate="onLoad"/></draw:frame>Output<text:tab/>OUT : REAL (Ausgangssignal)</text:p>
      <text:p text:style-name="P25"><text:line-break/>SH_T ist ein transparenter <text:span text:style-name="T16">Sample</text:span> <text:span text:style-name="T16">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 text:style-name="Standard"><draw:frame draw:style-name="fr4" draw:name="Grafik169" text:anchor-type="paragraph" svg:x="0.99cm" svg:y="0.677cm" svg:width="15.517cm" svg:height="4.417cm" draw:z-index="135"><draw:image xlink:href="Pictures/10000000000004A100000151223436B5.png" xlink:type="simple" xlink:show="embed" xlink:actuate="onLoad"/></draw:frame>Das folgende Beispiel verdeutlicht die Arbeitsweise von SH_T:</text:p>
      <text:p text:style-name="P87"/>
      <text:p text:style-name="P55"><draw:frame draw:style-name="fr4" draw:name="Grafik170" text:anchor-type="paragraph" svg:x="1.117cm" svg:y="0.22cm" svg:width="15.621cm" svg:height="6.05cm" draw:z-index="136"><draw:image xlink:href="Pictures/10000000000002DE0000011C4614FC8E.png" xlink:type="simple" xlink:show="embed" xlink:actuate="onLoad"/></draw:frame></text:p>
      <text:list xml:id="list33642738" text:continue-numbering="true" text:style-name="L1">
        <text:list-item>
          <text:list>
            <text:list-item>
              <text:h text:style-name="P217" text:outline-level="2"><text:soft-page-break/><text:alphabetical-index-mark-start text:id="IMark100452904"/>STAIR<text:alphabetical-index-mark-end text:id="IMark100452904"/></text:h>
            </text:list-item>
          </text:list>
        </text:list-item>
      </text:list>
      <text:p text:style-name="P25">Type<text:tab/>Funktion</text:p>
      <text:p text:style-name="P25"><text:span text:style-name="T16">Input</text:span><text:tab/>X : REAL (Eingangssignal)</text:p>
      <text:p text:style-name="P25"><text:tab/>D : REAL (Schrittweite des Ausgangssignals)</text:p>
      <text:p text:style-name="P25"><draw:frame draw:style-name="fr4" draw:name="Grafik243" text:anchor-type="paragraph" svg:x="1.051cm" svg:y="0.91cm" svg:width="2.281cm" svg:height="1.57cm" draw:z-index="219"><draw:image xlink:href="Pictures/10000000000000AC000000772AFE0408.png" xlink:type="simple" xlink:show="embed" xlink:actuate="onLoad"/></draw:frame>Output<text:tab/>REAL (Ausgangssignal)</text:p>
      <text:p text:style-name="Standard"><text:line-break/>Das <text:span text:style-name="T38">Ausgangssignal</text:span> von <text:span text:style-name="T38">STAIR</text:span> folgt dem Eingangssignal X mit einer Treppenfunktion. Die Höhe der Stufen ist vorgegeben durch D. Wird X = 0, so folgt das Ausgangssignal direkt dem Eingangssignal. STAIR ist jedoch nicht zum filtern von Eingangssignalen geeignet, denn wenn der Eingang um eine <text:span text:style-name="T24">Treppenschwelle</text:span> schwankt, schaltet der Ausgang zwischen zwei benachbarten Werten hin und her. Für diesen Zweck empfehlen wir den Einsatz von Stair2, der mit einer <text:span text:style-name="T24">Hysterese</text:span> arbeitet und instabile Zustände vermeidet.</text:p>
      <text:p text:style-name="P55"><draw:frame draw:style-name="fr4" draw:name="Grafik244" text:anchor-type="paragraph" svg:x="0.981cm" svg:y="0.695cm" svg:width="15.998cm" svg:height="3.378cm" draw:z-index="452"><draw:image xlink:href="Pictures/10000000000002B800000093AB32EBA1.png" xlink:type="simple" xlink:show="embed" xlink:actuate="onLoad"/></draw:frame>Das folgende Beispiel verdeutlicht die Arbeitsweise von STAIR:</text:p>
      <text:p text:style-name="P55"/>
      <text:p text:style-name="P55"><draw:frame draw:style-name="fr4" draw:name="Grafik245" text:anchor-type="paragraph" svg:x="1.485cm" svg:y="0.385cm" svg:width="13.483cm" svg:height="7.258cm" draw:z-index="216"><draw:image xlink:href="Pictures/10000000000001EE0000010A72ED4C35.png" xlink:type="simple" xlink:show="embed" xlink:actuate="onLoad"/></draw:frame></text:p>
      <text:list xml:id="list33629575" text:continue-numbering="true" text:style-name="L1">
        <text:list-item>
          <text:list>
            <text:list-item>
              <text:h text:style-name="P217" text:outline-level="2"><text:soft-page-break/><text:alphabetical-index-mark-start text:id="IMark100452904"/>STAIR2<text:alphabetical-index-mark-end text:id="IMark100452904"/></text:h>
            </text:list-item>
          </text:list>
        </text:list-item>
      </text:list>
      <text:p text:style-name="P25">Type<text:tab/>Funktionsbaustein</text:p>
      <text:p text:style-name="P25"><text:span text:style-name="T16">Input</text:span><text:tab/>X : REAL (Eingangssignal)</text:p>
      <text:p text:style-name="P25"><text:tab/>D : REAL (Schrittweite des Ausgangssignals)</text:p>
      <text:p text:style-name="P25"><draw:frame draw:style-name="fr4" draw:name="Grafik246" text:anchor-type="paragraph" svg:x="1.023cm" svg:y="0.644cm" svg:width="1.829cm" svg:height="1.75cm" draw:z-index="217"><draw:image xlink:href="Pictures/100000000000008A000000848734B085.png" xlink:type="simple" xlink:show="embed" xlink:actuate="onLoad"/></draw:frame>Output<text:tab/>Y : REAL (Ausgangssignal)</text:p>
      <text:p text:style-name="P55"><text:line-break/>Das Ausgangssignal von STAIR2 folgt dem Eingangssignal X mit einer Treppenfunktion. Die Höhe der Stufen ist vorgegeben durch D. Wird D = 0, so folgt das Ausgangssignal direkt dem Eingangssignal. Das Signal folgt der Treppe aber mit einer <text:span text:style-name="T24">Hysterese</text:span> von D so dass ein verrauschtes Eingangssignal keine Sprünge zwischen Treppenwerten auslösen kann. STAIR2 ist auch als Eingangsfilter geeignet.</text:p>
      <text:p text:style-name="P55">Das folgende Beispiel verdeutlicht die Arbeitsweise von STAIR2:</text:p>
      <text:p text:style-name="P55"><draw:frame draw:style-name="fr4" draw:name="Grafik247" text:anchor-type="paragraph" svg:x="1.046cm" svg:y="0.522cm" svg:width="13.411cm" svg:height="3.18cm" draw:z-index="218"><draw:image xlink:href="Pictures/100000000000034D000000C82A8402A6.png" xlink:type="simple" xlink:show="embed" xlink:actuate="onLoad"/></draw:frame><draw:frame draw:style-name="fr4" draw:name="Grafik248" text:anchor-type="paragraph" svg:x="1.087cm" svg:y="4.517cm" svg:width="13.464cm" svg:height="6.652cm" draw:z-index="306"><draw:image xlink:href="Pictures/10000000000001EE000000F4E9192F7C.png" xlink:type="simple" xlink:show="embed" xlink:actuate="onLoad"/></draw:frame></text:p>
      <text:p text:style-name="P55"/>
      <text:list xml:id="list33647660" text:continue-numbering="true" text:style-name="L1">
        <text:list-item>
          <text:list>
            <text:list-item>
              <text:h text:style-name="P217" text:outline-level="2"><text:soft-page-break/><text:alphabetical-index-mark-start text:id="IMark107330780"/>WORD_TO_RANGE<text:alphabetical-index-mark-end text:id="IMark107330780"/></text:h>
            </text:list-item>
          </text:list>
        </text:list-item>
      </text:list>
      <text:p text:style-name="P22">Type<text:tab/>Funktion</text:p>
      <text:p text:style-name="P22"><text:span text:style-name="T16">Input</text:span><text:tab/>IN : WORD (Eingangswert)</text:p>
      <text:p text:style-name="P25"><draw:frame draw:style-name="fr4" draw:name="Grafik435" text:anchor-type="paragraph" svg:x="1.067cm" svg:y="0.688cm" svg:width="5.669cm" svg:height="1.79cm" draw:z-index="439"><draw:image xlink:href="Pictures/10000000000001AD00000087C18C3A39.png" xlink:type="simple" xlink:show="embed" xlink:actuate="onLoad"/></draw:frame>Output<text:tab/>REAL (Ausgangswert)</text:p>
      <text:p text:style-name="P55"><text:line-break/>WORD_TO_RANGE wandelt einen WORD Wert in einen REAL Wert. Ein Eingangswert von 0 entspricht dabei dem REAL Wert von LOW und eine Eingangswert von 65535 entspricht dem Eingangswert von HIGH.</text:p>
      <text:p text:style-name="P55">Um einen WORD Wert von 0..65535 in einen Prozentwert von 0..100 zu Wandeln wird der Baustein wie folgt aufgerufen:</text:p>
      <text:p text:style-name="P55">WORD_TO_RANGE(X,100,0)</text:p>
      <text:list xml:id="list33639360" text:continue-numbering="true" text:style-name="L1">
        <text:list-item>
          <text:h text:style-name="P211" text:outline-level="1">Sensorik</text:h>
        </text:list-item>
      </text:list>
      <text:p text:style-name="P20"/>
      <text:list xml:id="list33630547" text:continue-numbering="true" text:style-name="L1">
        <text:list-item>
          <text:list>
            <text:list-item>
              <text:h text:style-name="P217" text:outline-level="2"><text:alphabetical-index-mark-start text:id="IMark107330780"/>MULTI_IN<text:alphabetical-index-mark-end text:id="IMark107330780"/></text:h>
            </text:list-item>
          </text:list>
        </text:list-item>
      </text:list>
      <text:p text:style-name="P22">Type<text:tab/>Funktion : REAL</text:p>
      <text:p text:style-name="P22"><text:span text:style-name="T16">Input</text:span><text:tab/>IN_1 : REAL (Eingang 1)</text:p>
      <text:p text:style-name="P22"><text:tab/>IN_2 : REAL (Eingang 2)</text:p>
      <text:p text:style-name="P22"><text:tab/>IN_3 : REAL (Eingang 3)</text:p>
      <text:p text:style-name="P22"><text:tab/>DEFAULT : REAL (Vorgabewert)</text:p>
      <text:p text:style-name="P22"><text:tab/>IN_MIN : REAL (unterer Grenzwert für Eingänge)</text:p>
      <text:p text:style-name="P22"><text:tab/>IN_MAX : REAL (oberer Grenzwert für Eingänge)</text:p>
      <text:p text:style-name="P22"><text:tab/>MODE : Byte (Auswahl des Betriebsmodus)</text:p>
      <text:p text:style-name="P25"><draw:frame draw:style-name="fr4" draw:name="Grafik172" text:anchor-type="paragraph" svg:x="1.21cm" svg:y="0.656cm" svg:width="3.18cm" svg:height="3.821cm" draw:z-index="138"><draw:image xlink:href="Pictures/10000000000000F0000001212C694CD3.png" xlink:type="simple" xlink:show="embed" xlink:actuate="onLoad"/></draw:frame>Output<text:tab/>REAL (Ausgangssignal)</text:p>
      <text:p text:style-name="P25"><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45">Mode</text:p>
          </table:table-cell>
          <table:table-cell table:style-name="Tabelle1.B1" office:value-type="string">
            <text:p text:style-name="P46"><text:s/>Funktion</text:p>
          </table:table-cell>
        </table:table-row>
        <table:table-row>
          <table:table-cell table:style-name="Tabelle1.A2" office:value-type="string">
            <text:p text:style-name="P45">0</text:p>
          </table:table-cell>
          <table:table-cell table:style-name="Tabelle1.B2" office:value-type="string">
            <text:p text:style-name="P46">MULTI_in = Durchschnitt der Eingänge in_1 .. 3</text:p>
          </table:table-cell>
        </table:table-row>
        <table:table-row>
          <table:table-cell table:style-name="Tabelle1.A2" office:value-type="string">
            <text:p text:style-name="P45">1</text:p>
          </table:table-cell>
          <table:table-cell table:style-name="Tabelle1.B2" office:value-type="string">
            <text:p text:style-name="P46">MULTI_in = Eingang in_1</text:p>
          </table:table-cell>
        </table:table-row>
        <table:table-row>
          <table:table-cell table:style-name="Tabelle1.A2" office:value-type="string">
            <text:p text:style-name="P45">2</text:p>
          </table:table-cell>
          <table:table-cell table:style-name="Tabelle1.B2" office:value-type="string">
            <text:p text:style-name="P46">MULTI_in = Eingang in_2</text:p>
          </table:table-cell>
        </table:table-row>
        <table:table-row>
          <table:table-cell table:style-name="Tabelle1.A2" office:value-type="string">
            <text:p text:style-name="P45">3</text:p>
          </table:table-cell>
          <table:table-cell table:style-name="Tabelle1.B2" office:value-type="string">
            <text:p text:style-name="P46">MULTI_in = Eingang in_3</text:p>
          </table:table-cell>
        </table:table-row>
        <table:table-row>
          <table:table-cell table:style-name="Tabelle1.A2" office:value-type="string">
            <text:p text:style-name="P45">4</text:p>
          </table:table-cell>
          <table:table-cell table:style-name="Tabelle1.B2" office:value-type="string">
            <text:p text:style-name="P44"><text:span text:style-name="T2">MULTI_in = </text:span><text:span text:style-name="T3">Default</text:span><text:span text:style-name="T2"> Eingang</text:span></text:p>
          </table:table-cell>
        </table:table-row>
        <table:table-row>
          <table:table-cell table:style-name="Tabelle1.A2" office:value-type="string">
            <text:p text:style-name="P45">5</text:p>
          </table:table-cell>
          <table:table-cell table:style-name="Tabelle1.B2" office:value-type="string">
            <text:p text:style-name="P46">MULTI_in = kleinster Wert der Eingänge in_1 .. 3</text:p>
          </table:table-cell>
        </table:table-row>
        <text:soft-page-break/>
        <table:table-row>
          <table:table-cell table:style-name="Tabelle1.A2" office:value-type="string">
            <text:p text:style-name="P45">6</text:p>
          </table:table-cell>
          <table:table-cell table:style-name="Tabelle1.B2" office:value-type="string">
            <text:p text:style-name="P46">MULTI_in = größter Wert der Eingänge in_1 .. 3</text:p>
          </table:table-cell>
        </table:table-row>
        <table:table-row>
          <table:table-cell table:style-name="Tabelle1.A2" office:value-type="string">
            <text:p text:style-name="P45">7</text:p>
          </table:table-cell>
          <table:table-cell table:style-name="Tabelle1.B2" office:value-type="string">
            <text:p text:style-name="P46">MULTI_in = mittlerer Wert der Eingänge in_1..3</text:p>
          </table:table-cell>
        </table:table-row>
        <table:table-row>
          <table:table-cell table:style-name="Tabelle1.A2" office:value-type="string">
            <text:p text:style-name="P45">&gt;7</text:p>
          </table:table-cell>
          <table:table-cell table:style-name="Tabelle1.B2" office:value-type="string">
            <text:p text:style-name="P46">MULTI_in = 0</text:p>
          </table:table-cell>
        </table:table-row>
      </table:table>
      <text:p text:style-name="P31"/>
      <text:p text:style-name="P25">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xml:id="list33626019" text:continue-numbering="true" text:style-name="L1">
        <text:list-item>
          <text:list>
            <text:list-item>
              <text:h text:style-name="P217" text:outline-level="2"><text:alphabetical-index-mark-start text:id="IMark107330780"/>RES_NI<text:alphabetical-index-mark-end text:id="IMark107330780"/></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Output<text:tab/>REAL (Widerstandswert)</text:p>
      <text:p text:style-name="P25"><draw:frame draw:style-name="fr4" draw:name="Grafik173" text:anchor-type="paragraph" svg:x="1.039cm" svg:y="0.282cm" svg:width="3.18cm" svg:height="1.57cm" draw:z-index="139"><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55">Die Berechnung erfolgt nach der Formel:</text:p>
      <text:p text:style-name="P55"><text:tab/>RES_NI = R0 + A*T + B*T²+C*T<text:span text:style-name="T40">4</text:span></text:p>
      <text:p text:style-name="P55"><text:tab/>A = 0.5485</text:p>
      <text:p text:style-name="P55"><text:tab/>B = 0.665E-3</text:p>
      <text:p text:style-name="P55"><text:tab/>C = 2.805E-9</text:p>
      <text:p text:style-name="P55">Die Berechnung ist geeignet für einen Temperaturbereich von -60 .. +180 °C.</text:p>
      <text:p text:style-name="P25"><draw:frame draw:style-name="fr12" draw:name="Grafik174" text:anchor-type="paragraph" svg:x="1.233cm" svg:y="0.215cm" svg:width="9.788cm" svg:height="6.059cm" draw:z-index="140"><draw:image xlink:href="Pictures/1000000000000172000000E5A1C18477.png" xlink:type="simple" xlink:show="embed" xlink:actuate="onLoad"/></draw:frame></text:p>
      <text:p text:style-name="P55"><text:soft-page-break/></text:p>
      <text:list xml:id="list33653724" text:continue-numbering="true" text:style-name="L1">
        <text:list-item>
          <text:list>
            <text:list-item>
              <text:h text:style-name="P217" text:outline-level="2"><text:alphabetical-index-mark-start text:id="IMark107330780"/>RES_PT<text:alphabetical-index-mark-end text:id="IMark107330780"/></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draw:frame draw:style-name="fr13" draw:name="Grafik175" text:anchor-type="paragraph" svg:x="1.035cm" svg:y="0.656cm" svg:width="3.62cm" svg:height="1.57cm" draw:z-index="141"><draw:image xlink:href="Pictures/100000000000011200000077785DFB56.png" xlink:type="simple" xlink:show="embed" xlink:actuate="onLoad"/></draw:frame>Output<text:tab/>REAL (Widerstandswert)</text:p>
      <text:p text:style-name="P25"><text:line-break/>RES_PT berechnet den Widerstand eines PT-Widerstandsfühlers aus den Eingangswerten T (Temperatur in °C) und R0 (Widerstand bei 0°C).</text:p>
      <text:p text:style-name="P55">Die Berechnung erfolgt nach der Formel:</text:p>
      <text:p text:style-name="P55">für Temperaturen &gt; 0 °C</text:p>
      <text:p text:style-name="P55"><text:tab/>RES_PT = R0 * (1 + A*T + B*T²)</text:p>
      <text:p text:style-name="P55">und für Temperaturen &lt; 0°C</text:p>
      <text:p text:style-name="P55"><text:tab/>RES_PT = R0 * (1 + A*T + B*T² + C*(T-100)*T³</text:p>
      <text:p text:style-name="P55"><text:tab/>A = 3.90802E-3</text:p>
      <text:p text:style-name="P55"><text:tab/>B = -5.80195E-7</text:p>
      <text:p text:style-name="P55"><text:tab/>C = -427350E-12</text:p>
      <text:p text:style-name="P25">Die Berechnung ist geeignet für Temperaturen von -200 .. +850 °C.</text:p>
      <text:p text:style-name="P25"><draw:frame draw:style-name="fr12" draw:name="Grafik176" text:anchor-type="paragraph" svg:x="1.053cm" svg:y="0.635cm" svg:width="13.677cm" svg:height="10.026cm" draw:z-index="142"><draw:image xlink:href="Pictures/10000000000002050000017BDBB8942C.png" xlink:type="simple" xlink:show="embed" xlink:actuate="onLoad"/></draw:frame></text:p>
      <text:p text:style-name="P25"><text:soft-page-break/></text:p>
      <text:list xml:id="list33649993" text:continue-numbering="true" text:style-name="L1">
        <text:list-item>
          <text:list>
            <text:list-item>
              <text:h text:style-name="P217" text:outline-level="2"><text:alphabetical-index-mark-start text:id="IMark107330780"/>RES_SI<text:alphabetical-index-mark-end text:id="IMark107330780"/></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draw:frame draw:style-name="fr4" draw:name="Grafik177" text:anchor-type="paragraph" svg:x="1.148cm" svg:y="0.617cm" svg:width="3.18cm" svg:height="2.02cm" draw:z-index="233"><draw:image xlink:href="Pictures/10000000000000F000000099D6100F29.png" xlink:type="simple" xlink:show="embed" xlink:actuate="onLoad"/></draw:frame>Output<text:tab/>REAL (Widerstandswert)</text:p>
      <text:p text:style-name="P25"><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55">Die Berechnung erfolgt nach der Formel:</text:p>
      <text:p text:style-name="P55"><text:soft-page-break/><text:tab/>RES_SI = RS + A*(T-TS) + B*(T-TS)²</text:p>
      <text:p text:style-name="P55"><text:tab/>A = 7.64E-3</text:p>
      <text:p text:style-name="P55"><text:tab/>B = 1.66E-5</text:p>
      <text:p text:style-name="P55">Die Berechnung ist geeignet für einen Temperaturbereich von -50 .. +150 °C.</text:p>
      <text:list xml:id="list33631372" text:continue-numbering="true" text:style-name="L1">
        <text:list-item>
          <text:list>
            <text:list-item>
              <text:h text:style-name="P217" text:outline-level="2"><text:alphabetical-index-mark-start text:id="IMark107330780"/>SENSOR_INT<text:alphabetical-index-mark-end text:id="IMark107330780"/></text:h>
            </text:list-item>
          </text:list>
        </text:list-item>
      </text:list>
      <text:p text:style-name="P22">Type<text:tab/>Funktion : REAL</text:p>
      <text:p text:style-name="P22"><text:span text:style-name="T16">Input</text:span><text:tab/><text:span text:style-name="T16">VOLTAGE</text:span> : REAL (gemessen Spannung in Volt)</text:p>
      <text:p text:style-name="P22"><text:tab/><text:span text:style-name="T16">CURRENT</text:span> : REAL (gemessener Strom in Ampere)</text:p>
      <text:p text:style-name="P22"><text:tab/>RP : REAL (paralleler parasitärer Widerstand in Ohm)</text:p>
      <text:p text:style-name="P22"><text:tab/>RS : REAL (serieller parasitärer Widerstand in Ohm) </text:p>
      <text:p text:style-name="P25"><draw:frame draw:style-name="fr4" draw:name="Grafik178" text:anchor-type="paragraph" svg:x="1.062cm" svg:y="0.619cm" svg:width="4.069cm" svg:height="2.469cm" draw:z-index="143"><draw:image xlink:href="Pictures/1000000000000134000000BB80D8F132.png" xlink:type="simple" xlink:show="embed" xlink:actuate="onLoad"/></draw:frame>Output<text:tab/>REAL (Widerstandswert des Sensors)</text:p>
      <text:p text:style-name="P25"><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25"><draw:g text:anchor-type="paragraph" draw:z-index="144" draw:style-name="gr1"><draw:g draw:style-name="gr8"><draw:rect draw:style-name="gr22" draw:text-style-name="P251" svg:width="1.417cm" svg:height="0.331cm" svg:x="3.544cm" svg:y="0.534cm"><text:p/></draw:rect><draw:line draw:style-name="gr23" draw:text-style-name="P251" svg:x1="3.543cm" svg:y1="0.723cm" svg:x2="2.132cm" svg:y2="0.723cm"><text:p/></draw:line><draw:line draw:style-name="gr23" draw:text-style-name="P251" svg:x1="6.843cm" svg:y1="0.702cm" svg:x2="4.96cm" svg:y2="0.702cm"><text:p/></draw:line><draw:line draw:style-name="gr23" draw:text-style-name="P251" svg:x1="3.547cm" svg:y1="1.702cm" svg:x2="2.841cm" svg:y2="1.702cm"><text:p/></draw:line><draw:rect draw:style-name="gr22" draw:text-style-name="P251" svg:width="1.417cm" svg:height="0.332cm" svg:x="3.544cm" svg:y="1.534cm"><text:p/></draw:rect><draw:rect draw:style-name="gr22" draw:text-style-name="P251" svg:width="1.41cm" svg:height="0.331cm" svg:x="6.841cm" svg:y="0.534cm"><text:p/></draw:rect><draw:line draw:style-name="gr24" draw:text-style-name="P251" svg:x1="2.841cm" svg:y1="0.702cm" svg:x2="2.841cm" svg:y2="1.7cm"><text:p/></draw:line><draw:line draw:style-name="gr24" draw:text-style-name="P251" svg:x1="5.663cm" svg:y1="0.702cm" svg:x2="5.663cm" svg:y2="1.7cm"><text:p/></draw:line><draw:line draw:style-name="gr23" draw:text-style-name="P251" svg:x1="5.666cm" svg:y1="1.702cm" svg:x2="4.96cm" svg:y2="1.702cm"><text:p/></draw:line><draw:line draw:style-name="gr23" draw:text-style-name="P251" svg:x1="9.666cm" svg:y1="0.702cm" svg:x2="8.255cm" svg:y2="0.702cm"><text:p/></draw:line><draw:line draw:style-name="gr23" draw:text-style-name="P251" svg:x1="4.721cm" svg:y1="0.201cm" svg:x2="3.78cm" svg:y2="1.2cm"><text:p/></draw:line><draw:line draw:style-name="gr23" draw:text-style-name="P251" svg:x1="3.781cm" svg:y1="1.199cm" svg:x2="3.311cm" svg:y2="1.199cm"><text:p/></draw:line><draw:line draw:style-name="gr23" draw:text-style-name="P251" svg:x1="5.192cm" svg:y1="0.201cm" svg:x2="4.722cm" svg:y2="0.201cm"><text:p/></draw:line><draw:frame draw:style-name="gr25" draw:text-style-name="P255" svg:width="1.417cm" svg:height="0.983cm" svg:x="3.544cm" svg:y="2.033cm"><draw:text-box><text:p text:style-name="P252"><text:span text:style-name="T52">RP</text:span></text:p></draw:text-box></draw:frame><draw:frame draw:style-name="gr25" draw:text-style-name="P255" svg:width="1.41cm" svg:height="0.983cm" svg:x="6.841cm" svg:y="1.033cm"><draw:text-box><text:p text:style-name="P252"><text:span text:style-name="T52">RS</text:span></text:p></draw:text-box></draw:frame><draw:frame draw:style-name="gr25" draw:text-style-name="P255" svg:width="1.41cm" svg:height="0.983cm" svg:x="3.075cm" svg:y="-0.131cm"><draw:text-box><text:p text:style-name="P252"><text:span text:style-name="T52">RX</text:span></text:p></draw:text-box></draw:frame></draw:g><draw:frame draw:style-name="gr26" draw:text-style-name="P255" svg:width="0.939cm" svg:height="1.001cm" svg:x="1.191cm" svg:y="0.365cm"><draw:text-box><text:p text:style-name="P252"><text:span text:style-name="T52">A</text:span></text:p></draw:text-box></draw:frame><draw:frame draw:style-name="gr27" draw:text-style-name="P255" svg:width="0.939cm" svg:height="0.983cm" svg:x="9.663cm" svg:y="0.365cm"><draw:text-box><text:p text:style-name="P252"><text:span text:style-name="T52">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xml:id="list33626938" text:continue-numbering="true" text:style-name="L1">
        <text:list-item>
          <text:list>
            <text:list-item>
              <text:h text:style-name="P217" text:outline-level="2"><text:soft-page-break/><text:alphabetical-index-mark-start text:id="IMark107330780"/>TEMP_NI<text:alphabetical-index-mark-end text:id="IMark107330780"/></text:h>
            </text:list-item>
          </text:list>
        </text:list-item>
      </text:list>
      <text:p text:style-name="P22">Type<text:tab/>Funktion : REAL</text:p>
      <text:p text:style-name="P22"><text:span text:style-name="T16">Input</text:span><text:tab/>RES : REAL (Widerstandswert in Ohm)</text:p>
      <text:p text:style-name="P22"><text:tab/>R0 : REAL (Widerstand bei 0 °C)</text:p>
      <text:p text:style-name="P25"><draw:frame draw:style-name="fr4" draw:name="Grafik179" text:anchor-type="paragraph" svg:x="1.007cm" svg:y="0.686cm" svg:width="3.62cm" svg:height="1.57cm" draw:z-index="145"><draw:image xlink:href="Pictures/100000000000011200000077CC793EAF.png" xlink:type="simple" xlink:show="embed" xlink:actuate="onLoad"/></draw:frame>Output<text:tab/>REAL (gemessene Temperatur)</text:p>
      <text:p text:style-name="P25"><text:line-break/>RES_NI berechnet die Temperatur eines NI-Widerstandsfühlers aus den Eingangswerten RES (gemessener Widerstandswert) und R0 (Widerstand bei 0°C).</text:p>
      <text:p text:style-name="P55">Die Berechnung ist geeignet für einen Temperaturbereich von -60 .. +180 °C und erfolgt nach folgender Formal:</text:p>
      <text:p text:style-name="P55"><text:tab/>RES_NI = R0 + A*T + B*T²+C*T<text:span text:style-name="T40">4</text:span></text:p>
      <text:p text:style-name="P55"><text:tab/>A = 0.5485; B = 0.665E-3; C = 2.805E-9</text:p>
      <text:p text:style-name="P25"><draw:frame draw:style-name="fr12" draw:name="Grafik180" text:anchor-type="paragraph" svg:x="1.131cm" svg:y="0.582cm" svg:width="9.788cm" svg:height="6.059cm" draw:z-index="146"><draw:image xlink:href="Pictures/1000000000000172000000E5A1C18477.png" xlink:type="simple" xlink:show="embed" xlink:actuate="onLoad"/></draw:frame></text:p>
      <text:p text:style-name="P55"/>
      <text:p text:style-name="P55"/>
      <text:p text:style-name="P55"/>
      <text:list xml:id="list33631529" text:continue-numbering="true" text:style-name="L1">
        <text:list-item>
          <text:list>
            <text:list-item>
              <text:h text:style-name="P217" text:outline-level="2"><text:soft-page-break/><text:alphabetical-index-mark-start text:id="IMark107330780"/>TEMP_PT<text:alphabetical-index-mark-end text:id="IMark107330780"/></text:h>
            </text:list-item>
          </text:list>
        </text:list-item>
      </text:list>
      <text:p text:style-name="P22">Type<text:tab/>Funktion : REAL</text:p>
      <text:p text:style-name="P22"><text:span text:style-name="T16">Input</text:span><text:tab/>RES : REAL (gemessener Widerstandswert in Ohm)</text:p>
      <text:p text:style-name="P22"><text:tab/>R0 : REAL (Widerstand bei 0 °C)</text:p>
      <text:p text:style-name="P25"><draw:frame draw:style-name="fr4" draw:name="Grafik181" text:anchor-type="paragraph" svg:x="1.041cm" svg:y="0.649cm" svg:width="4.069cm" svg:height="1.57cm" draw:z-index="147"><draw:image xlink:href="Pictures/100000000000013400000077B4EDA888.png" xlink:type="simple" xlink:show="embed" xlink:actuate="onLoad"/></draw:frame>Output<text:tab/>REAL (gemessene Temperatur)</text:p>
      <text:p text:style-name="P25"><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55">Die Berechnung erfolgt nach der Formel:</text:p>
      <text:p text:style-name="P55">für Temperaturen &gt; 0 °C</text:p>
      <text:p text:style-name="P55"><text:tab/>RES_PT = R0 * (1 + A*T + B*T²)</text:p>
      <text:p text:style-name="P55">und für Temperaturen &lt; 0°C</text:p>
      <text:p text:style-name="P55"><text:tab/>RES_PT = R0 * (1 + A*T + B*T² + C*(T-100)*T³</text:p>
      <text:p text:style-name="P55"><draw:frame draw:style-name="fr12" draw:name="Grafik182" text:anchor-type="paragraph" svg:x="1.042cm" svg:y="0.69cm" svg:width="13.677cm" svg:height="10.026cm" draw:z-index="186"><draw:image xlink:href="Pictures/10000000000002050000017BDBB8942C.png" xlink:type="simple" xlink:show="embed" xlink:actuate="onLoad"/></draw:frame><text:tab/>A = 3.90802E-3; B = -5.80195E-7; C = -427350E-12</text:p>
      <text:p text:style-name="P25"/>
      <text:list xml:id="list33639448" text:continue-numbering="true" text:style-name="L1">
        <text:list-item>
          <text:list>
            <text:list-item>
              <text:h text:style-name="P217" text:outline-level="2"><text:soft-page-break/><text:alphabetical-index-mark-start text:id="IMark107330780"/>TEMP_SI<text:alphabetical-index-mark-end text:id="IMark107330780"/></text:h>
            </text:list-item>
          </text:list>
        </text:list-item>
      </text:list>
      <text:p text:style-name="P22">Type<text:tab/>Funktion : REAL</text:p>
      <text:p text:style-name="P22"><text:span text:style-name="T16">Input</text:span><text:tab/>RES : REAL (gemessener Widerstand in Ohm)</text:p>
      <text:p text:style-name="P22"><text:tab/>RS : REAL (Widerstand bei 0 °C)</text:p>
      <text:p text:style-name="P22"><text:tab/>TS : REAL (Temperatur bei der RS definiert ist)</text:p>
      <text:p text:style-name="P25"><draw:frame draw:style-name="fr4" draw:name="Grafik183" text:anchor-type="paragraph" svg:x="1.058cm" svg:y="0.686cm" svg:width="3.62cm" svg:height="2.02cm" draw:z-index="148"><draw:image xlink:href="Pictures/1000000000000112000000995D826A97.png" xlink:type="simple" xlink:show="embed" xlink:actuate="onLoad"/></draw:frame>Output<text:tab/>REAL (gemessene Temperatur)</text:p>
      <text:p text:style-name="P25"><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55">Die Berechnung erfolgt nach der Formel:</text:p>
      <text:p text:style-name="P55"><text:tab/>RES_SI = RS + A*(T-TS) + B*(T-TS)²</text:p>
      <text:p text:style-name="P55"><text:tab/>A = 7.64E-3; B = 1.66E-5</text:p>
      <text:p text:style-name="P55">Die Berechnung ist geeignet für einen Temperaturbereich von -50 .. +150 °C.</text:p>
      <text:list xml:id="list33646047" text:continue-numbering="true" text:style-name="L1">
        <text:list-item>
          <text:h text:style-name="P211" text:outline-level="1">Messbausteine</text:h>
        </text:list-item>
      </text:list>
      <text:p text:style-name="P16"/>
      <text:list xml:id="list33625811" text:continue-numbering="true" text:style-name="L1">
        <text:list-item>
          <text:list>
            <text:list-item>
              <text:h text:style-name="P217" text:outline-level="2"><text:alphabetical-index-mark-start text:id="IMark107330780"/><text:alphabetical-index-mark-start text:id="IMark100749880"/>ALARM_2<text:alphabetical-index-mark-end text:id="IMark100749880"/><text:alphabetical-index-mark-end text:id="IMark107330780"/></text:h>
            </text:list-item>
          </text:list>
        </text:list-item>
      </text:list>
      <text:p text:style-name="Standard">Type<text:tab/><text:span text:style-name="T46">Funktionsbaustein</text:span></text:p>
      <text:p text:style-name="P22"><text:span text:style-name="T16">Input</text:span><text:tab/>X : REAL (Eingangswert)</text:p>
      <text:p text:style-name="P22"><text:tab/>RST : BOOL (Reset Eingang für Alarm Ausgang)</text:p>
      <text:p text:style-name="P25"><draw:frame draw:style-name="fr4" draw:name="Grafik574" text:anchor-type="paragraph" svg:x="1.025cm" svg:y="0.644cm" svg:width="3.18cm" svg:height="3.54cm" draw:z-index="587"><draw:image xlink:href="Pictures/10000000000000F00000010C320ECBAA.png" xlink:type="simple" xlink:show="embed" xlink:actuate="onLoad"/></draw:frame>Output<text:tab/>LOW : BOOL (TRUE, wenn X &lt; TRIGGER_LOW)</text:p>
      <text:p text:style-name="P55"><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 text:style-name="T24">Hysterese</text:span>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p>
      <text:p text:style-name="P55">ALARM_2 kann zum Beispiel mit HI_1 und LO_1 den Pegel eines Flüssigkeitsbehälters steuern und mit HI_2 und LO_2 einen Alarm auslösen wenn ein kritischer Pegel unterschritten beziehungsweise überschritten wird.</text:p>
      <text:list xml:id="list33629028" text:continue-numbering="true" text:style-name="L1">
        <text:list-item>
          <text:list>
            <text:list-item>
              <text:h text:style-name="P217" text:outline-level="2"><text:soft-page-break/><text:alphabetical-index-mark-start text:id="IMark107330780"/><text:alphabetical-index-mark-start text:id="IMark171816776"/>BAR_GRAPH<text:alphabetical-index-mark-end text:id="IMark171816776"/><text:alphabetical-index-mark-end text:id="IMark107330780"/></text:h>
            </text:list-item>
          </text:list>
        </text:list-item>
      </text:list>
      <text:p text:style-name="Standard">Type<text:tab/><text:span text:style-name="T46">Funktionsbaustein</text:span></text:p>
      <text:p text:style-name="P22"><text:span text:style-name="T16">Input</text:span><text:tab/>X : REAL (Eingangswert)</text:p>
      <text:p text:style-name="P22"><text:tab/>RST : BOOL (Reset Eingang für Alarm Ausgang)</text:p>
      <text:p text:style-name="P25">Output<text:tab/>LOW : BOOL (TRUE, wenn X &lt; TRIGGER_LOW)</text:p>
      <text:p text:style-name="P25"><text:tab/>Q1 .. Q6 : BOOL (Triggerausgänge)</text:p>
      <text:p text:style-name="P25"><text:tab/>HIGH : BOOL (TRUE, wenn X &gt;= TRIGGER_HIGH)</text:p>
      <text:p text:style-name="P25"><text:tab/>ALARM : BOOL (Alarmausgang)</text:p>
      <text:p text:style-name="P25"><text:tab/>STATUS : Byte (ESR Status Ausgang)</text:p>
      <text:p text:style-name="P25">Config<text:tab/>TRIGGER_LOW : REAL (Triggerschwelle für LOW Output)</text:p>
      <text:p text:style-name="P25"><text:tab/>TRIGGER_HIGH : REAL (Triggerschwelle für HIGH Output)</text:p>
      <text:p text:style-name="P25"><text:tab/>ALARM_LOW : BOOL (<text:span text:style-name="T16">Enable</text:span> Alarm für <text:span text:style-name="T16">Low</text:span> Output)</text:p>
      <text:p text:style-name="P25"><text:tab/>ALARM_HIGH : BOOL (<text:span text:style-name="T16">Enable</text:span> Alarm für <text:span text:style-name="T16">High</text:span> Output)</text:p>
      <text:p text:style-name="P25"><text:tab/>LOG_S<text:span text:style-name="T16">CALE</text:span> : BOOL (Ausgang ist Logarithmisch wenn TRUE)</text:p>
      <text:p text:style-name="P25"><draw:frame draw:style-name="fr4" draw:name="Grafik277" text:anchor-type="paragraph" svg:x="1.171cm" svg:y="0.007cm" svg:width="3.18cm" svg:height="5.339cm" draw:z-index="246"><draw:image xlink:href="Pictures/10000000000000F0000001948F49393B.png" xlink:type="simple" xlink:show="embed" xlink:actuate="onLoad"/></draw:frame><text:line-break/>BAR_GRAPH ist ein Level <text:span text:style-name="T16">Detector,</text:span> der abhängig vom Eingangswert einen Ausgang aktiviert. Der Ansprechwert für die <text:span text:style-name="T16">LOW</text:span> und <text:span text:style-name="T16">HIGH</text:span>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25"><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49">Status</text:p>
          </table:table-cell>
          <table:table-cell table:style-name="Tabelle8.B1" office:value-type="string">
            <text:p text:style-name="P43"/>
          </table:table-cell>
        </table:table-row>
        <table:table-row>
          <table:table-cell table:style-name="Tabelle8.A2" office:value-type="string">
            <text:p text:style-name="P49">110</text:p>
          </table:table-cell>
          <table:table-cell table:style-name="Tabelle8.B2" office:value-type="string">
            <text:p text:style-name="P48">Eingang liegt zwischen <text:span text:style-name="T16">Trigger</text:span>_<text:span text:style-name="T16">Low</text:span> und <text:span text:style-name="T16">Trigger</text:span>_<text:span text:style-name="T16">High</text:span></text:p>
          </table:table-cell>
        </table:table-row>
        <table:table-row>
          <table:table-cell table:style-name="Tabelle8.A2" office:value-type="string">
            <text:p text:style-name="P49">111</text:p>
          </table:table-cell>
          <table:table-cell table:style-name="Tabelle8.B2" office:value-type="string">
            <text:p text:style-name="P48">Eingang kleiner <text:span text:style-name="T16">Trigger</text:span>_<text:span text:style-name="T16">Low</text:span>, Ausgang LOW ist TRUE</text:p>
          </table:table-cell>
        </table:table-row>
        <table:table-row>
          <table:table-cell table:style-name="Tabelle8.A2" office:value-type="string">
            <text:p text:style-name="P49">112</text:p>
          </table:table-cell>
          <table:table-cell table:style-name="Tabelle8.B2" office:value-type="string">
            <text:p text:style-name="P48">Eingang größer <text:span text:style-name="T16">Trigger</text:span>_<text:span text:style-name="T16">High</text:span>, Ausgang HIGH ist TRUE</text:p>
          </table:table-cell>
        </table:table-row>
        <table:table-row>
          <table:table-cell table:style-name="Tabelle8.A2" office:value-type="string">
            <text:p text:style-name="P49">1</text:p>
          </table:table-cell>
          <table:table-cell table:style-name="Tabelle8.B2" office:value-type="string">
            <text:p text:style-name="P48">Eingang kleiner als <text:span text:style-name="T16">Trigger</text:span>_<text:span text:style-name="T16">low</text:span> und Alarm_<text:span text:style-name="T16">Low</text:span> ist TRUE</text:p>
          </table:table-cell>
        </table:table-row>
        <table:table-row>
          <table:table-cell table:style-name="Tabelle8.A2" office:value-type="string">
            <text:p text:style-name="P49">2</text:p>
          </table:table-cell>
          <table:table-cell table:style-name="Tabelle8.B2" office:value-type="string">
            <text:p text:style-name="P48">Eingang größer als <text:span text:style-name="T16">Trigger</text:span>_<text:span text:style-name="T16">high</text:span> und Alarm_<text:span text:style-name="T16">High</text:span> ist TRUE</text:p>
          </table:table-cell>
        </table:table-row>
      </table:table>
      <text:p text:style-name="P25"/>
      <text:p text:style-name="P25"><draw:frame draw:style-name="fr4" draw:name="Grafik278" text:anchor-type="paragraph" svg:x="1.002cm" svg:y="0.884cm" svg:width="13.25cm" svg:height="4.009cm" draw:z-index="247"><draw:image xlink:href="Pictures/100000000000029C000000CA6F72BE09.png" xlink:type="simple" xlink:show="embed" xlink:actuate="onLoad"/></draw:frame><draw:frame draw:style-name="fr4" draw:name="Grafik279" text:anchor-type="paragraph" svg:x="1.007cm" svg:y="5.764cm" svg:width="15.983cm" svg:height="9.876cm" draw:z-index="248"><draw:image xlink:href="Pictures/10000000000002DF000001C6186C3F17.png" xlink:type="simple" xlink:show="embed" xlink:actuate="onLoad"/></draw:frame>Das folgende Beispiel zeigt eine n Signalverlauf an Bar_Graph:</text:p>
      <text:p text:style-name="P55"/>
      <text:p text:style-name="P55"/>
      <text:list xml:id="list33657055" text:continue-numbering="true" text:style-name="L1">
        <text:list-item>
          <text:list>
            <text:list-item>
              <text:h text:style-name="P217" text:outline-level="2"><text:soft-page-break/><text:alphabetical-index-mark-start text:id="IMark158104760"/>CALIBRATE<text:alphabetical-index-mark-end text:id="IMark158104760"/></text:h>
            </text:list-item>
          </text:list>
        </text:list-item>
      </text:list>
      <text:p text:style-name="Standard"><text:span text:style-name="T46">Type</text:span><text:tab/><text:span text:style-name="T38">Funktionsbaustein</text:span></text:p>
      <text:p text:style-name="P22"><text:span text:style-name="T16">Input</text:span><text:tab/>X : REAL (Eingangswert)</text:p>
      <text:p text:style-name="P22"><text:tab/>CO : BOOL (Puls zum Speichern des Offsets)</text:p>
      <text:p text:style-name="P22"><text:tab/>CS : BOOL (Puls zum Speichern des Verstärkungsfaktors)</text:p>
      <text:p text:style-name="Standard">Output<text:tab/>Y : <text:span text:style-name="T38">REAL</text:span> (kalibriertes Ausgangssignal)</text:p>
      <text:p text:style-name="P25">Config<text:tab/>Y_OFFSET : REAL (Y Wert bei dem der Offset gesetzt wird)</text:p>
      <text:p text:style-name="P25"><draw:frame draw:style-name="fr4" draw:name="Grafik253" text:anchor-type="paragraph" svg:x="1.106cm" svg:y="1.184cm" svg:width="2.281cm" svg:height="2.2cm" draw:z-index="224"><draw:image xlink:href="Pictures/10000000000000AC000000A6B840952F.png" xlink:type="simple" xlink:show="embed" xlink:actuate="onLoad"/></draw:frame><text:tab/>Y_SCALE : REAL (Y Wert bei dem der Verstärkungsfaktor gesetzt <text:tab/>wird)</text:p>
      <text:p text:style-name="P42"><text:line-break/>CALIBRATE <text:span text:style-name="T38">dient</text:span>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 text:style-name="Standard"><text:span text:style-name="T38">Beispiel</text:span>:</text:p>
      <text:p text:style-name="P55">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55"/>
      <text:list xml:id="list33651385" text:continue-numbering="true" text:style-name="L1">
        <text:list-item>
          <text:list>
            <text:list-item>
              <text:h text:style-name="P217" text:outline-level="2"><text:soft-page-break/><text:alphabetical-index-mark-start text:id="IMark158104760"/>CYCLE_TIME<text:alphabetical-index-mark-end text:id="IMark158104760"/></text:h>
            </text:list-item>
          </text:list>
        </text:list-item>
      </text:list>
      <text:p text:style-name="P22">Type<text:tab/>Funktionsbaustein</text:p>
      <text:p text:style-name="P22"><text:span text:style-name="T16">Input</text:span><text:tab/>RES : BOOL (Reset)</text:p>
      <text:p text:style-name="P25">Output<text:tab/>CT_MIN : TIME (minimale gemessene Zykluszeit)</text:p>
      <text:p text:style-name="P25"><text:tab/>CT_MAX : TIME (maximale gemessene Zykluszeit)</text:p>
      <text:p text:style-name="P25"><text:tab/>CT_LAST : TIME (zuletzt gemessene Zykluszeit)</text:p>
      <text:p text:style-name="P25"><text:tab/>SYSTIME : TIME (gesamte Laufzeit des Systems seit dem letzten <text:tab/>Start)</text:p>
      <text:p text:style-name="P25"><text:tab/>SYSDAYS : INT (Anzahl der Tage seit dem letzten Start)</text:p>
      <text:p text:style-name="P25"><draw:frame draw:style-name="fr4" draw:name="Grafik184" text:anchor-type="paragraph" svg:x="1.221cm" svg:y="0.693cm" svg:width="3.62cm" svg:height="3.54cm" draw:z-index="149"><draw:image xlink:href="Pictures/10000000000001120000010C9BAB4D79.png" xlink:type="simple" xlink:show="embed" xlink:actuate="onLoad"/></draw:frame><text:tab/>CYCLES : DWORD (Anzahl der Zyklen seit dem letzten Start)</text:p>
      <text:p text:style-name="P25"><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xml:id="list33629041" text:continue-numbering="true" text:style-name="L1">
        <text:list-item>
          <text:list>
            <text:list-item>
              <text:h text:style-name="P217" text:outline-level="2"><text:alphabetical-index-mark-start text:id="IMark158104760"/>DT_SIMU<text:alphabetical-index-mark-end text:id="IMark158104760"/></text:h>
            </text:list-item>
          </text:list>
        </text:list-item>
      </text:list>
      <text:p text:style-name="P22">Type<text:tab/>Funktionsbaustein</text:p>
      <text:p text:style-name="P22"><text:span text:style-name="T16">Input</text:span><text:tab/>START : DT (Anfangs DATETIME)</text:p>
      <text:p text:style-name="P52"><text:tab/>SPEED : REAL (Geschwindigkeit für Ausgang DTS)</text:p>
      <text:p text:style-name="P25"><draw:frame draw:style-name="fr14" draw:name="Grafik681" text:anchor-type="paragraph" svg:x="1.041cm" svg:y="0.679cm" svg:width="3.18cm" svg:height="1.75cm" draw:z-index="709"><draw:image xlink:href="Pictures/10000000000000F0000000847719227B.png" xlink:type="simple" xlink:show="embed" xlink:actuate="onLoad"/></draw:frame>Output<text:tab/>DTS : DT (Simulierte DATETIME)</text:p>
      <text:p text:style-name="P55"><text:soft-page-break/><text:line-break/>DT_SIMU simuliert am Ausgang DTS einen Zeit Datumswert der mit dem Anfangswert START beginnt und mit der Geschwindigkeit SPEED weiter läuft. Wird der Eingangswert SPEED nicht belegt arbeitet der Baustein mit dem internen Vorgabewert 1.0 und der Ausgang DTS läuft mit 1 Sekunde / Sekunde vorwärts. Mit dem Eingang SPEED kann am Ausgang DTS eine beliebig schnelle oder langsame Uhr simuliert werden. Der Baustein kann in der Simulationsumgebung eingesetzt werden um eine RTC zu simulieren und zusätzlich die Geschwindigkeit der RTC zum Testen angepasst werden.</text:p>
      <text:list xml:id="list33636284" text:continue-numbering="true" text:style-name="L1">
        <text:list-item>
          <text:list>
            <text:list-item>
              <text:h text:style-name="P217" text:outline-level="2"><text:alphabetical-index-mark-start text:id="IMark158104760"/>METER<text:alphabetical-index-mark-end text:id="IMark158104760"/></text:h>
            </text:list-item>
          </text:list>
        </text:list-item>
      </text:list>
      <text:p text:style-name="P22">Type<text:tab/>Funktionsbaustein</text:p>
      <text:p text:style-name="P22"><text:span text:style-name="T16">Input</text:span><text:tab/>M1 : REAL (Verbrauchswert 1)</text:p>
      <text:p text:style-name="P52"><text:tab/><text:span text:style-name="T1">M2 : REAL (Verbrauchswert 2)</text:span></text:p>
      <text:p text:style-name="P52"><text:tab/>I1 : BOOL (Freigabeeingang 1)</text:p>
      <text:p text:style-name="P52"><text:tab/>I2 : BOOL (Freigabeeingang 2)</text:p>
      <text:p text:style-name="P52"><text:tab/>D : REAL (Teiler für den Ausgang)</text:p>
      <text:p text:style-name="P52"><text:tab/>RST : BOOL (Reset Eingang)</text:p>
      <text:p text:style-name="P25"><draw:frame draw:style-name="fr4" draw:name="Grafik321" text:anchor-type="paragraph" svg:x="1.046cm" svg:y="0.661cm" svg:width="2.281cm" svg:height="3.11cm" draw:z-index="297"><draw:image xlink:href="Pictures/10000000000000AC000000EBF5072A8E.png" xlink:type="simple" xlink:show="embed" xlink:actuate="onLoad"/></draw:frame>Output<text:tab/>MX : REAL (Verbrauchswert)</text:p>
      <text:p text:style-name="P182"><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den Eingängen M1 und m² mit kurzen Zykluszeiten zu erfassen und zu hohen Gesamtwerten <text:soft-page-break/>am Ausgang MX addieren. Die Auflösung des Bausteins kann wie folgt ermittelt werden.</text:p>
      <text:p text:style-name="P55">MX / 10^15 entspricht der minimalen Auflösung an den Eingängen M1 und M2.</text:p>
      <text:p text:style-name="Standard"><text:span text:style-name="T38">Beispiel</text:span>: </text:p>
      <text:p text:style-name="P87">MX = 10E6<text:tab/><text:tab/>der Verbrauchszähler steht bei 10 MWh (Megawattstunden)</text:p>
      <text:p text:style-name="P55">M1 = 0.09 Watt<text:tab/>Momentanverbrauch liegt bei 0.1 Watt</text:p>
      <text:p text:style-name="P55">D = 3600<text:tab/><text:tab/>Ausgang arbeitet in Wh (Wattstunden)</text:p>
      <text:p text:style-name="P55">Zykluszeit beträgt 10ms</text:p>
      <text:p text:style-name="P55">In diesem Beispiel wird je Zyklus ein Wert von 0.09[W] * 0.01 [S] / 3600 = 2.5E-7[Wh] zum Ausgang MX addiert. Dies entspricht einer Veränderung an der 14 Dezimalstelle des Ausgangs.</text:p>
      <text:p text:style-name="P55"><draw:frame draw:style-name="fr4" draw:name="Grafik322" text:anchor-type="paragraph" svg:x="1.113cm" svg:y="0.744cm" svg:width="11.76cm" svg:height="4.009cm" draw:z-index="298"><draw:image xlink:href="Pictures/10000000000002AC000000E98805CF64.png" xlink:type="simple" xlink:show="embed" xlink:actuate="onLoad"/></draw:frame>Beispiel 1 Stromverbrauchszähler:</text:p>
      <text:p text:style-name="P82"><text:line-break/>Der Stromverbrauchszähler zählt die Kilowattsekunden am Eingang M1. Durch den Eingang D wird der Ausgang durch 3600 geteilt, sodass der Ausgang Kilowattstunden anzeigt.</text:p>
      <text:p text:style-name="P55">Beispiel 2 <text:s/>Verbrauchsberechnung für einen 2 Stufen Brenner:</text:p>
      <text:p text:style-name="P55"><draw:frame draw:style-name="fr4" draw:name="Grafik323" text:anchor-type="paragraph" svg:x="1.067cm" svg:y="0.723cm" svg:width="11.76cm" svg:height="4.009cm" draw:z-index="299"><draw:image xlink:href="Pictures/10000000000002AC000000E9CBCDDC16.png" xlink:type="simple" xlink:show="embed" xlink:actuate="onLoad"/></draw:frame></text:p>
      <text:p text:style-name="P55"><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list xml:id="list33655814" text:continue-numbering="true" text:style-name="L1">
        <text:list-item>
          <text:list>
            <text:list-item>
              <text:h text:style-name="P217" text:outline-level="2"><text:soft-page-break/><text:alphabetical-index-mark-start text:id="IMark158104760"/>METER_STAT<text:alphabetical-index-mark-end text:id="IMark158104760"/></text:h>
            </text:list-item>
          </text:list>
        </text:list-item>
      </text:list>
      <text:p text:style-name="P22">Type<text:tab/>Funktionsbaustein</text:p>
      <text:p text:style-name="P22"><text:span text:style-name="T16">Input</text:span><text:tab/>IN : REAL (Eingangssignal)</text:p>
      <text:p text:style-name="P52"><text:tab/>DI : DATE (Datumseingang)</text:p>
      <text:p text:style-name="P52"><text:tab/>RST : BOOL (Reset Eingang)</text:p>
      <text:p text:style-name="P25">Output<text:tab/>LAST_DAY : REAL (Verbrauchswert des vergangenen Tages)</text:p>
      <text:p text:style-name="P55"><text:tab/>CURRENT_DAY : REAL (Verbrauchswert des aktuellen Tages)</text:p>
      <text:p text:style-name="P55"><text:tab/><text:span text:style-name="T4">LAST_WEEK : REAL (Verbrauchswert der vergangenen Woche)</text:span></text:p>
      <text:p text:style-name="P55"><text:tab/>CURRENT_WEEK : REAL (Verbrauchswert der aktuellen Woche)</text:p>
      <text:p text:style-name="P55"><text:tab/>LAST_MONTH : REAL (Verbrauchswert des vergangenen Monats)</text:p>
      <text:p text:style-name="P55"><text:tab/>CURRENT_MONTH : REAL (Verbrauchswert des aktuellen Monats)</text:p>
      <text:p text:style-name="P55"><text:tab/>LAST_YEAR : REAL (Verbrauchswert des vergangenen Jahres)</text:p>
      <text:p text:style-name="P55"><draw:frame draw:style-name="fr4" draw:name="Grafik324" text:anchor-type="paragraph" svg:x="1.201cm" svg:y="0.631cm" svg:width="5.669cm" svg:height="3.9cm" draw:z-index="300"><draw:image xlink:href="Pictures/10000000000001AD000001277E21852A.png" xlink:type="simple" xlink:show="embed" xlink:actuate="onLoad"/></draw:frame><text:tab/>CURRENT_YEAR : REAL (Verbrauchswert des aktuellen Jahres)</text:p>
      <text:p text:style-name="P55"><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55"><draw:frame draw:style-name="fr4" draw:name="Grafik325" text:anchor-type="paragraph" svg:x="1.025cm" svg:y="1.131cm" svg:width="15.998cm" svg:height="3.882cm" draw:z-index="301"><draw:image xlink:href="Pictures/10000000000004BB00000126EA3F2B28.png" xlink:type="simple" xlink:show="embed" xlink:actuate="onLoad"/></draw:frame>Das folgende Beispiel zeigt die Anwendung von METER_STAT mit dem Baustein METER:</text:p>
      <text:p text:style-name="P55"/>
      <text:list xml:id="list33642104" text:continue-numbering="true" text:style-name="L1">
        <text:list-item>
          <text:list>
            <text:list-item>
              <text:h text:style-name="P217" text:outline-level="2"><text:soft-page-break/><text:alphabetical-index-mark-start text:id="IMark158104760"/>M_D<text:alphabetical-index-mark-end text:id="IMark158104760"/></text:h>
            </text:list-item>
          </text:list>
        </text:list-item>
      </text:list>
      <text:p text:style-name="P22">Type<text:tab/>Funktionsbaustein</text:p>
      <text:p text:style-name="P22"><text:span text:style-name="T16">Input</text:span><text:tab/>START : BOOL (Eingangssignal)</text:p>
      <text:p text:style-name="P52"><text:tab/>STOP : BOOL (Eingangssignal)</text:p>
      <text:p text:style-name="P52"><text:tab/>TMAX : TIME (<text:span text:style-name="T16">Timeout</text:span> für ET)</text:p>
      <text:p text:style-name="P52"><text:tab/>RST : BOOL (Reset Eingang)</text:p>
      <text:p text:style-name="P25">Output<text:tab/>PT : TIME (gemessene Zeit)</text:p>
      <text:p text:style-name="P55"><draw:frame draw:style-name="fr4" draw:name="Grafik300" text:anchor-type="paragraph" svg:x="1.053cm" svg:y="0.706cm" svg:width="2.731cm" svg:height="2.649cm" draw:z-index="275"><draw:image xlink:href="Pictures/10000000000000CE000000C8AE2D2EA1.png" xlink:type="simple" xlink:show="embed" xlink:actuate="onLoad"/></draw:frame><text:tab/>ET : TIME (Abgelaufene Zeit seit letzter steigender Flanke)</text:p>
      <text:p text:style-name="Standard"><text:line-break/>M_D misst die Zeit <text:span text:style-name="T38">zwischen</text:span> einer steigenden Flanke an START und einer steigenden Flanke an STOP. PT ist das Ergebnis der letzten Messung. Der Ausgang ET ist die abgelaufene Zeit seit der letzten steigenden Flanke an START. M_D benötigt eine steigende Flanke, um die Messung zu starten. Falls beim ersten Aufruf START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p text:style-name="Standard"/>
      <text:p text:style-name="Standard"/>
      <text:p text:style-name="Standard"/>
      <text:p text:style-name="Standard"/>
      <text:p text:style-name="Standard"/>
      <text:list xml:id="list33648985" text:continue-numbering="true" text:style-name="L1">
        <text:list-item>
          <text:list>
            <text:list-item>
              <text:h text:style-name="P217" text:outline-level="2"><text:soft-page-break/><text:alphabetical-index-mark-start text:id="IMark158104760"/>M_T<text:alphabetical-index-mark-end text:id="IMark158104760"/></text:h>
            </text:list-item>
          </text:list>
        </text:list-item>
      </text:list>
      <text:p text:style-name="P22">Type<text:tab/>Funktionsbaustein</text:p>
      <text:p text:style-name="P22"><text:span text:style-name="T16">Input</text:span><text:tab/>IN : BOOL (Eingangssignal)</text:p>
      <text:p text:style-name="P52"><text:tab/>TMAX : TIME (<text:span text:style-name="T16">Timeout</text:span> für ET)</text:p>
      <text:p text:style-name="P52"><text:tab/>RST : BOOL (Reset Eingang)</text:p>
      <text:p text:style-name="P25">Output<text:tab/>PT : TIME<text:span text:style-name="T4"> (gemessene Impulsdauer von der steigenden bis zur <text:s text:c="10"/><text:tab/>fallenden Flanke)</text:span></text:p>
      <text:p text:style-name="P55"><draw:frame draw:style-name="fr4" draw:name="Grafik195" text:anchor-type="paragraph" svg:x="1.074cm" svg:y="0.683cm" svg:width="2.731cm" svg:height="2.2cm" draw:z-index="273"><draw:image xlink:href="Pictures/10000000000000CE000000A6C56D4649.png" xlink:type="simple" xlink:show="embed" xlink:actuate="onLoad"/></draw:frame><text:tab/>ET : TIME (Abgelaufene Zeit seit letzter Steigender Flanke)</text:p>
      <text:p text:style-name="Standard"><text:line-break/>M_T misst die Zeit <text:span text:style-name="T38">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55"><draw:g text:anchor-type="paragraph" draw:z-index="153" draw:style-name="gr1"><draw:line draw:style-name="gr2" draw:text-style-name="P251" svg:x1="1.928cm" svg:y1="1.334cm" svg:x2="2.928cm" svg:y2="1.334cm"><text:p/></draw:line><draw:line draw:style-name="gr2" draw:text-style-name="P251" svg:x1="2.928cm" svg:y1="0.836cm" svg:x2="2.928cm" svg:y2="1.335cm"><text:p/></draw:line><draw:line draw:style-name="gr2" draw:text-style-name="P251" svg:x1="2.928cm" svg:y1="0.836cm" svg:x2="4.928cm" svg:y2="0.836cm"><text:p/></draw:line><draw:line draw:style-name="gr2" draw:text-style-name="P251" svg:x1="4.928cm" svg:y1="1.335cm" svg:x2="4.928cm" svg:y2="0.836cm"><text:p/></draw:line><draw:frame draw:style-name="gr6" draw:text-style-name="P253" svg:width="0.997cm" svg:height="0.65cm" svg:x="1.178cm" svg:y="0.835cm"><draw:text-box><text:p text:style-name="P252"><text:span text:style-name="T50">IN</text:span></text:p></draw:text-box></draw:frame><draw:line draw:style-name="gr2" draw:text-style-name="P251" svg:x1="4.928cm" svg:y1="1.334cm" svg:x2="5.928cm" svg:y2="1.334cm"><text:p/></draw:line><draw:line draw:style-name="gr7" draw:text-style-name="P251" svg:x1="2.928cm" svg:y1="0.337cm" svg:x2="3.429cm" svg:y2="0.337cm"><text:p/></draw:line><draw:frame draw:style-name="gr6" draw:text-style-name="P253" svg:width="1.124cm" svg:height="0.65cm" svg:x="3.429cm" svg:y="-0.019cm"><draw:text-box><text:p text:style-name="P252"><text:span text:style-name="T50">PT</text:span></text:p></draw:text-box></draw:frame><draw:line draw:style-name="gr7" draw:text-style-name="P251" svg:x1="4.928cm" svg:y1="0.337cm" svg:x2="4.429cm" svg:y2="0.337cm"><text:p/></draw:line><draw:line draw:style-name="gr2" draw:text-style-name="P251" svg:x1="5.928cm" svg:y1="0.836cm" svg:x2="5.928cm" svg:y2="1.335cm"><text:p/></draw:line><draw:line draw:style-name="gr2" draw:text-style-name="P251" svg:x1="5.928cm" svg:y1="0.836cm" svg:x2="7.928cm" svg:y2="0.836cm"><text:p/></draw:line><draw:line draw:style-name="gr2" draw:text-style-name="P251" svg:x1="7.927cm" svg:y1="1.335cm" svg:x2="7.927cm" svg:y2="0.836cm"><text:p/></draw:line><draw:line draw:style-name="gr2" draw:text-style-name="P251" svg:x1="7.927cm" svg:y1="1.334cm" svg:x2="8.927cm" svg:y2="1.334cm"><text:p/></draw:line><draw:line draw:style-name="gr2" draw:text-style-name="P251" svg:x1="7.927cm" svg:y1="1.334cm" svg:x2="8.927cm" svg:y2="1.334cm"><text:p/></draw:line></draw:g></text:p>
      <text:list xml:id="list33643113" text:continue-numbering="true" text:style-name="L1">
        <text:list-item>
          <text:list>
            <text:list-item>
              <text:h text:style-name="P217" text:outline-level="2"><text:alphabetical-index-mark-start text:id="IMark158104760"/>M_TX<text:alphabetical-index-mark-end text:id="IMark158104760"/></text:h>
            </text:list-item>
          </text:list>
        </text:list-item>
      </text:list>
      <text:p text:style-name="P22">Type<text:tab/>Funktionsbaustein</text:p>
      <text:p text:style-name="P22"><text:span text:style-name="T16">Input</text:span><text:tab/>IN : BOOL (Eingangssignal)</text:p>
      <text:p text:style-name="P52"><text:tab/>TMAX : TIME (<text:span text:style-name="T16">Timeout</text:span> für ET)</text:p>
      <text:p text:style-name="P52"><text:tab/>RST : BOOL (Reset Eingang)</text:p>
      <text:p text:style-name="P25"><text:soft-page-break/>Output<text:tab/>TH : TIME (Ontime des Eingangssignals)</text:p>
      <text:p text:style-name="P25"><text:tab/>TL : TIME (Offtime des Eingangssignals)</text:p>
      <text:p text:style-name="P25"><text:tab/>DC : REAL (Tastverhältnis / <text:span text:style-name="T16">Duty</text:span> <text:span text:style-name="T16">Cycle</text:span> des Eingangssignals)</text:p>
      <text:p text:style-name="P25"><draw:frame draw:style-name="fr4" draw:name="Grafik196" text:anchor-type="paragraph" svg:x="1.129cm" svg:y="0.667cm" svg:width="2.731cm" svg:height="3.099cm" draw:z-index="274"><draw:image xlink:href="Pictures/10000000000000CE000000EABA770F72.png" xlink:type="simple" xlink:show="embed" xlink:actuate="onLoad"/></draw:frame><text:tab/>F : REAL (Frequenz des Eingangssignals)</text:p>
      <text:p text:style-name="P25"><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6">high</text:span> wird dies nicht als steigende Flanke gewertet. Aus den <text:s/>gemessenen Werten TH und TL werden der <text:span text:style-name="T16">Duty</text:span> <text:span text:style-name="T16">Cycle</text:span> und die Frequenz in Hz errechnet. Ein <text:span text:style-name="T16">Duty</text:span> <text:span text:style-name="T16">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xml:id="list33634734" text:continue-numbering="true" text:style-name="L1">
        <text:list-item>
          <text:list>
            <text:list-item>
              <text:h text:style-name="P217" text:outline-level="2"><text:alphabetical-index-mark-start text:id="IMark158104760"/>ONTIME<text:alphabetical-index-mark-end text:id="IMark158104760"/></text:h>
            </text:list-item>
          </text:list>
        </text:list-item>
      </text:list>
      <text:p text:style-name="P22">Type<text:tab/>Funktionsbaustein</text:p>
      <text:p text:style-name="P22"><text:span text:style-name="T16">Input</text:span><text:tab/>IN : BOOL (Eingangssignal)</text:p>
      <text:p text:style-name="P22"><text:tab/>RST : BOOL (Reset Eingang)</text:p>
      <text:p text:style-name="P25">Output<text:tab/>ONTIME : REAL (Betriebsstunden)</text:p>
      <text:p text:style-name="P25"><text:tab/>LAST_ON : REAL (Länge der letzten Betriebszeit<text:span text:style-name="T4">)</text:span></text:p>
      <text:p text:style-name="P25"><draw:frame draw:style-name="fr4" draw:name="Grafik197" text:anchor-type="paragraph" svg:x="1.217cm" svg:y="1.127cm" svg:width="3.18cm" svg:height="2.2cm" draw:z-index="154"><draw:image xlink:href="Pictures/10000000000000F0000000A6246A6B95.png" xlink:type="simple" xlink:show="embed" xlink:actuate="onLoad"/></draw:frame><text:soft-page-break/><text:tab/>CYCLES : REAL (Anzahl der Einschaltzyklen seit dem letzten <text:s text:c="5"/><text:tab/>Reset)</text:p>
      <text:p text:style-name="P25"><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55">Alle Ausgangswerte bleiben auch dann erhalten, wenn die SPS ausgeschaltet und später wieder eingeschaltet wird.</text:p>
      <text:p text:style-name="P55"/>
      <text:list xml:id="list33633867" text:continue-numbering="true" text:style-name="L1">
        <text:list-item>
          <text:list>
            <text:list-item>
              <text:h text:style-name="P217" text:outline-level="2"><text:alphabetical-index-mark-start text:id="IMark158104760"/>T_PLC_MS<text:alphabetical-index-mark-end text:id="IMark158104760"/></text:h>
            </text:list-item>
          </text:list>
        </text:list-item>
      </text:list>
      <text:p text:style-name="P22">Type<text:tab/>Funktion : DWORD</text:p>
      <text:p text:style-name="P25"><draw:frame draw:style-name="fr4" draw:name="Grafik316" text:anchor-type="paragraph" svg:x="1.138cm" svg:y="0.681cm" svg:width="3.66cm" svg:height="0.99cm" draw:z-index="292"><draw:image xlink:href="Pictures/10000000000001150000004B547EEC88.png" xlink:type="simple" xlink:show="embed" xlink:actuate="onLoad"/></draw:frame>Output<text:tab/>DWORD (SPS <text:span text:style-name="T16">Timer</text:span> in Millisekunden)</text:p>
      <text:p text:style-name="P25"><text:line-break/><text:span text:style-name="T4">T_PLC_MS liefert die aktuelle interne SPS Zeit in Millisekunden. Dies hat nichts mit einer eventuell vorhandenen Uhr (Real </text:span><text:span text:style-name="T8">Time</text:span><text:span text:style-name="T4"> Baustein) zu tun, sondern ist der interne </text:span><text:span text:style-name="T8">Timer</text:span><text:span text:style-name="T4"> einer SPS, der als Zeitreferenz benutzt wird.</text:span></text:p>
      <text:p text:style-name="P55">Der Quelltext des Bausteins hat folgende Eigenschaften:</text:p>
      <text:p text:style-name="P73">FUNCTION T_PLC_MS : DWORD</text:p>
      <text:p text:style-name="P73">VAR CONSTANT</text:p>
      <text:p text:style-name="P73"><text:tab/>DEBUG : BOOL := FALSE;</text:p>
      <text:p text:style-name="P73"><text:tab/>N : INT := 0;</text:p>
      <text:p text:style-name="P73"><text:tab/>OFFSET := 0;</text:p>
      <text:p text:style-name="P73">END_VAR</text:p>
      <text:p text:style-name="P73">VAR</text:p>
      <text:p text:style-name="P73"><text:tab/>TEMP : DWORD := 1;</text:p>
      <text:p text:style-name="P73">END_VAR</text:p>
      <text:p text:style-name="P73"><text:soft-page-break/>T_PLC_MS := TIME_TO_DWORD(TIME());</text:p>
      <text:p text:style-name="P73">IF DEBUG THEN</text:p>
      <text:p text:style-name="P73"><text:tab/>T_PLC_MS := SHL(T_PLC_US,N) OR SHL(TEMP,N)-1 + OFFSET;</text:p>
      <text:p text:style-name="P73">END_IF;</text:p>
      <text:p text:style-name="P55">Im Normalbetrieb liest der Baustein mit der Funktion TIME() den internen <text:span text:style-name="T16">Timer</text:span> der SPS aus und liefert diesen zurück. Der Interne <text:span text:style-name="T16">Timer</text:span> der SPS nach IEC Norm hat 1 Millisekunde Auflösung.</text:p>
      <text:p text:style-name="P55"><text:span text:style-name="T4">Eine weitere Eigenschaft von T_PLC_MS ist ein </text:span><text:span text:style-name="T8">Debug-</text:span><text:span text:style-name="T4">Modus, der es erlaubt den Überlauf des SPS internen </text:span><text:span text:style-name="T8">Timers</text:span><text:span text:style-name="T4"> zu testen und die erstellte Software entsprechend sicher zu verifizieren. Der interne </text:span><text:span text:style-name="T16">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4">Timern</text:span><text:span text:style-name="T4"> beträgt diese Überlaufzeit 2^32 -1 Millisekunden, was in etwa 49,71 Tagen entspricht. Da es sich bei diesem </text:span><text:span text:style-name="T16">Timer</text:span><text:span text:style-name="T4"> um einen in Hardware implementierten </text:span><text:span text:style-name="T16">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4">-Überlauf, der fatale Auswirkungen in der Anwendungssoftware hervor ruft, aber nur extrem schwer getestet werden kann.</text:span></text:p>
      <text:p text:style-name="P55"><text:span text:style-name="T4">T_PLC_MS bietet mehrere Möglichkeiten zum Testen des Überlaufs und zeitabhängiger Software. Mit der Konstante DEBUG kann der Test-Modus eingeschaltet werden und dann mittels der Konstanten N und Offset der </text:span><text:span text:style-name="T16">Timer</text:span><text:span text:style-name="T4"> ab einem bestimmten Wert beginnen, damit gezielt der Überlauf getestet werden kann ohne die 49 Tage abzuwarten. Offset legt hierbei den Wert fest, der zum internen </text:span><text:span text:style-name="T16">Timer</text:span><text:span text:style-name="T4"> addiert wird. Mit der Konstanten N wird festgelegt, um wie viele Bits der interne </text:span><text:span text:style-name="T16">Timer</text:span><text:span text:style-name="T4"> Wert nach </text:span><text:span text:style-name="T4">links verschoben wird und dabei die unteren N Bits mit 1 gefüllt werden. Mit N kann dadurch die Geschwindigkeit des internen </text:span><text:span text:style-name="T8">Timers</text:span><text:span text:style-name="T4"> um die Faktoren 2,4,8,16 usw. erhöht werden.</text:span></text:p>
      <text:p text:style-name="P55">T_PLC_US bietet also alle Möglichkeiten zum Test zeitabhängiger Software, sowohl für die Problematik des Überlaufs, als auch für sehr langsame zeitabhängige Funktionen.</text:p>
      <text:p text:style-name="P55">Die Konstanten DEBUG, N und OFFSET wurden absichtlich nicht als Eingänge der Funktion implementiert um eine versehentliche Fehlbedienung zu vermeiden.</text:p>
      <text:p text:style-name="P55"/>
      <text:p text:style-name="P55"/>
      <text:list xml:id="list33649727" text:continue-numbering="true" text:style-name="L1">
        <text:list-item>
          <text:list>
            <text:list-item>
              <text:h text:style-name="P217" text:outline-level="2"><text:soft-page-break/><text:alphabetical-index-mark-start text:id="IMark158104760"/>T_PLC_US<text:alphabetical-index-mark-end text:id="IMark158104760"/></text:h>
            </text:list-item>
          </text:list>
        </text:list-item>
      </text:list>
      <text:p text:style-name="P22">Type<text:tab/>Funktion : DWORD</text:p>
      <text:p text:style-name="P25"><draw:frame draw:style-name="fr4" draw:name="Grafik317" text:anchor-type="paragraph" svg:x="1.069cm" svg:y="0.676cm" svg:width="3.491cm" svg:height="0.99cm" draw:z-index="293"><draw:image xlink:href="Pictures/10000000000001080000004B882B2D61.png" xlink:type="simple" xlink:show="embed" xlink:actuate="onLoad"/></draw:frame>Output<text:tab/>DWORD (SPS <text:span text:style-name="T16">Timer</text:span> in Mikrosekunden)</text:p>
      <text:p text:style-name="P25"><text:span text:style-name="T4"><text:line-break/>T_PLC_US liefert die aktuelle interne SPS Zeit in Mikrosekunden. Dies hat nichts mit </text:span><text:span text:style-name="T4">einer eventuell vorhandenen Uhr (Real </text:span><text:span text:style-name="T8">Time</text:span><text:span text:style-name="T4"> Baustein) zu tun, sondern ist der interne </text:span><text:span text:style-name="T8">Timer</text:span><text:span text:style-name="T4"> einer SPS der als Zeitreferenz benutzt wird.</text:span></text:p>
      <text:p text:style-name="P55">Der Quelltext des Bausteins hat folgende Eigenschaften:</text:p>
      <text:p text:style-name="P73">FUNCTION T_PLC_US : DWORD</text:p>
      <text:p text:style-name="P73">VAR CONSTANT</text:p>
      <text:p text:style-name="P73"><text:tab/>DEBUG : BOOL := FALSE;</text:p>
      <text:p text:style-name="P73"><text:tab/>N : INT := 0;</text:p>
      <text:p text:style-name="P73"><text:tab/>OFFSET := 0;</text:p>
      <text:p text:style-name="P73">END_VAR</text:p>
      <text:p text:style-name="P73">VAR</text:p>
      <text:p text:style-name="P73"><text:tab/>TEMP : DWORD := 1;</text:p>
      <text:p text:style-name="P73">END_VAR</text:p>
      <text:p text:style-name="P73">T_PLC_US := TIME_TO_DWORD(TIME())*1000;</text:p>
      <text:p text:style-name="P73">IF DEBUG THEN</text:p>
      <text:p text:style-name="P73"><text:tab/>T_PLC_US := SHL(T_PLC_US,N) OR SHL(TEMP,N)-1 + OFFSET;</text:p>
      <text:p text:style-name="P73">END_IF;</text:p>
      <text:p text:style-name="P55">Im Normalbetrieb liest der Baustein mit der Funktion TIME() den internen <text:span text:style-name="T16">Timer</text:span> der SPS aus. Da der interne <text:span text:style-name="T16">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 text:style-name="T16">Timer</text:span>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55"><text:soft-page-break/><text:span text:style-name="T4">Eine weitere Eigenschaft von T_PLC_US ist ein </text:span><text:span text:style-name="T8">Debug-</text:span><text:span text:style-name="T4">Modus, der es erlaubt den Überlauf des SPS internen </text:span><text:span text:style-name="T8">Timers</text:span><text:span text:style-name="T4"> zu erzeugen und die erstellte Software entsprechend sicher zu testen. Der interne </text:span><text:span text:style-name="T16">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4">Timern</text:span><text:span text:style-name="T4"> beträgt diese Überlaufzeit 2^32 -1 Millisekunden, was etwa 49,71 Tagen entspricht. Da es sich bei diesem </text:span><text:span text:style-name="T16">Timer</text:span><text:span text:style-name="T4"> um einen in Hardware implementierten </text:span><text:span text:style-name="T16">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4">-Überlauf, der fatale Auswirkungen in der Anwendungssoftware hervor ruft, aber nur extrem schwer getestet werden kann.</text:span></text:p>
      <text:p text:style-name="P55"><text:span text:style-name="T4">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4"> ab einem bestimmten Wert beginnen, damit gezielt der Überlauf getestet werden kann ohne die 49 Tage abzuwarten. Off</text:span><text:span text:style-name="T4">set legt hierbei den Wert fest der zum internen </text:span><text:span text:style-name="T16">Timer</text:span><text:span text:style-name="T4"> addiert wird. Mit der Konstanten N wird festgelegt, um wie viele Bits der interne </text:span><text:span text:style-name="T16">Timer</text:span><text:span text:style-name="T4"> Wert nach links verschoben wird und dabei die unteren N Bits mit 1 gefüllt werden. Mit N kann dadurch die Geschwindigkeit des internen </text:span><text:span text:style-name="T8">Timers</text:span><text:span text:style-name="T4"> um die Faktoren 2,4,8,16 usw. erhöht werden.</text:span></text:p>
      <text:p text:style-name="P55">T_PLC_US bietet also alle Möglichkeiten zum Test zeitabhängiger Software, sowohl für die Problematik des Überlaufs, als auch für sehr langsame zeitabhängige Funktionen.</text:p>
      <text:p text:style-name="P55">Die Konstanten DEBUG, N und OFFSET wurden absichtlich nicht als Eingänge der Funktion implementiert, um eine versehentliche Fehlbedienung zu vermeiden.</text:p>
      <text:list xml:id="list33642061" text:continue-numbering="true" text:style-name="L1">
        <text:list-item>
          <text:list>
            <text:list-item>
              <text:h text:style-name="P217" text:outline-level="2"><text:alphabetical-index-mark-start text:id="IMark158104760"/>TC_MS<text:alphabetical-index-mark-end text:id="IMark158104760"/></text:h>
            </text:list-item>
          </text:list>
        </text:list-item>
      </text:list>
      <text:p text:style-name="P22">Type<text:tab/>Funktionsbaustein</text:p>
      <text:p text:style-name="P25"><draw:frame draw:style-name="fr4" draw:name="Grafik519" text:anchor-type="paragraph" svg:x="1.046cm" svg:y="0.647cm" svg:width="2.05cm" svg:height="1.3cm" draw:z-index="525"><draw:image xlink:href="Pictures/100000000000009B000000625F2C3B19.png" xlink:type="simple" xlink:show="embed" xlink:actuate="onLoad"/></draw:frame>Output<text:tab/>TC : DWORD (letzte Zykluszeit in Millisekunden)</text:p>
      <text:p text:style-name="P55"><text:line-break/>TC_MS ermittelt die letzte Zykluszeit, das ist die Zeit die seit dem letzten Aufruf des Bausteins vergangen ist. Die Zeit wird in Millisekunden geliefert.</text:p>
      <text:list xml:id="list33650414" text:continue-numbering="true" text:style-name="L1">
        <text:list-item>
          <text:list>
            <text:list-item>
              <text:h text:style-name="P217" text:outline-level="2"><text:soft-page-break/><text:alphabetical-index-mark-start text:id="IMark158104760"/>TC_S<text:alphabetical-index-mark-end text:id="IMark158104760"/></text:h>
            </text:list-item>
          </text:list>
        </text:list-item>
      </text:list>
      <text:p text:style-name="P22">Type<text:tab/>Funktionsbaustein</text:p>
      <text:p text:style-name="P25"><draw:frame draw:style-name="fr4" draw:name="Grafik521" text:anchor-type="paragraph" svg:x="1.046cm" svg:y="0.677cm" svg:width="1.679cm" svg:height="1.27cm" draw:z-index="527"><draw:image xlink:href="Pictures/100000000000007F00000060C077AB05.png" xlink:type="simple" xlink:show="embed" xlink:actuate="onLoad"/></draw:frame>Output<text:tab/>TC : REAL (letzte Zykluszeit in Sekunden)</text:p>
      <text:p text:style-name="P55"><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 text:style-name="T16">Timer</text:span> in Mikrosekunden mit einer Schrittweite von 1000 Mikrosekunden. Wird eine höhere Auflösung gewünscht muss die Funktion T_PLC_US() dem entsprechenden System angepasst werden.</text:p>
      <text:list xml:id="list336326261" text:continue-numbering="true" text:style-name="L1">
        <text:list-item>
          <text:list>
            <text:list-item>
              <text:h text:style-name="P217" text:outline-level="2"><text:alphabetical-index-mark-start text:id="IMark158104760"/>TC_US<text:alphabetical-index-mark-end text:id="IMark158104760"/></text:h>
            </text:list-item>
          </text:list>
        </text:list-item>
      </text:list>
      <text:p text:style-name="P22">Type<text:tab/>Funktionsbaustein</text:p>
      <text:p text:style-name="P25"><draw:frame draw:style-name="fr4" draw:name="Grafik520" text:anchor-type="paragraph" svg:x="1.046cm" svg:y="0.647cm" svg:width="2.05cm" svg:height="1.3cm" draw:z-index="526"><draw:image xlink:href="Pictures/100000000000009B000000625F2C3B19.png" xlink:type="simple" xlink:show="embed" xlink:actuate="onLoad"/></draw:frame>Output<text:tab/>TC : DWORD (letzte Zykluszeit in Mikrosekunden)</text:p>
      <text:p text:style-name="P55"><text:line-break/>TC_US ermittelt die letzte Zykluszeit, das ist die Zeit die seit dem letzten Aufruf des Bausteins vergangen ist. Die Zeit wird in Mikrosekunden geliefert. Der Baustein ruft die Funktion T_PLC_US() auf. T_PLC_US() liefert den SPS internen <text:span text:style-name="T16">Timer</text:span> in Mikrosekunden mit einer Schrittweite von 1000 Mikrosekunden. Wird eine höhere Auflösung gewünscht muss die Funktion T_PLC_US() dem entsprechenden System angepasst werden.</text:p>
      <text:list xml:id="list33626801" text:continue-numbering="true" text:style-name="L1">
        <text:list-item>
          <text:h text:style-name="P211" text:outline-level="1">Umrechnungen</text:h>
        </text:list-item>
      </text:list>
      <text:p text:style-name="P20"/>
      <text:list xml:id="list33655502" text:continue-numbering="true" text:style-name="L1">
        <text:list-item>
          <text:list>
            <text:list-item>
              <text:h text:style-name="P217" text:outline-level="2"><text:alphabetical-index-mark-start text:id="IMark158104760"/>ASTRO<text:alphabetical-index-mark-end text:id="IMark158104760"/></text:h>
            </text:list-item>
          </text:list>
        </text:list-item>
      </text:list>
      <text:p text:style-name="Standard"><text:span text:style-name="T46">Type</text:span><text:tab/><text:span text:style-name="T46">Funktionsbaustein</text:span></text:p>
      <text:p text:style-name="P22"><text:span text:style-name="T16">Input</text:span><text:tab/>M : REAL (Entfernung in Meter)</text:p>
      <text:p text:style-name="P22"><text:tab/>AE : REAL (Entfernung in Astronomischen Einheiten)</text:p>
      <text:p text:style-name="P22"><text:tab/>PC : REAL (Entfernung in Parsec)</text:p>
      <text:p text:style-name="P22"><text:tab/>LJ : REAL (Entfernung in Lichtjahren)</text:p>
      <text:p text:style-name="P25">Output<text:tab/>YM : REAL (Entfernung in Meter)</text:p>
      <text:p text:style-name="P22"><text:tab/>YAE : REAL (Entfernung in Astronomischen Einheiten)</text:p>
      <text:p text:style-name="P22"><text:tab/>YPC : REAL (Entfernung in Parsec)</text:p>
      <text:p text:style-name="P25"><draw:frame draw:style-name="fr4" draw:name="Grafik292" text:anchor-type="paragraph" svg:x="1.169cm" svg:y="0.693cm" svg:width="2.281cm" svg:height="2.649cm" draw:z-index="266"><draw:image xlink:href="Pictures/10000000000000AC000000C87059FC2E.png" xlink:type="simple" xlink:show="embed" xlink:actuate="onLoad"/></draw:frame><text:tab/>YLJ : REAL (Entfernung in Lichtjahren)</text:p>
      <text:p text:style-name="Standard"><text:line-break/>Der Baustein <text:span text:style-name="T46">ASTRO</text:span> <text:span text:style-name="T38">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25">1 AE = 149,597870 * 10<text:span text:style-name="T39">9</text:span> m</text:p>
      <text:p text:style-name="P25">1 PC = 206265 AE</text:p>
      <text:p text:style-name="P25">1 LJ = 9,460530 * 10<text:span text:style-name="T39">15</text:span> m = 63240 AE = 0,30659 PC</text:p>
      <text:list xml:id="list33625183" text:continue-numbering="true" text:style-name="L1">
        <text:list-item>
          <text:list>
            <text:list-item>
              <text:h text:style-name="P217" text:outline-level="2"><text:soft-page-break/><text:alphabetical-index-mark-start text:id="IMark158104760"/>BFT_TO_MS<text:alphabetical-index-mark-end text:id="IMark158104760"/></text:h>
            </text:list-item>
          </text:list>
        </text:list-item>
      </text:list>
      <text:p text:style-name="Standard"><text:span text:style-name="T46">Type</text:span><text:tab/><text:span text:style-name="T46">Funktion</text:span></text:p>
      <text:p text:style-name="P22"><text:span text:style-name="T16">Input</text:span><text:tab/>BFT : INT (Windstärke nach der Beaufort Skala)</text:p>
      <text:p text:style-name="P25"><draw:frame draw:style-name="fr4" draw:name="Grafik615" text:anchor-type="paragraph" svg:x="1.067cm" svg:y="0.688cm" svg:width="4.09cm" svg:height="0.99cm" draw:z-index="637"><draw:image xlink:href="Pictures/10000000000001350000004B4F9BBB0A.png" xlink:type="simple" xlink:show="embed" xlink:actuate="onLoad"/></draw:frame>Output<text:tab/>MS : REAL (Windstärke in Meter / Sekunde)</text:p>
      <text:p text:style-name="P55"><text:line-break/>BFT_TO_MS rechnet Windgeschwindigkeiten nach der Beaufort Skala in Meter Pro Sekunde um.</text:p>
      <text:p text:style-name="P55">Die Berechnung erfolgt nach der Formel:</text:p>
      <text:p text:style-name="P55">BFT_TO_MS = 0.836m/s * B^3/2 </text:p>
      <text:list xml:id="list33624496" text:continue-numbering="true" text:style-name="L1">
        <text:list-item>
          <text:list>
            <text:list-item>
              <text:h text:style-name="P217" text:outline-level="2"><text:alphabetical-index-mark-start text:id="IMark158104760"/>C_TO_F<text:alphabetical-index-mark-end text:id="IMark158104760"/></text:h>
            </text:list-item>
          </text:list>
        </text:list-item>
      </text:list>
      <text:p text:style-name="P22">Type<text:tab/>Funktion : REAL</text:p>
      <text:p text:style-name="P22"><text:span text:style-name="T16">Input</text:span><text:tab/>CELSIUS : REAL (Temperaturwert in °C)</text:p>
      <text:p text:style-name="P25"><draw:frame draw:style-name="fr4" draw:name="Grafik198" text:anchor-type="paragraph" svg:x="1.088cm" svg:y="0.651cm" svg:width="3.18cm" svg:height="1.12cm" draw:z-index="155"><draw:image xlink:href="Pictures/10000000000000F00000005504D66E8C.png" xlink:type="simple" xlink:show="embed" xlink:actuate="onLoad"/></draw:frame>Output<text:tab/>REAL (Temperaturwert in Fahrenheit)</text:p>
      <text:p text:style-name="P25"><text:line-break/>C_TO_F rechnet einen Temperaturwert von Celsius in Fahrenheit um.</text:p>
      <text:list xml:id="list33625272" text:continue-numbering="true" text:style-name="L1">
        <text:list-item>
          <text:list>
            <text:list-item>
              <text:h text:style-name="P225" text:outline-level="2"><text:alphabetical-index-mark-start text:id="IMark158104760"/>C_TO_K<text:alphabetical-index-mark-end text:id="IMark158104760"/></text:h>
            </text:list-item>
          </text:list>
        </text:list-item>
      </text:list>
      <text:p text:style-name="P22">Type<text:tab/>Funktion : REAL</text:p>
      <text:p text:style-name="P22"><text:span text:style-name="T16">Input</text:span><text:tab/>CELSIUS : REAL (Temperaturwert in °C)</text:p>
      <text:p text:style-name="P25">Output<text:tab/>REAL (Temperaturwert in Kelvin)</text:p>
      <text:p text:style-name="P25"><draw:frame draw:style-name="fr4" draw:name="Grafik199" text:anchor-type="paragraph" svg:x="1.263cm" svg:y="0.215cm" svg:width="3.18cm" svg:height="1.12cm" draw:z-index="156"><draw:image xlink:href="Pictures/10000000000000F0000000558F75C738.png" xlink:type="simple" xlink:show="embed" xlink:actuate="onLoad"/></draw:frame><text:soft-page-break/><text:line-break/>C_TO_K rechnet einen Temperaturwert von Celsius in Kelvin um.</text:p>
      <text:list xml:id="list33652719" text:continue-numbering="true" text:style-name="L1">
        <text:list-item>
          <text:list>
            <text:list-item>
              <text:h text:style-name="P225" text:outline-level="2"><text:alphabetical-index-mark-start text:id="IMark158104760"/>DEG_TO_DIR<text:alphabetical-index-mark-end text:id="IMark158104760"/></text:h>
            </text:list-item>
          </text:list>
        </text:list-item>
      </text:list>
      <text:p text:style-name="P22">Type<text:tab/>Funktion : STRING(3)</text:p>
      <text:p text:style-name="P22"><text:span text:style-name="T16">Input</text:span><text:tab/>DEG : INT (Himmelsrichtung in Grad)</text:p>
      <text:p text:style-name="P52"><text:tab/>N : INT (Maximale Länge der Zeichenkette)</text:p>
      <text:p text:style-name="P52"><text:tab/>L : INT (Spracheinstellung: 0 = Englisch, 1 = Deutsch)</text:p>
      <text:p text:style-name="P55"><draw:frame draw:style-name="fr4" draw:name="Grafik611" text:anchor-type="paragraph" svg:x="1.067cm" svg:y="0.688cm" svg:width="4.48cm" svg:height="1.79cm" draw:z-index="633"><draw:image xlink:href="Pictures/1000000000000153000000879BEBA3BC.png" xlink:type="simple" xlink:show="embed" xlink:actuate="onLoad"/></draw:frame>Output<text:tab/>STRING(3) (Kompassangaben)</text:p>
      <text:p text:style-name="P55"><text:line-break/>DEG_TO_DIR rechnet eine Himmelsrichtung (0..360 Grad) in Kompass Angaben um. Am Eingang DEG liegt die Himmelsrichtung in Grad an (0 = Nord, 90 = Ost, 180 = Süd und 270 = <text:span text:style-name="T24">Westen</text:span> ). Der Ausgang stellt die Himmelsrichtung als <text:span text:style-name="T16">String</text:span>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von Englischer Sprache ( L = 0) auf Deutsch ( L = 1).</text:p>
      <text:list xml:id="list33649121" text:continue-numbering="true" text:style-name="L1">
        <text:list-item>
          <text:list>
            <text:list-item>
              <text:h text:style-name="P225" text:outline-level="2"><text:alphabetical-index-mark-start text:id="IMark158104760"/>DIR_TO_DEG<text:alphabetical-index-mark-end text:id="IMark158104760"/></text:h>
            </text:list-item>
          </text:list>
        </text:list-item>
      </text:list>
      <text:p text:style-name="P22">Type<text:tab/>Funktion : INT</text:p>
      <text:p text:style-name="P52"><text:span text:style-name="T16">Input</text:span><text:tab/>DIR : STRING(3) (Himmelsrichtung in Kompassangaben)</text:p>
      <text:p text:style-name="P55"><draw:frame draw:style-name="fr4" draw:name="Grafik612" text:anchor-type="paragraph" svg:x="1.069cm" svg:y="0.667cm" svg:width="4.48cm" svg:height="0.99cm" draw:z-index="634"><draw:image xlink:href="Pictures/10000000000001530000004B33643117.png" xlink:type="simple" xlink:show="embed" xlink:actuate="onLoad"/></draw:frame>Output<text:tab/>INT (Himmelsrichtung in Grad)</text:p>
      <text:p text:style-name="P55"><text:soft-page-break/><text:line-break/>DIR_TO_DEG wandelt eine Himmelsrichtung in der Form NNO in Grad um. Es werden dabei bis zu 3 Stellen ausgewertet, was einer Auflösung von 22.5° entspricht. Der Ausgang ist vom Typ Integer. Der Eingang muss in Großbuchstaben vorliegen und Osten darf mit O oder E bezeichnet werden. Die Zeichenkette NO wird in 45° gewandelt.</text:p>
      <text:p text:style-name="P55">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40">N</text:p>
          </table:table-cell>
          <table:table-cell table:style-name="Tabelle36.A1" office:value-type="string">
            <text:p text:style-name="P140">0°</text:p>
          </table:table-cell>
          <table:table-cell table:style-name="Tabelle36.A1" office:value-type="string">
            <text:p text:style-name="P140">NNO, NNE</text:p>
          </table:table-cell>
          <table:table-cell table:style-name="Tabelle36.A1" office:value-type="string">
            <text:p text:style-name="P140">23°</text:p>
          </table:table-cell>
          <table:table-cell table:style-name="Tabelle36.A1" office:value-type="string">
            <text:p text:style-name="P140">NO</text:p>
          </table:table-cell>
          <table:table-cell table:style-name="Tabelle36.A1" office:value-type="string">
            <text:p text:style-name="P140">45°</text:p>
          </table:table-cell>
          <table:table-cell table:style-name="Tabelle36.A1" office:value-type="string">
            <text:p text:style-name="P140">ONO, ENE</text:p>
          </table:table-cell>
          <table:table-cell table:style-name="Tabelle36.H1" office:value-type="string">
            <text:p text:style-name="P122">68°</text:p>
          </table:table-cell>
        </table:table-row>
        <table:table-row>
          <table:table-cell table:style-name="Tabelle36.A2" office:value-type="string">
            <text:p text:style-name="P140">O</text:p>
          </table:table-cell>
          <table:table-cell table:style-name="Tabelle36.A2" office:value-type="string">
            <text:p text:style-name="P140">90°</text:p>
          </table:table-cell>
          <table:table-cell table:style-name="Tabelle36.A2" office:value-type="string">
            <text:p text:style-name="P140">OSO, ESE</text:p>
          </table:table-cell>
          <table:table-cell table:style-name="Tabelle36.A2" office:value-type="string">
            <text:p text:style-name="P140">113°</text:p>
          </table:table-cell>
          <table:table-cell table:style-name="Tabelle36.A2" office:value-type="string">
            <text:p text:style-name="P140">SO, SE</text:p>
          </table:table-cell>
          <table:table-cell table:style-name="Tabelle36.A2" office:value-type="string">
            <text:p text:style-name="P140">135°</text:p>
          </table:table-cell>
          <table:table-cell table:style-name="Tabelle36.A2" office:value-type="string">
            <text:p text:style-name="P140">SSO, SSE</text:p>
          </table:table-cell>
          <table:table-cell table:style-name="Tabelle36.H2" office:value-type="string">
            <text:p text:style-name="P140">158°</text:p>
          </table:table-cell>
        </table:table-row>
        <table:table-row>
          <table:table-cell table:style-name="Tabelle36.A2" office:value-type="string">
            <text:p text:style-name="P140">S</text:p>
          </table:table-cell>
          <table:table-cell table:style-name="Tabelle36.A2" office:value-type="string">
            <text:p text:style-name="P140">180°</text:p>
          </table:table-cell>
          <table:table-cell table:style-name="Tabelle36.A2" office:value-type="string">
            <text:p text:style-name="P140">SSW</text:p>
          </table:table-cell>
          <table:table-cell table:style-name="Tabelle36.A2" office:value-type="string">
            <text:p text:style-name="P140">203°</text:p>
          </table:table-cell>
          <table:table-cell table:style-name="Tabelle36.A2" office:value-type="string">
            <text:p text:style-name="P140">SW</text:p>
          </table:table-cell>
          <table:table-cell table:style-name="Tabelle36.A2" office:value-type="string">
            <text:p text:style-name="P140">225°</text:p>
          </table:table-cell>
          <table:table-cell table:style-name="Tabelle36.A2" office:value-type="string">
            <text:p text:style-name="P140">WSW</text:p>
          </table:table-cell>
          <table:table-cell table:style-name="Tabelle36.H2" office:value-type="string">
            <text:p text:style-name="P140">248°</text:p>
          </table:table-cell>
        </table:table-row>
        <table:table-row>
          <table:table-cell table:style-name="Tabelle36.A2" office:value-type="string">
            <text:p text:style-name="P140">W</text:p>
          </table:table-cell>
          <table:table-cell table:style-name="Tabelle36.A2" office:value-type="string">
            <text:p text:style-name="P140">270°</text:p>
          </table:table-cell>
          <table:table-cell table:style-name="Tabelle36.A2" office:value-type="string">
            <text:p text:style-name="P140">WNW</text:p>
          </table:table-cell>
          <table:table-cell table:style-name="Tabelle36.A2" office:value-type="string">
            <text:p text:style-name="P140">293°</text:p>
          </table:table-cell>
          <table:table-cell table:style-name="Tabelle36.A2" office:value-type="string">
            <text:p text:style-name="P140">NW</text:p>
          </table:table-cell>
          <table:table-cell table:style-name="Tabelle36.A2" office:value-type="string">
            <text:p text:style-name="P140">315°</text:p>
          </table:table-cell>
          <table:table-cell table:style-name="Tabelle36.A2" office:value-type="string">
            <text:p text:style-name="P140">NNW</text:p>
          </table:table-cell>
          <table:table-cell table:style-name="Tabelle36.H2" office:value-type="string">
            <text:p text:style-name="P140">338°</text:p>
          </table:table-cell>
        </table:table-row>
      </table:table>
      <text:p text:style-name="P55"/>
      <text:list xml:id="list33656835" text:continue-numbering="true" text:style-name="L1">
        <text:list-item>
          <text:list>
            <text:list-item>
              <text:h text:style-name="P217" text:outline-level="2"><text:alphabetical-index-mark-start text:id="IMark158104760"/>ENERGY<text:alphabetical-index-mark-end text:id="IMark158104760"/></text:h>
            </text:list-item>
          </text:list>
        </text:list-item>
      </text:list>
      <text:p text:style-name="Standard">Type<text:tab/><text:span text:style-name="T46">Funktionsbaustein</text:span></text:p>
      <text:p text:style-name="P22"><text:span text:style-name="T16">Input</text:span><text:tab/>J : REAL (Joule)</text:p>
      <text:p text:style-name="P22"><text:tab/>C : REAL (Kalorie)</text:p>
      <text:p text:style-name="P25"><text:tab/>WH : REAL (Wattstunden)</text:p>
      <text:p text:style-name="P22"><text:span text:style-name="T35">Output<text:tab/></text:span>YJ : REAL (Joule)</text:p>
      <text:p text:style-name="P22"><text:tab/>YC : REAL (Kalorie)</text:p>
      <text:p text:style-name="P25"><draw:frame draw:style-name="fr4" draw:name="Grafik293" text:anchor-type="paragraph" svg:x="1.182cm" svg:y="0.64cm" svg:width="2.731cm" svg:height="2.2cm" draw:z-index="267"><draw:image xlink:href="Pictures/10000000000000CE000000A6D5B6F9FD.png" xlink:type="simple" xlink:show="embed" xlink:actuate="onLoad"/></draw:frame><text:tab/>YWH : REAL (Wattstunden)</text:p>
      <text:p text:style-name="P25"><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J = 1 Ws (Watt * Sekunden) = 1 Nm (Newton * Meter)</text:p>
      <text:p text:style-name="P55">1 C = 4,1868 J = 1,163 * 10<text:span text:style-name="T39">-3 </text:span>Wh (Watt * Stunden)</text:p>
      <text:p text:style-name="P55"><text:soft-page-break/>1 Wh = 3,6 * 10<text:span text:style-name="T39">3</text:span> J = 860 C</text:p>
      <text:list xml:id="list33648057" text:continue-numbering="true" text:style-name="L1">
        <text:list-item>
          <text:list>
            <text:list-item>
              <text:h text:style-name="P217" text:outline-level="2"><text:alphabetical-index-mark-start text:id="IMark158104760"/>F_TO_C<text:alphabetical-index-mark-end text:id="IMark158104760"/></text:h>
            </text:list-item>
          </text:list>
        </text:list-item>
      </text:list>
      <text:p text:style-name="P22">Type<text:tab/>Funktion : REAL</text:p>
      <text:p text:style-name="P22"><text:span text:style-name="T16">Input</text:span><text:tab/>FAHRENHEIT : REAL (Temperaturwert in Fahrenheit)</text:p>
      <text:p text:style-name="P25"><draw:frame draw:style-name="fr4" draw:name="Grafik200" text:anchor-type="paragraph" svg:x="1.071cm" svg:y="0.695cm" svg:width="4.069cm" svg:height="1.12cm" draw:z-index="157"><draw:image xlink:href="Pictures/10000000000001340000005559DDD380.png" xlink:type="simple" xlink:show="embed" xlink:actuate="onLoad"/></draw:frame>Output<text:tab/>REAL (Temperaturwert in °C)</text:p>
      <text:p text:style-name="P25"><text:line-break/>F_TO_C rechnet einen Temperaturwert von Fahrenheit in °C um.</text:p>
      <text:list xml:id="list33632402" text:continue-numbering="true" text:style-name="L1">
        <text:list-item>
          <text:list>
            <text:list-item>
              <text:h text:style-name="P217" text:outline-level="2"><text:alphabetical-index-mark-start text:id="IMark158104760"/>F_TO_OM<text:alphabetical-index-mark-end text:id="IMark158104760"/></text:h>
            </text:list-item>
          </text:list>
        </text:list-item>
      </text:list>
      <text:p text:style-name="P22">Type<text:tab/>Funktion : REAL</text:p>
      <text:p text:style-name="P22"><text:span text:style-name="T16">Input</text:span><text:tab/>F : REAL (Frequenz in Hz)</text:p>
      <text:p text:style-name="P25"><draw:frame draw:style-name="fr4" draw:name="Grafik205" text:anchor-type="paragraph" svg:x="1.099cm" svg:y="0.674cm" svg:width="3.62cm" svg:height="1.12cm" draw:z-index="163"><draw:image xlink:href="Pictures/1000000000000112000000551E6829FB.png" xlink:type="simple" xlink:show="embed" xlink:actuate="onLoad"/></draw:frame>Output<text:tab/>REAL (Frequenz in Hz)</text:p>
      <text:p text:style-name="P25"><text:line-break/>F_TO_OM berechnet die Kreisfrequenz Omega aus der Frequenz in Hz.</text:p>
      <text:list xml:id="list33654683" text:continue-numbering="true" text:style-name="L1">
        <text:list-item>
          <text:list>
            <text:list-item>
              <text:h text:style-name="P217" text:outline-level="2"><text:alphabetical-index-mark-start text:id="IMark158104760"/>F_TO_PT<text:alphabetical-index-mark-end text:id="IMark158104760"/></text:h>
            </text:list-item>
          </text:list>
        </text:list-item>
      </text:list>
      <text:p text:style-name="P22">Type<text:tab/>Funktion : REAL</text:p>
      <text:p text:style-name="P22"><text:span text:style-name="T16">Input</text:span><text:tab/>F : REAL (Frequenz)</text:p>
      <text:p text:style-name="P25"><draw:frame draw:style-name="fr4" draw:name="Grafik201" text:anchor-type="paragraph" svg:x="1.078cm" svg:y="0.589cm" svg:width="3.62cm" svg:height="1.12cm" draw:z-index="158"><draw:image xlink:href="Pictures/100000000000011200000055790D84B5.png" xlink:type="simple" xlink:show="embed" xlink:actuate="onLoad"/></draw:frame>Output<text:tab/>TIME (Periodendauer)</text:p>
      <text:p text:style-name="P25"><text:soft-page-break/><text:line-break/>F_TO_PT rechnet einen Frequenzwert von Hz in die entsprechende Periodendauer um.</text:p>
      <text:list xml:id="list33638796" text:continue-numbering="true" text:style-name="L1">
        <text:list-item>
          <text:list>
            <text:list-item>
              <text:h text:style-name="P217" text:outline-level="2"><text:alphabetical-index-mark-start text:id="IMark158104760"/>KMH_TO_MS<text:alphabetical-index-mark-end text:id="IMark158104760"/></text:h>
            </text:list-item>
          </text:list>
        </text:list-item>
      </text:list>
      <text:p text:style-name="Standard">Type<text:tab/><text:span text:style-name="T38">Funktion</text:span> : REAL</text:p>
      <text:p text:style-name="P22"><text:span text:style-name="T16">Input</text:span><text:tab/>KMH : REAL (Geschwindigkeit in m/s)</text:p>
      <text:p text:style-name="P25"><draw:frame draw:style-name="fr4" draw:name="Grafik269" text:anchor-type="paragraph" svg:x="1.044cm" svg:y="0.674cm" svg:width="4.971cm" svg:height="1.12cm" draw:z-index="237"><draw:image xlink:href="Pictures/100000000000017800000055F595ABF9.png" xlink:type="simple" xlink:show="embed" xlink:actuate="onLoad"/></draw:frame>Output<text:tab/>TIME (Geschwindigkeit in km/h)</text:p>
      <text:p text:style-name="P25"><text:line-break/>KMH_TO_MS rechnet einem Geschwindigkeitswert von Kilometer / Stunde in Meter / Sekunde um.<text:tab/>KMH_TO_MS := KMH / 3.6</text:p>
      <text:list xml:id="list33652120" text:continue-numbering="true" text:style-name="L1">
        <text:list-item>
          <text:list>
            <text:list-item>
              <text:h text:style-name="P217" text:outline-level="2"><text:alphabetical-index-mark-start text:id="IMark158104760"/><text:alphabetical-index-mark-start text:id="IMark112316836"/>LENGTH<text:alphabetical-index-mark-end text:id="IMark112316836"/><text:alphabetical-index-mark-end text:id="IMark158104760"/></text:h>
            </text:list-item>
          </text:list>
        </text:list-item>
      </text:list>
      <text:p text:style-name="Standard"><text:span text:style-name="T46">Type</text:span><text:tab/><text:span text:style-name="T38">Funktionsbaustein</text:span></text:p>
      <text:p text:style-name="P22"><text:span text:style-name="T16">Input</text:span><text:tab/>M : REAL (Meter)</text:p>
      <text:p text:style-name="P22"><text:tab/>P : REAL (Typographischer Punkt)</text:p>
      <text:p text:style-name="P25"><text:tab/>IN : REAL (<text:span text:style-name="T16">Inch</text:span>)</text:p>
      <text:p text:style-name="P25"><text:tab/>FT : REAL (<text:span text:style-name="T16">Foot</text:span>)</text:p>
      <text:p text:style-name="P25"><text:tab/>YD : REAL (<text:span text:style-name="T16">Yard</text:span>)</text:p>
      <text:p text:style-name="P25"><text:tab/>MILE : REAL (<text:span text:style-name="T16">Mile</text:span>)</text:p>
      <text:p text:style-name="P25"><text:tab/>SM : REAL (Internationale Seemeile)</text:p>
      <text:p text:style-name="P25"><text:tab/>FM : REAL (<text:span text:style-name="T16">Fathom</text:span>)</text:p>
      <text:p text:style-name="P25">Output<text:tab/>YM : REAL (Meter)</text:p>
      <text:p text:style-name="P22"><text:tab/>YP : REAL (Typographischer Punkt)</text:p>
      <text:p text:style-name="P25"><text:tab/>YIN : REAL (<text:span text:style-name="T16">Inch</text:span>)</text:p>
      <text:p text:style-name="P25"><text:soft-page-break/><text:tab/>YFT : REAL (<text:span text:style-name="T16">Foot</text:span>)</text:p>
      <text:p text:style-name="P25"><text:tab/>YYD : REAL (<text:span text:style-name="T16">Yard</text:span>)</text:p>
      <text:p text:style-name="P25"><text:tab/>YMILE : REAL (<text:span text:style-name="T16">Mile</text:span>)</text:p>
      <text:p text:style-name="P25"><text:tab/>YSM : REAL (Internationale Seemeile)</text:p>
      <text:p text:style-name="P25"><draw:frame draw:style-name="fr4" draw:name="Grafik294" text:anchor-type="paragraph" svg:x="1.12cm" svg:y="0.661cm" svg:width="2.731cm" svg:height="4.44cm" draw:z-index="268"><draw:image xlink:href="Pictures/10000000000000CE00000150113EA753.png" xlink:type="simple" xlink:show="embed" xlink:actuate="onLoad"/></draw:frame><text:tab/>YFM : REAL (<text:span text:style-name="T16">Fathom</text:span>)</text:p>
      <text:p text:style-name="P25"><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P = 0,376065 mm (Einheit aus dem Druckereigewerbe)</text:p>
      <text:p text:style-name="P55">1 IN = 25,4 mm</text:p>
      <text:p text:style-name="P55">1 FT = 0,3048 m</text:p>
      <text:p text:style-name="P55">1 YD = 0,9144 m</text:p>
      <text:p text:style-name="P55">1 MILE = 1609,344 m</text:p>
      <text:p text:style-name="P55">1 SM = 1852 m</text:p>
      <text:p text:style-name="P55">1 FM = 1,829 m</text:p>
      <text:list xml:id="list33638166" text:continue-numbering="true" text:style-name="L1">
        <text:list-item>
          <text:list>
            <text:list-item>
              <text:h text:style-name="P217" text:outline-level="2"><text:alphabetical-index-mark-start text:id="IMark158104760"/>MS_TO_BFT<text:alphabetical-index-mark-end text:id="IMark158104760"/></text:h>
            </text:list-item>
          </text:list>
        </text:list-item>
      </text:list>
      <text:p text:style-name="Standard"><text:span text:style-name="T46">Type</text:span><text:tab/><text:span text:style-name="T46">Funktion</text:span></text:p>
      <text:p text:style-name="P22"><text:span text:style-name="T16">Input</text:span><text:tab/>MS : INT (Windstärke nach der Beaufort Skala)</text:p>
      <text:p text:style-name="P25"><draw:frame draw:style-name="fr4" draw:name="Grafik616" text:anchor-type="paragraph" svg:x="1.046cm" svg:y="0.725cm" svg:width="4.09cm" svg:height="0.99cm" draw:z-index="638"><draw:image xlink:href="Pictures/10000000000001350000004B88F853C2.png" xlink:type="simple" xlink:show="embed" xlink:actuate="onLoad"/></draw:frame>Output<text:tab/>MS : REAL (Windstärke in Meter / Sekunde)</text:p>
      <text:p text:style-name="P55"><text:soft-page-break/><text:line-break/>MS_TO_BFT rechnet Windgeschwindigkeiten von Meter / Sekunde in die Beaufort Skala um.</text:p>
      <text:p text:style-name="P55">Die Berechnung erfolgt nach der Formel:</text:p>
      <text:p text:style-name="P55">MS_TO_BFT = (MS * 1.196172)^2/3</text:p>
      <text:list xml:id="list33652792" text:continue-numbering="true" text:style-name="L1">
        <text:list-item>
          <text:list>
            <text:list-item>
              <text:h text:style-name="P217" text:outline-level="2"><text:alphabetical-index-mark-start text:id="IMark158104760"/>MS_TO_KMH<text:alphabetical-index-mark-end text:id="IMark158104760"/></text:h>
            </text:list-item>
          </text:list>
        </text:list-item>
      </text:list>
      <text:p text:style-name="P22">Type<text:tab/>Funktion : REAL</text:p>
      <text:p text:style-name="P22"><text:span text:style-name="T16">Input</text:span><text:tab/>KMH : REAL (Geschwindigkeit in km/h)</text:p>
      <text:p text:style-name="P25"><draw:frame draw:style-name="fr4" draw:name="Grafik270" text:anchor-type="paragraph" svg:x="1.053cm" svg:y="0.654cm" svg:width="4.971cm" svg:height="1.12cm" draw:z-index="238"><draw:image xlink:href="Pictures/1000000000000178000000550124726F.png" xlink:type="simple" xlink:show="embed" xlink:actuate="onLoad"/></draw:frame>Output<text:tab/>REAL (Geschwindigkeit in m/s)</text:p>
      <text:p text:style-name="Standard"><text:line-break/>MS_TO_KMH <text:span text:style-name="T38">rechnet</text:span> einem Geschwindigkeitswert von Meter / Sekunde in Kilometer / Stunde um.</text:p>
      <text:p text:style-name="P25">MS_TO_KMH := MS * 3.6</text:p>
      <text:list xml:id="list33652940" text:continue-numbering="true" text:style-name="L1">
        <text:list-item>
          <text:list>
            <text:list-item>
              <text:h text:style-name="P217" text:outline-level="2"><text:alphabetical-index-mark-start text:id="IMark158104760"/>K_TO_C<text:alphabetical-index-mark-end text:id="IMark158104760"/></text:h>
            </text:list-item>
          </text:list>
        </text:list-item>
      </text:list>
      <text:p text:style-name="P22">Type<text:tab/>Funktion : REAL</text:p>
      <text:p text:style-name="P22"><text:span text:style-name="T16">Input</text:span><text:tab/>KELVIN : REAL (Temperaturwert in Kelvin)</text:p>
      <text:p text:style-name="P25"><draw:frame draw:style-name="fr4" draw:name="Grafik202" text:anchor-type="paragraph" svg:x="1.005cm" svg:y="0.67cm" svg:width="3.18cm" svg:height="1.12cm" draw:z-index="159"><draw:image xlink:href="Pictures/10000000000000F00000005515398EAF.png" xlink:type="simple" xlink:show="embed" xlink:actuate="onLoad"/></draw:frame>Output<text:tab/>REAL (Temperaturwert in °C)</text:p>
      <text:p text:style-name="P25"><text:line-break/>K_TO_C rechnet einen Temperaturwert von Kelvin in °C um.</text:p>
      <text:list xml:id="list33649953" text:continue-numbering="true" text:style-name="L1">
        <text:list-item>
          <text:list>
            <text:list-item>
              <text:h text:style-name="P217" text:outline-level="2"><text:soft-page-break/><text:alphabetical-index-mark-start text:id="IMark158104760"/>OM_TO_F<text:alphabetical-index-mark-end text:id="IMark158104760"/></text:h>
            </text:list-item>
          </text:list>
        </text:list-item>
      </text:list>
      <text:p text:style-name="P22">Type<text:tab/>Funktion : REAL</text:p>
      <text:p text:style-name="P22"><text:span text:style-name="T16">Input</text:span><text:tab/>OM : REAL (Kreisfrequenz Omega)</text:p>
      <text:p text:style-name="P25"><draw:frame draw:style-name="fr4" draw:name="Grafik77" text:anchor-type="paragraph" svg:x="1.028cm" svg:y="0.771cm" svg:width="3.62cm" svg:height="1.12cm" draw:z-index="162"><draw:image xlink:href="Pictures/100000000000011200000055E2002E5E.png" xlink:type="simple" xlink:show="embed" xlink:actuate="onLoad"/></draw:frame>Output<text:tab/>REAL (Frequenz in Hz)</text:p>
      <text:p text:style-name="P25"><text:line-break/>OM_TO_F berechnet die Frequenz in Hz aus der Kreisfrequenz Omega.</text:p>
      <text:list xml:id="list33654828" text:continue-numbering="true" text:style-name="L1">
        <text:list-item>
          <text:list>
            <text:list-item>
              <text:h text:style-name="P217" text:outline-level="2"><text:alphabetical-index-mark-start text:id="IMark158104760"/>PRESSURE<text:alphabetical-index-mark-end text:id="IMark158104760"/></text:h>
            </text:list-item>
          </text:list>
        </text:list-item>
      </text:list>
      <text:p text:style-name="Standard">Type<text:tab/><text:span text:style-name="T46">Funktionsbaustein</text:span></text:p>
      <text:p text:style-name="P22"><text:span text:style-name="T16">Input</text:span><text:tab/>MWS : REAL (Wassersäule in Meter)</text:p>
      <text:p text:style-name="P170"><text:tab/>TORR : REAL (Torr Bzw. Quecksilbersäule in mm)</text:p>
      <text:p text:style-name="P25"><text:tab/>ATT : REAL (Atmosphäre technisch)</text:p>
      <text:p text:style-name="P25"><text:tab/>ATM : REAL (Atmosphäre physikalisch)</text:p>
      <text:p text:style-name="P25"><text:tab/>PA : REAL (Pascal)</text:p>
      <text:p text:style-name="P25"><text:tab/>BAR : REAL (Bar)</text:p>
      <text:p text:style-name="P25">Output<text:tab/>YMWS : REAL (Wassersäule in Meter)</text:p>
      <text:p text:style-name="P77"><text:span text:style-name="T6"><text:tab/></text:span><text:span text:style-name="T38">YTORR</text:span> : <text:span text:style-name="T46">REAL</text:span> (Torr Bzw. Quecksilbersäule in mm)</text:p>
      <text:p text:style-name="P25"><text:tab/>YATT : REAL (Atmosphäre technisch)</text:p>
      <text:p text:style-name="P25"><text:tab/>YATM : REAL (Atmosphäre physikalisch)</text:p>
      <text:p text:style-name="P25"><text:tab/>YPA : REAL (Pascal)</text:p>
      <text:p text:style-name="P25"><draw:frame draw:style-name="fr4" draw:name="Grafik295" text:anchor-type="paragraph" svg:x="1.602cm" svg:y="0.859cm" svg:width="2.731cm" svg:height="3.54cm" draw:z-index="269"><draw:image xlink:href="Pictures/10000000000000CE0000010C1A9B4687.png" xlink:type="simple" xlink:show="embed" xlink:actuate="onLoad"/></draw:frame><text:tab/>YBAR : REAL (Bar)</text:p>
      <text:p text:style-name="P25"><text:soft-page-break/><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text:line-break/>1 MWS = 1 Meter Wassersäule = 0,0980665 Bar</text:p>
      <text:p text:style-name="P55">1 TORR = 1 mm Quecksilbersäule = 0,133322 Bar = 101325 / 760 Pa</text:p>
      <text:p text:style-name="P55">1 ATT = 1 kp / cm² = 0,980665 Bar</text:p>
      <text:p text:style-name="P55">1 ATM = 1,01325 Bar</text:p>
      <text:p text:style-name="P55">1 PA = 1 N / m²</text:p>
      <text:p text:style-name="P55">1 BAR = 10<text:span text:style-name="T39">5</text:span> Pa</text:p>
      <text:list xml:id="list33638519" text:continue-numbering="true" text:style-name="L1">
        <text:list-item>
          <text:list>
            <text:list-item>
              <text:h text:style-name="P217" text:outline-level="2"><text:alphabetical-index-mark-start text:id="IMark158104760"/>PT_TO_F<text:alphabetical-index-mark-end text:id="IMark158104760"/></text:h>
            </text:list-item>
          </text:list>
        </text:list-item>
      </text:list>
      <text:p text:style-name="P22">Type<text:tab/>Funktion : REAL</text:p>
      <text:p text:style-name="P22"><text:span text:style-name="T16">Input</text:span><text:tab/>PT : TIME (Periodendauer in Sekunden)</text:p>
      <text:p text:style-name="P25"><draw:frame draw:style-name="fr4" draw:name="Grafik203" text:anchor-type="paragraph" svg:x="0.984cm" svg:y="0.693cm" svg:width="3.62cm" svg:height="1.12cm" draw:z-index="160"><draw:image xlink:href="Pictures/1000000000000112000000554F2ADE3A.png" xlink:type="simple" xlink:show="embed" xlink:actuate="onLoad"/></draw:frame>Output<text:tab/>REAL (Frequenz in Hz)</text:p>
      <text:p text:style-name="P25"><text:line-break/>PT_TO_F rechnet eine Periodendauer in Sekunden in die entsprechende Frequenz in Hz um.</text:p>
      <text:list xml:id="list33652505" text:continue-numbering="true" text:style-name="L1">
        <text:list-item>
          <text:list>
            <text:list-item>
              <text:h text:style-name="P217" text:outline-level="2"><text:alphabetical-index-mark-start text:id="IMark158104760"/>SPEED<text:alphabetical-index-mark-end text:id="IMark158104760"/></text:h>
            </text:list-item>
          </text:list>
        </text:list-item>
      </text:list>
      <text:p text:style-name="Standard"><text:span text:style-name="T46">Type</text:span><text:tab/><text:span text:style-name="T38">Funktionsbaustein</text:span></text:p>
      <text:p text:style-name="P22"><text:span text:style-name="T16">Input</text:span><text:tab/>MS : REAL (Meter / Sekunde)</text:p>
      <text:p text:style-name="P22"><text:tab/>KMH : REAL (Kilometer / Stunde)</text:p>
      <text:p text:style-name="P25"><text:tab/>KN : REAL (Knoten = Seemeilen / Stunde)</text:p>
      <text:p text:style-name="P25"><text:tab/>MH : REAL (Meilen / Stunde)</text:p>
      <text:p text:style-name="P25"><text:soft-page-break/>Output<text:tab/>YMS : REAL (Meter / Sekunde)</text:p>
      <text:p text:style-name="P77"><text:span text:style-name="T6"><text:tab/></text:span><text:span text:style-name="T38">YKMH</text:span> : <text:span text:style-name="T38">REAL</text:span> (Kilometer / Stunde)</text:p>
      <text:p text:style-name="P25"><text:tab/>YKN : REAL (Knoten = Seemeilen / Stunde)</text:p>
      <text:p text:style-name="P25"><draw:frame draw:style-name="fr4" draw:name="Grafik296" text:anchor-type="paragraph" svg:x="1.048cm" svg:y="0.679cm" svg:width="2.731cm" svg:height="2.649cm" draw:z-index="291"><draw:image xlink:href="Pictures/10000000000000CE000000C86287EEDC.png" xlink:type="simple" xlink:show="embed" xlink:actuate="onLoad"/></draw:frame><text:tab/>YMH : REAL (Meilen / Stunde)</text:p>
      <text:p text:style-name="P25"><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ms = Meter / Sekunde = 3,6 km/h</text:p>
      <text:p text:style-name="P55">1 kmh = Kilometer / Stunde = 1/3,6 m/s</text:p>
      <text:p text:style-name="P55">1 kn = Knoten = 1 Seemeile / Stunde = 0,5144 m/s</text:p>
      <text:p text:style-name="P55">1 mh = Meilen / Stunde = 0,44704 m/s</text:p>
      <text:list xml:id="list33655207" text:continue-numbering="true" text:style-name="L1">
        <text:list-item>
          <text:list>
            <text:list-item>
              <text:h text:style-name="P217" text:outline-level="2"><text:alphabetical-index-mark-start text:id="IMark158104760"/>TEMPERATURE<text:alphabetical-index-mark-end text:id="IMark158104760"/></text:h>
            </text:list-item>
          </text:list>
        </text:list-item>
      </text:list>
      <text:p text:style-name="Standard">Type<text:tab/><text:span text:style-name="T46">Funktionsbaustein</text:span></text:p>
      <text:p text:style-name="P22"><text:span text:style-name="T16">Input</text:span><text:tab/>K : REAL (<text:span text:style-name="T35">Temperatur nach Kelvin Skala</text:span>)</text:p>
      <text:p text:style-name="P52"><text:tab/>C : REAL (<text:span text:style-name="T35">Temperatur nach Celsius Skala</text:span>)</text:p>
      <text:p text:style-name="P25"><text:tab/>F : REAL (Temperatur nach Fahrenheit Skala)</text:p>
      <text:p text:style-name="P25"><text:tab/>RE : REAL (Temperatur nach Reaumur Skala)</text:p>
      <text:p text:style-name="P55"><text:tab/>RA : Real (Temperatur nach Rankine Skala)</text:p>
      <text:p text:style-name="P25">Output<text:tab/>YK : REAL (Temperatur nach Kelvin Skala)</text:p>
      <text:p text:style-name="P52"><text:tab/>YC : REAL (<text:span text:style-name="T35">Temperatur nach Celsius Skala</text:span>)</text:p>
      <text:p text:style-name="P25"><text:tab/>YF : REAL (Temperatur nach Fahrenheit Skala)</text:p>
      <text:p text:style-name="P25"><text:tab/>YRE : REAL (Temperatur nach Reaumur Skala)</text:p>
      <text:p text:style-name="P55"><draw:frame draw:style-name="fr4" draw:name="Grafik449" text:anchor-type="paragraph" svg:x="1.155cm" svg:y="0.667cm" svg:width="3.069cm" svg:height="2.709cm" draw:z-index="456"><draw:image xlink:href="Pictures/10000000000000E8000000CD5DF53F39.png" xlink:type="simple" xlink:show="embed" xlink:actuate="onLoad"/></draw:frame><text:tab/>YRA : Real (Temperatur nach Rankine Skala)</text:p>
      <text:p text:style-name="P25"><text:soft-page-break/><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K = 273.15 °C</text:p>
      <text:p text:style-name="P55">1 °C = 273.15 K</text:p>
      <text:p text:style-name="P77"><text:span text:style-name="T4">1 °F = °C *</text:span> 1.8 + 32</text:p>
      <text:p text:style-name="P77">1 Re = °C * 0.8</text:p>
      <text:p text:style-name="P77">1 Ra = K * 1.8</text:p>
      <text:list xml:id="list33644520" text:continue-numbering="true" text:style-name="L1">
        <text:list-item>
          <text:h text:style-name="P211" text:outline-level="1">Regelungstechnik</text:h>
        </text:list-item>
      </text:list>
      <text:p text:style-name="P16"/>
      <text:list xml:id="list33634283" text:continue-numbering="true" text:style-name="L1">
        <text:list-item>
          <text:list>
            <text:list-item>
              <text:h text:style-name="P217" text:outline-level="2">Einleitung</text:h>
            </text:list-item>
          </text:list>
        </text:list-item>
      </text:list>
      <text:p text:style-name="P27">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 text:style-name="T16">Tasks</text:span> die Zykluszeit schwanken kann und ein Regler mit fixer Zykluszeit ungenaue Ausgangswerte erzeugt. Der Anwender hat beim Einsatz sicherzustellen das die Zykluszeit der Task entsprechend den Anforderungen der Regelstrecke eingestellt ist.</text:p>
      <text:p text:style-name="P56">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39">TYP</text:p>
          </table:table-cell>
          <table:table-cell table:style-name="Tabelle35.A1" office:value-type="string">
            <text:p text:style-name="P139">Name</text:p>
          </table:table-cell>
          <table:table-cell table:style-name="Tabelle35.A1" office:value-type="string">
            <text:p text:style-name="P139">Parameter</text:p>
          </table:table-cell>
          <table:table-cell table:style-name="Tabelle35.A1" office:value-type="string">
            <text:p text:style-name="P139">Übertragungsfunktion</text:p>
          </table:table-cell>
          <table:table-cell table:style-name="Tabelle35.E1" office:value-type="string">
            <text:p text:style-name="P139">Berechnung</text:p>
          </table:table-cell>
        </table:table-row>
        <table:table-row>
          <table:table-cell table:style-name="Tabelle35.A2" office:value-type="string">
            <text:p text:style-name="P139">P</text:p>
          </table:table-cell>
          <table:table-cell table:style-name="Tabelle35.A2" office:value-type="string">
            <text:p text:style-name="P139">Proportionalglied</text:p>
          </table:table-cell>
          <table:table-cell table:style-name="Tabelle35.A2" office:value-type="string">
            <text:p text:style-name="P139">KP</text:p>
          </table:table-cell>
          <table:table-cell table:style-name="Tabelle35.A2" office:value-type="string">
            <text:p text:style-name="P139">KP</text:p>
          </table:table-cell>
          <table:table-cell table:style-name="Tabelle35.E2" office:value-type="string">
            <text:p text:style-name="P139">Y = X * KP</text:p>
          </table:table-cell>
        </table:table-row>
        <table:table-row>
          <table:table-cell table:style-name="Tabelle35.A2" office:value-type="string">
            <text:p text:style-name="P139">I</text:p>
          </table:table-cell>
          <table:table-cell table:style-name="Tabelle35.A2" office:value-type="string">
            <text:p text:style-name="P139">Integrator</text:p>
          </table:table-cell>
          <table:table-cell table:style-name="Tabelle35.A2" office:value-type="string">
            <text:p text:style-name="P139">KI</text:p>
          </table:table-cell>
          <table:table-cell table:style-name="Tabelle35.A2" office:value-type="string">
            <text:p text:style-name="P139"/>
          </table:table-cell>
          <table:table-cell table:style-name="Tabelle35.E2" office:value-type="string">
            <text:p text:style-name="P139">Y = Ya + X * KI * <text:s/>ΔT</text:p>
          </table:table-cell>
        </table:table-row>
        <table:table-row>
          <table:table-cell table:style-name="Tabelle35.A2" office:value-type="string">
            <text:p text:style-name="P139">D</text:p>
          </table:table-cell>
          <table:table-cell table:style-name="Tabelle35.A2" office:value-type="string">
            <text:p text:style-name="P139">Differentiator</text:p>
          </table:table-cell>
          <table:table-cell table:style-name="Tabelle35.A2" office:value-type="string">
            <text:p text:style-name="P139">KD</text:p>
          </table:table-cell>
          <table:table-cell table:style-name="Tabelle35.A2" office:value-type="string">
            <text:p text:style-name="P139"/>
          </table:table-cell>
          <table:table-cell table:style-name="Tabelle35.E2" office:value-type="string">
            <text:p text:style-name="P139">Y = KD * ΔX / ΔT</text:p>
          </table:table-cell>
        </table:table-row>
        <table:table-row>
          <table:table-cell table:style-name="Tabelle35.A2" office:value-type="string">
            <text:p text:style-name="P139">PT1</text:p>
          </table:table-cell>
          <table:table-cell table:style-name="Tabelle35.A2" office:value-type="string">
            <text:p text:style-name="P139">Tiefpaß 1.Ordnung</text:p>
          </table:table-cell>
          <table:table-cell table:style-name="Tabelle35.A2" office:value-type="string">
            <text:p text:style-name="P139">T1</text:p>
          </table:table-cell>
          <table:table-cell table:style-name="Tabelle35.A2" office:value-type="string">
            <text:p text:style-name="P139">KP / ( 1 + T1s)</text:p>
          </table:table-cell>
          <table:table-cell table:style-name="Tabelle35.E2" office:value-type="string">
            <text:p text:style-name="P139"/>
          </table:table-cell>
        </table:table-row>
        <table:table-row>
          <table:table-cell table:style-name="Tabelle35.A2" office:value-type="string">
            <text:p text:style-name="P139">PT2</text:p>
          </table:table-cell>
          <table:table-cell table:style-name="Tabelle35.A2" office:value-type="string">
            <text:p text:style-name="P139">Tiefpaß 2.Ordnung</text:p>
          </table:table-cell>
          <table:table-cell table:style-name="Tabelle35.A2" office:value-type="string">
            <text:p text:style-name="P139">T1, T2</text:p>
          </table:table-cell>
          <table:table-cell table:style-name="Tabelle35.A2" office:value-type="string">
            <text:p text:style-name="P139"/>
          </table:table-cell>
          <table:table-cell table:style-name="Tabelle35.E2" office:value-type="string">
            <text:p text:style-name="P139"/>
          </table:table-cell>
        </table:table-row>
        <table:table-row>
          <table:table-cell table:style-name="Tabelle35.A2" office:value-type="string">
            <text:p text:style-name="P139">PI</text:p>
          </table:table-cell>
          <table:table-cell table:style-name="Tabelle35.A2" office:value-type="string">
            <text:p text:style-name="P139">PI-Glied</text:p>
          </table:table-cell>
          <table:table-cell table:style-name="Tabelle35.A2" office:value-type="string">
            <text:p text:style-name="P139">KP, KI</text:p>
          </table:table-cell>
          <table:table-cell table:style-name="Tabelle35.A2" office:value-type="string">
            <text:p text:style-name="P139">KP (1 + 1/TNs) </text:p>
          </table:table-cell>
          <table:table-cell table:style-name="Tabelle35.E2" office:value-type="string">
            <text:p text:style-name="P139">Y = Ya + KP ((1 + ΔT/TN)X - Xa)</text:p>
          </table:table-cell>
        </table:table-row>
        <table:table-row>
          <table:table-cell table:style-name="Tabelle35.A2" office:value-type="string">
            <text:p text:style-name="P139">PD</text:p>
          </table:table-cell>
          <table:table-cell table:style-name="Tabelle35.A2" office:value-type="string">
            <text:p text:style-name="P139">PD-Glied</text:p>
          </table:table-cell>
          <table:table-cell table:style-name="Tabelle35.A2" office:value-type="string">
            <text:p text:style-name="P139">KP, KD</text:p>
          </table:table-cell>
          <table:table-cell table:style-name="Tabelle35.A2" office:value-type="string">
            <text:p text:style-name="P139">KP (1 + TDs)</text:p>
          </table:table-cell>
          <table:table-cell table:style-name="Tabelle35.E2" office:value-type="string">
            <text:p text:style-name="P139"/>
          </table:table-cell>
        </table:table-row>
        <table:table-row>
          <table:table-cell table:style-name="Tabelle35.A2" office:value-type="string">
            <text:p text:style-name="P139">PDT1</text:p>
          </table:table-cell>
          <table:table-cell table:style-name="Tabelle35.A2" office:value-type="string">
            <text:p text:style-name="P139">PD-Glied, Verzögert</text:p>
          </table:table-cell>
          <table:table-cell table:style-name="Tabelle35.A2" office:value-type="string">
            <text:p text:style-name="P139">KP, TV, T1</text:p>
          </table:table-cell>
          <table:table-cell table:style-name="Tabelle35.A2" office:value-type="string">
            <text:p text:style-name="P139">KP (1 + TVs/(1+T1s))</text:p>
          </table:table-cell>
          <table:table-cell table:style-name="Tabelle35.E2" office:value-type="string">
            <text:p text:style-name="P139"/>
          </table:table-cell>
        </table:table-row>
        <table:table-row>
          <table:table-cell table:style-name="Tabelle35.A2" office:value-type="string">
            <text:p text:style-name="P139">PID</text:p>
          </table:table-cell>
          <table:table-cell table:style-name="Tabelle35.A2" office:value-type="string">
            <text:p text:style-name="P139">PID-Glied</text:p>
          </table:table-cell>
          <table:table-cell table:style-name="Tabelle35.A2" office:value-type="string">
            <text:p text:style-name="P139">KP, TN, TV</text:p>
          </table:table-cell>
          <table:table-cell table:style-name="Tabelle35.A2" office:value-type="string">
            <text:p text:style-name="P139">KP (1 + 1/TNs + TVs</text:p>
          </table:table-cell>
          <table:table-cell table:style-name="Tabelle35.E2" office:value-type="string">
            <text:p text:style-name="P139"/>
          </table:table-cell>
        </table:table-row>
        <table:table-row>
          <table:table-cell table:style-name="Tabelle35.A2" office:value-type="string">
            <text:p text:style-name="P139">PIDT1</text:p>
          </table:table-cell>
          <table:table-cell table:style-name="Tabelle35.A2" office:value-type="string">
            <text:p text:style-name="P139">PID-Glied, Verzögert</text:p>
          </table:table-cell>
          <table:table-cell table:style-name="Tabelle35.A2" office:value-type="string">
            <text:p text:style-name="P139">KP, TN, TV, T1</text:p>
          </table:table-cell>
          <table:table-cell table:style-name="Tabelle35.A2" office:value-type="string">
            <text:p text:style-name="P139">KP (1 + 1/TNs + TVs/(1+T1s))</text:p>
          </table:table-cell>
          <table:table-cell table:style-name="Tabelle35.E2" office:value-type="string">
            <text:p text:style-name="P139"/>
          </table:table-cell>
        </table:table-row>
      </table:table>
      <text:p text:style-name="P56"/>
      <text:p text:style-name="P56">Wind-<text:span text:style-name="T16">Up</text:span>:<text:line-break/>Der Wind-<text:span text:style-name="T16">Up</text:span> Effekt betrifft alle Regler mit I-Anteil. Da reale Regler einen eingeschränkten Stellbereich haben würde der <text:span text:style-name="T16">Integrator</text:span> bei großen <text:s/>Regelabweichungen und erreichen eines Ausgangslimits stets weiter anwachsen. Würde nach einiger Zeit der Prozesswert den Sollwert übersteigen so müsste abgewartet werden bis der <text:span text:style-name="T16">In</text:span><text:soft-page-break/><text:span text:style-name="T16">te</text:span><text:span text:style-name="T16">grator</text:span> seinen hohen Wert wieder abgebaut hat. Dies führt zu einem unerwünschten und ungünstigen Verhalten des Reglers. Der Regler würde für die Zeit aussetzen die der <text:span text:style-name="T16">Integrator</text:span> benötigt seinen hohen Wert wieder abzubauen, was um so länger wäre je länger der Regler in der Begrenzung war. Deshalb sind bei Reglern mit I-Anteil Anti <text:span text:style-name="T16">Wind-Up</text:span> Maßnahmen notwendig.</text:p>
      <text:p text:style-name="P56">Die einfachste Maßnahme zur Verhinderung des Wind-<text:span text:style-name="T16">Up</text:span> ist den Integrator bei erreichen eines <text:span text:style-name="T16">Limits</text:span> anzuhalten und erst bei Rückkehr in den Arbeitsbereich mit dem letzten Wert des <text:span text:style-name="T16">Integrators</text:span>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p>
      <text:p text:style-name="P56">Eine verfeinerte Anti <text:span text:style-name="T16">Wind-Up</text:span> Maßnahme ist ein Verfahren das den Ausgangswert des Integrators auf einen Wert begrenzt der zusammen mit den anderen Regelanteilen exakt zu dem Ausgangslimit führt. Dieses Verfahren hat den Vorteil das bei eintritt in den Arbeitsbereich der Regler ohne Zeitverzug sofort Einsatzfähig ist und reagieren kann. Bausteine der Bibliothek die mit diesem verbesserten Verfahren arbeiten sind mit einen WL am Ende gekennzeichnet.</text:p>
      <text:list xml:id="list33630795" text:continue-numbering="true" text:style-name="L1">
        <text:list-item>
          <text:list>
            <text:list-item>
              <text:h text:style-name="P217" text:outline-level="2"><text:alphabetical-index-mark-start text:id="IMark158104760"/>CONTROL_SET1<text:alphabetical-index-mark-end text:id="IMark158104760"/></text:h>
            </text:list-item>
          </text:list>
        </text:list-item>
      </text:list>
      <text:p text:style-name="P204"><text:span text:style-name="T46">Type</text:span><text:tab/><text:span text:style-name="T46">Funktionsbaustein</text:span></text:p>
      <text:p text:style-name="P22"><text:span text:style-name="T16">Input</text:span><text:tab/>KT : REAL (Kritische Verstärkung)</text:p>
      <text:p text:style-name="P22"><text:tab/>TT : REAL (<text:span text:style-name="T24">Periodendauer</text:span><text:span text:style-name="T16"> </text:span><text:span text:style-name="T24">der</text:span><text:span text:style-name="T16"> </text:span><text:span text:style-name="T24">kritischen</text:span><text:span text:style-name="T16"> </text:span><text:span text:style-name="T24">Schwingung</text:span>)</text:p>
      <text:p text:style-name="P52"><text:tab/>PI : BOOL (TRUE wenn Parameter für PI Regler bestimmt sind)</text:p>
      <text:p text:style-name="P52"><text:tab/>PID : BOOL (TRUE wenn Parameter für PID Regler bestimmt sind)</text:p>
      <text:p text:style-name="P52"><text:span text:style-name="T16">Config</text:span><text:tab/>P_K : REAL := 0.5 (Vorgabewert KP für P Regler)</text:p>
      <text:p text:style-name="P52"><text:tab/>PI_K : REAL := 0.45 ( Vorgabewert KP für PI Regler</text:p>
      <text:p text:style-name="P52"><text:tab/>PI_TN : REAL := 0.83 (Vorgabewert TN für PI Regler)</text:p>
      <text:p text:style-name="P52"><text:tab/>PID_K : REAL := 0.6 (Vorgabewert KP für PID Regler)</text:p>
      <text:p text:style-name="P52"><text:tab/>PID_TN : REAL := 0.5 (Vorgabewert TN für PID Regler)</text:p>
      <text:p text:style-name="P52"><text:tab/>PID_TV : REAL := 0.125 (Vorgabewert TV für PID Regler)</text:p>
      <text:p text:style-name="P22">Output<text:tab/>KP : <text:span text:style-name="T35">REAL (Regelverstärkung KP)</text:span></text:p>
      <text:p text:style-name="P55"><text:tab/>TN : REAL (Nachstellzeit des Integrators)</text:p>
      <text:p text:style-name="P55"><text:tab/>TV : REAL (Vorhaltezeit des Differenzierers)</text:p>
      <text:p text:style-name="P52"><text:span text:style-name="T35"><text:tab/>KI : REAL ( </text:span><text:span text:style-name="T25">Verstärkungsfaktor</text:span><text:span text:style-name="T35"> des Integrators)</text:span></text:p>
      <text:p text:style-name="P52"><draw:frame draw:style-name="fr4" draw:name="Grafik382" text:anchor-type="paragraph" svg:x="1.245cm" svg:y="0.623cm" svg:width="3.29cm" svg:height="2.709cm" draw:z-index="376"><draw:image xlink:href="Pictures/10000000000000F9000000CDD2E30EEF.png" xlink:type="simple" xlink:show="embed" xlink:actuate="onLoad"/></draw:frame><text:soft-page-break/><text:span text:style-name="T35"><text:tab/>KD : REAL (</text:span><text:span text:style-name="T25">Verstärkungsfaktor</text:span><text:span text:style-name="T35"> des </text:span><text:span text:style-name="T25">Differenzierers</text:span><text:span text:style-name="T35">)</text:span></text:p>
      <text:p text:style-name="P52"><text:span text:style-name="T35"><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35">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11">Reglertyp</text:p>
          </table:table-cell>
          <table:table-cell table:style-name="Tabelle25.A1" office:value-type="string">
            <text:p text:style-name="P98">PI</text:p>
          </table:table-cell>
          <table:table-cell table:style-name="Tabelle25.A1" office:value-type="string">
            <text:p text:style-name="P98">PID</text:p>
          </table:table-cell>
          <table:table-cell table:style-name="Tabelle25.A1" office:value-type="string">
            <text:p text:style-name="P98">KP</text:p>
          </table:table-cell>
          <table:table-cell table:style-name="Tabelle25.A1" office:value-type="string">
            <text:p text:style-name="P98">TN</text:p>
          </table:table-cell>
          <table:table-cell table:style-name="Tabelle25.F1" office:value-type="string">
            <text:p text:style-name="P98">TV</text:p>
          </table:table-cell>
        </table:table-row>
        <table:table-row>
          <table:table-cell table:style-name="Tabelle25.A2" office:value-type="string">
            <text:p text:style-name="P98">P-<text:span text:style-name="T24">Regler</text:span></text:p>
          </table:table-cell>
          <table:table-cell table:style-name="Tabelle25.A2" office:value-type="string">
            <text:p text:style-name="P98">0</text:p>
          </table:table-cell>
          <table:table-cell table:style-name="Tabelle25.A2" office:value-type="string">
            <text:p text:style-name="P98">0</text:p>
          </table:table-cell>
          <table:table-cell table:style-name="Tabelle25.A2" office:value-type="string">
            <text:p text:style-name="P98">P_K * KT</text:p>
          </table:table-cell>
          <table:table-cell table:style-name="Tabelle25.A2" office:value-type="string">
            <text:p text:style-name="P98"/>
          </table:table-cell>
          <table:table-cell table:style-name="Tabelle25.F2" office:value-type="string">
            <text:p text:style-name="P98"/>
          </table:table-cell>
        </table:table-row>
        <table:table-row>
          <table:table-cell table:style-name="Tabelle25.A2" office:value-type="string">
            <text:p text:style-name="P98">PI-<text:span text:style-name="T24">Regler</text:span></text:p>
          </table:table-cell>
          <table:table-cell table:style-name="Tabelle25.A2" office:value-type="string">
            <text:p text:style-name="P98">1</text:p>
          </table:table-cell>
          <table:table-cell table:style-name="Tabelle25.A2" office:value-type="string">
            <text:p text:style-name="P98">0</text:p>
          </table:table-cell>
          <table:table-cell table:style-name="Tabelle25.A2" office:value-type="string">
            <text:p text:style-name="P98">PI_K * KT</text:p>
          </table:table-cell>
          <table:table-cell table:style-name="Tabelle25.A2" office:value-type="string">
            <text:p text:style-name="P98">PI_TN * TT</text:p>
          </table:table-cell>
          <table:table-cell table:style-name="Tabelle25.F2" office:value-type="string">
            <text:p text:style-name="P98"/>
          </table:table-cell>
        </table:table-row>
        <table:table-row>
          <table:table-cell table:style-name="Tabelle25.A2" office:value-type="string">
            <text:p text:style-name="P98">PID-<text:span text:style-name="T24">Regler</text:span></text:p>
          </table:table-cell>
          <table:table-cell table:style-name="Tabelle25.A2" office:value-type="string">
            <text:p text:style-name="P98">0</text:p>
          </table:table-cell>
          <table:table-cell table:style-name="Tabelle25.A2" office:value-type="string">
            <text:p text:style-name="P98">1</text:p>
          </table:table-cell>
          <table:table-cell table:style-name="Tabelle25.A2" office:value-type="string">
            <text:p text:style-name="P98">PID_K * KT</text:p>
          </table:table-cell>
          <table:table-cell table:style-name="Tabelle25.A2" office:value-type="string">
            <text:p text:style-name="P98">PID_TN * TT</text:p>
          </table:table-cell>
          <table:table-cell table:style-name="Tabelle25.F2" office:value-type="string">
            <text:p text:style-name="P98">PID_TV * TT</text:p>
          </table:table-cell>
        </table:table-row>
      </table:table>
      <text:p text:style-name="P59"/>
      <text:p text:style-name="P59">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1">Reglertyp</text:p>
          </table:table-cell>
          <table:table-cell table:style-name="Tabelle26.A1" office:value-type="string">
            <text:p text:style-name="P98">PI</text:p>
          </table:table-cell>
          <table:table-cell table:style-name="Tabelle26.A1" office:value-type="string">
            <text:p text:style-name="P98">PID</text:p>
          </table:table-cell>
          <table:table-cell table:style-name="Tabelle26.A1" office:value-type="string">
            <text:p text:style-name="P98">KP</text:p>
          </table:table-cell>
          <table:table-cell table:style-name="Tabelle26.A1" office:value-type="string">
            <text:p text:style-name="P98">TN</text:p>
          </table:table-cell>
          <table:table-cell table:style-name="Tabelle26.F1" office:value-type="string">
            <text:p text:style-name="P98">TV</text:p>
          </table:table-cell>
        </table:table-row>
        <table:table-row>
          <table:table-cell table:style-name="Tabelle26.A2" office:value-type="string">
            <text:p text:style-name="P98">P-<text:span text:style-name="T24">Regler</text:span></text:p>
          </table:table-cell>
          <table:table-cell table:style-name="Tabelle26.A2" office:value-type="string">
            <text:p text:style-name="P98">0</text:p>
          </table:table-cell>
          <table:table-cell table:style-name="Tabelle26.A2" office:value-type="string">
            <text:p text:style-name="P98">0</text:p>
          </table:table-cell>
          <table:table-cell table:style-name="Tabelle26.A2" office:value-type="string">
            <text:p text:style-name="P98">P_K = 0.5</text:p>
          </table:table-cell>
          <table:table-cell table:style-name="Tabelle26.A2" office:value-type="string">
            <text:p text:style-name="P98"/>
          </table:table-cell>
          <table:table-cell table:style-name="Tabelle26.F2" office:value-type="string">
            <text:p text:style-name="P98"/>
          </table:table-cell>
        </table:table-row>
        <table:table-row>
          <table:table-cell table:style-name="Tabelle26.A2" office:value-type="string">
            <text:p text:style-name="P98">PI-<text:span text:style-name="T24">Regler</text:span></text:p>
          </table:table-cell>
          <table:table-cell table:style-name="Tabelle26.A2" office:value-type="string">
            <text:p text:style-name="P98">1</text:p>
          </table:table-cell>
          <table:table-cell table:style-name="Tabelle26.A2" office:value-type="string">
            <text:p text:style-name="P98">0</text:p>
          </table:table-cell>
          <table:table-cell table:style-name="Tabelle26.A2" office:value-type="string">
            <text:p text:style-name="P98">PI_K = 0.45</text:p>
          </table:table-cell>
          <table:table-cell table:style-name="Tabelle26.A2" office:value-type="string">
            <text:p text:style-name="P98">PI_TN = 0.83</text:p>
          </table:table-cell>
          <table:table-cell table:style-name="Tabelle26.F2" office:value-type="string">
            <text:p text:style-name="P98"/>
          </table:table-cell>
        </table:table-row>
        <table:table-row>
          <table:table-cell table:style-name="Tabelle26.A2" office:value-type="string">
            <text:p text:style-name="P98">PID-<text:span text:style-name="T24">Regler</text:span></text:p>
          </table:table-cell>
          <table:table-cell table:style-name="Tabelle26.A2" office:value-type="string">
            <text:p text:style-name="P98">0</text:p>
          </table:table-cell>
          <table:table-cell table:style-name="Tabelle26.A2" office:value-type="string">
            <text:p text:style-name="P98">1</text:p>
          </table:table-cell>
          <table:table-cell table:style-name="Tabelle26.A2" office:value-type="string">
            <text:p text:style-name="P98">PID_K = 0.6</text:p>
          </table:table-cell>
          <table:table-cell table:style-name="Tabelle26.A2" office:value-type="string">
            <text:p text:style-name="P98">PID_TN = 0.5</text:p>
          </table:table-cell>
          <table:table-cell table:style-name="Tabelle26.F2" office:value-type="string">
            <text:p text:style-name="P98">PID_TV = 0.125</text:p>
          </table:table-cell>
        </table:table-row>
      </table:table>
      <text:p text:style-name="P199"/>
      <text:p text:style-name="P199"/>
      <text:p text:style-name="P199"/>
      <text:p text:style-name="P199"/>
      <text:list xml:id="list33653738" text:continue-numbering="true" text:style-name="L1">
        <text:list-item>
          <text:list>
            <text:list-item>
              <text:h text:style-name="P217" text:outline-level="2"><text:soft-page-break/><text:alphabetical-index-mark-start text:id="IMark158104760"/>CONTROL_SET2<text:alphabetical-index-mark-end text:id="IMark158104760"/></text:h>
            </text:list-item>
          </text:list>
        </text:list-item>
      </text:list>
      <text:p text:style-name="Standard">Type<text:tab/><text:span text:style-name="T46">Funktionsbaustein</text:span></text:p>
      <text:p text:style-name="P22"><text:span text:style-name="T16">Input</text:span><text:tab/>KT : REAL (Kritische Verstärkung)</text:p>
      <text:p text:style-name="P22"><text:tab/>TT : REAL (<text:span text:style-name="T24">Periodendauer</text:span><text:span text:style-name="T16"> </text:span><text:span text:style-name="T24">der</text:span><text:span text:style-name="T16"> </text:span><text:span text:style-name="T24">kritischen</text:span><text:span text:style-name="T16"> </text:span><text:span text:style-name="T24">Schwingung</text:span>)</text:p>
      <text:p text:style-name="P52"><text:tab/>PI : BOOL (TRUE wenn Parameter für PI Regler bestimmt sind)</text:p>
      <text:p text:style-name="P52"><text:tab/>PID : BOOL (TRUE wenn Parameter für PID Regler bestimmt sind)</text:p>
      <text:p text:style-name="P52">Config<text:tab/>P_K : REAL := 0.5 (Vorgabewert KP für P Regler)</text:p>
      <text:p text:style-name="P52"><text:tab/>PI_K : REAL := 0.45 ( Vorgabewert KP für PI Regler</text:p>
      <text:p text:style-name="P52"><text:tab/>PI_TN : REAL := 0.83 (Vorgabewert TN für PI Regler)</text:p>
      <text:p text:style-name="P52"><text:tab/>PID_K : REAL := 0.6 (Vorgabewert KP für PID Regler)</text:p>
      <text:p text:style-name="P52"><text:tab/>PID_TN : REAL := 0.5 (Vorgabewert TN für PID Regler)</text:p>
      <text:p text:style-name="P52"><text:tab/>PID_TV : REAL := 0.125 (Vorgabewert TV für PID Regler)</text:p>
      <text:p text:style-name="P22">Output<text:tab/>KP : <text:span text:style-name="T35">REAL (Regelverstärkung KP)</text:span></text:p>
      <text:p text:style-name="P55"><text:tab/>TN : REAL (Nachstellzeit des Integrators)</text:p>
      <text:p text:style-name="P55"><text:tab/>TV : REAL (Vorhaltezeit des Differenzierers)</text:p>
      <text:p text:style-name="P52"><text:span text:style-name="T35"><text:tab/>KI : REAL ( </text:span><text:span text:style-name="T25">Verstärkungsfaktor</text:span><text:span text:style-name="T35"> des Integrators)</text:span></text:p>
      <text:p text:style-name="P52"><draw:frame draw:style-name="fr4" draw:name="Grafik383" text:anchor-type="paragraph" svg:x="1.111cm" svg:y="0.667cm" svg:width="3.29cm" svg:height="2.709cm" draw:z-index="377"><draw:image xlink:href="Pictures/10000000000000F9000000CD83EBEDA9.png" xlink:type="simple" xlink:show="embed" xlink:actuate="onLoad"/></draw:frame><text:span text:style-name="T35"><text:tab/>KD : REAL (</text:span><text:span text:style-name="T25">Verstärkungsfaktor</text:span><text:span text:style-name="T35"> des </text:span><text:span text:style-name="T25">Differenzierers</text:span><text:span text:style-name="T35">)</text:span></text:p>
      <text:p text:style-name="P25"><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190"><draw:frame draw:style-name="fr4" draw:name="Grafik384" text:anchor-type="paragraph" svg:x="1.75cm" svg:y="1.175cm" svg:width="5.609cm" svg:height="3.69cm" draw:z-index="378"><draw:image xlink:href="Pictures/10000000000001D700000136CDB24F69.png" xlink:type="simple" xlink:show="embed" xlink:actuate="onLoad"/></draw:frame><text:soft-page-break/>Die folgende Grafik zeigt die Ermittlung von TU und TG mit dem Wendetangentenverfahren:</text:p>
      <text:p text:style-name="P90"/>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11">Reglertyp</text:p>
          </table:table-cell>
          <table:table-cell table:style-name="Tabelle23.A1" office:value-type="string">
            <text:p text:style-name="P98">PI</text:p>
          </table:table-cell>
          <table:table-cell table:style-name="Tabelle23.A1" office:value-type="string">
            <text:p text:style-name="P98">PID</text:p>
          </table:table-cell>
          <table:table-cell table:style-name="Tabelle23.A1" office:value-type="string">
            <text:p text:style-name="P98">KP</text:p>
          </table:table-cell>
          <table:table-cell table:style-name="Tabelle23.A1" office:value-type="string">
            <text:p text:style-name="P98">TN</text:p>
          </table:table-cell>
          <table:table-cell table:style-name="Tabelle23.F1" office:value-type="string">
            <text:p text:style-name="P98">TV</text:p>
          </table:table-cell>
        </table:table-row>
        <table:table-row>
          <table:table-cell table:style-name="Tabelle23.A2" office:value-type="string">
            <text:p text:style-name="P98">P-<text:span text:style-name="T24">Regler</text:span></text:p>
          </table:table-cell>
          <table:table-cell table:style-name="Tabelle23.A2" office:value-type="string">
            <text:p text:style-name="P98">0</text:p>
          </table:table-cell>
          <table:table-cell table:style-name="Tabelle23.A2" office:value-type="string">
            <text:p text:style-name="P98">0</text:p>
          </table:table-cell>
          <table:table-cell table:style-name="Tabelle23.A2" office:value-type="string">
            <text:p text:style-name="P98">P_K * TG / TU / KS</text:p>
          </table:table-cell>
          <table:table-cell table:style-name="Tabelle23.A2" office:value-type="string">
            <text:p text:style-name="P98"/>
          </table:table-cell>
          <table:table-cell table:style-name="Tabelle23.F2" office:value-type="string">
            <text:p text:style-name="P98"/>
          </table:table-cell>
        </table:table-row>
        <table:table-row>
          <table:table-cell table:style-name="Tabelle23.A2" office:value-type="string">
            <text:p text:style-name="P98">PI-<text:span text:style-name="T24">Regler</text:span></text:p>
          </table:table-cell>
          <table:table-cell table:style-name="Tabelle23.A2" office:value-type="string">
            <text:p text:style-name="P98">1</text:p>
          </table:table-cell>
          <table:table-cell table:style-name="Tabelle23.A2" office:value-type="string">
            <text:p text:style-name="P98">0</text:p>
          </table:table-cell>
          <table:table-cell table:style-name="Tabelle23.A2" office:value-type="string">
            <text:p text:style-name="P98">PI_K * TG / TU / KS</text:p>
          </table:table-cell>
          <table:table-cell table:style-name="Tabelle23.A2" office:value-type="string">
            <text:p text:style-name="P98">PI_TN * TU</text:p>
          </table:table-cell>
          <table:table-cell table:style-name="Tabelle23.F2" office:value-type="string">
            <text:p text:style-name="P98"/>
          </table:table-cell>
        </table:table-row>
        <table:table-row>
          <table:table-cell table:style-name="Tabelle23.A2" office:value-type="string">
            <text:p text:style-name="P98">PID-<text:span text:style-name="T24">Regler</text:span></text:p>
          </table:table-cell>
          <table:table-cell table:style-name="Tabelle23.A2" office:value-type="string">
            <text:p text:style-name="P98">0</text:p>
          </table:table-cell>
          <table:table-cell table:style-name="Tabelle23.A2" office:value-type="string">
            <text:p text:style-name="P98">1</text:p>
          </table:table-cell>
          <table:table-cell table:style-name="Tabelle23.A2" office:value-type="string">
            <text:p text:style-name="P98">PID_K * TG / TU / KS</text:p>
          </table:table-cell>
          <table:table-cell table:style-name="Tabelle23.A2" office:value-type="string">
            <text:p text:style-name="P98">PID_TN * TU</text:p>
          </table:table-cell>
          <table:table-cell table:style-name="Tabelle23.F2" office:value-type="string">
            <text:p text:style-name="P98">PID_TV * TU</text:p>
          </table:table-cell>
        </table:table-row>
      </table:table>
      <text:p text:style-name="P59"/>
      <text:p text:style-name="P59">Die Vorgabewerte der Einstellregeln sind in Config Variablen definiert und können vom Anwender verändert werden. Die folgende Tabelle zeigt die <text:span text:style-name="T16">Default</text:span>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1">Reglertyp</text:p>
          </table:table-cell>
          <table:table-cell table:style-name="Tabelle24.A1" office:value-type="string">
            <text:p text:style-name="P98">PI</text:p>
          </table:table-cell>
          <table:table-cell table:style-name="Tabelle24.A1" office:value-type="string">
            <text:p text:style-name="P98">PID</text:p>
          </table:table-cell>
          <table:table-cell table:style-name="Tabelle24.A1" office:value-type="string">
            <text:p text:style-name="P98">KP</text:p>
          </table:table-cell>
          <table:table-cell table:style-name="Tabelle24.A1" office:value-type="string">
            <text:p text:style-name="P98">TN</text:p>
          </table:table-cell>
          <table:table-cell table:style-name="Tabelle24.F1" office:value-type="string">
            <text:p text:style-name="P98">TV</text:p>
          </table:table-cell>
        </table:table-row>
        <table:table-row>
          <table:table-cell table:style-name="Tabelle24.A2" office:value-type="string">
            <text:p text:style-name="P98">P-<text:span text:style-name="T24">Regler</text:span></text:p>
          </table:table-cell>
          <table:table-cell table:style-name="Tabelle24.A2" office:value-type="string">
            <text:p text:style-name="P98">0</text:p>
          </table:table-cell>
          <table:table-cell table:style-name="Tabelle24.A2" office:value-type="string">
            <text:p text:style-name="P98">0</text:p>
          </table:table-cell>
          <table:table-cell table:style-name="Tabelle24.A2" office:value-type="string">
            <text:p text:style-name="P98">P_K = 1.0</text:p>
          </table:table-cell>
          <table:table-cell table:style-name="Tabelle24.A2" office:value-type="string">
            <text:p text:style-name="P98"/>
          </table:table-cell>
          <table:table-cell table:style-name="Tabelle24.F2" office:value-type="string">
            <text:p text:style-name="P98"/>
          </table:table-cell>
        </table:table-row>
        <table:table-row>
          <table:table-cell table:style-name="Tabelle24.A2" office:value-type="string">
            <text:p text:style-name="P98">PI-<text:span text:style-name="T24">Regler</text:span></text:p>
          </table:table-cell>
          <table:table-cell table:style-name="Tabelle24.A2" office:value-type="string">
            <text:p text:style-name="P98">1</text:p>
          </table:table-cell>
          <table:table-cell table:style-name="Tabelle24.A2" office:value-type="string">
            <text:p text:style-name="P98">0</text:p>
          </table:table-cell>
          <table:table-cell table:style-name="Tabelle24.A2" office:value-type="string">
            <text:p text:style-name="P98">PI_K = 0.9</text:p>
          </table:table-cell>
          <table:table-cell table:style-name="Tabelle24.A2" office:value-type="string">
            <text:p text:style-name="P98">PI_TN = 3.33</text:p>
          </table:table-cell>
          <table:table-cell table:style-name="Tabelle24.F2" office:value-type="string">
            <text:p text:style-name="P98"/>
          </table:table-cell>
        </table:table-row>
        <table:table-row>
          <table:table-cell table:style-name="Tabelle24.A2" office:value-type="string">
            <text:p text:style-name="P98">PID-<text:span text:style-name="T24">Regler</text:span></text:p>
          </table:table-cell>
          <table:table-cell table:style-name="Tabelle24.A2" office:value-type="string">
            <text:p text:style-name="P98">0</text:p>
          </table:table-cell>
          <table:table-cell table:style-name="Tabelle24.A2" office:value-type="string">
            <text:p text:style-name="P98">1</text:p>
          </table:table-cell>
          <table:table-cell table:style-name="Tabelle24.A2" office:value-type="string">
            <text:p text:style-name="P98">PID_K = 1.2</text:p>
          </table:table-cell>
          <table:table-cell table:style-name="Tabelle24.A2" office:value-type="string">
            <text:p text:style-name="P98">PID_TN = 2</text:p>
          </table:table-cell>
          <table:table-cell table:style-name="Tabelle24.F2" office:value-type="string">
            <text:p text:style-name="P98">PID_TV = 0.5</text:p>
          </table:table-cell>
        </table:table-row>
      </table:table>
      <text:p text:style-name="P55"/>
      <text:list xml:id="list33637659" text:continue-numbering="true" text:style-name="L1">
        <text:list-item>
          <text:list>
            <text:list-item>
              <text:h text:style-name="P217" text:outline-level="2"><text:alphabetical-index-mark-start text:id="IMark158104760"/>CTRL_IN<text:alphabetical-index-mark-end text:id="IMark158104760"/></text:h>
            </text:list-item>
          </text:list>
        </text:list-item>
      </text:list>
      <text:p text:style-name="P22">Type<text:tab/>Funktion : REAL</text:p>
      <text:p text:style-name="P22"><text:span text:style-name="T16">Input</text:span><text:tab/>SET_POINT : REAL (Vorgabewert)</text:p>
      <text:p text:style-name="P22"><text:tab/>ACTUAL : REAL (Prozesswert)</text:p>
      <text:p text:style-name="P52"><text:tab/>NOISE : REAL (Ansprechschwelle)</text:p>
      <text:p text:style-name="P22"><draw:frame draw:style-name="fr4" draw:name="Grafik582" text:anchor-type="paragraph" svg:x="0.981cm" svg:y="0.681cm" svg:width="4.521cm" svg:height="2.02cm" draw:z-index="601"><draw:image xlink:href="Pictures/1000000000000156000000996B8E93AB.png" xlink:type="simple" xlink:show="embed" xlink:actuate="onLoad"/></draw:frame>Output<text:tab/>DIFF<text:span text:style-name="T35"> (Prozessabweichung)</text:span></text:p>
      <text:p text:style-name="P55"><text:soft-page-break/><text:line-break/>CTRL_IN berechnet die Prozessabweichung (SET_POINT _ ACTUAL) und gibt diese am Ausgang aus. Ist die Abweichung kleiner als der Wert am Eingang NOISE bleibt der Ausgang auf 0. CTRL_IN kann benutzt werden um eigene Regelbausteine Aufzubauen.</text:p>
      <text:p text:style-name="P55"><draw:frame draw:style-name="fr4" draw:name="Grafik584" text:anchor-type="paragraph" svg:x="1.044cm" svg:y="0.688cm" svg:width="8.22cm" svg:height="2.09cm" draw:z-index="603"><draw:image xlink:href="Pictures/10000000000001BC000000714BBFF89E.png" xlink:type="simple" xlink:show="embed" xlink:actuate="onLoad"/></draw:frame>Blockschaltbild von CTRL_IN:</text:p>
      <text:p text:style-name="P55"/>
      <text:list xml:id="list33634051" text:continue-numbering="true" text:style-name="L1">
        <text:list-item>
          <text:list>
            <text:list-item>
              <text:h text:style-name="P217" text:outline-level="2"><text:alphabetical-index-mark-start text:id="IMark158104760"/>CTRL_OUT<text:alphabetical-index-mark-end text:id="IMark158104760"/></text:h>
            </text:list-item>
          </text:list>
        </text:list-item>
      </text:list>
      <text:p text:style-name="P22">Type<text:tab/>Funktionsbaustein</text:p>
      <text:p text:style-name="P22"><text:span text:style-name="T16">Input</text:span><text:tab/>CI : REAL (Eingang vom Controller)</text:p>
      <text:p text:style-name="P22"><text:tab/>OFFSET : REAL (Ausgangsoffset)</text:p>
      <text:p text:style-name="P52"><text:tab/>MAN_IN : REAL (Manueller Eingangswert)</text:p>
      <text:p text:style-name="P52"><text:tab/>LIM_L : REAL (untere Ausgangsbegrenzung)</text:p>
      <text:p text:style-name="P52"><text:tab/>LIM_H : REAL (obere Ausgangsbegrenzung)</text:p>
      <text:p text:style-name="P52"><text:tab/>MANUAL : BOOL (Umschalter für Handbetrieb)</text:p>
      <text:p text:style-name="P22">Output<text:tab/>Y : REAL <text:span text:style-name="T35">(Steuersignal)</text:span></text:p>
      <text:p text:style-name="P55"><draw:frame draw:style-name="fr4" draw:name="Grafik583" text:anchor-type="paragraph" svg:x="1.046cm" svg:y="0.69cm" svg:width="3.62cm" svg:height="3.54cm" draw:z-index="602"><draw:image xlink:href="Pictures/10000000000001120000010C778BB549.png" xlink:type="simple" xlink:show="embed" xlink:actuate="onLoad"/></draw:frame><text:tab/>LIM : BOOL (TRUE wenn Steuersignal ein Limit erreicht)</text:p>
      <text:p text:style-name="P55"><text:line-break/>CTRL_OUT addiert zum Eingang CI den Wert von OFFSET und gibt das Ergebnis auf Y aus wenn MANUAL = FALSE. Wenn MANUAL = TRUE wird am Ausgang Y <text:soft-page-break/>Der Eingangswert von MAN_IN + OFFSET ausgegeben. Y wird jederzeit auf die durch LIM_L und LIM_H definierten Grenzen begrenzt. Erreicht Y eine der Grenzen, so wird der Ausgang LIM TRUE. CTRL_OUT kann benutzt werden um eigene Regelbausteine Aufzubauen.</text:p>
      <text:p text:style-name="P55"><draw:frame draw:style-name="fr4" draw:name="Grafik585" text:anchor-type="paragraph" svg:x="1.046cm" svg:y="0.623cm" svg:width="8.301cm" svg:height="5.941cm" draw:z-index="604"><draw:image xlink:href="Pictures/10000000000001C000000141F9C24170.png" xlink:type="simple" xlink:show="embed" xlink:actuate="onLoad"/></draw:frame>Blockschaltbild von CTRL_OUT:</text:p>
      <text:p text:style-name="P60"/>
      <text:list xml:id="list33628864" text:continue-numbering="true" text:style-name="L1">
        <text:list-item>
          <text:list>
            <text:list-item>
              <text:h text:style-name="P217" text:outline-level="2"><text:alphabetical-index-mark-start text:id="IMark158104760"/>CTRL_PI<text:alphabetical-index-mark-end text:id="IMark158104760"/></text:h>
            </text:list-item>
          </text:list>
        </text:list-item>
      </text:list>
      <text:p text:style-name="P22">Type<text:tab/>Funktionsbaustein</text:p>
      <text:p text:style-name="P22"><text:span text:style-name="T16">Input</text:span><text:tab/>ACT : REAL (gemessener Wert nach der Strecke)</text:p>
      <text:p text:style-name="P22"><text:tab/>SET : REAL (Vorgabewert)</text:p>
      <text:p text:style-name="P52"><text:tab/>SUP : REAL (Rauschunterdrückung)</text:p>
      <text:p text:style-name="P22"><text:tab/>OFS : REAL (Offset für den Ausgang)</text:p>
      <text:p text:style-name="P22"><text:tab/>M_I : REAL (Eingangswert für manuellen Betrieb)</text:p>
      <text:p text:style-name="P22"><text:tab/>MAN : BOOL (Umschalten auf Handbetrieb, MANUAL = TRUE)</text:p>
      <text:p text:style-name="P52"><text:tab/>RST : BOOL (Asynchroner Reset-Eingang)</text:p>
      <text:p text:style-name="P22"><text:tab/>KP : REAL (Proportionaler Anteil des Reglers)</text:p>
      <text:p text:style-name="P22"><text:tab/>KI : REAL (Integraler Anteil des Reglers)</text:p>
      <text:p text:style-name="P22"><text:tab/>LL : REAL (untere Ausgangsbegrenzung)</text:p>
      <text:p text:style-name="P22"><text:tab/>LH : REAL (obere Ausgangsbegrenzung)</text:p>
      <text:p text:style-name="P25">Output<text:tab/>Y : REAL (Ausgang des Reglers)</text:p>
      <text:p text:style-name="P55"><text:tab/>DIFF : Real (Regelabweichung)</text:p>
      <text:p text:style-name="P25"><draw:frame draw:style-name="fr4" draw:name="Grafik595" text:anchor-type="paragraph" svg:x="1.222cm" svg:y="0.667cm" svg:width="2.499cm" svg:height="5.091cm" draw:z-index="710"><draw:image xlink:href="Pictures/10000000000000BD00000181C1E0984C.png" xlink:type="simple" xlink:show="embed" xlink:actuate="onLoad"/></draw:frame><text:tab/>LIM : BOOL (TRUE, wenn der Ausgang ein Limit erreicht hat)</text:p>
      <text:p text:style-name="P25"><text:soft-page-break/><text:line-break/>CTRL_PI ist ein PI-Regler mit dynamischen Anti Wind-Up und manuellem Steuereingang. Der PI Regler arbeitet nach der Formel:</text:p>
      <text:p text:style-name="P55">Y = KP * DIFF + KI * INTEG(DIFF) + OFFSET</text:p>
      <text:p text:style-name="P25">wobei DIFF = SET_POINT – ACTUAL</text:p>
      <text:p text:style-name="P25">Im Handbetrieb (Manual = TRUE) gilt: Y = MANUAL_IN + OFFSET</text:p>
      <text:p text:style-name="P25">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Regler arbeitet frei laufend und benutzt zur Berechnung des Integrators die Trapezregel für höchste Genauigkeit und optimale Geschwindigkeit. Die <text:span text:style-name="T16">Default</text:span>-Werte der Eingangsparameter sind wie folgt vordefiniert: KP = 1, KI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 text:style-name="T16">Noise</text:span> Filter (DEAD_BAND) gefilterte Regelabweichung zur Verfügung. DIFF wird in einer Regelstrecke normalerweise nicht benötigt, kann aber zur Beeinflussung der Regelparameter benutzt werden. Der Eingang OFS wird als letzter Wert zum Ausgang addiert, und dient vor allem zum kompensieren von Störsignalen, deren Wirkung auf den Regelkreis abgeschätzt werden kann.</text:p>
      <text:p text:style-name="P55">Der Regler arbeitet mit einem Dynamischen Wind-<text:span text:style-name="T16">Up </text:span><text:span text:style-name="T24">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span text:style-name="T24"> </text:span></text:p>
      <text:p text:style-name="P191"><text:soft-page-break/>Die folgende Grafik verdeutlicht die interne Struktur des Reglers:</text:p>
      <text:p text:style-name="P93"><draw:frame draw:style-name="fr4" draw:name="Grafik592" text:anchor-type="paragraph" svg:x="1.027cm" svg:y="0.309cm" svg:width="15.998cm" svg:height="5.833cm" draw:z-index="611"><draw:image xlink:href="Pictures/1000000000000373000001428B0010EA.png" xlink:type="simple" xlink:show="embed" xlink:actuate="onLoad"/></draw:frame></text:p>
      <text:p text:style-name="P93"/>
      <text:list xml:id="list33633860" text:continue-numbering="true" text:style-name="L1">
        <text:list-item>
          <text:list>
            <text:list-item>
              <text:h text:style-name="P217" text:outline-level="2"><text:alphabetical-index-mark-start text:id="IMark158104760"/>CTRL_PID<text:alphabetical-index-mark-end text:id="IMark158104760"/></text:h>
            </text:list-item>
          </text:list>
        </text:list-item>
      </text:list>
      <text:p text:style-name="P22">Type<text:tab/>Funktionsbaustein</text:p>
      <text:p text:style-name="P22"><text:span text:style-name="T16">Input</text:span><text:tab/>ACT : REAL (gemessener Wert nach der Strecke)</text:p>
      <text:p text:style-name="P22"><text:tab/>SET : REAL (Vorgabewert)</text:p>
      <text:p text:style-name="P52"><text:tab/>SUP : REAL (Rauschunterdrückung)</text:p>
      <text:p text:style-name="P22"><text:tab/>OFS : REAL (Offset für den Ausgang)</text:p>
      <text:p text:style-name="P22"><text:tab/>M_I : REAL (Eingangswert für manuellen Betrieb)</text:p>
      <text:p text:style-name="P22"><text:tab/>MAN : BOOL (Umschalten auf Handbetrieb, MANUAL = TRUE)</text:p>
      <text:p text:style-name="P52"><text:tab/>RST : BOOL (Asynchroner Reset-Eingang)</text:p>
      <text:p text:style-name="P22"><text:tab/>KP : REAL (Verstärkung des Reglers)</text:p>
      <text:p text:style-name="P22"><text:tab/>TN : REAL (Nachstellzeit des Reglers)</text:p>
      <text:p text:style-name="P22"><text:tab/>TV : REAL (Vorhaltezeit des Reglers)</text:p>
      <text:p text:style-name="P22"><text:tab/>LL : REAL (untere Ausgangsbegrenzung)</text:p>
      <text:p text:style-name="P22"><text:tab/>LH : REAL (obere Ausgangsbegrenzung)</text:p>
      <text:p text:style-name="P25">Output<text:tab/>Y : REAL (Ausgang des Reglers)</text:p>
      <text:p text:style-name="P55"><text:tab/>DIFF : Real (Regelabweichung)</text:p>
      <text:p text:style-name="P25"><draw:frame draw:style-name="fr4" draw:name="Grafik594" text:anchor-type="paragraph" svg:x="1.002cm" svg:y="0.688cm" svg:width="2.499cm" svg:height="5.489cm" draw:z-index="711"><draw:image xlink:href="Pictures/10000000000000BD0000019FF2C2AAC6.png" xlink:type="simple" xlink:show="embed" xlink:actuate="onLoad"/></draw:frame><text:tab/>LIM : BOOL (TRUE, wenn der Ausgang ein Limit erreicht hat)</text:p>
      <text:p text:style-name="P25"><text:soft-page-break/><text:line-break/>CTRL_PID ist ein PID-Regler mit dynamischen Anti Wind-<text:span text:style-name="T16">Up</text:span> und manuellem Steuereingang. Der PID Regler arbeitet nach der Formel:</text:p>
      <text:p text:style-name="P55">Y = KP * ( DIFF + 1/TN * INTEG(DIFF) + TV *DERIV(DIFF)) + OFFSET</text:p>
      <text:p text:style-name="P25">wobei DIFF = SET_POINT – ACTUAL</text:p>
      <text:p text:style-name="P25">Im Handbetrieb (Manual = TRUE) gilt: Y = MANUAL_IN + OFFSET</text:p>
      <text:p text:style-name="P25">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D-Regler arbeitet frei laufend und benutzt zur Berechnung die Trapezregel für höchste Genauigkeit und optimale Geschwindigkeit. Die <text:span text:style-name="T16">Default</text:span>-Werte der Eingangsparameter sind wie folgt vordefiniert: KP = 1, TN = 1, TV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 text:style-name="T16">Noise</text:span> Filter (DEAD_BAND) gefilterte Regelabweichung zur Verfügung. DIFF wird in einer Regelstrecke normalerweise nicht benötigt, kann aber zur Beeinflussung der Regelparameter benutzt werden. Der Eingang OFS wird als letzter Wert zum Ausgang addiert, und dient vor allem zum kompensieren <text:s/>von Störsignalen, deren Wirkung auf den Regelkreis abgeschätzt werden kann.</text:p>
      <text:p text:style-name="P55">Der Regler arbeitet mit einem Dynamischen Wind-<text:span text:style-name="T16">Up </text:span><text:span text:style-name="T24">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span text:style-name="T24"> </text:span></text:p>
      <text:p text:style-name="P189">Die Regelparameter werden in der Form KP, TN und TV angegeben, falls die Parameter als KP, KI und KD vorliegen können sie entsprechend der folgenden Formel umgerechnet werden:</text:p>
      <text:p text:style-name="P55">TN = KP/KI und TV = KD/KP</text:p>
      <text:p text:style-name="P189"><draw:frame draw:style-name="fr4" draw:name="Grafik593" text:anchor-type="paragraph" svg:x="1.023cm" svg:y="0.75cm" svg:width="15.998cm" svg:height="5.272cm" draw:z-index="612"><draw:image xlink:href="Pictures/10000000000003D100000142215AF8DA.png" xlink:type="simple" xlink:show="embed" xlink:actuate="onLoad"/></draw:frame><text:soft-page-break/>Die folgende Grafik zeigt die interne Struktur des PID Reglers:</text:p>
      <text:p text:style-name="P87"/>
      <text:p text:style-name="P189"><text:line-break/>Im folgenden Beispiel wir ein PID Regler gezeigt, dessen SET_POINT durch den Baustein TUNE2 mittels Taster erzeugt wird. Der Ausgang DIFF wird an einen Baustein PARSET2 geleitet welcher abhängig von der Regelabweichung am Ausgang DIFF die Parameter KP, TN und TV verändert.</text:p>
      <text:p text:style-name="P87"><draw:frame draw:style-name="fr4" draw:name="Grafik685" text:anchor-type="paragraph" svg:x="1.023cm" svg:y="0.012cm" svg:width="15.998cm" svg:height="4.643cm" draw:z-index="712"><draw:image xlink:href="Pictures/1000000000000323000000E9507C516F.png" xlink:type="simple" xlink:show="embed" xlink:actuate="onLoad"/></draw:frame></text:p>
      <text:p text:style-name="P55"/>
      <text:p text:style-name="P55"/>
      <text:p text:style-name="P55"/>
      <text:p text:style-name="P55"/>
      <text:p text:style-name="P55"/>
      <text:p text:style-name="P55"/>
      <text:p text:style-name="P55"/>
      <text:list xml:id="list33646304" text:continue-numbering="true" text:style-name="L1">
        <text:list-item>
          <text:list>
            <text:list-item>
              <text:h text:style-name="P217" text:outline-level="2"><text:soft-page-break/><text:alphabetical-index-mark-start text:id="IMark158104760"/>CTRL_PWM<text:alphabetical-index-mark-end text:id="IMark158104760"/></text:h>
            </text:list-item>
          </text:list>
        </text:list-item>
      </text:list>
      <text:p text:style-name="P22">Type<text:tab/>Funktionsbaustein</text:p>
      <text:p text:style-name="P22"><text:span text:style-name="T16">Input</text:span><text:tab/>CI : REAL (Eingang vom Controller)</text:p>
      <text:p text:style-name="P52"><text:tab/>MAN_IN : REAL (Manueller Eingangswert)<text:tab/></text:p>
      <text:p text:style-name="P52"><text:tab/>MANUAL : BOOL (Umschalter für Handbetrieb)</text:p>
      <text:p text:style-name="P52"><text:tab/>F : REAL (Frequenz der Ausgangsimpulse in Hz)</text:p>
      <text:p text:style-name="P22"><draw:frame draw:style-name="fr4" draw:name="Grafik597" text:anchor-type="paragraph" svg:x="1.046cm" svg:y="0.688cm" svg:width="3.62cm" svg:height="2.649cm" draw:z-index="615"><draw:image xlink:href="Pictures/1000000000000112000000C8CEA838DB.png" xlink:type="simple" xlink:show="embed" xlink:actuate="onLoad"/></draw:frame>Output<text:tab/>Q : BOOL <text:span text:style-name="T35">(Steuersignal)<text:tab/></text:span></text:p>
      <text:p text:style-name="P55"><text:line-break/>CTRL_PWM wandelt den Eingangswert CI (0..1) in ein Pulsweitenmoduliertes Ausgangssignal Q. Wenn MANUAL = TRUE wird am Ausgang Q Der Eingangswert von MAN_IN ausgegeben. CTRL_OUT kann benutzt werden um eigene Regelbausteine Aufzubauen.</text:p>
      <text:p text:style-name="P55"><draw:frame draw:style-name="fr4" draw:name="Grafik598" text:anchor-type="paragraph" svg:x="1.046cm" svg:y="0.661cm" svg:width="6.2cm" svg:height="2.889cm" draw:z-index="616"><draw:image xlink:href="Pictures/100000000000014F0000009CEDFA6C02.png" xlink:type="simple" xlink:show="embed" xlink:actuate="onLoad"/></draw:frame>Blockschaltbild von CTRL_PWM:</text:p>
      <text:p text:style-name="P55"/>
      <text:p text:style-name="P55"><draw:frame draw:style-name="fr4" draw:name="Grafik599" text:anchor-type="paragraph" svg:x="1.025cm" svg:y="0.656cm" svg:width="15.109cm" svg:height="2.461cm" draw:z-index="617"><draw:image xlink:href="Pictures/1000000000000330000000852F41F780.png" xlink:type="simple" xlink:show="embed" xlink:actuate="onLoad"/></draw:frame>DAS folgende Beispiel zeigt einen PI Regler mit PWM Ausgang:</text:p>
      <text:p text:style-name="P60"/>
      <text:list xml:id="list33654337" text:continue-numbering="true" text:style-name="L1">
        <text:list-item>
          <text:list>
            <text:list-item>
              <text:h text:style-name="P217" text:outline-level="2"><text:soft-page-break/><text:alphabetical-index-mark-start text:id="IMark158104760"/>DEAD_BAND<text:alphabetical-index-mark-end text:id="IMark158104760"/></text:h>
            </text:list-item>
          </text:list>
        </text:list-item>
      </text:list>
      <text:p text:style-name="Standard">Type<text:tab/><text:span text:style-name="T46">Funktionsbaustein</text:span></text:p>
      <text:p text:style-name="P22"><text:span text:style-name="T16">Input</text:span><text:tab/>X : REAL (Eingangswert)</text:p>
      <text:p text:style-name="P22"><text:tab/>L : REAL (<text:span text:style-name="T16">Lockout</text:span> Wert)</text:p>
      <text:p text:style-name="P22"><draw:frame draw:style-name="fr4" draw:name="Grafik372" text:anchor-type="paragraph" svg:x="1.002cm" svg:y="0.688cm" svg:width="4.521cm" svg:height="1.57cm" draw:z-index="367"><draw:image xlink:href="Pictures/1000000000000156000000777A87234D.png" xlink:type="simple" xlink:show="embed" xlink:actuate="onLoad"/></draw:frame>Output<text:tab/>Y : <text:span text:style-name="T35">REAL (Ausgangswert)</text:span></text:p>
      <text:p text:style-name="P25"><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55"><text:span text:style-name="T16">DEAD_BAND</text:span> = X - SGN(X)*L wenn ABS(X) &gt; L wenn ABS(X) &gt; L</text:p>
      <text:p text:style-name="P25"><draw:frame draw:style-name="fr4" draw:name="Grafik373" text:anchor-type="paragraph" svg:x="1.067cm" svg:y="0.693cm" svg:width="5.821cm" svg:height="5.45cm" draw:z-index="368"><draw:image xlink:href="Pictures/10000000000001B80000019CCA42DE37.png" xlink:type="simple" xlink:show="embed" xlink:actuate="onLoad"/></draw:frame><text:span text:style-name="T16">DEAD_BAND</text:span> = 0 wenn ABS(X) &lt;= L</text:p>
      <text:p text:style-name="P91"/>
      <text:p text:style-name="P61"/>
      <text:p text:style-name="P61"/>
      <text:p text:style-name="P61"/>
      <text:list xml:id="list33652085" text:continue-numbering="true" text:style-name="L1">
        <text:list-item>
          <text:list>
            <text:list-item>
              <text:h text:style-name="P217" text:outline-level="2"><text:soft-page-break/><text:alphabetical-index-mark-start text:id="IMark158104760"/>DEAD_BAND_A<text:alphabetical-index-mark-end text:id="IMark158104760"/></text:h>
            </text:list-item>
          </text:list>
        </text:list-item>
      </text:list>
      <text:p text:style-name="Standard">Type<text:tab/><text:span text:style-name="T46">Funktionsbaustein</text:span></text:p>
      <text:p text:style-name="P22"><text:span text:style-name="T16">Input</text:span><text:tab/>X : REAL (Eingangswert)</text:p>
      <text:p text:style-name="P22"><text:tab/>L : REAL (<text:span text:style-name="T16">Lockout</text:span> Wert)</text:p>
      <text:p text:style-name="P22"><draw:frame draw:style-name="fr4" draw:name="Grafik621" text:anchor-type="paragraph" svg:x="1.046cm" svg:y="0.667cm" svg:width="2.9cm" svg:height="2.311cm" draw:z-index="644"><draw:image xlink:href="Pictures/10000000000000DB000000AF1AEF6230.png" xlink:type="simple" xlink:show="embed" xlink:actuate="onLoad"/></draw:frame>Output<text:tab/>Y : <text:span text:style-name="T35">REAL (Ausgangswert)</text:span></text:p>
      <text:p text:style-name="P25"><text:line-break/>DEAD_BAND_A ist eine selbst adaptierende lineare Übertragungsfunktion mit Totzone. Die Funktion verschiebt den positiven Teil der Kurve um -L und den negativen Teil der Kurve um +L. DEAD_BAND_A wird benutzt um Rauschanteile um den Nullpunkt aus einem Signal zu filtern. DEAD_BAND_A wird zum Beispiel in Regelkreisen eingesetzt um zu verhindern das der Regler dauernd in kleinen Schritten schaltet und dabei das Stellglied übermäßig belastet und abnutzt.</text:p>
      <text:p text:style-name="P55">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55">L = HF_Amplitude (effektiv) <text:s/>* KL.</text:p>
      <text:p text:style-name="P55">Damit der Baustein auch bei extremen Betriebsbedingungen stabil bleibt wird über den Eingang LM der Maximalwert von L begrenzt.</text:p>
      <text:p text:style-name="P55"><text:span text:style-name="T16">DEAD_BAND</text:span> = X - SGN(X)*L wenn ABS(X) &gt; L wenn ABS(X) &gt; L</text:p>
      <text:p text:style-name="P25"><draw:frame draw:style-name="fr4" draw:name="Grafik622" text:anchor-type="paragraph" svg:x="1.067cm" svg:y="0.693cm" svg:width="5.821cm" svg:height="5.45cm" draw:z-index="643"><draw:image xlink:href="Pictures/10000000000001B80000019CCA42DE37.png" xlink:type="simple" xlink:show="embed" xlink:actuate="onLoad"/></draw:frame><text:span text:style-name="T16">DEAD_BAND</text:span> = 0 wenn ABS(X) &lt;= L</text:p>
      <text:p text:style-name="P55"/>
      <text:list xml:id="list33627638" text:continue-numbering="true" text:style-name="L1">
        <text:list-item>
          <text:list>
            <text:list-item>
              <text:h text:style-name="P217" text:outline-level="2"><text:soft-page-break/><text:alphabetical-index-mark-start text:id="IMark158104760"/>DEAD_ZONE<text:alphabetical-index-mark-end text:id="IMark158104760"/></text:h>
            </text:list-item>
          </text:list>
        </text:list-item>
      </text:list>
      <text:p text:style-name="P22">Type<text:tab/>Funktion : REAL</text:p>
      <text:p text:style-name="P22"><text:span text:style-name="T16">Input</text:span><text:tab/>X : REAL (Eingangswert)</text:p>
      <text:p text:style-name="P22"><text:tab/>L : REAL (<text:span text:style-name="T16">Lockout</text:span> Wert)</text:p>
      <text:p text:style-name="P22"><draw:frame draw:style-name="fr4" draw:name="Grafik275" text:anchor-type="paragraph" svg:x="1.132cm" svg:y="0.801cm" svg:width="4.521cm" svg:height="1.57cm" draw:z-index="244"><draw:image xlink:href="Pictures/100000000000015600000077727F39FC.png" xlink:type="simple" xlink:show="embed" xlink:actuate="onLoad"/></draw:frame>Output<text:tab/><text:span text:style-name="T35">REAL (Ausgangswert)</text:span></text:p>
      <text:p text:style-name="Standard"><text:line-break/>DEAD_<text:span text:style-name="T21">ZONE</text:span> ist eine <text:span text:style-name="T21">lineare</text:span> Übertragungsfunktion mit Totzone. Der Ausgang entspricht dem Eingangssignal, wenn der Absolutwert des Eingangs größer als L ist.</text:p>
      <text:p text:style-name="P25"><text:span text:style-name="T16">DEAD_ZONE</text:span> = X wenn ABS(X) &gt; L</text:p>
      <text:p text:style-name="P25"><text:span text:style-name="T16">DEAD_ZONE</text:span> = 0 wenn ABS(X) &lt;= L</text:p>
      <text:p text:style-name="P25"><draw:g text:anchor-type="paragraph" draw:z-index="242" draw:style-name="gr1"><draw:line draw:style-name="gr14" draw:text-style-name="P258" svg:x1="2.482cm" svg:y1="2.356cm" svg:x2="6.587cm" svg:y2="2.356cm"><text:p/></draw:line><draw:line draw:style-name="gr14" draw:text-style-name="P258" svg:x1="4.535cm" svg:y1="0.518cm" svg:x2="4.535cm" svg:y2="4.227cm"><text:p/></draw:line><draw:frame draw:style-name="gr43" draw:text-style-name="P263" svg:width="1.043cm" svg:height="1.04cm" svg:x="1.97cm" svg:y="2.309cm"><draw:text-box><text:p text:style-name="P252"><text:span text:style-name="T56">X</text:span></text:p></draw:text-box></draw:frame><draw:frame draw:style-name="gr44" draw:text-style-name="P263" svg:width="1.027cm" svg:height="1.038cm" svg:x="3.819cm" svg:y="0.101cm"><draw:text-box><text:p text:style-name="P252"><text:span text:style-name="T56">Y</text:span></text:p></draw:text-box></draw:frame><draw:line draw:style-name="gr45" draw:text-style-name="P258" svg:x1="2.482cm" svg:y1="4.189cm" svg:x2="3.508cm" svg:y2="3.272cm"><text:p/></draw:line><draw:line draw:style-name="gr45" draw:text-style-name="P258" svg:x1="3.51cm" svg:y1="2.356cm" svg:x2="3.51cm" svg:y2="3.272cm"><text:p/></draw:line><draw:line draw:style-name="gr45" draw:text-style-name="P258" svg:x1="3.51cm" svg:y1="2.356cm" svg:x2="5.564cm" svg:y2="2.356cm"><text:p/></draw:line><draw:line draw:style-name="gr45" draw:text-style-name="P258" svg:x1="5.56cm" svg:y1="1.443cm" svg:x2="5.56cm" svg:y2="2.36cm"><text:p/></draw:line><draw:line draw:style-name="gr45" draw:text-style-name="P258" svg:x1="5.56cm" svg:y1="1.436cm" svg:x2="6.585cm" svg:y2="0.518cm"><text:p/></draw:line><draw:line draw:style-name="gr46" draw:text-style-name="P258" svg:x1="4.535cm" svg:y1="2.81cm" svg:x2="5.562cm" svg:y2="2.81cm"><text:p/></draw:line><draw:frame draw:style-name="gr44" draw:text-style-name="P263" svg:width="1.239cm" svg:height="1.038cm" svg:x="4.769cm" svg:y="2.823cm"><draw:text-box><text:p text:style-name="P252"><text:span text:style-name="T56">L</text:span></text:p></draw:text-box></draw:frame></draw:g></text:p>
      <text:list xml:id="list33642601" text:continue-numbering="true" text:style-name="L1">
        <text:list-item>
          <text:list>
            <text:list-item>
              <text:h text:style-name="P217" text:outline-level="2"><text:alphabetical-index-mark-start text:id="IMark158104760"/>DEAD_ZONE2<text:alphabetical-index-mark-end text:id="IMark158104760"/></text:h>
            </text:list-item>
          </text:list>
        </text:list-item>
      </text:list>
      <text:p text:style-name="Standard">Type<text:tab/><text:span text:style-name="T21">Funktionsbaustein</text:span></text:p>
      <text:p text:style-name="P22"><text:span text:style-name="T16">Input</text:span><text:tab/>X : REAL (Eingangswert)</text:p>
      <text:p text:style-name="P22"><text:tab/>L : REAL (<text:span text:style-name="T16">Lockout</text:span> Wert)</text:p>
      <text:p text:style-name="P22">Output<text:tab/>Y : <text:span text:style-name="T35">REAL (Ausgangswert)</text:span></text:p>
      <text:p text:style-name="P25"><draw:frame draw:style-name="fr4" draw:name="Grafik276" text:anchor-type="paragraph" svg:x="1.136cm" svg:y="0.284cm" svg:width="2.731cm" svg:height="1.75cm" draw:z-index="245"><draw:image xlink:href="Pictures/10000000000000CE00000084A207AB63.png" xlink:type="simple" xlink:show="embed" xlink:actuate="onLoad"/></draw:frame><text:soft-page-break/><text:line-break/>DEAD_ZONE2 ist eine lineare Übertragungsfunktion mit Totzone und Hysterese. Der Ausgang entspricht dem Eingangssignal, wenn der Absolutwert des Eingangs größer als L ist.</text:p>
      <text:p text:style-name="P55">DEAD_ZONE2 = X wenn ABS(X) &gt; L</text:p>
      <text:p text:style-name="P55">DEAD_ZONE2 = +/- L wenn ABS(X) &lt;= L</text:p>
      <text:p text:style-name="P55"><draw:g text:anchor-type="paragraph" draw:z-index="243" draw:style-name="gr1"><draw:line draw:style-name="gr14" draw:text-style-name="P258" svg:x1="1.636cm" svg:y1="2.617cm" svg:x2="6.717cm" svg:y2="2.617cm"><text:p/></draw:line><draw:line draw:style-name="gr14" draw:text-style-name="P258" svg:x1="4.176cm" svg:y1="0.435cm" svg:x2="4.176cm" svg:y2="4.847cm"><text:p/></draw:line><draw:frame draw:style-name="gr47" draw:text-style-name="P263" svg:width="1.368cm" svg:height="0.927cm" svg:x="1.005cm" svg:y="2.561cm"><draw:text-box><text:p text:style-name="P252"><text:span text:style-name="T56">X</text:span></text:p></draw:text-box></draw:frame><draw:frame draw:style-name="gr47" draw:text-style-name="P263" svg:width="1.273cm" svg:height="0.927cm" svg:x="3.319cm" svg:y="-0.065cm"><draw:text-box><text:p text:style-name="P252"><text:span text:style-name="T56">Y</text:span></text:p></draw:text-box></draw:frame><draw:line draw:style-name="gr45" draw:text-style-name="P258" svg:x1="1.636cm" svg:y1="4.795cm" svg:x2="2.907cm" svg:y2="3.704cm"><text:p/></draw:line><draw:line draw:style-name="gr48" draw:text-style-name="P258" svg:x1="2.913cm" svg:y1="1.524cm" svg:x2="2.913cm" svg:y2="3.705cm"><text:p/></draw:line><draw:line draw:style-name="gr45" draw:text-style-name="P258" svg:x1="2.913cm" svg:y1="3.704cm" svg:x2="5.454cm" svg:y2="3.704cm"><text:p/></draw:line><draw:line draw:style-name="gr49" draw:text-style-name="P258" svg:x1="5.452cm" svg:y1="1.524cm" svg:x2="5.452cm" svg:y2="3.705cm"><text:p/></draw:line><draw:line draw:style-name="gr45" draw:text-style-name="P258" svg:x1="5.452cm" svg:y1="1.526cm" svg:x2="6.72cm" svg:y2="0.435cm"><text:p/></draw:line><draw:line draw:style-name="gr46" draw:text-style-name="P258" svg:x1="4.176cm" svg:y1="3.159cm" svg:x2="5.447cm" svg:y2="3.159cm"><text:p/></draw:line><draw:frame draw:style-name="gr47" draw:text-style-name="P263" svg:width="0.985cm" svg:height="0.927cm" svg:x="4.469cm" svg:y="3.17cm"><draw:text-box><text:p text:style-name="P252"><text:span text:style-name="T56">L</text:span></text:p></draw:text-box></draw:frame><draw:line draw:style-name="gr45" draw:text-style-name="P258" svg:x1="2.913cm" svg:y1="1.524cm" svg:x2="5.454cm" svg:y2="1.524cm"><text:p/></draw:line></draw:g></text:p>
      <text:list xml:id="list33655488" text:continue-numbering="true" text:style-name="L1">
        <text:list-item>
          <text:list>
            <text:list-item>
              <text:h text:style-name="P217" text:outline-level="2"><text:alphabetical-index-mark-start text:id="IMark158104760"/>FT_DERIV<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 : REAL (Multiplikator)</text:p>
      <text:p text:style-name="P22"><text:tab/>RUN : BOOL (Freigabe Eingang)</text:p>
      <text:p text:style-name="P25"><draw:frame draw:style-name="fr4" draw:name="Grafik66" text:anchor-type="paragraph" svg:x="1.109cm" svg:y="0.686cm" svg:width="2.281cm" svg:height="2.2cm" draw:z-index="168"><draw:image xlink:href="Pictures/10000000000000AC000000A61FC4E3D2.png" xlink:type="simple" xlink:show="embed" xlink:actuate="onLoad"/></draw:frame>Output<text:tab/>OUT : REAL (Ableitung des Eingangssignals K * <text:span text:style-name="T41"></text:span>X / <text:span text:style-name="T41">T</text:span>)</text:p>
      <text:p text:style-name="P25"><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41"></text:span>X / <text:span text:style-name="T41">T = 1 * (4 – 3) / 1 = 1.</text:span></text:p>
      <text:p text:style-name="P55"><text:soft-page-break/><text:span text:style-name="T41">Anders ausgedrückt ist die Ableitung des Eingangssignals die momentane Steigung des Eingangssignals. </text:span><text:span text:style-name="T5">Mit dem Eingang RUN kann FT_DERIV </text:span><text:span text:style-name="T9">enabled,</text:span><text:span text:style-name="T5"> beziehungsweise </text:span><text:span text:style-name="T9">disabled</text:span><text:span text:style-name="T5"> werden. FT_DERIV arbeitet intern in Mikrosekunden und wird da</text:span><text:span text:style-name="T5">durch auch </text:span><text:span text:style-name="T5">den Anforderungen <text:s/>sehr schneller SPS Controller mit Zykluszeiten unter einer Millisekunde gerecht.</text:span></text:p>
      <text:p text:style-name="P192">Strukturbild:</text:p>
      <text:p text:style-name="P60"><draw:g text:anchor-type="paragraph" draw:z-index="645" draw:style-name="gr81"><draw:rect draw:style-name="gr28" draw:text-style-name="P256" svg:width="2.77cm" svg:height="1.574cm" svg:x="5.124cm" svg:y="-0.161cm"><text:p/></draw:rect><draw:line draw:style-name="gr29" draw:text-style-name="P256" svg:x1="5.311cm" svg:y1="-0.009cm" svg:x2="5.311cm" svg:y2="1.208cm"><text:p/></draw:line><draw:line draw:style-name="gr29" draw:text-style-name="P256" svg:x1="7.631cm" svg:y1="1.208cm" svg:x2="5.311cm" svg:y2="1.208cm"><text:p/></draw:line><draw:line draw:style-name="gr30" draw:text-style-name="P256" svg:x1="4.355cm" svg:y1="0.649cm" svg:x2="5.121cm" svg:y2="0.649cm"><text:p/></draw:line><draw:frame draw:style-name="gr82" draw:text-style-name="P257" svg:width="0.519cm" svg:height="0.495cm" svg:x="3.986cm" svg:y="0.474cm"><draw:text-box><text:p>in</text:p></draw:text-box></draw:frame><draw:line draw:style-name="gr30" draw:text-style-name="P256" svg:x1="7.895cm" svg:y1="0.635cm" svg:x2="8.661cm" svg:y2="0.635cm"><text:p/></draw:line><draw:frame draw:style-name="gr83" draw:text-style-name="P257" svg:width="0.519cm" svg:height="0.987cm" svg:x="8.692cm" svg:y="0.451cm"><draw:text-box><text:p>out</text:p></draw:text-box></draw:frame><draw:frame draw:style-name="gr83" draw:text-style-name="P257" svg:width="0.518cm" svg:height="0.495cm" svg:x="5.124cm" svg:y="1.412cm"><draw:text-box><text:p>K</text:p></draw:text-box></draw:frame></draw:g></text:p>
      <text:list xml:id="list33648265" text:continue-numbering="true" text:style-name="L1">
        <text:list-item>
          <text:list>
            <text:list-item>
              <text:h text:style-name="P217" text:outline-level="2"><text:alphabetical-index-mark-start text:id="IMark158104760"/>FT_IMP<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T : TIME (Zeitkonstante)</text:p>
      <text:p text:style-name="P22"><text:tab/>K : REAL (Multiplikator)</text:p>
      <text:p text:style-name="P22"><draw:frame draw:style-name="fr4" draw:name="Grafik68" text:anchor-type="paragraph" svg:x="1.196cm" svg:y="0.681cm" svg:width="2.281cm" svg:height="2.2cm" draw:z-index="169"><draw:image xlink:href="Pictures/10000000000000AC000000A67B683ACB.png" xlink:type="simple" xlink:show="embed" xlink:actuate="onLoad"/></draw:frame>Output<text:tab/>OUT : REAL <text:span text:style-name="T35">(Hochpass</text:span><text:span text:style-name="T36"> Mit Zeitkonstante T</text:span><text:span text:style-name="T35">)</text:span></text:p>
      <text:p text:style-name="P25"><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25"><draw:g text:anchor-type="paragraph" draw:z-index="451" draw:style-name="gr1"><draw:rect draw:style-name="gr28" draw:text-style-name="P256" svg:width="2.994cm" svg:height="1.629cm" svg:x="4.93cm" svg:y="0.982cm"><text:p/></draw:rect><draw:line draw:style-name="gr29" draw:text-style-name="P256" svg:x1="5.14cm" svg:y1="1.14cm" svg:x2="5.14cm" svg:y2="2.399cm"><text:p/></draw:line><draw:line draw:style-name="gr30" draw:text-style-name="P256" svg:x1="4.102cm" svg:y1="1.824cm" svg:x2="4.93cm" svg:y2="1.824cm"><text:p/></draw:line><draw:frame draw:style-name="gr66" draw:text-style-name="P257" svg:width="0.56cm" svg:height="0.495cm" svg:x="3.701cm" svg:y="1.638cm"><draw:text-box><text:p>in</text:p></draw:text-box></draw:frame><draw:line draw:style-name="gr30" draw:text-style-name="P256" svg:x1="7.927cm" svg:y1="1.808cm" svg:x2="8.755cm" svg:y2="1.808cm"><text:p/></draw:line><draw:frame draw:style-name="gr67" draw:text-style-name="P257" svg:width="0.56cm" svg:height="0.495cm" svg:x="8.788cm" svg:y="1.617cm"><draw:text-box><text:p>out</text:p></draw:text-box></draw:frame><draw:frame draw:style-name="gr67" draw:text-style-name="P257" svg:width="0.56cm" svg:height="0.495cm" svg:x="4.93cm" svg:y="2.61cm"><draw:text-box><text:p>K</text:p></draw:text-box></draw:frame><draw:frame draw:style-name="gr67" draw:text-style-name="P257" svg:width="0.558cm" svg:height="0.495cm" svg:x="7.608cm" svg:y="2.61cm"><draw:text-box><text:p>T</text:p></draw:text-box></draw:frame><draw:custom-shape draw:style-name="gr68" draw:text-style-name="P256"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69" draw:text-style-name="P256" svg:width="2.664cm" svg:height="0.126cm" svg:x="5.149cm" svg:y="1.056cm"><text:p/></draw:rect><draw:rect draw:style-name="gr69" draw:text-style-name="P256" svg:width="0.158cm" svg:height="1.341cm" svg:x="7.656cm" svg:y="1.056cm"><text:p/></draw:rect></draw:g>Strukturbild:</text:p>
      <text:p text:style-name="P25"/>
      <text:list xml:id="list33633246" text:continue-numbering="true" text:style-name="L1">
        <text:list-item>
          <text:list>
            <text:list-item>
              <text:h text:style-name="P217" text:outline-level="2"><text:soft-page-break/><text:alphabetical-index-mark-start text:id="IMark158104760"/>FT_INT<text:alphabetical-index-mark-end text:id="IMark158104760"/></text:h>
            </text:list-item>
          </text:list>
        </text:list-item>
      </text:list>
      <text:p text:style-name="P22">Type<text:tab/>Funktionsbaustein</text:p>
      <text:p text:style-name="P22"><text:span text:style-name="T16">Input</text:span><text:tab/>IN : REAL (Eingangssignal)</text:p>
      <text:p text:style-name="P25"><text:tab/>K : REAL (Multiplikator)</text:p>
      <text:p text:style-name="P25"><text:tab/>RUN : BOOL (Freigabe Eingang)</text:p>
      <text:p text:style-name="P25"><text:tab/>RST : BOOL (Reset Eingang)</text:p>
      <text:p text:style-name="P25"><text:tab/>OUT_MIN : REAL (unteres Ausgangs Limit)</text:p>
      <text:p text:style-name="P25"><text:tab/>OUT_MAX : REAL (oberes Ausgangs Limit)</text:p>
      <text:p text:style-name="P25">Output<text:tab/>OUT : REAL (Ausgangssignal)</text:p>
      <text:p text:style-name="P55"><draw:frame draw:style-name="fr4" draw:name="Grafik69" text:anchor-type="paragraph" svg:x="1.025cm" svg:y="0.667cm" svg:width="4.069cm" svg:height="3.54cm" draw:z-index="598"><draw:image xlink:href="Pictures/10000000000001340000010CEF610A1B.png" xlink:type="simple" xlink:show="embed" xlink:actuate="onLoad"/></draw:frame><text:tab/>LIM : BOOL (TRUE wenn der Ausgang an einem Limit steht)</text:p>
      <text:p text:style-name="P25"/>
      <text:p text:style-name="P25">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 text:style-name="T41">FT_INT <text:line-break/>arbeitet intern in Mikrosekunden und wird dadurch auch den Anforderungen <text:s/>sehr Schneller SPS Controller mit Zykluszeiten unter einer Millisekunde gerecht.</text:span></text:p>
      <text:p text:style-name="P60">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60">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89"><text:soft-page-break/>Strukturbild:</text:p>
      <text:p text:style-name="P87"><draw:g text:anchor-type="paragraph" draw:z-index="167" draw:style-name="gr1"><draw:rect draw:style-name="gr28" draw:text-style-name="P256" svg:width="3.183cm" svg:height="1.736cm" svg:x="4.676cm" svg:y="-0.191cm"><text:p/></draw:rect><draw:line draw:style-name="gr29" draw:text-style-name="P256" svg:x1="7.522cm" svg:y1="0.08cm" svg:x2="4.896cm" svg:y2="1.319cm"><text:p/></draw:line><draw:line draw:style-name="gr30" draw:text-style-name="P256" svg:x1="3.797cm" svg:y1="0.701cm" svg:x2="4.677cm" svg:y2="0.701cm"><text:p/></draw:line><draw:frame draw:style-name="gr31" draw:text-style-name="P257" svg:width="0.595cm" svg:height="0.495cm" svg:x="3.371cm" svg:y="0.509cm"><draw:text-box><text:p>in</text:p></draw:text-box></draw:frame><draw:line draw:style-name="gr30" draw:text-style-name="P256" svg:x1="7.86cm" svg:y1="0.687cm" svg:x2="8.74cm" svg:y2="0.687cm"><text:p/></draw:line><draw:frame draw:style-name="gr31" draw:text-style-name="P257" svg:width="0.595cm" svg:height="0.495cm" svg:x="8.777cm" svg:y="0.485cm"><draw:text-box><text:p>out</text:p></draw:text-box></draw:frame><draw:frame draw:style-name="gr31" draw:text-style-name="P257" svg:width="0.595cm" svg:height="0.495cm" svg:x="4.676cm" svg:y="1.545cm"><draw:text-box><text:p>K</text:p></draw:text-box></draw:frame></draw:g></text:p>
      <text:list xml:id="list33632038" text:continue-numbering="true" text:style-name="L1">
        <text:list-item>
          <text:list>
            <text:list-item>
              <text:h text:style-name="P217" text:outline-level="2"><text:alphabetical-index-mark-start text:id="IMark158104760"/>FT_INT2<text:alphabetical-index-mark-end text:id="IMark158104760"/></text:h>
            </text:list-item>
          </text:list>
        </text:list-item>
      </text:list>
      <text:p text:style-name="P22">Type<text:tab/>Funktionsbaustein</text:p>
      <text:p text:style-name="P22"><text:span text:style-name="T16">Input</text:span><text:tab/>IN : REAL (Eingangssignal)</text:p>
      <text:p text:style-name="P25"><text:tab/>K : REAL (Multiplikator)</text:p>
      <text:p text:style-name="P25"><text:tab/>RUN : BOOL (Freigabe Eingang)</text:p>
      <text:p text:style-name="P25"><text:tab/>RST : BOOL (Reset Eingang)</text:p>
      <text:p text:style-name="P25"><text:tab/>OUT_MIN : REAL (unteres Ausgangs Limit)</text:p>
      <text:p text:style-name="P25"><text:tab/>OUT_MAX : REAL (oberes Ausgangs Limit)</text:p>
      <text:p text:style-name="P25">Output<text:tab/>OUT : REAL (Ausgangssignal)</text:p>
      <text:p text:style-name="P55"><text:tab/>LIM : BOOL (TRUE wenn der Ausgang an einem Limit steht)</text:p>
      <text:p text:style-name="P25"><draw:frame draw:style-name="fr4" draw:name="Grafik581" text:anchor-type="paragraph" svg:x="0.937cm" svg:y="0.034cm" svg:width="4.069cm" svg:height="3.54cm" draw:z-index="600"><draw:image xlink:href="Pictures/10000000000001340000010C9C4064D5.png" xlink:type="simple" xlink:show="embed" xlink:actuate="onLoad"/></draw:frame></text:p>
      <text:p text:style-name="P25"><text:line-break/>FT_INT2 ist ein Integratorbaustein <text:span text:style-name="T41">der intern mit doppelter Genauigkeit rechnet und eine Auflösung von 14 Dezimalstellen sicherstellt. Dies macht FT_INT2 im Gegensatz zu FT_INT für z.B. Verbrauchszähler und ähnliche Anwendungen geeignet.</text:span></text:p>
      <text:p text:style-name="P60">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Dezimalstellen) rechnet und addiert auch kleinste Eingangswerte auf so dass keine Informationen verloren gehen.</text:p>
      <text:list xml:id="list33637388" text:continue-numbering="true" text:style-name="L1">
        <text:list-item>
          <text:list>
            <text:list-item>
              <text:h text:style-name="P217" text:outline-level="2"><text:soft-page-break/><text:alphabetical-index-mark-start text:id="IMark158104760"/>FT_PD<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V : REAL (Nachstellzeit des Differenzierers in Sekunden)<text:tab/></text:p>
      <text:p text:style-name="P25"><draw:frame draw:style-name="fr4" draw:name="Grafik600" text:anchor-type="paragraph" svg:x="1.025cm" svg:y="0.667cm" svg:width="2.281cm" svg:height="2.2cm" draw:z-index="618"><draw:image xlink:href="Pictures/10000000000000AC000000A644C28F3E.png" xlink:type="simple" xlink:show="embed" xlink:actuate="onLoad"/></draw:frame>Output<text:tab/>Y : REAL (Ausgang des Reglers)</text:p>
      <text:p text:style-name="P25"><text:line-break/>FT_PD ist ein PD-Regler der nach folgender Formel arbeitet:</text:p>
      <text:p text:style-name="P55">Y = KP * (IN + DERIV(IN))</text:p>
      <text:p text:style-name="P176">FT_PD kann zusammen mit den Bausteinen CTRL_IN und CTRL_OUT zum Aufbau eines PD Reglers benutzt werden.</text:p>
      <text:p text:style-name="P59"><draw:frame draw:style-name="fr4" draw:name="Grafik601" text:anchor-type="paragraph" svg:x="1.025cm" svg:y="0.658cm" svg:width="4.89cm" svg:height="2.371cm" draw:z-index="619"><draw:image xlink:href="Pictures/10000000000001080000008035F37D22.png" xlink:type="simple" xlink:show="embed" xlink:actuate="onLoad"/></draw:frame>Die folgende Grafik verdeutlicht die interne Struktur des Reglers:</text:p>
      <text:p text:style-name="P195"/>
      <text:list xml:id="list33650681" text:continue-numbering="true" text:style-name="L1">
        <text:list-item>
          <text:list>
            <text:list-item>
              <text:h text:style-name="P217" text:outline-level="2"><text:alphabetical-index-mark-start text:id="IMark158104760"/>FT_PDT1<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V : REAL (Nachstellzeit des Differenzierers in Sekunden)</text:p>
      <text:p text:style-name="P52"><text:tab/>T1 : REAL (T1 des PT1 Gliedes in Sekunden)</text:p>
      <text:p text:style-name="P25"><draw:frame draw:style-name="fr4" draw:name="Grafik602" text:anchor-type="paragraph" svg:x="1.067cm" svg:y="0.644cm" svg:width="2.731cm" svg:height="2.649cm" draw:z-index="620"><draw:image xlink:href="Pictures/10000000000000CE000000C850335A03.png" xlink:type="simple" xlink:show="embed" xlink:actuate="onLoad"/></draw:frame>Output<text:tab/>Y : REAL (Ausgang des Reglers)</text:p>
      <text:p text:style-name="P25"><text:soft-page-break/><text:line-break/>FT_PDT1 ist ein PD-Regler mit T1 Glied im D-Anteil. Der Baustein arbeitet nach folgender Formel:</text:p>
      <text:p text:style-name="P55">Y = KP * (IN + PT1(DERIV(IN))</text:p>
      <text:p text:style-name="P30">FT_PDT1 kann zusammen mit den Bausteinen CTRL_IN und CTRL_OUT sowie weiteren Regelungstechnischen Bausteinen zum Aufbau komplexer Reglerschaltungen benutzt werden.</text:p>
      <text:p text:style-name="P61"><draw:frame draw:style-name="fr4" draw:name="Grafik603" text:anchor-type="paragraph" svg:x="1.067cm" svg:y="0.667cm" svg:width="6.72cm" svg:height="2.371cm" draw:z-index="621"><draw:image xlink:href="Pictures/100000000000016B00000080FCC4CFA6.png" xlink:type="simple" xlink:show="embed" xlink:actuate="onLoad"/></draw:frame>Interner Aufbau des Bausteins:</text:p>
      <text:p text:style-name="P61"/>
      <text:list xml:id="list33632348" text:continue-numbering="true" text:style-name="L1">
        <text:list-item>
          <text:list>
            <text:list-item>
              <text:h text:style-name="P217" text:outline-level="2"><text:alphabetical-index-mark-start text:id="IMark158104760"/>FT_PI<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ILIM_L : REAL (untere Ausgangsbegrenzung des Integrators)</text:p>
      <text:p text:style-name="P22"><text:tab/>ILIM_H : REAL (obere Ausgangsbegrenzung des Integrators)</text:p>
      <text:p text:style-name="P52"><text:tab/>IEN : BOOL (<text:span text:style-name="T16">Enable</text:span> für den <text:span text:style-name="T16">Integrator</text:span>)</text:p>
      <text:p text:style-name="P52"><text:tab/>RST : BOOL (Asynchroner Reset-Eingang)</text:p>
      <text:p text:style-name="P25">Output<text:tab/>Y : REAL (Ausgang des Reglers)<text:tab/></text:p>
      <text:p text:style-name="P25"><draw:frame draw:style-name="fr4" draw:name="Grafik368" text:anchor-type="paragraph" svg:x="1.002cm" svg:y="0.623cm" svg:width="3.18cm" svg:height="3.99cm" draw:z-index="622"><draw:image xlink:href="Pictures/10000000000000F00000012EC9B3DE67.png" xlink:type="simple" xlink:show="embed" xlink:actuate="onLoad"/></draw:frame><text:tab/>LIM : BOOL (TRUE, wenn der Ausgang ein Limit erreicht hat)</text:p>
      <text:p text:style-name="P25"><text:soft-page-break/><text:line-break/>FT_PI ist ein PI-Regler der nach folgender Formel arbeitet:</text:p>
      <text:p text:style-name="P55">Y = KP * IN + KI * INTEG(IN)</text:p>
      <text:p text:style-name="P42"><text:span text:style-name="T4">Die Eingangswerte ILIM_H und ILIM_L begrenzen den Arbeitsbereich des internen Integrators. Mit RST kann der interne </text:span><text:span text:style-name="T13">Integrator</text:span><text:span text:style-name="T4"> jederzeit auf 0 gesetzt werden. Der Ausgang LIM signalisiert das der </text:span><text:span text:style-name="T8">Integrator</text:span><text:span text:style-name="T4"> an eine der Grenzen ILIM_L oder ILIM_H gelaufen ist. Der PI-Regler arbeitet frei laufend und benutzt zur Berechnung des Integrators die Trapezregel für höchste Genauigkeit und optimale Geschwindigkeit. Die Default-Werte der Eingangsparameter sind wie folgt vordefiniert: KP = 1, KI = 1, ILIM_L = -1E38 und ILIM_H = +1E38.</text:span></text:p>
      <text:p text:style-name="P77"><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8">Integrator</text:span><text:span text:style-name="T4"> wird dann bei Erreichen eines </text:span><text:span text:style-name="T8">Limits</text:span><text:span text:style-name="T4"> gestoppt und verharrt auf dem letzten gültigen </text:span><text:span text:style-name="T4">Wert. Für andere Wind-</text:span><text:span text:style-name="T8">Up</text:span><text:span text:style-name="T4"> Maßnahmen kann </text:span><text:span text:style-name="T4">der </text:span><text:span text:style-name="T8">Integrator</text:span><text:span text:style-name="T4"> jederzeit mit dem Eingang IEN = FALSE separat gesteuert werden, der </text:span><text:span text:style-name="T8">Integrator</text:span><text:span text:style-name="T4"> läuft nur wenn IEN = TRUE.</text:span></text:p>
      <text:p text:style-name="P55"><draw:frame draw:style-name="fr4" draw:name="Grafik369" text:anchor-type="paragraph" svg:x="1.134cm" svg:y="0.617cm" svg:width="5.3cm" svg:height="3.57cm" draw:z-index="613"><draw:image xlink:href="Pictures/100000000000011E000000C1EB7B3A5F.png" xlink:type="simple" xlink:show="embed" xlink:actuate="onLoad"/></draw:frame>Die folgende Grafik verdeutlicht die interne Struktur des Reglers:</text:p>
      <text:p text:style-name="P77"/>
      <text:p text:style-name="P77"><draw:frame draw:style-name="fr4" draw:name="Grafik596" text:anchor-type="paragraph" svg:x="1.069cm" svg:y="1.148cm" svg:width="13.831cm" svg:height="2.979cm" draw:z-index="623"><draw:image xlink:href="Pictures/10000000000002B9000000968052015A.png" xlink:type="simple" xlink:show="embed" xlink:actuate="onLoad"/></draw:frame>FT_PI kann zusammen mit den Bausteinen CTRL_IN und CTRL_OUT zum Aufbau eines PI Reglers benutzt werden.</text:p>
      <text:p text:style-name="P92"><text:soft-page-break/></text:p>
      <text:list xml:id="list336381561" text:continue-numbering="true" text:style-name="L1">
        <text:list-item>
          <text:list>
            <text:list-item>
              <text:h text:style-name="P217" text:outline-level="2"><text:alphabetical-index-mark-start text:id="IMark158104760"/>FT_PID<text:alphabetical-index-mark-end text:id="IMark158104760"/></text:h>
            </text:list-item>
          </text:list>
        </text:list-item>
      </text:list>
      <text:p text:style-name="P22">Type<text:tab/>Funktionsbaustein</text:p>
      <text:p text:style-name="P22"><text:span text:style-name="T16">Input</text:span><text:tab/>IN : REAL (Eingangswert)</text:p>
      <text:p text:style-name="P22"><text:tab/>KP : REAL (Verstärkung des Reglers)</text:p>
      <text:p text:style-name="P22"><text:tab/>TN : REAL (Nachstellzeit des Reglers in Sekunden)</text:p>
      <text:p text:style-name="P22"><text:tab/>TV : REAL (Vorhaltezeit des Reglers in Sekunden)</text:p>
      <text:p text:style-name="P22"><text:tab/>ILIM_L : REAL (untere Ausgangsbegrenzung des Integrators)</text:p>
      <text:p text:style-name="P22"><text:tab/>ILIM_H : REAL (obere Ausgangsbegrenzung des Integrators)</text:p>
      <text:p text:style-name="P52"><text:tab/>IEN : BOOL (<text:span text:style-name="T16">Enable</text:span> für den <text:span text:style-name="T16">Integrator</text:span>)</text:p>
      <text:p text:style-name="P52"><text:tab/>RST : BOOL (Asynchroner Reset-Eingang)</text:p>
      <text:p text:style-name="P25">Output<text:tab/>Y : REAL (Ausgang des Reglers)<text:tab/></text:p>
      <text:p text:style-name="P25"><draw:frame draw:style-name="fr4" draw:name="Grafik204" text:anchor-type="paragraph" svg:x="1.025cm" svg:y="0.649cm" svg:width="3.18cm" svg:height="4.44cm" draw:z-index="624"><draw:image xlink:href="Pictures/10000000000000F000000150590A32A5.png" xlink:type="simple" xlink:show="embed" xlink:actuate="onLoad"/></draw:frame><text:tab/>LIM : BOOL (TRUE, wenn der Ausgang ein Limit erreicht hat)</text:p>
      <text:p text:style-name="P55"><text:line-break/>FT_PID ist ein PID-Regler der nach folgender Formel arbeitet:</text:p>
      <text:p text:style-name="P55">Y = KP * ( IN + 1/TN * INTEG(IN) + TV *DERIV(IN))</text:p>
      <text:p text:style-name="P25">Die Regelparameter werden in der Form KP, TN und TV angegeben, falls die Parameter als KP, KI und KD vorliegen können sie entsprechend der folgenden Formel umgerechnet werden:</text:p>
      <text:p text:style-name="P55"><text:soft-page-break/>TN = KP/KI und TV = KD/KP</text:p>
      <text:p text:style-name="P25">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gangsparameter sind wie folgt vordefiniert: KP = 1, TN = 1s, TV = 1s, ILIM_L = -1E38 und ILIM_H = +1E38.</text:p>
      <text:p text:style-name="P55">Anti <text:span text:style-name="T16">Wind-Up</text:span>: Regelbausteine mit Interalanteil neigen zu dem so genannten Wind <text:span text:style-name="T16">Up Effekt.</text:span> Ein <text:span text:style-name="T16">Wind-Up</text:span>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 text:style-name="T16">Integrator</text:span> wird dann bei Erreichen eines <text:span text:style-name="T16">Limits</text:span> gestoppt und verharrt auf dem letzten gültigen Wert. Für andere Wind-<text:span text:style-name="T16">Up</text:span> Maßnahmen kann der <text:span text:style-name="T16">Integrator</text:span> jederzeit mit dem Eingang IEN = FALSE separat gesteuert werden, der <text:span text:style-name="T16">Integrator</text:span> läuft nur wenn IEN = TRUE.</text:p>
      <text:p text:style-name="P55"><draw:frame draw:style-name="fr4" draw:name="Grafik370" text:anchor-type="paragraph" svg:x="1.067cm" svg:y="0.667cm" svg:width="7.519cm" svg:height="3.5cm" draw:z-index="614"><draw:image xlink:href="Pictures/1000000000000196000000BD42A5D9B7.png" xlink:type="simple" xlink:show="embed" xlink:actuate="onLoad"/></draw:frame>Die folgende Grafik zeigt die interne Struktur des PID Reglers:</text:p>
      <text:p text:style-name="P55"/>
      <text:p text:style-name="P55">FT_PID kann zusammen mit den Bausteinen CTRL_IN und CTRL_OUT zum Aufbau eines PID Reglers benutzt werden.</text:p>
      <text:p text:style-name="P60"><draw:frame draw:style-name="fr4" draw:name="Grafik379" text:anchor-type="paragraph" svg:x="1.09cm" svg:y="0.176cm" svg:width="13.831cm" svg:height="3.311cm" draw:z-index="625"><draw:image xlink:href="Pictures/10000000000002B9000000A767162A86.png" xlink:type="simple" xlink:show="embed" xlink:actuate="onLoad"/></draw:frame></text:p>
      <text:list xml:id="list33640215" text:continue-numbering="true" text:style-name="L1">
        <text:list-item>
          <text:list>
            <text:list-item>
              <text:h text:style-name="P217" text:outline-level="2"><text:soft-page-break/><text:alphabetical-index-mark-start text:id="IMark158104760"/>FT_PIDW<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N : REAL (Nachstellzeit des Reglers in Sekunden)</text:p>
      <text:p text:style-name="P52"><text:tab/>TV : REAL (Vorhaltezeit des Reglers in Sekunden)</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06" text:anchor-type="paragraph" svg:x="1.09cm" svg:y="0.667cm" svg:width="3.18cm" svg:height="3.99cm" draw:z-index="628"><draw:image xlink:href="Pictures/10000000000000F00000012E0C86952B.png" xlink:type="simple" xlink:show="embed" xlink:actuate="onLoad"/></draw:frame><text:tab/>LIM : BOOL (TRUE, wenn der Ausgang ein Limit erreicht hat)</text:p>
      <text:p text:style-name="P55"><text:line-break/>FT_PIDW ist ein PID-Regler mit Anti Wind-<text:span text:style-name="T16">Up</text:span> Hold der nach folgender Formel arbeitet:</text:p>
      <text:p text:style-name="P55">Y = KP * ( IN + 1/TN * INTEG(IN) + TV *DERIV(IN))</text:p>
      <text:p text:style-name="P25">Die Regelparameter werden in der Form KP, TN und TV angegeben, falls die Parameter als KP, KI und KD vorliegen können sie entsprechend der folgenden Formel umgerechnet werden:</text:p>
      <text:p text:style-name="P55">TN = KP/KI und TV = KD/KP</text:p>
      <text:p text:style-name="P42"><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TN = 1s, TV = 1s, <text:s/>ILIM_L = -1E38 und ILIM_H = +1E38.</text:span></text:p>
      <text:p text:style-name="P77"><text:span text:style-name="T4">Anti </text:span><text:span text:style-name="T8">Wind-Up</text:span><text:span text:style-name="T4">: Regelbausteine mit Interalanteil neigen zu dem so genannten Wind-</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text:span><text:soft-page-break/><text:span text:style-name="T4">wen</text:span><text:span text:style-name="T4">digen Abbau des In</text:span><text:span text:style-name="T4">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25">Der Baustein FT_PIDW hat einen so genannten Wind-<text:span text:style-name="T16">Up</text:span> Hold der bei erreichen einer Ausgangsbegrenzung (LIM_L, LIM_H) den <text:span text:style-name="T16">Integrator</text:span> auf dem letzten Wert einfriert und so einen Wind-<text:span text:style-name="T16">Up</text:span> verhindert.</text:p>
      <text:p text:style-name="P55"><draw:frame draw:style-name="fr4" draw:name="Grafik607" text:anchor-type="paragraph" svg:x="1.067cm" svg:y="0.667cm" svg:width="7.519cm" svg:height="3.5cm" draw:z-index="629"><draw:image xlink:href="Pictures/1000000000000196000000BD42A5D9B7.png" xlink:type="simple" xlink:show="embed" xlink:actuate="onLoad"/></draw:frame>Die folgende Grafik zeigt die interne Struktur des PIDW Reglers:</text:p>
      <text:p text:style-name="P88"/>
      <text:p text:style-name="P59">FT_PIDW kann zusammen mit den Bausteinen CTRL_IN und CTRL_OUT zum Aufbau eines PID Reglers benutzt werden.</text:p>
      <text:list xml:id="list33648785" text:continue-numbering="true" text:style-name="L1">
        <text:list-item>
          <text:list>
            <text:list-item>
              <text:h text:style-name="P217" text:outline-level="2"><text:alphabetical-index-mark-start text:id="IMark158104760"/>FT_PIDWL<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N : REAL (Nachstellzeit des Reglers in Sekunden)</text:p>
      <text:p text:style-name="P52"><text:tab/>TV : REAL (Vorhaltezeit des Reglers in Sekunden)</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19" text:anchor-type="paragraph" svg:x="1.09cm" svg:y="0.667cm" svg:width="3.18cm" svg:height="3.99cm" draw:z-index="641"><draw:image xlink:href="Pictures/10000000000000F00000012E0C86952B.png" xlink:type="simple" xlink:show="embed" xlink:actuate="onLoad"/></draw:frame><text:tab/>LIM : BOOL (TRUE, wenn der Ausgang ein Limit erreicht hat)</text:p>
      <text:p text:style-name="P55"><text:soft-page-break/><text:line-break/>FT_PIDW ist ein PID-Regler mit dynamischen Wind-<text:span text:style-name="T16">Up</text:span> Reset der nach folgender Formel arbeitet:</text:p>
      <text:p text:style-name="P55">Y = KP * ( IN + 1/TN * INTEG(IN) + TV *DERIV(IN))</text:p>
      <text:p text:style-name="P25">Die Regelparameter werden in der Form KP, TN und TV angegeben, falls die Parameter als KP, KI und KD vorliegen können sie entsprechend der folgenden Formel umgerechnet werden:</text:p>
      <text:p text:style-name="P55">TN = KP/KI und TV = KD/KP</text:p>
      <text:p text:style-name="P42"><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TN = 1s, TV = 1s, <text:s/>ILIM_L = -1E38 und ILIM_H = +1E38.</text:span></text:p>
      <text:p text:style-name="P77"><text:span text:style-name="T4">Anti </text:span><text:span text:style-name="T8">Wind-Up</text:span><text:span text:style-name="T4">: Regelbausteine mit Interalanteil neigen zu dem so genannten Wind-</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text:span><text:span text:style-name="T4">Übergang in den Regelbereich erst zu einem langen und Zeitaufwen</text:span><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25">Der Baustein FT_PIW hat einen so genannten dynamischen Wind-<text:span text:style-name="T16">Up</text:span> Reset der bei erreichen einer Ausgangsbegrenzung (LIM_L, LIM_H) den <text:span text:style-name="T16">Integrator</text:span> auf einen Wert zurücksetzt der dem Ausgangslimit entspricht. Wenn nach erreichen einen <text:span text:style-name="T16">Limits</text:span> der Regler wieder in den Arbeitsbereich eintritt muss der <text:span text:style-name="T16">Integrator</text:span> nicht erst Auf- oder Ab- integriert werden, und der Regler ist ohne Verzögerung sofort Einsatzbereit. Die dynamische Anti Wind-<text:span text:style-name="T16">Up</text:span> Methode ist die in den meisten Fällen ohne Nachteile vorzuziehende Methode, da Sie den Regler nicht negativ beeinflusst und die Nachteile des Wind_<text:span text:style-name="T16">Up</text:span> verhindert.</text:p>
      <text:p text:style-name="P55"><draw:frame draw:style-name="fr4" draw:name="Grafik620" text:anchor-type="paragraph" svg:x="1.067cm" svg:y="0.667cm" svg:width="7.519cm" svg:height="3.5cm" draw:z-index="642"><draw:image xlink:href="Pictures/1000000000000196000000BD42A5D9B7.png" xlink:type="simple" xlink:show="embed" xlink:actuate="onLoad"/></draw:frame>Die folgende Grafik zeigt die interne Struktur des PIDW Reglers:</text:p>
      <text:p text:style-name="P88"><text:soft-page-break/></text:p>
      <text:p text:style-name="P59">FT_PIDW kann zusammen mit den Bausteinen CTRL_IN und CTRL_OUT zum Aufbau eines PID Reglers benutzt werden.</text:p>
      <text:list xml:id="list33638000" text:continue-numbering="true" text:style-name="L1">
        <text:list-item>
          <text:list>
            <text:list-item>
              <text:h text:style-name="P217" text:outline-level="2"><text:alphabetical-index-mark-start text:id="IMark158104760"/>FT_PIW<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05" text:anchor-type="paragraph" svg:x="1.002cm" svg:y="0.667cm" svg:width="3.18cm" svg:height="3.54cm" draw:z-index="627"><draw:image xlink:href="Pictures/10000000000000F00000010C63930DF9.png" xlink:type="simple" xlink:show="embed" xlink:actuate="onLoad"/></draw:frame><text:tab/>LIM : BOOL (TRUE, wenn der Ausgang ein Limit erreicht hat)</text:p>
      <text:p text:style-name="P25"><text:line-break/>FT_PIW ist ein PI-Regler mit Anti Wind-<text:span text:style-name="T16">Up</text:span> <text:span text:style-name="T16">Hold</text:span> der nach folgender Formel arbeitet:</text:p>
      <text:p text:style-name="P55">Y = KP * IN + KI * INTEG(IN)</text:p>
      <text:p text:style-name="P42"><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text:span><text:span text:style-name="T4">für höchste Genauigkeit und optimale Geschwindigkeit. Die </text:span><text:span text:style-name="T8">Default</text:span><text:span text:style-name="T4">-Werte </text:span><text:soft-page-break/><text:span text:style-name="T4">der Eingangsparameter sind wie folgt vordefiniert: KP = 1, KI = 1, ILIM_L = -1E38 und ILIM_H = +1E38.</text:span></text:p>
      <text:p text:style-name="P77"><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7"><text:span text:style-name="T4">Der Baustein FT_PIW hat einen so genannten Wind-</text:span><text:span text:style-name="T8">Up</text:span><text:span text:style-name="T4"> Hold der bei erreichen einer Ausgangsbegrenzung (LIM_L, LIM_H) den </text:span><text:span text:style-name="T8">Integrator</text:span><text:span text:style-name="T4"> auf dem letzten Wert einfriert und so einen Wind-</text:span><text:span text:style-name="T8">Up</text:span><text:span text:style-name="T4"> verhindert.</text:span></text:p>
      <text:p text:style-name="P55"><draw:frame draw:style-name="fr4" draw:name="Grafik604" text:anchor-type="paragraph" svg:x="1.09cm" svg:y="0.67cm" svg:width="5.3cm" svg:height="3.57cm" draw:z-index="626"><draw:image xlink:href="Pictures/100000000000011E000000C1EB7B3A5F.png" xlink:type="simple" xlink:show="embed" xlink:actuate="onLoad"/></draw:frame>Die folgende Grafik verdeutlicht die interne Struktur des Reglers:</text:p>
      <text:p text:style-name="P52"/>
      <text:p text:style-name="P52">FT_PIW kann zusammen mit den Bausteinen CTRL_IN und CTRL_OUT zum Aufbau komplexer Regler benutzt werden.</text:p>
      <text:list xml:id="list33628461" text:continue-numbering="true" text:style-name="L1">
        <text:list-item>
          <text:list>
            <text:list-item>
              <text:h text:style-name="P217" text:outline-level="2"><text:alphabetical-index-mark-start text:id="IMark158104760"/>FT_PIWL<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18" text:anchor-type="paragraph" svg:x="1.002cm" svg:y="0.667cm" svg:width="3.18cm" svg:height="3.54cm" draw:z-index="640"><draw:image xlink:href="Pictures/10000000000000F00000010C63930DF9.png" xlink:type="simple" xlink:show="embed" xlink:actuate="onLoad"/></draw:frame><text:tab/>LIM : BOOL (TRUE, wenn der Ausgang ein Limit erreicht hat)</text:p>
      <text:p text:style-name="P25"><text:soft-page-break/><text:line-break/>FT_PIWL ist ein PI-Regler mit dynamischen Anti Wind-<text:span text:style-name="T16">Up</text:span> der nach folgender Formel arbeitet:</text:p>
      <text:p text:style-name="P55">Y = KP * IN + KI * INTEG(IN)</text:p>
      <text:p text:style-name="P42"><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KI = 1, ILIM_L = -1E38 und ILIM_H = +1E38.</text:span></text:p>
      <text:p text:style-name="P77"><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7"><text:span text:style-name="T4">Der Baustein FT_PIWL hat einen so genannten dynamischen Wind-</text:span><text:span text:style-name="T8">Up</text:span><text:span text:style-name="T4"> Reset der bei erreichen einer Ausgangsbegrenzung (LIM_L, LIM_H) den </text:span><text:span text:style-name="T8">Integrator</text:span><text:span text:style-name="T4"> auf einen Wert </text:span><text:span text:style-name="T4">zurücksetzt der dem Ausgangslimit entspricht. Wenn nach erreichen einen </text:span><text:span text:style-name="T8">Limits</text:span><text:span text:style-name="T4"> der Reg</text:span><text:span text:style-name="T4">ler wieder in den Arbeitsbereich eintritt muss der </text:span><text:span text:style-name="T8">Integrator</text:span><text:span text:style-name="T4"> nicht erst Auf- oder Ab- integriert werden, und der Regler ist ohne Verzögerung sofort Einsatzbereit. Die dynamische Anti Wind-</text:span><text:span text:style-name="T8">Up</text:span><text:span text:style-name="T4"> Methode ist die in den meisten Fällen ohne Nachteile vorzuziehende Methode, da Sie den Regler nicht negativ beeinflusst und die Nachteile des Wind_</text:span><text:span text:style-name="T8">Up</text:span><text:span text:style-name="T4"> verhindert.</text:span></text:p>
      <text:p text:style-name="P55"><draw:frame draw:style-name="fr4" draw:name="Grafik617" text:anchor-type="paragraph" svg:x="1.09cm" svg:y="0.67cm" svg:width="5.3cm" svg:height="3.57cm" draw:z-index="639"><draw:image xlink:href="Pictures/100000000000011E000000C1EB7B3A5F.png" xlink:type="simple" xlink:show="embed" xlink:actuate="onLoad"/></draw:frame>Die folgende Grafik verdeutlicht die interne Struktur des Reglers:</text:p>
      <text:p text:style-name="P55"/>
      <text:p text:style-name="P71"><text:soft-page-break/>FT_PIWL kann zusammen mit den Bausteinen CTRL_IN und CTRL_OUT zum Aufbau komplexer Regler benutzt werden.</text:p>
      <text:list xml:id="list33626733" text:continue-numbering="true" text:style-name="L1">
        <text:list-item>
          <text:list>
            <text:list-item>
              <text:h text:style-name="P217" text:outline-level="2"><text:alphabetical-index-mark-start text:id="IMark158104760"/>FT_PT1<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T : TIME (Zeitkonstante)</text:p>
      <text:p text:style-name="P25"><text:tab/>K : REAL (Multiplikator)</text:p>
      <text:p text:style-name="P25"><draw:frame draw:style-name="fr4" draw:name="Grafik71" text:anchor-type="paragraph" svg:x="1.083cm" svg:y="0.66cm" svg:width="2.281cm" svg:height="2.2cm" draw:z-index="170"><draw:image xlink:href="Pictures/10000000000000AC000000A67F0AD6E1.png" xlink:type="simple" xlink:show="embed" xlink:actuate="onLoad"/></draw:frame>Output<text:tab/>OUT : REAL (Ausgangssignal)</text:p>
      <text:p text:style-name="Standard"><text:line-break/>FT_PT1 ist ein LZI-<text:span text:style-name="T38">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55"><draw:frame draw:style-name="fr4" draw:name="Grafik554" text:anchor-type="paragraph" svg:x="2.148cm" svg:y="0.667cm" svg:width="7.121cm" svg:height="2.679cm" draw:z-index="562"><draw:image xlink:href="Pictures/100000000000021A000000CBE056F602.png" xlink:type="simple" xlink:show="embed" xlink:actuate="onLoad"/></draw:frame>Strukturbild:</text:p>
      <text:p text:style-name="P55"><draw:frame draw:style-name="fr4" draw:name="Grafik79" text:anchor-type="paragraph" svg:x="0.979cm" svg:y="3.762cm" svg:width="12.3cm" svg:height="5.32cm" draw:z-index="172"><draw:image xlink:href="Pictures/1000000000000245000001923E2FE58F.png" xlink:type="simple" xlink:show="embed" xlink:actuate="onLoad"/></draw:frame>Sprungantwort für T=1s, K=1</text:p>
      <text:p text:style-name="P59"><text:soft-page-break/></text:p>
      <text:list xml:id="list33650443" text:continue-numbering="true" text:style-name="L1">
        <text:list-item>
          <text:list>
            <text:list-item>
              <text:h text:style-name="P217" text:outline-level="2"><text:alphabetical-index-mark-start text:id="IMark158104760"/>FT_PT2<text:alphabetical-index-mark-end text:id="IMark158104760"/></text:h>
            </text:list-item>
          </text:list>
        </text:list-item>
      </text:list>
      <text:p text:style-name="P22">Type<text:tab/>Funktionsbaustein</text:p>
      <text:p text:style-name="P22"><text:span text:style-name="T16">Input</text:span><text:tab/>IN : REAL (Eingangssignal)</text:p>
      <text:p text:style-name="P22"><text:tab/>T : REAL (Zeitkonstante)</text:p>
      <text:p text:style-name="P25"><text:tab/>D : REAL (Dämpfung)</text:p>
      <text:p text:style-name="P25"><text:tab/>K : REAL (Multiplikator)</text:p>
      <text:p text:style-name="P25"><draw:frame draw:style-name="fr13" draw:name="Grafik72" text:anchor-type="paragraph" svg:x="1.041cm" svg:y="0.644cm" svg:width="2.281cm" svg:height="2.649cm" draw:z-index="171"><draw:image xlink:href="Pictures/10000000000000AC000000C8E04E1013.png" xlink:type="simple" xlink:show="embed" xlink:actuate="onLoad"/></draw:frame>Output<text:tab/>OUT : REAL (Ausgangssignal)</text:p>
      <text:p text:style-name="P25"><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55">Die entsprechende Funktionalbeziehung in Zeitbereich ist folgende Differenzialgleichung gegeben:</text:p>
      <text:p text:style-name="P55">T² * OUT''(T) + 2 * D* T * OUT'(T) + OUT(T) = K * in(T).</text:p>
      <text:p text:style-name="P25"><draw:frame draw:style-name="fr4" draw:name="Grafik374" text:anchor-type="paragraph" svg:x="3.56cm" svg:y="0.896cm" svg:width="5.11cm" svg:height="2.6cm" draw:z-index="369"><draw:image xlink:href="Pictures/10000000000003040000018989C596AA.png" xlink:type="simple" xlink:show="embed" xlink:actuate="onLoad"/></draw:frame>Strukturbild:</text:p>
      <text:p text:style-name="P55"><draw:g text:anchor-type="paragraph" draw:z-index="173" draw:style-name="gr1"><draw:frame draw:style-name="gr32" draw:text-style-name="P258" svg:width="13.001cm" svg:height="5.811cm" svg:x="1.05cm" svg:y="3.551cm"><draw:image xlink:href="Pictures/10000000000002450000018F25A869AE.png" xlink:type="simple" xlink:show="embed" xlink:actuate="onLoad"><text:p/></draw:image></draw:frame><draw:frame draw:style-name="gr33" draw:text-style-name="P259" svg:width="2.075cm" svg:height="2.015cm" svg:x="3.197cm" svg:y="3.789cm"><draw:text-box><text:p text:style-name="P252"><text:span text:style-name="T53">D=0.2</text:span></text:p></draw:text-box></draw:frame><draw:frame draw:style-name="gr34" draw:text-style-name="P259" svg:width="2.077cm" svg:height="1.154cm" svg:x="2.274cm" svg:y="6.592cm"><draw:text-box><text:p text:style-name="P252"><text:span text:style-name="T53">D=1</text:span></text:p></draw:text-box></draw:frame><draw:frame draw:style-name="gr34" draw:text-style-name="P259" svg:width="2.077cm" svg:height="1.154cm" svg:x="7.885cm" svg:y="6.401cm"><draw:text-box><text:p text:style-name="P252"><text:span text:style-name="T53">D=5</text:span></text:p></draw:text-box></draw:frame></draw:g><text:soft-page-break/>Sprungantwort für T=1, K=2, D=0,2 / 1 / 5</text:p>
      <text:p text:style-name="P55"/>
      <text:list xml:id="list33626654" text:continue-numbering="true" text:style-name="L1">
        <text:list-item>
          <text:list>
            <text:list-item>
              <text:h text:style-name="P217" text:outline-level="2"><text:alphabetical-index-mark-start text:id="IMark101578380"/>FT_TN16<text:alphabetical-index-mark-end text:id="IMark101578380"/></text:h>
            </text:list-item>
          </text:list>
        </text:list-item>
      </text:list>
      <text:p text:style-name="P22">Type<text:tab/>Funktionsbaustein</text:p>
      <text:p text:style-name="P22"><text:span text:style-name="T16">Input</text:span><text:tab/>IN : REAL (Eingangssignal)</text:p>
      <text:p text:style-name="P25"><text:tab/>T : REAL (Verzögerungszeit)</text:p>
      <text:p text:style-name="P25"><draw:frame draw:style-name="fr4" draw:name="Grafik74" text:anchor-type="paragraph" svg:x="1.09cm" svg:y="0.672cm" svg:width="2.281cm" svg:height="1.75cm" draw:z-index="176"><draw:image xlink:href="Pictures/10000000000000AC0000008416BD044A.png" xlink:type="simple" xlink:show="embed" xlink:actuate="onLoad"/></draw:frame>Output<text:tab/>OUT : REAL (Ausgangssignal)</text:p>
      <text:p text:style-name="P25"><text:line-break/>FT_TN16 verzögert ein Eingangssignal um eine einstellbare Zeit T und tastet es in der Zeit T 16 mal ab. Nach jedem update des Ausgangssignals OUT wird TRIG für einen Zyklus TRUE.</text:p>
      <text:p text:style-name="P55"><draw:g text:anchor-type="paragraph" draw:z-index="593" draw:style-name="gr1"><draw:line draw:style-name="gr2" draw:text-style-name="P251" svg:x1="2.166cm" svg:y1="2.578cm" svg:x2="3.424cm" svg:y2="2.578cm"><text:p/></draw:line><draw:line draw:style-name="gr2" draw:text-style-name="P251" svg:x1="3.427cm" svg:y1="2.189cm" svg:x2="3.427cm" svg:y2="2.576cm"><text:p/></draw:line><draw:line draw:style-name="gr2" draw:text-style-name="P251" svg:x1="3.427cm" svg:y1="2.189cm" svg:x2="4.715cm" svg:y2="2.189cm"><text:p/></draw:line><draw:line draw:style-name="gr2" draw:text-style-name="P251" svg:x1="4.711cm" svg:y1="1.965cm" svg:x2="4.711cm" svg:y2="2.192cm"><text:p/></draw:line><draw:line draw:style-name="gr2" draw:text-style-name="P251" svg:x1="4.711cm" svg:y1="1.965cm" svg:x2="5.399cm" svg:y2="1.965cm"><text:p/></draw:line><draw:line draw:style-name="gr2" draw:text-style-name="P251" svg:x1="7.98cm" svg:y1="1.651cm" svg:x2="8.574cm" svg:y2="1.651cm"><text:p/></draw:line><draw:line draw:style-name="gr2" draw:text-style-name="P251" svg:x1="8.588cm" svg:y1="1.024cm" svg:x2="8.581cm" svg:y2="1.651cm"><text:p/></draw:line><draw:line draw:style-name="gr2" draw:text-style-name="P251" svg:x1="8.588cm" svg:y1="1.024cm" svg:x2="9.874cm" svg:y2="1.024cm"><text:p/></draw:line><draw:line draw:style-name="gr2" draw:text-style-name="P251" svg:x1="9.874cm" svg:y1="0.643cm" svg:x2="9.874cm" svg:y2="1.03cm"><text:p/></draw:line><draw:line draw:style-name="gr59" draw:text-style-name="P251" svg:x1="2.161cm" svg:y1="2.634cm" svg:x2="2.166cm" svg:y2="0.257cm"><text:p/></draw:line><draw:line draw:style-name="gr59" draw:text-style-name="P251" svg:x1="7.999cm" svg:y1="2.578cm" svg:x2="11.957cm" svg:y2="2.578cm"><text:p/></draw:line><draw:line draw:style-name="gr23" draw:text-style-name="P251" svg:x1="2.067cm" svg:y1="2.578cm" svg:x2="6.023cm" svg:y2="2.578cm"><text:p/></draw:line><draw:path draw:style-name="gr70" draw:text-style-name="P251" svg:width="2.682cm" svg:height="0.391cm" svg:x="2.769cm" svg:y="1.861cm" svg:viewBox="0 0 2683 392" svg:d="m0 392c115-16 252-18 365-34 136-18 281-19 401-56 100-30 285-39 363-75 88-39 219-39 328-59s256-11 363-35c124-31 231-62 378-83 118-17 249-27 363-45l122-5v0"><text:p/></draw:path><draw:line draw:style-name="gr2" draw:text-style-name="P251" svg:x1="2.161cm" svg:y1="2.578cm" svg:x2="3.449cm" svg:y2="2.578cm"><text:p/></draw:line><draw:line draw:style-name="gr21" draw:text-style-name="P251" svg:x1="2.178cm" svg:y1="3.056cm" svg:x2="11.29cm" svg:y2="3.056cm"><text:p/></draw:line><draw:frame draw:style-name="gr74" draw:text-style-name="P255" svg:width="0.937cm" svg:height="0.983cm" svg:x="6.521cm" svg:y="2.9cm"><draw:text-box><text:p text:style-name="P252"><text:span text:style-name="T52">T</text:span></text:p></draw:text-box></draw:frame><draw:frame draw:style-name="gr75" draw:text-style-name="P254" svg:width="0.937cm" svg:height="0.576cm" svg:x="10.709cm" svg:y="2.558cm"><draw:text-box><text:p text:style-name="P252"><text:span text:style-name="T51">16</text:span></text:p></draw:text-box></draw:frame><draw:line draw:style-name="gr2" draw:text-style-name="P251" svg:x1="9.874cm" svg:y1="0.635cm" svg:x2="11.16cm" svg:y2="0.635cm"><text:p/></draw:line><draw:line draw:style-name="gr2" draw:text-style-name="P251" svg:x1="11.158cm" svg:y1="0.828cm" svg:x2="11.16cm" svg:y2="0.635cm"><text:p/></draw:line><draw:line draw:style-name="gr2" draw:text-style-name="P251" svg:x1="11.158cm" svg:y1="0.83cm" svg:x2="11.752cm" svg:y2="0.83cm"><text:p/></draw:line><draw:path draw:style-name="gr70" draw:text-style-name="P251"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6" draw:text-style-name="P267" svg:width="0.863cm" svg:height="0.659cm" svg:x="2.097cm" svg:y="2.101cm"><draw:text-box><text:p text:style-name="P252"><text:span text:style-name="T59">IN</text:span></text:p></draw:text-box></draw:frame><draw:frame draw:style-name="gr77" draw:text-style-name="P268" svg:width="1.378cm" svg:height="0.659cm" svg:x="8.668cm" svg:y="1.493cm"><draw:text-box><text:p text:style-name="P252"><text:span text:style-name="T60">OUT</text:span></text:p></draw:text-box></draw:frame><draw:frame draw:style-name="gr75" draw:text-style-name="P254" svg:width="0.937cm" svg:height="0.576cm" svg:x="9.52cm" svg:y="2.558cm"><draw:text-box><text:p text:style-name="P252"><text:span text:style-name="T51">15</text:span></text:p></draw:text-box></draw:frame><draw:frame draw:style-name="gr75" draw:text-style-name="P254" svg:width="0.937cm" svg:height="0.576cm" svg:x="8.269cm" svg:y="2.558cm"><draw:text-box><text:p text:style-name="P252"><text:span text:style-name="T51">14</text:span></text:p></draw:text-box></draw:frame><draw:frame draw:style-name="gr75" draw:text-style-name="P254" svg:width="0.937cm" svg:height="0.576cm" svg:x="1.958cm" svg:y="2.558cm"><draw:text-box><text:p text:style-name="P252"><text:span text:style-name="T51">0</text:span></text:p></draw:text-box></draw:frame><draw:frame draw:style-name="gr75" draw:text-style-name="P254" svg:width="0.937cm" svg:height="0.576cm" svg:x="3.02cm" svg:y="2.558cm"><draw:text-box><text:p text:style-name="P252"><text:span text:style-name="T51">1</text:span></text:p></draw:text-box></draw:frame><draw:frame draw:style-name="gr75" draw:text-style-name="P254" svg:width="0.937cm" svg:height="0.576cm" svg:x="4.457cm" svg:y="2.558cm"><draw:text-box><text:p text:style-name="P252"><text:span text:style-name="T51">2</text:span></text:p></draw:text-box></draw:frame></draw:g><text:soft-page-break/></text:p>
      <text:list xml:id="list33656976" text:continue-numbering="true" text:style-name="L1">
        <text:list-item>
          <text:list>
            <text:list-item>
              <text:h text:style-name="P217" text:outline-level="2"><text:alphabetical-index-mark-start text:id="IMark101578380"/>FT_TN64<text:alphabetical-index-mark-end text:id="IMark101578380"/></text:h>
            </text:list-item>
          </text:list>
        </text:list-item>
      </text:list>
      <text:p text:style-name="P22">Type<text:tab/>Funktionsbaustein</text:p>
      <text:p text:style-name="P22"><text:span text:style-name="T16">Input</text:span><text:tab/>IN : REAL (Eingangssignal)</text:p>
      <text:p text:style-name="P25"><text:tab/>T : REAL (Verzögerungszeit)</text:p>
      <text:p text:style-name="P25"><draw:frame draw:style-name="fr4" draw:name="Grafik75" text:anchor-type="paragraph" svg:x="1.092cm" svg:y="0.661cm" svg:width="2.281cm" svg:height="1.75cm" draw:z-index="175"><draw:image xlink:href="Pictures/10000000000000AC00000084B399053C.png" xlink:type="simple" xlink:show="embed" xlink:actuate="onLoad"/></draw:frame>Output<text:tab/>OUT : REAL (Ausgangssignal)</text:p>
      <text:p text:style-name="P25"><text:line-break/>FT_TN64 verzögert ein Eingangssignal um eine einstellbare Zeit T und tastet es in der Zeit T 64 mal ab. Nach jedem update des Ausgangssignals OUT wird TRIG für einen Zyklus TRUE.</text:p>
      <text:p text:style-name="P25"><draw:g text:anchor-type="paragraph" draw:z-index="592" draw:style-name="gr1"><draw:line draw:style-name="gr2" draw:text-style-name="P251" svg:x1="1.981cm" svg:y1="3.156cm" svg:x2="3.239cm" svg:y2="3.156cm"><text:p/></draw:line><draw:line draw:style-name="gr2" draw:text-style-name="P251" svg:x1="3.242cm" svg:y1="2.695cm" svg:x2="3.242cm" svg:y2="3.153cm"><text:p/></draw:line><draw:line draw:style-name="gr2" draw:text-style-name="P251" svg:x1="3.242cm" svg:y1="2.695cm" svg:x2="4.53cm" svg:y2="2.695cm"><text:p/></draw:line><draw:line draw:style-name="gr2" draw:text-style-name="P251" svg:x1="4.526cm" svg:y1="2.424cm" svg:x2="4.526cm" svg:y2="2.695cm"><text:p/></draw:line><draw:line draw:style-name="gr2" draw:text-style-name="P251" svg:x1="4.526cm" svg:y1="2.424cm" svg:x2="5.214cm" svg:y2="2.424cm"><text:p/></draw:line><draw:line draw:style-name="gr2" draw:text-style-name="P251" svg:x1="7.795cm" svg:y1="2.05cm" svg:x2="8.389cm" svg:y2="2.05cm"><text:p/></draw:line><draw:line draw:style-name="gr2" draw:text-style-name="P251" svg:x1="8.403cm" svg:y1="1.318cm" svg:x2="8.396cm" svg:y2="2.061cm"><text:p/></draw:line><draw:line draw:style-name="gr2" draw:text-style-name="P251" svg:x1="8.403cm" svg:y1="1.318cm" svg:x2="9.689cm" svg:y2="1.318cm"><text:p/></draw:line><draw:line draw:style-name="gr2" draw:text-style-name="P251" svg:x1="9.689cm" svg:y1="0.859cm" svg:x2="9.689cm" svg:y2="1.319cm"><text:p/></draw:line><draw:line draw:style-name="gr59" draw:text-style-name="P251" svg:x1="1.979cm" svg:y1="3.224cm" svg:x2="1.984cm" svg:y2="0.404cm"><text:p/></draw:line><draw:line draw:style-name="gr59" draw:text-style-name="P251" svg:x1="7.814cm" svg:y1="3.156cm" svg:x2="11.772cm" svg:y2="3.156cm"><text:p/></draw:line><draw:line draw:style-name="gr23" draw:text-style-name="P251" svg:x1="1.882cm" svg:y1="3.156cm" svg:x2="5.838cm" svg:y2="3.156cm"><text:p/></draw:line><draw:path draw:style-name="gr70" draw:text-style-name="P251" svg:width="2.682cm" svg:height="0.465cm" svg:x="2.584cm" svg:y="2.303cm" svg:viewBox="0 0 2683 466" svg:d="m0 466c115-19 252-20 365-41 136-21 281-21 401-66 100-37 285-46 363-89 88-46 219-46 328-70s256-14 363-41c124-36 231-74 378-99 118-22 249-32 363-54l122-6v0"><text:p/></draw:path><draw:line draw:style-name="gr2" draw:text-style-name="P251" svg:x1="1.979cm" svg:y1="3.156cm" svg:x2="3.267cm" svg:y2="3.156cm"><text:p/></draw:line><draw:line draw:style-name="gr21" draw:text-style-name="P251" svg:x1="1.993cm" svg:y1="3.723cm" svg:x2="11.105cm" svg:y2="3.723cm"><text:p/></draw:line><draw:frame draw:style-name="gr71" draw:text-style-name="P255" svg:width="0.937cm" svg:height="0.983cm" svg:x="6.336cm" svg:y="3.537cm"><draw:text-box><text:p text:style-name="P252"><text:span text:style-name="T52">T</text:span></text:p></draw:text-box></draw:frame><draw:frame draw:style-name="gr72" draw:text-style-name="P254" svg:width="0.937cm" svg:height="0.576cm" svg:x="10.524cm" svg:y="3.133cm"><draw:text-box><text:p text:style-name="P252"><text:span text:style-name="T51">64</text:span></text:p></draw:text-box></draw:frame><draw:line draw:style-name="gr2" draw:text-style-name="P251" svg:x1="9.689cm" svg:y1="0.854cm" svg:x2="10.975cm" svg:y2="0.854cm"><text:p/></draw:line><draw:line draw:style-name="gr2" draw:text-style-name="P251" svg:x1="10.973cm" svg:y1="1.08cm" svg:x2="10.975cm" svg:y2="0.854cm"><text:p/></draw:line><draw:line draw:style-name="gr2" draw:text-style-name="P251" svg:x1="10.973cm" svg:y1="1.08cm" svg:x2="11.567cm" svg:y2="1.08cm"><text:p/></draw:line><draw:path draw:style-name="gr70" draw:text-style-name="P251"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3" draw:text-style-name="P267" svg:width="0.863cm" svg:height="0.659cm" svg:x="1.912cm" svg:y="2.588cm"><draw:text-box><text:p text:style-name="P252"><text:span text:style-name="T59">IN</text:span></text:p></draw:text-box></draw:frame><draw:frame draw:style-name="gr73" draw:text-style-name="P268" svg:width="1.378cm" svg:height="0.659cm" svg:x="8.483cm" svg:y="1.868cm"><draw:text-box><text:p text:style-name="P252"><text:span text:style-name="T60">OUT</text:span></text:p></draw:text-box></draw:frame><draw:frame draw:style-name="gr72" draw:text-style-name="P254" svg:width="0.937cm" svg:height="0.576cm" svg:x="9.335cm" svg:y="3.133cm"><draw:text-box><text:p text:style-name="P252"><text:span text:style-name="T51">63</text:span></text:p></draw:text-box></draw:frame><draw:frame draw:style-name="gr72" draw:text-style-name="P254" svg:width="0.937cm" svg:height="0.576cm" svg:x="8.084cm" svg:y="3.133cm"><draw:text-box><text:p text:style-name="P252"><text:span text:style-name="T51">62</text:span></text:p></draw:text-box></draw:frame><draw:frame draw:style-name="gr72" draw:text-style-name="P254" svg:width="0.937cm" svg:height="0.576cm" svg:x="1.773cm" svg:y="3.133cm"><draw:text-box><text:p text:style-name="P252"><text:span text:style-name="T51">0</text:span></text:p></draw:text-box></draw:frame><draw:frame draw:style-name="gr72" draw:text-style-name="P254" svg:width="0.937cm" svg:height="0.576cm" svg:x="2.835cm" svg:y="3.133cm"><draw:text-box><text:p text:style-name="P252"><text:span text:style-name="T51">1</text:span></text:p></draw:text-box></draw:frame><draw:frame draw:style-name="gr72" draw:text-style-name="P254" svg:width="0.937cm" svg:height="0.576cm" svg:x="4.272cm" svg:y="3.133cm"><draw:text-box><text:p text:style-name="P252"><text:span text:style-name="T51">2</text:span></text:p></draw:text-box></draw:frame></draw:g></text:p>
      <text:list xml:id="list33632238" text:continue-numbering="true" text:style-name="L1">
        <text:list-item>
          <text:list>
            <text:list-item>
              <text:h text:style-name="P217" text:outline-level="2"><text:soft-page-break/><text:alphabetical-index-mark-start text:id="IMark101578380"/><text:span text:style-name="T1">FT_</text:span><text:span text:style-name="T11">TN8</text:span><text:alphabetical-index-mark-end text:id="IMark101578380"/></text:h>
            </text:list-item>
          </text:list>
        </text:list-item>
      </text:list>
      <text:p text:style-name="Text_20_body_20_2">Type<text:tab/>Funktionsbaustein</text:p>
      <text:p text:style-name="P22"><text:span text:style-name="T16">Input</text:span><text:tab/>IN : REAL (Eingangssignal)</text:p>
      <text:p text:style-name="P25"><text:tab/>T : REAL (Verzögerungszeit)</text:p>
      <text:p text:style-name="P25">Output<text:tab/>OUT : REAL (Ausgangssignal)</text:p>
      <text:p text:style-name="P25"><draw:frame draw:style-name="fr4" draw:name="Grafik76" text:anchor-type="paragraph" svg:x="1.217cm" svg:y="0.379cm" svg:width="2.281cm" svg:height="1.75cm" draw:z-index="174"><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55"><draw:g text:anchor-type="paragraph" draw:z-index="596" draw:style-name="gr1"><draw:line draw:style-name="gr2" draw:text-style-name="P251" svg:x1="1.898cm" svg:y1="3.222cm" svg:x2="3.156cm" svg:y2="3.222cm"><text:p/></draw:line><draw:line draw:style-name="gr2" draw:text-style-name="P251" svg:x1="3.156cm" svg:y1="2.759cm" svg:x2="3.156cm" svg:y2="3.222cm"><text:p/></draw:line><draw:line draw:style-name="gr2" draw:text-style-name="P251" svg:x1="3.156cm" svg:y1="2.759cm" svg:x2="4.444cm" svg:y2="2.759cm"><text:p/></draw:line><draw:line draw:style-name="gr2" draw:text-style-name="P251" svg:x1="4.443cm" svg:y1="2.487cm" svg:x2="4.443cm" svg:y2="2.762cm"><text:p/></draw:line><draw:line draw:style-name="gr2" draw:text-style-name="P251" svg:x1="4.443cm" svg:y1="2.487cm" svg:x2="5.131cm" svg:y2="2.487cm"><text:p/></draw:line><draw:line draw:style-name="gr2" draw:text-style-name="P251" svg:x1="7.712cm" svg:y1="2.113cm" svg:x2="8.306cm" svg:y2="2.113cm"><text:p/></draw:line><draw:line draw:style-name="gr2" draw:text-style-name="P251" svg:x1="8.32cm" svg:y1="1.369cm" svg:x2="8.313cm" svg:y2="2.119cm"><text:p/></draw:line><draw:line draw:style-name="gr2" draw:text-style-name="P251" svg:x1="8.319cm" svg:y1="1.369cm" svg:x2="9.605cm" svg:y2="1.369cm"><text:p/></draw:line><draw:line draw:style-name="gr2" draw:text-style-name="P251" svg:x1="9.606cm" svg:y1="0.91cm" svg:x2="9.606cm" svg:y2="1.372cm"><text:p/></draw:line><draw:line draw:style-name="gr59" draw:text-style-name="P251" svg:x1="1.893cm" svg:y1="3.293cm" svg:x2="1.898cm" svg:y2="0.45cm"><text:p/></draw:line><draw:line draw:style-name="gr59" draw:text-style-name="P251" svg:x1="7.731cm" svg:y1="3.222cm" svg:x2="11.689cm" svg:y2="3.222cm"><text:p/></draw:line><draw:line draw:style-name="gr23" draw:text-style-name="P251" svg:x1="1.799cm" svg:y1="3.222cm" svg:x2="5.755cm" svg:y2="3.224cm"><text:p/></draw:line><draw:path draw:style-name="gr70" draw:text-style-name="P251" svg:width="2.682cm" svg:height="0.467cm" svg:x="2.501cm" svg:y="2.367cm" svg:viewBox="0 0 2683 468" svg:d="m0 468c115-18 252-20 365-40 136-22 281-23 401-67 100-37 285-47 363-90 88-46 219-46 328-70s256-14 363-42c124-35 231-75 378-100 118-20 249-30 363-55l122-4v0"><text:p/></draw:path><draw:line draw:style-name="gr2" draw:text-style-name="P251" svg:x1="1.893cm" svg:y1="3.222cm" svg:x2="3.181cm" svg:y2="3.222cm"><text:p/></draw:line><draw:line draw:style-name="gr21" draw:text-style-name="P251" svg:x1="1.909cm" svg:y1="3.794cm" svg:x2="11.021cm" svg:y2="3.794cm"><text:p/></draw:line><draw:frame draw:style-name="gr78" draw:text-style-name="P255" svg:width="0.937cm" svg:height="0.983cm" svg:x="6.253cm" svg:y="3.606cm"><draw:text-box><text:p text:style-name="P252"><text:span text:style-name="T52">T</text:span></text:p></draw:text-box></draw:frame><draw:frame draw:style-name="gr79" draw:text-style-name="P254" svg:width="0.937cm" svg:height="0.576cm" svg:x="10.441cm" svg:y="3.2cm"><draw:text-box><text:p text:style-name="P252"><text:span text:style-name="T51">8</text:span></text:p></draw:text-box></draw:frame><draw:line draw:style-name="gr2" draw:text-style-name="P251" svg:x1="9.606cm" svg:y1="0.904cm" svg:x2="10.892cm" svg:y2="0.904cm"><text:p/></draw:line><draw:line draw:style-name="gr2" draw:text-style-name="P251" svg:x1="10.89cm" svg:y1="1.132cm" svg:x2="10.892cm" svg:y2="0.904cm"><text:p/></draw:line><draw:line draw:style-name="gr2" draw:text-style-name="P251" svg:x1="10.89cm" svg:y1="1.134cm" svg:x2="11.484cm" svg:y2="1.134cm"><text:p/></draw:line><draw:path draw:style-name="gr70" draw:text-style-name="P251"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0" draw:text-style-name="P267" svg:width="0.863cm" svg:height="0.659cm" svg:x="1.829cm" svg:y="2.65cm"><draw:text-box><text:p text:style-name="P252"><text:span text:style-name="T59">IN</text:span></text:p></draw:text-box></draw:frame><draw:frame draw:style-name="gr80" draw:text-style-name="P268" svg:width="1.378cm" svg:height="0.659cm" svg:x="8.4cm" svg:y="1.925cm"><draw:text-box><text:p text:style-name="P252"><text:span text:style-name="T60">OUT</text:span></text:p></draw:text-box></draw:frame><draw:frame draw:style-name="gr79" draw:text-style-name="P254" svg:width="0.937cm" svg:height="0.576cm" svg:x="9.252cm" svg:y="3.2cm"><draw:text-box><text:p text:style-name="P252"><text:span text:style-name="T51">7</text:span></text:p></draw:text-box></draw:frame><draw:frame draw:style-name="gr79" draw:text-style-name="P254" svg:width="0.937cm" svg:height="0.576cm" svg:x="8.001cm" svg:y="3.2cm"><draw:text-box><text:p text:style-name="P252"><text:span text:style-name="T51">6</text:span></text:p></draw:text-box></draw:frame><draw:frame draw:style-name="gr79" draw:text-style-name="P254" svg:width="0.937cm" svg:height="0.576cm" svg:x="1.69cm" svg:y="3.2cm"><draw:text-box><text:p text:style-name="P252"><text:span text:style-name="T51">0</text:span></text:p></draw:text-box></draw:frame><draw:frame draw:style-name="gr79" draw:text-style-name="P254" svg:width="0.937cm" svg:height="0.576cm" svg:x="2.752cm" svg:y="3.2cm"><draw:text-box><text:p text:style-name="P252"><text:span text:style-name="T51">1</text:span></text:p></draw:text-box></draw:frame><draw:frame draw:style-name="gr79" draw:text-style-name="P254" svg:width="0.937cm" svg:height="0.576cm" svg:x="4.189cm" svg:y="3.2cm"><draw:text-box><text:p text:style-name="P252"><text:span text:style-name="T51">2</text:span></text:p></draw:text-box></draw:frame></draw:g></text:p>
      <text:list xml:id="list33629613" text:continue-numbering="true" text:style-name="L1">
        <text:list-item>
          <text:list>
            <text:list-item>
              <text:h text:style-name="P217" text:outline-level="2"><text:alphabetical-index-mark-start text:id="IMark101578380"/>HYST<text:alphabetical-index-mark-end text:id="IMark101578380"/></text:h>
            </text:list-item>
          </text:list>
        </text:list-item>
      </text:list>
      <text:p text:style-name="P22">Type<text:tab/>Funktionsbaustein</text:p>
      <text:p text:style-name="P22"><text:span text:style-name="T16">Input</text:span><text:tab/>IN : REAL (Eingangswert)</text:p>
      <text:p text:style-name="P22"><text:tab/>ON : REAL (oberer Schwellenwert)</text:p>
      <text:p text:style-name="P22"><text:tab/>OFF : REAL (unterer Schwellenwert)</text:p>
      <text:p text:style-name="P22">Output<text:tab/>Q : BOOL (Ausgangssignal)</text:p>
      <text:p text:style-name="P25"><draw:frame draw:style-name="fr4" draw:name="Grafik579" text:anchor-type="paragraph" svg:x="1.09cm" svg:y="0.667cm" svg:width="2.281cm" svg:height="2.2cm" draw:z-index="597"><draw:image xlink:href="Pictures/10000000000000AC000000A6121EB97D.png" xlink:type="simple" xlink:show="embed" xlink:actuate="onLoad"/></draw:frame><text:tab/><text:span text:style-name="T16">WIN</text:span> : BOOL (zeigt an, dass In zwischen ON und OFF liegt)</text:p>
      <text:p text:style-name="P55"><text:soft-page-break/><text:line-break/>HYST ist ein Standard Hysteresebaustein, Seine Funktion hängt von den Eingangswerten ON und OFF ab.</text:p>
      <text:p text:style-name="P55"><draw:frame draw:style-name="fr4" draw:name="Grafik586" text:anchor-type="paragraph" svg:x="1.067cm" svg:y="1.164cm" svg:width="6.83cm" svg:height="2.559cm" draw:z-index="605"><draw:image xlink:href="Pictures/10000000000001710000008A82D0411A.png" xlink:type="simple" xlink:show="embed" xlink:actuate="onLoad"/></draw:frame>Ist ON &gt; OFF so wird der Ausgang TRUE gesetzt wenn IN &gt; ON und er wird FALSE gesetzt wenn IN &lt; OFF.</text:p>
      <text:p text:style-name="P55"/>
      <text:p text:style-name="P55"><draw:frame draw:style-name="fr4" draw:name="Grafik587" text:anchor-type="paragraph" svg:x="1.044cm" svg:y="1.173cm" svg:width="6.83cm" svg:height="2.54cm" draw:z-index="606"><draw:image xlink:href="Pictures/100000000000017100000089169A8287.png" xlink:type="simple" xlink:show="embed" xlink:actuate="onLoad"/></draw:frame>Ist ON &lt; OFF so wird der Ausgang TRUE gesetzt wenn IN &lt; ON und er wird FALSE gesetzt wenn IN &gt; OFF.</text:p>
      <text:p text:style-name="P55"/>
      <text:p text:style-name="P55"><draw:frame draw:style-name="fr4" draw:name="Grafik588" text:anchor-type="paragraph" svg:x="1.067cm" svg:y="1.194cm" svg:width="6.83cm" svg:height="2.559cm" draw:z-index="607"><draw:image xlink:href="Pictures/10000000000001710000008A2D818B69.png" xlink:type="simple" xlink:show="embed" xlink:actuate="onLoad"/></draw:frame>Der Ausgang WIN wird TRUE wenn IN zwischen ON und OFF liegt, liegt IN außerhalb des Bereichs ON – OFF wird WIN FALSE.</text:p>
      <text:p text:style-name="P59"/>
      <text:p text:style-name="P59"/>
      <text:p text:style-name="P59"/>
      <text:p text:style-name="P59"/>
      <text:list xml:id="list33650204" text:continue-numbering="true" text:style-name="L1">
        <text:list-item>
          <text:list>
            <text:list-item>
              <text:h text:style-name="P217" text:outline-level="2"><text:soft-page-break/><text:alphabetical-index-mark-start text:id="IMark101578380"/>HYST_1<text:alphabetical-index-mark-end text:id="IMark101578380"/></text:h>
            </text:list-item>
          </text:list>
        </text:list-item>
      </text:list>
      <text:p text:style-name="P22">Type<text:tab/>Funktionsbaustein</text:p>
      <text:p text:style-name="P22"><text:span text:style-name="T16">Input</text:span><text:tab/>IN : REAL (Eingangswert)</text:p>
      <text:p text:style-name="P22"><text:tab/>HIGH : REAL (oberer Schwellenwert)</text:p>
      <text:p text:style-name="P22"><text:tab/>LOW : REAL (unterer Schwellenwert)</text:p>
      <text:p text:style-name="P22">Output<text:tab/>Q : BOOL (Ausgangssignal)</text:p>
      <text:p text:style-name="P22"><draw:frame draw:style-name="fr4" draw:name="Grafik185" text:anchor-type="paragraph" svg:x="1.094cm" svg:y="0.677cm" svg:width="2.281cm" svg:height="2.2cm" draw:z-index="177"><draw:image xlink:href="Pictures/10000000000000AC000000A680FBA7F6.png" xlink:type="simple" xlink:show="embed" xlink:actuate="onLoad"/></draw:frame><text:tab/><text:span text:style-name="T16">WIN</text:span> : BOOL (zeigt an, dass In zwischen LOW und HIGH liegt)</text:p>
      <text:p text:style-name="P25"><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55"><draw:frame draw:style-name="fr4" draw:name="Grafik589" text:anchor-type="paragraph" svg:x="1.046cm" svg:y="0.018cm" svg:width="6.83cm" svg:height="2.589cm" draw:z-index="608"><draw:image xlink:href="Pictures/10000000000001710000008C66929A22.png" xlink:type="simple" xlink:show="embed" xlink:actuate="onLoad"/></draw:frame></text:p>
      <text:p text:style-name="P55"><draw:frame draw:style-name="fr4" draw:name="Grafik186" text:anchor-type="paragraph" svg:x="1.016cm" svg:y="1.67cm" svg:width="15.67cm" svg:height="4.06cm" draw:z-index="178"><draw:image xlink:href="Pictures/10000000000004A100000133E7F496FB.png" xlink:type="simple" xlink:show="embed" xlink:actuate="onLoad"/></draw:frame>Das folgende Beispiel zeigt eine Dreiecksgenerator mit nachgeschalteten Hysterese Baustein HYST_1.</text:p>
      <text:p text:style-name="P87"><text:soft-page-break/>Die grüne Kurve zeigt das Eingangssignal, Rot den Hysterese Ausgang und Blau den WIN Ausgang.</text:p>
      <text:p text:style-name="P88"><draw:frame draw:style-name="fr4" draw:name="Grafik187" text:anchor-type="paragraph" svg:x="1.057cm" svg:y="0.129cm" svg:width="14cm" svg:height="5.001cm" draw:z-index="179"><draw:image xlink:href="Pictures/10000000000002DC0000011B44272AE6.png" xlink:type="simple" xlink:show="embed" xlink:actuate="onLoad"/></draw:frame></text:p>
      <text:list xml:id="list33630527" text:continue-numbering="true" text:style-name="L1">
        <text:list-item>
          <text:list>
            <text:list-item>
              <text:h text:style-name="P217" text:outline-level="2"><text:alphabetical-index-mark-start text:id="IMark101578380"/>HYST_2<text:alphabetical-index-mark-end text:id="IMark101578380"/></text:h>
            </text:list-item>
          </text:list>
        </text:list-item>
      </text:list>
      <text:p text:style-name="P22">Type<text:tab/>Funktionsbaustein</text:p>
      <text:p text:style-name="P22"><text:span text:style-name="T16">Input</text:span><text:tab/>IN : REAL (Eingangswert)</text:p>
      <text:p text:style-name="P22"><text:tab/>VAL : REAL (Mittelwert der Hysterese)</text:p>
      <text:p text:style-name="P22"><text:tab/>HYS : REAL (Breite der Hysterese)</text:p>
      <text:p text:style-name="P22">Output<text:tab/>Q : BOOL (Ausgangssignal)</text:p>
      <text:p text:style-name="P25"><draw:frame draw:style-name="fr4" draw:name="Grafik188" text:anchor-type="paragraph" svg:x="1.127cm" svg:y="0.635cm" svg:width="2.281cm" svg:height="2.2cm" draw:z-index="180"><draw:image xlink:href="Pictures/10000000000000AC000000A6B54B041E.png" xlink:type="simple" xlink:show="embed" xlink:actuate="onLoad"/></draw:frame><text:tab/><text:span text:style-name="T16">WIN </text:span>: BOOL (zeigt an das In zwischen LOW und HIGH liegt)</text:p>
      <text:p text:style-name="P25"><text:line-break/>HYST_2 ist ein Hysterese Baustein bei dem Die Schaltschwellen durch einen Mittelwert und die zugehörige Hysterese definiert wird. Die untere Schaltschwelle liegt bei VAL – HYS / 2 und die obere Schaltschwelle bei VAL + HYS / 2.</text:p>
      <text:p text:style-name="P55"><draw:frame draw:style-name="fr4" draw:name="Grafik590" text:anchor-type="paragraph" svg:x="1.002cm" svg:y="0.012cm" svg:width="6.83cm" svg:height="2.589cm" draw:z-index="609"><draw:image xlink:href="Pictures/10000000000001710000008CE09BE27C.png" xlink:type="simple" xlink:show="embed" xlink:actuate="onLoad"/></draw:frame>Eine eingehende Beschreibung der Hysteresefunktion und ein Anwendungsbeispiel finden Sie unter HYST_1.</text:p>
      <text:list xml:id="list33634118" text:continue-numbering="true" text:style-name="L1">
        <text:list-item>
          <text:list>
            <text:list-item>
              <text:h text:style-name="P217" text:outline-level="2"><text:soft-page-break/><text:alphabetical-index-mark-start text:id="IMark101578380"/>HYST_3<text:alphabetical-index-mark-end text:id="IMark101578380"/></text:h>
            </text:list-item>
          </text:list>
        </text:list-item>
      </text:list>
      <text:p text:style-name="P22">Type<text:tab/>Funktionsbaustein</text:p>
      <text:p text:style-name="P22"><text:span text:style-name="T16">Input</text:span><text:tab/>IN : REAL (Eingangswert)</text:p>
      <text:p text:style-name="P22"><text:tab/>HYST : REAL (Breite der Hysterese)</text:p>
      <text:p text:style-name="P22"><text:tab/>VAL1 : REAL (Mittelwert der Hysterese 1)</text:p>
      <text:p text:style-name="P22"><text:tab/>VAL2 : REAL (Mittelwert der Hysterese 2)</text:p>
      <text:p text:style-name="P22">Output<text:tab/>Q1 : BOOL (Ausgangssignal 1)</text:p>
      <text:p text:style-name="P22"><draw:frame draw:style-name="fr4" draw:name="Grafik209" text:anchor-type="paragraph" svg:x="1.178cm" svg:y="0.626cm" svg:width="2.281cm" svg:height="2.649cm" draw:z-index="181"><draw:image xlink:href="Pictures/10000000000000AC000000C8CFCB5245.png" xlink:type="simple" xlink:show="embed" xlink:actuate="onLoad"/></draw:frame><text:tab/>Q2 : BOOL (Ausgangssignal 2)</text:p>
      <text:p text:style-name="P25"><draw:frame draw:style-name="fr4" draw:name="Grafik591" text:anchor-type="paragraph" svg:x="1.046cm" svg:y="6.736cm" svg:width="6.83cm" svg:height="3.431cm" draw:z-index="610"><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55"/>
      <text:p text:style-name="P55"><draw:frame draw:style-name="fr4" draw:name="Grafik210" text:anchor-type="paragraph" svg:x="1.12cm" svg:y="0.681cm" svg:width="9.83cm" svg:height="3.11cm" draw:z-index="182"><draw:image xlink:href="Pictures/10000000000002E7000000EBCD6375D8.png" xlink:type="simple" xlink:show="embed" xlink:actuate="onLoad"/></draw:frame>Folgendes Beispiel zeigt den Signalverlauf an einem 3-Punkt Regler:</text:p>
      <text:p text:style-name="P55"><draw:frame draw:style-name="fr4" draw:name="Grafik211" text:anchor-type="paragraph" svg:x="1.087cm" svg:y="0.086cm" svg:width="13.259cm" svg:height="5.78cm" draw:z-index="183"><draw:image xlink:href="Pictures/10000000000002CC0000013829E74D4A.png" xlink:type="simple" xlink:show="embed" xlink:actuate="onLoad"/></draw:frame></text:p>
      <text:p text:style-name="P88"><text:soft-page-break/></text:p>
      <text:list xml:id="list33626571" text:continue-numbering="true" text:style-name="L1">
        <text:list-item>
          <text:h text:style-name="P211" text:outline-level="1">Stellglieder</text:h>
        </text:list-item>
      </text:list>
      <text:p text:style-name="P20"/>
      <text:list xml:id="list33653912" text:continue-numbering="true" text:style-name="L1">
        <text:list-item>
          <text:list>
            <text:list-item>
              <text:h text:style-name="P217" text:outline-level="2"><text:alphabetical-index-mark-start text:id="IMark101578380"/>ACTUATOR_2P<text:alphabetical-index-mark-end text:id="IMark101578380"/></text:h>
            </text:list-item>
          </text:list>
        </text:list-item>
      </text:list>
      <text:p text:style-name="P22">Type<text:tab/>Funktionsbaustein</text:p>
      <text:p text:style-name="P25"><text:span text:style-name="T16">Input</text:span><text:tab/>VAL : REAL (Steuereingang 0 - 1)</text:p>
      <text:p text:style-name="P25"><text:tab/>FORCE : BOOL (wenn TRUE: FORCE_IN steuert OUT)</text:p>
      <text:p text:style-name="P25"><text:tab/>FORCE_IN : BOOL (Steuersignal)</text:p>
      <text:p text:style-name="P25">Output<text:tab/>OUT : BOOL (Schaltsignal für Ventil)</text:p>
      <text:p text:style-name="P25"><text:tab/>POS : REAL (Analoges Signal 0 – 1 das dem Mengenstrom entspricht)</text:p>
      <text:p text:style-name="P25">Config<text:tab/>SELF_ACT_TIME : TIME (Selbstbetätigungszeit)</text:p>
      <text:p text:style-name="P25"><text:tab/>SELF_ACT_CYCLES : INT (Anzahl Zyklen bei Selbstbetätigung)</text:p>
      <text:p text:style-name="P25"><text:tab/>CYCLE_TIME : TIME (Taktrate des Ventils)</text:p>
      <text:p text:style-name="P25"><text:tab/>MIN_ONTIME : TIME (Minimale Einschaltzeit)</text:p>
      <text:p text:style-name="P25"><draw:frame draw:style-name="fr4" draw:name="Grafik212" text:anchor-type="paragraph" svg:x="1.231cm" svg:y="0.639cm" svg:width="3.62cm" svg:height="2.2cm" draw:z-index="184"><draw:image xlink:href="Pictures/1000000000000112000000A695F04D5A.png" xlink:type="simple" xlink:show="embed" xlink:actuate="onLoad"/></draw:frame><text:tab/>MIN_OFFTIME : TIME (Minimale Ausschaltzeit)</text:p>
      <text:p text:style-name="P25"><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text:soft-page-break/>genfluss durch das Ventil entspricht. Der Eingangswert VAL kann von 0..1 variiert wer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7">VAL</text:p>
          </table:table-cell>
          <table:table-cell table:style-name="Tabelle2.A1" office:value-type="string">
            <text:p text:style-name="P47">FORCE</text:p>
          </table:table-cell>
          <table:table-cell table:style-name="Tabelle2.A1" office:value-type="string">
            <text:p text:style-name="P47">FORCE_IN</text:p>
          </table:table-cell>
          <table:table-cell table:style-name="Tabelle2.A1" office:value-type="string">
            <text:p text:style-name="P47">POS</text:p>
          </table:table-cell>
          <table:table-cell table:style-name="Tabelle2.E1" office:value-type="string">
            <text:p text:style-name="P47">OUT</text:p>
          </table:table-cell>
        </table:table-row>
        <table:table-row>
          <table:table-cell table:style-name="Tabelle2.A2" office:value-type="string">
            <text:p text:style-name="P47">X</text:p>
          </table:table-cell>
          <table:table-cell table:style-name="Tabelle2.A2" office:value-type="string">
            <text:p text:style-name="P47">FALSE</text:p>
          </table:table-cell>
          <table:table-cell table:style-name="Tabelle2.A2" office:value-type="string">
            <text:p text:style-name="P47">-</text:p>
          </table:table-cell>
          <table:table-cell table:style-name="Tabelle2.A2" office:value-type="string">
            <text:p text:style-name="P47">X</text:p>
          </table:table-cell>
          <table:table-cell table:style-name="Tabelle2.E2" office:value-type="string">
            <text:p text:style-name="P47"><text:span text:style-name="T16">Duty</text:span>-<text:span text:style-name="T16">Cycle</text:span> X</text:p>
          </table:table-cell>
        </table:table-row>
        <table:table-row>
          <table:table-cell table:style-name="Tabelle2.A2" office:value-type="string">
            <text:p text:style-name="P47">-</text:p>
          </table:table-cell>
          <table:table-cell table:style-name="Tabelle2.A2" office:value-type="string">
            <text:p text:style-name="P47">TRUE</text:p>
          </table:table-cell>
          <table:table-cell table:style-name="Tabelle2.A2" office:value-type="string">
            <text:p text:style-name="P47">FALSE</text:p>
          </table:table-cell>
          <table:table-cell table:style-name="Tabelle2.A2" office:value-type="string">
            <text:p text:style-name="P47">0</text:p>
          </table:table-cell>
          <table:table-cell table:style-name="Tabelle2.E2" office:value-type="string">
            <text:p text:style-name="P47">FALSE</text:p>
          </table:table-cell>
        </table:table-row>
        <table:table-row>
          <table:table-cell table:style-name="Tabelle2.A2" office:value-type="string">
            <text:p text:style-name="P47">-</text:p>
          </table:table-cell>
          <table:table-cell table:style-name="Tabelle2.A2" office:value-type="string">
            <text:p text:style-name="P47">TRUE</text:p>
          </table:table-cell>
          <table:table-cell table:style-name="Tabelle2.A2" office:value-type="string">
            <text:p text:style-name="P47">TRUE</text:p>
          </table:table-cell>
          <table:table-cell table:style-name="Tabelle2.A2" office:value-type="string">
            <text:p text:style-name="P47">1</text:p>
          </table:table-cell>
          <table:table-cell table:style-name="Tabelle2.E2" office:value-type="string">
            <text:p text:style-name="P47">TRUE</text:p>
          </table:table-cell>
        </table:table-row>
      </table:table>
      <text:p text:style-name="P25"/>
      <text:p text:style-name="P55">Die Config Variablen MIN_ONTIME und MIN_OFFTIME legen fest wie lange das Ventil mindestens Ein und wie lange es mindestens Aus sein muss bevor es wieder eingeschaltet werden kann. Diese beiden Werte dienen dazu ein flattern des Ventile zu verhindern. Durch <text:s/>MIN_ONTIME und MIN_OFFTIME wird sozusagen der maximale und der minimale Ausgangswert festgelegt. Ist zum Beispiel die Zykluszeit T#100s Sekunden und <text:s/>MIN_ONTIME und MIN_OFFTIME sind jeweils T#1s so wird der aktuelle Ausgangswert POS nie kleiner als 0,01 und nie größer als 0,99. Wäre <text:s text:c="2"/>MIN_ONTIME und MIN_OFFTIME T#10s so würde der Ausgangsbereich auf 0,1 .. 0,9 begrenzt. </text:p>
      <text:list xml:id="list33629577" text:continue-numbering="true" text:style-name="L1">
        <text:list-item>
          <text:list>
            <text:list-item>
              <text:h text:style-name="P217" text:outline-level="2"><text:alphabetical-index-mark-start text:id="IMark101578380"/>ACTUATOR_3P<text:alphabetical-index-mark-end text:id="IMark101578380"/></text:h>
            </text:list-item>
          </text:list>
        </text:list-item>
      </text:list>
      <text:p text:style-name="P22">Type<text:tab/>Funktionsbaustein</text:p>
      <text:p text:style-name="P25"><text:span text:style-name="T16">Input</text:span><text:tab/>VAL : REAL (Eingang Steuersignal 0 - 1)</text:p>
      <text:p text:style-name="P25"><text:tab/>FORCE : BOOL (ON / OFF Steuermodus wenn TRUE)</text:p>
      <text:p text:style-name="P25"><text:tab/>ON : BOOL (Steuersignal wenn FORCE = TRUE)</text:p>
      <text:p text:style-name="P25">Output<text:tab/>OUT1 : BOOL (Steuersignal für Klappe in Richtung auf)</text:p>
      <text:p text:style-name="P25"><text:tab/>OUT2 : BOOL (Steuersignal für Klappe in Richtung geschlossen)</text:p>
      <text:p text:style-name="P25"><text:tab/>POS : REAL (Wert 0–1 der der Momentanen Klappenstellung entspricht)</text:p>
      <text:p text:style-name="P25">Config<text:tab/>MIN_ONTIME : TIME (Minimale Laufzeit für Motor)</text:p>
      <text:p text:style-name="P25"><text:tab/>MIN_OFFTIME : TIME (Minimale Totzeit für Motor)</text:p>
      <text:p text:style-name="P25"><text:tab/>MAX_RUNTIME : TIME (Maximale Laufzeit für den Motor)</text:p>
      <text:p text:style-name="P25"><text:tab/>AUTO_DIAG_TIME : TIME (Zeit nach der Automatisch eine <text:tab/>Diagnose durchgeführt wird)</text:p>
      <text:p text:style-name="P25"><text:tab/>CAL_RUNTIME : TIME (Laufzeit des Motors nach der automatisch <text:tab/>eine Kalibrierung durchgeführt wird.)</text:p>
      <text:p text:style-name="P25"><draw:frame draw:style-name="fr4" draw:name="Grafik217" text:anchor-type="paragraph" svg:x="1.349cm" svg:y="1.344cm" svg:width="3.62cm" svg:height="3.099cm" draw:z-index="188"><draw:image xlink:href="Pictures/1000000000000112000000EA826E342F.png" xlink:type="simple" xlink:show="embed" xlink:actuate="onLoad"/></draw:frame><text:soft-page-break/><text:tab/><text:span text:style-name="T16">SWITCH</text:span>_<text:span text:style-name="T16">AVAILABLE</text:span> : BOOL (TRUE, wenn ein Endschalter <text:tab/>angeschlossen ist)</text:p>
      <text:p text:style-name="P179"><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 text:style-name="T16">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6">Switch</text:span>_<text:span text:style-name="T16">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55">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55">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text:soft-page-break/>ken kann 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xml:id="list33625636" text:continue-numbering="true" text:style-name="L1">
        <text:list-item>
          <text:list>
            <text:list-item>
              <text:h text:style-name="P217" text:outline-level="2"><text:alphabetical-index-mark-start text:id="IMark101578380"/>ACTUATOR_COIL<text:alphabetical-index-mark-end text:id="IMark101578380"/></text:h>
            </text:list-item>
          </text:list>
        </text:list-item>
      </text:list>
      <text:p text:style-name="P22">Type<text:tab/>Funktionsbaustein</text:p>
      <text:p text:style-name="P25"><text:span text:style-name="T16">Input</text:span><text:tab/>IN: BOOL (Steuersignal)</text:p>
      <text:p text:style-name="P55">Config<text:tab/>SELF_ACT_CYCLE : TIME (Automatische Aktivierungszeit)</text:p>
      <text:p text:style-name="P55"><text:tab/>SELF_ACT_TIME : TIME (Einschaltzeit bei Autoaktivierung)</text:p>
      <text:p text:style-name="P25">Output<text:tab/>OUT : BOOL (Steuersignal für die Pumpe)</text:p>
      <text:p text:style-name="P55"><draw:frame draw:style-name="fr4" draw:name="Grafik577" text:anchor-type="paragraph" svg:x="1.067cm" svg:y="0.623cm" svg:width="3.62cm" svg:height="1.75cm" draw:z-index="594"><draw:image xlink:href="Pictures/10000000000001120000008426B07E96.png" xlink:type="simple" xlink:show="embed" xlink:actuate="onLoad"/></draw:frame><text:tab/>STATUS : BYTE (ESR kompatibler Statusausgang)</text:p>
      <text:p text:style-name="P55"><text:line-break/><text:span text:style-name="T24">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24"> Die Statusmeldungen sind wie folgt definiert:<text:tab/>STATUS = 100, </text:span><text:span text:style-name="T16">Standby.</text:span></text:p>
      <text:p text:style-name="P63"><text:tab/>STATUS = 101, Ventil wurde durch TRUE am Eingang IN aktiviert.</text:p>
      <text:p text:style-name="P63"><text:tab/>STATUS = 102, Ventil wurde Automatisch aktiviert.</text:p>
      <text:p text:style-name="P63"/>
      <text:list xml:id="list33629131" text:continue-numbering="true" text:style-name="L1">
        <text:list-item>
          <text:list>
            <text:list-item>
              <text:h text:style-name="P217" text:outline-level="2"><text:soft-page-break/><text:alphabetical-index-mark-start text:id="IMark101578380"/>ACTUATOR_PUMP<text:alphabetical-index-mark-end text:id="IMark101578380"/></text:h>
            </text:list-item>
          </text:list>
        </text:list-item>
      </text:list>
      <text:p text:style-name="P22">Type<text:tab/>Funktionsbaustein</text:p>
      <text:p text:style-name="P25"><text:span text:style-name="T16">Input</text:span><text:tab/>IN: BOOL (Steuersignal für Pumpe)</text:p>
      <text:p text:style-name="P25"><text:tab/>MANUAL : BOOL (Manuelles Steuersignal)</text:p>
      <text:p text:style-name="P25"><text:tab/>RST : BOOL (Reset Signal)</text:p>
      <text:p text:style-name="P25">Output<text:tab/>PUMP : BOOL (Steuersignal für die Pumpe)</text:p>
      <text:p text:style-name="P25"><text:tab/>RUNTIME : REAL (Betriebsstunden des Motors in Stunden)</text:p>
      <text:p text:style-name="P25"><text:tab/>CYCLES : REAL (Anzahl der Ein / Aus Zyklen der Pumpe)</text:p>
      <text:p text:style-name="P25">Config<text:tab/>MIN_ONTIME : TIME (Minimale Laufzeit für Motor)</text:p>
      <text:p text:style-name="P25"><text:tab/>MIN_OFFTIME : TIME (Minimale Totzeit für Motor)</text:p>
      <text:p text:style-name="P25"><text:tab/>RUN_EVERY : TIME (Zeit nach der die Pumpe selbsttätig läuft)</text:p>
      <text:p text:style-name="P25"><draw:frame draw:style-name="fr4" draw:name="Grafik218" text:anchor-type="paragraph" svg:x="1.335cm" svg:y="0.12cm" svg:width="3.18cm" svg:height="2.2cm" draw:z-index="189"><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Setup-Variablen RUN_EVERY wird die Zeit definiert, nach der die Pumpe selbsttätig läuft, wenn sie länger als RUN_EVERY stillsteht um ein festsitzen der Pumpe zu vermeiden. Die Pumpe schaltet in diesem Fall selbsttätig ein und läuft für MIN_ONTIME. Durch RUN_EVERY = T#0s kann die automatische Aktivierung abgeschaltet werden.</text:p>
      <text:p text:style-name="P55">Ein interner Betriebsstundenzähler zählt die Laufzeit der Pumpe in Stunden und auch die Anzahl der Schaltzyklen. Beide Werte können mit TRUE am Eingang RST auf Null zurückgesetzt werden. Der Betriebsstundenzähler ist permanent und geht weder bei Stromausfall oder Reset verloren. <text:span text:style-name="T16">RUNTIME</text:span> und <text:span text:style-name="T16">CYCLES</text:span> sind beides REAL-Werte, damit nicht der übliche <text:span text:style-name="T16">Overflow</text:span> wie bei TIME Werten nach 50 Tagen passiert.</text:p>
      <text:list xml:id="list33656699" text:continue-numbering="true" text:style-name="L1">
        <text:list-item>
          <text:list>
            <text:list-item>
              <text:h text:style-name="P217" text:outline-level="2"><text:soft-page-break/><text:alphabetical-index-mark-start text:id="IMark101578380"/>ACTUATOR_UD<text:alphabetical-index-mark-end text:id="IMark101578380"/></text:h>
            </text:list-item>
          </text:list>
        </text:list-item>
      </text:list>
      <text:p text:style-name="Standard">Type<text:tab/><text:span text:style-name="T38">Funktionsbaustein</text:span></text:p>
      <text:p text:style-name="P25"><text:span text:style-name="T16">Input</text:span><text:tab/>UD : BOOL (Richtungs Eingang in Auto Mode UP=TRUE)</text:p>
      <text:p text:style-name="P25"><text:tab/>ON : BOOL (TRUE, wenn im Auto Mode)</text:p>
      <text:p text:style-name="P25"><text:tab/>MANUAL : BOOL (TRUE, wenn Manual Mode)</text:p>
      <text:p text:style-name="P25"><text:tab/>UP : BOOL (UP <text:span text:style-name="T16">enable</text:span> in Manual Mode)</text:p>
      <text:p text:style-name="P25"><text:tab/>DN : BOOL (DN <text:span text:style-name="T16">enable</text:span> in Manual Mode)</text:p>
      <text:p text:style-name="P25"><text:tab/>OFF : BOOL (Sicherheits Ausschalter TRUE = Ausgänge FALSE)</text:p>
      <text:p text:style-name="P25"><text:tab/>YUP_IN : BOOL (Rückführungseingang UP Relais)</text:p>
      <text:p text:style-name="P25"><text:tab/>YDN_IN : BOOL (Rückführungseingang DN Relais)</text:p>
      <text:p text:style-name="P25">Output<text:tab/>YUP : BOOL (Ausgang für Richtung UP)</text:p>
      <text:p text:style-name="P25"><text:tab/>YDN : BOOL (Ausgang für Richtung DN)</text:p>
      <text:p text:style-name="P25"><text:tab/>STATUS : Byte (ESR kompatibler Status und Fehler Ausgang )</text:p>
      <text:p text:style-name="P25">Config<text:tab/>TON : TIME (minimale Einschaltzeit)</text:p>
      <text:p text:style-name="P25"><text:tab/>TOFF : TIME (minimale Ausschaltzeit)</text:p>
      <text:p text:style-name="P25"><draw:frame draw:style-name="fr4" draw:name="Grafik219" text:anchor-type="paragraph" svg:x="1.385cm" svg:y="1.134cm" svg:width="3.18cm" svg:height="4.44cm" draw:z-index="190"><draw:image xlink:href="Pictures/10000000000000F000000150D5281BFE.png" xlink:type="simple" xlink:show="embed" xlink:actuate="onLoad"/></draw:frame><text:tab/>OUT_RETURN : BOOL (schaltet die Rückführeingänge YUP_In und <text:tab/>YDN_in ein)</text:p>
      <text:p text:style-name="Standard"><text:line-break/><text:span text:style-name="T38">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text:soft-page-break/>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55">1 : YUP kann nicht gesetzt werden weil YDN_IN TRUE ist.</text:p>
      <text:p text:style-name="P55">2 : YDN kann nicht gesetzt werden weil YUP_IN TRUE ist.</text:p>
      <text:p text:style-name="P55">Mit den Config Variablen TON und TOFF kann eine Mindeste Einschaltzeit und eine Mindeste Totzeit zwischen 2 Ausgangsimpulsen definiert werden um das Schalten großer Motoren oder Getriebe die ein An und Auslaufen benötigen zu ermöglichen.</text:p>
      <text:p text:style-name="P55"/>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63">Manual</text:p>
          </table:table-cell>
          <table:table-cell table:style-name="Tabelle3.A1" office:value-type="string">
            <text:p text:style-name="P164">UP</text:p>
          </table:table-cell>
          <table:table-cell table:style-name="Tabelle3.A1" office:value-type="string">
            <text:p text:style-name="P164">DN</text:p>
          </table:table-cell>
          <table:table-cell table:style-name="Tabelle3.A1" office:value-type="string">
            <text:p text:style-name="P164">ON</text:p>
          </table:table-cell>
          <table:table-cell table:style-name="Tabelle3.A1" office:value-type="string">
            <text:p text:style-name="P164">UD</text:p>
          </table:table-cell>
          <table:table-cell table:style-name="Tabelle3.A1" office:value-type="string">
            <text:p text:style-name="P164">OFF</text:p>
          </table:table-cell>
          <table:table-cell table:style-name="Tabelle3.A1" office:value-type="string">
            <text:p text:style-name="P164">YUP</text:p>
          </table:table-cell>
          <table:table-cell table:style-name="Tabelle3.A1" office:value-type="string">
            <text:p text:style-name="P164">YDN</text:p>
          </table:table-cell>
          <table:table-cell table:style-name="Tabelle3.I1" office:value-type="string">
            <text:p text:style-name="P164">Status</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2</text:p>
          </table:table-cell>
        </table:table-row>
        <table:table-row>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0</text:p>
          </table:table-cell>
          <table:table-cell table:style-name="Tabelle3.I2" office:value-type="string">
            <text:p text:style-name="P123">103</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1</text:p>
          </table:table-cell>
          <table:table-cell table:style-name="Tabelle3.I2" office:value-type="string">
            <text:p text:style-name="P123">104</text:p>
          </table:table-cell>
        </table:table-row>
        <table:table-row>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2</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0</text:p>
          </table:table-cell>
          <table:table-cell table:style-name="Tabelle3.I2" office:value-type="string">
            <text:p text:style-name="P123">111</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1</text:p>
          </table:table-cell>
          <table:table-cell table:style-name="Tabelle3.I2" office:value-type="string">
            <text:p text:style-name="P123">112</text:p>
          </table:table-cell>
        </table:table-row>
        <table:table-row>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1</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10</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10</text:p>
          </table:table-cell>
        </table:table-row>
      </table:table>
      <text:p text:style-name="P55"/>
      <text:p text:style-name="P55"/>
      <text:list xml:id="list33633729" text:continue-numbering="true" text:style-name="L1">
        <text:list-item>
          <text:h text:style-name="P211" text:outline-level="1">Heizung Lüftung und Klima</text:h>
        </text:list-item>
      </text:list>
      <text:p text:style-name="P199"/>
      <text:list xml:id="list33640824" text:continue-numbering="true" text:style-name="L1">
        <text:list-item>
          <text:list>
            <text:list-item>
              <text:h text:style-name="P217" text:outline-level="2"><text:alphabetical-index-mark-start text:id="IMark101578380"/>AIR_DENSITY<text:alphabetical-index-mark-end text:id="IMark101578380"/></text:h>
            </text:list-item>
          </text:list>
        </text:list-item>
      </text:list>
      <text:p text:style-name="Standard">Type<text:tab/><text:span text:style-name="T38">Funktion</text:span> : REAL</text:p>
      <text:p text:style-name="P25"><text:span text:style-name="T16">Input</text:span><text:tab/>T : REAL (Temperatur der Luft in °C)</text:p>
      <text:p text:style-name="P55"><text:tab/>P : REAL (Luftdruck in Pascal)</text:p>
      <text:p text:style-name="P55"><text:tab/>RH : REAL (Luftfeuchtigkeit in %)</text:p>
      <text:p text:style-name="P25"><draw:frame draw:style-name="fr4" draw:name="Grafik366" text:anchor-type="paragraph" svg:x="1.025cm" svg:y="0.688cm" svg:width="4.069cm" svg:height="2.02cm" draw:z-index="364"><draw:image xlink:href="Pictures/1000000000000134000000993E48239F.png" xlink:type="simple" xlink:show="embed" xlink:actuate="onLoad"/></draw:frame>Output<text:tab/>(Dichte der Luft in kg/m³)</text:p>
      <text:p text:style-name="P55">AIR_DENSITY berechnet die Dichte der Luft in kg/m³ abhängig von Druck, Feuchte und Temperatur. Die Temperatur wird in °C, Druck in Pascal und die Feuchte in % (50 = 50%) angegeben.</text:p>
      <text:list xml:id="list33633154" text:continue-numbering="true" text:style-name="L1">
        <text:list-item>
          <text:list>
            <text:list-item>
              <text:h text:style-name="P217" text:outline-level="2"><text:alphabetical-index-mark-start text:id="IMark101578380"/>AIR_ENTHALPY<text:alphabetical-index-mark-end text:id="IMark101578380"/></text:h>
            </text:list-item>
          </text:list>
        </text:list-item>
      </text:list>
      <text:p text:style-name="Standard">Type<text:tab/><text:span text:style-name="T38">Funktion</text:span> : REAL</text:p>
      <text:p text:style-name="P25"><text:span text:style-name="T16">Input</text:span><text:tab/>T : REAL (Temperatur der Luft)</text:p>
      <text:p text:style-name="P55"><text:tab/>RH : REAL (Relative Feuchte der Luft)</text:p>
      <text:p text:style-name="P25"><draw:frame draw:style-name="fr4" draw:name="Grafik367" text:anchor-type="paragraph" svg:x="1.046cm" svg:y="0.667cm" svg:width="4.521cm" svg:height="1.57cm" draw:z-index="365"><draw:image xlink:href="Pictures/100000000000015600000077E6566A09.png" xlink:type="simple" xlink:show="embed" xlink:actuate="onLoad"/></draw:frame>Output<text:tab/>(Enthalpie der Luft in J/g)</text:p>
      <text:p text:style-name="P55">AIR_ENTHALPY berechnet die Enthalpie von Feuchter Luft aus den Angaben T für Temperatur in Grad Celsius und der relativen Feuchte RH in % (50 = 50%). Die Enthalpie wird in Joule / Gramm berechnet.</text:p>
      <text:list xml:id="list33655759" text:continue-numbering="true" text:style-name="L1">
        <text:list-item>
          <text:list>
            <text:list-item>
              <text:h text:style-name="P217" text:outline-level="2"><text:soft-page-break/><text:alphabetical-index-mark-start text:id="IMark101578380"/>BOILER<text:alphabetical-index-mark-end text:id="IMark101578380"/></text:h>
            </text:list-item>
          </text:list>
        </text:list-item>
      </text:list>
      <text:p text:style-name="Standard"><text:span text:style-name="T38">Type</text:span><text:tab/><text:span text:style-name="T38">Funktionsbaustein</text:span></text:p>
      <text:p text:style-name="P25"><text:span text:style-name="T16">Input</text:span><text:tab/>T_UPPER : REAL (Eingang oberer Temperatursensor)</text:p>
      <text:p text:style-name="P25"><text:tab/>T_LOWER : REAL (Eingang unterer Temperatursensor)</text:p>
      <text:p text:style-name="P25"><text:tab/>PRESSURE : REAL (Eingang Drucksensor)</text:p>
      <text:p text:style-name="P25"><text:tab/>ENABLE : BOOL (Warmwasseranforderung)</text:p>
      <text:p text:style-name="P25"><text:tab/>REQ_1 : BOOL (Anforderungseingang für vordefinierte <text:tab/>Temperatur 1)</text:p>
      <text:p text:style-name="P25"><text:tab/>REQ_2 : BOOL (Anforderungseingang für vordefinierte <text:tab/>Temperatur 2)</text:p>
      <text:p text:style-name="P25"><text:tab/>BOOST : BOOL (Anforderungseingang für sofortige Bereitstellung)</text:p>
      <text:p text:style-name="P25">Output<text:tab/>HEAT : BOOL (Ausgang für Ladekreis)</text:p>
      <text:p text:style-name="P25"><text:tab/>ERROR : BOOL (Fehlersignal)</text:p>
      <text:p text:style-name="P25"><text:tab/>STATUS : Byte (ESR kompatibler Status Ausgang)</text:p>
      <text:p text:style-name="P25">Config<text:tab/>T_UPPER_MIN : REAL (Mindesttemperatur für oben) Default = 50</text:p>
      <text:p text:style-name="P25"><text:tab/>T_UPPER_MAX : REAL (Maximaltemperatur für oben) Default = 60</text:p>
      <text:p text:style-name="Standard"><text:tab/><text:span text:style-name="T38">T_LOWER_ENABLE</text:span> : BOOL (FALSE, wenn unterer <text:tab/><text:tab/><text:span text:style-name="T38">Temperatursensor</text:span> nicht vorhanden ist) </text:p>
      <text:p text:style-name="P25"><text:tab/>T_LOWER_MAX : REAL (Maximaltemperatur des unten) Default = 60</text:p>
      <text:p text:style-name="P25"><text:tab/>T_REQUEST_1 : REAL (Temperatur bei Anforderung 1) Default = 70</text:p>
      <text:p text:style-name="P25"><text:tab/>T_REQUEST_2 : REAL(Temperatur bei Anforderung 2) Default = 50</text:p>
      <text:p text:style-name="P25"><text:tab/>T_REQUEST_HYS : REAL (Hysterese für Regelung) Default = 5</text:p>
      <text:p text:style-name="P25"><text:tab/>T_PROTECT_HIGH : REAL (obere Grenztemperatur, Default = 80)</text:p>
      <text:p text:style-name="P25"><draw:frame draw:style-name="fr4" draw:name="Grafik286" text:anchor-type="paragraph" svg:x="1.305cm" svg:y="0.73cm" svg:width="3.62cm" svg:height="3.99cm" draw:z-index="255"><draw:image xlink:href="Pictures/10000000000001120000012EB846BD62.png" xlink:type="simple" xlink:show="embed" xlink:actuate="onLoad"/></draw:frame><text:tab/>T_PROTECT_LOW : REAL (untere Grenztemperatur, Default = 10)</text:p>
      <text:p text:style-name="Standard"><text:line-break/>BOILER ist ein <text:span text:style-name="T38">Controller</text:span> <text:span text:style-name="T38">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ext:soft-page-break/>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130">Status</text:p>
          </table:table-cell>
          <table:table-cell table:style-name="Tabelle10.B1" office:value-type="string">
            <text:p text:style-name="Table_20_Contents"/>
          </table:table-cell>
        </table:table-row>
        <table:table-row>
          <table:table-cell table:style-name="Tabelle10.A2" office:value-type="string">
            <text:p text:style-name="P130">1</text:p>
          </table:table-cell>
          <table:table-cell table:style-name="Tabelle10.B2" office:value-type="string">
            <text:p text:style-name="P129">oberer Temperatursensor hat die obere Grenztemperatur überschritten</text:p>
          </table:table-cell>
        </table:table-row>
        <table:table-row>
          <table:table-cell table:style-name="Tabelle10.A2" office:value-type="string">
            <text:p text:style-name="P130">2</text:p>
          </table:table-cell>
          <table:table-cell table:style-name="Tabelle10.B2" office:value-type="string">
            <text:p text:style-name="P129">oberer Temperatursensor hat die untere Grenztemperatur unterschritten</text:p>
          </table:table-cell>
        </table:table-row>
        <text:soft-page-break/>
        <table:table-row>
          <table:table-cell table:style-name="Tabelle10.A2" office:value-type="string">
            <text:p text:style-name="P130">3</text:p>
          </table:table-cell>
          <table:table-cell table:style-name="Tabelle10.B2" office:value-type="string">
            <text:p text:style-name="P129">unterer Temperatursensor hat die obere Grenztemperatur überschritten</text:p>
          </table:table-cell>
        </table:table-row>
        <table:table-row>
          <table:table-cell table:style-name="Tabelle10.A2" office:value-type="string">
            <text:p text:style-name="P130">4</text:p>
          </table:table-cell>
          <table:table-cell table:style-name="Tabelle10.B2" office:value-type="string">
            <text:p text:style-name="P129">unterer Temperatursensor hat die untere Grenztemperatur unterschritten</text:p>
          </table:table-cell>
        </table:table-row>
        <table:table-row>
          <table:table-cell table:style-name="Tabelle10.A2" office:value-type="string">
            <text:p text:style-name="P130">5</text:p>
          </table:table-cell>
          <table:table-cell table:style-name="Tabelle10.B2" office:value-type="string">
            <text:p text:style-name="P129">Wasserdruck im Puffer ist zu gering</text:p>
          </table:table-cell>
        </table:table-row>
        <table:table-row>
          <table:table-cell table:style-name="Tabelle10.A2" office:value-type="string">
            <text:p text:style-name="P130">100</text:p>
          </table:table-cell>
          <table:table-cell table:style-name="Tabelle10.B2" office:value-type="string">
            <text:p text:style-name="P127">Standby</text:p>
          </table:table-cell>
        </table:table-row>
        <table:table-row>
          <table:table-cell table:style-name="Tabelle10.A2" office:value-type="string">
            <text:p text:style-name="P130">101</text:p>
          </table:table-cell>
          <table:table-cell table:style-name="Tabelle10.B2" office:value-type="string">
            <text:p text:style-name="P129">BOOST Nachladung</text:p>
          </table:table-cell>
        </table:table-row>
        <table:table-row>
          <table:table-cell table:style-name="Tabelle10.A2" office:value-type="string">
            <text:p text:style-name="P130">102</text:p>
          </table:table-cell>
          <table:table-cell table:style-name="Tabelle10.B2" office:value-type="string">
            <text:p text:style-name="P129">Standard Nachladung</text:p>
          </table:table-cell>
        </table:table-row>
        <table:table-row>
          <table:table-cell table:style-name="Tabelle10.A2" office:value-type="string">
            <text:p text:style-name="P130">103</text:p>
          </table:table-cell>
          <table:table-cell table:style-name="Tabelle10.B2" office:value-type="string">
            <text:p text:style-name="P129">Nachladung auf <text:span text:style-name="T16">Request</text:span> Temperatur 1</text:p>
          </table:table-cell>
        </table:table-row>
        <table:table-row>
          <table:table-cell table:style-name="Tabelle10.A2" office:value-type="string">
            <text:p text:style-name="P130">104</text:p>
          </table:table-cell>
          <table:table-cell table:style-name="Tabelle10.B2" office:value-type="string">
            <text:p text:style-name="P129">Nachladung auf <text:span text:style-name="T16">Request</text:span> Temperatur 2</text:p>
          </table:table-cell>
        </table:table-row>
      </table:table>
      <text:p text:style-name="Standard"><draw:frame draw:style-name="fr4" draw:name="Grafik287" text:anchor-type="paragraph" svg:x="1.039cm" svg:y="1.582cm" svg:width="15.52cm" svg:height="3.99cm" draw:z-index="256"><draw:image xlink:href="Pictures/100000000000030E000000C9488E3441.png" xlink:type="simple" xlink:show="embed" xlink:actuate="onLoad"/></draw:frame><text:line-break/>Das folgende <text:span text:style-name="T38">Beispiel </text:span>zeigt die Anwendung von BOILER mit einem TIMER und einer Feiertagsschaltung:</text:p>
      <text:p text:style-name="P25"/>
      <text:list xml:id="list33648114" text:continue-numbering="true" text:style-name="L1">
        <text:list-item>
          <text:list>
            <text:list-item>
              <text:h text:style-name="P217" text:outline-level="2"><text:alphabetical-index-mark-start text:id="IMark101578380"/>BURNER<text:alphabetical-index-mark-end text:id="IMark101578380"/></text:h>
            </text:list-item>
          </text:list>
        </text:list-item>
      </text:list>
      <text:p text:style-name="Standard">Type<text:tab/><text:span text:style-name="T38">Funktionsbaustein</text:span></text:p>
      <text:p text:style-name="P25"><text:span text:style-name="T16">Input</text:span><text:tab/>IN : BOOL (Steuereingang)</text:p>
      <text:p text:style-name="P25"><text:tab/>STAGE2 : BOOL (Steuereingang Stufe 2)</text:p>
      <text:p text:style-name="P25"><text:tab/>OVER_TEMP : BOOL (Temperaturbegrenzung des Kessels)</text:p>
      <text:p text:style-name="P25"><text:tab/>OIL_TEMP : BOOL (Thermostat der Ölvorerwärmung)</text:p>
      <text:p text:style-name="P25"><text:tab/>FLAME : BOOL (Flammwächter)</text:p>
      <text:p text:style-name="P25"><text:tab/>RST : BOOL (Reset-Eingang Für Störrücksetzung)</text:p>
      <text:p text:style-name="P25"><text:tab/>RST_TIMER : BOOL (Reset für die Betriebszähler)</text:p>
      <text:p text:style-name="P25">Output<text:tab/>MOTOR : BOOL (Steuersignal für den Motor)</text:p>
      <text:p text:style-name="P25"><text:soft-page-break/><text:tab/>COIL1 : BOOL (Steuersignal für Ölventil Stufe 1)</text:p>
      <text:p text:style-name="P25"><text:tab/>COIL2 : BOOL (Steuereingang für Ölventil Stufe 2)</text:p>
      <text:p text:style-name="P25"><text:tab/>PRE_HEAT : BOOL (Ölvorerwärmung)</text:p>
      <text:p text:style-name="P25"><text:tab/>IGNITE : BOOL (Zündung)</text:p>
      <text:p text:style-name="P25"><text:tab/>RUNTIME1 : REAL (Betriebsstundenzähler Stufe 1)</text:p>
      <text:p text:style-name="P25"><text:tab/>RUNTIME2 : REAL (Betriebsstundenzähler Stufe 2)</text:p>
      <text:p text:style-name="P25"><text:tab/>KWH : REAL (Kilowattstundenzähler)</text:p>
      <text:p text:style-name="P25"><text:tab/>CYCLES : REAL (Anzahl der Brenner Starts)</text:p>
      <text:p text:style-name="P25"><text:tab/>STATUS : Byte (ESR Kompatibler Statusausgang)</text:p>
      <text:p text:style-name="P25"><text:tab/>FAIL : BOOL (Störmeldung: TRUE, wenn Fehler Auftritt)</text:p>
      <text:p text:style-name="P25">Config<text:tab/>PRE_HEAT_TIME : TIME (maximale Zeit für die Ölvorerwärmung)</text:p>
      <text:p text:style-name="P25"><text:tab/>PRE_VENT_TIME : TIME (Vorbelüftungszeit)</text:p>
      <text:p text:style-name="P25"><text:tab/>PRE_IGNITE_TIME : TIME (Vorzündungszeit)</text:p>
      <text:p text:style-name="P25"><text:tab/>POST_IGNITE_TIME : TIME (Nachzündungszeit)</text:p>
      <text:p text:style-name="P25"><text:tab/>stage2_DELAY : TIME (Verzögerung Stufe 2)</text:p>
      <text:p text:style-name="P25"><text:tab/>SAFETY_TIME : TIME ()</text:p>
      <text:p text:style-name="P25"><text:tab/>LOCKOUT_TIME : TIME (Zeit die vergehen muss, bevor mit einem <text:tab/>RST eine Störung gelöscht werden kann)</text:p>
      <text:p text:style-name="P25"><text:tab/>MULTIPLE_IGNITION : BOOL ()</text:p>
      <text:p text:style-name="P25"><text:tab/>KW1 : REAL (Leistung des Brenners auf Stufe 1 in KW)</text:p>
      <text:p text:style-name="P25"><text:tab/>KW2 : REAL (Leistung des Brenners auf Stufe 2 in KW)</text:p>
      <text:p text:style-name="P25"><draw:frame draw:style-name="fr4" draw:name="Grafik220" text:anchor-type="paragraph" svg:x="1.462cm" svg:y="0.104cm" svg:width="4.129cm" svg:height="5.791cm" draw:z-index="194"><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text:soft-page-break/>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p>
      <text:p text:style-name="Standard">Tritt eine Störung auf, so wird der Baustein für eine feste Zeit LOCKOUT_TIME blockiert und erst danach kann ein RST den Betrieb wieder starten. Während der LOCKOUT_TIME muss der RST-<text:span text:style-name="T16">Eingang</text:span> FALSE sein. Ein TRUE am Eingang OVER_TEMP stoppt sofort jede Aktion und meldet den Fehler 9.</text:p>
      <text:p text:style-name="P172">Der Status-Ausgang signalisiert den momentanen Zustand des Bausteins:</text:p>
      <text:p text:style-name="P76"><text:span text:style-name="T4">110 = Warten auf Startsignal (</text:span><text:span text:style-name="T8">Standby</text:span><text:span text:style-name="T4">)<text:line-break/>111 = Startsequenz wird durchlaufen<text:line-break/>112 = Brenner Läuft auf Stufe 1<text:line-break/>113 = Brenner läuft auf Stufe 2</text:span></text:p>
      <text:p text:style-name="P58">Eine Reihe von Fehlerzuständen werden am Ausgang STATUS bereitgestellt, wenn ein Fehler Auftritt:</text:p>
      <text:p text:style-name="P76"><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8">Safety</text:span><text:span text:style-name="T4">_TIME) wurde ohne Flamme überschritten<text:line-break/>5 = Flamme ist im Betrieb Abgerissen<text:line-break/>9 = Kessel Übertemperatur Kontakt hat Ausgelöst</text:span></text:p>
      <text:p text:style-name="P58">Traceaufzeichnung einer Normalen Startsequenz:</text:p>
      <text:p text:style-name="P25"><draw:frame draw:style-name="fr4" draw:name="Grafik221" text:anchor-type="paragraph" svg:x="1.044cm" svg:y="0.078cm" svg:width="15.939cm" svg:height="7.167cm" draw:z-index="191"><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dung eingeschaltet. Die Zündung bleibt dann solange ein, bis die POST_IGNITION_TIME abgelaufen ist.</text:p>
      <text:p text:style-name="P55"><text:soft-page-break/></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101">In</text:p>
          </table:table-cell>
          <table:table-cell table:style-name="Tabelle4.A1" office:value-type="string">
            <text:p text:style-name="P118">over</text:p>
            <text:p text:style-name="P118">temp</text:p>
          </table:table-cell>
          <table:table-cell table:style-name="Tabelle4.A1" office:value-type="string">
            <text:p text:style-name="P118">Oil</text:p>
            <text:p text:style-name="P101">temp</text:p>
          </table:table-cell>
          <table:table-cell table:style-name="Tabelle4.A1" office:value-type="string">
            <text:p text:style-name="P118">Flame</text:p>
          </table:table-cell>
          <table:table-cell table:style-name="Tabelle4.A1" office:value-type="string">
            <text:p text:style-name="P101">Rst</text:p>
          </table:table-cell>
          <table:table-cell table:style-name="Tabelle4.A1" office:value-type="string">
            <text:p text:style-name="P118">motor</text:p>
          </table:table-cell>
          <table:table-cell table:style-name="Tabelle4.A1" office:value-type="string">
            <text:p text:style-name="P118">Oil</text:p>
            <text:p text:style-name="P118">coil</text:p>
          </table:table-cell>
          <table:table-cell table:style-name="Tabelle4.A1" office:value-type="string">
            <text:p text:style-name="P101">Pre</text:p>
            <text:p text:style-name="P118">heat</text:p>
          </table:table-cell>
          <table:table-cell table:style-name="Tabelle4.A1" office:value-type="string">
            <text:p text:style-name="P119">ignite</text:p>
          </table:table-cell>
          <table:table-cell table:style-name="Tabelle4.A1" office:value-type="string">
            <text:p text:style-name="P104">Status</text:p>
          </table:table-cell>
          <table:table-cell table:style-name="Tabelle4.A1" office:value-type="string">
            <text:p text:style-name="P119">fail</text:p>
          </table:table-cell>
          <table:table-cell table:style-name="Tabelle4.L1" office:value-type="string">
            <text:p text:style-name="Table_20_Contents"/>
          </table:table-cell>
        </table:table-row>
        <table:table-row table:style-name="Tabelle4.2">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text:p>
          </table:table-cell>
          <table:table-cell table:style-name="Tabelle4.A2" office:value-type="string">
            <text:p text:style-name="P101">-</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5">0</text:p>
          </table:table-cell>
          <table:table-cell table:style-name="Tabelle4.A2" office:value-type="string">
            <text:p text:style-name="P105">110</text:p>
          </table:table-cell>
          <table:table-cell table:style-name="Tabelle4.A2" office:value-type="string">
            <text:p text:style-name="P105">0</text:p>
          </table:table-cell>
          <table:table-cell table:style-name="Tabelle4.L2" office:value-type="string">
            <text:p text:style-name="P105">Wartezustand</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5">0</text:p>
          </table:table-cell>
          <table:table-cell table:style-name="Tabelle4.A2" office:value-type="string">
            <text:p text:style-name="P105">111</text:p>
          </table:table-cell>
          <table:table-cell table:style-name="Tabelle4.A2" office:value-type="string">
            <text:p text:style-name="P105">0</text:p>
          </table:table-cell>
          <table:table-cell table:style-name="Tabelle4.L2" office:value-type="string">
            <text:p text:style-name="P105">Ölvorwärmphase</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5">0</text:p>
          </table:table-cell>
          <table:table-cell table:style-name="Tabelle4.A2" office:value-type="string">
            <text:p text:style-name="P105">111</text:p>
          </table:table-cell>
          <table:table-cell table:style-name="Tabelle4.A2" office:value-type="string">
            <text:p text:style-name="P105">0</text:p>
          </table:table-cell>
          <table:table-cell table:style-name="Tabelle4.L2" office:value-type="string">
            <text:p text:style-name="P105">Vorbelüftungsphase</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5">1</text:p>
          </table:table-cell>
          <table:table-cell table:style-name="Tabelle4.A2" office:value-type="string">
            <text:p text:style-name="P105">111</text:p>
          </table:table-cell>
          <table:table-cell table:style-name="Tabelle4.A2" office:value-type="string">
            <text:p text:style-name="P105">0</text:p>
          </table:table-cell>
          <table:table-cell table:style-name="Tabelle4.L2" office:value-type="string">
            <text:p text:style-name="P105">Vorzündphase</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5">1</text:p>
          </table:table-cell>
          <table:table-cell table:style-name="Tabelle4.A2" office:value-type="string">
            <text:p text:style-name="P105">111</text:p>
          </table:table-cell>
          <table:table-cell table:style-name="Tabelle4.A2" office:value-type="string">
            <text:p text:style-name="P105">0</text:p>
          </table:table-cell>
          <table:table-cell table:style-name="Tabelle4.L2" office:value-type="string">
            <text:p text:style-name="P105">Ventil Stufe 1 öffnen</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5">1</text:p>
          </table:table-cell>
          <table:table-cell table:style-name="Tabelle4.A2" office:value-type="string">
            <text:p text:style-name="P105">112</text:p>
          </table:table-cell>
          <table:table-cell table:style-name="Tabelle4.A2" office:value-type="string">
            <text:p text:style-name="P105">0</text:p>
          </table:table-cell>
          <table:table-cell table:style-name="Tabelle4.L2" office:value-type="string">
            <text:p text:style-name="P105">Flamme brennt Nachzündphase</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5">0</text:p>
          </table:table-cell>
          <table:table-cell table:style-name="Tabelle4.A2" office:value-type="string">
            <text:p text:style-name="P105">112</text:p>
          </table:table-cell>
          <table:table-cell table:style-name="Tabelle4.A2" office:value-type="string">
            <text:p text:style-name="P105">0</text:p>
          </table:table-cell>
          <table:table-cell table:style-name="Tabelle4.L2" office:value-type="string">
            <text:p text:style-name="P105">Brenner läuft</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5">1</text:p>
          </table:table-cell>
          <table:table-cell table:style-name="Tabelle4.A2" office:value-type="string">
            <text:p text:style-name="P105">111</text:p>
          </table:table-cell>
          <table:table-cell table:style-name="Tabelle4.A2" office:value-type="string">
            <text:p text:style-name="P105">0</text:p>
          </table:table-cell>
          <table:table-cell table:style-name="Tabelle4.L2" office:value-type="string">
            <text:p text:style-name="P105">Nachzündung nach Flammabriß</text:p>
          </table:table-cell>
        </table:table-row>
        <table:table-row table:style-name="Tabelle4.2">
          <table:table-cell table:style-name="Tabelle4.A2" office:value-type="string">
            <text:p text:style-name="P101">-</text:p>
          </table:table-cell>
          <table:table-cell table:style-name="Tabelle4.A2" office:value-type="string">
            <text:p text:style-name="P101">1</text:p>
          </table:table-cell>
          <table:table-cell table:style-name="Tabelle4.A2" office:value-type="string">
            <text:p text:style-name="P101">-</text:p>
          </table:table-cell>
          <table:table-cell table:style-name="Tabelle4.A2" office:value-type="string">
            <text:p text:style-name="P101">-</text:p>
          </table:table-cell>
          <table:table-cell table:style-name="Tabelle4.A2" office:value-type="string">
            <text:p text:style-name="P101">-</text:p>
          </table:table-cell>
          <table:table-cell table:style-name="Tabelle4.A2" office:value-type="string">
            <text:p text:style-name="P101">-</text:p>
          </table:table-cell>
          <table:table-cell table:style-name="Tabelle4.A2" office:value-type="string">
            <text:p text:style-name="P101">-</text:p>
          </table:table-cell>
          <table:table-cell table:style-name="Tabelle4.A2" office:value-type="string">
            <text:p text:style-name="P101">-</text:p>
          </table:table-cell>
          <table:table-cell table:style-name="Tabelle4.A2" office:value-type="string">
            <text:p text:style-name="P105">-</text:p>
          </table:table-cell>
          <table:table-cell table:style-name="Tabelle4.A2" office:value-type="string">
            <text:p text:style-name="P105">9</text:p>
          </table:table-cell>
          <table:table-cell table:style-name="Tabelle4.A2" office:value-type="string">
            <text:p text:style-name="P105">1</text:p>
          </table:table-cell>
          <table:table-cell table:style-name="Tabelle4.L2" office:value-type="string">
            <text:p text:style-name="P105">Kessel Übertemperatur</text:p>
          </table:table-cell>
        </table:table-row>
        <table:table-row table:style-name="Tabelle4.2">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1">0</text:p>
          </table:table-cell>
          <table:table-cell table:style-name="Tabelle4.A2" office:value-type="string">
            <text:p text:style-name="P101">1</text:p>
          </table:table-cell>
          <table:table-cell table:style-name="Tabelle4.A2" office:value-type="string">
            <text:p text:style-name="P105">0</text:p>
          </table:table-cell>
          <table:table-cell table:style-name="Tabelle4.A2" office:value-type="string">
            <text:p text:style-name="P105">3</text:p>
          </table:table-cell>
          <table:table-cell table:style-name="Tabelle4.A2" office:value-type="string">
            <text:p text:style-name="P105">1</text:p>
          </table:table-cell>
          <table:table-cell table:style-name="Tabelle4.L2" office:value-type="string">
            <text:p text:style-name="P105">Fremdlichtfehler</text:p>
          </table:table-cell>
        </table:table-row>
      </table:table>
      <text:p text:style-name="Standard"/>
      <text:p text:style-name="Standard"><draw:g text:anchor-type="paragraph" draw:z-index="193" draw:style-name="gr1"><draw:line draw:style-name="gr13" draw:text-style-name="P251" svg:x1="2.813cm" svg:y1="3.108cm" svg:x2="3.314cm" svg:y2="3.108cm"><text:p/></draw:line><draw:line draw:style-name="gr13" draw:text-style-name="P251" svg:x1="3.311cm" svg:y1="2.861cm" svg:x2="3.311cm" svg:y2="3.111cm"><text:p/></draw:line><draw:line draw:style-name="gr13" draw:text-style-name="P251" svg:x1="3.311cm" svg:y1="2.861cm" svg:x2="10.06cm" svg:y2="2.861cm"><text:p/></draw:line><draw:line draw:style-name="gr13" draw:text-style-name="P251" svg:x1="10.059cm" svg:y1="3.111cm" svg:x2="10.059cm" svg:y2="2.861cm"><text:p/></draw:line><draw:line draw:style-name="gr3" draw:text-style-name="P251" svg:x1="3.06cm" svg:y1="2.36cm" svg:x2="3.06cm" svg:y2="2.609cm"><text:p/></draw:line><draw:line draw:style-name="gr3" draw:text-style-name="P251" svg:x1="2.813cm" svg:y1="2.607cm" svg:x2="3.063cm" svg:y2="2.607cm"><text:p/></draw:line><draw:line draw:style-name="gr3" draw:text-style-name="P251" svg:x1="3.06cm" svg:y1="2.36cm" svg:x2="10.56cm" svg:y2="2.36cm"><text:p/></draw:line><draw:frame draw:style-name="gr35" draw:text-style-name="P254" svg:width="2.251cm" svg:height="0.622cm" svg:x="1.06cm" svg:y="2.108cm"><draw:text-box><text:p text:style-name="P252"><text:span text:style-name="T51">over_temp</text:span></text:p></draw:text-box></draw:frame><draw:line draw:style-name="gr13" draw:text-style-name="P251" svg:x1="10.059cm" svg:y1="3.108cm" svg:x2="10.56cm" svg:y2="3.108cm"><text:p/></draw:line><draw:line draw:style-name="gr2" draw:text-style-name="P251" svg:x1="2.813cm" svg:y1="4.609cm" svg:x2="3.813cm" svg:y2="4.609cm"><text:p/></draw:line><draw:line draw:style-name="gr2" draw:text-style-name="P251" svg:x1="3.81cm" svg:y1="4.362cm" svg:x2="3.81cm" svg:y2="4.611cm"><text:p/></draw:line><draw:line draw:style-name="gr2" draw:text-style-name="P251" svg:x1="3.81cm" svg:y1="4.362cm" svg:x2="10.059cm" svg:y2="4.362cm"><text:p/></draw:line><draw:line draw:style-name="gr4" draw:text-style-name="P251" svg:x1="5.062cm" svg:y1="5.607cm" svg:x2="5.062cm" svg:y2="5.357cm"><text:p/></draw:line><draw:line draw:style-name="gr4" draw:text-style-name="P251" svg:x1="10.061cm" svg:y1="5.357cm" svg:x2="5.062cm" svg:y2="5.357cm"><text:p/></draw:line><draw:line draw:style-name="gr4" draw:text-style-name="P251" svg:x1="10.059cm" svg:y1="5.357cm" svg:x2="10.059cm" svg:y2="5.607cm"><text:p/></draw:line><draw:line draw:style-name="gr4" draw:text-style-name="P251" svg:x1="10.56cm" svg:y1="5.609cm" svg:x2="10.059cm" svg:y2="5.609cm"><text:p/></draw:line><draw:line draw:style-name="gr4" draw:text-style-name="P251" svg:x1="2.813cm" svg:y1="5.609cm" svg:x2="5.064cm" svg:y2="5.609cm"><text:p/></draw:line><draw:line draw:style-name="gr4" draw:text-style-name="P251" svg:x1="2.813cm" svg:y1="6.11cm" svg:x2="7.064cm" svg:y2="6.11cm"><text:p/></draw:line><draw:line draw:style-name="gr4" draw:text-style-name="P251" svg:x1="10.059cm" svg:y1="5.858cm" svg:x2="10.059cm" svg:y2="6.108cm"><text:p/></draw:line><draw:line draw:style-name="gr4" draw:text-style-name="P251" svg:x1="10.059cm" svg:y1="6.11cm" svg:x2="10.56cm" svg:y2="6.11cm"><text:p/></draw:line><draw:line draw:style-name="gr5" draw:text-style-name="P251" svg:x1="2.813cm" svg:y1="3.607cm" svg:x2="3.314cm" svg:y2="3.607cm"><text:p/></draw:line><draw:line draw:style-name="gr5" draw:text-style-name="P251" svg:x1="3.311cm" svg:y1="3.36cm" svg:x2="3.311cm" svg:y2="3.609cm"><text:p/></draw:line><draw:line draw:style-name="gr5" draw:text-style-name="P251" svg:x1="10.06cm" svg:y1="3.36cm" svg:x2="3.311cm" svg:y2="3.36cm"><text:p/></draw:line><draw:line draw:style-name="gr5" draw:text-style-name="P251" svg:x1="10.059cm" svg:y1="3.36cm" svg:x2="10.059cm" svg:y2="3.609cm"><text:p/></draw:line><draw:line draw:style-name="gr5" draw:text-style-name="P251" svg:x1="10.56cm" svg:y1="3.607cm" svg:x2="10.059cm" svg:y2="3.607cm"><text:p/></draw:line><draw:line draw:style-name="gr11" draw:text-style-name="P251" svg:x1="3.81cm" svg:y1="4.108cm" svg:x2="3.81cm" svg:y2="3.858cm"><text:p/></draw:line><draw:line draw:style-name="gr11" draw:text-style-name="P251" svg:x1="10.56cm" svg:y1="3.858cm" svg:x2="3.81cm" svg:y2="3.858cm"><text:p/></draw:line><draw:line draw:style-name="gr11" draw:text-style-name="P251" svg:x1="2.813cm" svg:y1="4.108cm" svg:x2="3.813cm" svg:y2="4.108cm"><text:p/></draw:line><draw:line draw:style-name="gr12" draw:text-style-name="P251" svg:x1="2.813cm" svg:y1="5.11cm" svg:x2="4.314cm" svg:y2="5.11cm"><text:p/></draw:line><draw:line draw:style-name="gr12" draw:text-style-name="P251" svg:x1="4.314cm" svg:y1="4.858cm" svg:x2="4.314cm" svg:y2="5.108cm"><text:p/></draw:line><draw:line draw:style-name="gr12" draw:text-style-name="P251" svg:x1="6.064cm" svg:y1="4.858cm" svg:x2="4.314cm" svg:y2="4.858cm"><text:p/></draw:line><draw:line draw:style-name="gr12" draw:text-style-name="P251" svg:x1="6.062cm" svg:y1="4.858cm" svg:x2="6.062cm" svg:y2="5.108cm"><text:p/></draw:line><draw:line draw:style-name="gr12" draw:text-style-name="P251" svg:x1="10.562cm" svg:y1="5.11cm" svg:x2="6.062cm" svg:y2="5.11cm"><text:p/></draw:line><draw:line draw:style-name="gr36" draw:text-style-name="P251" svg:x1="5.312cm" svg:y1="6.611cm" svg:x2="2.813cm" svg:y2="6.611cm"><text:p/></draw:line><draw:line draw:style-name="gr4" draw:text-style-name="P251" svg:x1="7.064cm" svg:y1="5.858cm" svg:x2="10.063cm" svg:y2="5.858cm"><text:p/></draw:line><draw:line draw:style-name="gr4" draw:text-style-name="P251" svg:x1="7.064cm" svg:y1="6.108cm" svg:x2="7.064cm" svg:y2="5.858cm"><text:p/></draw:line><draw:frame draw:style-name="gr35" draw:text-style-name="P254" svg:width="0.75cm" svg:height="0.622cm" svg:x="1.06cm" svg:y="2.607cm"><draw:text-box><text:p text:style-name="P252"><text:span text:style-name="T51">in</text:span></text:p></draw:text-box></draw:frame><draw:frame draw:style-name="gr35" draw:text-style-name="P254" svg:width="1.752cm" svg:height="0.622cm" svg:x="1.06cm" svg:y="3.108cm"><draw:text-box><text:p text:style-name="P252"><text:span text:style-name="T51">pre_heat</text:span></text:p></draw:text-box></draw:frame><draw:frame draw:style-name="gr35" draw:text-style-name="P254" svg:width="1.752cm" svg:height="0.622cm" svg:x="1.06cm" svg:y="3.607cm"><draw:text-box><text:p text:style-name="P252"><text:span text:style-name="T51">oil_temp</text:span></text:p></draw:text-box></draw:frame><draw:frame draw:style-name="gr35" draw:text-style-name="P254" svg:width="1.752cm" svg:height="0.622cm" svg:x="1.06cm" svg:y="4.108cm"><draw:text-box><text:p text:style-name="P252"><text:span text:style-name="T51">motor</text:span></text:p></draw:text-box></draw:frame><draw:line draw:style-name="gr2" draw:text-style-name="P251" svg:x1="10.059cm" svg:y1="4.611cm" svg:x2="10.059cm" svg:y2="4.362cm"><text:p/></draw:line><draw:line draw:style-name="gr2" draw:text-style-name="P251" svg:x1="10.059cm" svg:y1="4.609cm" svg:x2="10.56cm" svg:y2="4.609cm"><text:p/></draw:line><draw:frame draw:style-name="gr35" draw:text-style-name="P254" svg:width="1.752cm" svg:height="0.622cm" svg:x="1.06cm" svg:y="4.608cm"><draw:text-box><text:p text:style-name="P252"><text:span text:style-name="T51">ignite</text:span></text:p></draw:text-box></draw:frame><draw:frame draw:style-name="gr35" draw:text-style-name="P254" svg:width="1.752cm" svg:height="0.622cm" svg:x="1.06cm" svg:y="5.11cm"><draw:text-box><text:p text:style-name="P252"><text:span text:style-name="T51">Coil 1</text:span></text:p></draw:text-box></draw:frame><draw:frame draw:style-name="gr35" draw:text-style-name="P254" svg:width="1.752cm" svg:height="0.622cm" svg:x="1.06cm" svg:y="5.608cm"><draw:text-box><text:p text:style-name="P252"><text:span text:style-name="T51">Coil 2</text:span></text:p></draw:text-box></draw:frame><draw:frame draw:style-name="gr35" draw:text-style-name="P254" svg:width="1.752cm" svg:height="0.622cm" svg:x="1.06cm" svg:y="6.109cm"><draw:text-box><text:p text:style-name="P252"><text:span text:style-name="T51">Flame</text:span></text:p></draw:text-box></draw:frame><draw:line draw:style-name="gr36" draw:text-style-name="P251" svg:x1="5.309cm" svg:y1="6.607cm" svg:x2="5.309cm" svg:y2="6.357cm"><text:p/></draw:line><draw:line draw:style-name="gr36" draw:text-style-name="P251" svg:x1="10.059cm" svg:y1="6.357cm" svg:x2="5.309cm" svg:y2="6.357cm"><text:p/></draw:line><draw:line draw:style-name="gr36" draw:text-style-name="P251" svg:x1="10.059cm" svg:y1="6.357cm" svg:x2="10.059cm" svg:y2="6.607cm"><text:p/></draw:line><draw:line draw:style-name="gr36" draw:text-style-name="P251" svg:x1="10.56cm" svg:y1="6.611cm" svg:x2="10.059cm" svg:y2="6.611cm"><text:p/></draw:line><draw:line draw:style-name="gr14" draw:text-style-name="P251" svg:x1="5.062cm" svg:y1="7.108cm" svg:x2="5.062cm" svg:y2="1.358cm"><text:p/></draw:line><draw:line draw:style-name="gr14" draw:text-style-name="P251" svg:x1="3.311cm" svg:y1="3.609cm" svg:x2="3.311cm" svg:y2="1.859cm"><text:p/></draw:line><draw:line draw:style-name="gr14" draw:text-style-name="P251" svg:x1="3.81cm" svg:y1="7.108cm" svg:x2="3.81cm" svg:y2="1.358cm"><text:p/></draw:line><draw:line draw:style-name="gr37" draw:text-style-name="P251" svg:x1="3.311cm" svg:y1="2.108cm" svg:x2="3.81cm" svg:y2="2.108cm"><text:p/></draw:line><draw:frame draw:style-name="gr38" draw:text-style-name="P260" svg:width="0.75cm" svg:height="0.571cm" svg:x="3.311cm" svg:y="1.607cm"><draw:text-box><text:p text:style-name="P252"><text:span text:style-name="T54">t1</text:span></text:p></draw:text-box></draw:frame><draw:frame draw:style-name="gr38" draw:text-style-name="P260" svg:width="0.75cm" svg:height="0.571cm" svg:x="4.06cm" svg:y="1.108cm"><draw:text-box><text:p text:style-name="P252"><text:span text:style-name="T54">t2</text:span></text:p></draw:text-box></draw:frame><draw:line draw:style-name="gr37" draw:text-style-name="P251" svg:x1="3.81cm" svg:y1="1.607cm" svg:x2="5.061cm" svg:y2="1.607cm"><text:p/></draw:line><draw:line draw:style-name="gr14" draw:text-style-name="P251" svg:x1="4.314cm" svg:y1="1.859cm" svg:x2="4.314cm" svg:y2="5.11cm"><text:p/></draw:line><draw:line draw:style-name="gr37" draw:text-style-name="P251" svg:x1="4.314cm" svg:y1="2.108cm" svg:x2="5.064cm" svg:y2="2.108cm"><text:p/></draw:line><draw:frame draw:style-name="gr38" draw:text-style-name="P260" svg:width="0.75cm" svg:height="0.571cm" svg:x="4.311cm" svg:y="1.607cm"><draw:text-box><text:p text:style-name="P252"><text:span text:style-name="T54">t3</text:span></text:p></draw:text-box></draw:frame><draw:line draw:style-name="gr14" draw:text-style-name="P251" svg:x1="5.309cm" svg:y1="7.608cm" svg:x2="5.309cm" svg:y2="6.357cm"><text:p/></draw:line><draw:frame draw:style-name="gr38" draw:text-style-name="P260" svg:width="0.75cm" svg:height="0.571cm" svg:x="4.56cm" svg:y="6.828cm"><draw:text-box><text:p text:style-name="P252"><text:span text:style-name="T54">t4</text:span></text:p></draw:text-box></draw:frame><draw:line draw:style-name="gr14" draw:text-style-name="P251" svg:x1="6.062cm" svg:y1="7.109cm" svg:x2="6.062cm" svg:y2="4.858cm"><text:p/></draw:line><draw:line draw:style-name="gr37" draw:text-style-name="P251" svg:x1="5.309cm" svg:y1="6.858cm" svg:x2="6.06cm" svg:y2="6.858cm"><text:p/></draw:line><draw:frame draw:style-name="gr38" draw:text-style-name="P260" svg:width="0.75cm" svg:height="0.571cm" svg:x="5.309cm" svg:y="6.828cm"><draw:text-box><text:p text:style-name="P252"><text:span text:style-name="T54">t5</text:span></text:p></draw:text-box></draw:frame><draw:line draw:style-name="gr39" draw:text-style-name="P251" svg:x1="5.062cm" svg:y1="6.858cm" svg:x2="4.561cm" svg:y2="6.858cm"><text:p/></draw:line><draw:line draw:style-name="gr14" draw:text-style-name="P251" svg:x1="7.064cm" svg:y1="7.608cm" svg:x2="7.064cm" svg:y2="5.858cm"><text:p/></draw:line><draw:line draw:style-name="gr37" draw:text-style-name="P251" svg:x1="5.309cm" svg:y1="7.357cm" svg:x2="7.061cm" svg:y2="7.357cm"><text:p/></draw:line><draw:frame draw:style-name="gr38" draw:text-style-name="P260" svg:width="0.75cm" svg:height="0.571cm" svg:x="5.81cm" svg:y="7.327cm"><draw:text-box><text:p text:style-name="P252"><text:span text:style-name="T54">t6</text:span></text:p></draw:text-box></draw:frame></draw:g>Das folgende <text:span text:style-name="T38">Zeitdiagramm</text:span> erläutert die verschiedenen Config-Zeiten und den Ablauf:</text:p>
      <text:p text:style-name="P88"><text:soft-page-break/></text:p>
      <text:p text:style-name="P55">Das Zeitdiagramm gibt den genauen Zeitverlauf wieder:</text:p>
      <text:p text:style-name="P55"><text:tab/>t1 = Vorheizzeit (PRE_HEAT_TIME)</text:p>
      <text:p text:style-name="P55"><text:tab/>t2 = Vorbelüftungszeit (PRE_<text:span text:style-name="T16">VENT</text:span>_TIME)</text:p>
      <text:p text:style-name="P55"><text:tab/>t3 = Vorzündungszeit (PRE_IGNITE_TIME)</text:p>
      <text:p text:style-name="P55"><text:tab/>t4 = Sicherheitszeit (SAFETY_TIME)</text:p>
      <text:p text:style-name="P55"><text:tab/>t5 = Nachzündungszeit (POST_IGNITE_TIME)</text:p>
      <text:p text:style-name="P55"><text:tab/>t6 = Verzögerung für Stufe 2 (STAGE2_DELAY)</text:p>
      <text:list xml:id="list33625092" text:continue-numbering="true" text:style-name="L1">
        <text:list-item>
          <text:list>
            <text:list-item>
              <text:h text:style-name="P217" text:outline-level="2"><text:alphabetical-index-mark-start text:id="IMark101578380"/>DEW_CON<text:alphabetical-index-mark-end text:id="IMark101578380"/></text:h>
            </text:list-item>
          </text:list>
        </text:list-item>
      </text:list>
      <text:p text:style-name="Standard">Type<text:tab/><text:span text:style-name="T38">Funktion</text:span> : REAL</text:p>
      <text:p text:style-name="P25"><text:span text:style-name="T16">Input</text:span><text:tab/>RH : REAL (Relative Feuchte)</text:p>
      <text:p text:style-name="P25"><text:tab/>T : REAL (Temperatur in °C)</text:p>
      <text:p text:style-name="P25">Output<text:tab/>REAL (Wasserdampf Konzentration in Gramm / m³)</text:p>
      <text:p text:style-name="Standard"><draw:frame draw:style-name="fr4" draw:name="Grafik299" text:anchor-type="paragraph" svg:x="1.092cm" svg:y="0.019cm" svg:width="3.62cm" svg:height="1.57cm" draw:z-index="272"><draw:image xlink:href="Pictures/100000000000011200000077FAB485F5.png" xlink:type="simple" xlink:show="embed" xlink:actuate="onLoad"/></draw:frame><text:line-break/>Der Baustein <text:span text:style-name="T38">DEW_CON</text:span> berechnet aus der Relativen Feuchte (RH) und der Temperatur (T in °C) die Wasserdampfkonzentration in der Luft. Das Ergebnis wird in Gramm / m³ ermittelt. RH ist in % (50 = 50%) anzugeben und die Temperatur in °C.</text:p>
      <text:list xml:id="list33641603" text:continue-numbering="true" text:style-name="L1">
        <text:list-item>
          <text:list>
            <text:list-item>
              <text:h text:style-name="P217" text:outline-level="2"><text:alphabetical-index-mark-start text:id="IMark101578380"/>DEW_R<text:alphabetical-index-mark-end text:id="IMark101578380"/><text:alphabetical-index-mark-start text:id="IMark112149324"/>H<text:alphabetical-index-mark-end text:id="IMark112149324"/></text:h>
            </text:list-item>
          </text:list>
        </text:list-item>
      </text:list>
      <text:p text:style-name="Standard">Type<text:tab/><text:span text:style-name="T38">Funktion</text:span> : REAL</text:p>
      <text:p text:style-name="P25"><text:span text:style-name="T16">Input</text:span><text:tab/>VC : REAL (Wasserdampfkonzentration in Luft in Gramm / m³)</text:p>
      <text:p text:style-name="P25"><text:tab/>T : REAL (Temperatur in °C)</text:p>
      <text:p text:style-name="P25"><draw:frame draw:style-name="fr4" draw:name="Grafik301" text:anchor-type="paragraph" svg:x="1.092cm" svg:y="0.605cm" svg:width="3.18cm" svg:height="1.57cm" draw:z-index="276"><draw:image xlink:href="Pictures/10000000000000F00000007777DC1125.png" xlink:type="simple" xlink:show="embed" xlink:actuate="onLoad"/></draw:frame>Output<text:tab/>REAL (Relative Luftfeuchtigkeit in %)</text:p>
      <text:p text:style-name="P25"><text:soft-page-break/><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79"><draw:frame draw:style-name="fr4" draw:name="Grafik302" text:anchor-type="paragraph" svg:x="1.005cm" svg:y="3.604cm" svg:width="15.79cm" svg:height="1.829cm" draw:z-index="277"><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79"><text:line-break/>Siehe hierzu auch die Bausteine DEW_CON und DEW_TEMP.</text:p>
      <text:list xml:id="list33649759" text:continue-numbering="true" text:style-name="L1">
        <text:list-item>
          <text:list>
            <text:list-item>
              <text:h text:style-name="P217" text:outline-level="2"><text:alphabetical-index-mark-start text:id="IMark112149324"/>DEW_TEMP<text:alphabetical-index-mark-end text:id="IMark112149324"/></text:h>
            </text:list-item>
          </text:list>
        </text:list-item>
      </text:list>
      <text:p text:style-name="Standard">Type<text:tab/><text:span text:style-name="T38">Funktion</text:span> : REAL</text:p>
      <text:p text:style-name="P25"><text:span text:style-name="T16">Input</text:span><text:tab/>RH : REAL (Relative Feuchte)</text:p>
      <text:p text:style-name="P25"><text:tab/>T : REAL (Temperatur in °C)</text:p>
      <text:p text:style-name="P25"><draw:frame draw:style-name="fr4" draw:name="Grafik222" text:anchor-type="paragraph" svg:x="0.845cm" svg:y="0.683cm" svg:width="4.069cm" svg:height="1.57cm" draw:z-index="192"><draw:image xlink:href="Pictures/1000000000000134000000776116D3C7.png" xlink:type="simple" xlink:show="embed" xlink:actuate="onLoad"/></draw:frame>Output<text:tab/>REAL (Taupunkttemperatur)</text:p>
      <text:p text:style-name="P25"><text:line-break/>Der Baustein DEW_TEMP berechnet aus der Relativen Feuchte (RH) und der Temperatur (T in °C) die Taupunkttemperatur. Die Relative Feuchte wird in % angegeben <text:s/>(50 = 50%).</text:p>
      <text:list xml:id="list33637899" text:continue-numbering="true" text:style-name="L1">
        <text:list-item>
          <text:list>
            <text:list-item>
              <text:h text:style-name="P217" text:outline-level="2"><text:soft-page-break/><text:alphabetical-index-mark-start text:id="IMark112149324"/>HEAT_INDEX<text:alphabetical-index-mark-end text:id="IMark112149324"/></text:h>
            </text:list-item>
          </text:list>
        </text:list-item>
      </text:list>
      <text:p text:style-name="Standard">Type<text:tab/><text:span text:style-name="T38">Funktion</text:span> : REAL</text:p>
      <text:p text:style-name="P25"><text:span text:style-name="T16">Input</text:span><text:tab/>T : REAL (Temperatur in °C)</text:p>
      <text:p text:style-name="P25"><text:tab/>RH : REAL (Relative Feuchte)</text:p>
      <text:p text:style-name="P25">Output<text:tab/>REAL (<text:span text:style-name="T16">Heat</text:span> Index Temperatur)</text:p>
      <text:p text:style-name="P25"><draw:frame draw:style-name="fr4" draw:name="Grafik272" text:anchor-type="paragraph" svg:x="1.094cm" svg:y="0.037cm" svg:width="4.521cm" svg:height="1.57cm" draw:z-index="240"><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Feuchte &gt; 10%. Für Werte außerhalb des Definitionsbereichs wird die Eingangstemperatur ausgegeben.</text:p>
      <text:list xml:id="list33652186" text:continue-numbering="true" text:style-name="L1">
        <text:list-item>
          <text:list>
            <text:list-item>
              <text:h text:style-name="P217" text:outline-level="2"><text:alphabetical-index-mark-start text:id="IMark112149324"/>HEAT_METER<text:alphabetical-index-mark-end text:id="IMark112149324"/></text:h>
            </text:list-item>
          </text:list>
        </text:list-item>
      </text:list>
      <text:p text:style-name="Standard">Type<text:tab/><text:span text:style-name="T38">Funktion</text:span> : REAL</text:p>
      <text:p text:style-name="P25"><text:span text:style-name="T16">Input</text:span><text:tab/>TF : REAL (Vorlauftemperatur in °C)</text:p>
      <text:p text:style-name="P25"><text:tab/>TR : REAL (Rücklauftemperatur in °C)</text:p>
      <text:p text:style-name="P55"><text:tab/>LPH : REAL (Durchflussmenge in L/h bzw. L/Impuls)</text:p>
      <text:p text:style-name="P55"><text:tab/>E : BOOL (<text:span text:style-name="T16">Enable</text:span> Signal)</text:p>
      <text:p text:style-name="P55"><text:tab/>RST : BOOL (asynchroner Reset Eingang)</text:p>
      <text:p text:style-name="P55"><text:span text:style-name="T24">Config</text:span><text:tab/>CP : REAL (Spezifische Wärmekapazität der <text:s/>2ten Komponente)</text:p>
      <text:p text:style-name="P55"><text:tab/>DENSITY : REAL (Dichte der 2ten Komponente)</text:p>
      <text:p text:style-name="P55"><text:tab/>CONTENT : REAL (Anteil, 1 = 100%)</text:p>
      <text:p text:style-name="P55"><text:tab/>PULSE_MODE : BOOL (Impulszähler wenn TRUE)</text:p>
      <text:p text:style-name="P55"><text:tab/>RETURN_METER : BOOL (Durchflussmesser im Rücklauf wenn TRUE)</text:p>
      <text:p text:style-name="P55"><text:tab/>AVG_TIME : TIME (Zeit für die Ermittlung des Momentanverbrauchs)<text:tab/></text:p>
      <text:p text:style-name="P25"><draw:frame draw:style-name="fr4" draw:name="Grafik386" text:anchor-type="paragraph" svg:x="1.067cm" svg:y="0.69cm" svg:width="2.731cm" svg:height="3.099cm" draw:z-index="380"><draw:image xlink:href="Pictures/10000000000000CE000000EA89835D48.png" xlink:type="simple" xlink:show="embed" xlink:actuate="onLoad"/></draw:frame>Output<text:tab/>REAL (Wärmemenge in Joule)</text:p>
      <text:p text:style-name="P25"><text:soft-page-break/><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24">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en Verbrauch zur Verfügung. Der momentane Verbrauch wird in Joule / Stunde angegeben, und in den Zeitabständen von AVG_TIME ermittelt.</text:p>
      <text:p text:style-name="P55">Der Baustein hat folgende Vorgabewerte, die aktiv sind wenn die entsprechenden Werte vom Anwender nicht gesetzt werden:</text:p>
      <text:p text:style-name="P55">PULSE_MODE = FALSE</text:p>
      <text:p text:style-name="P55">RETURN_METER = FALSE</text:p>
      <text:p text:style-name="P55">AVG_TIME = T#5s</text:p>
      <text:list xml:id="list33640114" text:continue-numbering="true" text:style-name="L1">
        <text:list-item>
          <text:list>
            <text:list-item>
              <text:h text:style-name="P217" text:outline-level="2"><text:soft-page-break/><text:alphabetical-index-mark-start text:id="IMark112149324"/><text:span text:style-name="T11">HEAT</text:span>_TEMP<text:alphabetical-index-mark-end text:id="IMark112149324"/></text:h>
            </text:list-item>
          </text:list>
        </text:list-item>
      </text:list>
      <text:p text:style-name="Standard">Type<text:tab/><text:span text:style-name="T38">Funktionsbaustein</text:span></text:p>
      <text:p text:style-name="P25"><text:span text:style-name="T16">Input</text:span><text:tab/>T_EXT : REAL (Außentemperatur)</text:p>
      <text:p text:style-name="P55"><text:tab/>T_INT : REAL (Soll Raumtemperatur)</text:p>
      <text:p text:style-name="P25"><text:tab/>OFFSET : REAL (Absenkung oder Anhebung der Raumtemperatur)</text:p>
      <text:p text:style-name="P25"><text:tab/>T_REQ : REAL (Temperaturanforderung)</text:p>
      <text:p text:style-name="P25">Output<text:tab/>TY : REAL (Heizkreisvorlauftemperatur)</text:p>
      <text:p text:style-name="P55"><text:tab/>HEAT : BOOL (Heizungsanforderung)</text:p>
      <text:p text:style-name="P25">Config<text:tab/>TY_MAX : REAL (Minimale Heizkreistemperatur, 70°C)</text:p>
      <text:p text:style-name="P25"><text:tab/>TY_MIN : REAL (Maximale Heizkreistemperatur, 25°C)</text:p>
      <text:p text:style-name="P25"><text:tab/>TY_C : REAL (Auslegungstemperatur, 70°C)</text:p>
      <text:p text:style-name="P55"><text:tab/>T_INT_C : REAL (Auslegungstemperatur Raum, 20°C)</text:p>
      <text:p text:style-name="P25"><text:tab/>T_EXT_C : REAL (T_EXT bei Auslegungstemperatur -15°C)</text:p>
      <text:p text:style-name="P55"><text:tab/>T_DIFF_C : REAL (Vor- Rücklaufdifferenz 10°C)</text:p>
      <text:p text:style-name="P25"><text:tab/>C : REAL (Konstante des Heizsystems, DEFAULT = 1,33)</text:p>
      <text:p text:style-name="P55"><draw:frame draw:style-name="fr4" draw:name="Grafik224" text:anchor-type="paragraph" svg:x="1.177cm" svg:y="0.679cm" svg:width="3.29cm" svg:height="2.311cm" draw:z-index="721"><draw:image xlink:href="Pictures/10000000000000F9000000AFD41AB5F8.png" xlink:type="simple" xlink:show="embed" xlink:actuate="onLoad"/></draw:frame><text:tab/>H : REAL (Schwelle für Heizungsanforderung 3°C)</text:p>
      <text:p text:style-name="Standard"><text:line-break/><text:span text:style-name="T38">HEAT_TEMP</text:span> <text:span text:style-name="T38">berechnet</text:span> die Vorlauftemperatur aus der Außentemperatur nach folgender Formel:</text:p>
      <text:p text:style-name="P69">TY = <text:s/>TR + T_DIFF / 2 * TX + (TY_CONFIG - T_DIFF / 2 - TR) * TX ^ (1 / C)</text:p>
      <text:p text:style-name="P69">mit: <text:tab/>TR = T_INT + OFFSET</text:p>
      <text:p text:style-name="P69"><text:tab/>TX := (TR - T_EXT) / (T_INT_CONFIG - T_EXT_CONFIG);</text:p>
      <text:p text:style-name="P55">Die Parameter der Heizkurve werden durch die Setup Variablen TY_C (Auslegungsvorlauftemperatur), T_INT_C (Raumtemperatur im Auslegungspunkt), T_EXT_C (Außentemperatur im Auslegungspunkt) und T_DIFF_C (Differenz Vor- Rücklauf im Auslegungspunkt) vorgegeben. Mit dem Eingang Offset kann die Heizkurve an Raumabsenkung (negativer Offset) oder Raumanhebung (positiver Offset) angepasst werden. Mit den Setup 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Begrenzung auf TY_MAX gilt nicht für die Anforderung durch T_REQ. Durch die Setup Variable H wird festgelegt ab welcher Außentemperatur die <text:soft-page-break/>Heizkurve berechnet wird, solange T_EXT + H &gt;= als T_INT + OFFSET ist bleibt TY auf 0 und HEAT ist FALSE. Wird T_EXT + H &lt; als T_INT + OFFSET wird HEAT TRUE und TY gibt die berechnete Vorlauftemperatur aus. Die Setup Variable C legt die Krümmung der Heizkurve fest. Die Krümmung ist abhängig vom verwendeten Heizsystem.</text:p>
      <text:p text:style-name="P55"><text:tab/>Konvektoren: <text:s/><text:tab/>C = 1.25 – 1.45</text:p>
      <text:p text:style-name="P25"><text:tab/>Plattenheizkörper:<text:tab/>C = 1.20 – 1.30</text:p>
      <text:p text:style-name="P25"><text:tab/>Radiatoren:<text:tab/>C = 1.30</text:p>
      <text:p text:style-name="P25"><text:tab/>Rohre:<text:tab/><text:tab/>C = 1.25</text:p>
      <text:p text:style-name="P25"><text:tab/>Fußbodenheizung:<text:tab/>C = 1.1</text:p>
      <text:p text:style-name="P25">Je größer der Wert von C, desto stärker ist die Heizkurve gekrümmt. Ein Wert von 1.0 ergibt eine Gerade als Heizkurve. <text:s/>Typische Heizsysteme liegen zwischen 1.0 und 1.5.</text:p>
      <text:p text:style-name="P194">Die Grafik zeigt <text:span text:style-name="T38">Heizkurven</text:span> für Auslegungstemperaturen von 30 – 80 °C Vorlauftemperatur bei -20°C Außentemperatur und bei einem C von 1.33:</text:p>
      <text:p text:style-name="Standard"><draw:g text:anchor-type="paragraph" draw:z-index="198" draw:style-name="gr1"><draw:frame draw:style-name="gr40" draw:text-style-name="P251" svg:width="13.749cm" svg:height="10cm" svg:x="1.594cm" svg:y="-0.046cm"><draw:image xlink:href="Pictures/10000000000002D4000002231CFA4ECF.png" xlink:type="simple" xlink:show="embed" xlink:actuate="onLoad"><text:p text:style-name="P261"><text:span text:style-name="T52"><text:s text:c="10"/></text:span></text:p></draw:image></draw:frame><draw:line draw:style-name="gr21" draw:text-style-name="P251" svg:x1="2.016cm" svg:y1="7.082cm" svg:x2="3.685cm" svg:y2="7.682cm"><text:p/></draw:line><draw:line draw:style-name="gr7" draw:text-style-name="P251" svg:x1="0.342cm" svg:y1="6.484cm" svg:x2="2.014cm" svg:y2="7.084cm"><text:p/></draw:line><draw:frame draw:style-name="gr41" draw:text-style-name="P262" svg:width="1.265cm" svg:height="1.327cm" svg:x="0.562cm" svg:y="6.05cm"><draw:text-box><text:p text:style-name="P252"><text:span text:style-name="T55">Ofs</text:span></text:p><text:p text:style-name="P252"><text:span text:style-name="T55">+5°</text:span></text:p></draw:text-box></draw:frame><draw:frame draw:style-name="gr42" draw:text-style-name="P262" svg:width="1.265cm" svg:height="1.325cm" svg:x="2.912cm" svg:y="7.694cm"><draw:text-box><text:p text:style-name="P252"><text:span text:style-name="T55">Ofs</text:span></text:p><text:p text:style-name="P252"><text:span text:style-name="T55">-5°</text:span></text:p></draw:text-box></draw:frame></draw:g></text:p>
      <text:list xml:id="list33634147" text:continue-numbering="true" text:style-name="L1">
        <text:list-item>
          <text:list>
            <text:list-item>
              <text:h text:style-name="P217" text:outline-level="2"><text:soft-page-break/><text:alphabetical-index-mark-start text:id="IMark100801540"/>LEGIONELLA<text:alphabetical-index-mark-end text:id="IMark100801540"/></text:h>
            </text:list-item>
          </text:list>
        </text:list-item>
      </text:list>
      <text:p text:style-name="P25">Type<text:tab/>Funktionsbaustein</text:p>
      <text:p text:style-name="P25"><text:span text:style-name="T16">Input</text:span><text:tab/>MANUAL : BOOL (Manual Start Input)</text:p>
      <text:p text:style-name="P25"><text:tab/>TEMP_BOILER : REAL (Boiler Temperatur)</text:p>
      <text:p text:style-name="P25"><text:tab/>TEMP_RETURN : REAL (Temperatur der Zirkulationsleitung)</text:p>
      <text:p text:style-name="P25"><text:tab/>DT_IN : DATE_TIME (Momentane Tageszeit und Datum)</text:p>
      <text:p text:style-name="P25"><text:tab/>RST : BOOL (Asynchroner Reset)</text:p>
      <text:p text:style-name="P25">Output<text:tab/>HEAT : BOOL (Steuersignal für Warmwasserheizung)</text:p>
      <text:p text:style-name="P25"><text:tab/>PUMP : BOOL (Steuersignal für Zirkulationspumpe)</text:p>
      <text:p text:style-name="P25"><text:tab/>STATUS : Byte (ESR kompatibler Statusausgang)</text:p>
      <text:p text:style-name="P25"><text:tab/>VALVE0..7 : BOOL (Steuerausgänge für Ventile der <text:tab/><text:tab/>Zirkulationskreise)</text:p>
      <text:p text:style-name="P25"><text:tab/>RUN : BOOL (TRUE wenn Sequenz läuft)</text:p>
      <text:p text:style-name="P25">Config<text:tab/>T_START : TOD (Tageszeit zu der die Desinfizierung startet)</text:p>
      <text:p text:style-name="P25"><text:tab/>DAY : INT (Wochentag an dem die Desinfizierung startet)</text:p>
      <text:p text:style-name="P77"><text:tab/><text:span text:style-name="T38">TEMP_SET</text:span> : REAL (Temperatur des Boilers)</text:p>
      <text:p text:style-name="P25"><text:tab/>TEMP_OFFSET : REAL ()</text:p>
      <text:p text:style-name="P25"><text:tab/>TEMP_HYS : REAL ()</text:p>
      <text:p text:style-name="P25"><text:tab/>T_MAX_HEAT : TIME (maximale Zeit zum Aufheizen des Boilers)</text:p>
      <text:p text:style-name="P25"><text:tab/>T_MAX_RETURN : TIME (maximale Zeit, bis der Eingang </text:p>
      <text:p text:style-name="P25"><text:tab/>TEMP_RETURN nach VALVE aktiv wird)</text:p>
      <text:p text:style-name="P25"><draw:frame draw:style-name="fr4" draw:name="Grafik225" text:anchor-type="paragraph" svg:x="1.531cm" svg:y="0.686cm" svg:width="4.581cm" svg:height="6.241cm" draw:z-index="201"><draw:image xlink:href="Pictures/100000000000015A000001D82A3C622B.png" xlink:type="simple" xlink:show="embed" xlink:actuate="onLoad"/></draw:frame><text:tab/>TP_0 .. 7 : TIME (Desinfektionszeit für Kreise 0..7)</text:p>
      <text:p text:style-name="P25"><text:line-break/>LEGIONELLA hat eine integrierte Schaltuhr, die an einem bestimmten Wochentag <text:soft-page-break/>(DAY) zu einer bestimmten Tageszeit (T_START) die Desinfektion startet. Hierzu ist die externe Anschaltung der Lokalzeit nötig (DT_IN). Jederzeit kann mit einer steigenden Flanke an MANUAL die Desinfektion auch von Hand gestartet werden.</text:p>
      <text:p text:style-name="P55">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55">Der Ausgang Status ist ESR kompatibel und kann folgende Meldungen abgeben:</text:p>
      <text:p text:style-name="P55">110<text:tab/>Wartestellung<text:line-break/>111<text:tab/>Sequenz läuft</text:p>
      <text:p text:style-name="P25">1<text:tab/>Boiler Temperatur wurde nicht erreicht</text:p>
      <text:p text:style-name="P25">2<text:tab/>Rücklauftemperatur bei Ventil0 wurde nicht erreicht</text:p>
      <text:p text:style-name="P25">3..8<text:tab/>Rücklauftemperatur bei Ventil1..7 wurde nicht erreicht</text:p>
      <text:p text:style-name="P25"><draw:frame draw:style-name="fr4" draw:name="Grafik226" text:anchor-type="paragraph" svg:x="0.917cm" svg:y="0.663cm" svg:width="14.517cm" svg:height="8.391cm" draw:z-index="195"><draw:image xlink:href="Pictures/10000000000003BD0000022901FF5F75.png" xlink:type="simple" xlink:show="embed" xlink:actuate="onLoad"/></draw:frame>Schematischer interner Aufbau von LEGIONELLA:</text:p>
      <text:p text:style-name="Standard">Das Folgende <text:span text:style-name="T38">Beispiel </text:span>zeigt eine Simulation für 2 Desinfektionskreise mit Traceaufzeichnung. In diesem Aufbau ist VALVE2 auf den Eingang RST geschaltet und unterbricht damit die Sequenz nach 2 Kreisen:</text:p>
      <text:p text:style-name="Standard"/>
      <text:p text:style-name="P55"><draw:frame draw:style-name="fr4" draw:name="Grafik223" text:anchor-type="paragraph" svg:x="1.03cm" svg:y="0.014cm" svg:width="15.76cm" svg:height="6.459cm" draw:z-index="199"><draw:image xlink:href="Pictures/10000000000003530000015D4A2BC405.png" xlink:type="simple" xlink:show="embed" xlink:actuate="onLoad"/></draw:frame><text:soft-page-break/></text:p>
      <text:p text:style-name="P55"><draw:frame draw:style-name="fr9" draw:name="Grafik227" text:anchor-type="paragraph" svg:x="0.781cm" svg:y="0.102cm" svg:width="16.215cm" svg:height="8.534cm" draw:z-index="200"><draw:image xlink:href="Pictures/10000000000003B6000001F41AC5FDB2.png" xlink:type="simple" xlink:show="embed" xlink:actuate="onLoad"/></draw:frame></text:p>
      <text:p text:style-name="P55"/>
      <text:p text:style-name="P55"/>
      <text:p text:style-name="P55"/>
      <text:p text:style-name="P55"/>
      <text:list xml:id="list33644544" text:continue-numbering="true" text:style-name="L1">
        <text:list-item>
          <text:list>
            <text:list-item>
              <text:h text:style-name="P217" text:outline-level="2"><text:soft-page-break/><text:alphabetical-index-mark-start text:id="IMark100801540"/>SDD<text:alphabetical-index-mark-end text:id="IMark100801540"/></text:h>
            </text:list-item>
          </text:list>
        </text:list-item>
      </text:list>
      <text:p text:style-name="Standard">Type<text:tab/><text:span text:style-name="T38">Funktion</text:span> : REAL</text:p>
      <text:p text:style-name="P25"><text:span text:style-name="T16">Input</text:span><text:tab/>T : REAL (Temperatur der Luft in °C)</text:p>
      <text:p text:style-name="P55"><text:tab/>ICE : BOOL (TRUE für Luft über Eis und FALSE für Luft über Wasser)</text:p>
      <text:p text:style-name="P25"><draw:frame draw:style-name="fr4" draw:name="Grafik365" text:anchor-type="paragraph" svg:x="1.046cm" svg:y="0.667cm" svg:width="2.281cm" svg:height="1.57cm" draw:z-index="363"><draw:image xlink:href="Pictures/10000000000000AC00000077865F2CB4.png" xlink:type="simple" xlink:show="embed" xlink:actuate="onLoad"/></draw:frame>Output<text:tab/>REAL (Sättigungsdampfdruck in Pa)</text:p>
      <text:p text:style-name="P55"><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xml:id="list33628617" text:continue-numbering="true" text:style-name="L1">
        <text:list-item>
          <text:list>
            <text:list-item>
              <text:h text:style-name="P217" text:outline-level="2"><text:alphabetical-index-mark-start text:id="IMark100801540"/>TEMP_EXT<text:alphabetical-index-mark-end text:id="IMark100801540"/></text:h>
            </text:list-item>
          </text:list>
        </text:list-item>
      </text:list>
      <text:p text:style-name="Standard">Type<text:tab/><text:span text:style-name="T38">Funktionsbaustein</text:span></text:p>
      <text:p text:style-name="P25"><text:span text:style-name="T16">Input</text:span><text:tab/>T_EXT1 : REAL (Außentemperatur Sensor 1)</text:p>
      <text:p text:style-name="P25"><text:tab/>T_EXT2 : REAL (Außentemperatur Sensor 2)</text:p>
      <text:p text:style-name="P25"><text:tab/>T_EXT3 : REAL (Außentemperatur Sensor 3)</text:p>
      <text:p text:style-name="P25"><text:tab/>T_EXT_CONFIG : BYTE (Abfragemodus)</text:p>
      <text:p text:style-name="P25"><text:tab/>DT_IN : DATE_TIME (Tageszeit)</text:p>
      <text:p text:style-name="P25">Output<text:tab/>T_EXT : REAL (Ausgang Außentemperatur)</text:p>
      <text:p text:style-name="P25"><text:tab/>HEAT : BOOL (Heizsignal)</text:p>
      <text:p text:style-name="P25"><text:tab/>COOL : BOOL (Kühlsignal)</text:p>
      <text:p text:style-name="P25">Config<text:tab/>T_EXT_MIN : REAL (Minimum Außentemperatur)</text:p>
      <text:p text:style-name="P25"><text:tab/>T_EXT_MAX : REAL (Maximum Außentemperatur)</text:p>
      <text:p text:style-name="P25"><text:tab/>T_EXT_DEFAULT : REAL (Default Außentemperatur)</text:p>
      <text:p text:style-name="P25"><text:tab/>HEAT_PERIOD_START : DATE (Beginn der Heizperiode)</text:p>
      <text:p text:style-name="P25"><text:tab/>HEAT_PERIOD_STOP : DATE (Ende der Heizperiode)</text:p>
      <text:p text:style-name="P25"><text:tab/>COOL_PERIOD_START : DATE (Beginn der Kühlperiode)</text:p>
      <text:p text:style-name="P25"><text:soft-page-break/><text:tab/>COOL_PERIOD_STOP : DATE (Ende der Kühlperiode)</text:p>
      <text:p text:style-name="P25"><text:tab/>HEAT_START_TEAMP_DAY (Heiztriggertemperatur Tag)</text:p>
      <text:p text:style-name="P25"><text:tab/>HEAT_START_TEAMP_NIGHT (Heiztriggertemperatur Nacht)</text:p>
      <text:p text:style-name="P25"><text:tab/>HEAT_STOP_TEMP : REAL (Heizen Stopp Temperatur)</text:p>
      <text:p text:style-name="P25"><text:tab/>COOL_START_TEAMP_DAY (Kühl Start Temperatur Tag)</text:p>
      <text:p text:style-name="P25"><text:tab/>COOL_START_TEMP_NIGHT (Kühl Start Temperatur Nacht)</text:p>
      <text:p text:style-name="P25"><text:tab/>COOL_STOP_TEMP : REAL (Kühl Stopp Temperatur)</text:p>
      <text:p text:style-name="P25"><text:tab/>START_DAY : TOD (Anfang des Tages)</text:p>
      <text:p text:style-name="P25"><text:tab/>START_NIGHT : TOD (Anfang der Nacht)</text:p>
      <text:p text:style-name="P25"><draw:frame draw:style-name="fr4" draw:name="Grafik228" text:anchor-type="paragraph" svg:x="1.081cm" svg:y="0.653cm" svg:width="4.521cm" svg:height="3.099cm" draw:z-index="229"><draw:image xlink:href="Pictures/1000000000000156000000EA4D59944B.png" xlink:type="simple" xlink:show="embed" xlink:actuate="onLoad"/></draw:frame><text:tab/>CYCLE_TIME : TIME (Abfragezeit für Außentemperatur)</text:p>
      <text:p text:style-name="P25"><text:line-break/>TEMP_EXT verarbeitet bis zu 3 Außentemperaturfühler und stellt eine durch Mode 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49">T_EXT_CONFIG</text:p>
          </table:table-cell>
          <table:table-cell table:style-name="Tabelle5.B1" office:value-type="string">
            <text:p text:style-name="P50">T_EXT</text:p>
          </table:table-cell>
        </table:table-row>
        <table:table-row>
          <table:table-cell table:style-name="Tabelle5.A2" office:value-type="string">
            <text:p text:style-name="P49">0</text:p>
          </table:table-cell>
          <table:table-cell table:style-name="Tabelle5.B2" office:value-type="string">
            <text:p text:style-name="P50">Durchschnittswert von T_EXT1, T_ext2 und T_ext3</text:p>
          </table:table-cell>
        </table:table-row>
        <table:table-row>
          <table:table-cell table:style-name="Tabelle5.A2" office:value-type="string">
            <text:p text:style-name="P49">1</text:p>
          </table:table-cell>
          <table:table-cell table:style-name="Tabelle5.B2" office:value-type="string">
            <text:p text:style-name="P50">T_EXT1</text:p>
          </table:table-cell>
        </table:table-row>
        <table:table-row>
          <table:table-cell table:style-name="Tabelle5.A2" office:value-type="string">
            <text:p text:style-name="P49">2</text:p>
          </table:table-cell>
          <table:table-cell table:style-name="Tabelle5.B2" office:value-type="string">
            <text:p text:style-name="P50">T_EXT2</text:p>
          </table:table-cell>
        </table:table-row>
        <table:table-row>
          <table:table-cell table:style-name="Tabelle5.A2" office:value-type="string">
            <text:p text:style-name="P49">3</text:p>
          </table:table-cell>
          <table:table-cell table:style-name="Tabelle5.B2" office:value-type="string">
            <text:p text:style-name="P50">T_EXT3</text:p>
          </table:table-cell>
        </table:table-row>
        <table:table-row>
          <table:table-cell table:style-name="Tabelle5.A2" office:value-type="string">
            <text:p text:style-name="P49">4</text:p>
          </table:table-cell>
          <table:table-cell table:style-name="Tabelle5.B2" office:value-type="string">
            <text:p text:style-name="P50">T_EXT_DEFAULT</text:p>
          </table:table-cell>
        </table:table-row>
        <table:table-row>
          <table:table-cell table:style-name="Tabelle5.A2" office:value-type="string">
            <text:p text:style-name="P49">5</text:p>
          </table:table-cell>
          <table:table-cell table:style-name="Tabelle5.B2" office:value-type="string">
            <text:p text:style-name="P50">Niedrigster Wert der 3 Eingänge</text:p>
          </table:table-cell>
        </table:table-row>
        <table:table-row>
          <table:table-cell table:style-name="Tabelle5.A2" office:value-type="string">
            <text:p text:style-name="P49">6</text:p>
          </table:table-cell>
          <table:table-cell table:style-name="Tabelle5.B2" office:value-type="string">
            <text:p text:style-name="P50">Höchster Wert der 3 Eingänge</text:p>
          </table:table-cell>
        </table:table-row>
        <table:table-row>
          <table:table-cell table:style-name="Tabelle5.A2" office:value-type="string">
            <text:p text:style-name="P49">7</text:p>
          </table:table-cell>
          <table:table-cell table:style-name="Tabelle5.B2" office:value-type="string">
            <text:p text:style-name="P50">Mittlerer Wert der 3 Eingänge</text:p>
          </table:table-cell>
        </table:table-row>
      </table:table>
      <text:p text:style-name="P25"><text:soft-page-break/></text:p>
      <text:p text:style-name="P55">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list xml:id="list33636232" text:continue-numbering="true" text:style-name="L1">
        <text:list-item>
          <text:list>
            <text:list-item>
              <text:h text:style-name="P217" text:outline-level="2"><text:alphabetical-index-mark-start text:id="IMark100801540"/>WATER_CP<text:alphabetical-index-mark-end text:id="IMark100801540"/></text:h>
            </text:list-item>
          </text:list>
        </text:list-item>
      </text:list>
      <text:p text:style-name="Standard">Type<text:tab/><text:span text:style-name="T38">Funktion</text:span> : REAL</text:p>
      <text:p text:style-name="P25"><text:span text:style-name="T16">Input</text:span><text:tab/>T : REAL (Temperatur des Wassers in °C)</text:p>
      <text:p text:style-name="P25"><draw:frame draw:style-name="fr4" draw:name="Grafik364" text:anchor-type="paragraph" svg:x="1.134cm" svg:y="0.6cm" svg:width="4.069cm" svg:height="1.12cm" draw:z-index="362"><draw:image xlink:href="Pictures/1000000000000134000000555DC448BD.png" xlink:type="simple" xlink:show="embed" xlink:actuate="onLoad"/></draw:frame>Output<text:tab/>REAL (Spezifische Wärmekapazität bei der Temperatur T)</text:p>
      <text:p text:style-name="P55"><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xml:id="list33635337" text:continue-numbering="true" text:style-name="L1">
        <text:list-item>
          <text:list>
            <text:list-item>
              <text:h text:style-name="P217" text:outline-level="2"><text:alphabetical-index-mark-start text:id="IMark100801540"/>WATER_DENSITY<text:alphabetical-index-mark-end text:id="IMark100801540"/></text:h>
            </text:list-item>
          </text:list>
        </text:list-item>
      </text:list>
      <text:p text:style-name="Standard">Type<text:tab/><text:span text:style-name="T38">Funktion</text:span> : REAL</text:p>
      <text:p text:style-name="P25"><text:span text:style-name="T16">Input</text:span><text:tab/>T : REAL (Temperatur des Wassers)</text:p>
      <text:p text:style-name="P25"><text:tab/>SAT : BOOL (TRUE, wenn das Wasser mit Luft gesättigt ist)</text:p>
      <text:p text:style-name="P55"><draw:frame draw:style-name="fr4" draw:name="Grafik314" text:anchor-type="paragraph" svg:x="1.035cm" svg:y="0.792cm" svg:width="5.669cm" svg:height="1.39cm" draw:z-index="289"><draw:image xlink:href="Pictures/10000000000001AD000000695D16FAC0.png" xlink:type="simple" xlink:show="embed" xlink:actuate="onLoad"/></draw:frame>Output<text:tab/>REAL (Dichte des Wassers in Gramm / Liter)</text:p>
      <text:p text:style-name="P25"><text:line-break/>WATER_DENSITY berechnet die Dichte von flüssigem Wassers in Abhängigkeit von <text:soft-page-break/>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55">Die Abweichung der Dichte von mit Luft gesättigtem Wasser wird nach der Formel vom Bignell korrigiert.</text:p>
      <text:p text:style-name="P55">Die Abhängigkeit der Wasserdichte vom Druck ist verhältnismäßig gering mit ca. 0,046 kg/m³ je 1 Bar Druckerhöhung Im Bereich bis 50 Bar. Die geringe Druckabhängigkeit hat in praktischen Anwendungsfällen keinen nennenswerten Einfluss.</text:p>
      <text:list xml:id="list33654933" text:continue-numbering="true" text:style-name="L1">
        <text:list-item>
          <text:list>
            <text:list-item>
              <text:h text:style-name="P217" text:outline-level="2"><text:alphabetical-index-mark-start text:id="IMark100801540"/>WATER_ENTHALPY<text:alphabetical-index-mark-end text:id="IMark100801540"/></text:h>
            </text:list-item>
          </text:list>
        </text:list-item>
      </text:list>
      <text:p text:style-name="Standard">Type<text:tab/><text:span text:style-name="T38">Funktion</text:span> : REAL</text:p>
      <text:p text:style-name="P25"><text:span text:style-name="T16">Input</text:span><text:tab/>T : REAL (Temperatur des Wassers)</text:p>
      <text:p text:style-name="P25"><draw:frame draw:style-name="fr4" draw:name="Grafik363" text:anchor-type="paragraph" svg:x="1.134cm" svg:y="0.646cm" svg:width="5.42cm" svg:height="1.12cm" draw:z-index="361"><draw:image xlink:href="Pictures/100000000000019A000000558B1C00B8.png" xlink:type="simple" xlink:show="embed" xlink:actuate="onLoad"/></draw:frame>Output<text:tab/>REAL (Enthalpie des Wassers in J/Gramm bei der Temperatur T)</text:p>
      <text:p text:style-name="P55"><text:line-break/>WATER_ENTHALPY berechnet die <text:span text:style-name="T24">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xml:id="list33641285" text:continue-numbering="true" text:style-name="L1">
        <text:list-item>
          <text:list>
            <text:list-item>
              <text:h text:style-name="P217" text:outline-level="2"><text:soft-page-break/><text:alphabetical-index-mark-start text:id="IMark100801540"/>WCT<text:alphabetical-index-mark-end text:id="IMark100801540"/></text:h>
            </text:list-item>
          </text:list>
        </text:list-item>
      </text:list>
      <text:p text:style-name="Standard">Type<text:tab/><text:span text:style-name="T38">Funktion</text:span> : REAL</text:p>
      <text:p text:style-name="P25"><text:span text:style-name="T16">Input</text:span><text:tab/>T : REAL (Außentemperatur in °C)</text:p>
      <text:p text:style-name="P25"><text:tab/>V : REAL (Windgeschwindigkeit in km/h)</text:p>
      <text:p text:style-name="P25">Output<text:tab/>REAL (Windchill Temperatur)</text:p>
      <text:p text:style-name="P25"><draw:frame draw:style-name="fr4" draw:name="Grafik271" text:anchor-type="paragraph" svg:x="1.134cm" svg:y="0.095cm" svg:width="2.731cm" svg:height="1.57cm" draw:z-index="239"><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xml:id="list33636093" text:continue-numbering="true" text:style-name="L1">
        <text:list-item>
          <text:h text:style-name="P210" text:outline-level="1">Elektrotechnik</text:h>
        </text:list-item>
      </text:list>
      <text:p text:style-name="P20"/>
      <text:list xml:id="list33636994" text:continue-numbering="true" text:style-name="L1">
        <text:list-item>
          <text:list>
            <text:list-item>
              <text:h text:style-name="P217" text:outline-level="2"><text:alphabetical-index-mark-start text:id="IMark100801540"/>CLICK<text:alphabetical-index-mark-end text:id="IMark100801540"/></text:h>
            </text:list-item>
          </text:list>
        </text:list-item>
      </text:list>
      <text:p text:style-name="Standard">Type<text:tab/><text:span text:style-name="T38">Funktionsbaustein</text:span></text:p>
      <text:p text:style-name="P25"><text:span text:style-name="T16">Input</text:span><text:tab/>IN : BOOL (Steuereingang für Taster)<text:tab/></text:p>
      <text:p text:style-name="P55">Output<text:tab/>Q : BOOL (Schaltausgang)</text:p>
      <text:p text:style-name="P25"><text:tab/>SINGLE : BOOL (Ausgang für einfachen Tastendruck)</text:p>
      <text:p text:style-name="P25"><text:tab/>DOUBLE : BOOL (Ausgang für doppelten Tastendruck)</text:p>
      <text:p text:style-name="P25"><text:tab/>TRIPLE : BOOL (Ausgang für dreifachen Tastendruck)</text:p>
      <text:p text:style-name="P55"><text:tab/>STATUS : BYTE (ESR kompatibler Status Ausgang)</text:p>
      <text:p text:style-name="P25">Config<text:tab/>T_DEBOUNCE : TIME (Entprellzeit für Taster)</text:p>
      <text:p text:style-name="P25"><text:tab/>T_SHORT : TIME (Maximale Zeit für kurzen Impuls)</text:p>
      <text:p text:style-name="P25"><text:tab/>T_PAUSE : TIME (Maximale Pause zwischen 2 Impulsen)</text:p>
      <text:p text:style-name="P25"><text:tab/>T_RECONFIG : TIME (Rekonfigurationszeit)</text:p>
      <text:p text:style-name="P25"><draw:frame draw:style-name="fr4" draw:name="Grafik281" text:anchor-type="paragraph" svg:x="1.266cm" svg:y="0cm" svg:width="3.18cm" svg:height="3.099cm" draw:z-index="250"><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text:soft-page-break/>Ausgang gesetzt, bis der Eingangspuls wider inaktiv wird. Der Ausgang Q entspricht dem Eingangsimpuls. Jedoch ist er immer <text:span text:style-name="T16">H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48">Status</text:p>
          </table:table-cell>
          <table:table-cell table:style-name="Tabelle9.B1" office:value-type="string">
            <text:p text:style-name="P43"/>
          </table:table-cell>
        </table:table-row>
        <table:table-row>
          <table:table-cell table:style-name="Tabelle9.A2" office:value-type="string">
            <text:p text:style-name="P48">110</text:p>
          </table:table-cell>
          <table:table-cell table:style-name="Tabelle9.B2" office:value-type="string">
            <text:p text:style-name="P48">Eingang inaktiv</text:p>
          </table:table-cell>
        </table:table-row>
        <table:table-row>
          <table:table-cell table:style-name="Tabelle9.A2" office:value-type="string">
            <text:p text:style-name="P48">111</text:p>
          </table:table-cell>
          <table:table-cell table:style-name="Tabelle9.B2" office:value-type="string">
            <text:p text:style-name="P48">Ausgang SINGLE aktiviert</text:p>
          </table:table-cell>
        </table:table-row>
        <table:table-row>
          <table:table-cell table:style-name="Tabelle9.A2" office:value-type="string">
            <text:p text:style-name="P48">112</text:p>
          </table:table-cell>
          <table:table-cell table:style-name="Tabelle9.B2" office:value-type="string">
            <text:p text:style-name="P48">Ausgang DOUBLE aktiviert</text:p>
          </table:table-cell>
        </table:table-row>
        <table:table-row>
          <table:table-cell table:style-name="Tabelle9.A2" office:value-type="string">
            <text:p text:style-name="P48">113</text:p>
          </table:table-cell>
          <table:table-cell table:style-name="Tabelle9.B2" office:value-type="string">
            <text:p text:style-name="P48">Ausgang TRIPLE aktiviert</text:p>
          </table:table-cell>
        </table:table-row>
      </table:table>
      <text:p text:style-name="P25"/>
      <text:p text:style-name="P25">Beispiel 1 zeigt eine Anwendung von CLICK mit 3 nachfolgenden Dimm Bausteinen. Analog können auch bis zu 3 Schalter oder eine Mischung aus Dimmern <text:s/>oder Schaltern benutzt werden.</text:p>
      <text:p text:style-name="P25"><draw:frame draw:style-name="fr9" draw:name="Grafik282" text:anchor-type="paragraph" svg:x="1.02cm" svg:y="0cm" svg:width="15.67cm" svg:height="6.69cm" draw:z-index="251"><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25"><draw:frame draw:style-name="fr15" draw:name="Grafik283" text:anchor-type="paragraph" svg:width="14.319cm" svg:height="3.56cm" draw:z-index="252"><draw:image xlink:href="Pictures/100000000000043B0000010DC14622CE.png" xlink:type="simple" xlink:show="embed" xlink:actuate="onLoad"/></draw:frame></text:p>
      <text:list xml:id="list33629735" text:continue-numbering="true" text:style-name="L1">
        <text:list-item>
          <text:list>
            <text:list-item>
              <text:h text:style-name="P217" text:outline-level="2"><text:soft-page-break/><text:alphabetical-index-mark-start text:id="IMark100801540"/>DEBOUNCE<text:alphabetical-index-mark-end text:id="IMark100801540"/></text:h>
            </text:list-item>
          </text:list>
        </text:list-item>
      </text:list>
      <text:p text:style-name="Standard"><text:span text:style-name="T38">Type</text:span><text:tab/><text:span text:style-name="T38">Funktionsbaustein</text:span></text:p>
      <text:p text:style-name="P25"><text:span text:style-name="T16">Input</text:span><text:tab/>IN : BOOL (Eingangssignal vom Schalter oder Taster)</text:p>
      <text:p text:style-name="P25"><text:tab/>TD : TIME (Entprellzeit)</text:p>
      <text:p text:style-name="P25"><text:tab/>PM : BOOL (Betriebsart TRUE = Impulsbetrieb)</text:p>
      <text:p text:style-name="P55"><draw:frame draw:style-name="fr4" draw:name="Grafik686" text:anchor-type="paragraph" svg:x="1.067cm" svg:y="0.688cm" svg:width="2.499cm" svg:height="1.921cm" draw:z-index="713"><draw:image xlink:href="Pictures/10000000000000BD0000009103A4D141.png" xlink:type="simple" xlink:show="embed" xlink:actuate="onLoad"/></draw:frame>Output<text:tab/>Q : BOOL (Ausgangssignal)</text:p>
      <text:p text:style-name="P55"><text:line-break/>DEBOUNCE kann das Signal von einem Schalter oder Taster entprellen und am Ausgang Q entprellt bereitstellen. Wenn PM = FALSE folgt der Ausgang Q dem entprellten Eingangsignal IN, ist PM = TRUE wird am Eingang In eine steigende Flanke detektiert und der Ausgang Q bleibt nur für einen Zyklus auf TRUE. Die entprellzeit für den Eingang IN wird mit der Zeit TD eingestellt.</text:p>
      <text:list xml:id="list33630761" text:continue-numbering="true" text:style-name="L1">
        <text:list-item>
          <text:list>
            <text:list-item>
              <text:h text:style-name="P217" text:outline-level="2"><text:alphabetical-index-mark-start text:id="IMark100801540"/>DIMM_I<text:alphabetical-index-mark-end text:id="IMark100801540"/></text:h>
            </text:list-item>
          </text:list>
        </text:list-item>
      </text:list>
      <text:p text:style-name="Standard"><text:span text:style-name="T38">Type</text:span><text:tab/><text:span text:style-name="T38">Funktionsbaustein</text:span></text:p>
      <text:p text:style-name="P25"><text:span text:style-name="T16">Input</text:span><text:tab/>SET : BOOL (Eingang zum Einschalten des Ausgangs auf VAL)</text:p>
      <text:p text:style-name="P55"><text:tab/>VAL : BYTE (Wert für die SET Operation)</text:p>
      <text:p text:style-name="P25"><text:tab/>IN : BOOL (Steuereingang für Taster)</text:p>
      <text:p text:style-name="P25"><text:tab/>RST : BOOL (Eingang zum Ausschalten des Ausgangs)</text:p>
      <text:p text:style-name="P25">Output<text:tab/>Q : BOOL (Schaltausgang)</text:p>
      <text:p text:style-name="P25"><text:tab/>OUT : Byte (<text:span text:style-name="T16">Dimmer</text:span> Ausgang)</text:p>
      <text:p text:style-name="P25">Config<text:tab/>T_DEBOUNCE : TIME (Entprellzeit für Taster)</text:p>
      <text:p text:style-name="P25"><text:tab/>T_RECONFIG : TIME (Rekonfigurationszeit)</text:p>
      <text:p text:style-name="P25"><text:tab/>T_ON_MAX : TIME (Einschaltbegrenzung)</text:p>
      <text:p text:style-name="P25"><text:tab/>T_DIMM_START : TIME (Reaktionszeit zum Dimmen)</text:p>
      <text:p text:style-name="P25"><text:tab/>T_DIMM : TIME (Zeit für eine Dimm Rampe)</text:p>
      <text:p text:style-name="P55"><draw:frame draw:style-name="fr4" draw:name="Grafik260" text:anchor-type="paragraph" svg:x="1.178cm" svg:y="0.716cm" svg:width="2.101cm" svg:height="2.311cm" draw:z-index="719"><draw:image xlink:href="Pictures/100000000000009F000000AF2391DAA5.png" xlink:type="simple" xlink:show="embed" xlink:actuate="onLoad"/></draw:frame><text:tab/>INIT_VAL : BYTE (Wert der beim ersten Start an Ausgang anliegt)</text:p>
      <text:p text:style-name="P25"><text:soft-page-break/><text:line-break/>DIMM_I ist ein intelligenter <text:span text:style-name="T16">Dimmer</text:span> der sich selbständig an Öffner oder Schließer anpasst ohne neu konfiguriert werden zu müssen. Der <text:span text:style-name="T16">Dimmer</text:span> kann über Setup-Variablen eingestellt werden. Die Zeit T_DEBOUNCE dient zur Entprellung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6">Dimmers</text:span> fest. Mit den Eingängen SET und RST kann der Ausgang jederzeit auf einen durch VAL Vorgegebenen Wert ein- oder ausgeschaltet werden. SET und RST können unter anderem zum Anschluss von <text:span text:style-name="T24">Brandmeldeanlagen oder </text:span>Alarmanlagen benutzt werden. Mit SET können im Brandfall oder bei Einbruch alle Leuchten auf Ein oder bei verlassen des Gebäudes Zentral auf Aus geschaltet werden. SET kann auch dazu benutzt werden um den internen Dimm Wert zu verändern. Beim Ein- und Aus- schalten bleibt der letzte Ausgangswert des Dimmers am Ausgang OUT erhalten, lediglich ein FALSE am Ausgang Q schaltet das Leuchtmittel ab, und TRUE am Ausgang Q schaltet das Leuchtmittel wieder ein. Beim ersten Start setzt der Baustein den Ausgang Q auf den Wert des Setup Parameters INIT_VAL, der standardmäßig bei 127 liegt.</text:p>
      <text:list xml:id="list33645876" text:continue-numbering="true" text:style-name="L1">
        <text:list-item>
          <text:list>
            <text:list-item>
              <text:h text:style-name="P217" text:outline-level="2"><text:alphabetical-index-mark-start text:id="IMark100801540"/>F_LAMP<text:alphabetical-index-mark-end text:id="IMark100801540"/></text:h>
            </text:list-item>
          </text:list>
        </text:list-item>
      </text:list>
      <text:p text:style-name="Standard">Type<text:tab/><text:span text:style-name="T38">Funktionsbaustein</text:span></text:p>
      <text:p text:style-name="P25"><text:span text:style-name="T16">Input</text:span><text:tab/>SWITCH : BOOL (Schalteingang vom Dimmer)</text:p>
      <text:p text:style-name="P25"><text:tab/>DIMM : Byte (Eingang vom Dimmer)</text:p>
      <text:p text:style-name="P25"><text:tab/>RST : BOOL (Eingang zum Rücksetzen des Betriebsstundenzählers)</text:p>
      <text:p text:style-name="P25">Output<text:tab/>LAMP : Byte (Dimmer Ausgang)</text:p>
      <text:p text:style-name="P25"><text:tab/>ONTIME : REAL (Betriebsstundenzähler)</text:p>
      <text:p text:style-name="P25"><text:tab/>CYCLES : REAL (Anzahl der Schaltzyklen des Leuchtmittels)</text:p>
      <text:p text:style-name="P25">Config<text:tab/>T_NO_DIMM : REAL (Sperrzeit für Dimmer in Stunden)</text:p>
      <text:p text:style-name="P25"><draw:frame draw:style-name="fr4" draw:name="Grafik273" text:anchor-type="paragraph" svg:x="1.002cm" svg:y="0.667cm" svg:width="3.29cm" svg:height="2.311cm" draw:z-index="383"><draw:image xlink:href="Pictures/10000000000000F9000000AF49C76D83.png" xlink:type="simple" xlink:show="embed" xlink:actuate="onLoad"/></draw:frame><text:tab/>T_<text:span text:style-name="T16">Maintenance</text:span> : REAL (Meldezeit für Lampenwechsel in Stunden)</text:p>
      <text:p text:style-name="P25"><text:soft-page-break/><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24">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24">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6">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48">Status</text:p>
          </table:table-cell>
          <table:table-cell table:style-name="Tabelle7.B1" office:value-type="string">
            <text:p text:style-name="P43"/>
          </table:table-cell>
        </table:table-row>
        <table:table-row table:style-name="Tabelle7.1">
          <table:table-cell table:style-name="Tabelle7.A2" office:value-type="string">
            <text:p text:style-name="P48">110</text:p>
          </table:table-cell>
          <table:table-cell table:style-name="Tabelle7.B2" office:value-type="string">
            <text:p text:style-name="P48">Lampe ausgeschaltet</text:p>
          </table:table-cell>
        </table:table-row>
        <table:table-row table:style-name="Tabelle7.1">
          <table:table-cell table:style-name="Tabelle7.A2" office:value-type="string">
            <text:p text:style-name="P48">111</text:p>
          </table:table-cell>
          <table:table-cell table:style-name="Tabelle7.B2" office:value-type="string">
            <text:p text:style-name="P48">Lampe eingeschaltet Dimmen nicht erlaubt</text:p>
          </table:table-cell>
        </table:table-row>
        <table:table-row table:style-name="Tabelle7.1">
          <table:table-cell table:style-name="Tabelle7.A2" office:value-type="string">
            <text:p text:style-name="P48">112</text:p>
          </table:table-cell>
          <table:table-cell table:style-name="Tabelle7.B2" office:value-type="string">
            <text:p text:style-name="P48">Lampe eingeschaltet Dimmen erlaubt</text:p>
          </table:table-cell>
        </table:table-row>
        <table:table-row table:style-name="Tabelle7.1">
          <table:table-cell table:style-name="Tabelle7.A2" office:value-type="string">
            <text:p text:style-name="P48">120</text:p>
          </table:table-cell>
          <table:table-cell table:style-name="Tabelle7.B2" office:value-type="string">
            <text:p text:style-name="P48">Aufforderung zum Lampenwechsel</text:p>
          </table:table-cell>
        </table:table-row>
      </table:table>
      <text:p text:style-name="P25"><draw:frame draw:style-name="fr4" draw:name="Grafik274" text:anchor-type="paragraph" svg:x="1.062cm" svg:y="1.284cm" svg:width="13.42cm" svg:height="2.66cm" draw:z-index="241"><draw:image xlink:href="Pictures/10000000000003F7000000C93C3E82FE.png" xlink:type="simple" xlink:show="embed" xlink:actuate="onLoad"/></draw:frame>Das folgende Beispiel zeigt die Anwendung des Bausteins F_LAMP in Verbindung mit DIMM_I:</text:p>
      <text:p text:style-name="P55"/>
      <text:p text:style-name="P55"/>
      <text:p text:style-name="P55"/>
      <text:p text:style-name="P55"/>
      <text:list xml:id="list33629157" text:continue-numbering="true" text:style-name="L1">
        <text:list-item>
          <text:list>
            <text:list-item>
              <text:h text:style-name="P217" text:outline-level="2"><text:soft-page-break/><text:alphabetical-index-mark-start text:id="IMark100801540"/>PULSE_LENGTH<text:alphabetical-index-mark-end text:id="IMark100801540"/></text:h>
            </text:list-item>
          </text:list>
        </text:list-item>
      </text:list>
      <text:p text:style-name="Standard">Type<text:tab/><text:span text:style-name="T38">Funktionsbaustein</text:span></text:p>
      <text:p text:style-name="P25"><text:span text:style-name="T16">Input</text:span><text:tab/>IN : BOOL (Eingangspuls)</text:p>
      <text:p text:style-name="P25">Output<text:tab/>SHORT : BOOL (Puls wenn IN &lt; T_SHORT)</text:p>
      <text:p text:style-name="P25"><text:tab/>MIDDLE : BOOL (Puls wenn IN =&lt; T_LONG und IN &gt;= T_SHORT)</text:p>
      <text:p text:style-name="P25"><text:tab/>LONG : BOOL (TRUE wenn IN &gt; T_SHORT)</text:p>
      <text:p text:style-name="P25">Config<text:tab/>T_SHORT : TIME (Maximale Länge für kurzen Puls)</text:p>
      <text:p text:style-name="P25"><draw:frame draw:style-name="fr4" draw:name="Grafik284" text:anchor-type="paragraph" svg:x="1.214cm" svg:y="0.663cm" svg:width="3.18cm" svg:height="2.2cm" draw:z-index="253"><draw:image xlink:href="Pictures/10000000000000F0000000A6295BB749.png" xlink:type="simple" xlink:show="embed" xlink:actuate="onLoad"/></draw:frame><text:tab/>T_<text:span text:style-name="T16">LONG</text:span> : TIME (Minimale Länge für Langen Puls) </text:p>
      <text:p text:style-name="P25"><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list xml:id="list33655212" text:continue-numbering="true" text:style-name="L1">
        <text:list-item>
          <text:list>
            <text:list-item>
              <text:h text:style-name="P217" text:outline-level="2"><text:alphabetical-index-mark-start text:id="IMark100801540"/>PULSE_T<text:alphabetical-index-mark-end text:id="IMark100801540"/></text:h>
            </text:list-item>
          </text:list>
        </text:list-item>
      </text:list>
      <text:p text:style-name="Standard">Type<text:tab/><text:span text:style-name="T38">Funktionsbaustein</text:span></text:p>
      <text:p text:style-name="P25"><text:span text:style-name="T16">Input</text:span><text:tab/>IN : BOOL (Eingangspuls)</text:p>
      <text:p text:style-name="P25"><draw:frame draw:style-name="fr4" draw:name="Grafik666" text:anchor-type="paragraph" svg:x="1.002cm" svg:y="0.667cm" svg:width="2.499cm" svg:height="2.311cm" draw:z-index="688"><draw:image xlink:href="Pictures/10000000000000BD000000AFB03493E8.png" xlink:type="simple" xlink:show="embed" xlink:actuate="onLoad"/></draw:frame>Output<text:tab/>Q : BOOL (Ausgangspuls)</text:p>
      <text:p text:style-name="P55"><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ext:soft-page-break/>tisch auf FALSE zurückgesetzt. Eine weiterer Impuls an IN während der Ausgang TRUE ist setzt den Ausgang mit der fallenden Flanke von IN auf FALSE. liegt der Eingang IN länger als die Zeit T2 auf TRUE so wird der Ausgang Q nach ablauf der Zeit T2 automatisch auf FALSE gesetzt.</text:p>
      <text:p text:style-name="P55"><draw:frame draw:style-name="fr4" draw:name="Grafik667" text:anchor-type="paragraph" svg:x="1.046cm" svg:y="2.635cm" svg:width="11.411cm" svg:height="3.3cm" draw:z-index="689"><draw:image xlink:href="Pictures/10000000000002CF000000D0595AACA4.png" xlink:type="simple" xlink:show="embed" xlink:actuate="onLoad"/></draw:frame>Das folgende Zeitdiagramm zeigt einen Eingangsimpuls der länger ist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55"/>
      <text:list xml:id="list33644380" text:continue-numbering="true" text:style-name="L1">
        <text:list-item>
          <text:list>
            <text:list-item>
              <text:h text:style-name="P217" text:outline-level="2"><text:alphabetical-index-mark-start text:id="IMark100801540"/>SWITCH_I<text:alphabetical-index-mark-end text:id="IMark100801540"/></text:h>
            </text:list-item>
          </text:list>
        </text:list-item>
      </text:list>
      <text:p text:style-name="Standard">Type<text:tab/><text:span text:style-name="T38">Funktionsbaustein</text:span></text:p>
      <text:p text:style-name="P25"><text:span text:style-name="T16">Input</text:span><text:tab/>SET : BOOL (Eingang zum Einschalten des Ausgangs auf 100%)</text:p>
      <text:p text:style-name="P25"><text:tab/>IN : BOOL (Steuereingang für Taster)</text:p>
      <text:p text:style-name="P25"><text:tab/>RST : BOOL (Eingang zum Ausschalten des Ausgangs)</text:p>
      <text:p text:style-name="P25">Output<text:tab/>Q : BOOL (Schaltausgang)</text:p>
      <text:p text:style-name="P25">Config<text:tab/>T_DEBOUNCE : TIME (Entprellzeit für Taster)</text:p>
      <text:p text:style-name="P25"><text:tab/>T_RECONFIG : TIME (Rekonfigurationszeit)</text:p>
      <text:p text:style-name="P25"><draw:frame draw:style-name="fr4" draw:name="Grafik261" text:anchor-type="paragraph" svg:x="1.002cm" svg:y="0.646cm" svg:width="2.281cm" svg:height="2.2cm" draw:z-index="230"><draw:image xlink:href="Pictures/10000000000000AC000000A605E8BC26.png" xlink:type="simple" xlink:show="embed" xlink:actuate="onLoad"/></draw:frame><text:tab/>T_ON_MAX : TIME (Einschaltbegrenzung)</text:p>
      <text:p text:style-name="P55"><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text:soft-page-break/>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xml:id="list33637385" text:continue-numbering="true" text:style-name="L1">
        <text:list-item>
          <text:list>
            <text:list-item>
              <text:h text:style-name="P217" text:outline-level="2"><text:alphabetical-index-mark-start text:id="IMark100801540"/><text:alphabetical-index-mark-start text:id="IMark112186208"/>SWITCH_X<text:alphabetical-index-mark-end text:id="IMark112186208"/><text:alphabetical-index-mark-end text:id="IMark100801540"/></text:h>
            </text:list-item>
          </text:list>
        </text:list-item>
      </text:list>
      <text:p text:style-name="Standard">Type<text:tab/><text:span text:style-name="T38">Funktionsbaustein</text:span></text:p>
      <text:p text:style-name="P25"><text:span text:style-name="T16">Input</text:span><text:tab/>IN1..6 : BOOL (Taster Eingänge)</text:p>
      <text:p text:style-name="P25">Output<text:tab/>QX : BOOL (Schaltausgänge)</text:p>
      <text:p text:style-name="P25"><draw:frame draw:style-name="fr4" draw:name="Grafik285" text:anchor-type="paragraph" svg:x="1.212cm" svg:y="0.64cm" svg:width="2.281cm" svg:height="7.14cm" draw:z-index="254"><draw:image xlink:href="Pictures/10000000000000AC0000021C6B9CE65D.png" xlink:type="simple" xlink:show="embed" xlink:actuate="onLoad"/></draw:frame>Config<text:tab/>T_DEBOUNCE : TIME (Entprellzeit für Taster)</text:p>
      <text:p text:style-name="P55"><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55">SWITCH_X erlaubt es also auf den Eingängen IN3 bis IN6 eine Dreifachbelegung zu Realisieren und diese durch Betätigen von IN1 oder IN2 und einem weiteren Eingang auszuwählen.</text:p>
      <text:list xml:id="list33633500" text:continue-numbering="true" text:style-name="L1">
        <text:list-item>
          <text:list>
            <text:list-item>
              <text:h text:style-name="P217" text:outline-level="2"><text:soft-page-break/><text:alphabetical-index-mark-start text:id="IMark100801540"/>TIMER<text:span text:style-name="T11">_</text:span><text:span text:style-name="T1">1</text:span><text:alphabetical-index-mark-end text:id="IMark100801540"/></text:h>
            </text:list-item>
          </text:list>
        </text:list-item>
      </text:list>
      <text:p text:style-name="Standard">Type<text:tab/><text:span text:style-name="T38">Funktionsbaustein</text:span></text:p>
      <text:p text:style-name="P25"><text:span text:style-name="T16">Input</text:span><text:tab/>DT_IN : DATE_TIME (Datum Zeit Eingang)</text:p>
      <text:p text:style-name="P25"><text:tab/>START_TIME : TOD (Startzeit)</text:p>
      <text:p text:style-name="P25"><text:tab/>DURATION : TIME (Zeitdauer des Ausgangssignals)</text:p>
      <text:p text:style-name="P25"><text:tab/>START_DAY : INT (Wochentag des Ereignisses, 1= Montag)</text:p>
      <text:p text:style-name="P25">Output<text:tab/>Q : BOOL (Schaltausgang)</text:p>
      <text:p text:style-name="P55"><draw:frame draw:style-name="fr4" draw:name="Grafik262" text:anchor-type="paragraph" svg:x="1.464cm" svg:y="0.284cm" svg:width="4.069cm" svg:height="2.649cm" draw:z-index="231"><draw:image xlink:href="Pictures/1000000000000134000000C8BE257AC1.png" xlink:type="simple" xlink:show="embed" xlink:actuate="onLoad"/></draw:frame></text:p>
      <text:p text:style-name="P179"><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xml:id="list33642007" text:continue-numbering="true" text:style-name="L1">
        <text:list-item>
          <text:list>
            <text:list-item>
              <text:h text:style-name="P217" text:outline-level="2"><text:alphabetical-index-mark-start text:id="IMark100801540"/>TIMER_2<text:alphabetical-index-mark-end text:id="IMark100801540"/></text:h>
            </text:list-item>
          </text:list>
        </text:list-item>
      </text:list>
      <text:p text:style-name="Standard">Type<text:tab/><text:span text:style-name="T38">Funktionsbaustein</text:span></text:p>
      <text:p text:style-name="P25"><text:span text:style-name="T16">Input</text:span><text:tab/>DT_IN : DATE_TIME (Datum Zeit Eingang)</text:p>
      <text:p text:style-name="P25"><text:tab/>START_TIME : TOD (Startzeit)</text:p>
      <text:p text:style-name="P25"><text:tab/>DURATION : TIME (Zeitdauer des Ausgangssignals)</text:p>
      <text:p text:style-name="P25"><text:soft-page-break/><text:tab/>START_DAY : INT (Wochentag des Ereignisses, 1= Montag)</text:p>
      <text:p text:style-name="P25"><draw:frame draw:style-name="fr4" draw:name="Grafik263" text:anchor-type="paragraph" svg:x="1cm" svg:y="1.101cm" svg:width="3.62cm" svg:height="3.099cm" draw:z-index="232"><draw:image xlink:href="Pictures/1000000000000112000000EA5595A5E4.png" xlink:type="simple" xlink:show="embed" xlink:actuate="onLoad"/></draw:frame>Output<text:tab/> Q : BOOL (Schaltausgang)</text:p>
      <text:p text:style-name="P25"><text:line-break/>TIMER_2 erzeugt ein Ausgangsereignis mit einer programmierbaren Dauer. DT_IN liefert dem Baustein die Lokalzeit. START_TIME und DURATION legt die Tageszeit 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49">MODE</text:p>
          </table:table-cell>
          <table:table-cell table:style-name="Tabelle6.B1" office:value-type="string">
            <text:p text:style-name="P48">Q</text:p>
          </table:table-cell>
        </table:table-row>
        <table:table-row table:style-name="Tabelle6.1">
          <table:table-cell table:style-name="Tabelle6.A2" office:value-type="string">
            <text:p text:style-name="P49">0</text:p>
          </table:table-cell>
          <table:table-cell table:style-name="Tabelle6.B2" office:value-type="string">
            <text:p text:style-name="P48">Es wird kein Ausgangssignal erzeugt</text:p>
          </table:table-cell>
        </table:table-row>
        <table:table-row table:style-name="Tabelle6.1">
          <table:table-cell table:style-name="Tabelle6.A2" office:value-type="string">
            <text:p text:style-name="P49">1</text:p>
          </table:table-cell>
          <table:table-cell table:style-name="Tabelle6.B2" office:value-type="string">
            <text:p text:style-name="P48">nur am Montag</text:p>
          </table:table-cell>
        </table:table-row>
        <table:table-row table:style-name="Tabelle6.1">
          <table:table-cell table:style-name="Tabelle6.A2" office:value-type="string">
            <text:p text:style-name="P49">2</text:p>
          </table:table-cell>
          <table:table-cell table:style-name="Tabelle6.B2" office:value-type="string">
            <text:p text:style-name="P48">nur am Dienstag</text:p>
          </table:table-cell>
        </table:table-row>
        <table:table-row table:style-name="Tabelle6.1">
          <table:table-cell table:style-name="Tabelle6.A2" office:value-type="string">
            <text:p text:style-name="P49">3</text:p>
          </table:table-cell>
          <table:table-cell table:style-name="Tabelle6.B2" office:value-type="string">
            <text:p text:style-name="P48">nur am Mittwoch</text:p>
          </table:table-cell>
        </table:table-row>
        <table:table-row table:style-name="Tabelle6.1">
          <table:table-cell table:style-name="Tabelle6.A2" office:value-type="string">
            <text:p text:style-name="P49">4</text:p>
          </table:table-cell>
          <table:table-cell table:style-name="Tabelle6.B2" office:value-type="string">
            <text:p text:style-name="P48">nur am Donnerstag</text:p>
          </table:table-cell>
        </table:table-row>
        <table:table-row table:style-name="Tabelle6.1">
          <table:table-cell table:style-name="Tabelle6.A2" office:value-type="string">
            <text:p text:style-name="P49">5</text:p>
          </table:table-cell>
          <table:table-cell table:style-name="Tabelle6.B2" office:value-type="string">
            <text:p text:style-name="P48">nur am Freitag</text:p>
          </table:table-cell>
        </table:table-row>
        <table:table-row table:style-name="Tabelle6.1">
          <table:table-cell table:style-name="Tabelle6.A2" office:value-type="string">
            <text:p text:style-name="P49">6</text:p>
          </table:table-cell>
          <table:table-cell table:style-name="Tabelle6.B2" office:value-type="string">
            <text:p text:style-name="P48">nur am Samstag</text:p>
          </table:table-cell>
        </table:table-row>
        <table:table-row table:style-name="Tabelle6.1">
          <table:table-cell table:style-name="Tabelle6.A2" office:value-type="string">
            <text:p text:style-name="P49">7</text:p>
          </table:table-cell>
          <table:table-cell table:style-name="Tabelle6.B2" office:value-type="string">
            <text:p text:style-name="P48">nur am Sonntag</text:p>
          </table:table-cell>
        </table:table-row>
        <table:table-row table:style-name="Tabelle6.1">
          <table:table-cell table:style-name="Tabelle6.A2" office:value-type="string">
            <text:p text:style-name="P49">11</text:p>
          </table:table-cell>
          <table:table-cell table:style-name="Tabelle6.B2" office:value-type="string">
            <text:p text:style-name="P48">jeden Tag</text:p>
          </table:table-cell>
        </table:table-row>
        <table:table-row table:style-name="Tabelle6.1">
          <table:table-cell table:style-name="Tabelle6.A2" office:value-type="string">
            <text:p text:style-name="P49">12</text:p>
          </table:table-cell>
          <table:table-cell table:style-name="Tabelle6.B2" office:value-type="string">
            <text:p text:style-name="P48">alle 2 Tage</text:p>
          </table:table-cell>
        </table:table-row>
        <table:table-row table:style-name="Tabelle6.1">
          <table:table-cell table:style-name="Tabelle6.A2" office:value-type="string">
            <text:p text:style-name="P49">13</text:p>
          </table:table-cell>
          <table:table-cell table:style-name="Tabelle6.B2" office:value-type="string">
            <text:p text:style-name="P48">alle 3 Tage</text:p>
          </table:table-cell>
        </table:table-row>
        <table:table-row table:style-name="Tabelle6.1">
          <table:table-cell table:style-name="Tabelle6.A2" office:value-type="string">
            <text:p text:style-name="P49">14</text:p>
          </table:table-cell>
          <table:table-cell table:style-name="Tabelle6.B2" office:value-type="string">
            <text:p text:style-name="P48">alle 4 Tage</text:p>
          </table:table-cell>
        </table:table-row>
        <table:table-row table:style-name="Tabelle6.1">
          <table:table-cell table:style-name="Tabelle6.A2" office:value-type="string">
            <text:p text:style-name="P49">15</text:p>
          </table:table-cell>
          <table:table-cell table:style-name="Tabelle6.B2" office:value-type="string">
            <text:p text:style-name="P48">alle 5 Tage</text:p>
          </table:table-cell>
        </table:table-row>
        <table:table-row table:style-name="Tabelle6.1">
          <table:table-cell table:style-name="Tabelle6.A2" office:value-type="string">
            <text:p text:style-name="P49">16</text:p>
          </table:table-cell>
          <table:table-cell table:style-name="Tabelle6.B2" office:value-type="string">
            <text:p text:style-name="P48">alle 6 Tage</text:p>
          </table:table-cell>
        </table:table-row>
        <table:table-row table:style-name="Tabelle6.1">
          <table:table-cell table:style-name="Tabelle6.A2" office:value-type="string">
            <text:p text:style-name="P49">20</text:p>
          </table:table-cell>
          <table:table-cell table:style-name="Tabelle6.B2" office:value-type="string">
            <text:p text:style-name="P48">Wochentage (Montag bis Freitag)</text:p>
          </table:table-cell>
        </table:table-row>
        <table:table-row table:style-name="Tabelle6.1">
          <table:table-cell table:style-name="Tabelle6.A2" office:value-type="string">
            <text:p text:style-name="P49">21</text:p>
          </table:table-cell>
          <table:table-cell table:style-name="Tabelle6.B2" office:value-type="string">
            <text:p text:style-name="P48">Samstag und Sonntag</text:p>
          </table:table-cell>
        </table:table-row>
        <table:table-row table:style-name="Tabelle6.1">
          <table:table-cell table:style-name="Tabelle6.A2" office:value-type="string">
            <text:p text:style-name="P49">22</text:p>
          </table:table-cell>
          <table:table-cell table:style-name="Tabelle6.B2" office:value-type="string">
            <text:p text:style-name="P48">Arbeitstage (Wochentage ohne Feiertage)</text:p>
          </table:table-cell>
        </table:table-row>
        <table:table-row table:style-name="Tabelle6.1">
          <table:table-cell table:style-name="Tabelle6.A2" office:value-type="string">
            <text:p text:style-name="P49">23</text:p>
          </table:table-cell>
          <table:table-cell table:style-name="Tabelle6.B2" office:value-type="string">
            <text:p text:style-name="P48">Feiertage und Wochenende</text:p>
          </table:table-cell>
        </table:table-row>
        <table:table-row table:style-name="Tabelle6.1">
          <table:table-cell table:style-name="Tabelle6.A2" office:value-type="string">
            <text:p text:style-name="P49">24</text:p>
          </table:table-cell>
          <table:table-cell table:style-name="Tabelle6.B2" office:value-type="string">
            <text:p text:style-name="P48">Nur an Feiertagen</text:p>
          </table:table-cell>
        </table:table-row>
        <table:table-row table:style-name="Tabelle6.1">
          <table:table-cell table:style-name="Tabelle6.A2" office:value-type="string">
            <text:p text:style-name="P49">25</text:p>
          </table:table-cell>
          <table:table-cell table:style-name="Tabelle6.B2" office:value-type="string">
            <text:p text:style-name="P48">Erster Tag im Monat</text:p>
          </table:table-cell>
        </table:table-row>
        <table:table-row table:style-name="Tabelle6.1">
          <table:table-cell table:style-name="Tabelle6.A2" office:value-type="string">
            <text:p text:style-name="P49">26</text:p>
          </table:table-cell>
          <table:table-cell table:style-name="Tabelle6.B2" office:value-type="string">
            <text:p text:style-name="P48">Letzter Tag im Monat</text:p>
          </table:table-cell>
        </table:table-row>
        <table:table-row table:style-name="Tabelle6.1">
          <table:table-cell table:style-name="Tabelle6.A2" office:value-type="string">
            <text:p text:style-name="P49">27</text:p>
          </table:table-cell>
          <table:table-cell table:style-name="Tabelle6.B2" office:value-type="string">
            <text:p text:style-name="P48">Letzter Tag im Jahr (31. Dezember)</text:p>
          </table:table-cell>
        </table:table-row>
        <text:soft-page-break/>
        <table:table-row table:style-name="Tabelle6.1">
          <table:table-cell table:style-name="Tabelle6.A2" office:value-type="string">
            <text:p text:style-name="P49">28</text:p>
          </table:table-cell>
          <table:table-cell table:style-name="Tabelle6.B2" office:value-type="string">
            <text:p text:style-name="P48">Erster Tag im Jahr (1. Januar)</text:p>
          </table:table-cell>
        </table:table-row>
      </table:table>
      <text:p text:style-name="P25"/>
      <text:p text:style-name="P173"><draw:frame draw:style-name="fr9" draw:name="Grafik280" text:anchor-type="paragraph" svg:x="0.982cm" svg:y="1.042cm" svg:width="15.87cm" svg:height="2.29cm" draw:z-index="249"><draw:image xlink:href="Pictures/100000000000039B00000085EAD6E83B.png" xlink:type="simple" xlink:show="embed" xlink:actuate="onLoad"/></draw:frame>Beispiel für die Anwendung von TIMER_2:</text:p>
      <text:p text:style-name="P27">Das Beispiel zeigt die System-Routine (in diesem Fall für einen Wago Controller), die die interne Uhr ausliest und DATE_TIME für TIMER_2 und HOLIDAY bereitstellt. HOLIDAY liefert die Feiertagsinformation an TIMER_2. TIMER_2 liefert in diesem 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xml:id="list33646296" text:continue-numbering="true" text:style-name="L1">
        <text:list-item>
          <text:list>
            <text:list-item>
              <text:h text:style-name="P217" text:outline-level="2"><text:alphabetical-index-mark-start text:id="IMark100801540"/>TIMER_EVENT_DECODE<text:alphabetical-index-mark-end text:id="IMark100801540"/></text:h>
            </text:list-item>
          </text:list>
        </text:list-item>
      </text:list>
      <text:p text:style-name="Standard">Type<text:tab/><text:span text:style-name="T38">Funktion</text:span></text:p>
      <text:p text:style-name="P56"><text:span text:style-name="T16">Input</text:span><text:tab/>EVENT : STRING (<text:span text:style-name="T16">Event</text:span> Zeichenkette)</text:p>
      <text:p text:style-name="P56"><draw:frame draw:style-name="fr4" draw:name="Grafik640" text:anchor-type="paragraph" svg:x="1.023cm" svg:y="0.676cm" svg:width="7.26cm" svg:height="0.99cm" draw:z-index="661"><draw:image xlink:href="Pictures/10000000000002250000004B875AE377.png" xlink:type="simple" xlink:show="embed" xlink:actuate="onLoad"/></draw:frame>OUTPUT<text:tab/>TIMER_EVENT</text:p>
      <text:p text:style-name="P56"><text:line-break/>TIMER_EVENT_DECODE erlaubt die Programmierung von <text:span text:style-name="T16">Timer</text:span> Ereignissen mittels Zeichenkette anstelle des Ladens der Struktur TIMER_EVENT.</text:p>
      <text:p text:style-name="P56">Die Ereignisse werden wie folgt spezifiziert:</text:p>
      <text:p text:style-name="P56">&lt;Typ;Kanal;<text:span text:style-name="T16">Day</text:span>;Start;Dauer;Land;Lor&gt;</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8">Element</text:p>
          </table:table-cell>
          <table:table-cell table:style-name="Tabelle40.A1" office:value-type="string">
            <text:p text:style-name="P8">Beschreibung</text:p>
          </table:table-cell>
          <table:table-cell table:style-name="Tabelle40.C1" office:value-type="string">
            <text:p text:style-name="P12">Formate</text:p>
          </table:table-cell>
        </table:table-row>
        <table:table-row>
          <table:table-cell table:style-name="Tabelle40.A2" office:value-type="string">
            <text:p text:style-name="P7">&lt; &gt;</text:p>
          </table:table-cell>
          <table:table-cell table:style-name="Tabelle40.A2" office:value-type="string">
            <text:p text:style-name="P7">Start und Stopp Zeichen des Datensatzes.</text:p>
          </table:table-cell>
          <table:table-cell table:style-name="Tabelle40.C2" office:value-type="string">
            <text:p text:style-name="P11"/>
          </table:table-cell>
        </table:table-row>
        <table:table-row>
          <table:table-cell table:style-name="Tabelle40.A2" office:value-type="string">
            <text:p text:style-name="P7">Typ</text:p>
          </table:table-cell>
          <table:table-cell table:style-name="Tabelle40.A2" office:value-type="string">
            <text:p text:style-name="P7">Typ des Ereignisses (siehe Beschreibung in TIMER_P4)</text:p>
          </table:table-cell>
          <table:table-cell table:style-name="Tabelle40.C2" office:value-type="string">
            <text:p text:style-name="P14">'123', 2#0101, 8#33, 16#FF</text:p>
          </table:table-cell>
        </table:table-row>
        <table:table-row>
          <table:table-cell table:style-name="Tabelle40.A2" office:value-type="string">
            <text:p text:style-name="P7">Kanal</text:p>
          </table:table-cell>
          <table:table-cell table:style-name="Tabelle40.A2" office:value-type="string">
            <text:p text:style-name="P7">zu programmierender Kanal</text:p>
          </table:table-cell>
          <table:table-cell table:style-name="Tabelle40.C2" office:value-type="string">
            <text:p text:style-name="P13">'123', 2#0101, 8#33, 16#FF</text:p>
          </table:table-cell>
        </table:table-row>
        <table:table-row>
          <table:table-cell table:style-name="Tabelle40.A2" office:value-type="string">
            <text:p text:style-name="P9">Day</text:p>
          </table:table-cell>
          <table:table-cell table:style-name="Tabelle40.A2" office:value-type="string">
            <text:p text:style-name="P7">Auswahlnummer z.B. Tag</text:p>
          </table:table-cell>
          <table:table-cell table:style-name="Tabelle40.C2" office:value-type="string">
            <text:p text:style-name="P13">'123', 2#0101, 8#33, 16#FF, 'Mo'</text:p>
            <text:p text:style-name="P13"><text:soft-page-break/>'MO,DI,DO'</text:p>
          </table:table-cell>
        </table:table-row>
        <table:table-row>
          <table:table-cell table:style-name="Tabelle40.A2" office:value-type="string">
            <text:p text:style-name="P7">Start</text:p>
          </table:table-cell>
          <table:table-cell table:style-name="Tabelle40.A2" office:value-type="string">
            <text:p text:style-name="P7">Startzeitpunkt (Tageszeit)</text:p>
          </table:table-cell>
          <table:table-cell table:style-name="Tabelle40.C2" office:value-type="string">
            <text:p text:style-name="P13">'TOD#12:00'</text:p>
          </table:table-cell>
        </table:table-row>
        <table:table-row>
          <table:table-cell table:style-name="Tabelle40.A2" office:value-type="string">
            <text:p text:style-name="P7">Dauer</text:p>
          </table:table-cell>
          <table:table-cell table:style-name="Tabelle40.A2" office:value-type="string">
            <text:p text:style-name="P7">Zeitdauer des Ereignisses</text:p>
          </table:table-cell>
          <table:table-cell table:style-name="Tabelle40.C2" office:value-type="string">
            <text:p text:style-name="P13">'T#1h3m22s'</text:p>
          </table:table-cell>
        </table:table-row>
        <table:table-row>
          <table:table-cell table:style-name="Tabelle40.A2" office:value-type="string">
            <text:p text:style-name="P7">Land</text:p>
          </table:table-cell>
          <table:table-cell table:style-name="Tabelle40.A2" office:value-type="string">
            <text:p text:style-name="P7">logische Und Verknüpfung</text:p>
          </table:table-cell>
          <table:table-cell table:style-name="Tabelle40.C2" office:value-type="string">
            <text:p text:style-name="P13">'123', 2#0101, 8#33, 16#FF</text:p>
          </table:table-cell>
        </table:table-row>
        <table:table-row>
          <table:table-cell table:style-name="Tabelle40.A2" office:value-type="string">
            <text:p text:style-name="P7">Lor</text:p>
          </table:table-cell>
          <table:table-cell table:style-name="Tabelle40.A2" office:value-type="string">
            <text:p text:style-name="P7">logische oder Verknüpfung</text:p>
          </table:table-cell>
          <table:table-cell table:style-name="Tabelle40.C2" office:value-type="string">
            <text:p text:style-name="P13">'123', 2#0101, 8#33, 16#FF</text:p>
          </table:table-cell>
        </table:table-row>
      </table:table>
      <text:p text:style-name="P51"/>
      <text:p text:style-name="P200">Das Feld DAY hat je nach Typ des Ereignisses verschiedenen Bedeutung und kann auch mit Wochentagen als Text oder einer Liste von Wochentagen spezifiziert werden.</text:p>
      <text:list xml:id="list33630485" text:continue-numbering="true" text:style-name="L1">
        <text:list-item>
          <text:list>
            <text:list-item>
              <text:h text:style-name="P217" text:outline-level="2"><text:alphabetical-index-mark-start text:id="IMark100801540"/>TIMER_EXT<text:alphabetical-index-mark-end text:id="IMark100801540"/></text:h>
            </text:list-item>
          </text:list>
        </text:list-item>
      </text:list>
      <text:p text:style-name="Standard">Type<text:tab/><text:span text:style-name="T38">Funktionsbaustein</text:span></text:p>
      <text:p text:style-name="P25"><text:span text:style-name="T16">Input</text:span><text:tab/>ENA : BOOL (Baustein <text:span text:style-name="T16">Enable</text:span>)</text:p>
      <text:p text:style-name="P55"><text:tab/>ON : BOOL (zwingt den Ausgang Q auf TRUE)</text:p>
      <text:p text:style-name="P55"><text:tab/>OFF : BOOL (zwingt den Ausgang Q auf FALSE)</text:p>
      <text:p text:style-name="P55"><text:tab/>MAN : BOOL (Steuereingang wenn ON = OFF = TRUE)</text:p>
      <text:p text:style-name="P55"><text:tab/>SWITCH : BOOL (Eingang für Taster)</text:p>
      <text:p text:style-name="P55"><text:tab/>DT_IN : DATETIME (Eingang für Datum und Tageszeit)</text:p>
      <text:p text:style-name="P55"><text:tab/>SUN_SET : TOD (Zeit des Sonnenuntergangs)</text:p>
      <text:p text:style-name="P55"><text:tab/>SUN_RISE : TOD (Zeit des Sonnenaufgangs)</text:p>
      <text:p text:style-name="P55"><text:tab/>HOLIDAY : BOOL (Eingang für Feiertagsmodul)</text:p>
      <text:p text:style-name="P55">Config<text:tab/>T_DEBOUNCE : TIME (Entprellzeit für den Eingang SWITCH)</text:p>
      <text:p text:style-name="P55"><text:tab/>T_SET_START : TIME (Einschaltzeit vor Sonnenuntergang)</text:p>
      <text:p text:style-name="P55"><text:tab/>T_SET_STOP : TIME (Ausschaltzeit nach Sonnenuntergang)</text:p>
      <text:p text:style-name="P55"><text:tab/>T_DAY_STOP : TOD (Ausschaltzeit nach Tageszeit)</text:p>
      <text:p text:style-name="P55"><text:tab/>T_RISE_START : TIME (Einschaltzeit vor Sonnenaufgang)</text:p>
      <text:p text:style-name="P55"><text:tab/>T_DAY_START : TOD (Einschaltzeit nach Tageszeit)</text:p>
      <text:p text:style-name="P55"><text:tab/>T_RISE_STOP : TIME (Ausschaltzeit nach Sonnenaufgang)</text:p>
      <text:p text:style-name="P55"><text:tab/>ENABLE_SATURDAY : BOOL (aktiv an Samstagen wenn TRUE)</text:p>
      <text:p text:style-name="P55"><text:tab/>ENABLE_SUNDAY : BOOL (aktiv an Sonntagen wenn TRUE)</text:p>
      <text:p text:style-name="P55"><text:soft-page-break/><text:tab/>ENABLE_HOLIDAY : BOOL (aktiv an Feiertagen wenn TRUE)</text:p>
      <text:p text:style-name="P55"><draw:frame draw:style-name="fr4" draw:name="Grafik687" text:anchor-type="paragraph" svg:x="1.067cm" svg:y="0.667cm" svg:width="3.69cm" svg:height="4.3cm" draw:z-index="714"><draw:image xlink:href="Pictures/1000000000000117000001458DE1C1C1.png" xlink:type="simple" xlink:show="embed" xlink:actuate="onLoad"/></draw:frame>Output<text:tab/>Q : BOOL (Schaltausgang)</text:p>
      <text:p text:style-name="P77"><text:span text:style-name="T4"><text:line-break/>TIMER_EXT ist ein </text:span><text:span text:style-name="T8">Timer</text:span><text:span text:style-name="T4"> speziell für Außenbeleuchtungen oder andere Verbraucher die während der Dämmerung eingeschaltet sein sollen. Der Ausgang Q kann zu festen Tageszeiten ein und ausgeschaltet werden, zusätzlich kann der Ausgang vor der Dämmerung ein und nach der Dämmerung automatisch wieder ausgeschaltet werden. Ein </text:span><text:span text:style-name="T4">zusätzlicher Eingang SWITCH kann den Ausgang unabhängig von der Tageszeit ein- und aus-schalten. Die Eingänge ENA, ON, OFF und MAN erlauben eine ausführliche automatische und manuelle Steuerung des Ausgangs. Die folgende Tabelle gibt detaillierte Informationen über die Betriebszustände des Bausteins.</text:span></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column table:style-name="Tabelle42.G"/>
        <table:table-column table:style-name="Tabelle42.H"/>
        <table:table-row>
          <table:table-cell table:style-name="Tabelle42.A1" office:value-type="string">
            <text:p text:style-name="P99">ENA</text:p>
          </table:table-cell>
          <table:table-cell table:style-name="Tabelle42.A1" office:value-type="string">
            <text:p text:style-name="P99">ON</text:p>
          </table:table-cell>
          <table:table-cell table:style-name="Tabelle42.A1" office:value-type="string">
            <text:p text:style-name="P99">OFF</text:p>
          </table:table-cell>
          <table:table-cell table:style-name="Tabelle42.A1" office:value-type="string">
            <text:p text:style-name="P99">MAN</text:p>
          </table:table-cell>
          <table:table-cell table:style-name="Tabelle42.A1" office:value-type="string">
            <text:p text:style-name="P99">SWITCH</text:p>
          </table:table-cell>
          <table:table-cell table:style-name="Tabelle42.A1" office:value-type="string">
            <text:p text:style-name="P100">Timer</text:p>
          </table:table-cell>
          <table:table-cell table:style-name="Tabelle42.A1" office:value-type="string">
            <text:p text:style-name="P99">Q</text:p>
          </table:table-cell>
          <table:table-cell table:style-name="Tabelle42.H1" office:value-type="string">
            <text:p text:style-name="P99">STATUS</text:p>
          </table:table-cell>
        </table:table-row>
        <table:table-row>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ext:p>
          </table:table-cell>
          <table:table-cell table:style-name="Tabelle42.A2" office:value-type="string">
            <text:p text:style-name="P99">L</text:p>
          </table:table-cell>
          <table:table-cell table:style-name="Tabelle42.H2" office:value-type="float" office:value="104">
            <text:p text:style-name="P99">104</text:p>
          </table:table-cell>
        </table:table-row>
        <table:table-row>
          <table:table-cell table:style-name="Tabelle42.A2" office:value-type="string">
            <text:p text:style-name="P99">H</text:p>
          </table:table-cell>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ext:p>
          </table:table-cell>
          <table:table-cell table:style-name="Tabelle42.A2" office:value-type="string">
            <text:p text:style-name="P99">H</text:p>
          </table:table-cell>
          <table:table-cell table:style-name="Tabelle42.H2" office:value-type="float" office:value="101">
            <text:p text:style-name="P99">101</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H</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ext:p>
          </table:table-cell>
          <table:table-cell table:style-name="Tabelle42.A2" office:value-type="string">
            <text:p text:style-name="P99">L</text:p>
          </table:table-cell>
          <table:table-cell table:style-name="Tabelle42.H2" office:value-type="float" office:value="102">
            <text:p text:style-name="P99">102</text:p>
          </table:table-cell>
        </table:table-row>
        <table:table-row>
          <table:table-cell table:style-name="Tabelle42.A2" office:value-type="string">
            <text:p text:style-name="P99">H</text:p>
          </table:table-cell>
          <table:table-cell table:style-name="Tabelle42.A2" office:value-type="string">
            <text:p text:style-name="P99">H</text:p>
          </table:table-cell>
          <table:table-cell table:style-name="Tabelle42.A2" office:value-type="string">
            <text:p text:style-name="P99">H</text:p>
          </table:table-cell>
          <table:table-cell table:style-name="Tabelle42.A2" office:value-type="string">
            <text:p text:style-name="P99">X</text:p>
          </table:table-cell>
          <table:table-cell table:style-name="Tabelle42.A2" office:value-type="string">
            <text:p text:style-name="P99">-</text:p>
          </table:table-cell>
          <table:table-cell table:style-name="Tabelle42.A2" office:value-type="string">
            <text:p text:style-name="P100">-</text:p>
          </table:table-cell>
          <table:table-cell table:style-name="Tabelle42.A2" office:value-type="string">
            <text:p text:style-name="P99">MAN</text:p>
          </table:table-cell>
          <table:table-cell table:style-name="Tabelle42.H2" office:value-type="float" office:value="103">
            <text:p text:style-name="P99">103</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144"></text:p>
          </table:table-cell>
          <table:table-cell table:style-name="Tabelle42.A2" office:value-type="string">
            <text:p text:style-name="P100">-</text:p>
          </table:table-cell>
          <table:table-cell table:style-name="Tabelle42.A2" office:value-type="string">
            <text:p text:style-name="P99">NOT Q</text:p>
          </table:table-cell>
          <table:table-cell table:style-name="Tabelle42.H2" office:value-type="float" office:value="110">
            <text:p text:style-name="P99">110</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OD = T_DAY_START</text:p>
          </table:table-cell>
          <table:table-cell table:style-name="Tabelle42.A2" office:value-type="string">
            <text:p text:style-name="P99">H</text:p>
          </table:table-cell>
          <table:table-cell table:style-name="Tabelle42.H2" office:value-type="float" office:value="111">
            <text:p text:style-name="P99">111</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OD = T_DAY_STOP</text:p>
          </table:table-cell>
          <table:table-cell table:style-name="Tabelle42.A2" office:value-type="string">
            <text:p text:style-name="P99">L</text:p>
          </table:table-cell>
          <table:table-cell table:style-name="Tabelle42.H2" office:value-type="float" office:value="112">
            <text:p text:style-name="P99">112</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OD = SUN_RISE - T_RISE_START</text:p>
          </table:table-cell>
          <table:table-cell table:style-name="Tabelle42.A2" office:value-type="string">
            <text:p text:style-name="P99">H</text:p>
          </table:table-cell>
          <table:table-cell table:style-name="Tabelle42.H2" office:value-type="float" office:value="113">
            <text:p text:style-name="P99">113</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OD = SUN_RISE + T_RISE_STOP</text:p>
          </table:table-cell>
          <table:table-cell table:style-name="Tabelle42.A2" office:value-type="string">
            <text:p text:style-name="P99">L</text:p>
          </table:table-cell>
          <table:table-cell table:style-name="Tabelle42.H2" office:value-type="float" office:value="114">
            <text:p text:style-name="P99">114</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OD = SUN_SET - T_SET_START</text:p>
          </table:table-cell>
          <table:table-cell table:style-name="Tabelle42.A2" office:value-type="string">
            <text:p text:style-name="P99">H</text:p>
          </table:table-cell>
          <table:table-cell table:style-name="Tabelle42.H2" office:value-type="float" office:value="115">
            <text:p text:style-name="P99">115</text:p>
          </table:table-cell>
        </table:table-row>
        <table:table-row>
          <table:table-cell table:style-name="Tabelle42.A2" office:value-type="string">
            <text:p text:style-name="P99">H</text:p>
          </table:table-cell>
          <table:table-cell table:style-name="Tabelle42.A2" office:value-type="string">
            <text:p text:style-name="P99">L</text:p>
          </table:table-cell>
          <table:table-cell table:style-name="Tabelle42.A2" office:value-type="string">
            <text:p text:style-name="P99">L</text:p>
          </table:table-cell>
          <table:table-cell table:style-name="Tabelle42.A2" office:value-type="string">
            <text:p text:style-name="P99">-</text:p>
          </table:table-cell>
          <table:table-cell table:style-name="Tabelle42.A2" office:value-type="string">
            <text:p text:style-name="P99">-</text:p>
          </table:table-cell>
          <table:table-cell table:style-name="Tabelle42.A2" office:value-type="string">
            <text:p text:style-name="P100">TOD = SUN_SET + T_SET_STOP</text:p>
          </table:table-cell>
          <table:table-cell table:style-name="Tabelle42.A2" office:value-type="string">
            <text:p text:style-name="P99">L</text:p>
          </table:table-cell>
          <table:table-cell table:style-name="Tabelle42.H2" office:value-type="float" office:value="116">
            <text:p text:style-name="P99">116</text:p>
          </table:table-cell>
        </table:table-row>
      </table:table>
      <text:p text:style-name="P77"/>
      <text:p text:style-name="P77">Die Setup Variablen ENABLE_SUNDAY, SATURDAY und HOLIDAY definieren ob der Baustein auch an Samstagen, Sonntagen und Feiertagen aktiv ist. Wenn der Baustein an Feiertagen nicht schalten soll muss am Eingang HOLIDAY der Baustein HOLIDAY aus der Bibliothek angeschlossen werden, dieser Baustein signalisiert mit einem TRUE das heute ein Feiertag ist. Die Setup Variablen T_SET_START, T_SET_STOP, T_RISE_START, T_RISE_STOP, T_DAY_START und <text:soft-page-break/>T_DAY_STOP legen die Schaltzeiten fest. ist eine dieser Variablen T#0s oder TOD#00:00 dann ist diese Schaltzeit nicht aktiv. Das bedeutet das z.B. T_SET_START (Einschaltzeit vor Sonnenuntergang) nur dann einschaltet wenn sie auf mindestens 1 Sekunde eingestellt ist. Der Baustein schaltet bei erreichen der Zeit T_DAY_START den Ausgang Q ein, und bei erreichen von T_DAY_STOP wieder aus, wenn eine der beiden Zeiten (T_DAY_START oder T_DAY_STOP) auf TOD#00:00 steht wird der entsprechende Schaltvorgang nicht ausgeführt. Der Baustein schaltet um die Zeit T_RISE_START vor Sonnenaufgang (SUN_RISE) ein und <text:s/>bei erreichen von T_RISE_STOP nach Sonnenaufgang wieder aus. Dasselbe gibt für die Zeiten bei Sonnenuntergang.</text:p>
      <text:list xml:id="list33640437" text:continue-numbering="true" text:style-name="L1">
        <text:list-item>
          <text:list>
            <text:list-item>
              <text:h text:style-name="P217" text:outline-level="2"><text:alphabetical-index-mark-start text:id="IMark100801540"/>TIMER_P4<text:alphabetical-index-mark-end text:id="IMark100801540"/></text:h>
            </text:list-item>
          </text:list>
        </text:list-item>
      </text:list>
      <text:p text:style-name="Standard">Type<text:tab/><text:span text:style-name="T38">Funktionsbaustein</text:span></text:p>
      <text:p text:style-name="P25"><text:span text:style-name="T16">Input</text:span><text:tab/>DTIME : DATE_TIME (Datum Zeit Eingang)</text:p>
      <text:p text:style-name="P25"><text:tab/>TREF_0 : TOD (Referenzzeit 0)</text:p>
      <text:p text:style-name="P55"><text:tab/>TREF_1 : TOD (Referenzzeit 1)</text:p>
      <text:p text:style-name="P25"><text:tab/>HOLY : BOOL (Feiertagseingang)</text:p>
      <text:p text:style-name="P25"><text:tab/>L0..L3 : BOOL (Logische Eingänge)</text:p>
      <text:p text:style-name="P55"><text:tab/>OFS : INT (Kanal Offset)</text:p>
      <text:p text:style-name="P55"><text:tab/>ENQ : BOOL (Wenn ENQ = FALSE bleiben alle Ausgänge FALSE)</text:p>
      <text:p text:style-name="P55"><text:tab/>MAN : BOOL (Umschalter für Handbetrieb)</text:p>
      <text:p text:style-name="P55"><text:tab/>MI : BYTE (Kanalwahl bei Handbetrieb)</text:p>
      <text:p text:style-name="P55"><text:tab/>RST : BOOL (Asynchroner Reset)</text:p>
      <text:p text:style-name="P55"><text:tab/>PROG : ARRAY[0..63] OF TIMER_EVENT (Programmdaten)</text:p>
      <text:p text:style-name="P56">Output<text:tab/>Q0..Q3 : BOOL (Schaltausgänge)</text:p>
      <text:p text:style-name="P56"><draw:frame draw:style-name="fr4" draw:name="Grafik629" text:anchor-type="paragraph" svg:x="1.046cm" svg:y="0.676cm" svg:width="3.62cm" svg:height="7.14cm" draw:z-index="732"><draw:image xlink:href="Pictures/10000000000001120000021C4A31700C.png" xlink:type="simple" xlink:show="embed" xlink:actuate="onLoad"/></draw:frame><text:tab/>STATUS : BYTE (ESR kompatibler Status Ausgang)</text:p>
      <text:p text:style-name="P56"><text:soft-page-break/><text:line-break/>TIMER_P4 ist ein universell programmierbarer <text:span text:style-name="T16">Timer</text:span>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p>
      <text:p text:style-name="P56">Die Programmierung des <text:span text:style-name="T16">Timers</text:span> erfolgt über ein ARRAY[0..63] OF TIMER_EVENT. Es können dabei beliebig viele Ereignisse je Kanal und auch überlappende Ereignisse Erzeugt werden.</text:p>
      <text:p text:style-name="P56">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43">Datenfeld</text:p>
          </table:table-cell>
          <table:table-cell table:style-name="Tabelle39.A1" office:value-type="string">
            <text:p text:style-name="P143">Datentyp</text:p>
          </table:table-cell>
          <table:table-cell table:style-name="Tabelle39.C1" office:value-type="string">
            <text:p text:style-name="P132">Beschreibung</text:p>
          </table:table-cell>
        </table:table-row>
        <table:table-row>
          <table:table-cell table:style-name="Tabelle39.A2" office:value-type="string">
            <text:p text:style-name="P141">CHANNEL</text:p>
          </table:table-cell>
          <table:table-cell table:style-name="Tabelle39.A2" office:value-type="string">
            <text:p text:style-name="P141">BYTE</text:p>
          </table:table-cell>
          <table:table-cell table:style-name="Tabelle39.C2" office:value-type="string">
            <text:p text:style-name="P141">Kanalnummer</text:p>
          </table:table-cell>
        </table:table-row>
        <table:table-row>
          <table:table-cell table:style-name="Tabelle39.A2" office:value-type="string">
            <text:p text:style-name="P141">TYP</text:p>
          </table:table-cell>
          <table:table-cell table:style-name="Tabelle39.A2" office:value-type="string">
            <text:p text:style-name="P141">BYTE</text:p>
          </table:table-cell>
          <table:table-cell table:style-name="Tabelle39.C2" office:value-type="string">
            <text:p text:style-name="P141">Ereignistyp</text:p>
          </table:table-cell>
        </table:table-row>
        <table:table-row>
          <table:table-cell table:style-name="Tabelle39.A2" office:value-type="string">
            <text:p text:style-name="P141">DAY</text:p>
          </table:table-cell>
          <table:table-cell table:style-name="Tabelle39.A2" office:value-type="string">
            <text:p text:style-name="P141">BYTE</text:p>
          </table:table-cell>
          <table:table-cell table:style-name="Tabelle39.C2" office:value-type="string">
            <text:p text:style-name="P141">Tag oder andere Nummer</text:p>
          </table:table-cell>
        </table:table-row>
        <table:table-row>
          <table:table-cell table:style-name="Tabelle39.A2" office:value-type="string">
            <text:p text:style-name="P141">START</text:p>
          </table:table-cell>
          <table:table-cell table:style-name="Tabelle39.A2" office:value-type="string">
            <text:p text:style-name="P141">TOD</text:p>
          </table:table-cell>
          <table:table-cell table:style-name="Tabelle39.C2" office:value-type="string">
            <text:p text:style-name="P141">Startzeitpunkt</text:p>
          </table:table-cell>
        </table:table-row>
        <table:table-row>
          <table:table-cell table:style-name="Tabelle39.A2" office:value-type="string">
            <text:p text:style-name="P141">DURATION</text:p>
          </table:table-cell>
          <table:table-cell table:style-name="Tabelle39.A2" office:value-type="string">
            <text:p text:style-name="P141">TIME</text:p>
          </table:table-cell>
          <table:table-cell table:style-name="Tabelle39.C2" office:value-type="string">
            <text:p text:style-name="P141">Zeitdauer des Events</text:p>
          </table:table-cell>
        </table:table-row>
        <table:table-row>
          <table:table-cell table:style-name="Tabelle39.A2" office:value-type="string">
            <text:p text:style-name="P141">LAND</text:p>
          </table:table-cell>
          <table:table-cell table:style-name="Tabelle39.A2" office:value-type="string">
            <text:p text:style-name="P141">BYTE</text:p>
          </table:table-cell>
          <table:table-cell table:style-name="Tabelle39.C2" office:value-type="string">
            <text:p text:style-name="P141">Maske für Logisches UND</text:p>
          </table:table-cell>
        </table:table-row>
        <table:table-row>
          <table:table-cell table:style-name="Tabelle39.A2" office:value-type="string">
            <text:p text:style-name="P141">LOR</text:p>
          </table:table-cell>
          <table:table-cell table:style-name="Tabelle39.A2" office:value-type="string">
            <text:p text:style-name="P141">BYTE</text:p>
          </table:table-cell>
          <table:table-cell table:style-name="Tabelle39.C2" office:value-type="string">
            <text:p text:style-name="P141">Maske für Logisches ODER</text:p>
          </table:table-cell>
        </table:table-row>
        <table:table-row>
          <table:table-cell table:style-name="Tabelle39.A2" office:value-type="string">
            <text:p text:style-name="P141">LAST</text:p>
          </table:table-cell>
          <table:table-cell table:style-name="Tabelle39.A2" office:value-type="string">
            <text:p text:style-name="P141">DWORD</text:p>
          </table:table-cell>
          <table:table-cell table:style-name="Tabelle39.C2" office:value-type="string">
            <text:p text:style-name="P141">Interne Benutzung</text:p>
          </table:table-cell>
        </table:table-row>
      </table:table>
      <text:p text:style-name="P56"/>
      <text:p text:style-name="P56">Im Datenfeld CHANNEL wird der für das Ereignis relevante Kanal spezifiziert, falls mehrere Kanäle gleichzeitig geschaltet werden sollen müssen je Kanal separate Ereignisse programmiert werden. Der TYP des Ereignisses legt fest welche Art von Er<text:soft-page-break/>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 text:style-name="T16">Timer</text:span>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p>
      <text:p text:style-name="P56">Der <text:span text:style-name="T16">Timer</text:span> hat einen zusätzlichen manuellen Eingang der es erlaubt Ausgänge Manuell zu überschreiben. Wenn MAN = TRUE ist werden die 4 untersten Bits des Eingangs MI auf die Ausgänge Q geschaltet. Der Eingang ENQ ist ein Freigabeeingang und muss für normalen Betrieb auf TRUE stehen, wird ENQ auf FALSE gestellt, bleiben alle Ausgänge auf FALSE. Der Baustein kann jederzeit mittels des asynchronen Eingangs RST zurückgesetzt werden, dabei werden alle laufenden Ereignisse gelöscht. 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p>
      <text:p text:style-name="P56">Der Ausgang STATUS ist ein ESR kompatibler Status Ausgang der die Betriebszustände des Bausteins meldet.</text:p>
      <text:p text:style-name="P56">STATUS = 100 (Der Baustein ist <text:span text:style-name="T16">disabled</text:span>, ENQ = FALSE)</text:p>
      <text:p text:style-name="P56">STATUS = 101 (Handbetrieb, MAN = TRUE)</text:p>
      <text:p text:style-name="P56">STATUS = 102 (automatischer Betrieb)</text:p>
      <text:p text:style-name="P56"><draw:frame draw:style-name="fr4" draw:name="Grafik641" text:anchor-type="paragraph" svg:x="1.729cm" svg:y="0.66cm" svg:width="13.48cm" svg:height="6.07cm" draw:z-index="662"><draw:image xlink:href="Pictures/10000000000002D80000014850FDB20C.png" xlink:type="simple" xlink:show="embed" xlink:actuate="onLoad"/></draw:frame>Das folgende Beispiel zeigt 2 kaskadierte <text:span text:style-name="T16">Timer</text:span>:</text:p>
      <text:p text:style-name="P56"/>
      <text:p text:style-name="P56"><draw:frame draw:style-name="fr4" draw:name="Grafik630" text:anchor-type="paragraph" svg:x="3.025cm" svg:y="0.686cm" svg:width="11.19cm" svg:height="6.04cm" draw:z-index="651"><draw:image xlink:href="Pictures/100000000000025C00000146F4C42A29.png" xlink:type="simple" xlink:show="embed" xlink:actuate="onLoad"/></draw:frame>Blockschaltbild des <text:span text:style-name="T16">Timers</text:span>:</text:p>
      <text:p text:style-name="P86"><text:soft-page-break/></text:p>
      <text:p text:style-name="P56">Tritt ein programmiertes Ereignis ein so wird der entsprechende <text:span text:style-name="T16">Timer</text:span>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 text:style-name="T16">Timers</text:span> mit den Logischen Eingängen L0 und L3 per AND verknüpft. Der Ausgang wird in diesem Fall nur Dann TRUE wenn sowohl ein Ereignis den <text:span text:style-name="T16">Timer</text:span> gestartet hat und gleichzeitig auch L0 und L3 TRUE sind. Nach der UND Verknüpfung kann der Ausgang noch zusätzlich mit beliebigen logischen Eingängen in der selben Weise mittels der Maske LOR OR verknüpft werden.</text:p>
      <text:p text:style-name="P56">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row>
          <table:table-cell table:style-name="Tabelle38.A1" office:value-type="string">
            <text:p text:style-name="P142">TYP</text:p>
          </table:table-cell>
          <table:table-cell table:style-name="Tabelle38.A1" office:value-type="string">
            <text:p text:style-name="P142">Beschreibung</text:p>
          </table:table-cell>
          <table:table-cell table:style-name="Tabelle38.A1" office:value-type="string">
            <text:p text:style-name="P142">DAY</text:p>
          </table:table-cell>
          <table:table-cell table:style-name="Tabelle38.A1" office:value-type="string">
            <text:p text:style-name="P142">Start</text:p>
          </table:table-cell>
          <table:table-cell table:style-name="Tabelle38.E1" office:value-type="string">
            <text:p text:style-name="P142">Duration</text:p>
          </table:table-cell>
        </table:table-row>
        <table:table-row>
          <table:table-cell table:style-name="Tabelle38.A2" office:value-type="string">
            <text:p text:style-name="P141">1</text:p>
          </table:table-cell>
          <table:table-cell table:style-name="Tabelle38.A2" office:value-type="string">
            <text:p text:style-name="P141">tägliches Ereignis</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2</text:p>
          </table:table-cell>
          <table:table-cell table:style-name="Tabelle38.A2" office:value-type="string">
            <text:p text:style-name="P141">Ereignis an selektierten Wochentagen</text:p>
          </table:table-cell>
          <table:table-cell table:style-name="Tabelle38.A2" office:value-type="string">
            <text:p text:style-name="P141">B0..6</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3</text:p>
          </table:table-cell>
          <table:table-cell table:style-name="Tabelle38.A2" office:value-type="string">
            <text:p text:style-name="P141">Ereignis alle N Tage</text:p>
          </table:table-cell>
          <table:table-cell table:style-name="Tabelle38.A2" office:value-type="string">
            <text:p text:style-name="P141">N</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10</text:p>
          </table:table-cell>
          <table:table-cell table:style-name="Tabelle38.A2" office:value-type="string">
            <text:p text:style-name="P141">wöchentliches Ereignis</text:p>
          </table:table-cell>
          <table:table-cell table:style-name="Tabelle38.A2" office:value-type="string">
            <text:p text:style-name="P141">Tag der Woche</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20</text:p>
          </table:table-cell>
          <table:table-cell table:style-name="Tabelle38.A2" office:value-type="string">
            <text:p text:style-name="P141">monatliches Ereignis</text:p>
          </table:table-cell>
          <table:table-cell table:style-name="Tabelle38.A2" office:value-type="string">
            <text:p text:style-name="P141">Tag des Monats</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21</text:p>
          </table:table-cell>
          <table:table-cell table:style-name="Tabelle38.A2" office:value-type="string">
            <text:p text:style-name="P141">letzter Tag des Monats</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30</text:p>
          </table:table-cell>
          <table:table-cell table:style-name="Tabelle38.A2" office:value-type="string">
            <text:p text:style-name="P141">jährliches Ereignis</text:p>
          </table:table-cell>
          <table:table-cell table:style-name="Tabelle38.A2" office:value-type="string">
            <text:p text:style-name="P141">Tag des Jahres</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31</text:p>
          </table:table-cell>
          <table:table-cell table:style-name="Tabelle38.A2" office:value-type="string">
            <text:p text:style-name="P141">letzter Tag des Jahres</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40</text:p>
          </table:table-cell>
          <table:table-cell table:style-name="Tabelle38.A2" office:value-type="string">
            <text:p text:style-name="P141">Ereignis an Schalttagen</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41</text:p>
          </table:table-cell>
          <table:table-cell table:style-name="Tabelle38.A2" office:value-type="string">
            <text:p text:style-name="P141">Ereignis an Feiertagen</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42</text:p>
          </table:table-cell>
          <table:table-cell table:style-name="Tabelle38.A2" office:value-type="string">
            <text:p text:style-name="P141">an Feiertagen und Wochenenden</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ext:soft-page-break/>
        <table:table-row>
          <table:table-cell table:style-name="Tabelle38.A2" office:value-type="string">
            <text:p text:style-name="P141">43</text:p>
          </table:table-cell>
          <table:table-cell table:style-name="Tabelle38.A2" office:value-type="string">
            <text:p text:style-name="P141">Ereignis an Werktagen</text:p>
          </table:table-cell>
          <table:table-cell table:style-name="Tabelle38.A2" office:value-type="string">
            <text:p text:style-name="P141">-</text:p>
          </table:table-cell>
          <table:table-cell table:style-name="Tabelle38.A2" office:value-type="string">
            <text:p text:style-name="P141">Anfangszeit</text:p>
          </table:table-cell>
          <table:table-cell table:style-name="Tabelle38.E2" office:value-type="string">
            <text:p text:style-name="P141">Dauer</text:p>
          </table:table-cell>
        </table:table-row>
        <table:table-row>
          <table:table-cell table:style-name="Tabelle38.A2" office:value-type="string">
            <text:p text:style-name="P141">50</text:p>
          </table:table-cell>
          <table:table-cell table:style-name="Tabelle38.A2" office:value-type="string">
            <text:p text:style-name="P141">Ereignis nach externer Zeit</text:p>
          </table:table-cell>
          <table:table-cell table:style-name="Tabelle38.C14" office:value-type="float" office:value="0.1">
            <text:p text:style-name="P141">0,1</text:p>
          </table:table-cell>
          <table:table-cell table:style-name="Tabelle38.A2" office:value-type="string">
            <text:p text:style-name="P141">Offset</text:p>
          </table:table-cell>
          <table:table-cell table:style-name="Tabelle38.E2" office:value-type="string">
            <text:p text:style-name="P141">Dauer</text:p>
          </table:table-cell>
        </table:table-row>
        <table:table-row>
          <table:table-cell table:style-name="Tabelle38.A2" office:value-type="string">
            <text:p text:style-name="P141">51</text:p>
          </table:table-cell>
          <table:table-cell table:style-name="Tabelle38.A2" office:value-type="string">
            <text:p text:style-name="P141">Ereignis vor externer Zeit </text:p>
          </table:table-cell>
          <table:table-cell table:style-name="Tabelle38.A2" office:value-type="string">
            <text:p text:style-name="P141">0,1</text:p>
          </table:table-cell>
          <table:table-cell table:style-name="Tabelle38.A2" office:value-type="string">
            <text:p text:style-name="P141">-Offset</text:p>
          </table:table-cell>
          <table:table-cell table:style-name="Tabelle38.E2" office:value-type="string">
            <text:p text:style-name="P141">Dauer</text:p>
          </table:table-cell>
        </table:table-row>
        <table:table-row>
          <table:table-cell table:style-name="Tabelle38.C14" office:value-type="float" office:value="52">
            <text:p text:style-name="P141">52</text:p>
          </table:table-cell>
          <table:table-cell table:style-name="Tabelle38.A2" office:value-type="string">
            <text:p text:style-name="P141">Ausgang zu Zeit + Offset setzen</text:p>
          </table:table-cell>
          <table:table-cell table:style-name="Tabelle38.A2" office:value-type="string">
            <text:p text:style-name="P141">0,1,2</text:p>
          </table:table-cell>
          <table:table-cell table:style-name="Tabelle38.A2" office:value-type="string">
            <text:p text:style-name="P141">Offset</text:p>
          </table:table-cell>
          <table:table-cell table:style-name="Tabelle38.E2" office:value-type="string">
            <text:p text:style-name="P141"/>
          </table:table-cell>
        </table:table-row>
        <table:table-row>
          <table:table-cell table:style-name="Tabelle38.C14" office:value-type="float" office:value="53">
            <text:p text:style-name="P141">53</text:p>
          </table:table-cell>
          <table:table-cell table:style-name="Tabelle38.A2" office:value-type="string">
            <text:p text:style-name="P141">Ausgang zu Zeit + Offset löschen</text:p>
          </table:table-cell>
          <table:table-cell table:style-name="Tabelle38.A2" office:value-type="string">
            <text:p text:style-name="P141">0,1,2</text:p>
          </table:table-cell>
          <table:table-cell table:style-name="Tabelle38.A2" office:value-type="string">
            <text:p text:style-name="P141">Offset</text:p>
          </table:table-cell>
          <table:table-cell table:style-name="Tabelle38.E2" office:value-type="string">
            <text:p text:style-name="P141"/>
          </table:table-cell>
        </table:table-row>
        <table:table-row>
          <table:table-cell table:style-name="Tabelle38.C14" office:value-type="float" office:value="54">
            <text:p text:style-name="P141">54</text:p>
          </table:table-cell>
          <table:table-cell table:style-name="Tabelle38.A2" office:value-type="string">
            <text:p text:style-name="P141">Ausgang zu Zeit - Offset setzen</text:p>
          </table:table-cell>
          <table:table-cell table:style-name="Tabelle38.A2" office:value-type="string">
            <text:p text:style-name="P141">0,1,2</text:p>
          </table:table-cell>
          <table:table-cell table:style-name="Tabelle38.A2" office:value-type="string">
            <text:p text:style-name="P141">Offset</text:p>
          </table:table-cell>
          <table:table-cell table:style-name="Tabelle38.E2" office:value-type="string">
            <text:p text:style-name="P141"/>
          </table:table-cell>
        </table:table-row>
        <table:table-row>
          <table:table-cell table:style-name="Tabelle38.C14" office:value-type="float" office:value="55">
            <text:p text:style-name="P141">55</text:p>
          </table:table-cell>
          <table:table-cell table:style-name="Tabelle38.A2" office:value-type="string">
            <text:p text:style-name="P141">Ausgang zu Zeit - Offset löschen</text:p>
          </table:table-cell>
          <table:table-cell table:style-name="Tabelle38.A2" office:value-type="string">
            <text:p text:style-name="P141">0,1,2</text:p>
          </table:table-cell>
          <table:table-cell table:style-name="Tabelle38.A2" office:value-type="string">
            <text:p text:style-name="P141">Offset</text:p>
          </table:table-cell>
          <table:table-cell table:style-name="Tabelle38.E2" office:value-type="string">
            <text:p text:style-name="P141"/>
          </table:table-cell>
        </table:table-row>
      </table:table>
      <text:p text:style-name="P56"/>
      <text:p text:style-name="P56">Ereignistypen:</text:p>
      <text:p text:style-name="P56">1. tägliches Ereignis</text:p>
      <text:p text:style-name="P56">bei einem täglichen Ereignis wird lediglich Kanalnummer, Startzeit und Dauer des Ereignisses Programmiert. Das Feld DAY hat keine Bedeutung.</text:p>
      <text:p text:style-name="P56">2. Ereignis an selektierten Wochentagen</text:p>
      <text:p text:style-name="P56">bei diesem Ereignis wird der <text:span text:style-name="T16">Timer</text:span> an selektierbaren Wochentagen gestartet. Im Feld DAY wird dabei über eine Bitmaske festgelegt an welchen Wochentagen das Ereignis zu starten ist. Montag = Bit 6, .... Sonntag = Bit 0. Das Ereignis wird nur an den Wochentagen gestartet wenn das entsprechende Bit im Feld DAY TRUE ist.</text:p>
      <text:p text:style-name="P56">3. Ereignis alle N Tage</text:p>
      <text:p text:style-name="P56">hierbei wird nach Ablauf von N Tagen das definierte Ereignis gestartet. Im Feld DAY wird dabei angegeben nach wie vielen Tagen das Ereignis gestartet wird. N=3 bedeutet das das Ereignis jeden 3ten Tag gestartet wird. N kann hierbei Werte von 1..255 annehmen.</text:p>
      <text:p text:style-name="P56">10. wöchentliches Ereignis</text:p>
      <text:p text:style-name="P56">hierbei wird an einem bestimmten Tag in der Woche das Ereignis gestartet, der entsprechende Tag wird im Feld DAY festgelegt: 1 = Montag.....7 = Sonntag.</text:p>
      <text:p text:style-name="P56">20. monatliches Ereignis</text:p>
      <text:p text:style-name="P56">Bei monatlichen Ereignissen wird im Feld DAY der entsprechende Tag des Monats an dem das Ereignis stattfinden soll festgelegt. DAY = 24 bedeutet das das Ereignis jeweils am 24. eines Monats gestartet wird.</text:p>
      <text:p text:style-name="P56">21. Ende des Monats</text:p>
      <text:p text:style-name="P56">Da Monate keine feste Länge haben ist es Sinnvoll auch ein Ereignis am letzten Tag eines Monats generieren zu können. In diesen Mode hat DAY keine Bedeutung.</text:p>
      <text:p text:style-name="P56">30. jährliches Ereignis</text:p>
      <text:p text:style-name="P56">Bei jährlichen Ereignissen wird im Feld DAY der entsprechende Tag des Jahres an dem das Ereignis stattfinden soll festgelegt. DAY = 33 bedeutet das das Ereignis jeweils am 33. Tag eines Jahres gestartet wird, was dem dem 2. Februar entspricht.</text:p>
      <text:p text:style-name="P56"><text:soft-page-break/>31. Ende des Jahres</text:p>
      <text:p text:style-name="P56">Da Jahre keine feste Länge haben ist es Sinnvoll auch ein Ereignis am letzten Tag eines Jahres generieren zu können. In diesen Mode hat DAY keine Bedeutung. Das Ereignis wird immer am 31. Dezember erzeugt.</text:p>
      <text:p text:style-name="P56">40. Ereignis an Schalttagen</text:p>
      <text:p text:style-name="P56">Dieses Ereignis wird nur am 29. Februar, also nur in einem Schaltjahr generiert. DAY hat hierbei keine Bedeutung.</text:p>
      <text:p text:style-name="P56">41. Ereignis an Feiertagen</text:p>
      <text:p text:style-name="P56">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56">42. Ereignis an Feiertagen und Wochenenden</text:p>
      <text:p text:style-name="P56">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56">43. Ereignis an Werktagen</text:p>
      <text:p text:style-name="P56">Dieses Ereignis wird nur an den Wochentagen Montag bis Freitag erzeugt. Das Feld DAY hat hierbei keine Bedeutung.</text:p>
      <text:p text:style-name="P56">50. Ereignis nach externer Zeit</text:p>
      <text:p text:style-name="P56">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200">51. Ereignis vor externer Zeit</text:p>
      <text:p text:style-name="P56">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p text:style-name="P56"><text:soft-page-break/>52 Ausgang setzen nach externer Zeit</text:p>
      <text:p text:style-name="P56">Ein Ereignis vom Typ 52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56">53 Ausgang löschen mit externem Offset</text:p>
      <text:p text:style-name="P56">Ein Ereignis vom Typ 53 schaltet den Ausgang bei erreichen der externen Zeit + START aus. Die externe Zeit ist TREF1 wenn DAY = 1 oder TREF_0 wenn DAY = 0, ist DAY &gt; 1 ist die externe Zeit 0.</text:p>
      <text:p text:style-name="P56">54 Ausgang setzen mit negativen Offset</text:p>
      <text:p text:style-name="P56">Ein Ereignis vom Typ 54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56">55 Ausgang löschen mit negativen Offset</text:p>
      <text:p text:style-name="P56">Ein Ereignis vom Typ 55 schaltet den Ausgang bei erreichen der externen Zeit - START aus. Die externe Zeit ist TREF1 wenn DAY = 1 oder TREF_0 wenn DAY = 0, ist DAY &gt; 1 ist die externe Zeit 0.</text:p>
      <text:list xml:id="list33649132" text:continue-numbering="true" text:style-name="L1">
        <text:list-item>
          <text:h text:style-name="P214" text:outline-level="1">Jalousiesteuerung</text:h>
        </text:list-item>
      </text:list>
      <text:p text:style-name="P16"/>
      <text:list xml:id="list33647356" text:continue-numbering="true" text:style-name="L1">
        <text:list-item>
          <text:list>
            <text:list-item>
              <text:h text:style-name="P217" text:outline-level="2">Einleitung</text:h>
            </text:list-item>
          </text:list>
        </text:list-item>
      </text:list>
      <text:p text:style-name="P27">Die folgenden Bausteine sind so konzipiert und aufeinander abgestimmt dass Sie einen modularen Aufbau eines Jalousiecontrollers ermöglichen. Dieses modulare System erlaubt einen schnellen und einfachen Aufbau von einfachen bis komplexen Jalousiecontrollern die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56">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56">Der Ausgang STATUS gibt ESR kompatible Meldungen über den Zustand des betreffenden Bausteins aus. Wenn keine eigenen Zustandsmeldungen anstehen reicht jeder Baustein die am Eingang S_IN anliegenden Statusmeldungen an den Ausgang STATUS weiter.</text:p>
      <text:p text:style-name="P56">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24">Anwender</text:span> jederzeit geändert werden.</text:p>
      <text:p text:style-name="P56">Zukünftige oder Kundenspezifische Funktionen können auf diese Weise einfach und schnell in die Vorhandenen Blöcke eingeschaltet werden ohne dabei die vorhandene Programmierung ändern zu müssen.</text:p>
      <text:list xml:id="list33635297" text:continue-numbering="true" text:style-name="L1">
        <text:list-item>
          <text:list>
            <text:list-item>
              <text:h text:style-name="P217" text:outline-level="2"><text:soft-page-break/><text:alphabetical-index-mark-start text:id="IMark100801540"/>BLIND_ACTUATOR<text:alphabetical-index-mark-end text:id="IMark100801540"/></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T_UD : TIME (Laufzeit AUF / AB)</text:p>
      <text:p text:style-name="P56"><text:tab/>T_ANGLE : TIME (Laufzeit der Lamellenverstellung)</text:p>
      <text:p text:style-name="P56">Config<text:tab/>T_LOCKOUT : TIME (Totzeit zwischen Richtungswechsel)<text:tab/></text:p>
      <text:p text:style-name="P56">Output<text:tab/>POS : BYTE (Position der Jalousie, 0 = unten, 255 = oben)</text:p>
      <text:p text:style-name="P56"><text:tab/>ANG : BYTE (Winkel der Lamelle, 0 = vertikal, 255 = horizontal)</text:p>
      <text:p text:style-name="P56"><text:tab/>QU : BOOL (Motor Auf Signal)</text:p>
      <text:p text:style-name="P56"><text:tab/>QD : BOOL (Motor Ab Signal)</text:p>
      <text:p text:style-name="P56"><draw:frame draw:style-name="fr4" draw:name="Grafik328" text:anchor-type="paragraph" svg:x="1.046cm" svg:y="0.642cm" svg:width="3.69cm" svg:height="2.709cm" draw:z-index="317"><draw:image xlink:href="Pictures/1000000000000117000000CD51E39A6F.png" xlink:type="simple" xlink:show="embed" xlink:actuate="onLoad"/></draw:frame><text:tab/>STATUS : BYTE (ESR kompatibler Status Ausgang)</text:p>
      <text:p text:style-name="P56"><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24">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56">T_UD = T#10S</text:p>
      <text:p text:style-name="P56">T_ANGLE = T#3S</text:p>
      <text:p text:style-name="P56">T_LOCKOUT = T#100MS</text:p>
      <text:p text:style-name="P56">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29">STATUS</text:p>
          </table:table-cell>
          <table:table-cell table:style-name="Tabelle14.B1" office:value-type="string">
            <text:p text:style-name="P129">Bedeutung</text:p>
          </table:table-cell>
        </table:table-row>
        <table:table-row>
          <table:table-cell table:style-name="Tabelle14.A2" office:value-type="string">
            <text:p text:style-name="P129">0</text:p>
          </table:table-cell>
          <table:table-cell table:style-name="Tabelle14.B2" office:value-type="string">
            <text:p text:style-name="P129">keine Meldung</text:p>
          </table:table-cell>
        </table:table-row>
        <table:table-row>
          <table:table-cell table:style-name="Tabelle14.A2" office:value-type="string">
            <text:p text:style-name="P129">1</text:p>
          </table:table-cell>
          <table:table-cell table:style-name="Tabelle14.B2" office:value-type="string">
            <text:p text:style-name="P129">Fehler, UP und DN gleichzeitig aktiv</text:p>
          </table:table-cell>
        </table:table-row>
        <table:table-row>
          <table:table-cell table:style-name="Tabelle14.A2" office:value-type="string">
            <text:p text:style-name="P129">101</text:p>
          </table:table-cell>
          <table:table-cell table:style-name="Tabelle14.B2" office:value-type="string">
            <text:p text:style-name="P129">Manual UP</text:p>
          </table:table-cell>
        </table:table-row>
        <table:table-row>
          <table:table-cell table:style-name="Tabelle14.A2" office:value-type="string">
            <text:p text:style-name="P129">102</text:p>
          </table:table-cell>
          <table:table-cell table:style-name="Tabelle14.B2" office:value-type="string">
            <text:p text:style-name="P129">Manual DN</text:p>
          </table:table-cell>
        </table:table-row>
        <table:table-row>
          <table:table-cell table:style-name="Tabelle14.A2" office:value-type="string">
            <text:p text:style-name="P129">NNN</text:p>
          </table:table-cell>
          <table:table-cell table:style-name="Tabelle14.B2" office:value-type="string">
            <text:p text:style-name="P129">weitergereichte Meldung</text:p>
          </table:table-cell>
        </table:table-row>
      </table:table>
      <text:p text:style-name="P56"><text:s/></text:p>
      <text:p text:style-name="P56"><draw:frame draw:style-name="fr4" draw:name="Grafik329" text:anchor-type="paragraph" svg:x="0.981cm" svg:y="0.644cm" svg:width="15.998cm" svg:height="3.937cm" draw:z-index="311"><draw:image xlink:href="Pictures/1000000000000404000000FD6B8FB6C2.png" xlink:type="simple" xlink:show="embed" xlink:actuate="onLoad"/></draw:frame>Die folgende Grafik zeigt den inneren Aufbau und die Funktionsweise des Moduls:</text:p>
      <text:p text:style-name="P56"/>
      <text:p text:style-name="P56"/>
      <text:p text:style-name="P56"/>
      <text:p text:style-name="P56"/>
      <text:list xml:id="list33639144" text:continue-numbering="true" text:style-name="L1">
        <text:list-item>
          <text:list>
            <text:list-item>
              <text:h text:style-name="P217" text:outline-level="2"><text:soft-page-break/><text:alphabetical-index-mark-start text:id="IMark100801540"/>BLIND_CONTROL<text:alphabetical-index-mark-end text:id="IMark100801540"/></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Vorgabe der Position)</text:p>
      <text:p text:style-name="P56"><text:tab/>AI : BYTE (Vorgabe des Lamellenwinkels)</text:p>
      <text:p text:style-name="P56"><text:tab/>T_UD : TIME (Zeit zum Hochfahren von 0 .. 255)</text:p>
      <text:p text:style-name="P56"><text:tab/>T_ANGLE : TIME (Zeit um den Lamellenwinkel von 0 .. 255 zu verstellen)</text:p>
      <text:p text:style-name="P56">Config<text:tab/>SENS : BYTE (Auflösung der Regelung)</text:p>
      <text:p text:style-name="P56"><text:tab/>T_LOCKOUT : TIME (Totzeit bei Richtungswechsel der Motoren)</text:p>
      <text:p text:style-name="P56">Output<text:tab/>POS : BYTE (Simulierte Jalousiestellung)</text:p>
      <text:p text:style-name="P56"><text:tab/>ANG : BYTE (Simulierter Lamellenwinkel)</text:p>
      <text:p text:style-name="P56"><text:tab/>MU : BOOL (Motor Auf Signal)</text:p>
      <text:p text:style-name="P56"><text:tab/>MD : BOOL (Motor Ab Signal)</text:p>
      <text:p text:style-name="P56"><draw:frame draw:style-name="fr4" draw:name="Grafik332" text:anchor-type="paragraph" svg:x="1.115cm" svg:y="0.612cm" svg:width="3.69cm" svg:height="3.5cm" draw:z-index="318"><draw:image xlink:href="Pictures/1000000000000117000001094A5B6D2C.png" xlink:type="simple" xlink:show="embed" xlink:actuate="onLoad"/></draw:frame><text:tab/>STATUS : BYTE (ESR kompatibler Status Ausgang)</text:p>
      <text:p text:style-name="P56"><text:line-break/>BLIND_CONTROL regelt die Jalousiestellung und den Lamellenwinkel gemäß den Vorgaben von PI und AI wenn UP und DN gleichzeitig TRUE sind (Automatik Modus). POS und ANG sind dabei die Aktualwerte der Jalousie, An diesen Ausgängen simuliert der Baustein den aktuellen Winkel und die Position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text:soft-page-break/>einer Differenz von 5 zwischen den Vorgabewerten und den tatsächlichen werten ausgeregelt. Wenn UP und DN nicht beide TRUE sind verlässt BLIND_CONTROL den Automatikmodus und die 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p>
      <text:p text:style-name="P175">Die folgende Grafik verdeutlicht die Geometrie der Jalousie:</text:p>
      <text:p text:style-name="P28"><draw:frame draw:style-name="fr4" draw:name="Grafik345" text:anchor-type="paragraph" svg:x="1.111cm" svg:y="0.222cm" svg:width="12.291cm" svg:height="7.091cm" draw:z-index="330"><draw:image xlink:href="Pictures/1000000000000306000001BFC1D5987B.png" xlink:type="simple" xlink:show="embed" xlink:actuate="onLoad"/></draw:frame></text:p>
      <text:p text:style-name="P57">Die folgende Tabelle stellt die Betriebszustände des Bausteins dar:</text:p>
      <table:table table:name="Tabelle46" table:style-name="Tabelle46">
        <table:table-column table:style-name="Tabelle46.A"/>
        <table:table-column table:style-name="Tabelle46.B"/>
        <table:table-column table:style-name="Tabelle46.C"/>
        <table:table-column table:style-name="Tabelle46.D"/>
        <table:table-column table:style-name="Tabelle46.A"/>
        <table:table-column table:style-name="Tabelle46.F"/>
        <table:table-column table:style-name="Tabelle46.G"/>
        <table:table-row>
          <table:table-cell table:style-name="Tabelle46.A1" office:value-type="string">
            <text:p text:style-name="P113">UP</text:p>
          </table:table-cell>
          <table:table-cell table:style-name="Tabelle46.A1" office:value-type="string">
            <text:p text:style-name="P113">DN</text:p>
          </table:table-cell>
          <table:table-cell table:style-name="Tabelle46.A1" office:value-type="string">
            <text:p text:style-name="P113">PI</text:p>
          </table:table-cell>
          <table:table-cell table:style-name="Tabelle46.A1" office:value-type="string">
            <text:p text:style-name="P113">AI</text:p>
          </table:table-cell>
          <table:table-cell table:style-name="Tabelle46.A1" office:value-type="string">
            <text:p text:style-name="P113">MU</text:p>
          </table:table-cell>
          <table:table-cell table:style-name="Tabelle46.A1" office:value-type="string">
            <text:p text:style-name="P113">MD</text:p>
          </table:table-cell>
          <table:table-cell table:style-name="Tabelle46.G1" office:value-type="string">
            <text:p text:style-name="P124"/>
          </table:table-cell>
        </table:table-row>
        <table:table-row>
          <table:table-cell table:style-name="Tabelle46.A2" office:value-type="string">
            <text:p text:style-name="P102">L</text:p>
          </table:table-cell>
          <table:table-cell table:style-name="Tabelle46.A2" office:value-type="string">
            <text:p text:style-name="P102">L</text:p>
          </table:table-cell>
          <table:table-cell table:style-name="Tabelle46.A2" office:value-type="string">
            <text:p text:style-name="P102">-</text:p>
          </table:table-cell>
          <table:table-cell table:style-name="Tabelle46.A2" office:value-type="string">
            <text:p text:style-name="P102">-</text:p>
          </table:table-cell>
          <table:table-cell table:style-name="Tabelle46.A2" office:value-type="string">
            <text:p text:style-name="P102">L</text:p>
          </table:table-cell>
          <table:table-cell table:style-name="Tabelle46.A2" office:value-type="string">
            <text:p text:style-name="P102">L</text:p>
          </table:table-cell>
          <table:table-cell table:style-name="Tabelle46.G2" office:value-type="string">
            <text:p text:style-name="P103">keine Aktion</text:p>
          </table:table-cell>
        </table:table-row>
        <table:table-row>
          <table:table-cell table:style-name="Tabelle46.A2" office:value-type="string">
            <text:p text:style-name="P102">H</text:p>
          </table:table-cell>
          <table:table-cell table:style-name="Tabelle46.A2" office:value-type="string">
            <text:p text:style-name="P102">L</text:p>
          </table:table-cell>
          <table:table-cell table:style-name="Tabelle46.A2" office:value-type="string">
            <text:p text:style-name="P102">-</text:p>
          </table:table-cell>
          <table:table-cell table:style-name="Tabelle46.A2" office:value-type="string">
            <text:p text:style-name="P102">-</text:p>
          </table:table-cell>
          <table:table-cell table:style-name="Tabelle46.A2" office:value-type="string">
            <text:p text:style-name="P102">H</text:p>
          </table:table-cell>
          <table:table-cell table:style-name="Tabelle46.A2" office:value-type="string">
            <text:p text:style-name="P102">L</text:p>
          </table:table-cell>
          <table:table-cell table:style-name="Tabelle46.G2" office:value-type="string">
            <text:p text:style-name="P103">Jalousie fährt aufwärts</text:p>
          </table:table-cell>
        </table:table-row>
        <table:table-row>
          <table:table-cell table:style-name="Tabelle46.A2" office:value-type="string">
            <text:p text:style-name="P102">L</text:p>
          </table:table-cell>
          <table:table-cell table:style-name="Tabelle46.A2" office:value-type="string">
            <text:p text:style-name="P102">H</text:p>
          </table:table-cell>
          <table:table-cell table:style-name="Tabelle46.A2" office:value-type="string">
            <text:p text:style-name="P102">-</text:p>
          </table:table-cell>
          <table:table-cell table:style-name="Tabelle46.A2" office:value-type="string">
            <text:p text:style-name="P102">-</text:p>
          </table:table-cell>
          <table:table-cell table:style-name="Tabelle46.A2" office:value-type="string">
            <text:p text:style-name="P102">L</text:p>
          </table:table-cell>
          <table:table-cell table:style-name="Tabelle46.A2" office:value-type="string">
            <text:p text:style-name="P102">H</text:p>
          </table:table-cell>
          <table:table-cell table:style-name="Tabelle46.G2" office:value-type="string">
            <text:p text:style-name="P103">Jalousie fährt abwärts</text:p>
          </table:table-cell>
        </table:table-row>
        <table:table-row>
          <table:table-cell table:style-name="Tabelle46.A2" office:value-type="string">
            <text:p text:style-name="P102">H</text:p>
          </table:table-cell>
          <table:table-cell table:style-name="Tabelle46.A2" office:value-type="string">
            <text:p text:style-name="P102">H</text:p>
          </table:table-cell>
          <table:table-cell table:style-name="Tabelle46.A2" office:value-type="string">
            <text:p text:style-name="P102">P</text:p>
          </table:table-cell>
          <table:table-cell table:style-name="Tabelle46.A2" office:value-type="string">
            <text:p text:style-name="P102">A</text:p>
          </table:table-cell>
          <table:table-cell table:style-name="Tabelle46.A2" office:value-type="string">
            <text:p text:style-name="P102">X</text:p>
          </table:table-cell>
          <table:table-cell table:style-name="Tabelle46.A2" office:value-type="string">
            <text:p text:style-name="P102">X</text:p>
          </table:table-cell>
          <table:table-cell table:style-name="Tabelle46.G2" office:value-type="string">
            <text:p text:style-name="P103">Position P und Winkel A werden Automatisch angefahren </text:p>
          </table:table-cell>
        </table:table-row>
      </table:table>
      <text:p text:style-name="P57"/>
      <text:p text:style-name="P57"><text:lin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ext:soft-page-break/>
        <table:table-row>
          <table:table-cell table:style-name="Tabelle16.A1" office:value-type="string">
            <text:p text:style-name="P114">STATUS</text:p>
          </table:table-cell>
          <table:table-cell table:style-name="Tabelle16.B1" office:value-type="string">
            <text:p text:style-name="P114">Bedeutung</text:p>
          </table:table-cell>
        </table:table-row>
        <table:table-row>
          <table:table-cell table:style-name="Tabelle16.A2" office:value-type="float" office:value="0">
            <text:p text:style-name="P107">0</text:p>
          </table:table-cell>
          <table:table-cell table:style-name="Tabelle16.B2" office:value-type="string">
            <text:p text:style-name="P107">keine Meldung</text:p>
          </table:table-cell>
        </table:table-row>
        <table:table-row>
          <table:table-cell table:style-name="Tabelle16.A3" office:value-type="string">
            <text:p text:style-name="P107">101</text:p>
          </table:table-cell>
          <table:table-cell table:style-name="Tabelle16.B2" office:value-type="string">
            <text:p text:style-name="P107">Manual Auf</text:p>
          </table:table-cell>
        </table:table-row>
        <table:table-row>
          <table:table-cell table:style-name="Tabelle16.A3" office:value-type="string">
            <text:p text:style-name="P107">102</text:p>
          </table:table-cell>
          <table:table-cell table:style-name="Tabelle16.B2" office:value-type="string">
            <text:p text:style-name="P107">Manual Ab</text:p>
          </table:table-cell>
        </table:table-row>
        <table:table-row>
          <table:table-cell table:style-name="Tabelle16.A3" office:value-type="string">
            <text:p text:style-name="P107">121</text:p>
          </table:table-cell>
          <table:table-cell table:style-name="Tabelle16.B2" office:value-type="string">
            <text:p text:style-name="P107">Position Auf</text:p>
          </table:table-cell>
        </table:table-row>
        <table:table-row>
          <table:table-cell table:style-name="Tabelle16.A3" office:value-type="string">
            <text:p text:style-name="P107">122</text:p>
          </table:table-cell>
          <table:table-cell table:style-name="Tabelle16.B2" office:value-type="string">
            <text:p text:style-name="P107">Position Ab</text:p>
          </table:table-cell>
        </table:table-row>
        <table:table-row>
          <table:table-cell table:style-name="Tabelle16.A3" office:value-type="string">
            <text:p text:style-name="P107">123</text:p>
          </table:table-cell>
          <table:table-cell table:style-name="Tabelle16.B2" office:value-type="string">
            <text:p text:style-name="P107">Lamellenstellung Horizontal</text:p>
          </table:table-cell>
        </table:table-row>
        <table:table-row>
          <table:table-cell table:style-name="Tabelle16.A3" office:value-type="string">
            <text:p text:style-name="P107">124</text:p>
          </table:table-cell>
          <table:table-cell table:style-name="Tabelle16.B2" office:value-type="string">
            <text:p text:style-name="P107">Lamellenstellung Vertikal</text:p>
          </table:table-cell>
        </table:table-row>
        <table:table-row>
          <table:table-cell table:style-name="Tabelle16.A3" office:value-type="string">
            <text:p text:style-name="P107">NNN</text:p>
          </table:table-cell>
          <table:table-cell table:style-name="Tabelle16.B2" office:value-type="string">
            <text:p text:style-name="P107">weitergereichte Meldungen</text:p>
          </table:table-cell>
        </table:table-row>
      </table:table>
      <text:p text:style-name="P56"/>
      <text:list xml:id="list33634040" text:continue-numbering="true" text:style-name="L1">
        <text:list-item>
          <text:list>
            <text:list-item>
              <text:h text:style-name="P217" text:outline-level="2"><text:alphabetical-index-mark-start text:id="IMark100801540"/>BLIND_INPUT<text:alphabetical-index-mark-end text:id="IMark100801540"/></text:h>
            </text:list-item>
          </text:list>
        </text:list-item>
      </text:list>
      <text:p text:style-name="P27">Type<text:tab/>Funktionsbaustein</text:p>
      <text:p text:style-name="P56"><text:span text:style-name="T16">Input</text:span><text:tab/>S1 : BOOL (Eingang AUF)</text:p>
      <text:p text:style-name="P56"><text:tab/>S2 : BOOL (Eingang AB)</text:p>
      <text:p text:style-name="P56"><text:tab/>SINGLE : BOOL (Konfiguriert Ein Taster Betrieb)</text:p>
      <text:p text:style-name="P56"><text:tab/>POS : BYTE (Rückführung der Jalousiestellung)</text:p>
      <text:p text:style-name="P56"><text:tab/>ANG : BYTE (Rückführung des Lamellenwinkels)</text:p>
      <text:p text:style-name="P56"><text:tab/>IN : BOOL (Stellt die Jalousie auf die durch AI und PI definierte Position)</text:p>
      <text:p text:style-name="P56"><text:tab/>PI : BYTE (Position wenn IN = TRUE)</text:p>
      <text:p text:style-name="P56"><text:tab/>AI : BYTE (Winkel <text:s/>wenn IN = TRUE)</text:p>
      <text:p text:style-name="P56">Config<text:tab/>SINGLE_SWITCH : BOOL (Konfigurations Bit für Einzeltasterbetrieb)</text:p>
      <text:p text:style-name="P56"><text:tab/>CLICK_MODE : BOOL (<text:span text:style-name="T24">Konfigurations</text:span> Bit für <text:span text:style-name="T16">Click</text:span> Taster Betrieb)</text:p>
      <text:p text:style-name="P56"><text:tab/>CLICK_TIME : TIME (<text:span text:style-name="T16">Timeout</text:span> für <text:span text:style-name="T16">Click</text:span> Modus)</text:p>
      <text:p text:style-name="P56"><text:tab/>MAX_RUNTIME : TIME (<text:span text:style-name="T16">Timeout</text:span> für eine Bewegung ohne Abbruch)</text:p>
      <text:p text:style-name="P56"><text:tab/>MANUAL_TIMEOUT : TIME (<text:span text:style-name="T16">Timeout</text:span> des Handbetriebs)</text:p>
      <text:p text:style-name="P56"><text:tab/>DEBOUNCE_TIME : TIME (Entprellzeit für die Eingänge S1 und S2)</text:p>
      <text:p text:style-name="P56"><text:tab/>DBL_CLK1 : BOOL (Ein Doppelklick an S1 forciert CLK1POS und ANG)</text:p>
      <text:p text:style-name="P56"><text:tab/>DBL_CLK1_POS : BYTE (Position nach Doppelklick auf S1)</text:p>
      <text:p text:style-name="P56"><text:tab/>DBL_CLK1_ANG : BYTE (Winkelstellung nach Doppelklick auf S1)</text:p>
      <text:p text:style-name="P56"><text:soft-page-break/><text:tab/>DBL_CLK2 : BOOL (Ein Doppelklick an S2 forciert CLK2POS und ANG)</text:p>
      <text:p text:style-name="P56"><text:tab/>DBL_CLK2_POS : BYTE (Position nach Doppelklick auf S2)</text:p>
      <text:p text:style-name="P56"><text:tab/>DBL_CLK2_ANG : BYTE (Winkelstellung nach Doppelklick auf S2)</text:p>
      <text:p text:style-name="P56">Output<text:tab/>QU : BOOL (Motor Auf Signal)</text:p>
      <text:p text:style-name="P56"><text:tab/>QD : BOOL (Motor Ab Signal)</text:p>
      <text:p text:style-name="P56"><text:tab/>STATUS : BYTE (ESR kompatibler Status Ausgang)</text:p>
      <text:p text:style-name="P56"><text:tab/>PO : BYTE (Ausgang Position)</text:p>
      <text:p text:style-name="P56"><text:tab/>AO : BYTE (Ausgang Winkelstellung)</text:p>
      <text:p text:style-name="P56"><text:tab/>D1 : BOOL (Kommandoausgang für Doppelklick Funktion 1)</text:p>
      <text:p text:style-name="P56"><draw:frame draw:style-name="fr4" draw:name="Grafik333" text:anchor-type="paragraph" svg:x="1.245cm" svg:y="0.736cm" svg:width="3.29cm" svg:height="3.5cm" draw:z-index="698"><draw:image xlink:href="Pictures/10000000000000F90000010956F1FAA3.png" xlink:type="simple" xlink:show="embed" xlink:actuate="onLoad"/></draw:frame><text:tab/>D2 : BOOL (Kommandoausgang für Doppelklick Funktion 2)</text:p>
      <text:p text:style-name="P56"><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gesetzt und die Eingänge PI und AI auf die Ausgänge PO und AO geschaltet. Die Eingänge POS und <text:s/>ANG sind die Rückführungseingänge für die aktuelle Position der Jalousie. Diese Werte werden von dem Modul BLIND_CONTROL bereitgestellt. Mit der Config Variable CLICK_MODE wird ein Tast Betrieb festgelegt, ein kurzer Tastendruck startet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oder eine Endstellung erreicht wird. Der Vorgabewert für CLICK_TIME ist 200 Millisekunden und die Vorgabe für CLICK_MODE ist TRUE. Wenn beide Config Va<text:soft-page-break/>riable CLICK_MODE und SINGLE_SWITCH gleichzeitug TRUE sind wird ein Tastbetrieb mit nur einem Taster an S1 ermöglicht. Mit der über MAX_RUNTIME eingestellten Zeit wird die Laufzeit begrenzt die durch einen einfachen <text:span text:style-name="T16">Click</text:span> gestartet wird aber nicht mit einem weiteren <text:span text:style-name="T16">Click</text:span> beendet wird. Der MAX_<text:span text:style-name="T16">RUNTIME</text:span> ist mit T#60s vorbelegt und sollte solange sein das die Jalousie sicher aus jeder beliebigen Stellung die Endstellung erreichen kann. Zwei Ausgänge D1 und D2 können benutzt werden um einen Doppelklick auf S1 oder S2 auszuwerten, Ein Doppelklick schaltet den entsprechenden Ausgang ein und ein weitere Doppelklick wieder aus. Mithilfe der Setup Variablen DBL_CLK?, <text:s/>DBL_CLK?_POS und <text:s/>DBL_CLK?_ANG kann ein Doppelklick auch dazu benutzt werden um eine bestimmte vordefinierte Position anzufahren. Sobald die Variable DBL_CLK? auf TRUE gesetzt ist wird bei einem Doppelklick nicht mehr der entsprechende Ausgang D1 oder D2 gesetzt sondern Automatisch die vorprogrammierte Position angefahren. So kann ein Doppelklick je nach Programmierung benutzt werden um nachgeschaltete Module wie z.B. Beschattung Ein- oder Aus-zuschalten, oder aber eine Vordefinierte Position anzufahren. </text:p>
      <text:p text:style-name="P56">Die folgende Tabelle zeigt die Betriebszustände des Bausteins:</text:p>
      <table:table table:name="Tabelle47" table:style-name="Tabelle47">
        <table:table-column table:style-name="Tabelle47.A"/>
        <table:table-column table:style-name="Tabelle47.B"/>
        <table:table-column table:style-name="Tabelle47.C"/>
        <table:table-column table:style-name="Tabelle47.B" table:number-columns-repeated="2"/>
        <table:table-column table:style-name="Tabelle47.F"/>
        <table:table-column table:style-name="Tabelle47.A"/>
        <table:table-column table:style-name="Tabelle47.B"/>
        <table:table-column table:style-name="Tabelle47.C"/>
        <table:table-column table:style-name="Tabelle47.B"/>
        <table:table-column table:style-name="Tabelle47.K"/>
        <table:table-row>
          <table:table-cell table:style-name="Tabelle47.A1" office:value-type="string">
            <text:p text:style-name="P115">POS</text:p>
            <text:p text:style-name="P115">ANG</text:p>
          </table:table-cell>
          <table:table-cell table:style-name="Tabelle47.A1" office:value-type="string">
            <text:p text:style-name="P115">S1</text:p>
          </table:table-cell>
          <table:table-cell table:style-name="Tabelle47.A1" office:value-type="string">
            <text:p text:style-name="P115">S2</text:p>
          </table:table-cell>
          <table:table-cell table:style-name="Tabelle47.A1" office:value-type="string">
            <text:p text:style-name="P115">IN</text:p>
          </table:table-cell>
          <table:table-cell table:style-name="Tabelle47.A1" office:value-type="string">
            <text:p text:style-name="P115">PI</text:p>
            <text:p text:style-name="P115">AI</text:p>
          </table:table-cell>
          <table:table-cell table:style-name="Tabelle47.A1" office:value-type="string">
            <text:p text:style-name="P115">QU</text:p>
          </table:table-cell>
          <table:table-cell table:style-name="Tabelle47.A1" office:value-type="string">
            <text:p text:style-name="P115">QD</text:p>
          </table:table-cell>
          <table:table-cell table:style-name="Tabelle47.A1" office:value-type="string">
            <text:p text:style-name="P115">PO</text:p>
            <text:p text:style-name="P115">AO</text:p>
          </table:table-cell>
          <table:table-cell table:style-name="Tabelle47.A1" office:value-type="string">
            <text:p text:style-name="P115">D1</text:p>
          </table:table-cell>
          <table:table-cell table:style-name="Tabelle47.A1" office:value-type="string">
            <text:p text:style-name="P115">D2</text:p>
          </table:table-cell>
          <table:table-cell table:style-name="Tabelle47.K1" office:value-type="string">
            <text:p text:style-name="P145"/>
          </table:table-cell>
        </table:table-row>
        <table:table-row>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gesteuerter Betrieb, PI und AI werden angefahren</text:p>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1</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Automatikbetrieb</text:p>
          </table:table-cell>
        </table:table-row>
        <table:table-row>
          <table:table-cell table:style-name="Tabelle47.A2" office:value-type="string">
            <text:p text:style-name="P108">X</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Handbetrieb Auf</text:p>
          </table:table-cell>
        </table:table-row>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Handbetrieb Ab</text:p>
          </table:table-cell>
        </table:table-row>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K2" office:value-type="string">
            <text:p text:style-name="P108">Handbetrieb Standby bis Timeout abläuft</text:p>
          </table:table-cell>
        </table:table-row>
        <table:table-row>
          <table:table-cell table:style-name="Tabelle47.A2" office:value-type="string">
            <text:p text:style-name="P108">-</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 D1</text:p>
          </table:table-cell>
          <table:table-cell table:style-name="Tabelle47.A2" office:value-type="string">
            <text:p text:style-name="P108">L</text:p>
          </table:table-cell>
          <table:table-cell table:style-name="Tabelle47.K2" office:value-type="string">
            <text:p text:style-name="P108">Ausgang D1 wird invertiert</text:p>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D2</text:p>
          </table:table-cell>
          <table:table-cell table:style-name="Tabelle47.K2" office:value-type="string">
            <text:p text:style-name="P108">Ausgang D2 wird invertiert</text:p>
          </table:table-cell>
        </table:table-row>
        <table:table-row>
          <table:table-cell table:style-name="Tabelle47.K2" table:number-columns-spanned="11" office:value-type="string">
            <text:p text:style-name="P147">*1 <text:s text:c="2"/>bei Übergang in den Automatikbetrieb werden die Ausgänge PO und AO auf den letzten Stand von POS und ANG gesetzt</text:p>
            <text:p text:style-name="P148">*2 <text:s text:c="2"/>Doppelklick (wenn DBL_CLK? auf FALSE steht</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56"/>
      <text:p text:style-name="P56">Der Ausgang STATUS ist ESR kompatibel und gibt Statusmeldungen über Zustandsänderungen aus.</text:p>
      <table:table table:name="Tabelle17" table:style-name="Tabelle17">
        <table:table-column table:style-name="Tabelle17.A"/>
        <table:table-column table:style-name="Tabelle17.B"/>
        <table:table-row>
          <table:table-cell table:style-name="Tabelle17.A1" office:value-type="string">
            <text:p text:style-name="P112">STATUS</text:p>
          </table:table-cell>
          <table:table-cell table:style-name="Tabelle17.B1" office:value-type="string">
            <text:p text:style-name="P112">Bedeutung</text:p>
          </table:table-cell>
        </table:table-row>
        <table:table-row>
          <table:table-cell table:style-name="Tabelle17.A2" office:value-type="string">
            <text:p text:style-name="P106">0</text:p>
          </table:table-cell>
          <table:table-cell table:style-name="Tabelle17.B2" office:value-type="string">
            <text:p text:style-name="P106">keine Meldung</text:p>
          </table:table-cell>
        </table:table-row>
        <table:table-row>
          <table:table-cell table:style-name="Tabelle17.A2" office:value-type="string">
            <text:p text:style-name="P106">131</text:p>
          </table:table-cell>
          <table:table-cell table:style-name="Tabelle17.B2" office:value-type="string">
            <text:p text:style-name="P121">Forced Input Active</text:p>
          </table:table-cell>
        </table:table-row>
        <table:table-row>
          <table:table-cell table:style-name="Tabelle17.A2" office:value-type="string">
            <text:p text:style-name="P106">132</text:p>
          </table:table-cell>
          <table:table-cell table:style-name="Tabelle17.B2" office:value-type="string">
            <text:p text:style-name="P106">Manual Auf</text:p>
          </table:table-cell>
        </table:table-row>
        <table:table-row>
          <table:table-cell table:style-name="Tabelle17.A2" office:value-type="string">
            <text:p text:style-name="P106">133</text:p>
          </table:table-cell>
          <table:table-cell table:style-name="Tabelle17.B2" office:value-type="string">
            <text:p text:style-name="P106">Manual Ab</text:p>
          </table:table-cell>
        </table:table-row>
        <table:table-row>
          <table:table-cell table:style-name="Tabelle17.A2" office:value-type="string">
            <text:p text:style-name="P106">134</text:p>
          </table:table-cell>
          <table:table-cell table:style-name="Tabelle17.B2" office:value-type="string">
            <text:p text:style-name="P106">Auto Mode nach <text:span text:style-name="T16">Timeout</text:span></text:p>
          </table:table-cell>
        </table:table-row>
        <text:soft-page-break/>
        <table:table-row>
          <table:table-cell table:style-name="Tabelle17.A2" office:value-type="string">
            <text:p text:style-name="P106">135</text:p>
          </table:table-cell>
          <table:table-cell table:style-name="Tabelle17.B2" office:value-type="string">
            <text:p text:style-name="P106">Doppelklick an S1 schaltet D1 on</text:p>
          </table:table-cell>
        </table:table-row>
        <table:table-row>
          <table:table-cell table:style-name="Tabelle17.A2" office:value-type="string">
            <text:p text:style-name="P106">136</text:p>
          </table:table-cell>
          <table:table-cell table:style-name="Tabelle17.B2" office:value-type="string">
            <text:p text:style-name="P106">Doppelklick an S2 schaltet D2</text:p>
          </table:table-cell>
        </table:table-row>
      </table:table>
      <text:p text:style-name="P56"/>
      <text:p text:style-name="P56"><draw:frame draw:style-name="fr4" draw:name="Grafik334" text:anchor-type="paragraph" svg:x="1.178cm" svg:y="1.168cm" svg:width="15.311cm" svg:height="3.93cm" draw:z-index="699"><draw:image xlink:href="Pictures/10000000000004CF0000013CA2605BF5.png" xlink:type="simple" xlink:show="embed" xlink:actuate="onLoad"/></draw:frame>Das folgende Beispiel zeigt den Aufbau eines Jalousiecontrollers mit dem Baustein BLIND_INPUT und BLIND_CONTROL:</text:p>
      <text:p text:style-name="P56"/>
      <text:p text:style-name="P56">Die Verwendung weiterer BLIND Module ist optional und dient dazu den Funktionsumfang zu erweitern. BLIND_INPUT und BLIND_CONTROL ergeben bereits eine vollwertige Jalousiesteuerung.</text:p>
      <text:p text:style-name="P56"><draw:frame draw:style-name="fr4" draw:name="Grafik675" text:anchor-type="paragraph" svg:x="1.222cm" svg:y="2.147cm" svg:width="15.439cm" svg:height="4.521cm" draw:z-index="700"><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56"/>
      <text:p text:style-name="P56"/>
      <text:p text:style-name="P56"/>
      <text:p text:style-name="P56"/>
      <text:p text:style-name="P56"/>
      <text:list xml:id="list33656060" text:continue-numbering="true" text:style-name="L1">
        <text:list-item>
          <text:list>
            <text:list-item>
              <text:h text:style-name="P217" text:outline-level="2"><text:soft-page-break/><text:alphabetical-index-mark-start text:id="IMark100801540"/>BLIND_NIGHT<text:alphabetical-index-mark-end text:id="IMark100801540"/></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E_NIGHT : BOOL (Automatische Nachtschaltung ein)</text:p>
      <text:p text:style-name="P56"><text:tab/>E_DAY : BOOL (Automatische Tagschaltung ein)</text:p>
      <text:p text:style-name="P56"><text:tab/>DTIN : DT (Datum und Tageszeit in Weltzeit UTC)</text:p>
      <text:p text:style-name="P56"><text:tab/>SUNRISE : TOD (Zeit für Sonnenaufgang)</text:p>
      <text:p text:style-name="P56"><text:tab/>SUNSET : TOD (Zeit für Sonnenuntergang)</text:p>
      <text:p text:style-name="P56">Config<text:tab/>SUNRISE_OFFSET : TIME (Verzögerung bei Sonnenuntergang)</text:p>
      <text:p text:style-name="P56"><text:tab/>SUNSET_OFFSET : TIME (Verzögerung bei Sonnenaufgang)</text:p>
      <text:p text:style-name="P56"><text:tab/>NIGHT_POSITION : BYTE (Position für Nachtschaltung)</text:p>
      <text:p text:style-name="P56"><text:tab/>NIGHT_ANGLE : BYTE (Winkel für Nachtschaltung)</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56"><draw:frame draw:style-name="fr4" draw:name="Grafik335" text:anchor-type="paragraph" svg:x="1.111cm" svg:y="0.6cm" svg:width="3.69cm" svg:height="4.701cm" draw:z-index="319"><draw:image xlink:href="Pictures/100000000000011700000163A7B78A37.png" xlink:type="simple" xlink:show="embed" xlink:actuate="onLoad"/></draw:frame><text:tab/>AO : BYTE (Ausgangswert des Lamellenwinkels im Automatikbetrieb)</text:p>
      <text:p text:style-name="P56"><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5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29">STATUS</text:p>
          </table:table-cell>
          <table:table-cell table:style-name="Tabelle18.B1" office:value-type="string">
            <text:p text:style-name="P129">Bedeutung</text:p>
          </table:table-cell>
        </table:table-row>
        <table:table-row>
          <table:table-cell table:style-name="Tabelle18.A2" office:value-type="string">
            <text:p text:style-name="P129">0</text:p>
          </table:table-cell>
          <table:table-cell table:style-name="Tabelle18.B2" office:value-type="string">
            <text:p text:style-name="P129">keine Meldung</text:p>
          </table:table-cell>
        </table:table-row>
        <table:table-row>
          <table:table-cell table:style-name="Tabelle18.A2" office:value-type="string">
            <text:p text:style-name="P129">141</text:p>
          </table:table-cell>
          <table:table-cell table:style-name="Tabelle18.B2" office:value-type="string">
            <text:p text:style-name="P129">Nachtbetrieb</text:p>
          </table:table-cell>
        </table:table-row>
        <table:table-row>
          <table:table-cell table:style-name="Tabelle18.A2" office:value-type="string">
            <text:p text:style-name="P129">NNN</text:p>
          </table:table-cell>
          <table:table-cell table:style-name="Tabelle18.B2" office:value-type="string">
            <text:p text:style-name="P129">weitergereichte Meldungen</text:p>
          </table:table-cell>
        </table:table-row>
      </table:table>
      <text:p text:style-name="P56"/>
      <text:p text:style-name="P56"><draw:frame draw:style-name="fr4" draw:name="Grafik331" text:anchor-type="paragraph" svg:x="1.023cm" svg:y="1.101cm" svg:width="15.998cm" svg:height="5.754cm" draw:z-index="320"><draw:image xlink:href="Pictures/100000000000031B0000011E629C30B1.png" xlink:type="simple" xlink:show="embed" xlink:actuate="onLoad"/></draw:frame>Die folgende Grafik zeigt die Verschaltung von BLIND_NIGHT mit anderen Modulen zur Jalousiesteuerung:</text:p>
      <text:p text:style-name="P56"/>
      <text:list xml:id="list33639512" text:continue-numbering="true" text:style-name="L1">
        <text:list-item>
          <text:list>
            <text:list-item>
              <text:h text:style-name="P217" text:outline-level="2"><text:soft-page-break/><text:alphabetical-index-mark-start text:id="IMark100801540"/><text:span text:style-name="T11">BLIND_</text:span>SCENE<text:alphabetical-index-mark-end text:id="IMark100801540"/></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ENABLE : BOOL (Freigabeeingang für Szenen)</text:p>
      <text:p text:style-name="P56"><text:tab/>SWRITE : BOOL (Schreibeingang für Szenen)</text:p>
      <text:p text:style-name="P56"><text:tab/>SCENE : BYTE (Nummer der Szene)</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27"><draw:frame draw:style-name="fr4" draw:name="Grafik361" text:anchor-type="paragraph" svg:x="1.134cm" svg:y="0.667cm" svg:width="3.47cm" svg:height="3.9cm" draw:z-index="359"><draw:image xlink:href="Pictures/100000000000010600000127326F07A3.png" xlink:type="simple" xlink:show="embed" xlink:actuate="onLoad"/></draw:frame><text:tab/>AO : BYTE (Ausgangswert des Lamellenwinkels im Automatikbetrieb)</text:p>
      <text:p text:style-name="P56"><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85">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94">UP</text:p>
          </table:table-cell>
          <table:table-cell table:style-name="Tabelle20.A1" office:value-type="string">
            <text:p text:style-name="P94">DN</text:p>
          </table:table-cell>
          <table:table-cell table:style-name="Tabelle20.A1" office:value-type="string">
            <text:p text:style-name="P94">ENABLE</text:p>
          </table:table-cell>
          <table:table-cell table:style-name="Tabelle20.A1" office:value-type="string">
            <text:p text:style-name="P94">SWRITE</text:p>
          </table:table-cell>
          <table:table-cell table:style-name="Tabelle20.A1" office:value-type="string">
            <text:p text:style-name="P94">SCENE</text:p>
          </table:table-cell>
          <table:table-cell table:style-name="Tabelle20.A1" office:value-type="string">
            <text:p text:style-name="P94">QU</text:p>
          </table:table-cell>
          <table:table-cell table:style-name="Tabelle20.A1" office:value-type="string">
            <text:p text:style-name="P94">QD</text:p>
          </table:table-cell>
          <table:table-cell table:style-name="Tabelle20.A1" office:value-type="string">
            <text:p text:style-name="P94">PO</text:p>
          </table:table-cell>
          <table:table-cell table:style-name="Tabelle20.A1" office:value-type="string">
            <text:p text:style-name="P94">AO</text:p>
          </table:table-cell>
          <table:table-cell table:style-name="Tabelle20.J1" office:value-type="string">
            <text:p text:style-name="P94"/>
          </table:table-cell>
        </table:table-row>
        <table:table-row>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0</text:p>
          </table:table-cell>
          <table:table-cell table:style-name="Tabelle20.A2" office:value-type="string">
            <text:p text:style-name="P94">0</text:p>
          </table:table-cell>
          <table:table-cell table:style-name="Tabelle20.A2" office:value-type="string">
            <text:p text:style-name="P94">-</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PI</text:p>
          </table:table-cell>
          <table:table-cell table:style-name="Tabelle20.A2" office:value-type="string">
            <text:p text:style-name="P94">AI</text:p>
          </table:table-cell>
          <table:table-cell table:style-name="Tabelle20.J2" office:value-type="string">
            <text:p text:style-name="P94">no scene</text:p>
          </table:table-cell>
        </table:table-row>
        <text:soft-page-break/>
        <table:table-row>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y</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J2" office:value-type="string">
            <text:p text:style-name="P94"><text:span text:style-name="T16">write</text:span> scene <text:span text:style-name="T16">number</text:span> y</text:p>
          </table:table-cell>
        </table:table-row>
        <table:table-row>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0</text:p>
          </table:table-cell>
          <table:table-cell table:style-name="Tabelle20.A2" office:value-type="string">
            <text:p text:style-name="P94">1</text:p>
          </table:table-cell>
          <table:table-cell table:style-name="Tabelle20.A2" office:value-type="string">
            <text:p text:style-name="P94">y</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J2" office:value-type="string">
            <text:p text:style-name="P94"><text:span text:style-name="T16">disable</text:span> scene <text:span text:style-name="T16">number</text:span> y</text:p>
          </table:table-cell>
        </table:table-row>
        <table:table-row>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0</text:p>
          </table:table-cell>
          <table:table-cell table:style-name="Tabelle20.A2" office:value-type="string">
            <text:p text:style-name="P94">y</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text:p>
          </table:table-cell>
          <table:table-cell table:style-name="Tabelle20.A2" office:value-type="string">
            <text:p text:style-name="P94">-</text:p>
          </table:table-cell>
          <table:table-cell table:style-name="Tabelle20.J2" office:value-type="string">
            <text:p text:style-name="P94"><text:span text:style-name="T16">recall</text:span> scene <text:span text:style-name="T16">number</text:span> y</text:p>
          </table:table-cell>
        </table:table-row>
      </table:table>
      <text:p text:style-name="P185"/>
      <text:p text:style-name="P57">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57"/>
      <table:table table:name="Tabelle19" table:style-name="Tabelle19">
        <table:table-column table:style-name="Tabelle19.A"/>
        <table:table-column table:style-name="Tabelle19.B"/>
        <table:table-row>
          <table:table-cell table:style-name="Tabelle19.A1" office:value-type="string">
            <text:p text:style-name="P95">STATUS</text:p>
          </table:table-cell>
          <table:table-cell table:style-name="Tabelle19.B1" office:value-type="string">
            <text:p text:style-name="P95">Bedeutung</text:p>
          </table:table-cell>
        </table:table-row>
        <table:table-row>
          <table:table-cell table:style-name="Tabelle19.A2" office:value-type="string">
            <text:p text:style-name="P95">160 .. 175</text:p>
          </table:table-cell>
          <table:table-cell table:style-name="Tabelle19.B2" office:value-type="string">
            <text:p text:style-name="P95">Szenen 0..15 aktiv</text:p>
          </table:table-cell>
        </table:table-row>
        <table:table-row>
          <table:table-cell table:style-name="Tabelle19.A2" office:value-type="string">
            <text:p text:style-name="P95">176</text:p>
          </table:table-cell>
          <table:table-cell table:style-name="Tabelle19.B2" office:value-type="string">
            <text:p text:style-name="P95">Szene geschrieben</text:p>
          </table:table-cell>
        </table:table-row>
        <table:table-row>
          <table:table-cell table:style-name="Tabelle19.A2" office:value-type="string">
            <text:p text:style-name="P95">NNN</text:p>
          </table:table-cell>
          <table:table-cell table:style-name="Tabelle19.B2" office:value-type="string">
            <text:p text:style-name="P95">weitergereichte Meldungen</text:p>
          </table:table-cell>
        </table:table-row>
      </table:table>
      <text:p text:style-name="P84"/>
      <text:p text:style-name="P57"><draw:frame draw:style-name="fr16" draw:name="Grafik362" text:anchor-type="paragraph" svg:x="1.002cm" svg:y="1.727cm" svg:width="14.96cm" svg:height="8.08cm" draw:z-index="360"><draw:image xlink:href="Pictures/1000000000000529000001972BD28FA2.png" xlink:type="simple" xlink:show="embed" xlink:actuate="onLoad"/></draw:frame>Die folgende Grafik zeigt die Anwendung von BLIND_SCENE mit anderen Modulen zur Ansteuerung einer Jalousie:</text:p>
      <text:p text:style-name="P57"/>
      <text:list xml:id="list33643346" text:continue-numbering="true" text:style-name="L1">
        <text:list-item>
          <text:list>
            <text:list-item>
              <text:h text:style-name="P217" text:outline-level="2"><text:soft-page-break/><text:alphabetical-index-mark-start text:id="IMark100801540"/>BLIND_SECURITY<text:alphabetical-index-mark-end text:id="IMark100801540"/></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FIRE : BOOL (Eingang für Brandalarm)</text:p>
      <text:p text:style-name="P56"><text:tab/>WIND : BOOL (Eingang für Windalarm)</text:p>
      <text:p text:style-name="P56"><text:tab/>ALARM : BOOL (Eingang für Einbruchsmeldung)</text:p>
      <text:p text:style-name="P56"><text:tab/>DOOR : BOOL (Eingang für Türkontakt)</text:p>
      <text:p text:style-name="P56"><text:tab/>RAIN : BOOL (Eingang für Regenmelder)</text:p>
      <text:p text:style-name="P56">Config<text:tab/>ALARM_UP : BOOL (Vorgaberichtung bei ALARM, <text:span text:style-name="T16">Default</text:span> = <text:span text:style-name="T16">Up</text:span>)</text:p>
      <text:p text:style-name="P56"><text:tab/>WIND_UP : BOOL (Vorgaberichtung bei Wind, <text:span text:style-name="T16">Default</text:span> = <text:span text:style-name="T16">Up</text:span>)</text:p>
      <text:p text:style-name="P56"><text:tab/>RAIN_UP : BOOL (Vorgaberichtung bei Regen, <text:span text:style-name="T16">Default</text:span> = <text:span text:style-name="T16">Down</text:span>)</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56"><draw:frame draw:style-name="fr4" draw:name="Grafik330" text:anchor-type="paragraph" svg:x="1.067cm" svg:y="0.6cm" svg:width="3.69cm" svg:height="4.701cm" draw:z-index="321"><draw:image xlink:href="Pictures/1000000000000117000001636CF94EFC.png" xlink:type="simple" xlink:show="embed" xlink:actuate="onLoad"/></draw:frame><text:tab/>AO : BYTE (Ausgangswert des Lamellenwinkels im Automatikbetrieb)</text:p>
      <text:p text:style-name="P56"><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text:soft-page-break/>gän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wird festgelegt welche Stellung bei Regen angefahren wird. Die Vorgabewerte sind UP<text:span text:style-name="T16"> </text:span>für Alarm, <text:span text:style-name="T16">UP</text:span> für Wind und <text:span text:style-name="T16">DN</text:span> für Regen. Die Config Variablen können durch einen Doppelklick auf das Symbol jederzeit verändert werden.</text:p>
      <text:p text:style-name="P5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29">STATUS</text:p>
          </table:table-cell>
          <table:table-cell table:style-name="Tabelle15.B1" office:value-type="string">
            <text:p text:style-name="P129">Bedeutung</text:p>
          </table:table-cell>
        </table:table-row>
        <table:table-row>
          <table:table-cell table:style-name="Tabelle15.A2" office:value-type="string">
            <text:p text:style-name="P129">0</text:p>
          </table:table-cell>
          <table:table-cell table:style-name="Tabelle15.B2" office:value-type="string">
            <text:p text:style-name="P129">keine Meldung</text:p>
          </table:table-cell>
        </table:table-row>
        <table:table-row>
          <table:table-cell table:style-name="Tabelle15.A2" office:value-type="string">
            <text:p text:style-name="P129">111</text:p>
          </table:table-cell>
          <table:table-cell table:style-name="Tabelle15.B2" office:value-type="string">
            <text:p text:style-name="P129">Feuer</text:p>
          </table:table-cell>
        </table:table-row>
        <table:table-row>
          <table:table-cell table:style-name="Tabelle15.A2" office:value-type="string">
            <text:p text:style-name="P129">112</text:p>
          </table:table-cell>
          <table:table-cell table:style-name="Tabelle15.B2" office:value-type="string">
            <text:p text:style-name="P129">Wind</text:p>
          </table:table-cell>
        </table:table-row>
        <table:table-row>
          <table:table-cell table:style-name="Tabelle15.A2" office:value-type="string">
            <text:p text:style-name="P129">113</text:p>
          </table:table-cell>
          <table:table-cell table:style-name="Tabelle15.B2" office:value-type="string">
            <text:p text:style-name="P129">Einbruch Alarm</text:p>
          </table:table-cell>
        </table:table-row>
        <table:table-row>
          <table:table-cell table:style-name="Tabelle15.A2" office:value-type="string">
            <text:p text:style-name="P129">114</text:p>
          </table:table-cell>
          <table:table-cell table:style-name="Tabelle15.B2" office:value-type="string">
            <text:p text:style-name="P129">Türalarm</text:p>
          </table:table-cell>
        </table:table-row>
        <table:table-row>
          <table:table-cell table:style-name="Tabelle15.A2" office:value-type="string">
            <text:p text:style-name="P129">115</text:p>
          </table:table-cell>
          <table:table-cell table:style-name="Tabelle15.B2" office:value-type="string">
            <text:p text:style-name="P129">Regen</text:p>
          </table:table-cell>
        </table:table-row>
        <table:table-row>
          <table:table-cell table:style-name="Tabelle15.A2" office:value-type="string">
            <text:p text:style-name="P129">NNN</text:p>
          </table:table-cell>
          <table:table-cell table:style-name="Tabelle15.B2" office:value-type="string">
            <text:p text:style-name="P129">weitergereichte Meldungen</text:p>
          </table:table-cell>
        </table:table-row>
      </table:table>
      <text:p text:style-name="P56"/>
      <text:p text:style-name="P56"><draw:frame draw:style-name="fr4" draw:name="Grafik336" text:anchor-type="paragraph" svg:x="1.002cm" svg:y="1.177cm" svg:width="15.998cm" svg:height="4.627cm" draw:z-index="322"><draw:image xlink:href="Pictures/10000000000003F50000012564860453.png" xlink:type="simple" xlink:show="embed" xlink:actuate="onLoad"/></draw:frame>Die folgende Grafik zeigt die Anwendung von BLIND_SECURITY mit BLIND_ACTUATOR zur Steuerung einer Jalousie:</text:p>
      <text:p text:style-name="P56">BLIND_SECURITY muss unbedingt direkt vor BLIND_CONTROL eingesetzt werden. <text:s/>Sollten andere Module zwischen BLIND_SECURITY und BLIND_CONTROL eingebaut werden so sind die Sicherheitsfunktionen nicht mehr gewährleistet.</text:p>
      <text:p text:style-name="P56"/>
      <text:list xml:id="list33641633" text:continue-numbering="true" text:style-name="L1">
        <text:list-item>
          <text:list>
            <text:list-item>
              <text:h text:style-name="P217" text:outline-level="2"><text:soft-page-break/><text:alphabetical-index-mark-start text:id="IMark100801540"/>BLIND_SHADE<text:alphabetical-index-mark-end text:id="IMark100801540"/></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DTIN : DT (Datum und Tageszeit in Weltzeit UTC)</text:p>
      <text:p text:style-name="P56"><text:tab/>SUNRISE : TOD (Zeit für Sonnenaufgang)</text:p>
      <text:p text:style-name="P56"><text:tab/>SUNSET : TOD (Zeit für Sonnenuntergang)</text:p>
      <text:p text:style-name="P56"><text:tab/>SUN_HOR : REAL (Horizontaler Sonnenwinkel, Süd = 180°)</text:p>
      <text:p text:style-name="P56"><text:tab/>SUN_VER : Vertikaler Sonnenwinkel, 0° = Horizont)</text:p>
      <text:p text:style-name="P56">Config<text:tab/>SUNRISE_OFFSET : TIME (Verzögerung bei Sonnenaufgang)</text:p>
      <text:p text:style-name="P56"><text:tab/>SUNSET_PRESET : TIME (Verzögerung bei Sonnenuntergang)</text:p>
      <text:p text:style-name="P56"><text:tab/>DIRECTION : REAL (Fassadenausrichtung, 180° = Südfassade)</text:p>
      <text:p text:style-name="P56"><text:tab/>ANGLE_OFFSET : REAL (Horizontaler Öffnungswinkel für Beschattung)</text:p>
      <text:p text:style-name="P56"><text:tab/>SLAT_WIDTH : REAL (Breite der Lamellen in mm)</text:p>
      <text:p text:style-name="P56"><text:tab/>SLAT_SPACING : REAL (Abstand der Lamellen in mm)</text:p>
      <text:p text:style-name="P56"><text:tab/>SHADE_DELAY : TIME (Verzögerungszeit der Beschattung)</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27"><draw:frame draw:style-name="fr4" draw:name="Grafik341" text:anchor-type="paragraph" svg:x="1.552cm" svg:y="0.661cm" svg:width="3.859cm" svg:height="5.489cm" draw:z-index="326"><draw:image xlink:href="Pictures/10000000000001240000019FD33D3814.png" xlink:type="simple" xlink:show="embed" xlink:actuate="onLoad"/></draw:frame><text:tab/>AO : BYTE (Ausgangswert des Lamellenwinkels im Automatikbetrieb)</text:p>
      <text:p text:style-name="P56"><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81"><draw:frame draw:style-name="fr4" draw:name="Grafik343" text:anchor-type="paragraph" svg:x="1.088cm" svg:y="0.67cm" svg:width="10.239cm" svg:height="5.911cm" draw:z-index="328"><draw:image xlink:href="Pictures/1000000000000306000001BFC1D5987B.png" xlink:type="simple" xlink:show="embed" xlink:actuate="onLoad"/></draw:frame>Die folgende Grafik beschreibt die Geometrie der Jalousie:</text:p>
      <text:p text:style-name="P83"><text:soft-page-break/></text:p>
      <text:p text:style-name="P186"><draw:frame draw:style-name="fr4" draw:name="Grafik344" text:anchor-type="paragraph" svg:x="1.048cm" svg:y="1.166cm" svg:width="14.6cm" svg:height="6.189cm" draw:z-index="329"><draw:image xlink:href="Pictures/1000000000000398000001862BC50B59.png" xlink:type="simple" xlink:show="embed" xlink:actuate="onLoad"/></draw:frame>Die folgende Grafik zeigt eine nach Süd-Ost gerichtete Fassade mit DIRECTION = 135°und ANGLE_OFFSET = 65°:</text:p>
      <text:p text:style-name="P85"/>
      <text:p text:style-name="P56">Die Beschattungsfunktion berechnet den Lamellenwinkel so dass die Lamellen immer nur soweit geschlossen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87"><draw:frame draw:style-name="fr4" draw:name="Grafik346" text:anchor-type="paragraph" svg:x="3.448cm" svg:y="0.676cm" svg:width="8.819cm" svg:height="5.091cm" draw:z-index="331"><draw:image xlink:href="Pictures/100000000000029B000001815997981A.png" xlink:type="simple" xlink:show="embed" xlink:actuate="onLoad"/></draw:frame><text:soft-page-break/>In der Folgenden Grafik wird die Abschattung verdeutlicht:</text:p>
      <text:p text:style-name="P86"/>
      <text:p text:style-name="P27">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56"><draw:frame draw:style-name="fr4" draw:name="Grafik342" text:anchor-type="paragraph" svg:x="1cm" svg:y="1.152cm" svg:width="15.998cm" svg:height="4.607cm" draw:z-index="327"><draw:image xlink:href="Pictures/10000000000004E500000169A274FFC0.png" xlink:type="simple" xlink:show="embed" xlink:actuate="onLoad"/></draw:frame>Das folgende Beispiel zeigt die Anwendung von BLIND_SHADE innerhalb einer Jalousiesteuerung:</text:p>
      <text:p text:style-name="P83"/>
      <text:list xml:id="list33656500" text:continue-numbering="true" text:style-name="L1">
        <text:list-item>
          <text:h text:style-name="P211" text:outline-level="1">Automation</text:h>
        </text:list-item>
      </text:list>
      <text:p text:style-name="P20"/>
      <text:list xml:id="list33645939" text:continue-numbering="true" text:style-name="L1">
        <text:list-item>
          <text:list>
            <text:list-item>
              <text:h text:style-name="P222" text:outline-level="2"><text:alphabetical-index-mark-start text:id="IMark100801540"/>DRIVER_1<text:alphabetical-index-mark-end text:id="IMark100801540"/></text:h>
            </text:list-item>
          </text:list>
        </text:list-item>
      </text:list>
      <text:p text:style-name="P37">Type<text:tab/>Funktionsbaustein</text:p>
      <text:p text:style-name="P52"><text:span text:style-name="T16">Input</text:span><text:tab/>SET : BOOL (asynchroner Set Eingang)</text:p>
      <text:p text:style-name="P52"><text:tab/>IN : BOOL (Schalteingang)</text:p>
      <text:p text:style-name="P52"><text:tab/>RST : BOOL (asynchroner Reset Eingang)</text:p>
      <text:p text:style-name="P52">Config<text:tab/>TOGGLE_MODE : BOOL (Mode des Eingangs IN)</text:p>
      <text:p text:style-name="P52"><text:tab/>TIMEOUT : TIME (Maximale Einschaltdauer der Ausgänge)</text:p>
      <text:p text:style-name="P22"><draw:frame draw:style-name="fr4" draw:name="Grafik427" text:anchor-type="paragraph" svg:x="1.046cm" svg:y="0.658cm" svg:width="2.499cm" svg:height="1.921cm" draw:z-index="430"><draw:image xlink:href="Pictures/10000000000000BD000000919C43992A.png" xlink:type="simple" xlink:show="embed" xlink:actuate="onLoad"/></draw:frame>Output<text:tab/>Q0 : BOOL (Schaltausgang)</text:p>
      <text:p text:style-name="P52"><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6">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6">Default</text:span>) dann ist kein <text:span text:style-name="T16">Timeout</text:span> aktiv. Die asynchronen SET und RST Eingänge setzten den Ausgang Q auf TRUE oder FALSE. Der Baustein DRIVER_4 stellt bei gleicher Funktionalität 4 Schaltausgänge zur Verfügung.</text:p>
      <text:list xml:id="list33631861" text:continue-numbering="true" text:style-name="L1">
        <text:list-item>
          <text:list>
            <text:list-item>
              <text:h text:style-name="P222" text:outline-level="2"><text:soft-page-break/><text:alphabetical-index-mark-start text:id="IMark100801540"/>DRIVER_4<text:alphabetical-index-mark-end text:id="IMark100801540"/></text:h>
            </text:list-item>
          </text:list>
        </text:list-item>
      </text:list>
      <text:p text:style-name="P22">Type<text:tab/>Funktionsbaustein</text:p>
      <text:p text:style-name="P52"><text:span text:style-name="T16">Input</text:span><text:tab/>SET : BOOL (asynchroner Set Eingang)</text:p>
      <text:p text:style-name="P52"><text:tab/>IN0..IN3 : BOOL (Schalteingänge)</text:p>
      <text:p text:style-name="P52"><text:tab/>RST : BOOL (asynchroner Reset Eingang)</text:p>
      <text:p text:style-name="P52">Config<text:tab/>TOGGLE_MODE : BOOL (Mode des Eingangs IN)</text:p>
      <text:p text:style-name="P52"><text:tab/>TIMEOUT : TIME (Maximale Ontime der Ausgänge)</text:p>
      <text:p text:style-name="P52"><draw:frame draw:style-name="fr4" draw:name="Grafik428" text:anchor-type="paragraph" svg:x="1.09cm" svg:y="0.667cm" svg:width="2.499cm" svg:height="3.11cm" draw:z-index="431"><draw:image xlink:href="Pictures/10000000000000BD000000EBBA635685.png" xlink:type="simple" xlink:show="embed" xlink:actuate="onLoad"/></draw:frame>Output<text:tab/>Q0 .. Q3 : BOOL (Schaltausgänge)</text:p>
      <text:p text:style-name="P22"><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xml:id="list33626091" text:continue-numbering="true" text:style-name="L1">
        <text:list-item>
          <text:list>
            <text:list-item>
              <text:h text:style-name="P222" text:outline-level="2"><text:alphabetical-index-mark-start text:id="IMark100801540"/>FLOW_CONTROL<text:alphabetical-index-mark-end text:id="IMark100801540"/></text:h>
            </text:list-item>
          </text:list>
        </text:list-item>
      </text:list>
      <text:p text:style-name="P52">Type<text:tab/>Funktionsbaustein</text:p>
      <text:p text:style-name="P52"><text:span text:style-name="T16">Input</text:span><text:tab/>IN : BOOL (Steuereingang)</text:p>
      <text:p text:style-name="P52"><text:tab/>REQ : BOOL (<text:span text:style-name="T16">Request</text:span> für Automatikmodus)</text:p>
      <text:p text:style-name="P52"><text:tab/>ENQ : BOOL (<text:span text:style-name="T16">Enable</text:span> für Ausgang Q)</text:p>
      <text:p text:style-name="P52"><text:tab/>RST : BOOL (asynchroner Reset Eingang)</text:p>
      <text:p text:style-name="P52"><text:span text:style-name="T16">Config</text:span><text:tab/>T_AUTO : TIME (Ventil Einschaltzeit im Automatikmodus)</text:p>
      <text:p text:style-name="P52"><text:tab/>T_DELAY : TIME(Ventil <text:span text:style-name="T16">Disable</text:span> Zeit im Automatikmodus)</text:p>
      <text:p text:style-name="P52">Output<text:tab/>Q : BOOL (Schaltausgang für Ventil)</text:p>
      <text:p text:style-name="P52"><draw:frame draw:style-name="fr4" draw:name="Grafik658" text:anchor-type="paragraph" svg:x="0.956cm" svg:y="0.677cm" svg:width="3.29cm" svg:height="2.29cm" draw:z-index="678"><draw:image xlink:href="Pictures/10000000000000F9000000ADFCF0C3F2.png" xlink:type="simple" xlink:show="embed" xlink:actuate="onLoad"/></draw:frame><text:tab/>STATUS : BYTE (ESR kompatibler Statusausgang)</text:p>
      <text:p text:style-name="P52"><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52">Status = 100<text:tab/>Betriebsbereit</text:p>
      <text:p text:style-name="P52">Status = 101<text:tab/>Ventil ein durch TRUE an IN</text:p>
      <text:p text:style-name="P52">Status = 102<text:tab/>Ventil ein durch TRUE an REQ</text:p>
      <text:p text:style-name="P52">Status = 103<text:tab/>Reset wurde ausgeführt</text:p>
      <text:p text:style-name="P52"/>
      <text:p text:style-name="P52"><draw:frame draw:style-name="fr4" draw:name="Grafik659" text:anchor-type="paragraph" svg:x="1.069cm" svg:y="0.693cm" svg:width="15.998cm" svg:height="5.138cm" draw:z-index="679"><draw:image xlink:href="Pictures/10000000000003390000010992A9D9B7.png" xlink:type="simple" xlink:show="embed" xlink:actuate="onLoad"/></draw:frame>Das folgernde Schema verdeutlicht den Aufbau von FLOW_CONTROL:</text:p>
      <text:p text:style-name="P52"/>
      <text:p text:style-name="P52"/>
      <text:p text:style-name="P52"/>
      <text:p text:style-name="P52"/>
      <text:p text:style-name="P52"/>
      <text:list xml:id="list33638807" text:continue-numbering="true" text:style-name="L1">
        <text:list-item>
          <text:list>
            <text:list-item>
              <text:h text:style-name="P217" text:outline-level="2"><text:soft-page-break/><text:alphabetical-index-mark-start text:id="IMark100801540"/>FT_PROFILE<text:alphabetical-index-mark-end text:id="IMark100801540"/></text:h>
            </text:list-item>
          </text:list>
        </text:list-item>
      </text:list>
      <text:p text:style-name="Standard">Type<text:tab/><text:span text:style-name="T38">Funktionsbaustein</text:span></text:p>
      <text:p text:style-name="P25"><text:span text:style-name="T16">Input</text:span><text:tab/>K : REAL (Multiplikator)</text:p>
      <text:p text:style-name="P25"><text:tab/>O : REAL (Offset)</text:p>
      <text:p text:style-name="P25"><text:tab/>M : REAL (Zeitmultiplikator)</text:p>
      <text:p text:style-name="P25"><text:tab/>E : BOOL (Startsignal)</text:p>
      <text:p text:style-name="P25">Output<text:tab/>Y : REAL (Signalausgang)</text:p>
      <text:p text:style-name="P25"><text:tab/>RUN : BOOL (TRUE, wenn Ausgangssignal erzeugt wird)</text:p>
      <text:p text:style-name="P25"><text:tab/>ET : TIME (Zeit seit Start des Ausgangsprofils)</text:p>
      <text:p text:style-name="P25">Config<text:tab/>VALUE_0 : REAL (Ausgangswert des Ausgangs zum Startzeitpunkt)</text:p>
      <text:p text:style-name="P25"><text:tab/>TIME_1 : TIME (Zeitpunkt wenn die Rampe VALUE_1 erreicht)</text:p>
      <text:p text:style-name="P25"><text:tab/>VALUE_1 : REAL (Wert den die Rampe zum Zeitpunkt TIME_1 erreicht)</text:p>
      <text:p text:style-name="P25"><text:tab/>TIME_2 : TIME (Zeitpunkt wenn die Rampe VALUE_2 erreicht)</text:p>
      <text:p text:style-name="P25"><text:tab/>VALUE_2 : REAL (Wert den die Rampe zum Zeitpunkt TIME_2 erreicht)</text:p>
      <text:p text:style-name="P25"><text:tab/>TIME_3 : TIME (Zeitpunkt wenn die Rampe VALUE_3 erreicht)</text:p>
      <text:p text:style-name="P25"><text:tab/>VALUE_3 : REAL (Wert den die Rampe zum Zeitpunkt TIME_3 erreicht)</text:p>
      <text:p text:style-name="P25"><text:tab/>TIME_10 : TIME (Zeitpunkt wenn die Rampe VALUE_10 erreicht)</text:p>
      <text:p text:style-name="P25"><text:tab/>VALUE_10 : REAL (Wert den die Rampe zum Zeitpunkt TIME_10</text:p>
      <text:p text:style-name="P25"><text:tab/>erreicht)</text:p>
      <text:p text:style-name="P25"><text:tab/>TIME_11 : TIME (Zeitpunkt wenn die Rampe VALUE_11 erreicht)</text:p>
      <text:p text:style-name="P25"><text:tab/>VALUE_11 : REAL (Wert den die Rampe zum Zeitpunkt TIME_11</text:p>
      <text:p text:style-name="P25"><text:tab/>erreicht)</text:p>
      <text:p text:style-name="P25"><text:tab/>TIME_12 : TIME (Zeitpunkt wenn die Rampe VALUE_12 erreicht)</text:p>
      <text:p text:style-name="P25"><text:tab/>VALUE_12 : REAL (Wert den die Rampe zum Zeitpunkt TIME_12</text:p>
      <text:p text:style-name="P25"><text:tab/>erreicht)</text:p>
      <text:p text:style-name="P25"><text:tab/>TIME_13 : TIME (Zeitpunkt wenn die Rampe VALUE_13 erreicht)</text:p>
      <text:p text:style-name="P25"><text:tab/>VALUE_13 : REAL (Wert den die Rampe zum Zeitpunkt TIME_13</text:p>
      <text:p text:style-name="P25"><text:tab/>erreicht)</text:p>
      <text:p text:style-name="P174"><draw:frame draw:style-name="fr4" draw:name="Grafik289" text:anchor-type="paragraph" svg:x="1.337cm" svg:y="0.194cm" svg:width="2.731cm" svg:height="2.649cm" draw:z-index="258"><draw:image xlink:href="Pictures/10000000000000CE000000C86AD0ED53.png" xlink:type="simple" xlink:show="embed" xlink:actuate="onLoad"/></draw:frame><text:soft-page-break/><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26"><text:tab/>Y = erzeugter Wert * K + O</text:p>
      <text:p text:style-name="P56">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56">Die folgenden Graphiken zeigen das Ausgangssignal für die Wertepaare:</text:p>
      <text:p text:style-name="P56"><text:tab/>VALUE_0 = 0</text:p>
      <text:p text:style-name="P56"><text:tab/>TIME_1, VALUE_1 = 1s, 50</text:p>
      <text:p text:style-name="P56"><text:tab/>TIME_2, VALUE_2 = 3s, 50</text:p>
      <text:p text:style-name="P56"><text:tab/>TIME_3, VALUE_3 = 4s, 100</text:p>
      <text:p text:style-name="P56"><text:tab/>TIME_10, VALUE_10 = 6s, 100</text:p>
      <text:p text:style-name="P56"><text:tab/>TIME_11, VALUE_11 = 7s, 50</text:p>
      <text:p text:style-name="P56"><text:tab/>TIME_12, VALUE_12 = 9s, 50</text:p>
      <text:p text:style-name="P56"><text:tab/>TIME_13, VALUE_13 = 10s, 0</text:p>
      <text:p text:style-name="P180"><text:line-break/>Die Schaubilder stellen das Ausgangssignal sowohl mit gestreckter Phase 3 durch E dar, als auch ohne Streckung.</text:p>
      <text:p text:style-name="P58"><draw:g text:anchor-type="paragraph" draw:z-index="259" draw:style-name="gr1"><draw:line draw:style-name="gr50" draw:text-style-name="P251" svg:x1="1.999cm" svg:y1="3.92cm" svg:x2="1.999cm" svg:y2="2.174cm"><text:p/></draw:line><draw:line draw:style-name="gr50" draw:text-style-name="P251" svg:x1="1.745cm" svg:y1="3.669cm" svg:x2="9.496cm" svg:y2="3.669cm"><text:p/></draw:line><draw:line draw:style-name="gr2" draw:text-style-name="P251" svg:x1="1.999cm" svg:y1="3.422cm" svg:x2="2.999cm" svg:y2="3.422cm"><text:p/></draw:line><draw:line draw:style-name="gr2" draw:text-style-name="P251" svg:x1="3.498cm" svg:y1="2.922cm" svg:x2="2.997cm" svg:y2="3.421cm"><text:p/></draw:line><draw:line draw:style-name="gr2" draw:text-style-name="P251" svg:x1="3.498cm" svg:y1="2.922cm" svg:x2="4.496cm" svg:y2="2.922cm"><text:p/></draw:line><draw:frame draw:style-name="gr6" draw:text-style-name="P253" svg:width="0.877cm" svg:height="0.65cm" svg:x="2.617cm" svg:y="3.569cm"><draw:text-box><text:p text:style-name="P252"><text:span text:style-name="T50">0</text:span></text:p></draw:text-box></draw:frame><draw:frame draw:style-name="gr6" draw:text-style-name="P253" svg:width="0.877cm" svg:height="0.65cm" svg:x="3.118cm" svg:y="3.569cm"><draw:text-box><text:p text:style-name="P252"><text:span text:style-name="T50">1</text:span></text:p></draw:text-box></draw:frame><draw:frame draw:style-name="gr6" draw:text-style-name="P253" svg:width="0.877cm" svg:height="0.65cm" svg:x="3.618cm" svg:y="3.569cm"><draw:text-box><text:p text:style-name="P252"><text:span text:style-name="T50">2</text:span></text:p></draw:text-box></draw:frame><draw:frame draw:style-name="gr6" draw:text-style-name="P253" svg:width="0.877cm" svg:height="0.65cm" svg:x="4.12cm" svg:y="3.569cm"><draw:text-box><text:p text:style-name="P252"><text:span text:style-name="T50">3</text:span></text:p></draw:text-box></draw:frame><draw:frame draw:style-name="gr6" draw:text-style-name="P253" svg:width="0.877cm" svg:height="0.65cm" svg:x="4.618cm" svg:y="3.569cm"><draw:text-box><text:p text:style-name="P252"><text:span text:style-name="T50">4</text:span></text:p></draw:text-box></draw:frame><draw:frame draw:style-name="gr6" draw:text-style-name="P253" svg:width="0.877cm" svg:height="0.65cm" svg:x="5.119cm" svg:y="3.569cm"><draw:text-box><text:p text:style-name="P252"><text:span text:style-name="T50">5</text:span></text:p></draw:text-box></draw:frame><draw:frame draw:style-name="gr6" draw:text-style-name="P253" svg:width="0.877cm" svg:height="0.65cm" svg:x="5.618cm" svg:y="3.569cm"><draw:text-box><text:p text:style-name="P252"><text:span text:style-name="T50">6</text:span></text:p></draw:text-box></draw:frame><draw:frame draw:style-name="gr6" draw:text-style-name="P253" svg:width="0.877cm" svg:height="0.65cm" svg:x="6.119cm" svg:y="3.569cm"><draw:text-box><text:p text:style-name="P252"><text:span text:style-name="T50">7</text:span></text:p></draw:text-box></draw:frame><draw:frame draw:style-name="gr6" draw:text-style-name="P253" svg:width="0.877cm" svg:height="0.65cm" svg:x="6.618cm" svg:y="3.569cm"><draw:text-box><text:p text:style-name="P252"><text:span text:style-name="T50">8</text:span></text:p></draw:text-box></draw:frame><draw:frame draw:style-name="gr6" draw:text-style-name="P253" svg:width="0.877cm" svg:height="0.65cm" svg:x="7.117cm" svg:y="3.569cm"><draw:text-box><text:p text:style-name="P252"><text:span text:style-name="T50">9</text:span></text:p></draw:text-box></draw:frame><draw:frame draw:style-name="gr6" draw:text-style-name="P253" svg:width="0.877cm" svg:height="0.65cm" svg:x="7.495cm" svg:y="3.569cm"><draw:text-box><text:p text:style-name="P252"><text:span text:style-name="T50">10</text:span></text:p></draw:text-box></draw:frame><draw:line draw:style-name="gr2" draw:text-style-name="P251" svg:x1="4.996cm" svg:y1="2.421cm" svg:x2="4.495cm" svg:y2="2.922cm"><text:p/></draw:line><draw:line draw:style-name="gr2" draw:text-style-name="P251" svg:x1="4.996cm" svg:y1="2.421cm" svg:x2="5.996cm" svg:y2="2.421cm"><text:p/></draw:line><draw:line draw:style-name="gr2" draw:text-style-name="P251" svg:x1="6.495cm" svg:y1="2.922cm" svg:x2="5.996cm" svg:y2="2.421cm"><text:p/></draw:line><draw:line draw:style-name="gr2" draw:text-style-name="P251" svg:x1="6.493cm" svg:y1="2.922cm" svg:x2="7.493cm" svg:y2="2.922cm"><text:p/></draw:line><draw:line draw:style-name="gr2" draw:text-style-name="P251" svg:x1="7.996cm" svg:y1="3.421cm" svg:x2="7.495cm" svg:y2="2.922cm"><text:p/></draw:line><draw:line draw:style-name="gr2" draw:text-style-name="P251" svg:x1="7.998cm" svg:y1="3.422cm" svg:x2="8.998cm" svg:y2="3.422cm"><text:p/></draw:line><draw:frame draw:style-name="gr6" draw:text-style-name="P253" svg:width="0.877cm" svg:height="0.65cm" svg:x="1.496cm" svg:y="3.068cm"><draw:text-box><text:p text:style-name="P252"><text:span text:style-name="T50">0</text:span></text:p></draw:text-box></draw:frame><draw:frame draw:style-name="gr6" draw:text-style-name="P253" svg:width="1.251cm" svg:height="0.65cm" svg:x="1.164cm" svg:y="2.172cm"><draw:text-box><text:p text:style-name="P252"><text:span text:style-name="T50">100</text:span></text:p></draw:text-box></draw:frame><draw:frame draw:style-name="gr6" draw:text-style-name="P253" svg:width="0.877cm" svg:height="0.65cm" svg:x="1.333cm" svg:y="2.671cm"><draw:text-box><text:p text:style-name="P252"><text:span text:style-name="T50">50</text:span></text:p></draw:text-box></draw:frame><draw:line draw:style-name="gr51" draw:text-style-name="P251" svg:x1="1.999cm" svg:y1="1.92cm" svg:x2="2.999cm" svg:y2="1.92cm"><text:p/></draw:line><draw:line draw:style-name="gr51" draw:text-style-name="P251" svg:x1="2.997cm" svg:y1="1.42cm" svg:x2="2.997cm" svg:y2="1.921cm"><text:p/></draw:line><draw:line draw:style-name="gr51" draw:text-style-name="P251" svg:x1="2.997cm" svg:y1="1.42cm" svg:x2="3.747cm" svg:y2="1.42cm"><text:p/></draw:line><draw:line draw:style-name="gr51" draw:text-style-name="P251" svg:x1="3.745cm" svg:y1="1.921cm" svg:x2="3.745cm" svg:y2="1.42cm"><text:p/></draw:line><draw:line draw:style-name="gr51" draw:text-style-name="P251" svg:x1="3.745cm" svg:y1="1.92cm" svg:x2="8.996cm" svg:y2="1.92cm"><text:p/></draw:line><draw:line draw:style-name="gr3" draw:text-style-name="P251" svg:x1="1.999cm" svg:y1="0.919cm" svg:x2="2.999cm" svg:y2="0.919cm"><text:p/></draw:line><draw:line draw:style-name="gr3" draw:text-style-name="P251" svg:x1="2.997cm" svg:y1="0.419cm" svg:x2="2.997cm" svg:y2="0.92cm"><text:p/></draw:line><draw:line draw:style-name="gr3" draw:text-style-name="P251" svg:x1="2.997cm" svg:y1="0.419cm" svg:x2="7.998cm" svg:y2="0.419cm"><text:p/></draw:line><draw:line draw:style-name="gr3" draw:text-style-name="P251" svg:x1="7.998cm" svg:y1="0.92cm" svg:x2="7.998cm" svg:y2="0.419cm"><text:p/></draw:line><draw:line draw:style-name="gr3" draw:text-style-name="P251" svg:x1="7.998cm" svg:y1="0.919cm" svg:x2="8.998cm" svg:y2="0.919cm"><text:p/></draw:line><draw:frame draw:style-name="gr6" draw:text-style-name="P253" svg:width="1.251cm" svg:height="0.65cm" svg:x="1.245cm" svg:y="1.318cm"><draw:text-box><text:p text:style-name="P252"><text:span text:style-name="T50">E</text:span></text:p></draw:text-box></draw:frame><draw:frame draw:style-name="gr6" draw:text-style-name="P253" svg:width="1.251cm" svg:height="0.65cm" svg:x="1.245cm" svg:y="0.318cm"><draw:text-box><text:p text:style-name="P252"><text:span text:style-name="T50">RUN</text:span></text:p></draw:text-box></draw:frame></draw:g><text:soft-page-break/></text:p>
      <text:p text:style-name="P58"><draw:g text:anchor-type="paragraph" draw:z-index="260" draw:style-name="gr1"><draw:line draw:style-name="gr50" draw:text-style-name="P251" svg:x1="2.055cm" svg:y1="3.921cm" svg:x2="2.055cm" svg:y2="2.175cm"><text:p/></draw:line><draw:line draw:style-name="gr2" draw:text-style-name="P251" svg:x1="2.055cm" svg:y1="3.43cm" svg:x2="3.055cm" svg:y2="3.43cm"><text:p/></draw:line><draw:line draw:style-name="gr2" draw:text-style-name="P251" svg:x1="3.553cm" svg:y1="2.929cm" svg:x2="3.052cm" svg:y2="3.43cm"><text:p/></draw:line><draw:line draw:style-name="gr2" draw:text-style-name="P251" svg:x1="3.556cm" svg:y1="2.929cm" svg:x2="4.554cm" svg:y2="2.929cm"><text:p/></draw:line><draw:frame draw:style-name="gr6" draw:text-style-name="P253" svg:width="0.877cm" svg:height="0.65cm" svg:x="2.674cm" svg:y="3.575cm"><draw:text-box><text:p text:style-name="P252"><text:span text:style-name="T50">0</text:span></text:p></draw:text-box></draw:frame><draw:frame draw:style-name="gr6" draw:text-style-name="P253" svg:width="0.877cm" svg:height="0.65cm" svg:x="3.175cm" svg:y="3.575cm"><draw:text-box><text:p text:style-name="P252"><text:span text:style-name="T50">1</text:span></text:p></draw:text-box></draw:frame><draw:frame draw:style-name="gr6" draw:text-style-name="P253" svg:width="0.877cm" svg:height="0.65cm" svg:x="3.675cm" svg:y="3.575cm"><draw:text-box><text:p text:style-name="P252"><text:span text:style-name="T50">2</text:span></text:p></draw:text-box></draw:frame><draw:frame draw:style-name="gr6" draw:text-style-name="P253" svg:width="0.877cm" svg:height="0.65cm" svg:x="4.176cm" svg:y="3.575cm"><draw:text-box><text:p text:style-name="P252"><text:span text:style-name="T50">3</text:span></text:p></draw:text-box></draw:frame><draw:frame draw:style-name="gr6" draw:text-style-name="P253" svg:width="0.877cm" svg:height="0.65cm" svg:x="4.675cm" svg:y="3.575cm"><draw:text-box><text:p text:style-name="P252"><text:span text:style-name="T50">4</text:span></text:p></draw:text-box></draw:frame><draw:frame draw:style-name="gr6" draw:text-style-name="P253" svg:width="0.877cm" svg:height="0.65cm" svg:x="5.176cm" svg:y="3.575cm"><draw:text-box><text:p text:style-name="P252"><text:span text:style-name="T50">5</text:span></text:p></draw:text-box></draw:frame><draw:frame draw:style-name="gr6" draw:text-style-name="P253" svg:width="0.877cm" svg:height="0.65cm" svg:x="5.675cm" svg:y="3.575cm"><draw:text-box><text:p text:style-name="P252"><text:span text:style-name="T50">6</text:span></text:p></draw:text-box></draw:frame><draw:frame draw:style-name="gr6" draw:text-style-name="P253" svg:width="0.877cm" svg:height="0.65cm" svg:x="6.176cm" svg:y="3.575cm"><draw:text-box><text:p text:style-name="P252"><text:span text:style-name="T50">7</text:span></text:p></draw:text-box></draw:frame><draw:frame draw:style-name="gr6" draw:text-style-name="P253" svg:width="0.877cm" svg:height="0.65cm" svg:x="6.675cm" svg:y="3.575cm"><draw:text-box><text:p text:style-name="P252"><text:span text:style-name="T50">8</text:span></text:p></draw:text-box></draw:frame><draw:frame draw:style-name="gr6" draw:text-style-name="P253" svg:width="0.877cm" svg:height="0.65cm" svg:x="7.174cm" svg:y="3.575cm"><draw:text-box><text:p text:style-name="P252"><text:span text:style-name="T50">9</text:span></text:p></draw:text-box></draw:frame><draw:frame draw:style-name="gr6" draw:text-style-name="P253" svg:width="0.877cm" svg:height="0.65cm" svg:x="7.552cm" svg:y="3.575cm"><draw:text-box><text:p text:style-name="P252"><text:span text:style-name="T50">10</text:span></text:p></draw:text-box></draw:frame><draw:line draw:style-name="gr2" draw:text-style-name="P251" svg:x1="5.05cm" svg:y1="2.429cm" svg:x2="4.549cm" svg:y2="2.928cm"><text:p/></draw:line><draw:line draw:style-name="gr2" draw:text-style-name="P251" svg:x1="5.05cm" svg:y1="2.429cm" svg:x2="6.05cm" svg:y2="2.429cm"><text:p/></draw:line><draw:line draw:style-name="gr2" draw:text-style-name="P251" svg:x1="7.551cm" svg:y1="2.928cm" svg:x2="7.052cm" svg:y2="2.429cm"><text:p/></draw:line><draw:line draw:style-name="gr2" draw:text-style-name="P251" svg:x1="7.553cm" svg:y1="2.929cm" svg:x2="8.553cm" svg:y2="2.929cm"><text:p/></draw:line><draw:line draw:style-name="gr2" draw:text-style-name="P251" svg:x1="9.054cm" svg:y1="3.43cm" svg:x2="8.553cm" svg:y2="2.929cm"><text:p/></draw:line><draw:line draw:style-name="gr2" draw:text-style-name="P251" svg:x1="9.054cm" svg:y1="3.43cm" svg:x2="10.054cm" svg:y2="3.43cm"><text:p/></draw:line><draw:frame draw:style-name="gr6" draw:text-style-name="P253" svg:width="0.877cm" svg:height="0.65cm" svg:x="1.553cm" svg:y="3.074cm"><draw:text-box><text:p text:style-name="P252"><text:span text:style-name="T50">0</text:span></text:p></draw:text-box></draw:frame><draw:frame draw:style-name="gr6" draw:text-style-name="P253" svg:width="1.251cm" svg:height="0.65cm" svg:x="1.221cm" svg:y="2.178cm"><draw:text-box><text:p text:style-name="P252"><text:span text:style-name="T50">100</text:span></text:p></draw:text-box></draw:frame><draw:frame draw:style-name="gr6" draw:text-style-name="P253" svg:width="0.877cm" svg:height="0.65cm" svg:x="1.39cm" svg:y="2.677cm"><draw:text-box><text:p text:style-name="P252"><text:span text:style-name="T50">50</text:span></text:p></draw:text-box></draw:frame><draw:line draw:style-name="gr51" draw:text-style-name="P251" svg:x1="2.055cm" svg:y1="1.929cm" svg:x2="3.055cm" svg:y2="1.929cm"><text:p/></draw:line><draw:line draw:style-name="gr51" draw:text-style-name="P251" svg:x1="3.052cm" svg:y1="1.429cm" svg:x2="3.052cm" svg:y2="1.928cm"><text:p/></draw:line><draw:line draw:style-name="gr51" draw:text-style-name="P251" svg:x1="3.052cm" svg:y1="1.429cm" svg:x2="6.052cm" svg:y2="1.429cm"><text:p/></draw:line><draw:line draw:style-name="gr51" draw:text-style-name="P251" svg:x1="7.052cm" svg:y1="1.928cm" svg:x2="7.052cm" svg:y2="1.429cm"><text:p/></draw:line><draw:line draw:style-name="gr51" draw:text-style-name="P251" svg:x1="7.052cm" svg:y1="1.929cm" svg:x2="10.052cm" svg:y2="1.929cm"><text:p/></draw:line><draw:line draw:style-name="gr3" draw:text-style-name="P251" svg:x1="2.055cm" svg:y1="0.928cm" svg:x2="3.055cm" svg:y2="0.928cm"><text:p/></draw:line><draw:line draw:style-name="gr3" draw:text-style-name="P251" svg:x1="3.052cm" svg:y1="0.427cm" svg:x2="3.052cm" svg:y2="0.926cm"><text:p/></draw:line><draw:line draw:style-name="gr3" draw:text-style-name="P251" svg:x1="3.052cm" svg:y1="0.427cm" svg:x2="6.052cm" svg:y2="0.427cm"><text:p/></draw:line><draw:line draw:style-name="gr3" draw:text-style-name="P251" svg:x1="9.054cm" svg:y1="0.926cm" svg:x2="9.054cm" svg:y2="0.427cm"><text:p/></draw:line><draw:line draw:style-name="gr3" draw:text-style-name="P251" svg:x1="9.054cm" svg:y1="0.928cm" svg:x2="10.054cm" svg:y2="0.928cm"><text:p/></draw:line><draw:frame draw:style-name="gr6" draw:text-style-name="P253" svg:width="1.251cm" svg:height="0.65cm" svg:x="1.302cm" svg:y="1.326cm"><draw:text-box><text:p text:style-name="P252"><text:span text:style-name="T50">E</text:span></text:p></draw:text-box></draw:frame><draw:frame draw:style-name="gr6" draw:text-style-name="P253" svg:width="1.251cm" svg:height="0.65cm" svg:x="1.302cm" svg:y="0.324cm"><draw:text-box><text:p text:style-name="P252"><text:span text:style-name="T50">RUN</text:span></text:p></draw:text-box></draw:frame><draw:frame draw:style-name="gr6" draw:text-style-name="P253" svg:width="0.877cm" svg:height="0.65cm" svg:x="8.053cm" svg:y="3.575cm"><draw:text-box><text:p text:style-name="P252"><text:span text:style-name="T50">11</text:span></text:p></draw:text-box></draw:frame><draw:frame draw:style-name="gr6" draw:text-style-name="P253" svg:width="0.877cm" svg:height="0.65cm" svg:x="8.552cm" svg:y="3.575cm"><draw:text-box><text:p text:style-name="P252"><text:span text:style-name="T50">12</text:span></text:p></draw:text-box></draw:frame><draw:line draw:style-name="gr14" draw:text-style-name="P251" svg:x1="6.052cm" svg:y1="3.429cm" svg:x2="6.052cm" svg:y2="0.178cm"><text:p/></draw:line><draw:line draw:style-name="gr14" draw:text-style-name="P251" svg:x1="7.052cm" svg:y1="3.429cm" svg:x2="7.052cm" svg:y2="0.178cm"><text:p/></draw:line><draw:line draw:style-name="gr52" draw:text-style-name="P251" svg:x1="7.052cm" svg:y1="2.429cm" svg:x2="6.052cm" svg:y2="2.429cm"><text:p/></draw:line><draw:line draw:style-name="gr2" draw:text-style-name="P251" svg:x1="5.05cm" svg:y1="2.429cm" svg:x2="6.05cm" svg:y2="2.429cm"><text:p/></draw:line><draw:line draw:style-name="gr53" draw:text-style-name="P251" svg:x1="7.052cm" svg:y1="1.429cm" svg:x2="6.052cm" svg:y2="1.429cm"><text:p/></draw:line><draw:line draw:style-name="gr3" draw:text-style-name="P251" svg:x1="9.052cm" svg:y1="0.427cm" svg:x2="7.052cm" svg:y2="0.427cm"><text:p/></draw:line><draw:line draw:style-name="gr54" draw:text-style-name="P251" svg:x1="6.052cm" svg:y1="0.427cm" svg:x2="7.052cm" svg:y2="0.427cm"><text:p/></draw:line></draw:g></text:p>
      <text:list xml:id="list33650751" text:continue-numbering="true" text:style-name="L1">
        <text:list-item>
          <text:list>
            <text:list-item>
              <text:h text:style-name="P217" text:outline-level="2"><text:alphabetical-index-mark-start text:id="IMark100801540"/>INC_DEC<text:alphabetical-index-mark-end text:id="IMark100801540"/></text:h>
            </text:list-item>
          </text:list>
        </text:list-item>
      </text:list>
      <text:p text:style-name="P22">Type<text:tab/>Funktionsbaustein</text:p>
      <text:p text:style-name="P22"><text:span text:style-name="T16">Input</text:span><text:tab/>CHA : BOOL (Kanal A des Gebers)</text:p>
      <text:p text:style-name="P52"><text:tab/>CHB : BOOL (Kanal B des Gebers) </text:p>
      <text:p text:style-name="P52"><text:tab/>RST : BOOL (Reset)</text:p>
      <text:p text:style-name="P25">Output<text:tab/>DIR : BOOL (Drehrichtung)</text:p>
      <text:p text:style-name="P55"><draw:frame draw:style-name="fr4" draw:name="Grafik189" text:anchor-type="paragraph" svg:x="1.104cm" svg:y="0.605cm" svg:width="2.281cm" svg:height="2.2cm" draw:z-index="314"><draw:image xlink:href="Pictures/10000000000000AC000000A6A2F551A2.png" xlink:type="simple" xlink:show="embed" xlink:actuate="onLoad"/></draw:frame><text:tab/>CNT : INT (Zählerwert)</text:p>
      <text:p text:style-name="P25"><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text:soft-page-break/>bers mit 100 Impulsen zählt CNT bis 400, weil an jeder Flanke beider Kanäle gezählt wird, sodass 4-fache Auflösung erreicht wird. Ein RST Eingang erlaubt jederzeit den Zähler auf 0 zu stellen. Der Zähler zählt aufwärts, wenn DIR = TRUE und abwärts, wenn DIR = FALSE.</text:p>
      <text:p text:style-name="Standard">Im Folgenden <text:span text:style-name="T38">Beispiel</text:span> wird ein Bitmustergenerator GEN_BIT benutzt um einen Drehgeber zu simulieren, der immer abwechselnd 3 Schritte im Uhrzeigersinn und 3 im Gegenuhrzeigersinn macht. In der <text:span text:style-name="T16">Tracea</text:span>ufzeichnung ist zu sehen, wie der INC_DEC die Bewegung in 12 Zahlschritte zerlegt und die Richtung dekodiert.</text:p>
      <text:p text:style-name="P25"><draw:frame draw:style-name="fr4" draw:name="Grafik193" text:anchor-type="paragraph" svg:x="1.078cm" svg:y="0.533cm" svg:width="15.757cm" svg:height="4.341cm" draw:z-index="315"><draw:image xlink:href="Pictures/10000000000004C300000150EB54EE5C.png" xlink:type="simple" xlink:show="embed" xlink:actuate="onLoad"/></draw:frame></text:p>
      <text:p text:style-name="P55"/>
      <text:p text:style-name="P55"><draw:frame draw:style-name="fr4" draw:name="Grafik194" text:anchor-type="paragraph" svg:x="0.857cm" svg:y="0.182cm" svg:width="16.127cm" svg:height="7.357cm" draw:z-index="313"><draw:image xlink:href="Pictures/10000000000002CD00000147ADF5621C.png" xlink:type="simple" xlink:show="embed" xlink:actuate="onLoad"/></draw:frame></text:p>
      <text:p text:style-name="P55"/>
      <text:list xml:id="list33634453" text:continue-numbering="true" text:style-name="L1">
        <text:list-item>
          <text:list>
            <text:list-item>
              <text:h text:style-name="P217" text:outline-level="2"><text:soft-page-break/><text:alphabetical-index-mark-start text:id="IMark100801540"/>INTERLOCK<text:alphabetical-index-mark-end text:id="IMark100801540"/></text:h>
            </text:list-item>
          </text:list>
        </text:list-item>
      </text:list>
      <text:p text:style-name="Standard">Type<text:tab/><text:span text:style-name="T38">Funktionsbaustein</text:span></text:p>
      <text:p text:style-name="Standard"><text:span text:style-name="T8">Input</text:span><text:span text:style-name="T4"><text:tab/>I1 : BOOL (Eingang 1)</text:span></text:p>
      <text:p text:style-name="P55"><text:tab/>I2 : BOOL (Eingang 2)</text:p>
      <text:p text:style-name="P55"><text:tab/>TL : TIME (Totzeit)</text:p>
      <text:p text:style-name="P55">Output<text:tab/>Q1 : BOOL (Ausgang 1)</text:p>
      <text:p text:style-name="P55"><text:tab/>Q2 : BOOL (Ausgang 2)</text:p>
      <text:p text:style-name="P55"><draw:frame draw:style-name="fr4" draw:name="Grafik327" text:anchor-type="paragraph" svg:x="1.355cm" svg:y="0.101cm" svg:width="2.499cm" svg:height="1.921cm" draw:z-index="316"><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23">I1</text:p>
          </table:table-cell>
          <table:table-cell table:style-name="Tabelle13.A1" office:value-type="string">
            <text:p text:style-name="P123">I2</text:p>
          </table:table-cell>
          <table:table-cell table:style-name="Tabelle13.A1" office:value-type="string">
            <text:p text:style-name="P123">Q1</text:p>
          </table:table-cell>
          <table:table-cell table:style-name="Tabelle13.D1" office:value-type="string">
            <text:p text:style-name="P123">Q2</text:p>
          </table:table-cell>
        </table:table-row>
        <table:table-row>
          <table:table-cell table:style-name="Tabelle13.A2" office:value-type="string">
            <text:p text:style-name="P123">0</text:p>
          </table:table-cell>
          <table:table-cell table:style-name="Tabelle13.A2" office:value-type="string">
            <text:p text:style-name="P123">0</text:p>
          </table:table-cell>
          <table:table-cell table:style-name="Tabelle13.A2" office:value-type="string">
            <text:p text:style-name="P123">0</text:p>
          </table:table-cell>
          <table:table-cell table:style-name="Tabelle13.D2" office:value-type="string">
            <text:p text:style-name="P123">0</text:p>
          </table:table-cell>
        </table:table-row>
        <table:table-row>
          <table:table-cell table:style-name="Tabelle13.A2" office:value-type="string">
            <text:p text:style-name="P123">0</text:p>
          </table:table-cell>
          <table:table-cell table:style-name="Tabelle13.A2" office:value-type="string">
            <text:p text:style-name="P123">1</text:p>
          </table:table-cell>
          <table:table-cell table:style-name="Tabelle13.A2" office:value-type="string">
            <text:p text:style-name="P123">0</text:p>
          </table:table-cell>
          <table:table-cell table:style-name="Tabelle13.D2" office:value-type="string">
            <text:p text:style-name="P123">1</text:p>
          </table:table-cell>
        </table:table-row>
        <table:table-row>
          <table:table-cell table:style-name="Tabelle13.A2" office:value-type="string">
            <text:p text:style-name="P123">1</text:p>
          </table:table-cell>
          <table:table-cell table:style-name="Tabelle13.A2" office:value-type="string">
            <text:p text:style-name="P123">0</text:p>
          </table:table-cell>
          <table:table-cell table:style-name="Tabelle13.A2" office:value-type="string">
            <text:p text:style-name="P123">1</text:p>
          </table:table-cell>
          <table:table-cell table:style-name="Tabelle13.D2" office:value-type="string">
            <text:p text:style-name="P123">0</text:p>
          </table:table-cell>
        </table:table-row>
        <table:table-row>
          <table:table-cell table:style-name="Tabelle13.A2" office:value-type="string">
            <text:p text:style-name="P123">1</text:p>
          </table:table-cell>
          <table:table-cell table:style-name="Tabelle13.A2" office:value-type="string">
            <text:p text:style-name="P123">1</text:p>
          </table:table-cell>
          <table:table-cell table:style-name="Tabelle13.A2" office:value-type="string">
            <text:p text:style-name="P123">0</text:p>
          </table:table-cell>
          <table:table-cell table:style-name="Tabelle13.D2" office:value-type="string">
            <text:p text:style-name="P123">0</text:p>
          </table:table-cell>
        </table:table-row>
      </table:table>
      <text:p text:style-name="P58"><draw:frame draw:style-name="fr4" draw:name="Grafik376" text:anchor-type="paragraph" svg:x="1.355cm" svg:y="1.035cm" svg:width="9.29cm" svg:height="4.44cm" draw:z-index="371"><draw:image xlink:href="Pictures/10000000000001D400000102A7446F75.png" xlink:type="simple" xlink:show="embed" xlink:actuate="onLoad"/></draw:frame></text:p>
      <text:p text:style-name="P55"/>
      <text:list xml:id="list33656420" text:continue-numbering="true" text:style-name="L1">
        <text:list-item>
          <text:list>
            <text:list-item>
              <text:h text:style-name="P217" text:outline-level="2"><text:soft-page-break/><text:alphabetical-index-mark-start text:id="IMark100801540"/>MANUAL_1<text:alphabetical-index-mark-end text:id="IMark100801540"/></text:h>
            </text:list-item>
          </text:list>
        </text:list-item>
      </text:list>
      <text:p text:style-name="Standard">Type<text:tab/><text:span text:style-name="T38">Funktionsbaustein</text:span></text:p>
      <text:p text:style-name="Standard"><text:span text:style-name="T8">Input</text:span><text:span text:style-name="T4"><text:tab/>IN : BOOL (Eingangssignal)</text:span></text:p>
      <text:p text:style-name="P55"><text:tab/>MAN : BOOL (Umschaltung auf Handbetrieb)</text:p>
      <text:p text:style-name="P55"><text:tab/>M_I : BOOL (Signalpegel bei Handbetrieb)</text:p>
      <text:p text:style-name="P55"><text:tab/>SET : BOOL (Asynchroner Set bei Handbetrieb)</text:p>
      <text:p text:style-name="P55"><text:tab/>RST : BOOL (Asynchroner Reset bei Handbetrieb)</text:p>
      <text:p text:style-name="P55">Output<text:tab/>Q : BOOL (Ausgangssignal)</text:p>
      <text:p text:style-name="P58"><draw:frame draw:style-name="fr4" draw:name="Grafik627" text:anchor-type="paragraph" svg:x="1.023cm" svg:y="0.688cm" svg:width="3.29cm" svg:height="2.679cm" draw:z-index="649"><draw:image xlink:href="Pictures/10000000000000F9000000CB3F47FF3A.png" xlink:type="simple" xlink:show="embed" xlink:actuate="onLoad"/></draw:frame><text:tab/>STATUS : BOOL (ESR kompatibler Status Ausgang) </text:p>
      <text:p text:style-name="P58"><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xml:id="list33625902" text:continue-numbering="true" text:style-name="L1">
        <text:list-item>
          <text:list>
            <text:list-item>
              <text:h text:style-name="P217" text:outline-level="2"><text:alphabetical-index-mark-start text:id="IMark100801540"/>MANUAL_2<text:alphabetical-index-mark-end text:id="IMark100801540"/></text:h>
            </text:list-item>
          </text:list>
        </text:list-item>
      </text:list>
      <text:p text:style-name="Standard">Type<text:tab/><text:span text:style-name="T38">Funktionsbaustein</text:span></text:p>
      <text:p text:style-name="Standard"><text:span text:style-name="T8">Input</text:span><text:span text:style-name="T4"><text:tab/>IN : BOOL (Eingangssignal)</text:span></text:p>
      <text:p text:style-name="Standard"><text:span text:style-name="T4"><text:tab/>ENA : BOOL (Baustein </text:span><text:span text:style-name="T8">Enable</text:span><text:span text:style-name="T4"> Eingang)</text:span></text:p>
      <text:p text:style-name="P55"><text:tab/>ON : BOOL (Zwingt den Ausgang auf TRUE)</text:p>
      <text:p text:style-name="P55"><text:tab/>OFF : BOOL (Zwingt den Ausgang auf FALSE)</text:p>
      <text:p text:style-name="P55"><text:tab/>MAN : BOOL (Ausgangszustand bei Manualbetrieb)</text:p>
      <text:p text:style-name="P55"><text:soft-page-break/>Output<text:tab/>Q : BOOL (Ausgangssignal)</text:p>
      <text:p text:style-name="P58"><draw:frame draw:style-name="fr4" draw:name="Grafik688" text:anchor-type="paragraph" svg:x="1.025cm" svg:y="0.667cm" svg:width="3.29cm" svg:height="2.709cm" draw:z-index="715"><draw:image xlink:href="Pictures/10000000000000F9000000CD3B1B35D9.png" xlink:type="simple" xlink:show="embed" xlink:actuate="onLoad"/></draw:frame><text:tab/>STATUS : BOOL (ESR kompatibler Status Ausgang) </text:p>
      <text:p text:style-name="P76"><text:span text:style-name="T4"><text:line-break/>MANUAL_2 <text:s/>kann ein digitales Signal überschreiben und schaltet zwischen Hand </text:span><text:span text:style-name="T4">und Automatikbetrieb um. der Baustein ist so ausgelegt das ein 3-stufiger Schalter zwischen Aus, Automatik und Ein schaltet. Das Signal im Automatikzustand wird auf IN gelegt, im Falle von erzwungenem Aus wird OFF auf TRUE gelegt und im Falle </text:span><text:span text:style-name="T4">von erzwungenem </text:span><text:span text:style-name="T4">Ein wird ON auf TRUE gelegt. die Beiden Eingänge ON und OFF auf FALSE schalten den Eingang IN direkt auf den Ausgang Q. werden jedoch beide Eingänge ON und OFF gleichzeitig auf TRUE gesetzt, so wird der Zustand des Eingangs MAN auf den Ausgang geschaltet. Der Eingang MAN kann auch dazu benutzt werden um einen Vorrang für ON oder OFF zu definieren, den der Wert von MAN wird immer dann auf den Ausgang gelegt wenn beide Eingänge ON und OFF gleichzeitig auf TRUE stehen. Ist der Eingang ENA auf FALSE so bleibt der Ausgang immer auf FALSE, der Baustein ist </text:span><text:span text:style-name="T8">disabled.</text:span><text:span text:style-name="T4"> Die folgende Tabelle definiert die Betriebszustände des Bausteins. Der Ausgang STATUS ist ESR kompatibel und meldet die Zustände des Bausteins an entsprechende ESR Bausteine weiter.</text:span></text:p>
      <table:table table:name="Tabelle43" table:style-name="Tabelle43">
        <table:table-column table:style-name="Tabelle43.A"/>
        <table:table-column table:style-name="Tabelle43.B"/>
        <table:table-column table:style-name="Tabelle43.A" table:number-columns-repeated="2"/>
        <table:table-column table:style-name="Tabelle43.E"/>
        <table:table-column table:style-name="Tabelle43.F"/>
        <table:table-column table:style-name="Tabelle43.G"/>
        <table:table-column table:style-name="Tabelle43.H"/>
        <table:table-row table:style-name="Tabelle43.1">
          <table:table-cell table:style-name="Tabelle43.A1" office:value-type="string">
            <text:p text:style-name="P109">IN</text:p>
          </table:table-cell>
          <table:table-cell table:style-name="Tabelle43.A1" office:value-type="string">
            <text:p text:style-name="P109">ENA</text:p>
          </table:table-cell>
          <table:table-cell table:style-name="Tabelle43.A1" office:value-type="string">
            <text:p text:style-name="P109">ON</text:p>
          </table:table-cell>
          <table:table-cell table:style-name="Tabelle43.A1" office:value-type="string">
            <text:p text:style-name="P109">OFF</text:p>
          </table:table-cell>
          <table:table-cell table:style-name="Tabelle43.A1" office:value-type="string">
            <text:p text:style-name="P109">MAN</text:p>
          </table:table-cell>
          <table:table-cell table:style-name="Tabelle43.A1" office:value-type="string">
            <text:p text:style-name="P109">Q</text:p>
          </table:table-cell>
          <table:table-cell table:style-name="Tabelle43.A1" office:value-type="string">
            <text:p text:style-name="P109">STATUS</text:p>
          </table:table-cell>
          <table:table-cell table:style-name="Tabelle43.H1" office:value-type="string">
            <text:p text:style-name="Table_20_Contents"/>
          </table:table-cell>
        </table:table-row>
        <table:table-row>
          <table:table-cell table:style-name="Tabelle43.A2" office:value-type="string">
            <text:p text:style-name="P109">-</text:p>
          </table:table-cell>
          <table:table-cell table:style-name="Tabelle43.A2" office:value-type="string">
            <text:p text:style-name="P109">L</text:p>
          </table:table-cell>
          <table:table-cell table:style-name="Tabelle43.A2" office:value-type="string">
            <text:p text:style-name="P109">-</text:p>
          </table:table-cell>
          <table:table-cell table:style-name="Tabelle43.A2" office:value-type="string">
            <text:p text:style-name="P109">-</text:p>
          </table:table-cell>
          <table:table-cell table:style-name="Tabelle43.A2" office:value-type="string">
            <text:p text:style-name="P109">-</text:p>
          </table:table-cell>
          <table:table-cell table:style-name="Tabelle43.A2" office:value-type="string">
            <text:p text:style-name="P109">L</text:p>
          </table:table-cell>
          <table:table-cell table:style-name="Tabelle43.G2" office:value-type="float" office:value="104">
            <text:p text:style-name="P109">104</text:p>
          </table:table-cell>
          <table:table-cell table:style-name="Tabelle43.H2" office:value-type="string">
            <text:p text:style-name="P120">Disabled</text:p>
          </table:table-cell>
        </table:table-row>
        <table:table-row>
          <table:table-cell table:style-name="Tabelle43.A2" office:value-type="string">
            <text:p text:style-name="P109">X</text:p>
          </table:table-cell>
          <table:table-cell table:style-name="Tabelle43.A2" office:value-type="string">
            <text:p text:style-name="P109">H</text:p>
          </table:table-cell>
          <table:table-cell table:style-name="Tabelle43.A2" office:value-type="string">
            <text:p text:style-name="P109">L</text:p>
          </table:table-cell>
          <table:table-cell table:style-name="Tabelle43.A2" office:value-type="string">
            <text:p text:style-name="P109">L</text:p>
          </table:table-cell>
          <table:table-cell table:style-name="Tabelle43.A2" office:value-type="string">
            <text:p text:style-name="P109">-</text:p>
          </table:table-cell>
          <table:table-cell table:style-name="Tabelle43.A2" office:value-type="string">
            <text:p text:style-name="P109">X</text:p>
          </table:table-cell>
          <table:table-cell table:style-name="Tabelle43.G2" office:value-type="float" office:value="100">
            <text:p text:style-name="P109">100</text:p>
          </table:table-cell>
          <table:table-cell table:style-name="Tabelle43.H2" office:value-type="string">
            <text:p text:style-name="P109">Auto Mode</text:p>
          </table:table-cell>
        </table:table-row>
        <table:table-row>
          <table:table-cell table:style-name="Tabelle43.A2" office:value-type="string">
            <text:p text:style-name="P109">-</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L</text:p>
          </table:table-cell>
          <table:table-cell table:style-name="Tabelle43.A2" office:value-type="string">
            <text:p text:style-name="P109">-</text:p>
          </table:table-cell>
          <table:table-cell table:style-name="Tabelle43.A2" office:value-type="string">
            <text:p text:style-name="P109">H</text:p>
          </table:table-cell>
          <table:table-cell table:style-name="Tabelle43.G2" office:value-type="float" office:value="101">
            <text:p text:style-name="P109">101</text:p>
          </table:table-cell>
          <table:table-cell table:style-name="Tabelle43.H2" office:value-type="string">
            <text:p text:style-name="P109"><text:span text:style-name="T16">force</text:span> <text:span text:style-name="T16">High</text:span></text:p>
          </table:table-cell>
        </table:table-row>
        <table:table-row>
          <table:table-cell table:style-name="Tabelle43.A2" office:value-type="string">
            <text:p text:style-name="P109">-</text:p>
          </table:table-cell>
          <table:table-cell table:style-name="Tabelle43.A2" office:value-type="string">
            <text:p text:style-name="P109">H</text:p>
          </table:table-cell>
          <table:table-cell table:style-name="Tabelle43.A2" office:value-type="string">
            <text:p text:style-name="P109">L</text:p>
          </table:table-cell>
          <table:table-cell table:style-name="Tabelle43.A2" office:value-type="string">
            <text:p text:style-name="P109">H</text:p>
          </table:table-cell>
          <table:table-cell table:style-name="Tabelle43.A2" office:value-type="string">
            <text:p text:style-name="P109">-</text:p>
          </table:table-cell>
          <table:table-cell table:style-name="Tabelle43.A2" office:value-type="string">
            <text:p text:style-name="P109">L</text:p>
          </table:table-cell>
          <table:table-cell table:style-name="Tabelle43.G2" office:value-type="float" office:value="102">
            <text:p text:style-name="P109">102</text:p>
          </table:table-cell>
          <table:table-cell table:style-name="Tabelle43.H2" office:value-type="string">
            <text:p text:style-name="P109"><text:span text:style-name="T16">force</text:span> <text:span text:style-name="T16">Low</text:span></text:p>
          </table:table-cell>
        </table:table-row>
        <table:table-row>
          <table:table-cell table:style-name="Tabelle43.A2" office:value-type="string">
            <text:p text:style-name="P109">-</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X</text:p>
          </table:table-cell>
          <table:table-cell table:style-name="Tabelle43.A2" office:value-type="string">
            <text:p text:style-name="P109">X</text:p>
          </table:table-cell>
          <table:table-cell table:style-name="Tabelle43.G2" office:value-type="float" office:value="103">
            <text:p text:style-name="P109">103</text:p>
          </table:table-cell>
          <table:table-cell table:style-name="Tabelle43.H2" office:value-type="string">
            <text:p text:style-name="P109">Manual <text:span text:style-name="T16">Input</text:span></text:p>
          </table:table-cell>
        </table:table-row>
        <table:table-row>
          <table:table-cell table:style-name="Tabelle43.A2" office:value-type="string">
            <text:p text:style-name="P109">-</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L</text:p>
          </table:table-cell>
          <table:table-cell table:style-name="Tabelle43.A2" office:value-type="string">
            <text:p text:style-name="P109">L</text:p>
          </table:table-cell>
          <table:table-cell table:style-name="Tabelle43.G2" office:value-type="float" office:value="103">
            <text:p text:style-name="P109">103</text:p>
          </table:table-cell>
          <table:table-cell table:style-name="Tabelle43.H2" office:value-type="string">
            <text:p text:style-name="P109"><text:span text:style-name="T16">Force</text:span> <text:span text:style-name="T16">with</text:span> <text:span text:style-name="T16">Priority</text:span> <text:span text:style-name="T16">for</text:span> OFF</text:p>
          </table:table-cell>
        </table:table-row>
        <table:table-row>
          <table:table-cell table:style-name="Tabelle43.A2" office:value-type="string">
            <text:p text:style-name="P109">-</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H</text:p>
          </table:table-cell>
          <table:table-cell table:style-name="Tabelle43.A2" office:value-type="string">
            <text:p text:style-name="P109">H</text:p>
          </table:table-cell>
          <table:table-cell table:style-name="Tabelle43.G2" office:value-type="float" office:value="103">
            <text:p text:style-name="P109">103</text:p>
          </table:table-cell>
          <table:table-cell table:style-name="Tabelle43.H2" office:value-type="string">
            <text:p text:style-name="P109"><text:span text:style-name="T16">Force</text:span> <text:span text:style-name="T16">with</text:span> <text:span text:style-name="T16">Priority</text:span> <text:span text:style-name="T16">for</text:span> ON</text:p>
          </table:table-cell>
        </table:table-row>
      </table:table>
      <text:p text:style-name="P58"/>
      <text:p text:style-name="P58"/>
      <text:p text:style-name="P58"/>
      <text:list xml:id="list33633020" text:continue-numbering="true" text:style-name="L1">
        <text:list-item>
          <text:list>
            <text:list-item>
              <text:h text:style-name="P217" text:outline-level="2"><text:soft-page-break/><text:alphabetical-index-mark-start text:id="IMark100801540"/>MANUAL_4<text:alphabetical-index-mark-end text:id="IMark100801540"/></text:h>
            </text:list-item>
          </text:list>
        </text:list-item>
      </text:list>
      <text:p text:style-name="Standard">Type<text:tab/><text:span text:style-name="T38">Funktionsbaustein</text:span></text:p>
      <text:p text:style-name="Standard"><text:span text:style-name="T8">Input</text:span><text:span text:style-name="T4"><text:tab/>I0..I3 : BOOL (Eingangssignale)</text:span></text:p>
      <text:p text:style-name="P55"><text:tab/>MAN : BOOL (Umschaltung auf Handbetrieb)</text:p>
      <text:p text:style-name="P55"><text:tab/>M0..M3 : BOOL (Eingangssignale bei Handbetrieb)</text:p>
      <text:p text:style-name="P55"><text:tab/>STP : BOOL (Asynchroner <text:span text:style-name="T16">Step</text:span> bei Handbetrieb)</text:p>
      <text:p text:style-name="P55">Output<text:tab/>Q0..Q3 : BOOL (Ausgangssignale)</text:p>
      <text:p text:style-name="P58"><draw:frame draw:style-name="fr4" draw:name="Grafik628" text:anchor-type="paragraph" svg:x="1.09cm" svg:y="0.644cm" svg:width="3.29cm" svg:height="4.701cm" draw:z-index="650"><draw:image xlink:href="Pictures/10000000000000F900000163830E4365.png" xlink:type="simple" xlink:show="embed" xlink:actuate="onLoad"/></draw:frame><text:tab/>STATUS : BOOL (ESR kompatibler Status Ausgang) </text:p>
      <text:p text:style-name="P58"><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 Der ESR kompatible Status Ausgang meldet Schaltzustände weiter.</text:p>
      <text:p text:style-name="P58"/>
      <table:table table:name="Tabelle44" table:style-name="Tabelle44">
        <table:table-column table:style-name="Tabelle44.A"/>
        <table:table-column table:style-name="Tabelle44.B"/>
        <table:table-row>
          <table:table-cell table:style-name="Tabelle44.A1" office:value-type="string">
            <text:p text:style-name="P106">STATUS</text:p>
          </table:table-cell>
          <table:table-cell table:style-name="Tabelle44.B1" office:value-type="string">
            <text:p text:style-name="P106">Zustand</text:p>
          </table:table-cell>
        </table:table-row>
        <table:table-row>
          <table:table-cell table:style-name="Tabelle44.A2" office:value-type="float" office:value="100">
            <text:p text:style-name="P106">100</text:p>
          </table:table-cell>
          <table:table-cell table:style-name="Tabelle44.B2" office:value-type="string">
            <text:p text:style-name="P106"><text:span text:style-name="T16">Automatic</text:span> Mode MAN = FALSE, Q0 = I0, Q1 = I1, Q2 = I2, Q3 = I3</text:p>
          </table:table-cell>
        </table:table-row>
        <table:table-row>
          <table:table-cell table:style-name="Tabelle44.A2" office:value-type="float" office:value="101">
            <text:p text:style-name="P106">101</text:p>
          </table:table-cell>
          <table:table-cell table:style-name="Tabelle44.B2" office:value-type="string">
            <text:p text:style-name="P106">Manual Mode MAN = TRUE, Q0 = M0, Q1 = M1, Q2 = M2, Q3 = M3</text:p>
          </table:table-cell>
        </table:table-row>
        <table:table-row>
          <table:table-cell table:style-name="Tabelle44.A4" office:value-type="string">
            <text:p text:style-name="P106">110,111,112,113</text:p>
          </table:table-cell>
          <table:table-cell table:style-name="Tabelle44.B2" office:value-type="string">
            <text:p text:style-name="P106"><text:span text:style-name="T16">Step</text:span> Mode <text:span text:style-name="T16">for</text:span> Output Q0, Q1, Q2, Q3</text:p>
          </table:table-cell>
        </table:table-row>
      </table:table>
      <text:p text:style-name="P58"/>
      <text:list xml:id="list33652501" text:continue-numbering="true" text:style-name="L1">
        <text:list-item>
          <text:list>
            <text:list-item>
              <text:h text:style-name="P217" text:outline-level="2"><text:soft-page-break/><text:alphabetical-index-mark-start text:id="IMark100801540"/>PARSET<text:alphabetical-index-mark-end text:id="IMark100801540"/></text:h>
            </text:list-item>
          </text:list>
        </text:list-item>
      </text:list>
      <text:p text:style-name="P22">Type<text:tab/>Funktionsbaustein</text:p>
      <text:p text:style-name="P22"><text:span text:style-name="T16">Input</text:span><text:tab/>A0 : BOOL (Auswahl Eingang 0)</text:p>
      <text:p text:style-name="P52"><text:tab/>A1 : BOOL (Auswahl Eingang 1)</text:p>
      <text:p text:style-name="P52">Config<text:tab/>X01, X11, X21, X31 : REAL (Werte für Parameter P1)</text:p>
      <text:p text:style-name="P52"><text:tab/>X02, X12, X22, X32 : REAL (Werte für Parameter P2)</text:p>
      <text:p text:style-name="P52"><text:tab/>X03, X13, X23, X33 : REAL (Werte für Parameter P3)</text:p>
      <text:p text:style-name="P52"><text:tab/>X04, X14, X24, X34 : REAL (Werte für Parameter P4)</text:p>
      <text:p text:style-name="P52"><text:tab/>TC : TIME (Rampenzeit zu einem neuen Wert an den Ausgängen P)</text:p>
      <text:p text:style-name="P26">Output<text:tab/>P1 : REAL (Parameter 1 Ausgang)</text:p>
      <text:p text:style-name="P26"><text:tab/>P2 : REAL (Parameter 2 Ausgang)</text:p>
      <text:p text:style-name="P26"><text:tab/>P3 : REAL (Parameter 3 Ausgang)</text:p>
      <text:p text:style-name="P26"><draw:frame draw:style-name="fr4" draw:name="Grafik375" text:anchor-type="paragraph" svg:x="1.002cm" svg:y="0.674cm" svg:width="1.829cm" svg:height="2.649cm" draw:z-index="370"><draw:image xlink:href="Pictures/100000000000008A000000C809A9B775.png" xlink:type="simple" xlink:show="embed" xlink:actuate="onLoad"/></draw:frame><text:tab/>P4 : REAL (Parameter 4 Ausgang)</text:p>
      <text:p text:style-name="P58"><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22">A1,A0</text:p>
          </table:table-cell>
          <table:table-cell table:style-name="Tabelle21.A1" office:value-type="string">
            <text:p text:style-name="P122">P1</text:p>
          </table:table-cell>
          <table:table-cell table:style-name="Tabelle21.A1" office:value-type="string">
            <text:p text:style-name="P122">P2</text:p>
          </table:table-cell>
          <table:table-cell table:style-name="Tabelle21.A1" office:value-type="string">
            <text:p text:style-name="P122">P3</text:p>
          </table:table-cell>
          <table:table-cell table:style-name="Tabelle21.E1" office:value-type="string">
            <text:p text:style-name="P122">P4</text:p>
          </table:table-cell>
        </table:table-row>
        <table:table-row>
          <table:table-cell table:style-name="Tabelle21.A2" office:value-type="string">
            <text:p text:style-name="P122">00</text:p>
          </table:table-cell>
          <table:table-cell table:style-name="Tabelle21.A2" office:value-type="string">
            <text:p text:style-name="P122">X01</text:p>
          </table:table-cell>
          <table:table-cell table:style-name="Tabelle21.A2" office:value-type="string">
            <text:p text:style-name="P122">X02</text:p>
          </table:table-cell>
          <table:table-cell table:style-name="Tabelle21.A2" office:value-type="string">
            <text:p text:style-name="P122">X03</text:p>
          </table:table-cell>
          <table:table-cell table:style-name="Tabelle21.E2" office:value-type="string">
            <text:p text:style-name="P122">X04</text:p>
          </table:table-cell>
        </table:table-row>
        <table:table-row>
          <table:table-cell table:style-name="Tabelle21.A2" office:value-type="string">
            <text:p text:style-name="P122">01</text:p>
          </table:table-cell>
          <table:table-cell table:style-name="Tabelle21.A2" office:value-type="string">
            <text:p text:style-name="P122">X11</text:p>
          </table:table-cell>
          <table:table-cell table:style-name="Tabelle21.A2" office:value-type="string">
            <text:p text:style-name="P122">X12</text:p>
          </table:table-cell>
          <table:table-cell table:style-name="Tabelle21.A2" office:value-type="string">
            <text:p text:style-name="P122">X13</text:p>
          </table:table-cell>
          <table:table-cell table:style-name="Tabelle21.E2" office:value-type="string">
            <text:p text:style-name="P122">X14</text:p>
          </table:table-cell>
        </table:table-row>
        <table:table-row>
          <table:table-cell table:style-name="Tabelle21.A2" office:value-type="string">
            <text:p text:style-name="P122">10</text:p>
          </table:table-cell>
          <table:table-cell table:style-name="Tabelle21.A2" office:value-type="string">
            <text:p text:style-name="P122">X21</text:p>
          </table:table-cell>
          <table:table-cell table:style-name="Tabelle21.A2" office:value-type="string">
            <text:p text:style-name="P122">X22</text:p>
          </table:table-cell>
          <table:table-cell table:style-name="Tabelle21.A2" office:value-type="string">
            <text:p text:style-name="P122">X23</text:p>
          </table:table-cell>
          <table:table-cell table:style-name="Tabelle21.E2" office:value-type="string">
            <text:p text:style-name="P122">X24</text:p>
          </table:table-cell>
        </table:table-row>
        <table:table-row>
          <table:table-cell table:style-name="Tabelle21.A2" office:value-type="string">
            <text:p text:style-name="P122">11</text:p>
          </table:table-cell>
          <table:table-cell table:style-name="Tabelle21.A2" office:value-type="string">
            <text:p text:style-name="P122">X31</text:p>
          </table:table-cell>
          <table:table-cell table:style-name="Tabelle21.A2" office:value-type="string">
            <text:p text:style-name="P122">X32</text:p>
          </table:table-cell>
          <table:table-cell table:style-name="Tabelle21.A2" office:value-type="string">
            <text:p text:style-name="P122">X33</text:p>
          </table:table-cell>
          <table:table-cell table:style-name="Tabelle21.E2" office:value-type="string">
            <text:p text:style-name="P122">X34</text:p>
          </table:table-cell>
        </table:table-row>
      </table:table>
      <text:list xml:id="list33633942" text:continue-numbering="true" text:style-name="L1">
        <text:list-item>
          <text:list>
            <text:list-item>
              <text:h text:style-name="P217" text:outline-level="2"><text:soft-page-break/><text:alphabetical-index-mark-start text:id="IMark100801540"/>PARSET2<text:alphabetical-index-mark-end text:id="IMark100801540"/></text:h>
            </text:list-item>
          </text:list>
        </text:list-item>
      </text:list>
      <text:p text:style-name="P22">Type<text:tab/>Funktionsbaustein</text:p>
      <text:p text:style-name="P22"><text:span text:style-name="T16">Input</text:span><text:tab/>X : REAL (Signaleingang)</text:p>
      <text:p text:style-name="P52">Config<text:tab/>X01, X11, X21, X31 : REAL (Werte für Parameter P1)</text:p>
      <text:p text:style-name="P52"><text:tab/>X02, X12, X22, X32 : REAL (Werte für Parameter P2)</text:p>
      <text:p text:style-name="P52"><text:tab/>X03, X13, X23, X33 : REAL (Werte für Parameter P3)</text:p>
      <text:p text:style-name="P52"><text:tab/>X04, X14, X24, X34 : REAL (Werte für Parameter P4)</text:p>
      <text:p text:style-name="P52"><text:tab/>L1, L2, L3 : REAL (<text:span text:style-name="T16">Limits</text:span> für die Parameterumschaltung</text:p>
      <text:p text:style-name="P52"><text:tab/>TC : TIME (Rampenzeit zu einem neuen Wert an den Ausgängen P)</text:p>
      <text:p text:style-name="P26">Output<text:tab/>P1 : REAL (Parameter 1 Ausgang)</text:p>
      <text:p text:style-name="P26"><text:tab/>P2 : REAL (Parameter 2 Ausgang)</text:p>
      <text:p text:style-name="P26"><text:tab/>P3 : REAL (Parameter 3 Ausgang)</text:p>
      <text:p text:style-name="P26"><draw:frame draw:style-name="fr4" draw:name="Grafik377" text:anchor-type="paragraph" svg:x="1.199cm" svg:y="0.667cm" svg:width="2.499cm" svg:height="2.311cm" draw:z-index="372"><draw:image xlink:href="Pictures/10000000000000BD000000AF061016C5.png" xlink:type="simple" xlink:show="embed" xlink:actuate="onLoad"/></draw:frame><text:tab/>P4 : REAL (Parameter 4 Ausgang)</text:p>
      <text:p text:style-name="P58"><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22">X</text:p>
          </table:table-cell>
          <table:table-cell table:style-name="Tabelle22.A1" office:value-type="string">
            <text:p text:style-name="P122">P1</text:p>
          </table:table-cell>
          <table:table-cell table:style-name="Tabelle22.A1" office:value-type="string">
            <text:p text:style-name="P122">P2</text:p>
          </table:table-cell>
          <table:table-cell table:style-name="Tabelle22.A1" office:value-type="string">
            <text:p text:style-name="P122">P3</text:p>
          </table:table-cell>
          <table:table-cell table:style-name="Tabelle22.E1" office:value-type="string">
            <text:p text:style-name="P122">P4</text:p>
          </table:table-cell>
        </table:table-row>
        <table:table-row>
          <table:table-cell table:style-name="Tabelle22.A2" office:value-type="string">
            <text:p text:style-name="P122">X &lt; L1</text:p>
          </table:table-cell>
          <table:table-cell table:style-name="Tabelle22.A2" office:value-type="string">
            <text:p text:style-name="P122">X01</text:p>
          </table:table-cell>
          <table:table-cell table:style-name="Tabelle22.A2" office:value-type="string">
            <text:p text:style-name="P122">X02</text:p>
          </table:table-cell>
          <table:table-cell table:style-name="Tabelle22.A2" office:value-type="string">
            <text:p text:style-name="P122">X03</text:p>
          </table:table-cell>
          <table:table-cell table:style-name="Tabelle22.E2" office:value-type="string">
            <text:p text:style-name="P122">X04</text:p>
          </table:table-cell>
        </table:table-row>
        <table:table-row>
          <table:table-cell table:style-name="Tabelle22.A2" office:value-type="string">
            <text:p text:style-name="P122">L1 &lt; X &lt; L2</text:p>
          </table:table-cell>
          <table:table-cell table:style-name="Tabelle22.A2" office:value-type="string">
            <text:p text:style-name="P122">X11</text:p>
          </table:table-cell>
          <table:table-cell table:style-name="Tabelle22.A2" office:value-type="string">
            <text:p text:style-name="P122">X12</text:p>
          </table:table-cell>
          <table:table-cell table:style-name="Tabelle22.A2" office:value-type="string">
            <text:p text:style-name="P122">X13</text:p>
          </table:table-cell>
          <table:table-cell table:style-name="Tabelle22.E2" office:value-type="string">
            <text:p text:style-name="P122">X14</text:p>
          </table:table-cell>
        </table:table-row>
        <table:table-row>
          <table:table-cell table:style-name="Tabelle22.A2" office:value-type="string">
            <text:p text:style-name="P122">L2 &lt; X &lt; L3</text:p>
          </table:table-cell>
          <table:table-cell table:style-name="Tabelle22.A2" office:value-type="string">
            <text:p text:style-name="P122">X21</text:p>
          </table:table-cell>
          <table:table-cell table:style-name="Tabelle22.A2" office:value-type="string">
            <text:p text:style-name="P122">X22</text:p>
          </table:table-cell>
          <table:table-cell table:style-name="Tabelle22.A2" office:value-type="string">
            <text:p text:style-name="P122">X23</text:p>
          </table:table-cell>
          <table:table-cell table:style-name="Tabelle22.E2" office:value-type="string">
            <text:p text:style-name="P122">X24</text:p>
          </table:table-cell>
        </table:table-row>
        <table:table-row>
          <table:table-cell table:style-name="Tabelle22.A2" office:value-type="string">
            <text:p text:style-name="P122">X &gt;= L3</text:p>
          </table:table-cell>
          <table:table-cell table:style-name="Tabelle22.A2" office:value-type="string">
            <text:p text:style-name="P122">X31</text:p>
          </table:table-cell>
          <table:table-cell table:style-name="Tabelle22.A2" office:value-type="string">
            <text:p text:style-name="P122">X32</text:p>
          </table:table-cell>
          <table:table-cell table:style-name="Tabelle22.A2" office:value-type="string">
            <text:p text:style-name="P122">X33</text:p>
          </table:table-cell>
          <table:table-cell table:style-name="Tabelle22.E2" office:value-type="string">
            <text:p text:style-name="P122">X34</text:p>
          </table:table-cell>
        </table:table-row>
      </table:table>
      <text:p text:style-name="P167"/>
      <text:list xml:id="list33656378" text:continue-numbering="true" text:style-name="L1">
        <text:list-item>
          <text:list>
            <text:list-item>
              <text:h text:style-name="P217" text:outline-level="2"><text:soft-page-break/><text:alphabetical-index-mark-start text:id="IMark100801540"/>SIGNAL<text:alphabetical-index-mark-end text:id="IMark100801540"/></text:h>
            </text:list-item>
          </text:list>
        </text:list-item>
      </text:list>
      <text:p text:style-name="P22">Type<text:tab/>Funktionsbaustein</text:p>
      <text:p text:style-name="P22"><text:span text:style-name="T16">Input</text:span><text:tab/>IN : BOOL (Freigabeeingang)</text:p>
      <text:p text:style-name="P55"><text:tab/>SIG : BYTE (Bitpattern)</text:p>
      <text:p text:style-name="P55"><text:tab/>TS : TIME (Schaltzeit)</text:p>
      <text:p text:style-name="P168"><draw:frame draw:style-name="fr4" draw:name="Grafik415" text:anchor-type="paragraph" svg:x="1.09cm" svg:y="0.69cm" svg:width="2.101cm" svg:height="1.891cm" draw:z-index="409"><draw:image xlink:href="Pictures/100000000000009F0000008F381C00AF.png" xlink:type="simple" xlink:show="embed" xlink:actuate="onLoad"/></draw:frame>Output<text:tab/>Q : BOOL (Ausgangssignal)</text:p>
      <text:p text:style-name="P168"><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 text:style-name="T16">Pattern</text:span> von 10101010 erzeugt eine Ausgangssignal mit 50% <text:span text:style-name="T16">Duty</text:span> <text:span text:style-name="T16">Cycle</text:span> und einer Frequenz die 1 / 2*S entspricht. Ein <text:span text:style-name="T16">Pattern</text:span> von 11110000 erzeugt hingegen ein Ausgangssignal von 50% DC und einer Frequenz von 1 / 8*TS. Der Start eines Ausgangssignals ist zufällig. Die <text:span text:style-name="T24">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68">Die folgende Grafik verdeutlicht die Funktionsweise von SIGANL für</text:p>
      <text:p text:style-name="P168">SIG = 2#1111_0000:</text:p>
      <text:p text:style-name="P168"><draw:frame draw:style-name="fr4" draw:name="Grafik417" text:anchor-type="paragraph" svg:x="1.025cm" svg:y="0.079cm" svg:width="11.375cm" svg:height="2.521cm" draw:z-index="411"><draw:image xlink:href="Pictures/10000000000001AE0000007FE6D1F7D1.png" xlink:type="simple" xlink:show="embed" xlink:actuate="onLoad"/></draw:frame></text:p>
      <text:list xml:id="list33642663" text:continue-numbering="true" text:style-name="L1">
        <text:list-item>
          <text:list>
            <text:list-item>
              <text:h text:style-name="P217" text:outline-level="2"><text:soft-page-break/><text:alphabetical-index-mark-start text:id="IMark100801540"/>SIGNAL_4<text:alphabetical-index-mark-end text:id="IMark100801540"/></text:h>
            </text:list-item>
          </text:list>
        </text:list-item>
      </text:list>
      <text:p text:style-name="P22">Type<text:tab/>Funktionsbaustein</text:p>
      <text:p text:style-name="P22"><text:span text:style-name="T16">Input</text:span><text:tab/>IN1..IN4 : BOOL (Eingang für Bitpattern S1..S4)</text:p>
      <text:p text:style-name="P55"><text:tab/>TS : TIME (Schaltzeit)</text:p>
      <text:p text:style-name="P55">Config<text:tab/>S1 .. S4 : BYTE (Bitpattern S1 .. S4)</text:p>
      <text:p text:style-name="P168"><draw:frame draw:style-name="fr4" draw:name="Grafik416" text:anchor-type="paragraph" svg:x="1.046cm" svg:y="0.69cm" svg:width="2.499cm" svg:height="2.679cm" draw:z-index="410"><draw:image xlink:href="Pictures/10000000000000BD000000CB506CA3AC.png" xlink:type="simple" xlink:show="embed" xlink:actuate="onLoad"/></draw:frame>Output<text:tab/>Q : BOOL (Ausgangssignal)</text:p>
      <text:p text:style-name="P168"><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Config Variablen S1 .. S4 abgelegt und können vom Anwender jederzeit angepasst werden.</text:p>
      <text:p text:style-name="P168"><draw:frame draw:style-name="fr4" draw:name="Grafik418" text:anchor-type="paragraph" svg:x="2.852cm" svg:y="0.827cm" svg:width="11.031cm" svg:height="5.669cm" draw:z-index="412"><draw:image xlink:href="Pictures/10000000000001A10000011E7F03639C.png" xlink:type="simple" xlink:show="embed" xlink:actuate="onLoad"/></draw:frame>Der Baustein hat per folgende Bitpattern voreingestellt, welche aber vom Anwender bei Bedarf verändert werden können:</text:p>
      <text:p text:style-name="P168">S1 = 2#1111_1111</text:p>
      <text:p text:style-name="P168">S2 = 2#1111_0000</text:p>
      <text:p text:style-name="P168">S3 = 2#1010_1010</text:p>
      <text:p text:style-name="P168">S4 = 2#1010_0000</text:p>
      <text:list xml:id="list33645156" text:continue-numbering="true" text:style-name="L1">
        <text:list-item>
          <text:list>
            <text:list-item>
              <text:h text:style-name="P217" text:outline-level="2"><text:soft-page-break/><text:alphabetical-index-mark-start text:id="IMark100801540"/>SRAMP<text:alphabetical-index-mark-end text:id="IMark100801540"/></text:h>
            </text:list-item>
          </text:list>
        </text:list-item>
      </text:list>
      <text:p text:style-name="P22">Type<text:tab/>Funktionsbaustein</text:p>
      <text:p text:style-name="P22"><text:span text:style-name="T16">Input</text:span><text:tab/>X: REAL (Eingangssignal)</text:p>
      <text:p text:style-name="P168"><text:tab/>A_UP : REAL (Maximale Beschleunigung Aufwärts)</text:p>
      <text:p text:style-name="P168"><text:tab/>A_DN : REAL (Maximale Beschleunigung Abwärts)</text:p>
      <text:p text:style-name="P168"><text:tab/>VU_MAX : REAL (Maximale Geschwindigkeit Aufwärts)</text:p>
      <text:p text:style-name="P168"><text:tab/>VD_MAX : REAL (Maximale Geschwindigkeit Abwärts)</text:p>
      <text:p text:style-name="P168"><text:tab/>LIMIT_HIGH : REAL (Ausgangslimit <text:span text:style-name="T16">High</text:span>)</text:p>
      <text:p text:style-name="P168"><text:tab/>LIMIT_LOW : REAL (Ausgangslimit <text:span text:style-name="T16">Low</text:span>)</text:p>
      <text:p text:style-name="P168"><text:tab/>RST : BOOL (Asynchroner Reset)</text:p>
      <text:p text:style-name="P168">Output<text:tab/>Y : REAL (Ausgangssignal)</text:p>
      <text:p text:style-name="P168"><draw:frame draw:style-name="fr4" draw:name="Grafik522" text:anchor-type="paragraph" svg:x="0.981cm" svg:y="0.727cm" svg:width="4.791cm" svg:height="3.9cm" draw:z-index="528"><draw:image xlink:href="Pictures/100000000000016A00000127117DF9A7.png" xlink:type="simple" xlink:show="embed" xlink:actuate="onLoad"/></draw:frame><text:tab/>V : REAL (Momentane Geschwindigkeit des Ausgangssignals)</text:p>
      <text:p text:style-name="P168"><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168">Im folgenden Schema ist die Interne Arbeitsweise von SRAMP ersichtlich. Ein Rampengenerator X2 stellt die Geschwindigkeit mit der sich der Ausgang verändern darf ein und ein Zweiter Rampengenerator X3 steuert den Ausgang.</text:p>
      <text:p text:style-name="P168"><draw:frame draw:style-name="fr4" draw:name="Grafik523" text:anchor-type="paragraph" svg:x="1.312cm" svg:y="0.111cm" svg:width="15.109cm" svg:height="3.919cm" draw:z-index="529"><draw:image xlink:href="Pictures/10000000000002CA000000B98D0C8905.png" xlink:type="simple" xlink:show="embed" xlink:actuate="onLoad"/></draw:frame></text:p>
      <text:p text:style-name="P168"><draw:frame draw:style-name="fr17" draw:name="Grafik524" text:anchor-type="paragraph" svg:x="6.272cm" svg:y="0.325cm" svg:width="10.73cm" svg:height="6.05cm" draw:z-index="530"><draw:image xlink:href="Pictures/100000000000021D00000131EB477768.png" xlink:type="simple" xlink:show="embed" xlink:actuate="onLoad"/></draw:frame><text:soft-page-break/>Die <text:span text:style-name="T16">Trace</text:span>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p>
      <text:p text:style-name="P168">Die Eingangswerte für A_UP und VU_MAX müssen mit positivem Vorzeichen angegeben werden, <text:s/>A_DN und VD_MAX benötigen ein negatives Vorzeichen.</text:p>
      <text:list xml:id="list33633150" text:continue-numbering="true" text:style-name="L1">
        <text:list-item>
          <text:list>
            <text:list-item>
              <text:h text:style-name="P217" text:outline-level="2"><text:alphabetical-index-mark-start text:id="IMark100801540"/>TANK_LEVEL<text:alphabetical-index-mark-end text:id="IMark100801540"/></text:h>
            </text:list-item>
          </text:list>
        </text:list-item>
      </text:list>
      <text:p text:style-name="P22">Type<text:tab/>Funktionsbaustein</text:p>
      <text:p text:style-name="P22"><text:span text:style-name="T16">Input</text:span><text:tab/>LEVEL<text:span text:style-name="T35"> : BOOL (Eingang für Niveau Sensor)</text:span></text:p>
      <text:p text:style-name="P55"><text:tab/>LEAK : BOOL (Eingang für Leck Sensoren)</text:p>
      <text:p text:style-name="P55"><text:tab/>ACLR : BOOL (Eingang zum Rücksetzen des Alarms)</text:p>
      <text:p text:style-name="P55">Config<text:tab/>MAX_VALVE_TIME (Maximale Nachspeisezeit für Ventil)</text:p>
      <text:p text:style-name="P55"><text:tab/>LEVEL_DELAY_TIME : TIME (Ansprechzeit für LEVEL Eingang)</text:p>
      <text:p text:style-name="P168">Output<text:tab/>VALVE : BOOL (Ausgangssignal zum Ventil)</text:p>
      <text:p text:style-name="P168"><text:tab/>ALARM : BOOL (Alarmausgang)</text:p>
      <text:p text:style-name="P168"><draw:frame draw:style-name="fr4" draw:name="Grafik578" text:anchor-type="paragraph" svg:x="1.002cm" svg:y="0.64cm" svg:width="3.62cm" svg:height="2.2cm" draw:z-index="595"><draw:image xlink:href="Pictures/1000000000000112000000A613829649.png" xlink:type="simple" xlink:show="embed" xlink:actuate="onLoad"/></draw:frame><text:tab/>STATUS : BYTE (ESR kompatibler Status Ausgang)</text:p>
      <text:p text:style-name="P168"><text:line-break/>TANK_LEVEL dient dazu den Flüssigkeitsstand in einem Tank konstant zu halten. Am Eingang LEVEL wird der Nieveausensor angeschlossen und am Ausgang VAL<text:soft-page-break/>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168">STATUS = 1, Lecksensor (LEAK) ist aktiviert.</text:p>
      <text:p text:style-name="P168">STATUS = 2, Nachspeisezeit (MAX_VALVE_TIME) wurde überschritten.</text:p>
      <text:p text:style-name="P168">STATUS = 100, Niveau ist erreicht, Nachspeisung abgeschaltet.</text:p>
      <text:p text:style-name="P168">STATUS = 101, ACLR wurde betätigt.</text:p>
      <text:p text:style-name="P168">STATUS = 102, Niveau unterschritten, Nachspeisung läuft.</text:p>
      <text:list xml:id="list33634779" text:continue-numbering="true" text:style-name="L1">
        <text:list-item>
          <text:list>
            <text:list-item>
              <text:h text:style-name="P217" text:outline-level="2"><text:alphabetical-index-mark-start text:id="IMark100801540"/>TUNE<text:alphabetical-index-mark-end text:id="IMark100801540"/></text:h>
            </text:list-item>
          </text:list>
        </text:list-item>
      </text:list>
      <text:p text:style-name="P22">Type<text:tab/>Funktionsbaustein</text:p>
      <text:p text:style-name="P22"><text:span text:style-name="T16">Input</text:span><text:tab/>SET : BOOL (Asynchroner Set Eingang)</text:p>
      <text:p text:style-name="P52"><text:tab/>SU, SD : BOOL (Eingänge für Auf und Ab)</text:p>
      <text:p text:style-name="P52"><text:tab/>RST : BOOL (Asynchroner Reset Eingang)</text:p>
      <text:p text:style-name="P52">Config<text:tab/>SS : REAL (Schrittweite für kleiner Schritt)</text:p>
      <text:p text:style-name="P52"><text:tab/>Limit_L : REAL (unterer Grenzwert)</text:p>
      <text:p text:style-name="P52"><text:tab/>Limit_H : REAL (oberer Grenzwert)</text:p>
      <text:p text:style-name="P52"><text:tab/>RST_VAL : REAL ( Ausgangswert nach Reset)</text:p>
      <text:p text:style-name="P52"><text:tab/>SET_VAL : REAL (Ausgangswert nach SET)</text:p>
      <text:p text:style-name="P55"><text:tab/>T1 : TIME (Zeit nach der die erste Rampe anläuft)</text:p>
      <text:p text:style-name="P55"><text:tab/>T1 : TIME (Zeit nach der die zweite Rampe anläuft)</text:p>
      <text:p text:style-name="P55"><text:tab/>S1 : REAL (Geschwindigkeit für erste Rampe)</text:p>
      <text:p text:style-name="P55"><text:soft-page-break/><text:tab/>S2 : REAL (Geschwindigkeit für zweite Rampe)</text:p>
      <text:p text:style-name="P55"><draw:frame draw:style-name="fr4" draw:name="Grafik380" text:anchor-type="paragraph" svg:x="1.046cm" svg:y="0.69cm" svg:width="2.281cm" svg:height="2.311cm" draw:z-index="374"><draw:image xlink:href="Pictures/10000000000000AC000000AF2235F3AD.png" xlink:type="simple" xlink:show="embed" xlink:actuate="onLoad"/></draw:frame>Output<text:tab/>Y : REAL (Ausgangssignal)</text:p>
      <text:p text:style-name="P168"><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xml:id="list33631397" text:continue-numbering="true" text:style-name="L1">
        <text:list-item>
          <text:list>
            <text:list-item>
              <text:h text:style-name="P217" text:outline-level="2"><text:alphabetical-index-mark-start text:id="IMark100801540"/>TUNE2<text:alphabetical-index-mark-end text:id="IMark100801540"/></text:h>
            </text:list-item>
          </text:list>
        </text:list-item>
      </text:list>
      <text:p text:style-name="P22">Type<text:tab/>Funktionsbaustein</text:p>
      <text:p text:style-name="P22"><text:span text:style-name="T16">Input</text:span><text:tab/>SET : BOOL (Asynchroner Set Eingang)</text:p>
      <text:p text:style-name="P52"><text:tab/>SU, SD : BOOL (Eingänge für Auf und Ab in kleinen Schritten)</text:p>
      <text:p text:style-name="P52"><text:tab/>FU, FD : BOOL (Eingänge für Auf und Ab in großen Schritten)</text:p>
      <text:p text:style-name="P52"><text:tab/>RST : BOOL (Asynchroner Reset Eingang)</text:p>
      <text:p text:style-name="P52">Config<text:tab/>SS : REAL (Schrittweite für kleine Schritte)</text:p>
      <text:p text:style-name="P52"><text:tab/>FS : REAL (Schrittweite für große Schritte)</text:p>
      <text:p text:style-name="P52"><text:tab/>Limit_L : REAL (unterer Grenzwert)</text:p>
      <text:p text:style-name="P52"><text:tab/>Limit_H : REAL (oberer Grenzwert)</text:p>
      <text:p text:style-name="P52"><text:tab/>RST_VAL : REAL ( Ausgangswert nach Reset)</text:p>
      <text:p text:style-name="P52"><text:tab/>SET_VAL : REAL (Ausgangswert nach SET)</text:p>
      <text:p text:style-name="P55"><text:tab/>TR : TIME (Zeit nach der die Rampe anläuft)</text:p>
      <text:p text:style-name="P55"><text:tab/>S1 : REAL (Geschwindigkeit für kleine Rampe)</text:p>
      <text:p text:style-name="P55"><text:tab/>S2 : REAL (Geschwindigkeit für große Rampe)</text:p>
      <text:p text:style-name="P55"><draw:frame draw:style-name="fr4" draw:name="Grafik378" text:anchor-type="paragraph" svg:x="1.09cm" svg:y="0.688cm" svg:width="2.101cm" svg:height="3.11cm" draw:z-index="373"><draw:image xlink:href="Pictures/100000000000009F000000EB8A14BA85.png" xlink:type="simple" xlink:show="embed" xlink:actuate="onLoad"/></draw:frame><text:soft-page-break/>Output<text:tab/>Y : REAL (Ausgangssignal)</text:p>
      <text:p text:style-name="P55"><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xml:id="list33630896" text:continue-numbering="true" text:style-name="L1">
        <text:list-item>
          <text:h text:style-name="P211" text:outline-level="1">Geräte Treiber</text:h>
        </text:list-item>
      </text:list>
      <text:p text:style-name="P16"/>
      <text:list xml:id="list33633685" text:continue-numbering="true" text:style-name="L1">
        <text:list-item>
          <text:list>
            <text:list-item>
              <text:h text:style-name="P222" text:outline-level="2">IRTRANS</text:h>
            </text:list-item>
          </text:list>
        </text:list-item>
      </text:list>
      <text:p text:style-name="P25">Die Bausteine IRTRANS_? stellen ein Interface für Infrarot <text:span text:style-name="T16">Transmitter</text:span> der Firma IRTrans GmbH zur Verfügung. IRTrans bietet <text:span text:style-name="T16">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6">Buffer Interface</text:span> auf welches in einen <text:span text:style-name="T16">Buffer</text:span> (Array <text:span text:style-name="T16">of</text:span> Byte) die Daten und in einem <text:span text:style-name="T16">Counter</text:span> die Länge des Datenpakets in Bytes zur Verfügung stellt. Die IRTrans Geräte erlernen beliebige IR Tastencodes und setzten diese mittels einer konfigurierbaren Datenbank in ASCII <text:span text:style-name="T16">Strings</text:span> um. Mit der Ethernet Variante werden diese <text:span text:style-name="T16">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6">Transmitter</text:span> Module möglich.</text:p>
      <text:list xml:id="list33631564" text:continue-numbering="true" text:style-name="L1">
        <text:list-item>
          <text:list>
            <text:list-item>
              <text:list>
                <text:list-item>
                  <text:h text:style-name="P217" text:outline-level="2"><text:alphabetical-index-mark-start text:id="IMark100801540"/>IRTRANS_1<text:alphabetical-index-mark-end text:id="IMark100801540"/></text:h>
                </text:list-item>
              </text:list>
            </text:list-item>
          </text:list>
        </text:list-item>
      </text:list>
      <text:p text:style-name="Standard">Type<text:tab/><text:span text:style-name="T38">Funktionsbaustein</text:span></text:p>
      <text:p text:style-name="Standard"><text:span text:style-name="T16">Input</text:span><text:tab/><text:span text:style-name="T38">CMD</text:span> : BOOL (TRUE wenn Daten zum Auswerten Anliegen)</text:p>
      <text:p text:style-name="P55"><text:tab/>DEVICE : STRING (Name der Fernsteuerung)</text:p>
      <text:p text:style-name="P55"><text:tab/>KEY : STRING (NAME der Taste)</text:p>
      <text:p text:style-name="P55">Config<text:tab/>DEVICE_CODE : STRING (zu dekodierender Fernsteuerungsname)</text:p>
      <text:p text:style-name="P55"><text:tab/>KEY_CODE : STRING (zu dekodierender Tastencode)</text:p>
      <text:p text:style-name="P55"><draw:frame draw:style-name="fr4" draw:name="Grafik423" text:anchor-type="paragraph" svg:x="1.025cm" svg:y="0.672cm" svg:width="4.09cm" svg:height="1.921cm" draw:z-index="427"><draw:image xlink:href="Pictures/100000000000013500000091B1430468.png" xlink:type="simple" xlink:show="embed" xlink:actuate="onLoad"/></draw:frame>Output<text:tab/>Q : BOOL (Ausgangssignal)</text:p>
      <text:p text:style-name="P55"><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55">Das folgende Beispiel zeigt die Anwendung von IRTRANS_1:</text:p>
      <text:p text:style-name="P55"><draw:frame draw:style-name="fr4" draw:name="Grafik429" text:anchor-type="paragraph" svg:x="1.023cm" svg:y="0.012cm" svg:width="15.998cm" svg:height="2.314cm" draw:z-index="433"><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6">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55">Wenn mehrere <text:span text:style-name="T16">Key</text:span> Codes ausgewertet werden sollen können alternativ die Bausteine IRTRANS_4 oder IRTRANS_8 verwendet werden oder mehrere dieser Bausteine parallel betrieben werden.</text:p>
      <text:p text:style-name="P55"><draw:frame draw:style-name="fr4" draw:name="Grafik430" text:anchor-type="paragraph" svg:x="1.157cm" svg:y="0.093cm" svg:width="13.651cm" svg:height="6.668cm" draw:z-index="434"><draw:image xlink:href="Pictures/1000000000000204000000FC13E17D34.png" xlink:type="simple" xlink:show="embed" xlink:actuate="onLoad"/></draw:frame></text:p>
      <text:list xml:id="list33638058" text:continue-numbering="true" text:style-name="L1">
        <text:list-item>
          <text:list>
            <text:list-item>
              <text:list>
                <text:list-item>
                  <text:h text:style-name="P217" text:outline-level="2"><text:soft-page-break/><text:alphabetical-index-mark-start text:id="IMark100801540"/>IRTRANS_4<text:alphabetical-index-mark-end text:id="IMark100801540"/></text:h>
                </text:list-item>
              </text:list>
            </text:list-item>
          </text:list>
        </text:list-item>
      </text:list>
      <text:p text:style-name="Standard">Type<text:tab/><text:span text:style-name="T38">Funktionsbaustein</text:span></text:p>
      <text:p text:style-name="P25"><text:span text:style-name="T16">Input</text:span><text:tab/>CMD : BOOL (TRUE wenn Daten zum Auswerten Anliegen)</text:p>
      <text:p text:style-name="P55"><text:tab/>DEVICE : STRING (Name der Fernsteuerung)</text:p>
      <text:p text:style-name="P55"><text:tab/>KEY : STRING (NAME der Taste)</text:p>
      <text:p text:style-name="P55">Config<text:tab/>DEVICE_CODE : STRING (zu dekodierender Fernsteuerungsname)</text:p>
      <text:p text:style-name="P55"><text:tab/>KEY_CODE_0..7 : STRING (zu dekodierender Tastencode)</text:p>
      <text:p text:style-name="P25"><draw:frame draw:style-name="fr4" draw:name="Grafik426" text:anchor-type="paragraph" svg:x="1.067cm" svg:y="0.688cm" svg:width="4.09cm" svg:height="3.11cm" draw:z-index="429"><draw:image xlink:href="Pictures/1000000000000135000000EB48796D29.png" xlink:type="simple" xlink:show="embed" xlink:actuate="onLoad"/></draw:frame>Output<text:tab/>Q : BOOL (Ausgangssignal)</text:p>
      <text:p text:style-name="P55"><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3643543" text:continue-numbering="true" text:style-name="L1">
        <text:list-item>
          <text:list>
            <text:list-item>
              <text:list>
                <text:list-item>
                  <text:h text:style-name="P217" text:outline-level="2"><text:alphabetical-index-mark-start text:id="IMark100801540"/>IRTRANS_8<text:alphabetical-index-mark-end text:id="IMark100801540"/></text:h>
                </text:list-item>
              </text:list>
            </text:list-item>
          </text:list>
        </text:list-item>
      </text:list>
      <text:p text:style-name="Standard">Type<text:tab/><text:tab/><text:span text:style-name="T38">Funktionsbaustein</text:span></text:p>
      <text:p text:style-name="Standard"><text:span text:style-name="T16">Input</text:span><text:tab/><text:tab/><text:span text:style-name="T38">CMD</text:span> : BOOL (TRUE wenn Daten zum Auswerten Anliegen)</text:p>
      <text:p text:style-name="P55"><text:tab/>DEVICE : STRING (Name der Fernsteuerung)</text:p>
      <text:p text:style-name="P55"><text:tab/>KEY : STRING (NAME der Taste)</text:p>
      <text:p text:style-name="P55">Config<text:tab/>DEVICE_CODE : STRING (zu dekodierender Fernsteuerungsname)</text:p>
      <text:p text:style-name="P55"><text:tab/>KEY_CODE_0..7 : STRING (zu dekodierender Tastencode)</text:p>
      <text:p text:style-name="P25"><draw:frame draw:style-name="fr4" draw:name="Grafik425" text:anchor-type="paragraph" svg:x="1.092cm" svg:y="0.691cm" svg:width="4.09cm" svg:height="4.701cm" draw:z-index="428"><draw:image xlink:href="Pictures/100000000000013500000163EB0BE201.png" xlink:type="simple" xlink:show="embed" xlink:actuate="onLoad"/></draw:frame>Output<text:tab/>Q0..Q7 : BOOL (Ausgangssignal)</text:p>
      <text:p text:style-name="P55"><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3656468" text:continue-numbering="true" text:style-name="L1">
        <text:list-item>
          <text:list>
            <text:list-item>
              <text:list>
                <text:list-item>
                  <text:h text:style-name="P217" text:outline-level="2"><text:alphabetical-index-mark-start text:id="IMark100801540"/>IRTRANS_DECODE<text:alphabetical-index-mark-end text:id="IMark100801540"/></text:h>
                </text:list-item>
              </text:list>
            </text:list-item>
          </text:list>
        </text:list-item>
      </text:list>
      <text:p text:style-name="Standard">Type<text:tab/><text:span text:style-name="T38">Funktionsbaustein</text:span></text:p>
      <text:p text:style-name="P25"><text:span text:style-name="T16">Input</text:span><text:tab/>BUFFER : <text:span text:style-name="T16">Pointer</text:span> <text:span text:style-name="T16">to</text:span> ARRAY <text:span text:style-name="T16">of</text:span> BYTE (Datenpuffer)</text:p>
      <text:p text:style-name="P55"><text:tab/>LENGTH : INT (Länge der Daten im Puffer)</text:p>
      <text:p text:style-name="P55">Output<text:tab/>CMD : BOOL (TRUE wenn gültige Daten am Ausgang anliegen)</text:p>
      <text:p text:style-name="P55"><text:tab/>DEVICE : STRING (Name der Fernsteuerung)</text:p>
      <text:p text:style-name="P55"><text:tab/>KEY : STRING (Name des Tastencodes)</text:p>
      <text:p text:style-name="P55"><draw:frame draw:style-name="fr4" draw:name="Grafik424" text:anchor-type="paragraph" svg:x="1.09cm" svg:y="0.663cm" svg:width="3.69cm" svg:height="2.311cm" draw:z-index="432"><draw:image xlink:href="Pictures/1000000000000117000000AF72734374.png" xlink:type="simple" xlink:show="embed" xlink:actuate="onLoad"/></draw:frame><text:tab/>ERROR : BOOL (TRUE wenn ein ungültiges Datenpaket vorliegt)</text:p>
      <text:p text:style-name="P55"><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6">Point</text:span><text:span text:style-name="T16">er</text:span> ausgeführt um mit unterschiedlich großen Eingangspuffern arbei<text:soft-page-break/>ten zu können. Die Adresse des BUFFERS kann mit der Funktion ADR() ermittelt werden.</text:p>
      <text:p text:style-name="P55">Das Format ist wie folgt definiert:</text:p>
      <text:p text:style-name="P55">'Name der Fernsteuerung','Name des Tastencodes'$R$N</text:p>
      <text:p text:style-name="P55">Ein Datenpaket besteht aus dem Namen der Fernsteuerung, gefolgt von einem Komma und anschließend der Name des Tastencodes. Das Datenpaket wird mit einem <text:span text:style-name="T16">Carriage</text:span> <text:span text:style-name="T16">Return</text:span> und einem <text:span text:style-name="T16">Line</text:span> <text:span text:style-name="T16">Feed</text:span> abgeschlossen.</text:p>
      <text:p text:style-name="P55">Damit IRTRANS_DECODE funktioniert muss in der IRTrans Konfiguration die <text:span text:style-name="T16">Check box</text:span> BROADCAST IR RELAY angekreuzt sein und in der entsprechenden Device Datenbank unter DEFAULT ACTION muss der <text:span text:style-name="T16">String</text:span> '%r,%c\r\n' eingetragen sein. IRTRANS_DECODE wertet genau diesen <text:span text:style-name="T16">String</text:span> aus und dekodiert %r als Name der Fernbedienung und %c als die gedrückte Taste.</text:p>
      <text:p text:style-name="P55"><draw:frame draw:style-name="fr4" draw:name="Grafik431" text:anchor-type="paragraph" svg:x="1.002cm" svg:y="1.175cm" svg:width="15.998cm" svg:height="8.244cm" draw:z-index="435"><draw:image xlink:href="Pictures/100000000000030C00000192B06D045D.png" xlink:type="simple" xlink:show="embed" xlink:actuate="onLoad"/></draw:frame>Das <text:s/>folgende Beispiel zeigt die Anwendung von IRTRANS_DECODE mit einem UDP Server:</text:p>
      <text:p text:style-name="P55"><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55">IRTRANS Web Konfiguration:</text:p>
      <text:p text:style-name="P55"><draw:frame draw:style-name="fr4" draw:name="Grafik439" text:anchor-type="paragraph" svg:x="1.178cm" svg:y="0.101cm" svg:width="7.601cm" svg:height="5.98cm" draw:z-index="443"><draw:image xlink:href="Pictures/10000000000001BA0000015CA1438E68.png" xlink:type="simple" xlink:show="embed" xlink:actuate="onLoad"/></draw:frame><text:soft-page-break/></text:p>
      <text:list xml:id="list33626463" text:continue-numbering="true" text:style-name="L1">
        <text:list-item>
          <text:h text:style-name="P211" text:outline-level="1">Netzwerk und Kommunikation</text:h>
        </text:list-item>
      </text:list>
      <text:p text:style-name="P18"/>
      <text:list xml:id="list33645318" text:continue-numbering="true" text:style-name="L1">
        <text:list-item>
          <text:list>
            <text:list-item>
              <text:h text:style-name="P221" text:outline-level="2"><text:alphabetical-index-mark-start text:id="IMark100801540"/>HTML_DECODE<text:alphabetical-index-mark-end text:id="IMark100801540"/></text:h>
            </text:list-item>
          </text:list>
        </text:list-item>
      </text:list>
      <text:p text:style-name="Standard">Type<text:tab/><text:span text:style-name="T38">Funktion</text:span> : STRING(255)</text:p>
      <text:p text:style-name="P25"><text:span text:style-name="T16">Input</text:span><text:tab/>IN : STRING (<text:span text:style-name="T24">Zeichenkette</text:span>)</text:p>
      <text:p text:style-name="P55"><draw:frame draw:style-name="fr4" draw:name="Grafik564" text:anchor-type="paragraph" svg:x="1.002cm" svg:y="0.667cm" svg:width="4.881cm" svg:height="0.99cm" draw:z-index="575"><draw:image xlink:href="Pictures/10000000000001710000004B390C553B.png" xlink:type="simple" xlink:show="embed" xlink:actuate="onLoad"/></draw:frame>Output<text:tab/>STRING(255) (Zeichenkette)</text:p>
      <text:p text:style-name="P55"><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55">- &amp;#NN; wobei NN die Position des Zeichens innerhalb der Zeichentabelle in dezimaler Schreibweise darstellt.</text:p>
      <text:p text:style-name="P55">- &amp;#xNN; oder &amp;#XNN wobei NN die Position des Zeichens innerhalb der Zeichentabelle in hexadezimaler Schreibweise darstellt.</text:p>
      <text:p text:style-name="P55">&amp;Name; Sonderzeichen haben Namen wie zum Beispiel &amp;euro; für €.</text:p>
      <text:p text:style-name="P55">Die reservierten Zeichen in HTML sind:</text:p>
      <text:p text:style-name="P55">&amp; wird codiert als &amp;amp;</text:p>
      <text:p text:style-name="P55">&gt; wird codiert als &amp;gt;</text:p>
      <text:p text:style-name="P55">&lt; wird codiert als &amp;lt;</text:p>
      <text:p text:style-name="P55">" wird codiert als &amp;quot;</text:p>
      <text:p text:style-name="P55">Beispiele:</text:p>
      <text:p text:style-name="P55">HTML_DECODE('1 ist &amp;gt;als 0') = '1 ist &gt; als 0';</text:p>
      <text:p text:style-name="P55">HTML_DECODE('&amp;#D79;&amp;#D83;&amp;#D67;&amp;#D65;&amp;#D84;') = 'OSCAT';</text:p>
      <text:p text:style-name="P55">HTML_DECODE('&amp;#xH4F;&amp;#xH53;&amp;#xH43;&amp;#xH41;&amp;#xH54;') = 'OSCAT';</text:p>
      <text:p text:style-name="P55">HTML_DECODE('&amp;#XH4F;&amp;#XH53;&amp;#XH43;&amp;#XH41;&amp;#XH54;') = 'OSCAT';</text:p>
      <text:list xml:id="list33625617" text:continue-numbering="true" text:style-name="L1">
        <text:list-item>
          <text:list>
            <text:list-item>
              <text:h text:style-name="P221" text:outline-level="2"><text:soft-page-break/><text:alphabetical-index-mark-start text:id="IMark100801540"/>HTML_ENCODE<text:alphabetical-index-mark-end text:id="IMark100801540"/></text:h>
            </text:list-item>
          </text:list>
        </text:list-item>
      </text:list>
      <text:p text:style-name="Standard">Type<text:tab/>F<text:span text:style-name="T38">unktion</text:span> : STRING(255)</text:p>
      <text:p text:style-name="P25"><text:span text:style-name="T16">Input</text:span><text:tab/>IN : STRING (<text:span text:style-name="T24">Zeichenkette</text:span>)</text:p>
      <text:p text:style-name="P55"><text:tab/>M : BOOL (Mode)</text:p>
      <text:p text:style-name="P55"><draw:frame draw:style-name="fr4" draw:name="Grafik565" text:anchor-type="paragraph" svg:x="1.025cm" svg:y="0.644cm" svg:width="5.87cm" svg:height="1.57cm" draw:z-index="579"><draw:image xlink:href="Pictures/10000000000001BC00000077D8B300D6.png" xlink:type="simple" xlink:show="embed" xlink:actuate="onLoad"/></draw:frame>Output<text:tab/>STRING(255) (Zeichenkette)</text:p>
      <text:p text:style-name="P55"><text:line-break/>HTML_ENCODE wandelt in HTML reservierte Zeichen um in die Form &amp;Name;. Wird der Eingang M auf TRUE gesetzt werden zusätzlich alle Zeichen mit dem Code 160-255 und 128 in die &amp;Name Konvention umgesetzt.</text:p>
      <text:p text:style-name="P55">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55">Die reservierten Zeichen in HTML sind:</text:p>
      <text:p text:style-name="P55">&amp; wird codiert als &amp;amp;</text:p>
      <text:p text:style-name="P55">&gt; wird codiert als &amp;gt;</text:p>
      <text:p text:style-name="P55">&lt; wird codiert als &amp;lt;</text:p>
      <text:p text:style-name="P55">" wird codiert als &amp;quot;</text:p>
      <text:p text:style-name="P55">HTML_ENCODE wandelt die Zeichenkette '1 ist &gt; als 0' um in '1 ist &amp;gt;als 0'.</text:p>
      <text:list xml:id="list33628967" text:continue-numbering="true" text:style-name="L1">
        <text:list-item>
          <text:list>
            <text:list-item>
              <text:h text:style-name="P221" text:outline-level="2"><text:alphabetical-index-mark-start text:id="IMark100801540"/>IP4_CHECK<text:alphabetical-index-mark-end text:id="IMark100801540"/></text:h>
            </text:list-item>
          </text:list>
        </text:list-item>
      </text:list>
      <text:p text:style-name="Standard">Type<text:tab/><text:span text:style-name="T38">Funktion</text:span> : BOOL</text:p>
      <text:p text:style-name="P25"><text:span text:style-name="T16">Input</text:span><text:tab/>NIP : DWORD (Netzwerk IP Adresse)</text:p>
      <text:p text:style-name="P55"><text:tab/>LIP : DWORD (Lokale IP Adresse)</text:p>
      <text:p text:style-name="P55"><text:tab/>SM : DWORD (<text:span text:style-name="T16">Subnet</text:span> Maske)<text:tab/></text:p>
      <text:p text:style-name="P55"><draw:frame draw:style-name="fr4" draw:name="Grafik498" text:anchor-type="paragraph" svg:x="1.067cm" svg:y="0.623cm" svg:width="4.521cm" svg:height="2.02cm" draw:z-index="504"><draw:image xlink:href="Pictures/100000000000015600000099811A2099.png" xlink:type="simple" xlink:show="embed" xlink:actuate="onLoad"/></draw:frame>Output<text:tab/>BOOL (TRUE wenn NIP und LIP im gleichen <text:span text:style-name="T16">Subnet</text:span> liegen)</text:p>
      <text:p text:style-name="P55"><text:soft-page-break/><text:line-break/>IP4_CHECK prüft ob eine Netzwerkadresse NIP und die Lokale Adresse LIP im gleichen <text:span text:style-name="T16">Subnet</text:span> liegen. Beiden Adressen werden zuerst mit der <text:span text:style-name="T16">Subnet</text:span> Maske Maskiert und dann auf Gleichheit geprüft. Es werden nur die Bits auf Gleichheit geprüft die in der <text:span text:style-name="T16">Subnet</text:span> Maske TRUE sind. Die Netzwerk Adressen müssen dem Ipv4 Format entsprechen und als DWORD vorliegen. Sollen IP Adressen die als <text:span text:style-name="T16">String</text:span> vorliegen geprüft werden müssen diese vorher in DWORD gewandelt werden.</text:p>
      <text:p text:style-name="P55">Folgendes Beispiel zeigt 2 IP Adressen und eine <text:span text:style-name="T16">Subnet</text:span> Maske die als <text:span text:style-name="T16">String</text:span> vorliegen und nach entsprechender Umwandlung in DWORD geprüft werden. Der Ausgang wird TRUE weil beide Adressen im gleichen <text:span text:style-name="T16">Subnet</text:span> liegen.</text:p>
      <text:p text:style-name="P55"><draw:frame draw:style-name="fr4" draw:name="Grafik499" text:anchor-type="paragraph" svg:x="0.979cm" svg:y="0.145cm" svg:width="15.998cm" svg:height="3.591cm" draw:z-index="505"><draw:image xlink:href="Pictures/1000000000000286000000916F2D39A2.png" xlink:type="simple" xlink:show="embed" xlink:actuate="onLoad"/></draw:frame></text:p>
      <text:list xml:id="list33638090" text:continue-numbering="true" text:style-name="L1">
        <text:list-item>
          <text:list>
            <text:list-item>
              <text:h text:style-name="P221" text:outline-level="2"><text:alphabetical-index-mark-start text:id="IMark100801540"/>IP4_DECODE<text:alphabetical-index-mark-end text:id="IMark100801540"/></text:h>
            </text:list-item>
          </text:list>
        </text:list-item>
      </text:list>
      <text:p text:style-name="Standard">Type<text:tab/><text:span text:style-name="T38">Funktion</text:span> : DWORD</text:p>
      <text:p text:style-name="P25"><text:span text:style-name="T16">Input</text:span><text:tab/>STR : BOOL (Zeichenkette die die IP Adresse enthält)<text:tab/></text:p>
      <text:p text:style-name="P55"><draw:frame draw:style-name="fr4" draw:name="Grafik496" text:anchor-type="paragraph" svg:x="0.958cm" svg:y="0.623cm" svg:width="4.971cm" svg:height="1.12cm" draw:z-index="502"><draw:image xlink:href="Pictures/1000000000000178000000554C7C3E08.png" xlink:type="simple" xlink:show="embed" xlink:actuate="onLoad"/></draw:frame>Output<text:tab/>DWORD (dekodierte IP v4 Adresse)</text:p>
      <text:p text:style-name="P55"><text:line-break/>IP4_DECODE dekodiert die in STR enthaltene Zeichenkette als IP v4 Adresse und gibt diese als DWORD zurück. Eine Rückgabe von 0 bedeutet das eine ungültige Adresse oder die Adresse '0.0.0.0' ausgewertet wurde. IP4 kann auch zum Auswerten einer <text:span text:style-name="T16">Subnet</text:span> Maske des IP v4 Formates verwendet werden.</text:p>
      <text:list xml:id="list33653506" text:continue-numbering="true" text:style-name="L1">
        <text:list-item>
          <text:list>
            <text:list-item>
              <text:h text:style-name="P221" text:outline-level="2"><text:soft-page-break/><text:alphabetical-index-mark-start text:id="IMark100801540"/>IP4_TO_STRING<text:alphabetical-index-mark-end text:id="IMark100801540"/></text:h>
            </text:list-item>
          </text:list>
        </text:list-item>
      </text:list>
      <text:p text:style-name="Standard">Type<text:tab/><text:span text:style-name="T38">Funktion</text:span> : STRING(15)</text:p>
      <text:p text:style-name="P25"><text:span text:style-name="T16">Input</text:span><text:tab/>STR : BOOL (Zeichenkette die die IP Adresse enthält)<text:tab/></text:p>
      <text:p text:style-name="P55"><draw:frame draw:style-name="fr4" draw:name="Grafik556" text:anchor-type="paragraph" svg:x="1.023cm" svg:y="0.688cm" svg:width="5.87cm" svg:height="1.12cm" draw:z-index="563"><draw:image xlink:href="Pictures/10000000000001BC00000055534082D0.png" xlink:type="simple" xlink:show="embed" xlink:actuate="onLoad"/></draw:frame>Output<text:tab/>DWORD (dekodierte IP v4 Adresse)</text:p>
      <text:p text:style-name="P55"><text:line-break/>IP4_TO_STRING wandelt die als DWORD gespeicherte IP4 Adresse in IN in einen STRING um. Das Format entspricht 'NNN.NNN.NNN.NNN'.</text:p>
      <text:list xml:id="list33653261" text:continue-numbering="true" text:style-name="L1">
        <text:list-item>
          <text:list>
            <text:list-item>
              <text:h text:style-name="P221" text:outline-level="2"><text:alphabetical-index-mark-start text:id="IMark100801540"/>IS_IP4<text:alphabetical-index-mark-end text:id="IMark100801540"/></text:h>
            </text:list-item>
          </text:list>
        </text:list-item>
      </text:list>
      <text:p text:style-name="Standard">Type<text:tab/><text:tab/><text:span text:style-name="T38">Funktion</text:span> : BOOL</text:p>
      <text:p text:style-name="P25"><text:span text:style-name="T16">Input</text:span><text:tab/>STR : STRING (zu prüfende Zeichenkette)</text:p>
      <text:p text:style-name="P55"><draw:frame draw:style-name="fr4" draw:name="Grafik495" text:anchor-type="paragraph" svg:x="1.025cm" svg:y="0.688cm" svg:width="3.18cm" svg:height="1.12cm" draw:z-index="501"><draw:image xlink:href="Pictures/10000000000000F000000055B641A864.png" xlink:type="simple" xlink:show="embed" xlink:actuate="onLoad"/></draw:frame>Output<text:tab/>BOOL (TRUE wenn STR eine gültige IP v4 Adresse enthält)</text:p>
      <text:p text:style-name="P55"><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55">IS_IP4(0.0.0.0) = FALSE</text:p>
      <text:p text:style-name="P55">IS_IP4(255.255.255.255) = TRUE</text:p>
      <text:p text:style-name="P55">IS_IP4(256.255.255.255) = FALSE</text:p>
      <text:p text:style-name="P55">IS_IP4(0.1.2.) = FALSE</text:p>
      <text:p text:style-name="P55">IS_IP4(0.1.2.3.) = FALSE</text:p>
      <text:list xml:id="list33632017" text:continue-numbering="true" text:style-name="L1">
        <text:list-item>
          <text:list>
            <text:list-item>
              <text:h text:style-name="P221" text:outline-level="2"><text:soft-page-break/><text:alphabetical-index-mark-start text:id="IMark100801540"/>IS_URLCHR<text:alphabetical-index-mark-end text:id="IMark100801540"/></text:h>
            </text:list-item>
          </text:list>
        </text:list-item>
      </text:list>
      <text:p text:style-name="Standard">Type<text:tab/><text:span text:style-name="T38">Funktion</text:span> : BOOL</text:p>
      <text:p text:style-name="P25"><text:span text:style-name="T16">Input</text:span><text:tab/>STR : STRING (zu prüfende Zeichenkette)</text:p>
      <text:p text:style-name="P55"><draw:frame draw:style-name="fr4" draw:name="Grafik557" text:anchor-type="paragraph" svg:x="1.067cm" svg:y="0.667cm" svg:width="4.09cm" svg:height="0.99cm" draw:z-index="567"><draw:image xlink:href="Pictures/10000000000001350000004BCAE19C1F.png" xlink:type="simple" xlink:show="embed" xlink:actuate="onLoad"/></draw:frame>Output<text:tab/>BOOL (TRUE wenn STR eine gültige IP v4 Adresse enthält)</text:p>
      <text:p text:style-name="P55"><text:line-break/>IS_URLCHR prüft ob die Zeichenkette nur zulässige Zeichen für eine URL Kodierung enthält. Enthält die Zeichenkette reservierte Zeichen gibt Sie FALSE zurück, andernfalls TRUE.</text:p>
      <text:p text:style-name="P55">Für eine URL sind folgende Zeichen zulässig:</text:p>
      <text:p text:style-name="P55">[A..Z]<text:line-break/>[a..z]<text:line-break/>[0..9]<text:line-break/>[-._~]</text:p>
      <text:p text:style-name="P55">alle anderen Zeichen sind reserviert oder nicht zulässig.</text:p>
      <text:list xml:id="list33626644" text:continue-numbering="true" text:style-name="L1">
        <text:list-item>
          <text:list>
            <text:list-item>
              <text:h text:style-name="P221" text:outline-level="2"><text:alphabetical-index-mark-start text:id="IMark100801540"/>STRING_TO_URL<text:alphabetical-index-mark-end text:id="IMark100801540"/></text:h>
            </text:list-item>
          </text:list>
        </text:list-item>
      </text:list>
      <text:p text:style-name="Standard">Type<text:tab/><text:tab/><text:span text:style-name="T38">Funktion</text:span> : URL</text:p>
      <text:p text:style-name="P25"><text:span text:style-name="T16">Input</text:span><text:tab/>STR : STRING (<text:span text:style-name="T16">Unified</text:span> <text:span text:style-name="T16">Resource</text:span> <text:span text:style-name="T16">Locator</text:span>)</text:p>
      <text:p text:style-name="P55"><text:tab/>DEFAULT_PROTOCOL : STRING (Ersatzprotokoll)</text:p>
      <text:p text:style-name="P55"><text:tab/>DEFAULT_PATH : STRING (Ersatzpfad)<text:tab/></text:p>
      <text:p text:style-name="P55"><draw:frame draw:style-name="fr4" draw:name="Grafik552" text:anchor-type="paragraph" svg:x="1.046cm" svg:y="0.688cm" svg:width="7.669cm" svg:height="2.02cm" draw:z-index="566"><draw:image xlink:href="Pictures/10000000000002440000009974136929.png" xlink:type="simple" xlink:show="embed" xlink:actuate="onLoad"/></draw:frame>Output<text:tab/>URL (URL)</text:p>
      <text:p text:style-name="P55"><text:line-break/>DECODE_URL zerlegt eine URL (<text:span text:style-name="T16">Uniform</text:span> <text:span text:style-name="T28">Resource</text:span> <text:span text:style-name="T28">Locator</text:span>) in seine Bestandteile und speichert diese in dem Datentyp URL. Wird in STR kein Pfad oder kein Protokoll spezifiziert, so setzt die Funktion die fehlenden Werte Automatisch mit den spezifizierten Ersatzwerten.</text:p>
      <text:p text:style-name="P55">Eine URL setzt sich wie folgt zusammen:</text:p>
      <text:p text:style-name="P55"><text:soft-page-break/><text:span text:style-name="T27">protokoll</text:span>://<text:span text:style-name="T23">user</text:span>:<text:a xlink:type="simple" xlink:href="mailto:passwort@domain"><text:span text:style-name="T44">passwort</text:span></text:a><text:a xlink:type="simple" xlink:href="mailto:passwort@domain"><text:span text:style-name="T45">@</text:span></text:a><text:a xlink:type="simple" xlink:href="mailto:passwort@domain"><text:span text:style-name="T44">domain</text:span></text:a>:<text:span text:style-name="T23">port</text:span>/<text:span text:style-name="T23">path</text:span>?<text:span text:style-name="T23">query</text:span>#<text:span text:style-name="T23">anker</text:span></text:p>
      <text:p text:style-name="P55">Beispiel: <text:a xlink:type="simple" xlink:href="ftp://hugo:nono@oscat.de:1234/download/manual.html">ftp://hugo:nono@oscat.de:1234/download/manual.html</text:a></text:p>
      <text:p text:style-name="P55">einige Bestandteile der URL sind optional wie zum Beispiel User, Passwort, Anker, <text:span text:style-name="T16">Query</text:span> ...</text:p>
      <text:list xml:id="list33649058" text:continue-numbering="true" text:style-name="L1">
        <text:list-item>
          <text:list>
            <text:list-item>
              <text:h text:style-name="P221" text:outline-level="2"><text:alphabetical-index-mark-start text:id="IMark100801540"/>URL_DECODE<text:alphabetical-index-mark-end text:id="IMark100801540"/></text:h>
            </text:list-item>
          </text:list>
        </text:list-item>
      </text:list>
      <text:p text:style-name="Standard">Type<text:tab/><text:tab/><text:span text:style-name="T38">Funktion</text:span> : STRING(255)</text:p>
      <text:p text:style-name="P25"><text:span text:style-name="T16">Input</text:span><text:tab/>IN : STRING (<text:span text:style-name="T24">Zeichenkette</text:span>)</text:p>
      <text:p text:style-name="P55"><draw:frame draw:style-name="fr4" draw:name="Grafik558" text:anchor-type="paragraph" svg:x="1.09cm" svg:y="0.688cm" svg:width="4.48cm" svg:height="0.99cm" draw:z-index="569"><draw:image xlink:href="Pictures/10000000000001530000004B5DB5972F.png" xlink:type="simple" xlink:show="embed" xlink:actuate="onLoad"/></draw:frame>Output<text:tab/>STRING(255) (Zeichenkette)</text:p>
      <text:p text:style-name="P55"><text:line-break/>URL_DECODE wandelt die als %HH codierten Sonderzeichen in der Zeichenkette IN in den entsprechenden ASCII Code um. In einer URL Kodierung dürfen nur die Zeichen [A..Z, a..z, 0..9, -._~] vorkommen. Anderen Zeichen können mit einem % Zeichen gefolgt vom 2 Zeichen langen <text:span text:style-name="T24">Hexadezimalcode</text:span> des Zeichens dargestellt werden. Das reservierte Zeichen '#' wird dabei als '%23' kodiert.</text:p>
      <text:list xml:id="list33625434" text:continue-numbering="true" text:style-name="L1">
        <text:list-item>
          <text:list>
            <text:list-item>
              <text:h text:style-name="P221" text:outline-level="2"><text:alphabetical-index-mark-start text:id="IMark100801540"/>URL_ENCODE<text:alphabetical-index-mark-end text:id="IMark100801540"/></text:h>
            </text:list-item>
          </text:list>
        </text:list-item>
      </text:list>
      <text:p text:style-name="Standard">Type<text:tab/><text:span text:style-name="T38">Funktion</text:span> : STRING(255)</text:p>
      <text:p text:style-name="P25"><text:span text:style-name="T16">Input</text:span><text:tab/>IN : STRING (<text:span text:style-name="T24">Zeichenkette</text:span>)</text:p>
      <text:p text:style-name="P55"><draw:frame draw:style-name="fr4" draw:name="Grafik559" text:anchor-type="paragraph" svg:x="1.046cm" svg:y="0.688cm" svg:width="4.48cm" svg:height="0.99cm" draw:z-index="570"><draw:image xlink:href="Pictures/10000000000001530000004B6A3C120F.png" xlink:type="simple" xlink:show="embed" xlink:actuate="onLoad"/></draw:frame>Output<text:tab/>STRING(255) (Zeichenkette)</text:p>
      <text:p text:style-name="P55"><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xml:id="list33656708" text:continue-numbering="true" text:style-name="L1">
        <text:list-item>
          <text:list>
            <text:list-item>
              <text:h text:style-name="P221" text:outline-level="2"><text:soft-page-break/><text:alphabetical-index-mark-start text:id="IMark100801540"/>URL_TO_STRING<text:alphabetical-index-mark-end text:id="IMark100801540"/></text:h>
            </text:list-item>
          </text:list>
        </text:list-item>
      </text:list>
      <text:p text:style-name="Standard">Type<text:tab/><text:span text:style-name="T38">Funktion</text:span> : STRING(255)</text:p>
      <text:p text:style-name="P25"><text:span text:style-name="T16">Input</text:span><text:tab/>STR : STRING (<text:span text:style-name="T16">Unified</text:span> <text:span text:style-name="T16">Resource</text:span> <text:span text:style-name="T16">Locator</text:span>)</text:p>
      <text:p text:style-name="P55"><text:tab/>DEFAULT_PROTOCOL : STRING (Ersatzprotokoll)</text:p>
      <text:p text:style-name="P55"><text:tab/>DEFAULT_PATH : STRING (Ersatzpfad)<text:tab/></text:p>
      <text:p text:style-name="P55"><draw:frame draw:style-name="fr4" draw:name="Grafik555" text:anchor-type="paragraph" svg:x="1.046cm" svg:y="0.646cm" svg:width="6.32cm" svg:height="1.12cm" draw:z-index="568"><draw:image xlink:href="Pictures/10000000000001DE000000557404B5A9.png" xlink:type="simple" xlink:show="embed" xlink:actuate="onLoad"/></draw:frame>Output<text:tab/>URL (URL)</text:p>
      <text:p text:style-name="P55"><text:line-break/>URL_TO_STRING erzeugt aus den in IN gespeicherten Daten vom Typ URL einen <text:span text:style-name="T16">Unified</text:span> <text:span text:style-name="T28">Resource</text:span> <text:span text:style-name="T28">Locator</text:span> als <text:span text:style-name="T16">String</text:span> zusammen.</text:p>
      <text:p text:style-name="P55">Eine URL setzt sich wie folgt zusammen:</text:p>
      <text:p text:style-name="P55"><text:span text:style-name="T43">protokoll</text:span>://<text:span text:style-name="T23">user</text:span><text:span text:style-name="T43">:</text:span><text:a xlink:type="simple" xlink:href="mailto:passwort@domain"><text:span text:style-name="T44">passwort</text:span></text:a><text:a xlink:type="simple" xlink:href="mailto:passwort@domain"><text:span text:style-name="T45">@</text:span></text:a><text:a xlink:type="simple" xlink:href="mailto:passwort@domain"><text:span text:style-name="T44">domain</text:span></text:a>:<text:span text:style-name="T30">port</text:span>/<text:span text:style-name="T23">path</text:span>?<text:span text:style-name="T23">query</text:span>#<text:span text:style-name="T43">anker</text:span></text:p>
      <text:p text:style-name="P55">Beispiel: <text:a xlink:type="simple" xlink:href="ftp://hugo:nono@oscat.de:1234/download/manual.html">ftp://hugo:nono@oscat.de:1234/download/manual.html</text:a></text:p>
      <text:p text:style-name="P55">einige Bestandteile der URL sind optional wie zum Beispiel User, Passwort, Anker, <text:span text:style-name="T16">Query</text:span> ...</text:p>
      <text:list xml:id="list336539121" text:continue-numbering="true" text:style-name="L1">
        <text:list-item>
          <text:h text:style-name="P211" text:outline-level="1">BUFFER Management</text:h>
        </text:list-item>
      </text:list>
      <text:p text:style-name="P16"/>
      <text:list xml:id="list33652878" text:continue-numbering="true" text:style-name="L1">
        <text:list-item>
          <text:list>
            <text:list-item>
              <text:h text:style-name="P221" text:outline-level="2"><text:alphabetical-index-mark-start text:id="IMark100801540"/>_BUFFER_CLEAR<text:alphabetical-index-mark-end text:id="IMark100801540"/></text:h>
            </text:list-item>
          </text:list>
        </text:list-item>
      </text:list>
      <text:p text:style-name="Standard">Type<text:tab/><text:span text:style-name="T38">Funktion</text:span> : BOOL</text:p>
      <text:p text:style-name="P25"><text:span text:style-name="T16">Input</text:span><text:tab/>PT : POINTER TO BYTE (Adresse des <text:span text:style-name="T16">Puffers</text:span>)</text:p>
      <text:p text:style-name="P55"><text:tab/>SIZE : UINT (Größe des Puffers)</text:p>
      <text:p text:style-name="P55"><draw:frame draw:style-name="fr4" draw:name="Grafik501" text:anchor-type="paragraph" svg:x="1.046cm" svg:y="0.667cm" svg:width="6.32cm" svg:height="1.57cm" draw:z-index="507"><draw:image xlink:href="Pictures/10000000000001DE000000775F70386B.png" xlink:type="simple" xlink:show="embed" xlink:actuate="onLoad"/></draw:frame>Output<text:tab/>BOOL (<text:span text:style-name="T16">Returns</text:span> TRUE)</text:p>
      <text:p text:style-name="P55"><text:line-break/>Die Funktion _BUFFER<text:span text:style-name="T33">_</text:span>CLEAR initialisiert ein beliebiges Array <text:span text:style-name="T16">of</text:span> Byte mit 0. Beim Aufruf wird der Funktion ein <text:span text:style-name="T16">Pointer</text:span> auf das zu initialisierende Array und dessen Größe in Bytes übergeben. Unter CoDeSys lautet der Aufruf: <text:s/>_BUFFER_CLEAR(ADR(Array), SI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 </text:p>
      <text:p text:style-name="P53">Diese Art der Bearbeitung von Arrays ist äußerst effizient, da kein zusätzlicher Speicher benötigt wird und keine Übergabewerte kopiert werden müssen.</text:p>
      <text:p text:style-name="P53">Beispiel:<text:tab/>_BUFFER_CLEAR(ADR(bigarray), SIZEOF(bigarray))</text:p>
      <text:p text:style-name="P55"><text:tab/>initialisiert bigarray mit 0.</text:p>
      <text:p text:style-name="P55"/>
      <text:p text:style-name="P55"/>
      <text:p text:style-name="P55"/>
      <text:list xml:id="list33630786" text:continue-numbering="true" text:style-name="L1">
        <text:list-item>
          <text:list>
            <text:list-item>
              <text:h text:style-name="P221" text:outline-level="2"><text:soft-page-break/><text:alphabetical-index-mark-start text:id="IMark100801540"/>_BUFFER_INIT<text:alphabetical-index-mark-end text:id="IMark100801540"/></text:h>
            </text:list-item>
          </text:list>
        </text:list-item>
      </text:list>
      <text:p text:style-name="Standard">Type<text:tab/><text:span text:style-name="T38">Funktion</text:span> : BOOL</text:p>
      <text:p text:style-name="P25"><text:span text:style-name="T16">Input</text:span><text:tab/>PT : POINTER TO BYTE (Adresse des <text:span text:style-name="T16">Puffers</text:span>)</text:p>
      <text:p text:style-name="P55"><text:tab/>SIZE : UINT (Größe des Puffers)</text:p>
      <text:p text:style-name="P55"><draw:frame draw:style-name="fr4" draw:name="Grafik502" text:anchor-type="paragraph" svg:x="1.023cm" svg:y="0.69cm" svg:width="5.42cm" svg:height="2.02cm" draw:z-index="508"><draw:image xlink:href="Pictures/100000000000019A0000009981A9A7D2.png" xlink:type="simple" xlink:show="embed" xlink:actuate="onLoad"/></draw:frame>Output<text:tab/>BOOL (<text:span text:style-name="T16">Returns</text:span> TRUE)</text:p>
      <text:p text:style-name="P55"><text:line-break/>Die Funktion _BUFFER<text:span text:style-name="T33">_</text:span>INIT initialisiert ein beliebiges Array <text:span text:style-name="T16">of</text:span> Byte mit dem Wert INIT. Beim Aufruf wird der Funktion ein <text:span text:style-name="T16">Pointer</text:span> auf das zu initialisierende Array und dessen Größe in Bytes übergeben. Unter CoDeSys lautet der Aufruf: _BUFFER_INIT(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Beispiel:<text:tab/>_BUFFER_INIT(ADR(bigarray), SIZEOF(bigarray),3)</text:p>
      <text:p text:style-name="P55"><text:tab/>initialisiert bigarray mit 3.</text:p>
      <text:list xml:id="list33654689" text:continue-numbering="true" text:style-name="L1">
        <text:list-item>
          <text:list>
            <text:list-item>
              <text:h text:style-name="P221" text:outline-level="2"><text:alphabetical-index-mark-start text:id="IMark100801540"/>_BUFFER_INSERT<text:alphabetical-index-mark-end text:id="IMark100801540"/></text:h>
            </text:list-item>
          </text:list>
        </text:list-item>
      </text:list>
      <text:p text:style-name="Standard">Type<text:tab/><text:span text:style-name="T38">Funktion</text:span> : BOOL</text:p>
      <text:p text:style-name="P25"><text:span text:style-name="T16">Input</text:span><text:tab/>STR : STRING (zu kopierender <text:span text:style-name="T16">String</text:span>)</text:p>
      <text:p text:style-name="P55"><text:tab/>POS : INT (Position ab der der <text:span text:style-name="T16">String</text:span> in den Puffer kopiert wird)</text:p>
      <text:p text:style-name="P55"><text:tab/>PT : POINTER TO BYTE (Adresse des <text:span text:style-name="T16">Puffers</text:span>)</text:p>
      <text:p text:style-name="P55"><text:tab/>SIZE : UINT (Größe des Puffers)</text:p>
      <text:p text:style-name="P55"><draw:frame draw:style-name="fr4" draw:name="Grafik505" text:anchor-type="paragraph" svg:x="1.002cm" svg:y="0.667cm" svg:width="6.77cm" svg:height="2.469cm" draw:z-index="521"><draw:image xlink:href="Pictures/1000000000000200000000BB09A641AF.png" xlink:type="simple" xlink:show="embed" xlink:actuate="onLoad"/></draw:frame>Output<text:tab/>BOOL (<text:span text:style-name="T16">Returns</text:span> TRUE)</text:p>
      <text:p text:style-name="P55"><text:soft-page-break/><text:line-break/>Die Funktion _BUFFER_INSERT kopiert einen <text:span text:style-name="T16">String</text:span> in ein beliebiges Array <text:span text:style-name="T16">of</text:span> Byte und Verschiebt den Rest des Array um die Länge des <text:span text:style-name="T16">Strings.</text:span> Der <text:span text:style-name="T16">String</text:span> wird ab einer beliebigen Position POS im Puffer abgelegt. Das erste Element im Array hat die Positionsnummer 0. Beim Aufruf wird der Funktion ein <text:span text:style-name="T16">Pointer</text:span> auf das zu bearbeitende Array und dessen Größe in Bytes übergeben. Unter CoDeSys lautet der Aufruf: _BUFFER_INSERT(STR, POS, ADR(Array), SI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Beispiel:<text:tab/>_BUFFER_INSERT(STR, POS, ADR(bigarray), SIZEOF(bigarray))</text:p>
      <text:list xml:id="list33654422" text:continue-numbering="true" text:style-name="L1">
        <text:list-item>
          <text:list>
            <text:list-item>
              <text:h text:style-name="P221" text:outline-level="2"><text:alphabetical-index-mark-start text:id="IMark100801540"/>STRING_TO_BUFFER<text:alphabetical-index-mark-end text:id="IMark100801540"/></text:h>
            </text:list-item>
          </text:list>
        </text:list-item>
      </text:list>
      <text:p text:style-name="Standard">Type<text:tab/><text:span text:style-name="T38">Funktion</text:span> : BOOL</text:p>
      <text:p text:style-name="P25"><text:span text:style-name="T16">Input</text:span><text:tab/>STR : STRING (zu kopierender <text:span text:style-name="T16">String</text:span>)</text:p>
      <text:p text:style-name="P55"><text:tab/>POS : INT (Position ab der der <text:span text:style-name="T16">String</text:span> in den Puffer kopiert wird)</text:p>
      <text:p text:style-name="P55"><text:tab/>PT : POINTER TO BYTE (Adresse des <text:span text:style-name="T16">Puffers</text:span>)</text:p>
      <text:p text:style-name="P55"><text:tab/>SIZE : UINT (Größe des Puffers)</text:p>
      <text:p text:style-name="P55"><draw:frame draw:style-name="fr4" draw:name="Grafik515" text:anchor-type="paragraph" svg:x="1.002cm" svg:y="0.667cm" svg:width="8.119cm" svg:height="2.469cm" draw:z-index="520"><draw:image xlink:href="Pictures/1000000000000266000000BBC92180F7.png" xlink:type="simple" xlink:show="embed" xlink:actuate="onLoad"/></draw:frame>Output<text:tab/>BOOL (<text:span text:style-name="T16">Returns</text:span> TRUE)</text:p>
      <text:p text:style-name="P55"><text:line-break/>Die Funktion _STRING_TO_BUFFER kopiert einen <text:span text:style-name="T16">String</text:span> in ein beliebiges Array <text:span text:style-name="T16">of</text:span> Byte<text:span text:style-name="T16">.</text:span> Der <text:span text:style-name="T16">String</text:span> wird ab einer beliebigen Position POS im Puffer abgelegt. Das erste Element im Array hat die Positionsnummer 0. Beim Aufruf wird der Funktion ein <text:span text:style-name="T16">Pointer</text:span> auf das zu bearbeitende Array und dessen Größe in Bytes übergeben. Unter CoDeSys lautet der Aufruf: _STRING_TO_BUFFER(STR, POS, ADR(Array), SI<text:soft-page-break/>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Beispiel:<text:tab/>_STRING_TO_BUFFER(STR, POS, ADR(bigarray), SIZEOF(bigarray))</text:p>
      <text:list xml:id="list33657164" text:continue-numbering="true" text:style-name="L1">
        <text:list-item>
          <text:list>
            <text:list-item>
              <text:h text:style-name="P221" text:outline-level="2"><text:alphabetical-index-mark-start text:id="IMark100801540"/>BUFFER_SEARCH<text:alphabetical-index-mark-end text:id="IMark100801540"/></text:h>
            </text:list-item>
          </text:list>
        </text:list-item>
      </text:list>
      <text:p text:style-name="Standard">Type<text:tab/><text:span text:style-name="T38">Funktion</text:span> : INT</text:p>
      <text:p text:style-name="P52"><text:span text:style-name="T20">Input</text:span><text:span text:style-name="T35"><text:tab/>PT : POINTER (Adresse des </text:span><text:span text:style-name="T20">Puffers</text:span><text:span text:style-name="T35">)</text:span></text:p>
      <text:p text:style-name="P55"><text:tab/>SIZE : UINT (Größe des Puffers)</text:p>
      <text:p text:style-name="P55"><text:tab/>STR : STRING (Suchstring)</text:p>
      <text:p text:style-name="P55"><text:tab/>POS : INT (Position ab der gesucht wird)</text:p>
      <text:p text:style-name="P55"><text:tab/>IGN : BYTE (Dieses Zeichen wird beim Suchen ignoriert)</text:p>
      <text:p text:style-name="P55"><draw:frame draw:style-name="fr4" draw:name="Grafik504" text:anchor-type="paragraph" svg:x="1.046cm" svg:y="0.688cm" svg:width="6.77cm" svg:height="2.919cm" draw:z-index="519"><draw:image xlink:href="Pictures/1000000000000200000000DD5C40BB35.png" xlink:type="simple" xlink:show="embed" xlink:actuate="onLoad"/></draw:frame>Output<text:tab/>INT (Position an der die Zeichenkette gefunden wurde)</text:p>
      <text:p text:style-name="P53"><text:span text:style-name="T34"><text:line-break/>Die Funktion BUFFER</text:span><text:span text:style-name="T37">_</text:span><text:span text:style-name="T34">SEARCH durchsucht ein beliebiges Array </text:span><text:span text:style-name="T19">of</text:span><text:span text:style-name="T34"> Byte auf den Inhalt einer Zeichenkette und meldet die Position des ersten Zeichens der Zeichenkette im Array wenn eine </text:span><text:span text:style-name="T26">Übereinstimmung</text:span><text:span text:style-name="T34"> gefunden wird. Der </text:span><text:span text:style-name="T19">Puffer </text:span><text:span text:style-name="T34">wird ab einer beliebigen Position POS durchsucht. Das erste Element im Array hat die Positionsnummer 0. Beim Aufruf wird der Funktion ein </text:span><text:span text:style-name="T19">Pointer</text:span><text:span text:style-name="T34"> auf das zu bearbeitende Array und dessen Größe in Bytes übergeben. Unter CoDeSys lautet der Aufruf: BUFFER_SEARCH(ADR(Array), SIZEOF(ARRAY), STR, POS, IGN), wobei ARRAY der Name des Arrays ist. ADR ist eine Standardfunktion, die den </text:span><text:span text:style-name="T19">Pointer</text:span><text:span text:style-name="T3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 Die Funktion BUFFER_SEARCH unterstützt Wildcard Zeichen (IGN) enthält die zu suchende <text:soft-page-break/>Zeichenkette STR ein Zeichen mit dem Code IGN so wird an dieser Stelle der Zeichenkette jedes beliebige Zeichen im Puffer akzeptiert.</text:p>
      <text:p text:style-name="P53">Beispiel: <text:span text:style-name="T34">BUFFER_SEARCH(ADR(Array), SIZEOF(ARRAY), 'FIND?0', 0, 63)</text:span></text:p>
      <text:p text:style-name="P55">Findet FIND10, FIND20, FIND30 .... im Array, aber findet keine Übereinstimmung bei FIND11, FIND 22 .... Die zu suchende Zeichenkette kann auch mehrere Wildcards enthalten. Ein Wildcard Zeichen entspricht immer exakt einem Zeichen im Puffer.</text:p>
      <text:list xml:id="list33633396" text:continue-numbering="true" text:style-name="L1">
        <text:list-item>
          <text:list>
            <text:list-item>
              <text:h text:style-name="P221" text:outline-level="2"><text:alphabetical-index-mark-start text:id="IMark100801540"/>BUFFER_TO_STRING<text:alphabetical-index-mark-end text:id="IMark100801540"/></text:h>
            </text:list-item>
          </text:list>
        </text:list-item>
      </text:list>
      <text:p text:style-name="Standard">Type<text:tab/><text:span text:style-name="T38">Funktion</text:span> : STRING</text:p>
      <text:p text:style-name="P25"><text:span text:style-name="T16">Input</text:span><text:tab/>PT : POINTER TO BYTE (Adresse des <text:span text:style-name="T16">Puffers</text:span>)</text:p>
      <text:p text:style-name="P55"><text:tab/>SIZE : UINT (Größe des Puffers)</text:p>
      <text:p text:style-name="P55"><text:tab/>START : UINT (Position ab der der <text:span text:style-name="T16">String</text:span> aus dem Puffer kopiert wird)</text:p>
      <text:p text:style-name="P55"><text:tab/>STOP : UINT (Ende des <text:span text:style-name="T16">Strings</text:span> im Puffer)</text:p>
      <text:p text:style-name="P55"><draw:frame draw:style-name="fr4" draw:name="Grafik503" text:anchor-type="paragraph" svg:x="1.023cm" svg:y="0.644cm" svg:width="7.669cm" svg:height="2.469cm" draw:z-index="509"><draw:image xlink:href="Pictures/1000000000000244000000BBC792B1F7.png" xlink:type="simple" xlink:show="embed" xlink:actuate="onLoad"/></draw:frame>Output<text:tab/>STRING (Zeichenkette die aus dem Puffer kopiert wurde)</text:p>
      <text:p text:style-name="P53"><text:span text:style-name="T34"><text:line-break/>Die Funktion BUFFER</text:span><text:span text:style-name="T37">_</text:span><text:span text:style-name="T34">TO_STRING extrahiert einen </text:span><text:span text:style-name="T19">String</text:span><text:span text:style-name="T34"> aus einem beliebigen Array </text:span><text:span text:style-name="T19">of</text:span><text:span text:style-name="T34"> Byte. Der </text:span><text:span text:style-name="T19">String</text:span><text:span text:style-name="T34"> wird ab einer beliebigen Position START aus dem Puffer kopiert und endet an der Position STOP. Das erste Element im Array hat die Positionsnummer 0. Beim Aufruf wird der Funktion ein </text:span><text:span text:style-name="T19">Pointer</text:span><text:span text:style-name="T34"> auf das zu bearbeitende Array und dessen Größe in Bytes übergeben. Unter CoDeSys lautet der Aufruf: BUFFER</text:span><text:span text:style-name="T37">_</text:span><text:span text:style-name="T34">TO_STRING(ADR(Array), SIZEOF(ARRAY), START, STOP), wobei ARRAY der Name des Arrays ist. ADR ist eine Standardfunktion, die den </text:span><text:span text:style-name="T19">Pointer</text:span><text:span text:style-name="T3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text:line-break/>Beispiel:<text:tab/><text:span text:style-name="T34">BUFFER</text:span><text:span text:style-name="T37">_</text:span><text:span text:style-name="T34">TO_STRING(ADR(Array), SIZEOF(ARRAY), START, STOP)</text:span></text:p>
      <text:list xml:id="list33633119" text:continue-numbering="true" text:style-name="L1">
        <text:list-item>
          <text:h text:style-name="P211" text:outline-level="1">Listen Verarbeitung</text:h>
        </text:list-item>
      </text:list>
      <text:p text:style-name="P16"/>
      <text:list xml:id="list33629951" text:continue-numbering="true" text:style-name="L1">
        <text:list-item>
          <text:list>
            <text:list-item>
              <text:h text:style-name="P217" text:outline-level="2">Einleitung</text:h>
            </text:list-item>
          </text:list>
        </text:list-item>
      </text:list>
      <text:p text:style-name="P204">Die hier beschriebenen Listen sind als STRING(255) gespeicherte Listen die mit einem Separationszeichen SEP getrennte Elemente enthalten. Die Elemente können alle in <text:span text:style-name="T16">Strings</text:span>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p>
      <text:p text:style-name="P204">Liste mit einem Leeren Element : <text:tab/><text:tab/>''</text:p>
      <text:p text:style-name="P204">Liste mit 2 Elementen<text:tab/><text:tab/><text:tab/>'1,NIX'</text:p>
      <text:p text:style-name="P204">Liste mit 3 Elementen wovon eines Leer ist<text:tab/>'1,,2' oder '1,2,' oder ',1,2'</text:p>
      <text:list xml:id="list33636028" text:continue-numbering="true" text:style-name="L1">
        <text:list-item>
          <text:list>
            <text:list-item>
              <text:h text:style-name="P217" text:outline-level="2"><text:alphabetical-index-mark-start text:id="IMark100801540"/>LIST_CLEAN<text:alphabetical-index-mark-end text:id="IMark100801540"/></text:h>
            </text:list-item>
          </text:list>
        </text:list-item>
      </text:list>
      <text:p text:style-name="P22">Type<text:tab/>Funktion : BOOL</text:p>
      <text:p text:style-name="P22"><text:span text:style-name="T16">Input</text:span><text:tab/>LIST : STRING(255) (Eingangsliste)</text:p>
      <text:p text:style-name="P52"><text:tab/>SEP : BYTE (Separationszeichen der Liste)</text:p>
      <text:p text:style-name="P77"><draw:frame draw:style-name="fr4" draw:name="Grafik654" text:anchor-type="paragraph" svg:x="1.067cm" svg:y="0.667cm" svg:width="4.48cm" svg:height="1.39cm" draw:z-index="673"><draw:image xlink:href="Pictures/10000000000001530000006949764F03.png" xlink:type="simple" xlink:show="embed" xlink:actuate="onLoad"/></draw:frame><text:span text:style-name="T46">Output</text:span><text:tab/>BOOL (TRUE)</text:p>
      <text:p text:style-name="P204"><text:soft-page-break/><text:line-break/>LIST_CLEAN bereinigt eine Liste von leeren Elementen. <text:span text:style-name="T4">Die Liste besteht aus <text:s/>Zeichenketten die mit dem Separationszeichen SEP getrennt sind.</text:span></text:p>
      <text:p text:style-name="P205">LIST_CLEAN('ABC,23,,NEXT', 44) = 'ABC,23,NEXT'</text:p>
      <text:p text:style-name="P205">LIST_CLEAN(',,23,,NEXT,', 44) = '23,NEXT'</text:p>
      <text:p text:style-name="P205">LIST_CLEAN(',,,,', 44) = ''</text:p>
      <text:list xml:id="list33625260" text:continue-numbering="true" text:style-name="L1">
        <text:list-item>
          <text:list>
            <text:list-item>
              <text:h text:style-name="P217" text:outline-level="2"><text:alphabetical-index-mark-start text:id="IMark100801540"/>LIST_GET<text:alphabetical-index-mark-end text:id="IMark100801540"/></text:h>
            </text:list-item>
          </text:list>
        </text:list-item>
      </text:list>
      <text:p text:style-name="P22">Type<text:tab/>Funktion : STRING</text:p>
      <text:p text:style-name="P22"><text:span text:style-name="T16">Input</text:span><text:tab/>LIST : STRING(255) (Eingangsliste)</text:p>
      <text:p text:style-name="P52"><text:tab/>SEP : BYTE (Separationszeichen der Liste)</text:p>
      <text:p text:style-name="P52"><text:tab/>POS : INT (Position des Listenelements)</text:p>
      <text:p text:style-name="P55"><draw:frame draw:style-name="fr4" draw:name="Grafik649" text:anchor-type="paragraph" svg:x="0.981cm" svg:y="0.658cm" svg:width="3.69cm" svg:height="1.79cm" draw:z-index="669"><draw:image xlink:href="Pictures/100000000000011700000087B810844A.png" xlink:type="simple" xlink:show="embed" xlink:actuate="onLoad"/></draw:frame>Output<text:tab/>STRING (Ausgangsstring)</text:p>
      <text:p text:style-name="P55"><text:line-break/>LIST_GET lieferte das Element an der Stelle POS aus einer Liste. Die Liste besteht aus <text:s/>Zeichenketten die mit dem Separationszeichen SEP getrennt sind. Das erste Element der Liste hat die Position 0.</text:p>
      <text:p text:style-name="P55">Beispiel:</text:p>
      <text:p text:style-name="P55">LIST_GET('ABC,23,,NEXT', 44, 0) = 'ABC'</text:p>
      <text:p text:style-name="P55">LIST_GET('ABC,23,,NEXT', 44, 1) = '23'</text:p>
      <text:p text:style-name="P55">LIST_GET('ABC,23,,NEXT', 44, 2) = ''</text:p>
      <text:p text:style-name="P55">LIST_GET('ABC,23,,NEXT', 44, 3) = 'NEXT'</text:p>
      <text:p text:style-name="P87">LIST_GET('ABC,23,,NEXT', 44, 4) = ''</text:p>
      <text:p text:style-name="P55"/>
      <text:list xml:id="list33627292" text:continue-numbering="true" text:style-name="L1">
        <text:list-item>
          <text:list>
            <text:list-item>
              <text:h text:style-name="P217" text:outline-level="2"><text:soft-page-break/><text:alphabetical-index-mark-start text:id="IMark100801540"/>LIST_INSERT<text:alphabetical-index-mark-end text:id="IMark100801540"/></text:h>
            </text:list-item>
          </text:list>
        </text:list-item>
      </text:list>
      <text:p text:style-name="P22">Type<text:tab/>Funktion : BOOL</text:p>
      <text:p text:style-name="P22"><text:span text:style-name="T16">Input</text:span><text:tab/>LIST : STRING(255) (Eingangsliste)</text:p>
      <text:p text:style-name="P52"><text:tab/>SEP : BYTE (Separationszeichen der Liste)</text:p>
      <text:p text:style-name="P52"><text:tab/>POS : INT (Position des Listenelements)</text:p>
      <text:p text:style-name="P52"><text:tab/>INS : STRING (Neues Element)</text:p>
      <text:p text:style-name="P55"><draw:frame draw:style-name="fr4" draw:name="Grafik655" text:anchor-type="paragraph" svg:x="1.046cm" svg:y="0.688cm" svg:width="4.881cm" svg:height="2.18cm" draw:z-index="674"><draw:image xlink:href="Pictures/1000000000000171000000A5E6453695.png" xlink:type="simple" xlink:show="embed" xlink:actuate="onLoad"/></draw:frame>Output<text:tab/>BOOL (TRUE)</text:p>
      <text:p text:style-name="P55"><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55">Beispiel:</text:p>
      <text:p text:style-name="P55">LIST_INSERT('ABC,23,,NEXT', 44, 0,'NEW') = 'NEW,ABC,23,,NEXT'</text:p>
      <text:p text:style-name="P55">LIST_INSERT('ABC,23,,NEXT', 44, 3,'NEW') = 'ABC,23,NEW,,NEXT'</text:p>
      <text:p text:style-name="P55">LIST_INSERT('ABC,23,,NEXT', 44, 255,'NEW') = 'ABC,23,,NEXT,NEW'</text:p>
      <text:list xml:id="list336537721" text:continue-numbering="true" text:style-name="L1">
        <text:list-item>
          <text:list>
            <text:list-item>
              <text:h text:style-name="P217" text:outline-level="2"><text:alphabetical-index-mark-start text:id="IMark100801540"/>LIST_LEN<text:alphabetical-index-mark-end text:id="IMark100801540"/></text:h>
            </text:list-item>
          </text:list>
        </text:list-item>
      </text:list>
      <text:p text:style-name="P22">Type<text:tab/>Funktion : INT</text:p>
      <text:p text:style-name="P52"><text:span text:style-name="T16">Input</text:span><text:tab/>LIST : STRING(255) (Eingangsliste)</text:p>
      <text:p text:style-name="P52"><text:tab/>SEP : BYTE (Separationszeichen der Liste)</text:p>
      <text:p text:style-name="P55"><draw:frame draw:style-name="fr4" draw:name="Grafik651" text:anchor-type="paragraph" svg:x="1.025cm" svg:y="0.688cm" svg:width="3.69cm" svg:height="1.39cm" draw:z-index="670"><draw:image xlink:href="Pictures/100000000000011700000069A5FBA963.png" xlink:type="simple" xlink:show="embed" xlink:actuate="onLoad"/></draw:frame>Output<text:tab/>INT (Anzahl der Elemente in der Liste)</text:p>
      <text:p text:style-name="P55">LIST_LEN ermittelt die Anzahl der Elemente einer Liste.</text:p>
      <text:p text:style-name="P55">LIST_LEN('0,1,2,3',44) = 4<text:tab/>LIST_LEN('',44) = 0</text:p>
      <text:list xml:id="list33635009" text:continue-numbering="true" text:style-name="L1">
        <text:list-item>
          <text:list>
            <text:list-item>
              <text:h text:style-name="P217" text:outline-level="2"><text:soft-page-break/><text:alphabetical-index-mark-start text:id="IMark100801540"/>LIST_NEXT<text:alphabetical-index-mark-end text:id="IMark100801540"/></text:h>
            </text:list-item>
          </text:list>
        </text:list-item>
      </text:list>
      <text:p text:style-name="P22">Type<text:tab/>Funktion : STRING</text:p>
      <text:p text:style-name="P52"><text:span text:style-name="T16">Input</text:span><text:tab/>LIST : STRING (Eingangsliste)</text:p>
      <text:p text:style-name="P52"><text:tab/>SEP : BYTE (Separationszeichen der Liste)</text:p>
      <text:p text:style-name="P52"><text:tab/>RST : BOOL (Asynchroner Reset)</text:p>
      <text:p text:style-name="P55">Output<text:tab/>LEL : STRING (Listenelement)</text:p>
      <text:p text:style-name="P55"><draw:frame draw:style-name="fr4" draw:name="Grafik652" text:anchor-type="paragraph" svg:x="1.002cm" svg:y="0.681cm" svg:width="3.29cm" svg:height="1.921cm" draw:z-index="671"><draw:image xlink:href="Pictures/10000000000000F900000091A70FA754.png" xlink:type="simple" xlink:show="embed" xlink:actuate="onLoad"/></draw:frame><text:tab/>NUL : BOOL (TRUE wenn Liste abgearbeitet oder Leer ist)</text:p>
      <text:p text:style-name="P55"><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55">Beispiel für die Anwendung:</text:p>
      <text:p text:style-name="P74">FUNCTION_BLOCK testll</text:p>
      <text:p text:style-name="P74">VAR_INPUT</text:p>
      <text:p text:style-name="P10"><text:tab/>s1 : STRING(255);</text:p>
      <text:p text:style-name="P74">END_VAR</text:p>
      <text:p text:style-name="P74">VAR</text:p>
      <text:p text:style-name="P10"><text:tab/>element : ARRAY[0..20] OF STRING(STRING_LENGTH;</text:p>
      <text:p text:style-name="P10"><text:tab/>list_n : LIST_NEXT;</text:p>
      <text:p text:style-name="P10"><text:tab/>pos : INT;</text:p>
      <text:p text:style-name="P74">END_VAR</text:p>
      <text:p text:style-name="P74"/>
      <text:p text:style-name="P74">pos := 0;</text:p>
      <text:p text:style-name="P74">list_n(LIST := s1, SEP := 44);</text:p>
      <text:p text:style-name="P74">WHILE NOT list_n.NUL and pos &lt;= 20 DO</text:p>
      <text:p text:style-name="P10"><text:tab/>element[pos] := list_n.LEL;</text:p>
      <text:p text:style-name="P10"><text:tab/>list_n(list := s1);</text:p>
      <text:p text:style-name="P10"><text:tab/>pos := pos + 1;</text:p>
      <text:p text:style-name="P204"><text:span text:style-name="T48">END_WHILE</text:span>;</text:p>
      <text:list xml:id="list33640344" text:continue-numbering="true" text:style-name="L1">
        <text:list-item>
          <text:list>
            <text:list-item>
              <text:h text:style-name="P217" text:outline-level="2"><text:soft-page-break/><text:alphabetical-index-mark-start text:id="IMark100801540"/>LIST_RETRIEVE<text:alphabetical-index-mark-end text:id="IMark100801540"/></text:h>
            </text:list-item>
          </text:list>
        </text:list-item>
      </text:list>
      <text:p text:style-name="P22">Type<text:tab/>Funktion : STRING</text:p>
      <text:p text:style-name="P22"><text:span text:style-name="T16">Input</text:span><text:tab/>LIST : STRING(255) (Eingangsliste)</text:p>
      <text:p text:style-name="P52"><text:tab/>SEP : BYTE (Separationszeichen der Liste)</text:p>
      <text:p text:style-name="P52"><text:tab/>POS : INT (Position des Listenelements)</text:p>
      <text:p text:style-name="P55"><draw:frame draw:style-name="fr4" draw:name="Grafik653" text:anchor-type="paragraph" svg:x="1.046cm" svg:y="0.667cm" svg:width="5.669cm" svg:height="1.79cm" draw:z-index="672"><draw:image xlink:href="Pictures/10000000000001AD00000087D131B291.png" xlink:type="simple" xlink:show="embed" xlink:actuate="onLoad"/></draw:frame>Output<text:tab/>STRING (Ausgangsstring)</text:p>
      <text:p text:style-name="P55"><text:line-break/>LIST_RETRIEVE lieferte das Element an der Stelle POS aus einer Liste und löscht das entsprechende Element in der Liste. Die Liste besteht aus <text:s/>Zeichenketten die mit dem Separationszeichen SEP getrennt sind. Das erste Element der Liste hat die Position 0.</text:p>
      <text:p text:style-name="P55">Beispiel:</text:p>
      <text:p text:style-name="P55">LIST_RETRIEVE('ABC,23,,NEXT', 44, 0) = 'ABC'<text:tab/>LIST = '23,,NEXT'</text:p>
      <text:p text:style-name="P55">LIST_RETRIEVE('ABC,23,,NEXT', 44, 1) = '23'<text:tab/><text:tab/>LIST = 'ABC,,NEXT'</text:p>
      <text:p text:style-name="P55">LIST_RETRIEVE('ABC,23,,NEXT', 44, 2) = ''<text:tab/><text:tab/>LIST = 'ABC,23,NEXT'</text:p>
      <text:p text:style-name="P55">LIST_RETRIEVE('ABC,23,,NEXT', 44, 3) = 'NEXT'<text:tab/>LIST = 'ABC,23,'</text:p>
      <text:p text:style-name="P55">LIST_RETRIEVE('ABC,23,,NEXT', 44, 4) = ''<text:tab/><text:tab/>LIST = 'ABC,23,,NEXT'</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28">A_TRIG<text:tab/>179</text:p>
          <text:p text:style-name="P228">ACOSH<text:tab/>36</text:p>
          <text:p text:style-name="P228">ACOTH<text:tab/>36</text:p>
          <text:p text:style-name="P228">ACTUATOR_2P<text:tab/>362</text:p>
          <text:p text:style-name="P228">ACTUATOR_3P<text:tab/>363</text:p>
          <text:p text:style-name="P228">ACTUATOR_COIL<text:tab/>365</text:p>
          <text:p text:style-name="P228">ACTUATOR_PUMP<text:tab/>366</text:p>
          <text:p text:style-name="P228">ACTUATOR_UD<text:tab/>367</text:p>
          <text:p text:style-name="P228">AGDF<text:tab/>36</text:p>
          <text:p text:style-name="P228">AIN<text:tab/>250</text:p>
          <text:p text:style-name="P228">AIN1<text:tab/>251</text:p>
          <text:p text:style-name="P228">AIR_DENSITY<text:tab/>369</text:p>
          <text:p text:style-name="P228">AIR_ENTHALPY<text:tab/>369</text:p>
          <text:p text:style-name="P228">ALARM_2<text:tab/>294</text:p>
          <text:p text:style-name="P228">AOUT<text:tab/>253</text:p>
          <text:p text:style-name="P228">AOUT1<text:tab/>254</text:p>
          <text:p text:style-name="P228">ARRAY_AVG<text:tab/>68</text:p>
          <text:p text:style-name="P228">ARRAY_GAV<text:tab/>69</text:p>
          <text:p text:style-name="P228">ARRAY_HAV<text:tab/>70</text:p>
          <text:p text:style-name="P228">ARRAY_MAX<text:tab/>70</text:p>
          <text:p text:style-name="P228">ARRAY_MIN<text:tab/>71</text:p>
          <text:p text:style-name="P228">ARRAY_SDV<text:tab/>72</text:p>
          <text:p text:style-name="P228">ARRAY_SPR<text:tab/>72</text:p>
          <text:p text:style-name="P228">ARRAY_SUM<text:tab/>73</text:p>
          <text:p text:style-name="P228">ARRAY_TREND<text:tab/>74</text:p>
          <text:p text:style-name="P228">ARRAY_VAR<text:tab/>74</text:p>
          <text:p text:style-name="P228">ASINH<text:tab/>37</text:p>
          <text:p text:style-name="P228">ASTRO<text:tab/>310</text:p>
          <text:p text:style-name="P228">ATAN2<text:tab/>37</text:p>
          <text:p text:style-name="P228">ATANH<text:tab/>37</text:p>
          <text:p text:style-name="P228">B_TRIG<text:tab/>179</text:p>
          <text:p text:style-name="P228">BAR_GRAPH<text:tab/>295</text:p>
          <text:p text:style-name="P228">BCDC_TO_INT<text:tab/>202</text:p>
          <text:p text:style-name="P228">BFT_TO_MS<text:tab/>311</text:p>
          <text:p text:style-name="P228">BIN_TO_BYTE<text:tab/>134</text:p>
          <text:p text:style-name="P228">BIN_TO_DWORD<text:tab/>134</text:p>
          <text:p text:style-name="P228">BIT_COUNT<text:tab/>202</text:p>
          <text:p text:style-name="P228">BIT_LOAD_B<text:tab/>203</text:p>
          <text:p text:style-name="P228">BIT_LOAD_DW<text:tab/>203</text:p>
          <text:p text:style-name="P228">BIT_LOAD_W<text:tab/>204</text:p>
          <text:p text:style-name="P228">BIT_OF_DWORD<text:tab/>204</text:p>
          <text:p text:style-name="P228">BLIND_ACTUATOR<text:tab/>411</text:p>
          <text:p text:style-name="P228">BLIND_CONTROL<text:tab/>413</text:p>
          <text:p text:style-name="P228">BLIND_INPUT<text:tab/>415</text:p>
          <text:p text:style-name="P228">BLIND_NIGHT<text:tab/>419</text:p>
          <text:p text:style-name="P228">BLIND_SCENE<text:tab/>421</text:p>
          <text:p text:style-name="P228">BLIND_SECURITY<text:tab/>423</text:p>
          <text:p text:style-name="P228">BLIND_SHADE<text:tab/>425</text:p>
          <text:p text:style-name="P228">BOILER<text:tab/>370</text:p>
          <text:p text:style-name="P228">BUFFER_SEARCH<text:tab/>465</text:p>
          <text:p text:style-name="P228">BUFFER_TO_STRING<text:tab/>466</text:p>
          <text:p text:style-name="P228">BURNER<text:tab/>372</text:p>
          <text:p text:style-name="P228">BYTE_OF_BIT<text:tab/>205</text:p>
          <text:p text:style-name="P228">BYTE_OF_DWORD<text:tab/>205</text:p>
          <text:p text:style-name="P228">BYTE_TO_BIT<text:tab/>206</text:p>
          <text:p text:style-name="P228">BYTE_TO_RANGE<text:tab/>255</text:p>
          <text:p text:style-name="P228">BYTE_TO_STRB<text:tab/>135</text:p>
          <text:p text:style-name="P228">BYTE_TO_STRH<text:tab/>135</text:p>
          <text:p text:style-name="P228">C_TO_F<text:tab/>311</text:p>
          <text:p text:style-name="P228">C_TO_K<text:tab/>311</text:p>
          <text:p text:style-name="P228">C0<text:tab/>22</text:p>
          <text:p text:style-name="P228">CABS<text:tab/>76</text:p>
          <text:p text:style-name="P228">CACOS<text:tab/>77</text:p>
          <text:p text:style-name="P228">CACOSH<text:tab/>77</text:p>
          <text:p text:style-name="P228">CADD<text:tab/>77</text:p>
          <text:p text:style-name="P228">CALIBRATE<text:tab/>297</text:p>
          <text:p text:style-name="P228">CAPITALIZE<text:tab/>136</text:p>
          <text:p text:style-name="P228">CARG<text:tab/>78</text:p>
          <text:p text:style-name="P228">CASIN<text:tab/>78</text:p>
          <text:p text:style-name="P228">CASINH<text:tab/>79</text:p>
          <text:p text:style-name="P228">CATAN<text:tab/>79</text:p>
          <text:p text:style-name="P228">CATANH<text:tab/>79</text:p>
          <text:p text:style-name="P228">CCON<text:tab/>80</text:p>
          <text:p text:style-name="P228">CCOS<text:tab/>80</text:p>
          <text:p text:style-name="P228">CCOSH<text:tab/>80</text:p>
          <text:p text:style-name="P228">CDIV<text:tab/>81</text:p>
          <text:p text:style-name="P228">CEIL<text:tab/>38</text:p>
          <text:p text:style-name="P228">CEIL2<text:tab/>38</text:p>
          <text:p text:style-name="P228">CEXP<text:tab/>81</text:p>
          <text:p text:style-name="P228">CHAR_NAME_1<text:tab/>23</text:p>
          <text:p text:style-name="P228">CHAR_NAME_2<text:tab/>23</text:p>
          <text:p text:style-name="P228">CHAR_NAME_3<text:tab/>23</text:p>
          <text:p text:style-name="P228">CHAR_NAME_4<text:tab/>23</text:p>
          <text:p text:style-name="P228">CHARCODE<text:tab/>136</text:p>
          <text:p text:style-name="P228">CHARNAME<text:tab/>137</text:p>
          <text:p text:style-name="P228">CHECK_PARITY<text:tab/>206</text:p>
          <text:p text:style-name="P228">CHR<text:tab/>138</text:p>
          <text:p text:style-name="P228">CINV<text:tab/>81</text:p>
          <text:p text:style-name="P228">CIRCLE_A<text:tab/>97</text:p>
          <text:p text:style-name="P228">CIRCLE_C<text:tab/>97</text:p>
          <text:p text:style-name="P228"><text:soft-page-break/>CLEAN<text:tab/>138</text:p>
          <text:p text:style-name="P228">CLICK<text:tab/>390</text:p>
          <text:p text:style-name="P228">CLICK_CNT<text:tab/>180</text:p>
          <text:p text:style-name="P228">CLICK_DEC<text:tab/>181</text:p>
          <text:p text:style-name="P228">CLK_1MS<text:tab/>181</text:p>
          <text:p text:style-name="P228">CLK_2MS<text:tab/>182</text:p>
          <text:p text:style-name="P228">CLK_4MS<text:tab/>182</text:p>
          <text:p text:style-name="P228">CLK_8MS<text:tab/>182</text:p>
          <text:p text:style-name="P228">CLK_DIV<text:tab/>182</text:p>
          <text:p text:style-name="P228">CLK_N<text:tab/>184</text:p>
          <text:p text:style-name="P228">CLK_PRG<text:tab/>185</text:p>
          <text:p text:style-name="P228">CLK_PULSE<text:tab/>185</text:p>
          <text:p text:style-name="P228">CLOG<text:tab/>82</text:p>
          <text:p text:style-name="P228">CMP<text:tab/>39</text:p>
          <text:p text:style-name="P228">CMUL<text:tab/>82</text:p>
          <text:p text:style-name="P228">CODE<text:tab/>139</text:p>
          <text:p text:style-name="P228">CONE_V<text:tab/>98</text:p>
          <text:p text:style-name="P228">CONTROL_SET1<text:tab/>323</text:p>
          <text:p text:style-name="P228">CONTROL_SET2<text:tab/>325</text:p>
          <text:p text:style-name="P228">COSH<text:tab/>39</text:p>
          <text:p text:style-name="P228">COTH<text:tab/>40</text:p>
          <text:p text:style-name="P228">COUNT_BR<text:tab/>223</text:p>
          <text:p text:style-name="P228">COUNT_CHAR<text:tab/>139</text:p>
          <text:p text:style-name="P228">COUNT_DR<text:tab/>224</text:p>
          <text:p text:style-name="P228">COUNTRY_DEFAULT<text:tab/>25</text:p>
          <text:p text:style-name="P228">COUNTRY_MAX<text:tab/>25</text:p>
          <text:p text:style-name="P228">CPOL<text:tab/>82</text:p>
          <text:p text:style-name="P228">CPOW<text:tab/>83</text:p>
          <text:p text:style-name="P228">CRC_CHECK<text:tab/>207</text:p>
          <text:p text:style-name="P228">CRC_GEN<text:tab/>208</text:p>
          <text:p text:style-name="P228">CSET<text:tab/>83</text:p>
          <text:p text:style-name="P228">CSIN<text:tab/>84</text:p>
          <text:p text:style-name="P228">CSINH<text:tab/>84</text:p>
          <text:p text:style-name="P228">CSQRT<text:tab/>84</text:p>
          <text:p text:style-name="P228">CSUB<text:tab/>85</text:p>
          <text:p text:style-name="P228">CTAN<text:tab/>85</text:p>
          <text:p text:style-name="P228">CTANH<text:tab/>85</text:p>
          <text:p text:style-name="P228">CTRL_IN<text:tab/>326</text:p>
          <text:p text:style-name="P228">CTRL_OUT<text:tab/>327</text:p>
          <text:p text:style-name="P228">CTRL_PI<text:tab/>328</text:p>
          <text:p text:style-name="P228">CTRL_PID<text:tab/>330</text:p>
          <text:p text:style-name="P228">CTRL_PWM<text:tab/>333</text:p>
          <text:p text:style-name="P228">CYCLE_TIME<text:tab/>298</text:p>
          <text:p text:style-name="P228">D_TRIG<text:tab/>186</text:p>
          <text:p text:style-name="P228">D_TRUNC<text:tab/>40</text:p>
          <text:p text:style-name="P228">DATE_ADD<text:tab/>108</text:p>
          <text:p text:style-name="P228">DAY_OF_DATE<text:tab/>109</text:p>
          <text:p text:style-name="P228">DAY_OF_MONTH<text:tab/>109</text:p>
          <text:p text:style-name="P228">DAY_OF_WEEK<text:tab/>109</text:p>
          <text:p text:style-name="P228">DAY_OF_YEAR<text:tab/>110</text:p>
          <text:p text:style-name="P228">DAY_TO_TIME<text:tab/>110</text:p>
          <text:p text:style-name="P228">DAYS_DELTA<text:tab/>111</text:p>
          <text:p text:style-name="P228">DCF77<text:tab/>111</text:p>
          <text:p text:style-name="P228">DEAD_BAND<text:tab/>334</text:p>
          <text:p text:style-name="P228">DEAD_BAND_A<text:tab/>335</text:p>
          <text:p text:style-name="P228">DEAD_ZONE<text:tab/>336</text:p>
          <text:p text:style-name="P228">DEAD_ZONE2<text:tab/>336</text:p>
          <text:p text:style-name="P228">DEBOUNCE<text:tab/>392</text:p>
          <text:p text:style-name="P228">DEC_2<text:tab/>210</text:p>
          <text:p text:style-name="P228">DEC_4<text:tab/>211</text:p>
          <text:p text:style-name="P228">DEC_8<text:tab/>212</text:p>
          <text:p text:style-name="P228">DEC_TO_BYTE<text:tab/>140</text:p>
          <text:p text:style-name="P228">DEC_TO_DWORD<text:tab/>140</text:p>
          <text:p text:style-name="P228">DEC_TO_INT<text:tab/>141</text:p>
          <text:p text:style-name="P228">DEG<text:tab/>41</text:p>
          <text:p text:style-name="P228">DEG_TO_DIR<text:tab/>312</text:p>
          <text:p text:style-name="P228">DEL_CHARS<text:tab/>141</text:p>
          <text:p text:style-name="P228">DELAY<text:tab/>255</text:p>
          <text:p text:style-name="P228">DELAY_4<text:tab/>256</text:p>
          <text:p text:style-name="P228">DEW_CON<text:tab/>376</text:p>
          <text:p text:style-name="P228">DEW_R<text:tab/>376</text:p>
          <text:p text:style-name="P228">DEW_TEMP<text:tab/>377</text:p>
          <text:p text:style-name="P228">DIFFER<text:tab/>41</text:p>
          <text:p text:style-name="P228">DIMM_I<text:tab/>392</text:p>
          <text:p text:style-name="P228">DIR_TO_DEG<text:tab/>312</text:p>
          <text:p text:style-name="P228">DRIVER_1<text:tab/>429</text:p>
          <text:p text:style-name="P228">DRIVER_4<text:tab/>430</text:p>
          <text:p text:style-name="P228">DST<text:tab/>113</text:p>
          <text:p text:style-name="P228">DT_SIMU<text:tab/>298</text:p>
          <text:p text:style-name="P228">DT_TO_STRF<text:tab/>142</text:p>
          <text:p text:style-name="P228">DW_TO_REAL<text:tab/>213</text:p>
          <text:p text:style-name="P228">DWORD_OF_BYTE<text:tab/>214</text:p>
          <text:p text:style-name="P228">DWORD_TO_STRB<text:tab/>143</text:p>
          <text:p text:style-name="P228">DWORD_TO_STRF<text:tab/>144</text:p>
          <text:p text:style-name="P228">DWORD_TO_STRH<text:tab/>145</text:p>
          <text:p text:style-name="P228">E1<text:tab/>22</text:p>
          <text:p text:style-name="P228">EASTER<text:tab/>113</text:p>
          <text:p text:style-name="P228">EL<text:tab/>22</text:p>
          <text:p text:style-name="P228">ELLIPSE_A<text:tab/>98</text:p>
          <text:p text:style-name="P228">ELLIPSE_C<text:tab/>99</text:p>
          <text:p text:style-name="P228">ENERGY<text:tab/>313</text:p>
          <text:p text:style-name="P228">ERF<text:tab/>42</text:p>
          <text:p text:style-name="P228">ERFC<text:tab/>42</text:p>
          <text:p text:style-name="P228">ESR_COLLECT<text:tab/>27</text:p>
          <text:p text:style-name="P228">ESR_MON_B8<text:tab/>29</text:p>
          <text:p text:style-name="P228">ESR_MON_R4<text:tab/>30</text:p>
          <text:p text:style-name="P228"><text:soft-page-break/>ESR_MON_X8<text:tab/>31</text:p>
          <text:p text:style-name="P228">EVEN<text:tab/>42</text:p>
          <text:p text:style-name="P228">EXEC<text:tab/>145</text:p>
          <text:p text:style-name="P228">EXP10<text:tab/>43</text:p>
          <text:p text:style-name="P228">EXPN<text:tab/>43</text:p>
          <text:p text:style-name="P228">EXTENDED_ASCII<text:tab/>23</text:p>
          <text:p text:style-name="P228">F_LAMP<text:tab/>393</text:p>
          <text:p text:style-name="P228">F_LIN<text:tab/>89</text:p>
          <text:p text:style-name="P228">F_LIN2<text:tab/>89</text:p>
          <text:p text:style-name="P228">F_POLY<text:tab/>90</text:p>
          <text:p text:style-name="P228">F_POWER<text:tab/>90</text:p>
          <text:p text:style-name="P228">F_QUAD<text:tab/>91</text:p>
          <text:p text:style-name="P228">F_TO_C<text:tab/>314</text:p>
          <text:p text:style-name="P228">F_TO_OM<text:tab/>314</text:p>
          <text:p text:style-name="P228">F_TO_PT<text:tab/>314</text:p>
          <text:p text:style-name="P228">FACT<text:tab/>44</text:p>
          <text:p text:style-name="P228">FADE<text:tab/>257</text:p>
          <text:p text:style-name="P228">FF_D2E<text:tab/>225</text:p>
          <text:p text:style-name="P228">FF_D4E<text:tab/>226</text:p>
          <text:p text:style-name="P228">FF_DRE<text:tab/>227</text:p>
          <text:p text:style-name="P228">FF_JKE<text:tab/>228</text:p>
          <text:p text:style-name="P228">FF_RSE<text:tab/>229</text:p>
          <text:p text:style-name="P228">FIB<text:tab/>44</text:p>
          <text:p text:style-name="P228">FIFO_16<text:tab/>176</text:p>
          <text:p text:style-name="P228">FIFO_32<text:tab/>177</text:p>
          <text:p text:style-name="P228">FILL<text:tab/>146</text:p>
          <text:p text:style-name="P228">FILTER_DW<text:tab/>258</text:p>
          <text:p text:style-name="P228">FILTER_MAV_DW<text:tab/>259</text:p>
          <text:p text:style-name="P228">FILTER_MAV_W<text:tab/>260</text:p>
          <text:p text:style-name="P228">FILTER_W<text:tab/>260</text:p>
          <text:p text:style-name="P228">FILTER_WAV<text:tab/>261</text:p>
          <text:p text:style-name="P228">FIND_CHAR<text:tab/>146</text:p>
          <text:p text:style-name="P228">FIND_CTRL<text:tab/>147</text:p>
          <text:p text:style-name="P228">FIND_NONUM<text:tab/>147</text:p>
          <text:p text:style-name="P228">FIND_NUM<text:tab/>148</text:p>
          <text:p text:style-name="P228">FINDB<text:tab/>148</text:p>
          <text:p text:style-name="P228">FINDB_NONUM<text:tab/>149</text:p>
          <text:p text:style-name="P228">FINDB_NUM<text:tab/>149</text:p>
          <text:p text:style-name="P228">FINDP<text:tab/>150</text:p>
          <text:p text:style-name="P228">FIX<text:tab/>150</text:p>
          <text:p text:style-name="P228">FLOAT_TO_REAL<text:tab/>151</text:p>
          <text:p text:style-name="P228">FLOOR<text:tab/>45</text:p>
          <text:p text:style-name="P228">FLOOR2<text:tab/>45</text:p>
          <text:p text:style-name="P228">FLOW_CONTROL<text:tab/>430</text:p>
          <text:p text:style-name="P228">FRACT<text:tab/>46</text:p>
          <text:p text:style-name="P228">FSTRING_TO_BYTE<text:tab/>151</text:p>
          <text:p text:style-name="P228">FSTRING_TO_DT<text:tab/>152</text:p>
          <text:p text:style-name="P228">FSTRING_TO_DWORD<text:tab/>152</text:p>
          <text:p text:style-name="P228">FSTRING_TO_MONTH<text:tab/>153</text:p>
          <text:p text:style-name="P228">FSTRING_TO_WEEK<text:tab/>153</text:p>
          <text:p text:style-name="P228">FSTRING_TO_WEEKDAY<text:tab/>154</text:p>
          <text:p text:style-name="P228">FT_AVG<text:tab/>91</text:p>
          <text:p text:style-name="P228">FT_DERIV<text:tab/>337</text:p>
          <text:p text:style-name="P228">FT_IMP<text:tab/>338</text:p>
          <text:p text:style-name="P228">FT_INT<text:tab/>339</text:p>
          <text:p text:style-name="P228">FT_INT2<text:tab/>340</text:p>
          <text:p text:style-name="P228">FT_MIN_MAX<text:tab/>92</text:p>
          <text:p text:style-name="P228">FT_PD<text:tab/>341</text:p>
          <text:p text:style-name="P228">FT_PDT1<text:tab/>341</text:p>
          <text:p text:style-name="P228">FT_PI<text:tab/>342</text:p>
          <text:p text:style-name="P228">FT_PID<text:tab/>344</text:p>
          <text:p text:style-name="P228">FT_PIDW<text:tab/>346</text:p>
          <text:p text:style-name="P228">FT_PIDWL<text:tab/>347</text:p>
          <text:p text:style-name="P228">FT_PIW<text:tab/>349</text:p>
          <text:p text:style-name="P228">FT_PIWL<text:tab/>350</text:p>
          <text:p text:style-name="P228">FT_PROFILE<text:tab/>432</text:p>
          <text:p text:style-name="P228">FT_PT1<text:tab/>352</text:p>
          <text:p text:style-name="P228">FT_PT2<text:tab/>353</text:p>
          <text:p text:style-name="P228">FT_RMP<text:tab/>93</text:p>
          <text:p text:style-name="P228">FT_TN16<text:tab/>354</text:p>
          <text:p text:style-name="P228">FT_TN64<text:tab/>355</text:p>
          <text:p text:style-name="P228">FT_TN8<text:tab/>356</text:p>
          <text:p text:style-name="P228">GAMMA<text:tab/>46</text:p>
          <text:p text:style-name="P228">GAUSS<text:tab/>47</text:p>
          <text:p text:style-name="P228">GAUSSCD<text:tab/>47</text:p>
          <text:p text:style-name="P228">GDF<text:tab/>48</text:p>
          <text:p text:style-name="P228">GEN_BIT<text:tab/>187</text:p>
          <text:p text:style-name="P228">GEN_PULSE<text:tab/>238</text:p>
          <text:p text:style-name="P228">GEN_PW2<text:tab/>239</text:p>
          <text:p text:style-name="P228">GEN_RDM<text:tab/>239</text:p>
          <text:p text:style-name="P228">GEN_RDT<text:tab/>240</text:p>
          <text:p text:style-name="P228">GEN_RMP<text:tab/>241</text:p>
          <text:p text:style-name="P228">GEN_SIN<text:tab/>242</text:p>
          <text:p text:style-name="P228">GEN_SQ<text:tab/>189</text:p>
          <text:p text:style-name="P228">GEN_SQR<text:tab/>243</text:p>
          <text:p text:style-name="P228">GN<text:tab/>22</text:p>
          <text:p text:style-name="P228">GOLD<text:tab/>48</text:p>
          <text:p text:style-name="P228">H<text:tab/>376</text:p>
          <text:p text:style-name="P228">HEAT_INDEX<text:tab/>378</text:p>
          <text:p text:style-name="P228">HEAT_METER<text:tab/>378</text:p>
          <text:p text:style-name="P228">HEAT_TEMP<text:tab/>380</text:p>
          <text:p text:style-name="P228">HEX_TO_BYTE<text:tab/>155</text:p>
          <text:p text:style-name="P228">HEX_TO_DWORD<text:tab/>155</text:p>
          <text:p text:style-name="P228">HOLIDAY<text:tab/>114</text:p>
          <text:p text:style-name="P228">HOLYDAY_SETUP<text:tab/>25</text:p>
          <text:p text:style-name="P228">HOUR<text:tab/>114</text:p>
          <text:p text:style-name="P228"><text:soft-page-break/>HOUR_OF_DT<text:tab/>115</text:p>
          <text:p text:style-name="P228">HOUR_TO_TIME<text:tab/>115</text:p>
          <text:p text:style-name="P228">HOUR_TO_TOD<text:tab/>116</text:p>
          <text:p text:style-name="P228">HTML_DECODE<text:tab/>455</text:p>
          <text:p text:style-name="P228">HTML_ENCODE<text:tab/>456</text:p>
          <text:p text:style-name="P228">HYPOT<text:tab/>49</text:p>
          <text:p text:style-name="P228">HYST<text:tab/>356</text:p>
          <text:p text:style-name="P228">HYST_1<text:tab/>358</text:p>
          <text:p text:style-name="P228">HYST_2<text:tab/>359</text:p>
          <text:p text:style-name="P228">HYST_3<text:tab/>360</text:p>
          <text:p text:style-name="P228">INC<text:tab/>49</text:p>
          <text:p text:style-name="P228">INC_DEC<text:tab/>434</text:p>
          <text:p text:style-name="P228">INC2<text:tab/>50</text:p>
          <text:p text:style-name="P228">INT_TO_BCDC<text:tab/>214</text:p>
          <text:p text:style-name="P228">INTERLOCK<text:tab/>436</text:p>
          <text:p text:style-name="P228">IP4_CHECK<text:tab/>456</text:p>
          <text:p text:style-name="P228">IP4_DECODE<text:tab/>457</text:p>
          <text:p text:style-name="P228">IP4_TO_STRING<text:tab/>458</text:p>
          <text:p text:style-name="P228">IRTRANS_1<text:tab/>449</text:p>
          <text:p text:style-name="P228">IRTRANS_4<text:tab/>451</text:p>
          <text:p text:style-name="P228">IRTRANS_8<text:tab/>451</text:p>
          <text:p text:style-name="P228">IRTRANS_DECODE<text:tab/>452</text:p>
          <text:p text:style-name="P228">IS_ALNUM<text:tab/>156</text:p>
          <text:p text:style-name="P228">IS_ALPHA<text:tab/>156</text:p>
          <text:p text:style-name="P228">IS_CC<text:tab/>157</text:p>
          <text:p text:style-name="P228">IS_CTRL<text:tab/>157</text:p>
          <text:p text:style-name="P228">IS_HEX<text:tab/>158</text:p>
          <text:p text:style-name="P228">IS_IP4<text:tab/>458</text:p>
          <text:p text:style-name="P228">IS_LOWER<text:tab/>158</text:p>
          <text:p text:style-name="P228">IS_NCC<text:tab/>159</text:p>
          <text:p text:style-name="P228">IS_NUM<text:tab/>159</text:p>
          <text:p text:style-name="P228">IS_SORTED<text:tab/>75</text:p>
          <text:p text:style-name="P228">IS_UPPER<text:tab/>160</text:p>
          <text:p text:style-name="P228">IS_URLCHR<text:tab/>459</text:p>
          <text:p text:style-name="P228">ISC_ALPHA<text:tab/>160</text:p>
          <text:p text:style-name="P228">ISC_CTRL<text:tab/>161</text:p>
          <text:p text:style-name="P228">ISC_HEX<text:tab/>161</text:p>
          <text:p text:style-name="P228">ISC_LOWER<text:tab/>162</text:p>
          <text:p text:style-name="P228">ISC_NUM<text:tab/>163</text:p>
          <text:p text:style-name="P228">ISC_UPPER<text:tab/>163</text:p>
          <text:p text:style-name="P228">JD2000<text:tab/>116</text:p>
          <text:p text:style-name="P228">K_TO_C<text:tab/>317</text:p>
          <text:p text:style-name="P228">KMH_TO_MS<text:tab/>315</text:p>
          <text:p text:style-name="P228">LANGEVIN<text:tab/>51</text:p>
          <text:p text:style-name="P228">LANGUAGE_DEFAULT<text:tab/>24</text:p>
          <text:p text:style-name="P228">LANGUAGE_MAX<text:tab/>24</text:p>
          <text:p text:style-name="P228">LATCH<text:tab/>231</text:p>
          <text:p text:style-name="P228">LATCH4<text:tab/>231</text:p>
          <text:p text:style-name="P228">LEAP_DAY<text:tab/>117</text:p>
          <text:p text:style-name="P228">LEAP_OF_DATE<text:tab/>117</text:p>
          <text:p text:style-name="P228">LEAP_YEAR<text:tab/>118</text:p>
          <text:p text:style-name="P228">LEGIONELLA<text:tab/>382</text:p>
          <text:p text:style-name="P228">LENGTH<text:tab/>315</text:p>
          <text:p text:style-name="P228">LINEAR_INT<text:tab/>94</text:p>
          <text:p text:style-name="P228">LIST_CLEAN<text:tab/>467</text:p>
          <text:p text:style-name="P228">LIST_GET<text:tab/>468</text:p>
          <text:p text:style-name="P228">LIST_INSERT<text:tab/>469</text:p>
          <text:p text:style-name="P228">LIST_LEN<text:tab/>469</text:p>
          <text:p text:style-name="P228">LIST_NEXT<text:tab/>470</text:p>
          <text:p text:style-name="P228">LIST_RETRIEVE<text:tab/>471</text:p>
          <text:p text:style-name="P228">LOCAL_TIME<text:tab/>118</text:p>
          <text:p text:style-name="P228">LOWERCASE<text:tab/>164</text:p>
          <text:p text:style-name="P228">LTIME_TO_UTC<text:tab/>119</text:p>
          <text:p text:style-name="P228">M_D<text:tab/>302</text:p>
          <text:p text:style-name="P228">M_T<text:tab/>303</text:p>
          <text:p text:style-name="P228">M_TX<text:tab/>303</text:p>
          <text:p text:style-name="P228">MANUAL_1<text:tab/>437</text:p>
          <text:p text:style-name="P228">MANUAL_2<text:tab/>437</text:p>
          <text:p text:style-name="P228">MANUAL_4<text:tab/>439</text:p>
          <text:p text:style-name="P228">MATRIX<text:tab/>215</text:p>
          <text:p text:style-name="P228">MAX3<text:tab/>51</text:p>
          <text:p text:style-name="P228">MESSAGE_4R<text:tab/>164</text:p>
          <text:p text:style-name="P228">MESSAGE_8<text:tab/>165</text:p>
          <text:p text:style-name="P228">METER<text:tab/>299</text:p>
          <text:p text:style-name="P228">METER_STAT<text:tab/>301</text:p>
          <text:p text:style-name="P228">MID3<text:tab/>53</text:p>
          <text:p text:style-name="P228">MIN3<text:tab/>52</text:p>
          <text:p text:style-name="P228">MINUTE<text:tab/>119</text:p>
          <text:p text:style-name="P228">MINUTE_OF_DT<text:tab/>120</text:p>
          <text:p text:style-name="P228">MINUTE_TO_TIME<text:tab/>120</text:p>
          <text:p text:style-name="P228">MIRROR<text:tab/>166</text:p>
          <text:p text:style-name="P228">MIX<text:tab/>261</text:p>
          <text:p text:style-name="P228">MODR<text:tab/>53</text:p>
          <text:p text:style-name="P228">MONTH_BEGIN<text:tab/>120</text:p>
          <text:p text:style-name="P228">MONTH_END<text:tab/>121</text:p>
          <text:p text:style-name="P228">MONTH_OF_DATE<text:tab/>121</text:p>
          <text:p text:style-name="P228">MONTH_TO_STRING<text:tab/>166</text:p>
          <text:p text:style-name="P228">MONTHS<text:tab/>24</text:p>
          <text:p text:style-name="P228">MONTHS3<text:tab/>24</text:p>
          <text:p text:style-name="P228">MS_TO_BFT<text:tab/>316</text:p>
          <text:p text:style-name="P228">MS_TO_KMH<text:tab/>317</text:p>
          <text:p text:style-name="P228">MUL_ADD<text:tab/>54</text:p>
          <text:p text:style-name="P228">MULTI_IN<text:tab/>286</text:p>
          <text:p text:style-name="P228">MULTIME<text:tab/>122</text:p>
          <text:p text:style-name="P228">MUX_2<text:tab/>217</text:p>
          <text:p text:style-name="P228">MUX_4<text:tab/>217</text:p>
          <text:p text:style-name="P228"><text:soft-page-break/>MUX_R2<text:tab/>262</text:p>
          <text:p text:style-name="P228">MUX_R4<text:tab/>262</text:p>
          <text:p text:style-name="P228">NEG<text:tab/>54</text:p>
          <text:p text:style-name="P228">NETWORK_BUFFER_SIZE<text:tab/>23</text:p>
          <text:p text:style-name="P228">OCT_TO_BYTE<text:tab/>167</text:p>
          <text:p text:style-name="P228">OCT_TO_DWORD<text:tab/>168</text:p>
          <text:p text:style-name="P228">OFFSET<text:tab/>263</text:p>
          <text:p text:style-name="P228">OFFSET2<text:tab/>265</text:p>
          <text:p text:style-name="P228">OM_TO_F<text:tab/>318</text:p>
          <text:p text:style-name="P228">ONTIME<text:tab/>304</text:p>
          <text:p text:style-name="P228">OSCAT_VERSION<text:tab/>32</text:p>
          <text:p text:style-name="P228">OVERRIDE<text:tab/>266</text:p>
          <text:p text:style-name="P228">PARITY<text:tab/>218</text:p>
          <text:p text:style-name="P228">PARSET<text:tab/>440</text:p>
          <text:p text:style-name="P228">PARSET2<text:tab/>441</text:p>
          <text:p text:style-name="P228">PERIOD<text:tab/>122</text:p>
          <text:p text:style-name="P228">PERIOD2<text:tab/>123</text:p>
          <text:p text:style-name="P228">PI05<text:tab/>22</text:p>
          <text:p text:style-name="P228">PI1<text:tab/>22</text:p>
          <text:p text:style-name="P228">PI2<text:tab/>22</text:p>
          <text:p text:style-name="P228">PN<text:tab/>22</text:p>
          <text:p text:style-name="P228">POLYNOM_INT<text:tab/>95</text:p>
          <text:p text:style-name="P228">PRESSURE<text:tab/>318</text:p>
          <text:p text:style-name="P228">PT_TO_F<text:tab/>319</text:p>
          <text:p text:style-name="P228">PULSE_LENGTH<text:tab/>395</text:p>
          <text:p text:style-name="P228">PULSE_T<text:tab/>395</text:p>
          <text:p text:style-name="P228">PWM_DC<text:tab/>245</text:p>
          <text:p text:style-name="P228">PWM_PW<text:tab/>245</text:p>
          <text:p text:style-name="P228">R2_ABS<text:tab/>86</text:p>
          <text:p text:style-name="P228">R2_ADD<text:tab/>87</text:p>
          <text:p text:style-name="P228">R2_ADD2<text:tab/>87</text:p>
          <text:p text:style-name="P228">R2_MUL<text:tab/>88</text:p>
          <text:p text:style-name="P228">R2_SET<text:tab/>88</text:p>
          <text:p text:style-name="P228">RAD<text:tab/>55</text:p>
          <text:p text:style-name="P228">RANGE_TO_BYTE<text:tab/>267</text:p>
          <text:p text:style-name="P228">RANGE_TO_WORD<text:tab/>267</text:p>
          <text:p text:style-name="P228">RDM<text:tab/>55</text:p>
          <text:p text:style-name="P228">RDM2<text:tab/>56</text:p>
          <text:p text:style-name="P228">RDMDW<text:tab/>56</text:p>
          <text:p text:style-name="P228">REAL_TO_DW<text:tab/>219</text:p>
          <text:p text:style-name="P228">REAL_TO_STRF<text:tab/>168</text:p>
          <text:p text:style-name="P228">REFRACTION<text:tab/>123</text:p>
          <text:p text:style-name="P228">REPLACE_ALL<text:tab/>169</text:p>
          <text:p text:style-name="P228">REPLACE_CHARS<text:tab/>169</text:p>
          <text:p text:style-name="P228">REPLACE_UML<text:tab/>170</text:p>
          <text:p text:style-name="P228">RES_NI<text:tab/>287</text:p>
          <text:p text:style-name="P228">RES_PT<text:tab/>288</text:p>
          <text:p text:style-name="P228">RES_SI<text:tab/>289</text:p>
          <text:p text:style-name="P228">REVERSE<text:tab/>219</text:p>
          <text:p text:style-name="P228">RMP_B<text:tab/>246</text:p>
          <text:p text:style-name="P228">RMP_SOFT<text:tab/>248</text:p>
          <text:p text:style-name="P228">RMP_W<text:tab/>249</text:p>
          <text:p text:style-name="P228">RND<text:tab/>57</text:p>
          <text:p text:style-name="P228">ROUND<text:tab/>58</text:p>
          <text:p text:style-name="P228">RTC_2<text:tab/>124</text:p>
          <text:p text:style-name="P228">RTC_MS<text:tab/>125</text:p>
          <text:p text:style-name="P228">SCALE<text:tab/>268</text:p>
          <text:p text:style-name="P228">SCALE_B<text:tab/>268</text:p>
          <text:p text:style-name="P228">SCALE_B2<text:tab/>269</text:p>
          <text:p text:style-name="P228">SCALE_B4<text:tab/>271</text:p>
          <text:p text:style-name="P228">SCALE_B8<text:tab/>272</text:p>
          <text:p text:style-name="P228">SCALE_D<text:tab/>273</text:p>
          <text:p text:style-name="P228">SCALE_R<text:tab/>273</text:p>
          <text:p text:style-name="P228">SCALE_X2<text:tab/>274</text:p>
          <text:p text:style-name="P228">SCALE_X4<text:tab/>275</text:p>
          <text:p text:style-name="P228">SCALE_X8<text:tab/>276</text:p>
          <text:p text:style-name="P228">SCHEDULER<text:tab/>190</text:p>
          <text:p text:style-name="P228">SCHEDULER_2<text:tab/>190</text:p>
          <text:p text:style-name="P228">SDD<text:tab/>385</text:p>
          <text:p text:style-name="P228">SECOND<text:tab/>126</text:p>
          <text:p text:style-name="P228">SECOND_OF_DT<text:tab/>126</text:p>
          <text:p text:style-name="P228">SECOND_TO_TIME<text:tab/>126</text:p>
          <text:p text:style-name="P228">SEL2_OF_3<text:tab/>277</text:p>
          <text:p text:style-name="P228">SEL2_OF_3B<text:tab/>277</text:p>
          <text:p text:style-name="P228">SELECT_8<text:tab/>230</text:p>
          <text:p text:style-name="P228">SENSOR_INT<text:tab/>290</text:p>
          <text:p text:style-name="P228">SEQUENCE_4<text:tab/>191</text:p>
          <text:p text:style-name="P228">SEQUENCE_64<text:tab/>194</text:p>
          <text:p text:style-name="P228">SEQUENCE_8<text:tab/>195</text:p>
          <text:p text:style-name="P228">SET_DATE<text:tab/>127</text:p>
          <text:p text:style-name="P228">SET_DT<text:tab/>128</text:p>
          <text:p text:style-name="P228">SET_TOD<text:tab/>128</text:p>
          <text:p text:style-name="P228">SGN<text:tab/>58</text:p>
          <text:p text:style-name="P228">SH<text:tab/>278</text:p>
          <text:p text:style-name="P228">SH_1<text:tab/>279</text:p>
          <text:p text:style-name="P228">SH_2<text:tab/>280</text:p>
          <text:p text:style-name="P228">SH_T<text:tab/>282</text:p>
          <text:p text:style-name="P228">SHL1<text:tab/>220</text:p>
          <text:p text:style-name="P228">SHR_4E<text:tab/>232</text:p>
          <text:p text:style-name="P228">SHR_4UDE<text:tab/>233</text:p>
          <text:p text:style-name="P228">SHR_8PLE<text:tab/>234</text:p>
          <text:p text:style-name="P228">SHR_8UDE<text:tab/>235</text:p>
          <text:p text:style-name="P228">SHR1<text:tab/>220</text:p>
          <text:p text:style-name="P228">SIGMOID<text:tab/>59</text:p>
          <text:p text:style-name="P228">SIGN_I<text:tab/>59</text:p>
          <text:p text:style-name="P228">SIGN_R<text:tab/>60</text:p>
          <text:p text:style-name="P228"><text:soft-page-break/>SIGNAL<text:tab/>442</text:p>
          <text:p text:style-name="P228">SIGNAL_4<text:tab/>443</text:p>
          <text:p text:style-name="P228">SINC<text:tab/>60</text:p>
          <text:p text:style-name="P228">SINH<text:tab/>60</text:p>
          <text:p text:style-name="P228">SPEED<text:tab/>319</text:p>
          <text:p text:style-name="P228">SPHERE_V<text:tab/>99</text:p>
          <text:p text:style-name="P228">SQRTN<text:tab/>61</text:p>
          <text:p text:style-name="P228">SRAMP<text:tab/>444</text:p>
          <text:p text:style-name="P228">STACK_16<text:tab/>177</text:p>
          <text:p text:style-name="P228">STACK_32<text:tab/>178</text:p>
          <text:p text:style-name="P228">STAIR<text:tab/>283</text:p>
          <text:p text:style-name="P228">STAIR2<text:tab/>284</text:p>
          <text:p text:style-name="P228">STATUS_TO_ESR<text:tab/>32</text:p>
          <text:p text:style-name="P228">STORE_8<text:tab/>236</text:p>
          <text:p text:style-name="P228">STRING_LENGTH<text:tab/>23</text:p>
          <text:p text:style-name="P228">STRING_TO_BUFFER<text:tab/>464</text:p>
          <text:p text:style-name="P228">STRING_TO_URL<text:tab/>459</text:p>
          <text:p text:style-name="P228">SUN_POS<text:tab/>129</text:p>
          <text:p text:style-name="P228">SUN_TIME<text:tab/>130</text:p>
          <text:p text:style-name="P228">SWAP_BYTE<text:tab/>221</text:p>
          <text:p text:style-name="P228">SWAP_BYTE2<text:tab/>221</text:p>
          <text:p text:style-name="P228">SWITCH_I<text:tab/>396</text:p>
          <text:p text:style-name="P228">SWITCH_X<text:tab/>397</text:p>
          <text:p text:style-name="P228">T_PLC_MS<text:tab/>305</text:p>
          <text:p text:style-name="P228">T_PLC_US<text:tab/>307</text:p>
          <text:p text:style-name="P228">TANH<text:tab/>61</text:p>
          <text:p text:style-name="P228">TANK_LEVEL<text:tab/>445</text:p>
          <text:p text:style-name="P228">TC_MS<text:tab/>308</text:p>
          <text:p text:style-name="P228">TC_S<text:tab/>309</text:p>
          <text:p text:style-name="P228">TC_US<text:tab/>309</text:p>
          <text:p text:style-name="P228">TEMP_EXT<text:tab/>385</text:p>
          <text:p text:style-name="P228">TEMP_NI<text:tab/>291</text:p>
          <text:p text:style-name="P228">TEMP_PT<text:tab/>292</text:p>
          <text:p text:style-name="P228">TEMP_SI<text:tab/>293</text:p>
          <text:p text:style-name="P228">TEMPERATURE<text:tab/>320</text:p>
          <text:p text:style-name="P228">TICKER<text:tab/>170</text:p>
          <text:p text:style-name="P228">TIMER_1<text:tab/>398</text:p>
          <text:p text:style-name="P228">TIMER_2<text:tab/>398</text:p>
          <text:p text:style-name="P228">TIMER_EVENT_DECODE<text:tab/>400</text:p>
          <text:p text:style-name="P228">TIMER_EXT<text:tab/>401</text:p>
          <text:p text:style-name="P228">TIMER_P4<text:tab/>403</text:p>
          <text:p text:style-name="P228">TK<text:tab/>22</text:p>
          <text:p text:style-name="P228">TMAX<text:tab/>196</text:p>
          <text:p text:style-name="P228">TMIN<text:tab/>197</text:p>
          <text:p text:style-name="P228">TO_LOWER<text:tab/>171</text:p>
          <text:p text:style-name="P228">TO_UML<text:tab/>171</text:p>
          <text:p text:style-name="P228">TO_UPPER<text:tab/>172</text:p>
          <text:p text:style-name="P228">TOF_1<text:tab/>197</text:p>
          <text:p text:style-name="P228">TOGGLE<text:tab/>237</text:p>
          <text:p text:style-name="P228">TONOF<text:tab/>198</text:p>
          <text:p text:style-name="P228">TP_1<text:tab/>199</text:p>
          <text:p text:style-name="P228">TP_1D<text:tab/>199</text:p>
          <text:p text:style-name="P228">TP_R<text:tab/>200</text:p>
          <text:p text:style-name="P228">TRIANGLE_A<text:tab/>100</text:p>
          <text:p text:style-name="P228">TRIM<text:tab/>173</text:p>
          <text:p text:style-name="P228">TRIM1<text:tab/>173</text:p>
          <text:p text:style-name="P228">TRIME<text:tab/>173</text:p>
          <text:p text:style-name="P228">TUNE<text:tab/>446</text:p>
          <text:p text:style-name="P228">TUNE2<text:tab/>447</text:p>
          <text:p text:style-name="P228">UG<text:tab/>22</text:p>
          <text:p text:style-name="P228">UPPERCASE<text:tab/>174</text:p>
          <text:p text:style-name="P228">URL_DECODE<text:tab/>460</text:p>
          <text:p text:style-name="P228">URL_ENCODE<text:tab/>460</text:p>
          <text:p text:style-name="P228">URL_TO_STRING<text:tab/>461</text:p>
          <text:p text:style-name="P228">UTC_TO_LTIME<text:tab/>131</text:p>
          <text:p text:style-name="P228">V3_ABS<text:tab/>101</text:p>
          <text:p text:style-name="P228">V3_ADD<text:tab/>102</text:p>
          <text:p text:style-name="P228">V3_ANG<text:tab/>102</text:p>
          <text:p text:style-name="P228">V3_DPRO<text:tab/>102</text:p>
          <text:p text:style-name="P228">V3_NORM<text:tab/>103</text:p>
          <text:p text:style-name="P228">V3_NUL<text:tab/>103</text:p>
          <text:p text:style-name="P228">V3_PAR<text:tab/>104</text:p>
          <text:p text:style-name="P228">V3_REV<text:tab/>104</text:p>
          <text:p text:style-name="P228">V3_SMUL<text:tab/>105</text:p>
          <text:p text:style-name="P228">V3_SUB<text:tab/>105</text:p>
          <text:p text:style-name="P228">V3_XANG<text:tab/>106</text:p>
          <text:p text:style-name="P228">V3_XPRO<text:tab/>106</text:p>
          <text:p text:style-name="P228">V3_YANG<text:tab/>106</text:p>
          <text:p text:style-name="P228">V3_ZANG<text:tab/>107</text:p>
          <text:p text:style-name="P228">WATER_CP<text:tab/>387</text:p>
          <text:p text:style-name="P228">WATER_DENSITY<text:tab/>387</text:p>
          <text:p text:style-name="P228">WATER_ENTHALPY<text:tab/>388</text:p>
          <text:p text:style-name="P228">WCT<text:tab/>389</text:p>
          <text:p text:style-name="P228">WEEKDAY_TO_STRING<text:tab/>174</text:p>
          <text:p text:style-name="P228">WEEKDAYS<text:tab/>24</text:p>
          <text:p text:style-name="P228">WEEKDAYS2<text:tab/>24</text:p>
          <text:p text:style-name="P228">WINDOW<text:tab/>62</text:p>
          <text:p text:style-name="P228">WINDOW2<text:tab/>62</text:p>
          <text:p text:style-name="P228">WORD_OF_BYTE<text:tab/>222</text:p>
          <text:p text:style-name="P228">WORD_OF_DWORD<text:tab/>222</text:p>
          <text:p text:style-name="P228">WORD_TO_RANGE<text:tab/>285</text:p>
          <text:p text:style-name="P228">WORK_WEEK<text:tab/>132</text:p>
          <text:p text:style-name="P228">YEAR_BEGIN<text:tab/>132</text:p>
          <text:p text:style-name="P228">YEAR_END<text:tab/>133</text:p>
          <text:p text:style-name="P228">YEAR_OF_DATE<text:tab/>133</text:p>
          <text:p text:style-name="P228"><text:s/><text:tab/>119, 131, 259</text:p>
          <text:p text:style-name="P228"><text:soft-page-break/>_ARRAY_ABS<text:tab/>63</text:p>
          <text:p text:style-name="P228">_ARRAY_ADD<text:tab/>64</text:p>
          <text:p text:style-name="P228">_ARRAY_INIT<text:tab/>64</text:p>
          <text:p text:style-name="P228">_ARRAY_MEDIAN<text:tab/>65</text:p>
          <text:p text:style-name="P228">_ARRAY_MUL<text:tab/>66</text:p>
          <text:p text:style-name="P228">_ARRAY_SHUFFLE<text:tab/>67</text:p>
          <text:p text:style-name="P228">_ARRAY_SORT<text:tab/>68</text:p>
          <text:p text:style-name="P228">_BUFFER_CLEAR<text:tab/>462</text:p>
          <text:p text:style-name="P228">_BUFFER_INIT<text:tab/>463</text:p>
          <text:p text:style-name="P228">_BUFFER_INSERT<text:tab/>463</text:p>
          <text:p text:style-name="P228">_DEC1<text:tab/>34</text:p>
          <text:p text:style-name="P228">_INC1<text:tab/>35</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Wingdings" svg:font-family="Wingdings" style:font-adornments="Normale"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Normale" style:font-family-generic="swiss" style:font-pitch="variable"/>
    <style:font-face style:name="Arial1"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1cm" fo:margin-right="0cm" fo:margin-top="0cm" fo:margin-bottom="0.21cm" fo:text-indent="0cm" style:auto-text-indent="false" fo:background-color="transparent" style:shadow="none">
        <style:tab-stops/>
        <style:background-image/>
      </style:paragraph-properties>
      <style:text-properties style:font-name="Arial1"/>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2"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1"/>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1"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1"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
        <style:list-level-properties text:min-label-width="1cm" text:min-label-distance="0.379cm"/>
      </text:outline-level-style>
      <text:outline-level-style text:level="2" style:num-suffix="  " style:num-format="">
        <style:list-level-properties text:space-before="0.499cm" text:min-label-width="1cm" text:min-label-distance="0.379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font-name="Arial"/>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chapter text:display="name" text:outline-level="1"/></text:p>
      </style:header>
      <style:header-left>
        <text:p text:style-name="Header"><text:tab/><text:chapter text:display="name" text:outline-level="1"/></text:p>
      </style:header-left>
      <style:footer>
        <text:p text:style-name="MP1"><text:page-number text:select-page="current">15</text:page-number><text:tab/><text:tab/>Version 2.77</text:p>
      </style:footer>
      <style:footer-left>
        <text:p text:style-name="MP1"><text:s/><text:page-number text:select-page="current">15</text:page-number><text:tab/><text:tab/>Version 2.77</text:p>
      </style:footer-left>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Footnote" style:page-layout-name="Mpm5"/>
    <style:master-page style:name="Endnote" style:page-layout-name="Mpm5"/>
    <style:master-page style:name="Destra" style:page-layout-name="Mpm6" style:next-style-name="Sinistra">
      <style:header>
        <text:p text:style-name="Header"><text:span text:style-name="MT1">Version 2.00<text:tab/><text:tab/></text:span><text:chapter text:display="name" text:outline-level="1"/></text:p>
      </style:header>
      <style:footer>
        <text:p text:style-name="Footer"><text:span text:style-name="MT1">OSCAT Library Referenz<text:tab/><text:tab/></text:span><text:span text:style-name="MT1"><text:page-number style:num-format="1" text:select-page="current">15</text:page-number></text:span></text:p>
      </style:footer>
    </style:master-page>
    <style:master-page style:name="Sinistra" style:page-layout-name="Mpm7" style:next-style-name="Destra">
      <style:header>
        <text:p text:style-name="Header"><text:span text:style-name="MT1"><text:chapter text:display="name" text:outline-level="1"/></text:span><text:span text:style-name="MT1"><text:tab/><text:tab/>Version 2.00</text:span></text:p>
      </style:header>
      <style:footer>
        <text:p text:style-name="Footer"><text:page-number style:num-format="1" text:select-page="current">15</text:page-number><text:tab/><text:tab/>OSCAT <text:span text:style-name="M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24T20:10:03</meta:creation-date>
    <dc:date>2008-09-11T17:22:13</dc:date>
    <meta:editing-cycles>1</meta:editing-cycles>
    <meta:editing-duration>PT0S</meta:editing-duration>
    <meta:document-statistic meta:table-count="49" meta:image-count="699" meta:object-count="1" meta:page-count="478" meta:paragraph-count="8257" meta:word-count="77085" meta:character-count="4965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
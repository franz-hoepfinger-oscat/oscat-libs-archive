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3.847cm"/>
    </style:style>
    <style:style style:name="co6" style:family="table-column">
      <style:table-column-properties fo:break-before="auto" style:column-width="5.74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6.687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383cm"/>
    </style:style>
    <style:style style:name="co11" style:family="table-column">
      <style:table-column-properties fo:break-before="auto" style:column-width="6.24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0.873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8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9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10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rotation-align="bottom" style:vertical-align="top"/>
    </style:style>
    <style:style style:name="ce12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3" style:family="table-cell" style:parent-style-name="Default" style:data-style-name="N127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4" style:family="table-cell" style:parent-style-name="Default" style:data-style-name="N13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5" style:family="table-cell" style:parent-style-name="Default" style:data-style-name="N124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6" style:family="table-cell" style:parent-style-name="Default" style:data-style-name="N135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7" style:family="table-cell" style:parent-style-name="Default" style:data-style-name="N134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8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20" style:family="table-cell" style:parent-style-name="Default">
      <style:table-cell-properties style:rotation-align="bottom" style:vertical-align="top"/>
    </style:style>
    <style:style style:name="ce21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wrap-option="wrap" style:rotation-align="bottom" style:vertical-align="top"/>
    </style:style>
    <style:style style:name="ce23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7" style:family="table-cell" style:parent-style-name="Default" style:data-style-name="N37">
      <style:table-cell-properties fo:wrap-option="wrap" style:rotation-align="bottom" style:vertical-align="top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30" style:family="table-cell" style:parent-style-name="Default">
      <style:table-cell-properties fo:wrap-option="wrap" style:rotation-align="bottom" style:vertical-align="top"/>
      <style:text-properties style:font-name="Arial" fo:language="en" fo:country="US" fo:font-style="normal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1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2" style:family="table-cell" style:parent-style-name="Default" style:data-style-name="N129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4" style:family="table-cell" style:parent-style-name="Default" style:data-style-name="N132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5" style:family="table-cell" style:parent-style-name="Default" style:data-style-name="N128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3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3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40" style:family="table-cell" style:parent-style-name="Default" style:data-style-name="N119">
      <style:table-cell-properties fo:wrap-option="wrap" style:rotation-align="top"/>
      <style:text-properties fo:font-style="normal" fo:font-weight="bold"/>
    </style:style>
    <style:style style:name="ce41" style:family="table-cell" style:parent-style-name="Default" style:data-style-name="N119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9">
      <style:table-cell-properties fo:wrap-option="wrap" style:rotation-align="top"/>
      <style:text-properties fo:font-style="normal" fo:font-weight="normal"/>
    </style:style>
    <style:style style:name="ce43" style:family="table-cell" style:parent-style-name="Default" style:data-style-name="N119">
      <style:table-cell-properties style:rotation-align="top"/>
    </style:style>
    <style:style style:name="ce44" style:family="table-cell" style:parent-style-name="Default" style:data-style-name="N119">
      <style:table-cell-properties fo:wrap-option="wrap" style:rotation-align="top"/>
    </style:style>
    <style:style style:name="ce45" style:family="table-cell" style:parent-style-name="Default" style:data-style-name="N120">
      <style:table-cell-properties fo:wrap-option="wrap" style:rotation-align="top"/>
      <style:text-properties fo:font-style="normal" fo:font-weight="bold"/>
    </style:style>
    <style:style style:name="ce46" style:family="table-cell" style:parent-style-name="Default" style:data-style-name="N120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7" style:family="table-cell" style:parent-style-name="Default" style:data-style-name="N120">
      <style:table-cell-properties fo:wrap-option="wrap" style:rotation-align="top"/>
      <style:text-properties fo:font-style="normal" fo:font-weight="normal"/>
    </style:style>
    <style:style style:name="ce48" style:family="table-cell" style:parent-style-name="Default" style:data-style-name="N120">
      <style:table-cell-properties fo:wrap-option="wrap" style:rotation-align="top"/>
    </style:style>
    <style:style style:name="ce49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50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52" style:family="table-cell" style:parent-style-name="Default" style:data-style-name="N121">
      <style:table-cell-properties style:text-align-source="fix" style:repeat-content="false" fo:wrap-option="wrap" style:rotation-align="top"/>
      <style:paragraph-properties fo:text-align="start" fo:margin-left="0cm"/>
    </style:style>
    <style:style style:name="ce53" style:family="table-cell" style:parent-style-name="Default">
      <style:table-cell-properties fo:wrap-option="wrap" style:rotation-align="top"/>
      <style:text-properties fo:font-style="normal" fo:font-weight="bold"/>
    </style:style>
    <style:style style:name="ce54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5" style:family="table-cell" style:parent-style-name="Default">
      <style:table-cell-properties fo:wrap-option="wrap" style:rotation-align="top"/>
      <style:text-properties fo:font-style="normal" fo:font-weight="normal"/>
    </style:style>
    <style:style style:name="ce56" style:family="table-cell" style:parent-style-name="Default">
      <style:table-cell-properties fo:wrap-option="wrap" style:rotation-align="top"/>
    </style:style>
    <style:style style:name="ce57" style:family="table-cell" style:parent-style-name="Default" style:data-style-name="N13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8" style:family="table-cell" style:parent-style-name="Default" style:data-style-name="N116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59" style:family="table-cell" style:parent-style-name="Default" style:data-style-name="N133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0" style:family="table-cell" style:parent-style-name="Default" style:data-style-name="N129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61" style:family="table-cell" style:parent-style-name="Default">
      <style:table-cell-properties style:rotation-align="top"/>
    </style:style>
    <style:style style:name="ce62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4" table:default-cell-style-name="ce28"/>
        <table:table-column table:style-name="co5" table:default-cell-style-name="ce22"/>
        <table:table-column table:style-name="co6" table:default-cell-style-name="ce44"/>
        <table:table-column table:style-name="co7" table:default-cell-style-name="ce48"/>
        <table:table-column table:style-name="co7" table:default-cell-style-name="ce52"/>
        <table:table-column table:style-name="co7" table:visibility="collapse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number-columns-repeated="242" table:default-cell-style-name="ce56"/>
        <table:table-column table:style-name="co12" table:default-cell-style-name="ce61"/>
        <table:table-row table:style-name="ro1">
          <table:table-cell table:style-name="ce1" office:value-type="string" calcext:value-type="string">
            <text:p>Release</text:p>
          </table:table-cell>
          <table:table-cell table:style-name="ce12" office:value-type="string" calcext:value-type="string">
            <text:p>Modul name</text:p>
          </table:table-cell>
          <table:table-cell table:style-name="ce1" office:value-type="string" calcext:value-type="string">
            <text:p>Rev</text:p>
          </table:table-cell>
          <table:table-cell table:style-name="ce12" office:value-type="string" calcext:value-type="string">
            <text:p>Date</text:p>
          </table:table-cell>
          <table:table-cell table:style-name="ce29" office:value-type="string" calcext:value-type="string">
            <text:p>Histo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table:style-name="ce2"/>
          <table:table-cell table:style-name="ce3"/>
          <table:table-cell table:style-name="ce4"/>
          <table:table-cell table:style-name="ce25"/>
          <table:table-cell table:style-name="ce3"/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I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avoid MOD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new code calling INT_TO_STR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INT_TO_ST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new func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added boundary check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_BUFFER_INI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new code to avoid underru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_BUFFER_CL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use buffer init with argument 0 for buffer clea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INC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26-04-06" calcext:value-type="date">
            <text:p>06.04.26</text:p>
          </table:table-cell>
          <table:table-cell table:style-name="ce3" office:value-type="string" calcext:value-type="string">
            <text:p>avoid MOD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6-03-17" calcext:value-type="date">
            <text:p>17.03.26</text:p>
          </table:table-cell>
          <table:table-cell table:style-name="ce3" office:value-type="string" calcext:value-type="string">
            <text:p>added boundary check for l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26-03-15" calcext:value-type="date">
            <text:p>15.03.26</text:p>
          </table:table-cell>
          <table:table-cell table:style-name="ce3" office:value-type="string" calcext:value-type="string">
            <text:p>added out of boundary check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6-03-15" calcext:value-type="date">
            <text:p>15.03.26</text:p>
          </table:table-cell>
          <table:table-cell table:style-name="ce3" office:value-type="string" calcext:value-type="string">
            <text:p>added out of boundary check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4-07-16" calcext:value-type="date">
            <text:p>16.07.24</text:p>
          </table:table-cell>
          <table:table-cell table:style-name="ce3" office:value-type="string" calcext:value-type="string">
            <text:p>added boundary check to respect array limits, Fix for CVE-2024-6876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orrected error in decad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dennis koepk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EVER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improved code by rebler wolfga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new better readable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 to LOCAL_DT for compatibility with IEC61131-3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Calendar Stru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21-02-03" calcext:value-type="date">
            <text:p>03.02.21</text:p>
          </table:table-cell>
          <table:table-cell table:style-name="ce3" office:value-type="string" calcext:value-type="string">
            <text:p>changed LDT, LDATE, LTOD to LOCAL_DT, LOCAL_DATE, LOCAL_TO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added input parameter D to specify the decimal separator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2-01-02" calcext:value-type="date">
            <text:p>02.01.12</text:p>
          </table:table-cell>
          <table:table-cell table:style-name="ce3" office:value-type="string" calcext:value-type="string">
            <text:p>functions now returnes the next position after the input str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11-12-29" calcext:value-type="date">
            <text:p>29.12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4-27" calcext:value-type="date">
            <text:p>27.04.11</text:p>
          </table:table-cell>
          <table:table-cell table:style-name="ce3" office:value-type="string" calcext:value-type="string">
            <text:p>fixed error with local time calculatio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/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/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/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deleted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4-08" calcext:value-type="date">
            <text:p>08.04.11</text:p>
          </table:table-cell>
          <table:table-cell table:style-name="ce3" office:value-type="string" calcext:value-type="string">
            <text:p>PTL and PTH was exchang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night was calculated wro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4-06" calcext:value-type="date">
            <text:p>06.04.11</text:p>
          </table:table-cell>
          <table:table-cell table:style-name="ce3" office:value-type="string" calcext:value-type="string">
            <text:p>optimiz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corrected an error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fact is using constants.ma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26" calcext:value-type="date">
            <text:p>26.03.11</text:p>
          </table:table-cell>
          <table:table-cell table:style-name="ce3" office:value-type="string" calcext:value-type="string">
            <text:p>added array fact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11-03-22" calcext:value-type="date">
            <text:p>22.03.11</text:p>
          </table:table-cell>
          <table:table-cell table:style-name="ce3" office:value-type="string" calcext:value-type="string">
            <text:p>correct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LAS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every element starts with SEP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LIST_AD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3-21" calcext:value-type="date">
            <text:p>21.03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AX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N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MID3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F_QUA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improved performanc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5</text:p>
          </table:table-cell>
          <table:table-cell table:style-name="ce25" office:value-type="date" office:date-value="2011-03-18" calcext:value-type="date">
            <text:p>18.03.11</text:p>
          </table:table-cell>
          <table:table-cell table:style-name="ce3" office:value-type="string" calcext:value-type="string">
            <text:p>reset was not working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9" calcext:value-type="date">
            <text:p>19.02.11</text:p>
          </table:table-cell>
          <table:table-cell table:style-name="ce3" office:value-type="string" calcext:value-type="string">
            <text:p>new enhanced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F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CLK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2-16" calcext:value-type="date">
            <text:p>16.02.11</text:p>
          </table:table-cell>
          <table:table-cell table:style-name="ce3" office:value-type="string" calcext:value-type="string">
            <text:p>corrected an error when timer overflow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added input H to specify twil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fixed a problem, W was not calculat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"/>
          <table:table-cell table:style-name="ce4"/>
          <table:table-cell table:style-name="ce25" office:value-type="date" office:date-value="2011-02-02" calcext:value-type="date">
            <text:p>02.02.11</text:p>
          </table:table-cell>
          <table:table-cell table:style-name="ce3" office:value-type="string" calcext:value-type="string">
            <text:p>removed building code in external librar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8" calcext:value-type="date">
            <text:p>28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27" calcext:value-type="date">
            <text:p>27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code to allow events over midnigh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6" calcext:value-type="date">
            <text:p>26.01.11</text:p>
          </table:table-cell>
          <table:table-cell table:style-name="ce3" office:value-type="string" calcext:value-type="string">
            <text:p>changed type of last to D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4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using function sun_midday</text:p>
            <text:p>Changed calculation of sun_declination</text:p>
            <text:p>Changed input utc from DT to Date</text:p>
            <text:p>Added input 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UN_MID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fixed error in formula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-1 if nothing found</text:p>
            <text:p>Ign=true will ignore cas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AYS_DELT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5" calcext:value-type="date">
            <text:p>25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4" calcext:value-type="date">
            <text:p>24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10-03-08" calcext:value-type="date">
            <text:p>08.03.10</text:p>
          </table:table-cell>
          <table:table-cell table:style-name="ce3" office:value-type="string" calcext:value-type="string">
            <text:p>position before control</text:p>
            <text:p>Delta := sene / 2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fixed a problem with pulse_m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LOW_MET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3" calcext:value-type="date">
            <text:p>23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11-01-22" calcext:value-type="date">
            <text:p>22.01.11</text:p>
          </table:table-cell>
          <table:table-cell table:style-name="ce3" office:value-type="string" calcext:value-type="string">
            <text:p>improved performance 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NETWORK_BUFFER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URL</text:p>
          </table:table-cell>
          <table:table-cell table:style-name="ce4"/>
          <table:table-cell table:style-name="ce25" office:value-type="date" office:date-value="2011-01-21" calcext:value-type="date">
            <text:p>21.01.11</text:p>
          </table:table-cell>
          <table:table-cell table:style-name="ce3" office:value-type="string" calcext:value-type="string">
            <text:p>deleted unused data structur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SUB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hanged offset from hours to minut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BUFFER_UPPERCA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HK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corrected init value to 16#FFFFFFFF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11-01-20" calcext:value-type="date">
            <text:p>20.01.11</text:p>
          </table:table-cell>
          <table:table-cell table:style-name="ce3" office:value-type="string" calcext:value-type="string">
            <text:p>removed nework buffers</text:p>
            <text:p>Added list_length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EAL_TO_FRA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G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_ARRAY_SOR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new faster algorithm using quicksor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Return 0 if RH &lt;=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G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9" calcext:value-type="date">
            <text:p>19.01.11</text:p>
          </table:table-cell>
          <table:table-cell table:style-name="ce30" office:value-type="string" calcext:value-type="string">
            <text:p>changed string(255) to string(list_length)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underrun of out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" office:value-type="string" calcext:value-type="string">
            <text:p>avoid division by 0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ssign 0 before retur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spoken language</text:p>
            <text:p>Deleted holidays for more flexibility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added input holidays to specify local holidays</text:p>
            <text:p>Changed call of function sun_time dt &gt;&gt; dat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5">
          <table:table-cell table:style-name="ce4" office:value-type="string" calcext:value-type="string">
            <text:p>32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using user specified array for holidays</text:p>
            <text:p>Friday, saturday and sunday is also displayed on output nam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VENT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8" calcext:value-type="date">
            <text:p>18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4</text:p>
          </table:table-cell>
          <table:table-cell table:style-name="ce25" office:value-type="date" office:date-value="2011-01-17" calcext:value-type="date">
            <text:p>17.01.11</text:p>
          </table:table-cell>
          <table:table-cell table:style-name="ce31" office:value-type="string" calcext:value-type="string">
            <text:p>init will not clear ontine and cycles, only rst clears these valu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REFLEC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CHECK</text:p>
          </table:table-cell>
          <table:table-cell table:style-name="ce4"/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Deleted and replaced by CRC_GEN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1-01-16" calcext:value-type="date">
            <text:p>16.01.11</text:p>
          </table:table-cell>
          <table:table-cell table:style-name="ce31" office:value-type="string" calcext:value-type="string">
            <text:p>New code and features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ank_VOL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IRCLE_S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10-03-10" calcext:value-type="date">
            <text:p>10.03.10</text:p>
          </table:table-cell>
          <table:table-cell table:style-name="ce31"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ACTUATOR_3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10-01-29" calcext:value-type="date">
            <text:p>29.01.10</text:p>
          </table:table-cell>
          <table:table-cell table:style-name="ce31" office:value-type="string" calcext:value-type="string">
            <text:p>new features and new cod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sun_rise, sun_set and sun_midday are now calculated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10-10-23" calcext:value-type="date">
            <text:p>23.10.10</text:p>
          </table:table-cell>
          <table:table-cell table:style-name="ce31" office:value-type="string" calcext:value-type="string">
            <text:p>sun_rise, sun_set and sun_midday are now in local 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23" calcext:value-type="date">
            <text:p>23.01.10</text:p>
          </table:table-cell>
          <table:table-cell table:style-name="ce31" office:value-type="string" calcext:value-type="string">
            <text:p>fixed a bug during calibration</text:p>
            <text:p>Added T_UP and T_D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10-01-16" calcext:value-type="date">
            <text:p>16.01.10</text:p>
          </table:table-cell>
          <table:table-cell table:style-name="ce31" office:value-type="string" calcext:value-type="string">
            <text:p>avoid the string cal in comments for codesys import bu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12-16" calcext:value-type="date">
            <text:p>16.12.09</text:p>
          </table:table-cell>
          <table:table-cell table:style-name="ce31" office:value-type="string" calcext:value-type="string">
            <text:p>fixed error over midnigh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R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d ESR_OUT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2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2-01" calcext:value-type="date">
            <text:p>01.12.09</text:p>
          </table:table-cell>
          <table:table-cell table:style-name="ce31" office:value-type="string" calcext:value-type="string">
            <text:p>changes pos to be I/O</text:p>
            <text:p>Changed output array size to 32 ele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20</text:p>
          </table:table-cell>
          <table:table-cell table:style-name="Default"/>
          <table:table-cell table:style-name="ce4"/>
          <table:table-cell table:style-name="ce25" office:value-type="date" office:date-value="2009-11-24" calcext:value-type="date">
            <text:p>24.11.09</text:p>
          </table:table-cell>
          <table:table-cell table:style-name="ce3" office:value-type="string" calcext:value-type="string">
            <text:p>Network Components exported into Network Librar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lobal_Constants</text:p>
          </table:table-cell>
          <table:table-cell table:style-name="ce4"/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added network short and long size</text:p>
            <text:p>Default string_length = 25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fixed code for negative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erro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 is now calculated correctl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3" calcext:value-type="date">
            <text:p>13.11.09</text:p>
          </table:table-cell>
          <table:table-cell table:style-name="ce31" office:value-type="string" calcext:value-type="string">
            <text:p>corrected an error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output pos was not pointing to last val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size -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end to array siz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limit start and stop to size of arra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SHADE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11-12" calcext:value-type="date">
            <text:p>12.11.09</text:p>
          </table:table-cell>
          <table:table-cell table:style-name="ce31" office:value-type="string" calcext:value-type="string">
            <text:p>added state 139</text:p>
            <text:p>set defaults for QU, QD, P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GRAY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BYTE_TO_GR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11-09" calcext:value-type="date">
            <text:p>09.1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TR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1" calcext:value-type="date">
            <text:p>21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T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SDD_NH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8-20" calcext:value-type="date">
            <text:p>20.08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K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1</text:p>
          </table:table-cell>
          <table:table-cell table:style-name="ce3" office:value-type="string" calcext:value-type="string">
            <text:p>C_TO_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8-19" calcext:value-type="date">
            <text:p>19.08.09</text:p>
          </table:table-cell>
          <table:table-cell table:style-name="ce31" office:value-type="string" calcext:value-type="string">
            <text:p>fixed error in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major code changes and upda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output C is now calculated in J/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CONTROL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manag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s status to be 12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7" calcext:value-type="date">
            <text:p>27.07.09</text:p>
          </table:table-cell>
          <table:table-cell table:style-name="ce31" office:value-type="string" calcext:value-type="string">
            <text:p>changed status 0 to 13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optimiz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7-26" calcext:value-type="date">
            <text:p>26.07.09</text:p>
          </table:table-cell>
          <table:table-cell table:style-name="ce31" office:value-type="string" calcext:value-type="string">
            <text:p>fixed a problem with wrong midday calcul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5" calcext:value-type="date">
            <text:p>25.07.09</text:p>
          </table:table-cell>
          <table:table-cell table:style-name="ce31" office:value-type="string" calcext:value-type="string">
            <text:p>changed inputs to allow simultsaneous read and wri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inputs to allow read and write in one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7-24" calcext:value-type="date">
            <text:p>24.07.09</text:p>
          </table:table-cell>
          <table:table-cell table:style-name="ce31" office:value-type="string" calcext:value-type="string">
            <text:p>changed parameters of tono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ONO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21" calcext:value-type="date">
            <text:p>21.07.09</text:p>
          </table:table-cell>
          <table:table-cell table:style-name="ce31" office:value-type="string" calcext:value-type="string">
            <text:p>fixed a timing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TIMECHEC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9" calcext:value-type="date">
            <text:p>19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changed all outputs to be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SQ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Default" office:value-type="string" calcext:value-type="string">
            <text:p>_RMP_NEX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10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7-18" calcext:value-type="date">
            <text:p>18.07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9" calcext:value-type="date">
            <text:p>29.03.09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8" calcext:value-type="date">
            <text:p>28.03.09</text:p>
          </table:table-cell>
          <table:table-cell table:style-name="ce31" office:value-type="string" calcext:value-type="string">
            <text:p>replaced multip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YE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S_IN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7" calcext:value-type="date">
            <text:p>27.03.09</text:p>
          </table:table-cell>
          <table:table-cell table:style-name="ce31" office:value-type="string" calcext:value-type="string">
            <text:p>new 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sto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avoid writing to input po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RIVER_4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real constants updated to new systax using dot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23" calcext:value-type="date">
            <text:p>23.03.09</text:p>
          </table:table-cell>
          <table:table-cell table:style-name="ce31" office:value-type="string" calcext:value-type="string">
            <text:p>corrected non standard write to input 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1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IM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22" calcext:value-type="date">
            <text:p>22.03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8" calcext:value-type="date">
            <text:p>18.03.09</text:p>
          </table:table-cell>
          <table:table-cell table:style-name="ce31" office:value-type="string" calcext:value-type="string">
            <text:p>last was not updated</text:p>
            <text:p>Code improve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8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R_4U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4" calcext:value-type="date">
            <text:p>14.03.09</text:p>
          </table:table-cell>
          <table:table-cell table:style-name="ce31" office:value-type="string" calcext:value-type="string"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8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QUENCE_4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named output any to qx for compatibility re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replaced double a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R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function will now return -273.15 °C for RH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HEAT_INDE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13" office:value-type="string" calcext:value-type="string">
            <text:p>HEAT_TE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5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  <text:p>using new module sequence_8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3">
          <table:table-cell table:style-name="ce5" office:value-type="string" calcext:value-type="string">
            <text:p>305</text:p>
          </table:table-cell>
          <table:table-cell table:style-name="ce14" office:value-type="string" calcext:value-type="string">
            <text:p>TEMP_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C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ATER_ENTHALP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C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3" calcext:value-type="date">
            <text:p>13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U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RA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NTROL_SE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AD_ZONE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5" office:value-type="string" calcext:value-type="string">
            <text:p>SPE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T_TP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PRESSUR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ENG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6" office:value-type="string" calcext:value-type="string">
            <text:p>F_TO_P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_TO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NERG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TRO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C_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IBR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NSOR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SI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P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Q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  <text:p>set default amplitude to 1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1" calcext:value-type="date">
            <text:p>11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WORD_TO_RAN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IX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V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TREN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RRAY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TA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2_AB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POLYNOM_IN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RIANGLE_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Z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Y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X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17" office:value-type="string" calcext:value-type="string">
            <text:p>V3_P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U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NOR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V3_A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TIME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improved code</text:p>
            <text:p>Calculation is done on every call to allow for moving installati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QRT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IGMOI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NGEV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RAC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E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TH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type conversion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use correct statement real_to_D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SIN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ACOSH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al constants updated to new systax using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S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TEMP_NI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moved double ssign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  <text:p>Real constants written with do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RC_GE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removed nested comme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S_I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IP4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new faster algorith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calculation of work_week, sun_midday, sun_heigth</text:p>
            <text:p>sun_position will onlx be calculated once per 25 seconds when SPE = TRUE</text:p>
            <text:p>dst will only become true when dst_en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10" calcext:value-type="date">
            <text:p>10.03.09</text:p>
          </table:table-cell>
          <table:table-cell table:style-name="ce31" office:value-type="string" calcext:value-type="string">
            <text:p>added work_week, sun_midday, sun_hei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BLIND_CONTROL_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Default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3-09" calcext:value-type="date">
            <text:p>09.03.09</text:p>
          </table:table-cell>
          <table:table-cell table:style-name="ce31" office:value-type="string" calcext:value-type="string">
            <text:p>input E was ignored</text:p>
            <text:p>Removed double assignments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3-08" calcext:value-type="date">
            <text:p>08.03.09</text:p>
          </table:table-cell>
          <table:table-cell table:style-name="ce31" office:value-type="string" calcext:value-type="string">
            <text:p>added increment by cycle m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refraction is added after angle is normalized</text:p>
            <text:p>deleted 10 second lockout</text:p>
            <text:p>added output for astronomical heigth 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3-07" calcext:value-type="date">
            <text:p>07.03.09</text:p>
          </table:table-cell>
          <table:table-cell table:style-name="ce31" office:value-type="string" calcext:value-type="string">
            <text:p>using new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8" calcext:value-type="date">
            <text:p>28.02.09</text:p>
          </table:table-cell>
          <table:table-cell table:style-name="ce31" office:value-type="string" calcext:value-type="string">
            <text:p>array was not correctly initializ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9-01-23" calcext:value-type="date">
            <text:p>23.01.09</text:p>
          </table:table-cell>
          <table:table-cell table:style-name="ce31" office:value-type="string" calcext:value-type="string">
            <text:p>new code with better accuracy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7"/>
          <table:table-cell table:style-name="ce54" table:number-columns-repeated="2"/>
          <table:table-cell table:style-name="ce59"/>
          <table:table-cell table:style-name="ce54" table:number-columns-repeated="242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25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LECT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renamed input en to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T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_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REAL_TO_STRF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9-02-27" calcext:value-type="date">
            <text:p>27.02.09</text:p>
          </table:table-cell>
          <table:table-cell table:style-name="ce31" office:value-type="string" calcext:value-type="string">
            <text:p>added a missing zero for IN &lt; 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ECOND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INUTE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OUR_TO_TI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AY_TO_TI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4" calcext:value-type="date">
            <text:p>24.02.09</text:p>
          </table:table-cell>
          <table:table-cell table:style-name="ce31" office:value-type="string" calcext:value-type="string">
            <text:p>renamed input to I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limit N to max array index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when inc1 is called with X &gt;= N inc will continue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9-02-23" calcext:value-type="date">
            <text:p>23.02.09</text:p>
          </table:table-cell>
          <table:table-cell table:style-name="ce31" office:value-type="string" calcext:value-type="string">
            <text:p>corrected an index problem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improved algorithm and added T_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20" calcext:value-type="date">
            <text:p>20.02.09</text:p>
          </table:table-cell>
          <table:table-cell table:style-name="ce31" office:value-type="string" calcext:value-type="string">
            <text:p>added outputs TU, TD and 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SH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calendar data structure</text:p>
            <text:p>Added shading position to be configur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2" office:value-type="string" calcext:value-type="string">
            <text:p>corrected wrong night calculation</text:p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sun position dat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ME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MX to be I/O</text:p>
            <text:p>Make sure calculation works for cycle times &lt; 1m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changed output Y to I/O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LAMBERT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2-08" calcext:value-type="date">
            <text:p>08.02.09</text:p>
          </table:table-cell>
          <table:table-cell table:style-name="ce31" office:value-type="string" calcext:value-type="string">
            <text:p>added outputs T24_MIN and T24_MAX</text:p>
            <text:p>Changed sign of input OF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9-01-26" calcext:value-type="date">
            <text:p>26.01.09</text:p>
          </table:table-cell>
          <table:table-cell table:style-name="ce31" office:value-type="string" calcext:value-type="string">
            <text:p>dimming will reverse at 0</text:p>
            <text:p>Rst will override 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multiply differential part with K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5" calcext:value-type="date">
            <text:p>25.01.09</text:p>
          </table:table-cell>
          <table:table-cell table:style-name="ce31" office:value-type="string" calcext:value-type="string">
            <text:p>now also works with negative 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SCALE_X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3" office:value-type="string" calcext:value-type="string"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/>
          <table:table-cell table:style-name="ce58"/>
          <table:table-cell table:style-name="ce54" table:number-columns-repeated="245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4" office:value-type="string" calcext:value-type="string">
            <text:p>delted unused var F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4"/>
          <table:table-cell table:style-name="ce60"/>
          <table:table-cell table:style-name="ce54" table:number-columns-repeated="242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d unused var in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9-01-24" calcext:value-type="date">
            <text:p>24.01.09</text:p>
          </table:table-cell>
          <table:table-cell table:style-name="ce31" office:value-type="string" calcext:value-type="string">
            <text:p>deletes unused vars tmp1 and tmp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GEO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9-01-22" calcext:value-type="date">
            <text:p>22.01.09</text:p>
          </table:table-cell>
          <table:table-cell table:style-name="ce31" office:value-type="string" calcext:value-type="string">
            <text:p>added auto mode for IN</text:p>
            <text:p>Added pulse mode for D1 and D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4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9-01-16" calcext:value-type="date">
            <text:p>16.01.09</text:p>
          </table:table-cell>
          <table:table-cell table:style-name="ce5" office:value-type="string" calcext:value-type="string">
            <text:p>corrected an error in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EMP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RES_NT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2-30" calcext:value-type="date">
            <text:p>30.12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LICK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2-28" calcext:value-type="date">
            <text:p>28.12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holi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ONSTANTS_LANGUAG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23" calcext:value-type="date">
            <text:p>23.12.08</text:p>
          </table:table-cell>
          <table:table-cell table:style-name="ce31" office:value-type="string" calcext:value-type="string">
            <text:p>added french langua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2-22" calcext:value-type="date">
            <text:p>22.12.08</text:p>
          </table:table-cell>
          <table:table-cell table:style-name="ce31" office:value-type="string" calcext:value-type="string">
            <text:p>make sure timer_2 is executed in the first cyc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CH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hanged name of function chr to chr_to_string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angles below horizon are displayed in negative degre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ixed an error when in would be true for more then 49 d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_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code optimiza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FADE input F was i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_LIN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2-17" calcext:value-type="date">
            <text:p>17.12.08</text:p>
          </table:table-cell>
          <table:table-cell table:style-name="ce31" office:value-type="string" calcext:value-type="string">
            <text:p>optimized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24" calcext:value-type="date">
            <text:p>24.11.08</text:p>
          </table:table-cell>
          <table:table-cell table:style-name="ce31" office:value-type="string" calcext:value-type="string">
            <text:p>added type conversions for compatibility reasons</text:p>
            <text:p>avoid divide by 0 f N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new code using library modu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3" calcext:value-type="date">
            <text:p>23.11.08</text:p>
          </table:table-cell>
          <table:table-cell table:style-name="ce31" office:value-type="string" calcext:value-type="string">
            <text:p>added default enq = TRU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MANU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BAND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REND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1" calcext:value-type="date">
            <text:p>21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AUTORU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20" calcext:value-type="date">
            <text:p>20.11.08</text:p>
          </table:table-cell>
          <table:table-cell table:style-name="ce31" office:value-type="string" calcext:value-type="string">
            <text:p>set default for E to be TRUE</text:p>
            <text:p>added Init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chaged typecasts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type conversion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M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T_PLC_US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initialized constants with 0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moved structured constants to global vars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3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2</text:p>
          </table:table-cell>
          <table:table-cell table:style-name="ce25" office:value-type="date" office:date-value="2008-11-16" calcext:value-type="date">
            <text:p>16.11.08</text:p>
          </table:table-cell>
          <table:table-cell table:style-name="ce31" office:value-type="string" calcext:value-type="string">
            <text:p>added Reset Out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BUFFER_COM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4" calcext:value-type="date">
            <text:p>14.11.08</text:p>
          </table:table-cell>
          <table:table-cell table:style-name="ce31" office:value-type="string" calcext:value-type="string">
            <text:p>added soft_dimm featur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LICK_M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13" calcext:value-type="date">
            <text:p>13.11.08</text:p>
          </table:table-cell>
          <table:table-cell table:style-name="ce31" office:value-type="string" calcext:value-type="string">
            <text:p>corrected formula for negative gradi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10" calcext:value-type="date">
            <text:p>10.11.08</text:p>
          </table:table-cell>
          <table:table-cell table:style-name="ce31" office:value-type="string" calcext:value-type="string">
            <text:p>increased internal resolution to millisecond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I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ACTUATOR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8" calcext:value-type="date">
            <text:p>08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added default = true for ena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DERIV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set defaults for inputs day and e, 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1-06" calcext:value-type="date">
            <text:p>06.11.08</text:p>
          </table:table-cell>
          <table:table-cell table:style-name="ce31" office:value-type="string" calcext:value-type="string">
            <text:p>changed to FT_INT2 to avoid overrun at hig valu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rewritten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5" calcext:value-type="date">
            <text:p>05.11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using integr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deleted unused variable chec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INTEGR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T_PT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optimized code and fixed a problem with ini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fixed overflow problen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CYCLE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used wrong fact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2</text:p>
          </table:table-cell>
          <table:table-cell table:style-name="ce3" office:value-type="string" calcext:value-type="string">
            <text:p>T_AVG2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1-03" calcext:value-type="date">
            <text:p>03.11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EMP_PT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INI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BUFFER_CLEA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orrected an error while routine would write outside of array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_TRUN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31" calcext:value-type="date">
            <text:p>31.10.08</text:p>
          </table:table-cell>
          <table:table-cell table:style-name="ce31" office:value-type="string" calcext:value-type="string">
            <text:p>changed algorithm to the more common version using floor instead of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IN_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YTE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D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GGL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ORE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JK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R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4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F_D2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30" calcext:value-type="date">
            <text:p>30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INC to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changed _DEC and _INC to DEC1 and 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added typecast to avoid warning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COLLEC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L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IN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5" office:value-type="string" calcext:value-type="string">
            <text:p>New Module, replacing _DEC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IGN_I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USS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integrator will not be adjusted when ki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C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7" calcext:value-type="date">
            <text:p>27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UCH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E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  <text:p>Improved accuracy for small values by a factor &gt; 100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MA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Added 1 / pi and 1 / 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ATRIX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C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8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4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B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TAI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changed input bit to val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CALE_X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SOFT</text:p>
          </table:table-cell>
          <table:table-cell table:style-name="ce4" office:value-type="string" calcext:value-type="string">
            <text:p>3.0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R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6" calcext:value-type="date">
            <text:p>26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LK_PR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8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4_U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R_4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OUND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 using constant deca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  <text:p>A_TRIG now works for res =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using new language defaul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AY_OF_MONTH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code using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SETUP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NO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5" calcext:value-type="date">
            <text:p>25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4" calcext:value-type="date">
            <text:p>2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NTERLOCK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AN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_CAL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EGIONELLA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changed code to use new version of timer_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, enable input new features (DAYS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W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code using _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fixed a problem with character 8 and 9 behind the comm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SORT_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3" calcext:value-type="date">
            <text:p>2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MON_B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18" office:value-type="string" calcext:value-type="string">
            <text:p>CONSTANTS_LANGUAG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using language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IST_RETRIEVE_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</text:p>
            <text:p>New featur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_RMP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LAMP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XP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W_RECONF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2" calcext:value-type="date">
            <text:p>22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EAT_METER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2P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5" office:value-type="string" calcext:value-type="string">
            <text:p>using location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CH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B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IND_NONUM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CTUATOR_PUMP</text:p>
          </table:table-cell>
          <table:table-cell table:style-name="ce4"/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URNER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code to use ontime rev 2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NTIME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31" office:value-type="string" calcext:value-type="string">
            <text:p>changed structure and code for better performance and external variabl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ALENDA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1" calcext:value-type="date">
            <text:p>21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d time_zone_offset from Real to INT, now in Minut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LOCAL_TIME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deleted from library, can be replaced by UTC_TO_LTIM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LOCA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2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10-20" calcext:value-type="date">
            <text:p>20.10.08</text:p>
          </table:table-cell>
          <table:table-cell table:style-name="ce5" office:value-type="string" calcext:value-type="string">
            <text:p>changed to structured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20" calcext:value-type="date">
            <text:p>20.10.08</text:p>
          </table:table-cell>
          <table:table-cell table:style-name="ce31" office:value-type="string" calcext:value-type="string">
            <text:p>performance improvement</text:p>
            <text:p>Deleted unnecessary trunc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O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UPP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LOW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SC_ALPH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25" office:value-type="string" calcext:value-type="string">
            <text:p>changed language setup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G</text:p>
          </table:table-cell>
          <table:table-cell table:style-name="ce4"/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deleted unnecessary function because -X is faster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PW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PWM_DC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changed type TP_R to TP_X because of name change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P_X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renamed module from TP_R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31" office:value-type="string" calcext:value-type="string">
            <text:p>added typecast to avoid warnings</text:p>
            <text:p>changed output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9" calcext:value-type="date">
            <text:p>19.10.08</text:p>
          </table:table-cell>
          <table:table-cell table:style-name="ce5" office:value-type="string" calcext:value-type="string">
            <text:p>changed input device_code to dev_code and device to dev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LIND_ACTUATO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calls for rmp_B because of change in RMP_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D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LOAD_B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H_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renamed ino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BIT_TOGG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TEMP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IR_DENSITY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phys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A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OM_TO_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EN_SIN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GAMM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_TO_OM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LLIPSE_A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VEKTOR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EVE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EAL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NETWORK_BUFF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HOLIDAY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ESR_DAT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NSTANTS_PHY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COMPLE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changed to use math constant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A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SDT_TO_TO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2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DT_TO_S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s type of input ofs from int to by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added typecast to avoid warnings</text:p>
            <text:p>changed input en to e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301</text:p>
          </table:table-cell>
          <table:table-cell table:style-name="ce3" office:value-type="string" calcext:value-type="string">
            <text:p>FA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8" calcext:value-type="date">
            <text:p>18.10.08</text:p>
          </table:table-cell>
          <table:table-cell table:style-name="ce31" office:value-type="string" calcext:value-type="string">
            <text:p>performance improvement</text:p>
            <text:p>changed calls for rmp_w because rmp_w has chag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variable m_edg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8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IRTRANS_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UD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ialization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TACK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deleted unnecessary init with 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3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FO_16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7" calcext:value-type="date">
            <text:p>17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OILER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4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X_R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IST_LEN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fixed a problem where list_len would only work up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W</text:p>
          </table:table-cell>
          <table:table-cell table:style-name="ce4" office:value-type="string" calcext:value-type="string">
            <text:p>1.8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RMP_B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6" calcext:value-type="date">
            <text:p>16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BI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15" calcext:value-type="date">
            <text:p>15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ULTI_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orrected an error for in_3 overrange detection</text:p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W_CON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performance improveme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UTC_TO_LTIM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optimized code for better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TIME_TO_UTC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changes code for efficiency</text:p>
            <text:p>Changes TIME_Zone_Offset from Int to REAL to allow half hour offse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4" calcext:value-type="date">
            <text:p>14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ACTUATOR_PUMP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auto activation can now be disabled when run_every = T#0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DE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_INC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MAV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13" calcext:value-type="date">
            <text:p>13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10" calcext:value-type="date">
            <text:p>10.10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8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ILTER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9" calcext:value-type="date">
            <text:p>09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SSAGE_4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8" calcext:value-type="date">
            <text:p>08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1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CF_77</text:p>
          </table:table-cell>
          <table:table-cell table:style-name="ce4" office:value-type="string" calcext:value-type="string">
            <text:p>1.1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from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ORK_WEEK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IMER_2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  <text:p>changed function weekday to day_of_week</text:p>
            <text:p/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TEMP_EX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ETER_STA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TO_ST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S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Y_OF_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ATE_AD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function year to year_of_date</text:p>
            <text:p>changed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OF_DA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month to month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YEAR_OF_DATE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10-07" calcext:value-type="date">
            <text:p>07.10.08</text:p>
          </table:table-cell>
          <table:table-cell table:style-name="ce31" office:value-type="string" calcext:value-type="string">
            <text:p>changed name of function year to year_of_dat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10-02" calcext:value-type="date">
            <text:p>02.10.08</text:p>
          </table:table-cell>
          <table:table-cell table:style-name="ce31" office:value-type="string" calcext:value-type="string">
            <text:p>fixed an error, characters 8 and 9 would not be convert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IMM_I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added input val to supply value for set operation</text:p>
            <text:p>Added setup parameter INIT_VA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Default" office:value-type="string" calcext:value-type="string"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30" calcext:value-type="date">
            <text:p>30.09.08</text:p>
          </table:table-cell>
          <table:table-cell table:style-name="ce31" office:value-type="string" calcext:value-type="string">
            <text:p>changed length of input dtring from 20 to 10</text:p>
            <text:p>corrected an error where decoding of characters 8 and 9 would fail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9" calcext:value-type="date">
            <text:p>29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SCHEDULE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8" calcext:value-type="date">
            <text:p>28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AT_TEMP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moved T_INT from config to Input</text:p>
            <text:p>Added config variable H</text:p>
            <text:p>Corrected error in formula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GEN_PW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9-26" calcext:value-type="date">
            <text:p>26.09.08</text:p>
          </table:table-cell>
          <table:table-cell table:style-name="ce31" office:value-type="string" calcext:value-type="string">
            <text:p>corrected an error while PO and AO was set during automatic mode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MONTH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5" calcext:value-type="date">
            <text:p>25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4" calcext:value-type="date">
            <text:p>24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ANUAL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EBOUNC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2" calcext:value-type="date">
            <text:p>22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WEEKDAY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MONTH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21" calcext:value-type="date">
            <text:p>2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7</text:p>
          </table:table-cell>
          <table:table-cell table:style-name="Default" office:value-type="string" calcext:value-type="string">
            <text:p>GLOBAL CONSTANTS </text:p>
          </table:table-cell>
          <table:table-cell table:style-name="Default"/>
          <table:table-cell table:style-name="ce25" office:value-type="date" office:date-value="2008-09-21" calcext:value-type="date">
            <text:p>21.09.08</text:p>
          </table:table-cell>
          <table:table-cell table:style-name="Default" office:value-type="string" calcext:value-type="string">
            <text:p>added new section Language Setup</text:p>
            <text:p>added new section country setup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OCT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5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4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9-20" calcext:value-type="date">
            <text:p>20.09.08</text:p>
          </table:table-cell>
          <table:table-cell table:style-name="ce31" office:value-type="string" calcext:value-type="string">
            <text:p>changed length of input dtring from 20 to 1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7</text:p>
          </table:table-cell>
          <table:table-cell table:style-name="ce3" office:value-type="string" calcext:value-type="string">
            <text:p>DT_SIMU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9-11" calcext:value-type="date">
            <text:p>11.09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1" calcext:value-type="date">
            <text:p>2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MAX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7-18" calcext:value-type="date">
            <text:p>18.07.08</text:p>
          </table:table-cell>
          <table:table-cell table:style-name="ce31" office:value-type="string" calcext:value-type="string">
            <text:p>changed nested call of left(trim()) for compatibility reason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TOF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DE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7" calcext:value-type="date">
            <text:p>17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CLICK_C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A_TRI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9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BLIND_INPUT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FF_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6" calcext:value-type="date">
            <text:p>16.07.08</text:p>
          </table:table-cell>
          <table:table-cell table:style-name="ce31" office:value-type="string" calcext:value-type="string">
            <text:p>New Module</text:p>
          </table:table-cell>
          <table:table-cell table:style-name="Default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PULSE_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JD2000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5" calcext:value-type="date">
            <text:p>15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6</text:p>
          </table:table-cell>
          <table:table-cell table:style-name="ce3" office:value-type="string" calcext:value-type="string">
            <text:p>REFRACTIO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7-14" calcext:value-type="date">
            <text:p>14.07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TAIR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UN_POS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added type conversions to avoid warnings under codesys 3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D to CTRL_PID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named Module FT_PI to CTRL_PI</text:p>
            <text:p>rewritten code to use modular approac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T_TO_BCDC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INT_TO_BCD to INT_TO_BCDC to avoid collision with util.lib</text:p>
            <text:p>corrected error in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CDC_TO_INT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changed name BCD_TO_INT to BCDC_TO_INT to avoid collision with util.lib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6-30" calcext:value-type="date">
            <text:p>30.06.08</text:p>
          </table:table-cell>
          <table:table-cell table:style-name="ce31" office:value-type="string" calcext:value-type="string">
            <text:p>reduced size of string constants to 253 to avoid problems with target aixia DCUF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QUENCE_6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NC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GEN_PUL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9" calcext:value-type="date">
            <text:p>29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W_CONTRO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P_1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INSER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RETRIEV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8" calcext:value-type="date">
            <text:p>28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Default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NEX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Default" office:value-type="string" calcext:value-type="string">
            <text:p>LIST_LE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5" calcext:value-type="date">
            <text:p>25.06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LOAT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2" calcext:value-type="date">
            <text:p>2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WORD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YTE_TO_STRB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IRTRANS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IST_PARS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IN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C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20" calcext:value-type="date">
            <text:p>20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WEEK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EVENT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STRING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N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OCTAL_TO_DWOR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DWORD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changed input hex to STRING(20)</text:p>
            <text:p>function now ignores wrong character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EX_TO_BYT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L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LEA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8" calcext:value-type="date">
            <text:p>18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IMER_P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4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ANUAL_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7" calcext:value-type="date">
            <text:p>17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replace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6" calcext:value-type="date">
            <text:p>16.06.08</text:p>
          </table:table-cell>
          <table:table-cell table:style-name="ce31" office:value-type="string" calcext:value-type="string">
            <text:p>changed nested call of concat for better compatibilit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LEAP_DA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BEG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ONTH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YEAR_EN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5" calcext:value-type="date">
            <text:p>15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T1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accuracy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IGN_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ZONE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AD_BAND_A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H_2</text:p>
          </table:table-cell>
          <table:table-cell table:style-name="ce4" office:value-type="string" calcext:value-type="string">
            <text:p>1.5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N = 16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AV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4" calcext:value-type="date">
            <text:p>14.06.08</text:p>
          </table:table-cell>
          <table:table-cell table:style-name="ce31" office:value-type="string" calcext:value-type="string">
            <text:p>set default for input EN = TRUE and N = 32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3" calcext:value-type="date">
            <text:p>1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S_TO_BF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FT_TO_M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check for pointer overrun</text:p>
            <text:p>change type of inputs start and stop to U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OUNT_D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TC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12" calcext:value-type="date">
            <text:p>12.06.08</text:p>
          </table:table-cell>
          <table:table-cell table:style-name="ce31" office:value-type="string" calcext:value-type="string">
            <text:p>improved performanc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IR_TO_DE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DEG_TO_DI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11" calcext:value-type="date">
            <text:p>1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BIT_OF_DWORD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changes type of input N from byte to in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OUR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MINUTE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SECOND_OF_D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6" calcext:value-type="date">
            <text:p>06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T1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PWM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D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PI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3" calcext:value-type="date">
            <text:p>03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OU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CTRL_IN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R2_SE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7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FT_INT</text:p>
          </table:table-cell>
          <table:table-cell table:style-name="ce4" office:value-type="string" calcext:value-type="string">
            <text:p>2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rewritten with clear code</text:p>
            <text:p>added output LIM</text:p>
            <text:p>switched back to 32 Bit resolution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2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_1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HYST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2" calcext:value-type="date">
            <text:p>02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TANK_LEVE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5</text:p>
          </table:table-cell>
          <table:table-cell table:style-name="ce3" office:value-type="string" calcext:value-type="string">
            <text:p>ACTUATOR_COI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6-01" calcext:value-type="date">
            <text:p>01.06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F_POLY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20" calcext:value-type="date">
            <text:p>20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ALARM_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9" calcext:value-type="date">
            <text:p>19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</text:p>
          </table:table-cell>
          <table:table-cell table:style-name="ce4" office:value-type="string" calcext:value-type="string">
            <text:p>1.7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EL2_OF_3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RDMDW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changed constant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SCALE_B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5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5-18" calcext:value-type="date">
            <text:p>18.05.08</text:p>
          </table:table-cell>
          <table:table-cell table:style-name="ce31" office:value-type="string" calcext:value-type="string">
            <text:p>added charname lists</text:p>
            <text:p>renamed E to E1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6" office:value-type="float" office:value="274" calcext:value-type="float">
            <text:p>274</text:p>
          </table:table-cell>
          <table:table-cell table:style-name="Default" office:value-type="string" calcext:value-type="string">
            <text:p>SCAL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8" calcext:value-type="date">
            <text:p>18.05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PLACE_CHAR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NAM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HAR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14" calcext:value-type="date">
            <text:p>14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TO_STRING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BUFFER_SEARCH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STRING_TO_BUFFER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6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BUFFER_INSERT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5-13" calcext:value-type="date">
            <text:p>13.05.08</text:p>
          </table:table-cell>
          <table:table-cell table:style-name="ce31" office:value-type="string" calcext:value-type="string">
            <text:p>changed type of pointer to array[0..32767]</text:p>
            <text:p>changed size of string to STRING_LENGTH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TM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5-03" calcext:value-type="date">
            <text:p>03.05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5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D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added new constant PI05 and PI025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PERIOD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DE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ENCODE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URLCHR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7" calcext:value-type="date">
            <text:p>27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ORD_OF_BY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ORD_OF_BYT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3" calcext:value-type="date">
            <text:p>23.04.08</text:p>
          </table:table-cell>
          <table:table-cell table:style-name="ce31" office:value-type="string" calcext:value-type="string">
            <text:p>reverse order of inputs to be more logical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P4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9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IN1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22" calcext:value-type="date">
            <text:p>22.04.08</text:p>
          </table:table-cell>
          <table:table-cell table:style-name="ce31" office:value-type="string" calcext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LO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ARG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use ATAN2 instead of ATAN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TAN2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20" calcext:value-type="date">
            <text:p>20.04.08</text:p>
          </table:table-cell>
          <table:table-cell table:style-name="ce31" office:value-type="string" calcext:value-type="string">
            <text:p>New Modul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Setup Parameter NETWORK_BUFFER_SIZE</text:p>
          </table:table-cell>
          <table:table-cell table:style-name="Default" table:number-columns-repeated="4"/>
          <table:table-cell table:style-name="ce54" table:number-columns-repeated="246"/>
          <table:table-cell table:style-name="ce62"/>
        </table:table-row>
        <table:table-row table:style-name="ro6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CF77</text:p>
          </table:table-cell>
          <table:table-cell table:style-name="ce4" office:value-type="string" calcext:value-type="string">
            <text:p>1.9</text:p>
          </table:table-cell>
          <table:table-cell table:style-name="ce25" office:value-type="date" office:date-value="2008-04-19" calcext:value-type="date">
            <text:p>19.04.08</text:p>
          </table:table-cell>
          <table:table-cell table:style-name="ce31" office:value-type="string" calcext:value-type="string">
            <text:p>added input dsi to allow to set daylight savings time when SDT is TRUE</text:p>
            <text:p>added asynchronous SET input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URL_TO_STRING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TRING_TO_UR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REAL_TO_DW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W_TO_REA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18" calcext:value-type="date">
            <text:p>18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AUSSC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C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RF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GlOBAL CONSTANTS </text:p>
          </table:table-cell>
          <table:table-cell table:style-name="ce4"/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etup parameter STEP7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_BEGIN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YEA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WEEKDAY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SET_DATE</text:p>
          </table:table-cell>
          <table:table-cell table:style-name="ce4" office:value-type="string" calcext:value-type="string">
            <text:p>1.6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HOLIDAY</text:p>
          </table:table-cell>
          <table:table-cell table:style-name="ce4" office:value-type="string" calcext:value-type="string">
            <text:p>1.4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EASTE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improved algorithm for higher speed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DAY_OF_DATE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7" calcext:value-type="date">
            <text:p>07.04.08</text:p>
          </table:table-cell>
          <table:table-cell table:style-name="ce31" office:value-type="string" calcext:value-type="string">
            <text:p>deleted unused step7 cod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Default" office:value-type="string" calcext:value-type="string">
            <text:p>GAUS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6" calcext:value-type="date">
            <text:p>06.04.08</text:p>
          </table:table-cell>
          <table:table-cell table:style-name="Default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MODR</text:p>
          </table:table-cell>
          <table:table-cell table:style-name="ce4" office:value-type="string" calcext:value-type="string">
            <text:p>1.3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IS_SORTED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FLOOR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CEIL2</text:p>
          </table:table-cell>
          <table:table-cell table:style-name="ce4" office:value-type="string" calcext:value-type="string">
            <text:p>1.1</text:p>
          </table:table-cell>
          <table:table-cell table:style-name="ce25" office:value-type="date" office:date-value="2008-04-04" calcext:value-type="date">
            <text:p>04.04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H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ARRAY_GAV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MU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DD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4</text:p>
          </table:table-cell>
          <table:table-cell table:style-name="ce3" office:value-type="string" calcext:value-type="string">
            <text:p>_ARRAY_ABS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4-02" calcext:value-type="date">
            <text:p>02.04.08</text:p>
          </table:table-cell>
          <table:table-cell table:style-name="ce36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4" office:value-type="string" calcext:value-type="string">
            <text:p>1.2</text:p>
          </table:table-cell>
          <table:table-cell table:style-name="ce25" office:value-type="date" office:date-value="2008-03-30" calcext:value-type="date">
            <text:p>30.03.08</text:p>
          </table:table-cell>
          <table:table-cell table:style-name="ce2" office:value-type="string" calcext:value-type="string">
            <text:p>changed last in rdm2 from pos to i+pos for more randomness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4" office:value-type="string" calcext:value-type="string">
            <text:p>273</text:p>
          </table:table-cell>
          <table:table-cell table:style-name="ce3" office:value-type="string" calcext:value-type="string">
            <text:p>TO_UML</text:p>
          </table:table-cell>
          <table:table-cell table:style-name="ce4" office:value-type="string" calcext:value-type="string">
            <text:p>1.0</text:p>
          </table:table-cell>
          <table:table-cell table:style-name="ce25" office:value-type="date" office:date-value="2008-03-29" calcext:value-type="date">
            <text:p>29.03.08</text:p>
          </table:table-cell>
          <table:table-cell table:style-name="ce31" office:value-type="string" calcext:value-type="string">
            <text:p>New Module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1"/>
          <table:table-cell table:style-name="ce46"/>
          <table:table-cell table:style-name="ce50"/>
          <table:table-cell table:style-name="ce54" table:number-columns-repeated="247"/>
          <table:table-cell table:style-name="ce62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SSAG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0)</text:p>
            <text:p>limit the output string to max 20 digi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3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1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STRING_LENGTH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2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9" calcext:value-type="date">
            <text:p>29.03.08</text:p>
          </table:table-cell>
          <table:table-cell table:style-name="ce36" office:value-type="string" calcext:value-type="string">
            <text:p>changed STRING to STRING(8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Added setup parameter STRING_LENGTH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SORTE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8" calcext:value-type="date">
            <text:p>28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acter 127 is now recognized as 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char will now accept exten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6" calcext:value-type="date">
            <text:p>26.03.08</text:p>
          </table:table-cell>
          <table:table-cell table:style-name="ce36" office:value-type="string" calcext:value-type="string">
            <text:p>function now returns -1 for input &lt; 0 or &gt; 46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4" calcext:value-type="date">
            <text:p>24.03.08</text:p>
          </table:table-cell>
          <table:table-cell table:style-name="ce36" office:value-type="string" calcext:value-type="string">
            <text:p>use data_type real2 to extend accuracy to 15 digits total</text:p>
            <text:p>do not use ft_int which adds unnecessary overhea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unction would deliver wrong results when d1 and dx are a leap_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changed output from int to dint because the total date range is 49710 day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2" calcext:value-type="date">
            <text:p>22.03.08</text:p>
          </table:table-cell>
          <table:table-cell table:style-name="ce36" office:value-type="string" calcext:value-type="string">
            <text:p>fixed some bugs when month was negativ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MOD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D_TRUNC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Changed type of input IN from int to d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LO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Replaced TRUNC witht real_to_int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EIL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_TRU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1" calcext:value-type="date">
            <text:p>2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2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RI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avoid to call replace with pos = 0 because some systems will produce an erro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changed trunc to dint because trunc was generating wrong values on wago 842</text:p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20" calcext:value-type="date">
            <text:p>20.03.08</text:p>
          </table:table-cell>
          <table:table-cell table:style-name="ce36" office:value-type="string" calcext:value-type="string">
            <text:p>Make sure output of exec will always be in the format x.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N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IS_C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9" calcext:value-type="date">
            <text:p>1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CHECK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9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ode improvement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deleted wrong conversion real_to_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P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SD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MA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output weekday to wday and dst to d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input bit to val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s under codesys 3.0</text:p>
            <text:p>changed type of input size to u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BYTE_TO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renamed from byte_to_bit to byte_to_bits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added type conversion to avoid warning under codesys 3.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changed sequence of calculations to impr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3</text:p>
          </table:table-cell>
          <table:table-cell table:style-name="ce19" office:value-type="string" calcext:value-type="string">
            <text:p>DIFF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6" calcext:value-type="date">
            <text:p>16.03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UL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resul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OUR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MINUTE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COND_TO_TIM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rounded the input after the last digi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3-14" calcext:value-type="date">
            <text:p>14.03.08</text:p>
          </table:table-cell>
          <table:table-cell table:style-name="ce36" office:value-type="string" calcext:value-type="string">
            <text:p>changed code to avoid rounding problem at last digit of millisecon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RA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8</text:p>
          </table:table-cell>
          <table:table-cell table:style-name="ce26" office:value-type="date" office:date-value="2008-03-13" calcext:value-type="date">
            <text:p>13.03.08</text:p>
          </table:table-cell>
          <table:table-cell table:style-name="ce36" office:value-type="string" calcext:value-type="string">
            <text:p>changed preset value out_min to -1e37</text:p>
            <text:p>stop integrator at the limits</text:p>
            <text:p>optimized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M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2" calcext:value-type="date">
            <text:p>12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improved accuracy around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N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hanged formula to avoid problems when x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result 0 for con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RA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corrected an error with negative numb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3-11" calcext:value-type="date">
            <text:p>11.03.08</text:p>
          </table:table-cell>
          <table:table-cell table:style-name="ce36" office:value-type="string" calcext:value-type="string">
            <text:p>extended range of valid inputs to +inv / -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to dint instead of rea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hanged output of fact to dint to allow bigg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extended range of valid inputs to +/- INV</text:p>
            <text:p>changed formula for better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corrected an error in formula</text:p>
            <text:p>extended range of valid inputs to +/- INV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3-10" calcext:value-type="date">
            <text:p>10.03.08</text:p>
          </table:table-cell>
          <table:table-cell table:style-name="ce36" office:value-type="string" calcext:value-type="string">
            <text:p>make sure last will be between 0 and 1 to avoid invalid resul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SE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9" calcext:value-type="date">
            <text:p>09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corrected an error in pulse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C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support for exteded 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TO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8-03-06" calcext:value-type="date">
            <text:p>06.03.08</text:p>
          </table:table-cell>
          <table:table-cell table:style-name="ce36" office:value-type="string" calcext:value-type="string">
            <text:p>Added EXTENDED_ASCI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TO_STRI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UFFER_SEARC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STRING_TO_BUFF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INI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BUFFER_CLE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5" calcext:value-type="date">
            <text:p>05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APITALIZ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CHE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result is now rounded instead of trunc</text:p>
            <text:p>corrected an error with reals &lt; 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_ARRAY_SHUFF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ed support for a..f and return 0 for invalid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EXE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3-04" calcext:value-type="date">
            <text:p>04.03.08</text:p>
          </table:table-cell>
          <table:table-cell table:style-name="ce36" office:value-type="string" calcext:value-type="string">
            <text:p>add a 0 to the string if a '.' is at the end of the string <text:s text:c="3"/>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EPLACE_UM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UPP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LOW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IP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HE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PH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S_ALNU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IP4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COUNT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H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CTR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MAX(pos,1) in loop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D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BIT_LOAD_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RDM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findb := 0 for compatibility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2</text:p>
          </table:table-cell>
          <table:table-cell table:style-name="ce19" office:value-type="string" calcext:value-type="string">
            <text:p>FIND_NONU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9" calcext:value-type="date">
            <text:p>29.02.08</text:p>
          </table:table-cell>
          <table:table-cell table:style-name="ce36" office:value-type="string" calcext:value-type="string">
            <text:p>added input pos to start search at posi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OU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AIN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3" calcext:value-type="date">
            <text:p>23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22" calcext:value-type="date">
            <text:p>22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R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A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COS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DI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EX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IN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LO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POW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I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QR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TANH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HYPO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TEMPERATUR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21" calcext:value-type="date">
            <text:p>21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20" calcext:value-type="date">
            <text:p>20.02.08</text:p>
          </table:table-cell>
          <table:table-cell table:style-name="ce36" office:value-type="string" calcext:value-type="string">
            <text:p>Added millisecond 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replaced + with or for better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STACK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3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FIFO_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9" calcext:value-type="date">
            <text:p>19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YTE_OF_BI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18" calcext:value-type="date">
            <text:p>18.02.08</text:p>
          </table:table-cell>
          <table:table-cell table:style-name="ce36" office:value-type="string" calcext:value-type="string">
            <text:p>Improved code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12" calcext:value-type="date">
            <text:p>12.02.08</text:p>
          </table:table-cell>
          <table:table-cell table:style-name="ce36" office:value-type="string" calcext:value-type="string">
            <text:p>added config variables rain_up and wind_up</text:p>
            <text:p>position for rain and wind is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Added interim variable to allow for changes smaller them 8 digits of out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8" calcext:value-type="date">
            <text:p>08.02.08</text:p>
          </table:table-cell>
          <table:table-cell table:style-name="ce36" office:value-type="string" calcext:value-type="string">
            <text:p>Use new version of ft_int and deleted unnecessary limits for integrato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WAP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EPLACE_AL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H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return string would not be terminated proper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NDP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MIRR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RIM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OW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UPPERCA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2-04" calcext:value-type="date">
            <text:p>04.02.08</text:p>
          </table:table-cell>
          <table:table-cell table:style-name="ce36" office:value-type="string" calcext:value-type="string">
            <text:p>improved performance</text:p>
            <text:p>added support for Ä,Ö,Ü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2-03" calcext:value-type="date">
            <text:p>03.02.08</text:p>
          </table:table-cell>
          <table:table-cell table:style-name="ce19" office:value-type="string" calcext:value-type="string">
            <text:p>Modifi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2-02" calcext:value-type="date">
            <text:p>02.02.08</text:p>
          </table:table-cell>
          <table:table-cell table:style-name="ce36" office:value-type="string" calcext:value-type="string">
            <text:p>changed algorithm to avoind non iec functions and guarantee more randomnes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29" calcext:value-type="date">
            <text:p>29.01.08</text:p>
          </table:table-cell>
          <table:table-cell table:style-name="ce36" office:value-type="string" calcext:value-type="string">
            <text:p>Replaced shr/shl with and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25" calcext:value-type="date">
            <text:p>25.01.08</text:p>
          </table:table-cell>
          <table:table-cell table:style-name="ce36" office:value-type="string" calcext:value-type="string">
            <text:p>Improved algorithm for higher speed</text:p>
            <text:p>allow KR and KF to be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23" calcext:value-type="date">
            <text:p>23.01.08</text:p>
          </table:table-cell>
          <table:table-cell table:style-name="ce36" office:value-type="string" calcext:value-type="string">
            <text:p>added sdt input which is used to initialize rtc and rtc1 during first cycle. 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1" calcext:value-type="date">
            <text:p>21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T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20" calcext:value-type="date">
            <text:p>20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18" calcext:value-type="date">
            <text:p>18.01.08</text:p>
          </table:table-cell>
          <table:table-cell table:style-name="ce36" office:value-type="string" calcext:value-type="string">
            <text:p>further performance improvements</text:p>
            <text:p>only calculate once every 10 second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/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calculation is now only performed once a 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IMER_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17" calcext:value-type="date">
            <text:p>17.01.08</text:p>
          </table:table-cell>
          <table:table-cell table:style-name="ce36" office:value-type="string" calcext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UNT_B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LECT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16" calcext:value-type="date">
            <text:p>16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N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15" calcext:value-type="date">
            <text:p>15.01.08</text:p>
          </table:table-cell>
          <table:table-cell table:style-name="ce36" office:value-type="string" calcext:value-type="string">
            <text:p>Allow for negative incre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ANGE_TO_BY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TO_RANG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9" calcext:value-type="date">
            <text:p>09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LEAP_OF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8" calcext:value-type="date">
            <text:p>08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8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CALE_B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QR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KMH_TO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_TO_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PO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UN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6" calcext:value-type="date">
            <text:p>06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A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algorithm for higher spe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HYST_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replaced /2 with * 0.5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5" calcext:value-type="date">
            <text:p>05.01.08</text:p>
          </table:table-cell>
          <table:table-cell table:style-name="ce36" office:value-type="string" calcext:value-type="string">
            <text:p>Corrected an error with high values of sps tim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4" calcext:value-type="date">
            <text:p>04.01.08</text:p>
          </table:table-cell>
          <table:table-cell table:style-name="ce36" office:value-type="string" calcext:value-type="string">
            <text:p>formula for step7 was incorrect during leap yea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8-01-03" calcext:value-type="date">
            <text:p>03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DECO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IRTRANS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RIVER_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LK_DI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BYTE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deleted unused variable p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19" office:value-type="string" calcext:value-type="string">
            <text:p>DWORD_OF_BY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8-01-02" calcext:value-type="date">
            <text:p>02.01.08</text:p>
          </table:table-cell>
          <table:table-cell table:style-name="ce36" office:value-type="string" calcext:value-type="string"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30" calcext:value-type="date">
            <text:p>30.12.07</text:p>
          </table:table-cell>
          <table:table-cell table:style-name="ce36" office:value-type="string" calcext:value-type="string">
            <text:p>added click_timeout variable and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ATER_C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Increased accurac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_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TC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JK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R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4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F_D2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AIR2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YST_3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7" calcext:value-type="date">
            <text:p>2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TOR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ESSAGE_8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26" calcext:value-type="date">
            <text:p>2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7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corrected an error while step response was too slow for fast rist tim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25" calcext:value-type="date">
            <text:p>25.12.07</text:p>
          </table:table-cell>
          <table:table-cell table:style-name="ce36" office:value-type="string" calcext:value-type="string">
            <text:p>added config variable return_meter</text:p>
            <text:p>added output C for current consump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dded exit statement in for loop instead of i:=5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EEK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orrection fo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avoid a negative square root if input values are wro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23" calcext:value-type="date">
            <text:p>23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WORK_WEEK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changed code for better performance</text:p>
            <text:p>changed code to comply with ISO860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_BEG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9" calcext:value-type="date">
            <text:p>19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N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init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EMP_SI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7" calcext:value-type="date">
            <text:p>1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OSCAT_VERSI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added possibility to return date and version depoending on i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8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4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2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1MS</text:p>
          </table:table-cell>
          <table:table-cell table:style-name="ce7"/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o longer supported is replaced by CLK_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CLK_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6" calcext:value-type="date">
            <text:p>16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EAST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DWORD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YTE_TO_STR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INDB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step now starts at 1 instaed of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20" office:value-type="string" calcext:value-type="string">
            <text:p>_ARRAY_SOR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15" calcext:value-type="date">
            <text:p>15.12.07</text:p>
          </table:table-cell>
          <table:table-cell table:style-name="ce36" office:value-type="string" calcext:value-type="string">
            <text:p>added function return = tru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_4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NA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INT_TO_BC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BCD_TO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3" calcext:value-type="date">
            <text:p>13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AV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V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ARRAY_TRE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12" calcext:value-type="date">
            <text:p>1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Z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Y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X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MU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RE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PA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NORM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DPRO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SUB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N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V3_AB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1" calcext:value-type="date">
            <text:p>11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LANGEVI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SIGMOI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GAMM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FAC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start value for i has changed to 2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TONOF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10" calcext:value-type="date">
            <text:p>10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6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9" calcext:value-type="date">
            <text:p>09.12.07</text:p>
          </table:table-cell>
          <table:table-cell table:style-name="ce36" office:value-type="string" calcext:value-type="string">
            <text:p>Corrected a problem with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2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1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 problem with time_zone_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COLLE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Added reset inpu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orrected an error while esr type would not be 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8" calcext:value-type="date">
            <text:p>08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C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7" calcext:value-type="date">
            <text:p>07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ICK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4" calcext:value-type="date">
            <text:p>04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QRT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OUN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  <text:p>output is now in Gramms / Qubic met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XP10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calculation of step respons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ENSOR_I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S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ged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BAR_GRAP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HEAT_INDE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EW_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2" calcext:value-type="date">
            <text:p>02.12.07</text:p>
          </table:table-cell>
          <table:table-cell table:style-name="ce36" office:value-type="string" calcext:value-type="string">
            <text:p>new code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COS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TA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N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SIGN_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EV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2-01" calcext:value-type="date">
            <text:p>01.12.07</text:p>
          </table:table-cell>
          <table:table-cell table:style-name="ce36" office:value-type="string" calcext:value-type="string">
            <text:p>changed code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  <text:p>avoid divide by 0 if TN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6</text:p>
          </table:table-cell>
          <table:table-cell table:style-name="ce26" office:value-type="date" office:date-value="2007-11-30" calcext:value-type="date">
            <text:p>30.11.07</text:p>
          </table:table-cell>
          <table:table-cell table:style-name="ce36" office:value-type="string" calcext:value-type="string">
            <text:p>changed out to be K * in during initializ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PW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PWM_D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F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5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7" calcext:value-type="date">
            <text:p>27.11.07</text:p>
          </table:table-cell>
          <table:table-cell table:style-name="ce36" office:value-type="string" calcext:value-type="string">
            <text:p>avoid divide by 0 when pt =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added shade_delay to avoid constant up and down if sun is out parcial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24" calcext:value-type="date">
            <text:p>24.11.07</text:p>
          </table:table-cell>
          <table:table-cell table:style-name="ce36" office:value-type="string" calcext:value-type="string">
            <text:p>changes F_use of <text:s/>Buß_und_Bettag to 0 because this is no official holida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EAL_TO_STRF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20" office:value-type="string" calcext:value-type="string">
            <text:p>when N=0 there will be no dot at the end of the string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GEN_RD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20" calcext:value-type="date">
            <text:p>20.11.07</text:p>
          </table:table-cell>
          <table:table-cell table:style-name="ce36" office:value-type="string" calcext:value-type="string">
            <text:p>changed code of temp calculation to avoid overflow in modr due to resuclt would not fit DINT for high timer valu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replaced left over statement time() with tx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IX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9" calcext:value-type="date">
            <text:p>19.11.07</text:p>
          </table:table-cell>
          <table:table-cell table:style-name="ce19" office:value-type="string" calcext:value-type="string">
            <text:p>changed type of function from int to dwor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HEAT_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7" calcext:value-type="date">
            <text:p>17.11.07</text:p>
          </table:table-cell>
          <table:table-cell table:style-name="ce36" office:value-type="string" calcext:value-type="string">
            <text:p>New Module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INI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hanged size calculation to be more effici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14" calcext:value-type="date">
            <text:p>14.11.07</text:p>
          </table:table-cell>
          <table:table-cell table:style-name="ce36" office:value-type="string" calcext:value-type="string">
            <text:p>corrected a problem with size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added temporaray variable tx because some compilers could not handle time() as an argume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ype of time_zone_offset from time to int</text:p>
            <text:p>to allow for time zones with negative offse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zon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12" calcext:value-type="date">
            <text:p>12.11.07</text:p>
          </table:table-cell>
          <table:table-cell table:style-name="ce36" office:value-type="string" calcext:value-type="string">
            <text:p>changed time_offset from time to integer to allow for negative offset time zon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ime() into t_plc_ms()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MUL_AD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deleted preset values for K and O this makes no sense for a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NE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11" calcext:value-type="date">
            <text:p>11.11.07</text:p>
          </table:table-cell>
          <table:table-cell table:style-name="ce36" office:value-type="string" calcext:value-type="string">
            <text:p>changed type of function from real to i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LTIME_TO_UTC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5" calcext:value-type="date">
            <text:p>05.11.07</text:p>
          </table:table-cell>
          <table:table-cell table:style-name="ce36" office:value-type="string" calcext:value-type="string">
            <text:p>replaced literal constant with variable because of error in möller ecp4 compile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CONTROL_SET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4" calcext:value-type="date">
            <text:p>04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TUNE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9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9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1-03" calcext:value-type="date">
            <text:p>03.11.07</text:p>
          </table:table-cell>
          <table:table-cell table:style-name="ce36" office:value-type="string" calcext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changed dword to DINT in calcualtion to avoid warnings with some compiler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PARSE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DEAD_BAN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4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1-02" calcext:value-type="date">
            <text:p>02.11.07</text:p>
          </table:table-cell>
          <table:table-cell table:style-name="ce36" office:value-type="string" calcext:value-type="string">
            <text:p>deleted unused variable RF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ATE_AD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added int_to_dword stetements to avoid possible overrun with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hanged coding to avoid possible overrun situatio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1-01" calcext:value-type="date">
            <text:p>01.11.07</text:p>
          </table:table-cell>
          <table:table-cell table:style-name="ce36" office:value-type="string" calcext:value-type="string">
            <text:p>converted hour type integer to dowrd in calculation to avoid overrun on möller ecp4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INDOW2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D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Rewritten to avoid error when one of the limits is 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I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HOLIDAY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31" calcext:value-type="date">
            <text:p>31.10.07</text:p>
          </table:table-cell>
          <table:table-cell table:style-name="ce36" office:value-type="string" calcext:value-type="string">
            <text:p>changed holiday definition from constant to input constan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30" calcext:value-type="date">
            <text:p>30.10.07</text:p>
          </table:table-cell>
          <table:table-cell table:style-name="ce36" office:value-type="string" calcext:value-type="string">
            <text:p>added lockout configuration time for motor direction chang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AI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SD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WATER_ENTHALP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prohibit calculation when tx - last = 0 to avoid div 0 and increase accuracy on fast syste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9" calcext:value-type="date">
            <text:p>29.10.07</text:p>
          </table:table-cell>
          <table:table-cell table:style-name="ce37" office:value-type="string" calcext:value-type="string">
            <text:p>changed code so int will not be called is time difference is 0 to increase accuracy on systems with cycle times below 1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CEN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TIME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code because the execution every 100ms can cause major problems </text:p>
            <text:p>if the supplied time was not correct at start. use of new dst func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LOCAL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local_time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changed dst calculation because function dst was upgraded no error in DCF77 only a change in DS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DS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24" calcext:value-type="date">
            <text:p>24.10.07</text:p>
          </table:table-cell>
          <table:table-cell table:style-name="ce36" office:value-type="string" calcext:value-type="string">
            <text:p>deleted time_zone_offset input because dst is generally at 01:00 utc and not mesz</text:p>
            <text:p>uk starts 01:00 utc and also gree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23" calcext:value-type="date">
            <text:p>23.10.07</text:p>
          </table:table-cell>
          <table:table-cell table:style-name="ce36" office:value-type="string" calcext:value-type="string">
            <text:p>added out := in to the init statemen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9" calcext:value-type="date">
            <text:p>19.10.07</text:p>
          </table:table-cell>
          <table:table-cell table:style-name="ce36" office:value-type="string" calcext:value-type="string">
            <text:p>manual mode was not detected because outputs were checked and not inputs UP and DN</text:p>
          </table:table-cell>
          <table:table-cell table:style-name="ce43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3</text:p>
          </table:table-cell>
          <table:table-cell table:style-name="ce19" office:value-type="string" calcext:value-type="string">
            <text:p>CON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7" calcext:value-type="date">
            <text:p>1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GLOBAL CONSTANTS </text:p>
          </table:table-cell>
          <table:table-cell table:style-name="ce20"/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enamed PI in PI1 for better compatibility to other librarie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EG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Deg will become 0 when it reaches 360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A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Rad will become 0 when it reaches 2P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TRIANG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PHERE_V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ELLIPS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C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CIRCLE_A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GN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16" calcext:value-type="date">
            <text:p>16.10.07</text:p>
          </table:table-cell>
          <table:table-cell table:style-name="ce36" office:value-type="string" calcext:value-type="string">
            <text:p>Ignore angle when T_ANGLE &lt; T#10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HAD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15" calcext:value-type="date">
            <text:p>15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CRC_GEN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Added init values for start value and final XOR</text:p>
            <text:p>added reflect_in and reflect_out featur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EVERS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9" calcext:value-type="date">
            <text:p>09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count and lea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 y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deleted unused variables m and temp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POLYNOM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8" calcext:value-type="date">
            <text:p>08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LINEAR_IN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7" calcext:value-type="date">
            <text:p>07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actions are now configurab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named output ps and as to po and ao</text:p>
            <text:p>added click m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7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Integrated blind_actuator into BLIND_CONTROL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BLIND_ACTUATO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6" calcext:value-type="date">
            <text:p>06.10.07</text:p>
          </table:table-cell>
          <table:table-cell table:style-name="ce36" office:value-type="string" calcext:value-type="string">
            <text:p>Rearranged output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5" calcext:value-type="date">
            <text:p>05.10.07</text:p>
          </table:table-cell>
          <table:table-cell table:style-name="ce36" office:value-type="string" calcext:value-type="string">
            <text:p>Corrected a problem with pt = 0m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2</text:p>
          </table:table-cell>
          <table:table-cell table:style-name="ce19" office:value-type="string" calcext:value-type="string">
            <text:p>HEX_TO_DWOR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10-02" calcext:value-type="date">
            <text:p>02.10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MON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New coding for much better performance, no string functions us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tep7 compatibility, now call function set_dat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9" office:value-type="string" calcext:value-type="string">
            <text:p>21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5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 problem , timer would not generate a pulse over midnight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MONTH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an error in algorithm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LEAP_YEAR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Improved code for high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DAY_OF_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YEA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Corrected error and added compatibility to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GLOBAL CONSTANTS </text:p>
          </table:table-cell>
          <table:table-cell table:style-name="ce7"/>
          <table:table-cell table:style-name="ce26" office:value-type="date" office:date-value="2007-10-01" calcext:value-type="date">
            <text:p>01.10.07</text:p>
          </table:table-cell>
          <table:table-cell table:style-name="ce36" office:value-type="string" calcext:value-type="string">
            <text:p>Added Setup Parameter STEP7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NIGH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HAD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30" calcext:value-type="date">
            <text:p>30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INPU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CONTROL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BLIND_SECUR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21" office:value-type="string" calcext:value-type="string">
            <text:p>BLIND_ACTUATO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9" calcext:value-type="date">
            <text:p>2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INTERLOCK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9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9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28" calcext:value-type="date">
            <text:p>28.09.07</text:p>
          </table:table-cell>
          <table:table-cell table:style-name="ce36" office:value-type="string" calcext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MEDIAN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chagned code to use array_sort</text:p>
            <text:p>Improved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_ARRAY_SOR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22" calcext:value-type="date">
            <text:p>22.09.07</text:p>
          </table:table-cell>
          <table:table-cell table:style-name="ce36" office:value-type="string" calcext:value-type="string">
            <text:p>new algorithm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1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20" calcext:value-type="date">
            <text:p>20.09.07</text:p>
          </table:table-cell>
          <table:table-cell table:style-name="ce36" office:value-type="string" calcext:value-type="string">
            <text:p>corrected a problem with leap year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DAT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Corrected leap year calcula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ERIOD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9" calcext:value-type="date">
            <text:p>19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CF77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X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R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ESR_MON_B8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RM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P_R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8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QUENCE_4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ULSE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PRG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8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4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2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K_1MS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1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W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SOF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MP_B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Q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SI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MP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7" calcext:value-type="date">
            <text:p>17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AYS_DELTA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Corrected an error in algorithm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20" office:value-type="string" calcext:value-type="string">
            <text:p>DAY_OF_DAT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_STAT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ETER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GEN_RDM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X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_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64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TN16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Deleted unused code section for system time reading and unnecessary startup 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T1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YCLE_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6" calcext:value-type="date">
            <text:p>16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INT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DERIV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US for compatibility and better internal resolution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FT_PROFILE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EX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IMER_1 </text:p>
          </table:table-cell>
          <table:table-cell table:style-name="ce7" office:value-type="string" calcext:value-type="string">
            <text:p>1.4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WITCH_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ULSE_LENGT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IMM_I 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LICK 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UD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PU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3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CTUATOR_2P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5" calcext:value-type="date">
            <text:p>15.09.07</text:p>
          </table:table-cell>
          <table:table-cell table:style-name="ce36" office:value-type="string" calcext:value-type="string">
            <text:p>Replaced Time() with T_PLC_MS for compatibility and performance reasons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L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R1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OGGLE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U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_PLC_MS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4" calcext:value-type="date">
            <text:p>1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OU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AIN</text:p>
          </table:table-cell>
          <table:table-cell table:style-name="ce7" office:value-type="string" calcext:value-type="string">
            <text:p>1.3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e to avoid warning under codesys 2.3.8.1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RES_NI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Changed coding for better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TEMP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EW_CO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8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WATER_DENSITY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13" calcext:value-type="date">
            <text:p>13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WORD_TO_STRH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YTE_TO_STRH 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for compatibility with twincat, under twincat concat cannot have a function as argumen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ET_TOD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changed coding to avoid a compiler warning under twincat.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MATRIX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s k and old_cod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RC_GEN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1" calcext:value-type="date">
            <text:p>11.09.07</text:p>
          </table:table-cell>
          <table:table-cell table:style-name="ce36" office:value-type="string" calcext:value-type="string">
            <text:p>Deleted unused variable i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CHECK_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PARITY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hanged algorithm to improove performan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SII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  <text:p>and corrected an error in formula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TEMP_PT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8" office:value-type="string" calcext:value-type="string">
            <text:p>20</text:p>
          </table:table-cell>
          <table:table-cell table:style-name="ce19" office:value-type="string" calcext:value-type="string">
            <text:p>TEMP_NI</text:p>
          </table:table-cell>
          <table:table-cell table:style-name="ce8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Reduced accuracy to 0.01 degreed to shorten execution tim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BIT_COUNT</text:p>
          </table:table-cell>
          <table:table-cell table:style-name="ce7" office:value-type="string" calcext:value-type="string">
            <text:p>1.1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Improved performac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SH_2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9-10" calcext:value-type="date">
            <text:p>10.09.07</text:p>
          </table:table-cell>
          <table:table-cell table:style-name="ce36" office:value-type="string" calcext:value-type="string">
            <text:p>Corrected an error while index would be out of array if N = 0;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table:style-name="ce7" office:value-type="string" calcext:value-type="string">
            <text:p>20</text:p>
          </table:table-cell>
          <table:table-cell table:style-name="ce19" office:value-type="string" calcext:value-type="string">
            <text:p>D_TRIG</text:p>
          </table:table-cell>
          <table:table-cell table:style-name="ce7" office:value-type="string" calcext:value-type="string">
            <text:p>1.0</text:p>
          </table:table-cell>
          <table:table-cell table:style-name="ce26" office:value-type="date" office:date-value="2007-09-04" calcext:value-type="date">
            <text:p>04.09.07</text:p>
          </table:table-cell>
          <table:table-cell table:style-name="ce36"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6">
          <table:table-cell table:style-name="ce7" office:value-type="string" calcext:value-type="string">
            <text:p>18</text:p>
          </table:table-cell>
          <table:table-cell table:style-name="ce19" office:value-type="string" calcext:value-type="string">
            <text:p>ONTIME</text:p>
          </table:table-cell>
          <table:table-cell table:style-name="ce7" office:value-type="string" calcext:value-type="string">
            <text:p>1.2</text:p>
          </table:table-cell>
          <table:table-cell table:style-name="ce26" office:value-type="date" office:date-value="2007-08-02" calcext:value-type="date">
            <text:p>02.08.07</text:p>
          </table:table-cell>
          <table:table-cell table:style-name="ce36" office:value-type="string" calcext:value-type="string">
            <text:p>Corrected an error while ontime would stop counting time after a certain time is reached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LTIME_TO_UT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2"/>
          <table:table-cell table:style-name="ce47"/>
          <table:table-cell table:style-name="ce51"/>
          <table:table-cell table:style-name="ce55" table:number-columns-repeated="247"/>
          <table:table-cell table:style-name="ce6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IT_COUN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7-05" calcext:value-type="date">
            <text:p>05.07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10" calcext:value-type="date">
            <text:p>10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RC_CHEC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RC_G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YTE_TO_STRB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BYTE_TO_STRH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DWORD_TO_STR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DWORD_TO_ST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6-09" calcext:value-type="date">
            <text:p>09.06.07</text:p>
          </table:table-cell>
          <table:table-cell office:value-type="string" calcext:value-type="string">
            <text:p>New Module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18" calcext:value-type="date">
            <text:p>18.05.07</text:p>
          </table:table-cell>
          <table:table-cell office:value-type="string" calcext:value-type="string">
            <text:p>Corrected an error while Click would stop working when t_reconfig expired</text:p>
          </table:table-cell>
          <table:table-cell table:style-name="ce40"/>
          <table:table-cell table:style-name="ce45"/>
          <table:table-cell table:style-name="ce49"/>
          <table:table-cell table:style-name="ce53" table:number-columns-repeated="247"/>
          <table:table-cell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RRAY_SD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18" calcext:value-type="date">
            <text:p>18.03.07</text:p>
          </table:table-cell>
          <table:table-cell office:value-type="string" calcext:value-type="string">
            <text:p>changed code, dst would not work during first cycl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Changed code when RH = 0, not to execute log(0)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6" office:value-type="date" office:date-value="2007-05-02" calcext:value-type="date">
            <text:p>02.05.07</text:p>
          </table:table-cell>
          <table:table-cell table:style-name="ce28" office:value-type="string" calcext:value-type="string">
            <text:p>Added UG, universal gas cons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RRAY_V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01" calcext:value-type="date">
            <text:p>01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6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4-14" calcext:value-type="date">
            <text:p>14.04.07</text:p>
          </table:table-cell>
          <table:table-cell office:value-type="string" calcext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4-12" calcext:value-type="date">
            <text:p>12.04.07</text:p>
          </table:table-cell>
          <table:table-cell office:value-type="string" calcext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6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C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table:style-name="ce23" office:value-type="string" calcext:value-type="string">
            <text:p>CYCLE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3-10" calcext:value-type="date">
            <text:p>10.03.07</text:p>
          </table:table-cell>
          <table:table-cell office:value-type="string" calcext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27" calcext:value-type="date">
            <text:p>27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M_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6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5-02" calcext:value-type="date">
            <text:p>02.05.07</text:p>
          </table:table-cell>
          <table:table-cell office:value-type="string" calcext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DEW_R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4-29" calcext:value-type="date">
            <text:p>29.04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4-17" calcext:value-type="date">
            <text:p>17.04.07</text:p>
          </table:table-cell>
          <table:table-cell office:value-type="string" calcext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MUL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5</text:p>
          </table:table-cell>
          <table:table-cell office:value-type="string" calcext:value-type="string">
            <text:p>CLK_PR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INIT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table:style-name="ce24" office:value-type="string" calcext:value-type="string">
            <text:p>CEIL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Output will be set to input during initial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 „click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ULSE_LENG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4" calcext:value-type="date">
            <text:p>04.03.07</text:p>
          </table:table-cell>
          <table:table-cell office:value-type="string" calcext:value-type="string">
            <text:p>Changed a critical erro while loop was indefinit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R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AD_ZONE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SIGN_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5</text:p>
          </table:table-cell>
          <table:table-cell office:value-type="string" calcext:value-type="string">
            <text:p>GLOBAL CONSTANTS </text:p>
          </table:table-cell>
          <table:table-cell/>
          <table:table-cell table:style-name="ce27" office:value-type="date" office:date-value="2007-03-03" calcext:value-type="date">
            <text:p>03.03.07</text:p>
          </table:table-cell>
          <table:table-cell table:style-name="ce39" office:value-type="string" calcext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W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HOLIDAYEAT_INDEX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s rh3 and T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WM_D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_LAM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8" calcext:value-type="date">
            <text:p>08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deleted unused variable init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5</text:p>
          </table:table-cell>
          <table:table-cell office:value-type="string" calcext:value-type="string">
            <text:p>ON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5</text:p>
          </table:table-cell>
          <table:table-cell office:value-type="string" calcext:value-type="string">
            <text:p>TIMER_2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_ARRAY_MEDIA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Corrected an error in median calcula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EN_SQ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Added default value for dc = 0.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SWITCH_X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5" calcext:value-type="date">
            <text:p>15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5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C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3-03" calcext:value-type="date">
            <text:p>03.03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FT_PROFIL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7" calcext:value-type="date">
            <text:p>0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PWM_P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25" calcext:value-type="date">
            <text:p>25.02.07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EAD_ZONE 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12" calcext:value-type="date">
            <text:p>1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BAR_GRAP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2" calcext:value-type="date">
            <text:p>22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27" calcext:value-type="date">
            <text:p>27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26" calcext:value-type="date">
            <text:p>26.02.07</text:p>
          </table:table-cell>
          <table:table-cell office:value-type="string" calcext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X_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structure „ramp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_TO_O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day_in_year and day_in_year_begi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Heat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7" calcext:value-type="date">
            <text:p>2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DIMM_I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WORD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_ARRAY_INI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UN_PO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1" calcext:value-type="date">
            <text:p>01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SCALE_B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TAIR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HYST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GEN_S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IGN_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Deleted unused variable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KMH_TO_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Deleted unused variable time_overfl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23" calcext:value-type="date">
            <text:p>23.01.07</text:p>
          </table:table-cell>
          <table:table-cell office:value-type="string" calcext:value-type="string">
            <text:p>Deleted unused variables „force_on“ and „force_off“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PT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Improved algorithm for higher accuracy and spe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ENSOR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QRT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status output to be ESR compatib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_LIN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t_band for structural adaptation of PI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YTE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8" calcext:value-type="date">
            <text:p>18.01.07</text:p>
          </table:table-cell>
          <table:table-cell office:value-type="string" calcext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UN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0" calcext:value-type="date">
            <text:p>20.01.07</text:p>
          </table:table-cell>
          <table:table-cell office:value-type="string" calcext:value-type="string">
            <text:p>deleted unused variables sun_rineR and sun_setR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M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3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LTI_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hanged midr to mid3 funktion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8" calcext:value-type="date">
            <text:p>28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Oil_Temp inp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ACTUATOR_UD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SCALE_B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reset to load the value of in instead of 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6" calcext:value-type="date">
            <text:p>1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LEGIONELLA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K_WEEK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4" calcext:value-type="date">
            <text:p>14.01.07</text:p>
          </table:table-cell>
          <table:table-cell office:value-type="string" calcext:value-type="string">
            <text:p>deleted unused variable yd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CALE_X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CF_77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2" calcext:value-type="date">
            <text:p>02.02.07</text:p>
          </table:table-cell>
          <table:table-cell office:value-type="string" calcext:value-type="string">
            <text:p>change wday and dst outputs when there is no dcf recep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I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faktor 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H_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Added output tri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X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ELAY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added variable temp to add 1 delay <text:s/>for q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D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_ARRAY_SOR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6" calcext:value-type="date">
            <text:p>06.01.07</text:p>
          </table:table-cell>
          <table:table-cell office:value-type="string" calcext:value-type="string">
            <text:p>Function now returns TRUE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4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FFSE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FT_PT1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FT_DERIV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3" calcext:value-type="date">
            <text:p>03.01.07</text:p>
          </table:table-cell>
          <table:table-cell office:value-type="string" calcext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RMP_SOF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TA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5" calcext:value-type="date">
            <text:p>15.01.07</text:p>
          </table:table-cell>
          <table:table-cell office:value-type="string" calcext:value-type="string">
            <text:p>Added default value for K = 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D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S_TO_KM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2-04" calcext:value-type="date">
            <text:p>04.02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N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B8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MON_R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FT_AVG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07" calcext:value-type="date">
            <text:p>07.01.07</text:p>
          </table:table-cell>
          <table:table-cell office:value-type="string" calcext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4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2-06" calcext:value-type="date">
            <text:p>06.02.07</text:p>
          </table:table-cell>
          <table:table-cell office:value-type="string" calcext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fixed an error with sign bit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7-01-17" calcext:value-type="date">
            <text:p>17.01.07</text:p>
          </table:table-cell>
          <table:table-cell office:value-type="string" calcext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BURNER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31" calcext:value-type="date">
            <text:p>31.12.06</text:p>
          </table:table-cell>
          <table:table-cell office:value-type="string" calcext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2" calcext:value-type="date">
            <text:p>22.01.07</text:p>
          </table:table-cell>
          <table:table-cell office:value-type="string" calcext:value-type="string">
            <text:p>Changed input arrangeme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MP_SI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deleted input R0 which was not use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WORD_OF_BY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4" calcext:value-type="date">
            <text:p>24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ESR_COLLE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26" calcext:value-type="date">
            <text:p>26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12" calcext:value-type="date">
            <text:p>12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FT_TN6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ID_3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7-01-01" calcext:value-type="date">
            <text:p>01.01.07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14</text:p>
          </table:table-cell>
          <table:table-cell office:value-type="string" calcext:value-type="string">
            <text:p>SCALE_B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7-01-19" calcext:value-type="date">
            <text:p>19.01.07</text:p>
          </table:table-cell>
          <table:table-cell office:value-type="string" calcext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ATE_AD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6" calcext:value-type="date">
            <text:p>06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K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RMP_B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5" calcext:value-type="date">
            <text:p>15.10.06</text:p>
          </table:table-cell>
          <table:table-cell office:value-type="string" calcext:value-type="string">
            <text:p>Added output bus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PI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25" calcext:value-type="date">
            <text:p>25.12.06</text:p>
          </table:table-cell>
          <table:table-cell office:value-type="string" calcext:value-type="string">
            <text:p>Corrected an error with timer overflow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IMER_1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whith pulse width = 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C_TP_K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04" calcext:value-type="date">
            <text:p>04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CYCLE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2" calcext:value-type="date">
            <text:p>12.12.06</text:p>
          </table:table-cell>
          <table:table-cell office:value-type="string" calcext:value-type="string">
            <text:p>Added output cycle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R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Added UD outpu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_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2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7" calcext:value-type="date">
            <text:p>07.10.06</text:p>
          </table:table-cell>
          <table:table-cell office:value-type="string" calcext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3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5" calcext:value-type="date">
            <text:p>05.10.06</text:p>
          </table:table-cell>
          <table:table-cell office:value-type="string" calcext:value-type="string">
            <text:p>rewritten moule in ST for better performanc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AYS_DELTA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T_IN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13" calcext:value-type="date">
            <text:p>13.12.06</text:p>
          </table:table-cell>
          <table:table-cell office:value-type="string" calcext:value-type="string">
            <text:p>Changed algorithm to „Trapezregel“ for higher accurac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3P 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19" calcext:value-type="date">
            <text:p>19.10.06</text:p>
          </table:table-cell>
          <table:table-cell office:value-type="string" calcext:value-type="string">
            <text:p>Added code to avoid overrun of the end_switch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OSCAT_VERSIO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REAL_TO_STR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CTUATOR_PUMP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2-27" calcext:value-type="date">
            <text:p>27.12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8" calcext:value-type="date">
            <text:p>08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FINDB_NON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3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2</text:p>
          </table:table-cell>
          <table:table-cell table:style-name="ce26" office:value-type="date" office:date-value="2006-12-01" calcext:value-type="date">
            <text:p>01.12.06</text:p>
          </table:table-cell>
          <table:table-cell office:value-type="string" calcext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STATUS_TO_ES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6" calcext:value-type="date">
            <text:p>06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RMP_W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4" calcext:value-type="date">
            <text:p>04.10.06</text:p>
          </table:table-cell>
          <table:table-cell office:value-type="string" calcext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SUM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TRE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ere dst would be delayed by 0.1secon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EAP_OF_DA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CHECK_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Corrected an error in buffer manageme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M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2</text:p>
          </table:table-cell>
          <table:table-cell office:value-type="string" calcext:value-type="string">
            <text:p>SEQUENCE_4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EAP_YEA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year 1970 would not work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AV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RRAY_SP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OCAL_TIM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orrected an error while DST would be calculated wrong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MUL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DEW_TEMP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2" calcext:value-type="date">
            <text:p>02.10.06</text:p>
          </table:table-cell>
          <table:table-cell office:value-type="string" calcext:value-type="string">
            <text:p>Changed name of input to ITOD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2</text:p>
          </table:table-cell>
          <table:table-cell office:value-type="string" calcext:value-type="string">
            <text:p>SEQUENCE_8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10-01" calcext:value-type="date">
            <text:p>01.10.06</text:p>
          </table:table-cell>
          <table:table-cell office:value-type="string" calcext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SH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SH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T_MIN_MA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LIN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QU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18" calcext:value-type="date">
            <text:p>18.08.06</text:p>
          </table:table-cell>
          <table:table-cell office:value-type="string" calcext:value-type="string">
            <text:p>fixed an error with low value negative and high value 0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F_POWE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9-01" calcext:value-type="date">
            <text:p>01.09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21" calcext:value-type="date">
            <text:p>21.08.06</text:p>
          </table:table-cell>
          <table:table-cell office:value-type="string" calcext:value-type="string">
            <text:p>Coorected an error in formul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P_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D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_TX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INC_DE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INUTE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4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OF_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YST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UX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COND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2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4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RAC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DIV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2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PT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PULS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_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AY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PT</text:p>
          </table:table-cell>
          <table:table-cell office:value-type="string" calcext:value-type="string">
            <text:p>1.1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IFO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TACK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_TO_P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N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1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UX_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IT_OF_DWOR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JK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LTCH_4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GEN_SQ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GEN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8UD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4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_TRI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YTE_OF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YTE_TO_BIT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HR_8PL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_TO_F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F_DR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TACK_16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ET_DAT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WITCH_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_TO_TOD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YST_1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OUR_TO_TIME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LK_8MS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RES_SI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_TO_C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IFO_32</text:p>
          </table:table-cell>
          <table:table-cell office:value-type="string" calcext:value-type="string">
            <text:p>1.0</text:p>
          </table:table-cell>
          <table:table-cell table:style-name="ce26" office:value-type="date" office:date-value="2006-08-04" calcext:value-type="date">
            <text:p>04.08.06</text:p>
          </table:table-cell>
          <table:table-cell office:value-type="string" calcext:value-type="string">
            <text:p>New Module</text:p>
          </table:table-cell>
          <table:table-cell table:number-columns-repeated="251"/>
        </table:table-row>
        <table:table-row table:style-name="ro2" table:number-rows-repeated="638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1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  <table:database-ranges>
        <table:database-range table:name="unnamed_FilterIn_Database_1" table:target-range-address="Tabelle1.A1488:Tabelle1.IU17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4">
      <number:number number:decimal-places="20" number:min-decimal-places="20" number:min-integer-digits="1"/>
    </number:number-style>
    <number:number-style style:name="N13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36">
      <number:scientific-number number:decimal-places="12" number:min-decimal-places="12" number:min-integer-digits="1" number:min-exponent-digits="3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17:29:35.114013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meta:creation-date>2008-02-24T20:13:04</meta:creation-date>
    <dc:date>2026-04-07T09:10:09.240212000</dc:date>
    <meta:editing-cycles>1029</meta:editing-cycles>
    <meta:editing-duration>P55DT17M28S</meta:editing-duration>
    <meta:print-date>2026-04-06T21:44:53.668519000</meta:print-date>
    <meta:printed-by>PDF files</meta:printed-by>
    <meta:document-statistic meta:table-count="3" meta:cell-count="8736" meta:object-count="0"/>
    <meta:user-defined meta:name="Info 1"/>
    <meta:user-defined meta:name="Info 2"/>
    <meta:user-defined meta:name="Info 3"/>
    <meta:user-defined meta:name="Info 4"/>
  </office:meta>
</office:document-meta>
</file>